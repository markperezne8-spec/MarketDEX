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cell table:style-name="Build481Header" office:value-type="string">
            <text:p>Settlement Evidence Review Guidanc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cell office:value-type="string" table:formula="of:=IF([.U2]=&quot;UNKNOWN&quot;;&quot;COMPLETE OR ASSERT REQUIRED EVIDENCE BEFORE REVIEW&quot;;IF([.U2]=&quot;BLOCKED&quot;;&quot;RESOLVE CONTRADICTION BEFORE REVIEW — NO AUTHORITY CREATED&quot;;IF([.U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cell office:value-type="string" table:formula="of:=IF([.U3]=&quot;UNKNOWN&quot;;&quot;COMPLETE OR ASSERT REQUIRED EVIDENCE BEFORE REVIEW&quot;;IF([.U3]=&quot;BLOCKED&quot;;&quot;RESOLVE CONTRADICTION BEFORE REVIEW — NO AUTHORITY CREATED&quot;;IF([.U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cell office:value-type="string" table:formula="of:=IF([.U4]=&quot;UNKNOWN&quot;;&quot;COMPLETE OR ASSERT REQUIRED EVIDENCE BEFORE REVIEW&quot;;IF([.U4]=&quot;BLOCKED&quot;;&quot;RESOLVE CONTRADICTION BEFORE REVIEW — NO AUTHORITY CREATED&quot;;IF([.U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cell office:value-type="string" table:formula="of:=IF([.U5]=&quot;UNKNOWN&quot;;&quot;COMPLETE OR ASSERT REQUIRED EVIDENCE BEFORE REVIEW&quot;;IF([.U5]=&quot;BLOCKED&quot;;&quot;RESOLVE CONTRADICTION BEFORE REVIEW — NO AUTHORITY CREATED&quot;;IF([.U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cell office:value-type="string" table:formula="of:=IF([.U6]=&quot;UNKNOWN&quot;;&quot;COMPLETE OR ASSERT REQUIRED EVIDENCE BEFORE REVIEW&quot;;IF([.U6]=&quot;BLOCKED&quot;;&quot;RESOLVE CONTRADICTION BEFORE REVIEW — NO AUTHORITY CREATED&quot;;IF([.U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cell office:value-type="string" table:formula="of:=IF([.U7]=&quot;UNKNOWN&quot;;&quot;COMPLETE OR ASSERT REQUIRED EVIDENCE BEFORE REVIEW&quot;;IF([.U7]=&quot;BLOCKED&quot;;&quot;RESOLVE CONTRADICTION BEFORE REVIEW — NO AUTHORITY CREATED&quot;;IF([.U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cell office:value-type="string" table:formula="of:=IF([.U8]=&quot;UNKNOWN&quot;;&quot;COMPLETE OR ASSERT REQUIRED EVIDENCE BEFORE REVIEW&quot;;IF([.U8]=&quot;BLOCKED&quot;;&quot;RESOLVE CONTRADICTION BEFORE REVIEW — NO AUTHORITY CREATED&quot;;IF([.U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cell office:value-type="string" table:formula="of:=IF([.U9]=&quot;UNKNOWN&quot;;&quot;COMPLETE OR ASSERT REQUIRED EVIDENCE BEFORE REVIEW&quot;;IF([.U9]=&quot;BLOCKED&quot;;&quot;RESOLVE CONTRADICTION BEFORE REVIEW — NO AUTHORITY CREATED&quot;;IF([.U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cell office:value-type="string" table:formula="of:=IF([.U10]=&quot;UNKNOWN&quot;;&quot;COMPLETE OR ASSERT REQUIRED EVIDENCE BEFORE REVIEW&quot;;IF([.U10]=&quot;BLOCKED&quot;;&quot;RESOLVE CONTRADICTION BEFORE REVIEW — NO AUTHORITY CREATED&quot;;IF([.U1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cell office:value-type="string" table:formula="of:=IF([.U11]=&quot;UNKNOWN&quot;;&quot;COMPLETE OR ASSERT REQUIRED EVIDENCE BEFORE REVIEW&quot;;IF([.U11]=&quot;BLOCKED&quot;;&quot;RESOLVE CONTRADICTION BEFORE REVIEW — NO AUTHORITY CREATED&quot;;IF([.U1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cell office:value-type="string" table:formula="of:=IF([.U12]=&quot;UNKNOWN&quot;;&quot;COMPLETE OR ASSERT REQUIRED EVIDENCE BEFORE REVIEW&quot;;IF([.U12]=&quot;BLOCKED&quot;;&quot;RESOLVE CONTRADICTION BEFORE REVIEW — NO AUTHORITY CREATED&quot;;IF([.U1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cell office:value-type="string" table:formula="of:=IF([.U13]=&quot;UNKNOWN&quot;;&quot;COMPLETE OR ASSERT REQUIRED EVIDENCE BEFORE REVIEW&quot;;IF([.U13]=&quot;BLOCKED&quot;;&quot;RESOLVE CONTRADICTION BEFORE REVIEW — NO AUTHORITY CREATED&quot;;IF([.U1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cell office:value-type="string" table:formula="of:=IF([.U14]=&quot;UNKNOWN&quot;;&quot;COMPLETE OR ASSERT REQUIRED EVIDENCE BEFORE REVIEW&quot;;IF([.U14]=&quot;BLOCKED&quot;;&quot;RESOLVE CONTRADICTION BEFORE REVIEW — NO AUTHORITY CREATED&quot;;IF([.U1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cell office:value-type="string" table:formula="of:=IF([.U15]=&quot;UNKNOWN&quot;;&quot;COMPLETE OR ASSERT REQUIRED EVIDENCE BEFORE REVIEW&quot;;IF([.U15]=&quot;BLOCKED&quot;;&quot;RESOLVE CONTRADICTION BEFORE REVIEW — NO AUTHORITY CREATED&quot;;IF([.U1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cell office:value-type="string" table:formula="of:=IF([.U16]=&quot;UNKNOWN&quot;;&quot;COMPLETE OR ASSERT REQUIRED EVIDENCE BEFORE REVIEW&quot;;IF([.U16]=&quot;BLOCKED&quot;;&quot;RESOLVE CONTRADICTION BEFORE REVIEW — NO AUTHORITY CREATED&quot;;IF([.U1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cell office:value-type="string" table:formula="of:=IF([.U17]=&quot;UNKNOWN&quot;;&quot;COMPLETE OR ASSERT REQUIRED EVIDENCE BEFORE REVIEW&quot;;IF([.U17]=&quot;BLOCKED&quot;;&quot;RESOLVE CONTRADICTION BEFORE REVIEW — NO AUTHORITY CREATED&quot;;IF([.U1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cell office:value-type="string" table:formula="of:=IF([.U18]=&quot;UNKNOWN&quot;;&quot;COMPLETE OR ASSERT REQUIRED EVIDENCE BEFORE REVIEW&quot;;IF([.U18]=&quot;BLOCKED&quot;;&quot;RESOLVE CONTRADICTION BEFORE REVIEW — NO AUTHORITY CREATED&quot;;IF([.U1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cell office:value-type="string" table:formula="of:=IF([.U19]=&quot;UNKNOWN&quot;;&quot;COMPLETE OR ASSERT REQUIRED EVIDENCE BEFORE REVIEW&quot;;IF([.U19]=&quot;BLOCKED&quot;;&quot;RESOLVE CONTRADICTION BEFORE REVIEW — NO AUTHORITY CREATED&quot;;IF([.U1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cell office:value-type="string" table:formula="of:=IF([.U20]=&quot;UNKNOWN&quot;;&quot;COMPLETE OR ASSERT REQUIRED EVIDENCE BEFORE REVIEW&quot;;IF([.U20]=&quot;BLOCKED&quot;;&quot;RESOLVE CONTRADICTION BEFORE REVIEW — NO AUTHORITY CREATED&quot;;IF([.U2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cell office:value-type="string" table:formula="of:=IF([.U21]=&quot;UNKNOWN&quot;;&quot;COMPLETE OR ASSERT REQUIRED EVIDENCE BEFORE REVIEW&quot;;IF([.U21]=&quot;BLOCKED&quot;;&quot;RESOLVE CONTRADICTION BEFORE REVIEW — NO AUTHORITY CREATED&quot;;IF([.U2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cell office:value-type="string" table:formula="of:=IF([.U22]=&quot;UNKNOWN&quot;;&quot;COMPLETE OR ASSERT REQUIRED EVIDENCE BEFORE REVIEW&quot;;IF([.U22]=&quot;BLOCKED&quot;;&quot;RESOLVE CONTRADICTION BEFORE REVIEW — NO AUTHORITY CREATED&quot;;IF([.U2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cell office:value-type="string" table:formula="of:=IF([.U23]=&quot;UNKNOWN&quot;;&quot;COMPLETE OR ASSERT REQUIRED EVIDENCE BEFORE REVIEW&quot;;IF([.U23]=&quot;BLOCKED&quot;;&quot;RESOLVE CONTRADICTION BEFORE REVIEW — NO AUTHORITY CREATED&quot;;IF([.U2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cell office:value-type="string" table:formula="of:=IF([.U24]=&quot;UNKNOWN&quot;;&quot;COMPLETE OR ASSERT REQUIRED EVIDENCE BEFORE REVIEW&quot;;IF([.U24]=&quot;BLOCKED&quot;;&quot;RESOLVE CONTRADICTION BEFORE REVIEW — NO AUTHORITY CREATED&quot;;IF([.U2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cell office:value-type="string" table:formula="of:=IF([.U25]=&quot;UNKNOWN&quot;;&quot;COMPLETE OR ASSERT REQUIRED EVIDENCE BEFORE REVIEW&quot;;IF([.U25]=&quot;BLOCKED&quot;;&quot;RESOLVE CONTRADICTION BEFORE REVIEW — NO AUTHORITY CREATED&quot;;IF([.U2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cell office:value-type="string" table:formula="of:=IF([.U26]=&quot;UNKNOWN&quot;;&quot;COMPLETE OR ASSERT REQUIRED EVIDENCE BEFORE REVIEW&quot;;IF([.U26]=&quot;BLOCKED&quot;;&quot;RESOLVE CONTRADICTION BEFORE REVIEW — NO AUTHORITY CREATED&quot;;IF([.U2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cell office:value-type="string" table:formula="of:=IF([.U27]=&quot;UNKNOWN&quot;;&quot;COMPLETE OR ASSERT REQUIRED EVIDENCE BEFORE REVIEW&quot;;IF([.U27]=&quot;BLOCKED&quot;;&quot;RESOLVE CONTRADICTION BEFORE REVIEW — NO AUTHORITY CREATED&quot;;IF([.U2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cell office:value-type="string" table:formula="of:=IF([.U28]=&quot;UNKNOWN&quot;;&quot;COMPLETE OR ASSERT REQUIRED EVIDENCE BEFORE REVIEW&quot;;IF([.U28]=&quot;BLOCKED&quot;;&quot;RESOLVE CONTRADICTION BEFORE REVIEW — NO AUTHORITY CREATED&quot;;IF([.U2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cell office:value-type="string" table:formula="of:=IF([.U29]=&quot;UNKNOWN&quot;;&quot;COMPLETE OR ASSERT REQUIRED EVIDENCE BEFORE REVIEW&quot;;IF([.U29]=&quot;BLOCKED&quot;;&quot;RESOLVE CONTRADICTION BEFORE REVIEW — NO AUTHORITY CREATED&quot;;IF([.U2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cell office:value-type="string" table:formula="of:=IF([.U30]=&quot;UNKNOWN&quot;;&quot;COMPLETE OR ASSERT REQUIRED EVIDENCE BEFORE REVIEW&quot;;IF([.U30]=&quot;BLOCKED&quot;;&quot;RESOLVE CONTRADICTION BEFORE REVIEW — NO AUTHORITY CREATED&quot;;IF([.U3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cell office:value-type="string" table:formula="of:=IF([.U31]=&quot;UNKNOWN&quot;;&quot;COMPLETE OR ASSERT REQUIRED EVIDENCE BEFORE REVIEW&quot;;IF([.U31]=&quot;BLOCKED&quot;;&quot;RESOLVE CONTRADICTION BEFORE REVIEW — NO AUTHORITY CREATED&quot;;IF([.U3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cell office:value-type="string" table:formula="of:=IF([.U32]=&quot;UNKNOWN&quot;;&quot;COMPLETE OR ASSERT REQUIRED EVIDENCE BEFORE REVIEW&quot;;IF([.U32]=&quot;BLOCKED&quot;;&quot;RESOLVE CONTRADICTION BEFORE REVIEW — NO AUTHORITY CREATED&quot;;IF([.U3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cell office:value-type="string" table:formula="of:=IF([.U33]=&quot;UNKNOWN&quot;;&quot;COMPLETE OR ASSERT REQUIRED EVIDENCE BEFORE REVIEW&quot;;IF([.U33]=&quot;BLOCKED&quot;;&quot;RESOLVE CONTRADICTION BEFORE REVIEW — NO AUTHORITY CREATED&quot;;IF([.U3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cell office:value-type="string" table:formula="of:=IF([.U34]=&quot;UNKNOWN&quot;;&quot;COMPLETE OR ASSERT REQUIRED EVIDENCE BEFORE REVIEW&quot;;IF([.U34]=&quot;BLOCKED&quot;;&quot;RESOLVE CONTRADICTION BEFORE REVIEW — NO AUTHORITY CREATED&quot;;IF([.U3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cell office:value-type="string" table:formula="of:=IF([.U35]=&quot;UNKNOWN&quot;;&quot;COMPLETE OR ASSERT REQUIRED EVIDENCE BEFORE REVIEW&quot;;IF([.U35]=&quot;BLOCKED&quot;;&quot;RESOLVE CONTRADICTION BEFORE REVIEW — NO AUTHORITY CREATED&quot;;IF([.U3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cell office:value-type="string" table:formula="of:=IF([.U36]=&quot;UNKNOWN&quot;;&quot;COMPLETE OR ASSERT REQUIRED EVIDENCE BEFORE REVIEW&quot;;IF([.U36]=&quot;BLOCKED&quot;;&quot;RESOLVE CONTRADICTION BEFORE REVIEW — NO AUTHORITY CREATED&quot;;IF([.U3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cell office:value-type="string" table:formula="of:=IF([.U37]=&quot;UNKNOWN&quot;;&quot;COMPLETE OR ASSERT REQUIRED EVIDENCE BEFORE REVIEW&quot;;IF([.U37]=&quot;BLOCKED&quot;;&quot;RESOLVE CONTRADICTION BEFORE REVIEW — NO AUTHORITY CREATED&quot;;IF([.U3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cell office:value-type="string" table:formula="of:=IF([.U38]=&quot;UNKNOWN&quot;;&quot;COMPLETE OR ASSERT REQUIRED EVIDENCE BEFORE REVIEW&quot;;IF([.U38]=&quot;BLOCKED&quot;;&quot;RESOLVE CONTRADICTION BEFORE REVIEW — NO AUTHORITY CREATED&quot;;IF([.U3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cell office:value-type="string" table:formula="of:=IF([.U39]=&quot;UNKNOWN&quot;;&quot;COMPLETE OR ASSERT REQUIRED EVIDENCE BEFORE REVIEW&quot;;IF([.U39]=&quot;BLOCKED&quot;;&quot;RESOLVE CONTRADICTION BEFORE REVIEW — NO AUTHORITY CREATED&quot;;IF([.U3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cell office:value-type="string" table:formula="of:=IF([.U40]=&quot;UNKNOWN&quot;;&quot;COMPLETE OR ASSERT REQUIRED EVIDENCE BEFORE REVIEW&quot;;IF([.U40]=&quot;BLOCKED&quot;;&quot;RESOLVE CONTRADICTION BEFORE REVIEW — NO AUTHORITY CREATED&quot;;IF([.U4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cell office:value-type="string" table:formula="of:=IF([.U41]=&quot;UNKNOWN&quot;;&quot;COMPLETE OR ASSERT REQUIRED EVIDENCE BEFORE REVIEW&quot;;IF([.U41]=&quot;BLOCKED&quot;;&quot;RESOLVE CONTRADICTION BEFORE REVIEW — NO AUTHORITY CREATED&quot;;IF([.U4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cell office:value-type="string" table:formula="of:=IF([.U42]=&quot;UNKNOWN&quot;;&quot;COMPLETE OR ASSERT REQUIRED EVIDENCE BEFORE REVIEW&quot;;IF([.U42]=&quot;BLOCKED&quot;;&quot;RESOLVE CONTRADICTION BEFORE REVIEW — NO AUTHORITY CREATED&quot;;IF([.U4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cell office:value-type="string" table:formula="of:=IF([.U43]=&quot;UNKNOWN&quot;;&quot;COMPLETE OR ASSERT REQUIRED EVIDENCE BEFORE REVIEW&quot;;IF([.U43]=&quot;BLOCKED&quot;;&quot;RESOLVE CONTRADICTION BEFORE REVIEW — NO AUTHORITY CREATED&quot;;IF([.U4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cell office:value-type="string" table:formula="of:=IF([.U44]=&quot;UNKNOWN&quot;;&quot;COMPLETE OR ASSERT REQUIRED EVIDENCE BEFORE REVIEW&quot;;IF([.U44]=&quot;BLOCKED&quot;;&quot;RESOLVE CONTRADICTION BEFORE REVIEW — NO AUTHORITY CREATED&quot;;IF([.U4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cell office:value-type="string" table:formula="of:=IF([.U45]=&quot;UNKNOWN&quot;;&quot;COMPLETE OR ASSERT REQUIRED EVIDENCE BEFORE REVIEW&quot;;IF([.U45]=&quot;BLOCKED&quot;;&quot;RESOLVE CONTRADICTION BEFORE REVIEW — NO AUTHORITY CREATED&quot;;IF([.U4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cell office:value-type="string" table:formula="of:=IF([.U46]=&quot;UNKNOWN&quot;;&quot;COMPLETE OR ASSERT REQUIRED EVIDENCE BEFORE REVIEW&quot;;IF([.U46]=&quot;BLOCKED&quot;;&quot;RESOLVE CONTRADICTION BEFORE REVIEW — NO AUTHORITY CREATED&quot;;IF([.U4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cell office:value-type="string" table:formula="of:=IF([.U47]=&quot;UNKNOWN&quot;;&quot;COMPLETE OR ASSERT REQUIRED EVIDENCE BEFORE REVIEW&quot;;IF([.U47]=&quot;BLOCKED&quot;;&quot;RESOLVE CONTRADICTION BEFORE REVIEW — NO AUTHORITY CREATED&quot;;IF([.U4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cell office:value-type="string" table:formula="of:=IF([.U48]=&quot;UNKNOWN&quot;;&quot;COMPLETE OR ASSERT REQUIRED EVIDENCE BEFORE REVIEW&quot;;IF([.U48]=&quot;BLOCKED&quot;;&quot;RESOLVE CONTRADICTION BEFORE REVIEW — NO AUTHORITY CREATED&quot;;IF([.U4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cell office:value-type="string" table:formula="of:=IF([.U49]=&quot;UNKNOWN&quot;;&quot;COMPLETE OR ASSERT REQUIRED EVIDENCE BEFORE REVIEW&quot;;IF([.U49]=&quot;BLOCKED&quot;;&quot;RESOLVE CONTRADICTION BEFORE REVIEW — NO AUTHORITY CREATED&quot;;IF([.U4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cell office:value-type="string" table:formula="of:=IF([.U50]=&quot;UNKNOWN&quot;;&quot;COMPLETE OR ASSERT REQUIRED EVIDENCE BEFORE REVIEW&quot;;IF([.U50]=&quot;BLOCKED&quot;;&quot;RESOLVE CONTRADICTION BEFORE REVIEW — NO AUTHORITY CREATED&quot;;IF([.U5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cell office:value-type="string" table:formula="of:=IF([.U51]=&quot;UNKNOWN&quot;;&quot;COMPLETE OR ASSERT REQUIRED EVIDENCE BEFORE REVIEW&quot;;IF([.U51]=&quot;BLOCKED&quot;;&quot;RESOLVE CONTRADICTION BEFORE REVIEW — NO AUTHORITY CREATED&quot;;IF([.U5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cell office:value-type="string" table:formula="of:=IF([.U52]=&quot;UNKNOWN&quot;;&quot;COMPLETE OR ASSERT REQUIRED EVIDENCE BEFORE REVIEW&quot;;IF([.U52]=&quot;BLOCKED&quot;;&quot;RESOLVE CONTRADICTION BEFORE REVIEW — NO AUTHORITY CREATED&quot;;IF([.U5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cell office:value-type="string" table:formula="of:=IF([.U53]=&quot;UNKNOWN&quot;;&quot;COMPLETE OR ASSERT REQUIRED EVIDENCE BEFORE REVIEW&quot;;IF([.U53]=&quot;BLOCKED&quot;;&quot;RESOLVE CONTRADICTION BEFORE REVIEW — NO AUTHORITY CREATED&quot;;IF([.U5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cell office:value-type="string" table:formula="of:=IF([.U54]=&quot;UNKNOWN&quot;;&quot;COMPLETE OR ASSERT REQUIRED EVIDENCE BEFORE REVIEW&quot;;IF([.U54]=&quot;BLOCKED&quot;;&quot;RESOLVE CONTRADICTION BEFORE REVIEW — NO AUTHORITY CREATED&quot;;IF([.U5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cell office:value-type="string" table:formula="of:=IF([.U55]=&quot;UNKNOWN&quot;;&quot;COMPLETE OR ASSERT REQUIRED EVIDENCE BEFORE REVIEW&quot;;IF([.U55]=&quot;BLOCKED&quot;;&quot;RESOLVE CONTRADICTION BEFORE REVIEW — NO AUTHORITY CREATED&quot;;IF([.U5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cell office:value-type="string" table:formula="of:=IF([.U56]=&quot;UNKNOWN&quot;;&quot;COMPLETE OR ASSERT REQUIRED EVIDENCE BEFORE REVIEW&quot;;IF([.U56]=&quot;BLOCKED&quot;;&quot;RESOLVE CONTRADICTION BEFORE REVIEW — NO AUTHORITY CREATED&quot;;IF([.U5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cell office:value-type="string" table:formula="of:=IF([.U57]=&quot;UNKNOWN&quot;;&quot;COMPLETE OR ASSERT REQUIRED EVIDENCE BEFORE REVIEW&quot;;IF([.U57]=&quot;BLOCKED&quot;;&quot;RESOLVE CONTRADICTION BEFORE REVIEW — NO AUTHORITY CREATED&quot;;IF([.U5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cell office:value-type="string" table:formula="of:=IF([.U58]=&quot;UNKNOWN&quot;;&quot;COMPLETE OR ASSERT REQUIRED EVIDENCE BEFORE REVIEW&quot;;IF([.U58]=&quot;BLOCKED&quot;;&quot;RESOLVE CONTRADICTION BEFORE REVIEW — NO AUTHORITY CREATED&quot;;IF([.U5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cell office:value-type="string" table:formula="of:=IF([.U59]=&quot;UNKNOWN&quot;;&quot;COMPLETE OR ASSERT REQUIRED EVIDENCE BEFORE REVIEW&quot;;IF([.U59]=&quot;BLOCKED&quot;;&quot;RESOLVE CONTRADICTION BEFORE REVIEW — NO AUTHORITY CREATED&quot;;IF([.U5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cell office:value-type="string" table:formula="of:=IF([.U60]=&quot;UNKNOWN&quot;;&quot;COMPLETE OR ASSERT REQUIRED EVIDENCE BEFORE REVIEW&quot;;IF([.U60]=&quot;BLOCKED&quot;;&quot;RESOLVE CONTRADICTION BEFORE REVIEW — NO AUTHORITY CREATED&quot;;IF([.U6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cell office:value-type="string" table:formula="of:=IF([.U61]=&quot;UNKNOWN&quot;;&quot;COMPLETE OR ASSERT REQUIRED EVIDENCE BEFORE REVIEW&quot;;IF([.U61]=&quot;BLOCKED&quot;;&quot;RESOLVE CONTRADICTION BEFORE REVIEW — NO AUTHORITY CREATED&quot;;IF([.U6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cell office:value-type="string" table:formula="of:=IF([.U62]=&quot;UNKNOWN&quot;;&quot;COMPLETE OR ASSERT REQUIRED EVIDENCE BEFORE REVIEW&quot;;IF([.U62]=&quot;BLOCKED&quot;;&quot;RESOLVE CONTRADICTION BEFORE REVIEW — NO AUTHORITY CREATED&quot;;IF([.U6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cell office:value-type="string" table:formula="of:=IF([.U63]=&quot;UNKNOWN&quot;;&quot;COMPLETE OR ASSERT REQUIRED EVIDENCE BEFORE REVIEW&quot;;IF([.U63]=&quot;BLOCKED&quot;;&quot;RESOLVE CONTRADICTION BEFORE REVIEW — NO AUTHORITY CREATED&quot;;IF([.U6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cell office:value-type="string" table:formula="of:=IF([.U64]=&quot;UNKNOWN&quot;;&quot;COMPLETE OR ASSERT REQUIRED EVIDENCE BEFORE REVIEW&quot;;IF([.U64]=&quot;BLOCKED&quot;;&quot;RESOLVE CONTRADICTION BEFORE REVIEW — NO AUTHORITY CREATED&quot;;IF([.U6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cell office:value-type="string" table:formula="of:=IF([.U65]=&quot;UNKNOWN&quot;;&quot;COMPLETE OR ASSERT REQUIRED EVIDENCE BEFORE REVIEW&quot;;IF([.U65]=&quot;BLOCKED&quot;;&quot;RESOLVE CONTRADICTION BEFORE REVIEW — NO AUTHORITY CREATED&quot;;IF([.U6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cell office:value-type="string" table:formula="of:=IF([.U66]=&quot;UNKNOWN&quot;;&quot;COMPLETE OR ASSERT REQUIRED EVIDENCE BEFORE REVIEW&quot;;IF([.U66]=&quot;BLOCKED&quot;;&quot;RESOLVE CONTRADICTION BEFORE REVIEW — NO AUTHORITY CREATED&quot;;IF([.U6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cell office:value-type="string" table:formula="of:=IF([.U67]=&quot;UNKNOWN&quot;;&quot;COMPLETE OR ASSERT REQUIRED EVIDENCE BEFORE REVIEW&quot;;IF([.U67]=&quot;BLOCKED&quot;;&quot;RESOLVE CONTRADICTION BEFORE REVIEW — NO AUTHORITY CREATED&quot;;IF([.U6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cell office:value-type="string" table:formula="of:=IF([.U68]=&quot;UNKNOWN&quot;;&quot;COMPLETE OR ASSERT REQUIRED EVIDENCE BEFORE REVIEW&quot;;IF([.U68]=&quot;BLOCKED&quot;;&quot;RESOLVE CONTRADICTION BEFORE REVIEW — NO AUTHORITY CREATED&quot;;IF([.U6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cell office:value-type="string" table:formula="of:=IF([.U69]=&quot;UNKNOWN&quot;;&quot;COMPLETE OR ASSERT REQUIRED EVIDENCE BEFORE REVIEW&quot;;IF([.U69]=&quot;BLOCKED&quot;;&quot;RESOLVE CONTRADICTION BEFORE REVIEW — NO AUTHORITY CREATED&quot;;IF([.U6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cell office:value-type="string" table:formula="of:=IF([.U70]=&quot;UNKNOWN&quot;;&quot;COMPLETE OR ASSERT REQUIRED EVIDENCE BEFORE REVIEW&quot;;IF([.U70]=&quot;BLOCKED&quot;;&quot;RESOLVE CONTRADICTION BEFORE REVIEW — NO AUTHORITY CREATED&quot;;IF([.U7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cell office:value-type="string" table:formula="of:=IF([.U71]=&quot;UNKNOWN&quot;;&quot;COMPLETE OR ASSERT REQUIRED EVIDENCE BEFORE REVIEW&quot;;IF([.U71]=&quot;BLOCKED&quot;;&quot;RESOLVE CONTRADICTION BEFORE REVIEW — NO AUTHORITY CREATED&quot;;IF([.U7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cell office:value-type="string" table:formula="of:=IF([.U72]=&quot;UNKNOWN&quot;;&quot;COMPLETE OR ASSERT REQUIRED EVIDENCE BEFORE REVIEW&quot;;IF([.U72]=&quot;BLOCKED&quot;;&quot;RESOLVE CONTRADICTION BEFORE REVIEW — NO AUTHORITY CREATED&quot;;IF([.U7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cell office:value-type="string" table:formula="of:=IF([.U73]=&quot;UNKNOWN&quot;;&quot;COMPLETE OR ASSERT REQUIRED EVIDENCE BEFORE REVIEW&quot;;IF([.U73]=&quot;BLOCKED&quot;;&quot;RESOLVE CONTRADICTION BEFORE REVIEW — NO AUTHORITY CREATED&quot;;IF([.U7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cell office:value-type="string" table:formula="of:=IF([.U74]=&quot;UNKNOWN&quot;;&quot;COMPLETE OR ASSERT REQUIRED EVIDENCE BEFORE REVIEW&quot;;IF([.U74]=&quot;BLOCKED&quot;;&quot;RESOLVE CONTRADICTION BEFORE REVIEW — NO AUTHORITY CREATED&quot;;IF([.U7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cell office:value-type="string" table:formula="of:=IF([.U75]=&quot;UNKNOWN&quot;;&quot;COMPLETE OR ASSERT REQUIRED EVIDENCE BEFORE REVIEW&quot;;IF([.U75]=&quot;BLOCKED&quot;;&quot;RESOLVE CONTRADICTION BEFORE REVIEW — NO AUTHORITY CREATED&quot;;IF([.U7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cell office:value-type="string" table:formula="of:=IF([.U76]=&quot;UNKNOWN&quot;;&quot;COMPLETE OR ASSERT REQUIRED EVIDENCE BEFORE REVIEW&quot;;IF([.U76]=&quot;BLOCKED&quot;;&quot;RESOLVE CONTRADICTION BEFORE REVIEW — NO AUTHORITY CREATED&quot;;IF([.U7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cell office:value-type="string" table:formula="of:=IF([.U77]=&quot;UNKNOWN&quot;;&quot;COMPLETE OR ASSERT REQUIRED EVIDENCE BEFORE REVIEW&quot;;IF([.U77]=&quot;BLOCKED&quot;;&quot;RESOLVE CONTRADICTION BEFORE REVIEW — NO AUTHORITY CREATED&quot;;IF([.U7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cell office:value-type="string" table:formula="of:=IF([.U78]=&quot;UNKNOWN&quot;;&quot;COMPLETE OR ASSERT REQUIRED EVIDENCE BEFORE REVIEW&quot;;IF([.U78]=&quot;BLOCKED&quot;;&quot;RESOLVE CONTRADICTION BEFORE REVIEW — NO AUTHORITY CREATED&quot;;IF([.U7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cell office:value-type="string" table:formula="of:=IF([.U79]=&quot;UNKNOWN&quot;;&quot;COMPLETE OR ASSERT REQUIRED EVIDENCE BEFORE REVIEW&quot;;IF([.U79]=&quot;BLOCKED&quot;;&quot;RESOLVE CONTRADICTION BEFORE REVIEW — NO AUTHORITY CREATED&quot;;IF([.U7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cell office:value-type="string" table:formula="of:=IF([.U80]=&quot;UNKNOWN&quot;;&quot;COMPLETE OR ASSERT REQUIRED EVIDENCE BEFORE REVIEW&quot;;IF([.U80]=&quot;BLOCKED&quot;;&quot;RESOLVE CONTRADICTION BEFORE REVIEW — NO AUTHORITY CREATED&quot;;IF([.U8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cell office:value-type="string" table:formula="of:=IF([.U81]=&quot;UNKNOWN&quot;;&quot;COMPLETE OR ASSERT REQUIRED EVIDENCE BEFORE REVIEW&quot;;IF([.U81]=&quot;BLOCKED&quot;;&quot;RESOLVE CONTRADICTION BEFORE REVIEW — NO AUTHORITY CREATED&quot;;IF([.U8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cell office:value-type="string" table:formula="of:=IF([.U82]=&quot;UNKNOWN&quot;;&quot;COMPLETE OR ASSERT REQUIRED EVIDENCE BEFORE REVIEW&quot;;IF([.U82]=&quot;BLOCKED&quot;;&quot;RESOLVE CONTRADICTION BEFORE REVIEW — NO AUTHORITY CREATED&quot;;IF([.U8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cell office:value-type="string" table:formula="of:=IF([.U83]=&quot;UNKNOWN&quot;;&quot;COMPLETE OR ASSERT REQUIRED EVIDENCE BEFORE REVIEW&quot;;IF([.U83]=&quot;BLOCKED&quot;;&quot;RESOLVE CONTRADICTION BEFORE REVIEW — NO AUTHORITY CREATED&quot;;IF([.U8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cell office:value-type="string" table:formula="of:=IF([.U84]=&quot;UNKNOWN&quot;;&quot;COMPLETE OR ASSERT REQUIRED EVIDENCE BEFORE REVIEW&quot;;IF([.U84]=&quot;BLOCKED&quot;;&quot;RESOLVE CONTRADICTION BEFORE REVIEW — NO AUTHORITY CREATED&quot;;IF([.U8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cell office:value-type="string" table:formula="of:=IF([.U85]=&quot;UNKNOWN&quot;;&quot;COMPLETE OR ASSERT REQUIRED EVIDENCE BEFORE REVIEW&quot;;IF([.U85]=&quot;BLOCKED&quot;;&quot;RESOLVE CONTRADICTION BEFORE REVIEW — NO AUTHORITY CREATED&quot;;IF([.U8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cell office:value-type="string" table:formula="of:=IF([.U86]=&quot;UNKNOWN&quot;;&quot;COMPLETE OR ASSERT REQUIRED EVIDENCE BEFORE REVIEW&quot;;IF([.U86]=&quot;BLOCKED&quot;;&quot;RESOLVE CONTRADICTION BEFORE REVIEW — NO AUTHORITY CREATED&quot;;IF([.U8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cell office:value-type="string" table:formula="of:=IF([.U87]=&quot;UNKNOWN&quot;;&quot;COMPLETE OR ASSERT REQUIRED EVIDENCE BEFORE REVIEW&quot;;IF([.U87]=&quot;BLOCKED&quot;;&quot;RESOLVE CONTRADICTION BEFORE REVIEW — NO AUTHORITY CREATED&quot;;IF([.U8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cell office:value-type="string" table:formula="of:=IF([.U88]=&quot;UNKNOWN&quot;;&quot;COMPLETE OR ASSERT REQUIRED EVIDENCE BEFORE REVIEW&quot;;IF([.U88]=&quot;BLOCKED&quot;;&quot;RESOLVE CONTRADICTION BEFORE REVIEW — NO AUTHORITY CREATED&quot;;IF([.U8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cell office:value-type="string" table:formula="of:=IF([.U89]=&quot;UNKNOWN&quot;;&quot;COMPLETE OR ASSERT REQUIRED EVIDENCE BEFORE REVIEW&quot;;IF([.U89]=&quot;BLOCKED&quot;;&quot;RESOLVE CONTRADICTION BEFORE REVIEW — NO AUTHORITY CREATED&quot;;IF([.U8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cell office:value-type="string" table:formula="of:=IF([.U90]=&quot;UNKNOWN&quot;;&quot;COMPLETE OR ASSERT REQUIRED EVIDENCE BEFORE REVIEW&quot;;IF([.U90]=&quot;BLOCKED&quot;;&quot;RESOLVE CONTRADICTION BEFORE REVIEW — NO AUTHORITY CREATED&quot;;IF([.U9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cell office:value-type="string" table:formula="of:=IF([.U91]=&quot;UNKNOWN&quot;;&quot;COMPLETE OR ASSERT REQUIRED EVIDENCE BEFORE REVIEW&quot;;IF([.U91]=&quot;BLOCKED&quot;;&quot;RESOLVE CONTRADICTION BEFORE REVIEW — NO AUTHORITY CREATED&quot;;IF([.U9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cell office:value-type="string" table:formula="of:=IF([.U92]=&quot;UNKNOWN&quot;;&quot;COMPLETE OR ASSERT REQUIRED EVIDENCE BEFORE REVIEW&quot;;IF([.U92]=&quot;BLOCKED&quot;;&quot;RESOLVE CONTRADICTION BEFORE REVIEW — NO AUTHORITY CREATED&quot;;IF([.U9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cell office:value-type="string" table:formula="of:=IF([.U93]=&quot;UNKNOWN&quot;;&quot;COMPLETE OR ASSERT REQUIRED EVIDENCE BEFORE REVIEW&quot;;IF([.U93]=&quot;BLOCKED&quot;;&quot;RESOLVE CONTRADICTION BEFORE REVIEW — NO AUTHORITY CREATED&quot;;IF([.U9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cell office:value-type="string" table:formula="of:=IF([.U94]=&quot;UNKNOWN&quot;;&quot;COMPLETE OR ASSERT REQUIRED EVIDENCE BEFORE REVIEW&quot;;IF([.U94]=&quot;BLOCKED&quot;;&quot;RESOLVE CONTRADICTION BEFORE REVIEW — NO AUTHORITY CREATED&quot;;IF([.U9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cell office:value-type="string" table:formula="of:=IF([.U95]=&quot;UNKNOWN&quot;;&quot;COMPLETE OR ASSERT REQUIRED EVIDENCE BEFORE REVIEW&quot;;IF([.U95]=&quot;BLOCKED&quot;;&quot;RESOLVE CONTRADICTION BEFORE REVIEW — NO AUTHORITY CREATED&quot;;IF([.U9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cell office:value-type="string" table:formula="of:=IF([.U96]=&quot;UNKNOWN&quot;;&quot;COMPLETE OR ASSERT REQUIRED EVIDENCE BEFORE REVIEW&quot;;IF([.U96]=&quot;BLOCKED&quot;;&quot;RESOLVE CONTRADICTION BEFORE REVIEW — NO AUTHORITY CREATED&quot;;IF([.U9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cell office:value-type="string" table:formula="of:=IF([.U97]=&quot;UNKNOWN&quot;;&quot;COMPLETE OR ASSERT REQUIRED EVIDENCE BEFORE REVIEW&quot;;IF([.U97]=&quot;BLOCKED&quot;;&quot;RESOLVE CONTRADICTION BEFORE REVIEW — NO AUTHORITY CREATED&quot;;IF([.U9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cell office:value-type="string" table:formula="of:=IF([.U98]=&quot;UNKNOWN&quot;;&quot;COMPLETE OR ASSERT REQUIRED EVIDENCE BEFORE REVIEW&quot;;IF([.U98]=&quot;BLOCKED&quot;;&quot;RESOLVE CONTRADICTION BEFORE REVIEW — NO AUTHORITY CREATED&quot;;IF([.U9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cell office:value-type="string" table:formula="of:=IF([.U99]=&quot;UNKNOWN&quot;;&quot;COMPLETE OR ASSERT REQUIRED EVIDENCE BEFORE REVIEW&quot;;IF([.U99]=&quot;BLOCKED&quot;;&quot;RESOLVE CONTRADICTION BEFORE REVIEW — NO AUTHORITY CREATED&quot;;IF([.U9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cell office:value-type="string" table:formula="of:=IF([.U100]=&quot;UNKNOWN&quot;;&quot;COMPLETE OR ASSERT REQUIRED EVIDENCE BEFORE REVIEW&quot;;IF([.U100]=&quot;BLOCKED&quot;;&quot;RESOLVE CONTRADICTION BEFORE REVIEW — NO AUTHORITY CREATED&quot;;IF([.U10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cell office:value-type="string" table:formula="of:=IF([.U101]=&quot;UNKNOWN&quot;;&quot;COMPLETE OR ASSERT REQUIRED EVIDENCE BEFORE REVIEW&quot;;IF([.U101]=&quot;BLOCKED&quot;;&quot;RESOLVE CONTRADICTION BEFORE REVIEW — NO AUTHORITY CREATED&quot;;IF([.U10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cell office:value-type="string" table:formula="of:=IF([.U102]=&quot;UNKNOWN&quot;;&quot;COMPLETE OR ASSERT REQUIRED EVIDENCE BEFORE REVIEW&quot;;IF([.U102]=&quot;BLOCKED&quot;;&quot;RESOLVE CONTRADICTION BEFORE REVIEW — NO AUTHORITY CREATED&quot;;IF([.U10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cell office:value-type="string" table:formula="of:=IF([.U103]=&quot;UNKNOWN&quot;;&quot;COMPLETE OR ASSERT REQUIRED EVIDENCE BEFORE REVIEW&quot;;IF([.U103]=&quot;BLOCKED&quot;;&quot;RESOLVE CONTRADICTION BEFORE REVIEW — NO AUTHORITY CREATED&quot;;IF([.U10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cell office:value-type="string" table:formula="of:=IF([.U104]=&quot;UNKNOWN&quot;;&quot;COMPLETE OR ASSERT REQUIRED EVIDENCE BEFORE REVIEW&quot;;IF([.U104]=&quot;BLOCKED&quot;;&quot;RESOLVE CONTRADICTION BEFORE REVIEW — NO AUTHORITY CREATED&quot;;IF([.U10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cell office:value-type="string" table:formula="of:=IF([.U105]=&quot;UNKNOWN&quot;;&quot;COMPLETE OR ASSERT REQUIRED EVIDENCE BEFORE REVIEW&quot;;IF([.U105]=&quot;BLOCKED&quot;;&quot;RESOLVE CONTRADICTION BEFORE REVIEW — NO AUTHORITY CREATED&quot;;IF([.U10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cell office:value-type="string" table:formula="of:=IF([.U106]=&quot;UNKNOWN&quot;;&quot;COMPLETE OR ASSERT REQUIRED EVIDENCE BEFORE REVIEW&quot;;IF([.U106]=&quot;BLOCKED&quot;;&quot;RESOLVE CONTRADICTION BEFORE REVIEW — NO AUTHORITY CREATED&quot;;IF([.U10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cell office:value-type="string" table:formula="of:=IF([.U107]=&quot;UNKNOWN&quot;;&quot;COMPLETE OR ASSERT REQUIRED EVIDENCE BEFORE REVIEW&quot;;IF([.U107]=&quot;BLOCKED&quot;;&quot;RESOLVE CONTRADICTION BEFORE REVIEW — NO AUTHORITY CREATED&quot;;IF([.U10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cell office:value-type="string" table:formula="of:=IF([.U108]=&quot;UNKNOWN&quot;;&quot;COMPLETE OR ASSERT REQUIRED EVIDENCE BEFORE REVIEW&quot;;IF([.U108]=&quot;BLOCKED&quot;;&quot;RESOLVE CONTRADICTION BEFORE REVIEW — NO AUTHORITY CREATED&quot;;IF([.U10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cell office:value-type="string" table:formula="of:=IF([.U109]=&quot;UNKNOWN&quot;;&quot;COMPLETE OR ASSERT REQUIRED EVIDENCE BEFORE REVIEW&quot;;IF([.U109]=&quot;BLOCKED&quot;;&quot;RESOLVE CONTRADICTION BEFORE REVIEW — NO AUTHORITY CREATED&quot;;IF([.U10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cell office:value-type="string" table:formula="of:=IF([.U110]=&quot;UNKNOWN&quot;;&quot;COMPLETE OR ASSERT REQUIRED EVIDENCE BEFORE REVIEW&quot;;IF([.U110]=&quot;BLOCKED&quot;;&quot;RESOLVE CONTRADICTION BEFORE REVIEW — NO AUTHORITY CREATED&quot;;IF([.U11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cell office:value-type="string" table:formula="of:=IF([.U111]=&quot;UNKNOWN&quot;;&quot;COMPLETE OR ASSERT REQUIRED EVIDENCE BEFORE REVIEW&quot;;IF([.U111]=&quot;BLOCKED&quot;;&quot;RESOLVE CONTRADICTION BEFORE REVIEW — NO AUTHORITY CREATED&quot;;IF([.U11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cell office:value-type="string" table:formula="of:=IF([.U112]=&quot;UNKNOWN&quot;;&quot;COMPLETE OR ASSERT REQUIRED EVIDENCE BEFORE REVIEW&quot;;IF([.U112]=&quot;BLOCKED&quot;;&quot;RESOLVE CONTRADICTION BEFORE REVIEW — NO AUTHORITY CREATED&quot;;IF([.U11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cell office:value-type="string" table:formula="of:=IF([.U113]=&quot;UNKNOWN&quot;;&quot;COMPLETE OR ASSERT REQUIRED EVIDENCE BEFORE REVIEW&quot;;IF([.U113]=&quot;BLOCKED&quot;;&quot;RESOLVE CONTRADICTION BEFORE REVIEW — NO AUTHORITY CREATED&quot;;IF([.U11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cell office:value-type="string" table:formula="of:=IF([.U114]=&quot;UNKNOWN&quot;;&quot;COMPLETE OR ASSERT REQUIRED EVIDENCE BEFORE REVIEW&quot;;IF([.U114]=&quot;BLOCKED&quot;;&quot;RESOLVE CONTRADICTION BEFORE REVIEW — NO AUTHORITY CREATED&quot;;IF([.U11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cell office:value-type="string" table:formula="of:=IF([.U115]=&quot;UNKNOWN&quot;;&quot;COMPLETE OR ASSERT REQUIRED EVIDENCE BEFORE REVIEW&quot;;IF([.U115]=&quot;BLOCKED&quot;;&quot;RESOLVE CONTRADICTION BEFORE REVIEW — NO AUTHORITY CREATED&quot;;IF([.U11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cell office:value-type="string" table:formula="of:=IF([.U116]=&quot;UNKNOWN&quot;;&quot;COMPLETE OR ASSERT REQUIRED EVIDENCE BEFORE REVIEW&quot;;IF([.U116]=&quot;BLOCKED&quot;;&quot;RESOLVE CONTRADICTION BEFORE REVIEW — NO AUTHORITY CREATED&quot;;IF([.U11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cell office:value-type="string" table:formula="of:=IF([.U117]=&quot;UNKNOWN&quot;;&quot;COMPLETE OR ASSERT REQUIRED EVIDENCE BEFORE REVIEW&quot;;IF([.U117]=&quot;BLOCKED&quot;;&quot;RESOLVE CONTRADICTION BEFORE REVIEW — NO AUTHORITY CREATED&quot;;IF([.U11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cell office:value-type="string" table:formula="of:=IF([.U118]=&quot;UNKNOWN&quot;;&quot;COMPLETE OR ASSERT REQUIRED EVIDENCE BEFORE REVIEW&quot;;IF([.U118]=&quot;BLOCKED&quot;;&quot;RESOLVE CONTRADICTION BEFORE REVIEW — NO AUTHORITY CREATED&quot;;IF([.U11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cell office:value-type="string" table:formula="of:=IF([.U119]=&quot;UNKNOWN&quot;;&quot;COMPLETE OR ASSERT REQUIRED EVIDENCE BEFORE REVIEW&quot;;IF([.U119]=&quot;BLOCKED&quot;;&quot;RESOLVE CONTRADICTION BEFORE REVIEW — NO AUTHORITY CREATED&quot;;IF([.U11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cell office:value-type="string" table:formula="of:=IF([.U120]=&quot;UNKNOWN&quot;;&quot;COMPLETE OR ASSERT REQUIRED EVIDENCE BEFORE REVIEW&quot;;IF([.U120]=&quot;BLOCKED&quot;;&quot;RESOLVE CONTRADICTION BEFORE REVIEW — NO AUTHORITY CREATED&quot;;IF([.U12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cell office:value-type="string" table:formula="of:=IF([.U121]=&quot;UNKNOWN&quot;;&quot;COMPLETE OR ASSERT REQUIRED EVIDENCE BEFORE REVIEW&quot;;IF([.U121]=&quot;BLOCKED&quot;;&quot;RESOLVE CONTRADICTION BEFORE REVIEW — NO AUTHORITY CREATED&quot;;IF([.U12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cell office:value-type="string" table:formula="of:=IF([.U122]=&quot;UNKNOWN&quot;;&quot;COMPLETE OR ASSERT REQUIRED EVIDENCE BEFORE REVIEW&quot;;IF([.U122]=&quot;BLOCKED&quot;;&quot;RESOLVE CONTRADICTION BEFORE REVIEW — NO AUTHORITY CREATED&quot;;IF([.U12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cell office:value-type="string" table:formula="of:=IF([.U123]=&quot;UNKNOWN&quot;;&quot;COMPLETE OR ASSERT REQUIRED EVIDENCE BEFORE REVIEW&quot;;IF([.U123]=&quot;BLOCKED&quot;;&quot;RESOLVE CONTRADICTION BEFORE REVIEW — NO AUTHORITY CREATED&quot;;IF([.U12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cell office:value-type="string" table:formula="of:=IF([.U124]=&quot;UNKNOWN&quot;;&quot;COMPLETE OR ASSERT REQUIRED EVIDENCE BEFORE REVIEW&quot;;IF([.U124]=&quot;BLOCKED&quot;;&quot;RESOLVE CONTRADICTION BEFORE REVIEW — NO AUTHORITY CREATED&quot;;IF([.U12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cell office:value-type="string" table:formula="of:=IF([.U125]=&quot;UNKNOWN&quot;;&quot;COMPLETE OR ASSERT REQUIRED EVIDENCE BEFORE REVIEW&quot;;IF([.U125]=&quot;BLOCKED&quot;;&quot;RESOLVE CONTRADICTION BEFORE REVIEW — NO AUTHORITY CREATED&quot;;IF([.U12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cell office:value-type="string" table:formula="of:=IF([.U126]=&quot;UNKNOWN&quot;;&quot;COMPLETE OR ASSERT REQUIRED EVIDENCE BEFORE REVIEW&quot;;IF([.U126]=&quot;BLOCKED&quot;;&quot;RESOLVE CONTRADICTION BEFORE REVIEW — NO AUTHORITY CREATED&quot;;IF([.U12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cell office:value-type="string" table:formula="of:=IF([.U127]=&quot;UNKNOWN&quot;;&quot;COMPLETE OR ASSERT REQUIRED EVIDENCE BEFORE REVIEW&quot;;IF([.U127]=&quot;BLOCKED&quot;;&quot;RESOLVE CONTRADICTION BEFORE REVIEW — NO AUTHORITY CREATED&quot;;IF([.U12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cell office:value-type="string" table:formula="of:=IF([.U128]=&quot;UNKNOWN&quot;;&quot;COMPLETE OR ASSERT REQUIRED EVIDENCE BEFORE REVIEW&quot;;IF([.U128]=&quot;BLOCKED&quot;;&quot;RESOLVE CONTRADICTION BEFORE REVIEW — NO AUTHORITY CREATED&quot;;IF([.U12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cell office:value-type="string" table:formula="of:=IF([.U129]=&quot;UNKNOWN&quot;;&quot;COMPLETE OR ASSERT REQUIRED EVIDENCE BEFORE REVIEW&quot;;IF([.U129]=&quot;BLOCKED&quot;;&quot;RESOLVE CONTRADICTION BEFORE REVIEW — NO AUTHORITY CREATED&quot;;IF([.U12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cell office:value-type="string" table:formula="of:=IF([.U130]=&quot;UNKNOWN&quot;;&quot;COMPLETE OR ASSERT REQUIRED EVIDENCE BEFORE REVIEW&quot;;IF([.U130]=&quot;BLOCKED&quot;;&quot;RESOLVE CONTRADICTION BEFORE REVIEW — NO AUTHORITY CREATED&quot;;IF([.U13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cell office:value-type="string" table:formula="of:=IF([.U131]=&quot;UNKNOWN&quot;;&quot;COMPLETE OR ASSERT REQUIRED EVIDENCE BEFORE REVIEW&quot;;IF([.U131]=&quot;BLOCKED&quot;;&quot;RESOLVE CONTRADICTION BEFORE REVIEW — NO AUTHORITY CREATED&quot;;IF([.U13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cell office:value-type="string" table:formula="of:=IF([.U132]=&quot;UNKNOWN&quot;;&quot;COMPLETE OR ASSERT REQUIRED EVIDENCE BEFORE REVIEW&quot;;IF([.U132]=&quot;BLOCKED&quot;;&quot;RESOLVE CONTRADICTION BEFORE REVIEW — NO AUTHORITY CREATED&quot;;IF([.U13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cell office:value-type="string" table:formula="of:=IF([.U133]=&quot;UNKNOWN&quot;;&quot;COMPLETE OR ASSERT REQUIRED EVIDENCE BEFORE REVIEW&quot;;IF([.U133]=&quot;BLOCKED&quot;;&quot;RESOLVE CONTRADICTION BEFORE REVIEW — NO AUTHORITY CREATED&quot;;IF([.U13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cell office:value-type="string" table:formula="of:=IF([.U134]=&quot;UNKNOWN&quot;;&quot;COMPLETE OR ASSERT REQUIRED EVIDENCE BEFORE REVIEW&quot;;IF([.U134]=&quot;BLOCKED&quot;;&quot;RESOLVE CONTRADICTION BEFORE REVIEW — NO AUTHORITY CREATED&quot;;IF([.U13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cell office:value-type="string" table:formula="of:=IF([.U135]=&quot;UNKNOWN&quot;;&quot;COMPLETE OR ASSERT REQUIRED EVIDENCE BEFORE REVIEW&quot;;IF([.U135]=&quot;BLOCKED&quot;;&quot;RESOLVE CONTRADICTION BEFORE REVIEW — NO AUTHORITY CREATED&quot;;IF([.U13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cell office:value-type="string" table:formula="of:=IF([.U136]=&quot;UNKNOWN&quot;;&quot;COMPLETE OR ASSERT REQUIRED EVIDENCE BEFORE REVIEW&quot;;IF([.U136]=&quot;BLOCKED&quot;;&quot;RESOLVE CONTRADICTION BEFORE REVIEW — NO AUTHORITY CREATED&quot;;IF([.U13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cell office:value-type="string" table:formula="of:=IF([.U137]=&quot;UNKNOWN&quot;;&quot;COMPLETE OR ASSERT REQUIRED EVIDENCE BEFORE REVIEW&quot;;IF([.U137]=&quot;BLOCKED&quot;;&quot;RESOLVE CONTRADICTION BEFORE REVIEW — NO AUTHORITY CREATED&quot;;IF([.U13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cell office:value-type="string" table:formula="of:=IF([.U138]=&quot;UNKNOWN&quot;;&quot;COMPLETE OR ASSERT REQUIRED EVIDENCE BEFORE REVIEW&quot;;IF([.U138]=&quot;BLOCKED&quot;;&quot;RESOLVE CONTRADICTION BEFORE REVIEW — NO AUTHORITY CREATED&quot;;IF([.U13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cell office:value-type="string" table:formula="of:=IF([.U139]=&quot;UNKNOWN&quot;;&quot;COMPLETE OR ASSERT REQUIRED EVIDENCE BEFORE REVIEW&quot;;IF([.U139]=&quot;BLOCKED&quot;;&quot;RESOLVE CONTRADICTION BEFORE REVIEW — NO AUTHORITY CREATED&quot;;IF([.U13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cell office:value-type="string" table:formula="of:=IF([.U140]=&quot;UNKNOWN&quot;;&quot;COMPLETE OR ASSERT REQUIRED EVIDENCE BEFORE REVIEW&quot;;IF([.U140]=&quot;BLOCKED&quot;;&quot;RESOLVE CONTRADICTION BEFORE REVIEW — NO AUTHORITY CREATED&quot;;IF([.U14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cell office:value-type="string" table:formula="of:=IF([.U141]=&quot;UNKNOWN&quot;;&quot;COMPLETE OR ASSERT REQUIRED EVIDENCE BEFORE REVIEW&quot;;IF([.U141]=&quot;BLOCKED&quot;;&quot;RESOLVE CONTRADICTION BEFORE REVIEW — NO AUTHORITY CREATED&quot;;IF([.U14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cell office:value-type="string" table:formula="of:=IF([.U142]=&quot;UNKNOWN&quot;;&quot;COMPLETE OR ASSERT REQUIRED EVIDENCE BEFORE REVIEW&quot;;IF([.U142]=&quot;BLOCKED&quot;;&quot;RESOLVE CONTRADICTION BEFORE REVIEW — NO AUTHORITY CREATED&quot;;IF([.U14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cell office:value-type="string" table:formula="of:=IF([.U143]=&quot;UNKNOWN&quot;;&quot;COMPLETE OR ASSERT REQUIRED EVIDENCE BEFORE REVIEW&quot;;IF([.U143]=&quot;BLOCKED&quot;;&quot;RESOLVE CONTRADICTION BEFORE REVIEW — NO AUTHORITY CREATED&quot;;IF([.U14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cell office:value-type="string" table:formula="of:=IF([.U144]=&quot;UNKNOWN&quot;;&quot;COMPLETE OR ASSERT REQUIRED EVIDENCE BEFORE REVIEW&quot;;IF([.U144]=&quot;BLOCKED&quot;;&quot;RESOLVE CONTRADICTION BEFORE REVIEW — NO AUTHORITY CREATED&quot;;IF([.U14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cell office:value-type="string" table:formula="of:=IF([.U145]=&quot;UNKNOWN&quot;;&quot;COMPLETE OR ASSERT REQUIRED EVIDENCE BEFORE REVIEW&quot;;IF([.U145]=&quot;BLOCKED&quot;;&quot;RESOLVE CONTRADICTION BEFORE REVIEW — NO AUTHORITY CREATED&quot;;IF([.U14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cell office:value-type="string" table:formula="of:=IF([.U146]=&quot;UNKNOWN&quot;;&quot;COMPLETE OR ASSERT REQUIRED EVIDENCE BEFORE REVIEW&quot;;IF([.U146]=&quot;BLOCKED&quot;;&quot;RESOLVE CONTRADICTION BEFORE REVIEW — NO AUTHORITY CREATED&quot;;IF([.U14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cell office:value-type="string" table:formula="of:=IF([.U147]=&quot;UNKNOWN&quot;;&quot;COMPLETE OR ASSERT REQUIRED EVIDENCE BEFORE REVIEW&quot;;IF([.U147]=&quot;BLOCKED&quot;;&quot;RESOLVE CONTRADICTION BEFORE REVIEW — NO AUTHORITY CREATED&quot;;IF([.U14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cell office:value-type="string" table:formula="of:=IF([.U148]=&quot;UNKNOWN&quot;;&quot;COMPLETE OR ASSERT REQUIRED EVIDENCE BEFORE REVIEW&quot;;IF([.U148]=&quot;BLOCKED&quot;;&quot;RESOLVE CONTRADICTION BEFORE REVIEW — NO AUTHORITY CREATED&quot;;IF([.U14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cell office:value-type="string" table:formula="of:=IF([.U149]=&quot;UNKNOWN&quot;;&quot;COMPLETE OR ASSERT REQUIRED EVIDENCE BEFORE REVIEW&quot;;IF([.U149]=&quot;BLOCKED&quot;;&quot;RESOLVE CONTRADICTION BEFORE REVIEW — NO AUTHORITY CREATED&quot;;IF([.U14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cell office:value-type="string" table:formula="of:=IF([.U150]=&quot;UNKNOWN&quot;;&quot;COMPLETE OR ASSERT REQUIRED EVIDENCE BEFORE REVIEW&quot;;IF([.U150]=&quot;BLOCKED&quot;;&quot;RESOLVE CONTRADICTION BEFORE REVIEW — NO AUTHORITY CREATED&quot;;IF([.U15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cell office:value-type="string" table:formula="of:=IF([.U151]=&quot;UNKNOWN&quot;;&quot;COMPLETE OR ASSERT REQUIRED EVIDENCE BEFORE REVIEW&quot;;IF([.U151]=&quot;BLOCKED&quot;;&quot;RESOLVE CONTRADICTION BEFORE REVIEW — NO AUTHORITY CREATED&quot;;IF([.U15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cell office:value-type="string" table:formula="of:=IF([.U152]=&quot;UNKNOWN&quot;;&quot;COMPLETE OR ASSERT REQUIRED EVIDENCE BEFORE REVIEW&quot;;IF([.U152]=&quot;BLOCKED&quot;;&quot;RESOLVE CONTRADICTION BEFORE REVIEW — NO AUTHORITY CREATED&quot;;IF([.U15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cell office:value-type="string" table:formula="of:=IF([.U153]=&quot;UNKNOWN&quot;;&quot;COMPLETE OR ASSERT REQUIRED EVIDENCE BEFORE REVIEW&quot;;IF([.U153]=&quot;BLOCKED&quot;;&quot;RESOLVE CONTRADICTION BEFORE REVIEW — NO AUTHORITY CREATED&quot;;IF([.U15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cell office:value-type="string" table:formula="of:=IF([.U154]=&quot;UNKNOWN&quot;;&quot;COMPLETE OR ASSERT REQUIRED EVIDENCE BEFORE REVIEW&quot;;IF([.U154]=&quot;BLOCKED&quot;;&quot;RESOLVE CONTRADICTION BEFORE REVIEW — NO AUTHORITY CREATED&quot;;IF([.U15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cell office:value-type="string" table:formula="of:=IF([.U155]=&quot;UNKNOWN&quot;;&quot;COMPLETE OR ASSERT REQUIRED EVIDENCE BEFORE REVIEW&quot;;IF([.U155]=&quot;BLOCKED&quot;;&quot;RESOLVE CONTRADICTION BEFORE REVIEW — NO AUTHORITY CREATED&quot;;IF([.U15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cell office:value-type="string" table:formula="of:=IF([.U156]=&quot;UNKNOWN&quot;;&quot;COMPLETE OR ASSERT REQUIRED EVIDENCE BEFORE REVIEW&quot;;IF([.U156]=&quot;BLOCKED&quot;;&quot;RESOLVE CONTRADICTION BEFORE REVIEW — NO AUTHORITY CREATED&quot;;IF([.U15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cell office:value-type="string" table:formula="of:=IF([.U157]=&quot;UNKNOWN&quot;;&quot;COMPLETE OR ASSERT REQUIRED EVIDENCE BEFORE REVIEW&quot;;IF([.U157]=&quot;BLOCKED&quot;;&quot;RESOLVE CONTRADICTION BEFORE REVIEW — NO AUTHORITY CREATED&quot;;IF([.U15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cell office:value-type="string" table:formula="of:=IF([.U158]=&quot;UNKNOWN&quot;;&quot;COMPLETE OR ASSERT REQUIRED EVIDENCE BEFORE REVIEW&quot;;IF([.U158]=&quot;BLOCKED&quot;;&quot;RESOLVE CONTRADICTION BEFORE REVIEW — NO AUTHORITY CREATED&quot;;IF([.U15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cell office:value-type="string" table:formula="of:=IF([.U159]=&quot;UNKNOWN&quot;;&quot;COMPLETE OR ASSERT REQUIRED EVIDENCE BEFORE REVIEW&quot;;IF([.U159]=&quot;BLOCKED&quot;;&quot;RESOLVE CONTRADICTION BEFORE REVIEW — NO AUTHORITY CREATED&quot;;IF([.U15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cell office:value-type="string" table:formula="of:=IF([.U160]=&quot;UNKNOWN&quot;;&quot;COMPLETE OR ASSERT REQUIRED EVIDENCE BEFORE REVIEW&quot;;IF([.U160]=&quot;BLOCKED&quot;;&quot;RESOLVE CONTRADICTION BEFORE REVIEW — NO AUTHORITY CREATED&quot;;IF([.U16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cell office:value-type="string" table:formula="of:=IF([.U161]=&quot;UNKNOWN&quot;;&quot;COMPLETE OR ASSERT REQUIRED EVIDENCE BEFORE REVIEW&quot;;IF([.U161]=&quot;BLOCKED&quot;;&quot;RESOLVE CONTRADICTION BEFORE REVIEW — NO AUTHORITY CREATED&quot;;IF([.U16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cell office:value-type="string" table:formula="of:=IF([.U162]=&quot;UNKNOWN&quot;;&quot;COMPLETE OR ASSERT REQUIRED EVIDENCE BEFORE REVIEW&quot;;IF([.U162]=&quot;BLOCKED&quot;;&quot;RESOLVE CONTRADICTION BEFORE REVIEW — NO AUTHORITY CREATED&quot;;IF([.U16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cell office:value-type="string" table:formula="of:=IF([.U163]=&quot;UNKNOWN&quot;;&quot;COMPLETE OR ASSERT REQUIRED EVIDENCE BEFORE REVIEW&quot;;IF([.U163]=&quot;BLOCKED&quot;;&quot;RESOLVE CONTRADICTION BEFORE REVIEW — NO AUTHORITY CREATED&quot;;IF([.U16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cell office:value-type="string" table:formula="of:=IF([.U164]=&quot;UNKNOWN&quot;;&quot;COMPLETE OR ASSERT REQUIRED EVIDENCE BEFORE REVIEW&quot;;IF([.U164]=&quot;BLOCKED&quot;;&quot;RESOLVE CONTRADICTION BEFORE REVIEW — NO AUTHORITY CREATED&quot;;IF([.U16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cell office:value-type="string" table:formula="of:=IF([.U165]=&quot;UNKNOWN&quot;;&quot;COMPLETE OR ASSERT REQUIRED EVIDENCE BEFORE REVIEW&quot;;IF([.U165]=&quot;BLOCKED&quot;;&quot;RESOLVE CONTRADICTION BEFORE REVIEW — NO AUTHORITY CREATED&quot;;IF([.U16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cell office:value-type="string" table:formula="of:=IF([.U166]=&quot;UNKNOWN&quot;;&quot;COMPLETE OR ASSERT REQUIRED EVIDENCE BEFORE REVIEW&quot;;IF([.U166]=&quot;BLOCKED&quot;;&quot;RESOLVE CONTRADICTION BEFORE REVIEW — NO AUTHORITY CREATED&quot;;IF([.U16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cell office:value-type="string" table:formula="of:=IF([.U167]=&quot;UNKNOWN&quot;;&quot;COMPLETE OR ASSERT REQUIRED EVIDENCE BEFORE REVIEW&quot;;IF([.U167]=&quot;BLOCKED&quot;;&quot;RESOLVE CONTRADICTION BEFORE REVIEW — NO AUTHORITY CREATED&quot;;IF([.U16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cell office:value-type="string" table:formula="of:=IF([.U168]=&quot;UNKNOWN&quot;;&quot;COMPLETE OR ASSERT REQUIRED EVIDENCE BEFORE REVIEW&quot;;IF([.U168]=&quot;BLOCKED&quot;;&quot;RESOLVE CONTRADICTION BEFORE REVIEW — NO AUTHORITY CREATED&quot;;IF([.U16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cell office:value-type="string" table:formula="of:=IF([.U169]=&quot;UNKNOWN&quot;;&quot;COMPLETE OR ASSERT REQUIRED EVIDENCE BEFORE REVIEW&quot;;IF([.U169]=&quot;BLOCKED&quot;;&quot;RESOLVE CONTRADICTION BEFORE REVIEW — NO AUTHORITY CREATED&quot;;IF([.U16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cell office:value-type="string" table:formula="of:=IF([.U170]=&quot;UNKNOWN&quot;;&quot;COMPLETE OR ASSERT REQUIRED EVIDENCE BEFORE REVIEW&quot;;IF([.U170]=&quot;BLOCKED&quot;;&quot;RESOLVE CONTRADICTION BEFORE REVIEW — NO AUTHORITY CREATED&quot;;IF([.U17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cell office:value-type="string" table:formula="of:=IF([.U171]=&quot;UNKNOWN&quot;;&quot;COMPLETE OR ASSERT REQUIRED EVIDENCE BEFORE REVIEW&quot;;IF([.U171]=&quot;BLOCKED&quot;;&quot;RESOLVE CONTRADICTION BEFORE REVIEW — NO AUTHORITY CREATED&quot;;IF([.U17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cell office:value-type="string" table:formula="of:=IF([.U172]=&quot;UNKNOWN&quot;;&quot;COMPLETE OR ASSERT REQUIRED EVIDENCE BEFORE REVIEW&quot;;IF([.U172]=&quot;BLOCKED&quot;;&quot;RESOLVE CONTRADICTION BEFORE REVIEW — NO AUTHORITY CREATED&quot;;IF([.U17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cell office:value-type="string" table:formula="of:=IF([.U173]=&quot;UNKNOWN&quot;;&quot;COMPLETE OR ASSERT REQUIRED EVIDENCE BEFORE REVIEW&quot;;IF([.U173]=&quot;BLOCKED&quot;;&quot;RESOLVE CONTRADICTION BEFORE REVIEW — NO AUTHORITY CREATED&quot;;IF([.U17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cell office:value-type="string" table:formula="of:=IF([.U174]=&quot;UNKNOWN&quot;;&quot;COMPLETE OR ASSERT REQUIRED EVIDENCE BEFORE REVIEW&quot;;IF([.U174]=&quot;BLOCKED&quot;;&quot;RESOLVE CONTRADICTION BEFORE REVIEW — NO AUTHORITY CREATED&quot;;IF([.U17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cell office:value-type="string" table:formula="of:=IF([.U175]=&quot;UNKNOWN&quot;;&quot;COMPLETE OR ASSERT REQUIRED EVIDENCE BEFORE REVIEW&quot;;IF([.U175]=&quot;BLOCKED&quot;;&quot;RESOLVE CONTRADICTION BEFORE REVIEW — NO AUTHORITY CREATED&quot;;IF([.U17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cell office:value-type="string" table:formula="of:=IF([.U176]=&quot;UNKNOWN&quot;;&quot;COMPLETE OR ASSERT REQUIRED EVIDENCE BEFORE REVIEW&quot;;IF([.U176]=&quot;BLOCKED&quot;;&quot;RESOLVE CONTRADICTION BEFORE REVIEW — NO AUTHORITY CREATED&quot;;IF([.U17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cell office:value-type="string" table:formula="of:=IF([.U177]=&quot;UNKNOWN&quot;;&quot;COMPLETE OR ASSERT REQUIRED EVIDENCE BEFORE REVIEW&quot;;IF([.U177]=&quot;BLOCKED&quot;;&quot;RESOLVE CONTRADICTION BEFORE REVIEW — NO AUTHORITY CREATED&quot;;IF([.U17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cell office:value-type="string" table:formula="of:=IF([.U178]=&quot;UNKNOWN&quot;;&quot;COMPLETE OR ASSERT REQUIRED EVIDENCE BEFORE REVIEW&quot;;IF([.U178]=&quot;BLOCKED&quot;;&quot;RESOLVE CONTRADICTION BEFORE REVIEW — NO AUTHORITY CREATED&quot;;IF([.U17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cell office:value-type="string" table:formula="of:=IF([.U179]=&quot;UNKNOWN&quot;;&quot;COMPLETE OR ASSERT REQUIRED EVIDENCE BEFORE REVIEW&quot;;IF([.U179]=&quot;BLOCKED&quot;;&quot;RESOLVE CONTRADICTION BEFORE REVIEW — NO AUTHORITY CREATED&quot;;IF([.U17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cell office:value-type="string" table:formula="of:=IF([.U180]=&quot;UNKNOWN&quot;;&quot;COMPLETE OR ASSERT REQUIRED EVIDENCE BEFORE REVIEW&quot;;IF([.U180]=&quot;BLOCKED&quot;;&quot;RESOLVE CONTRADICTION BEFORE REVIEW — NO AUTHORITY CREATED&quot;;IF([.U18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cell office:value-type="string" table:formula="of:=IF([.U181]=&quot;UNKNOWN&quot;;&quot;COMPLETE OR ASSERT REQUIRED EVIDENCE BEFORE REVIEW&quot;;IF([.U181]=&quot;BLOCKED&quot;;&quot;RESOLVE CONTRADICTION BEFORE REVIEW — NO AUTHORITY CREATED&quot;;IF([.U18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cell office:value-type="string" table:formula="of:=IF([.U182]=&quot;UNKNOWN&quot;;&quot;COMPLETE OR ASSERT REQUIRED EVIDENCE BEFORE REVIEW&quot;;IF([.U182]=&quot;BLOCKED&quot;;&quot;RESOLVE CONTRADICTION BEFORE REVIEW — NO AUTHORITY CREATED&quot;;IF([.U18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cell office:value-type="string" table:formula="of:=IF([.U183]=&quot;UNKNOWN&quot;;&quot;COMPLETE OR ASSERT REQUIRED EVIDENCE BEFORE REVIEW&quot;;IF([.U183]=&quot;BLOCKED&quot;;&quot;RESOLVE CONTRADICTION BEFORE REVIEW — NO AUTHORITY CREATED&quot;;IF([.U18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cell office:value-type="string" table:formula="of:=IF([.U184]=&quot;UNKNOWN&quot;;&quot;COMPLETE OR ASSERT REQUIRED EVIDENCE BEFORE REVIEW&quot;;IF([.U184]=&quot;BLOCKED&quot;;&quot;RESOLVE CONTRADICTION BEFORE REVIEW — NO AUTHORITY CREATED&quot;;IF([.U18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cell office:value-type="string" table:formula="of:=IF([.U185]=&quot;UNKNOWN&quot;;&quot;COMPLETE OR ASSERT REQUIRED EVIDENCE BEFORE REVIEW&quot;;IF([.U185]=&quot;BLOCKED&quot;;&quot;RESOLVE CONTRADICTION BEFORE REVIEW — NO AUTHORITY CREATED&quot;;IF([.U18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cell office:value-type="string" table:formula="of:=IF([.U186]=&quot;UNKNOWN&quot;;&quot;COMPLETE OR ASSERT REQUIRED EVIDENCE BEFORE REVIEW&quot;;IF([.U186]=&quot;BLOCKED&quot;;&quot;RESOLVE CONTRADICTION BEFORE REVIEW — NO AUTHORITY CREATED&quot;;IF([.U18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cell office:value-type="string" table:formula="of:=IF([.U187]=&quot;UNKNOWN&quot;;&quot;COMPLETE OR ASSERT REQUIRED EVIDENCE BEFORE REVIEW&quot;;IF([.U187]=&quot;BLOCKED&quot;;&quot;RESOLVE CONTRADICTION BEFORE REVIEW — NO AUTHORITY CREATED&quot;;IF([.U18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cell office:value-type="string" table:formula="of:=IF([.U188]=&quot;UNKNOWN&quot;;&quot;COMPLETE OR ASSERT REQUIRED EVIDENCE BEFORE REVIEW&quot;;IF([.U188]=&quot;BLOCKED&quot;;&quot;RESOLVE CONTRADICTION BEFORE REVIEW — NO AUTHORITY CREATED&quot;;IF([.U18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cell office:value-type="string" table:formula="of:=IF([.U189]=&quot;UNKNOWN&quot;;&quot;COMPLETE OR ASSERT REQUIRED EVIDENCE BEFORE REVIEW&quot;;IF([.U189]=&quot;BLOCKED&quot;;&quot;RESOLVE CONTRADICTION BEFORE REVIEW — NO AUTHORITY CREATED&quot;;IF([.U18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cell office:value-type="string" table:formula="of:=IF([.U190]=&quot;UNKNOWN&quot;;&quot;COMPLETE OR ASSERT REQUIRED EVIDENCE BEFORE REVIEW&quot;;IF([.U190]=&quot;BLOCKED&quot;;&quot;RESOLVE CONTRADICTION BEFORE REVIEW — NO AUTHORITY CREATED&quot;;IF([.U19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cell office:value-type="string" table:formula="of:=IF([.U191]=&quot;UNKNOWN&quot;;&quot;COMPLETE OR ASSERT REQUIRED EVIDENCE BEFORE REVIEW&quot;;IF([.U191]=&quot;BLOCKED&quot;;&quot;RESOLVE CONTRADICTION BEFORE REVIEW — NO AUTHORITY CREATED&quot;;IF([.U19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cell office:value-type="string" table:formula="of:=IF([.U192]=&quot;UNKNOWN&quot;;&quot;COMPLETE OR ASSERT REQUIRED EVIDENCE BEFORE REVIEW&quot;;IF([.U192]=&quot;BLOCKED&quot;;&quot;RESOLVE CONTRADICTION BEFORE REVIEW — NO AUTHORITY CREATED&quot;;IF([.U19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cell office:value-type="string" table:formula="of:=IF([.U193]=&quot;UNKNOWN&quot;;&quot;COMPLETE OR ASSERT REQUIRED EVIDENCE BEFORE REVIEW&quot;;IF([.U193]=&quot;BLOCKED&quot;;&quot;RESOLVE CONTRADICTION BEFORE REVIEW — NO AUTHORITY CREATED&quot;;IF([.U19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cell office:value-type="string" table:formula="of:=IF([.U194]=&quot;UNKNOWN&quot;;&quot;COMPLETE OR ASSERT REQUIRED EVIDENCE BEFORE REVIEW&quot;;IF([.U194]=&quot;BLOCKED&quot;;&quot;RESOLVE CONTRADICTION BEFORE REVIEW — NO AUTHORITY CREATED&quot;;IF([.U19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cell office:value-type="string" table:formula="of:=IF([.U195]=&quot;UNKNOWN&quot;;&quot;COMPLETE OR ASSERT REQUIRED EVIDENCE BEFORE REVIEW&quot;;IF([.U195]=&quot;BLOCKED&quot;;&quot;RESOLVE CONTRADICTION BEFORE REVIEW — NO AUTHORITY CREATED&quot;;IF([.U19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cell office:value-type="string" table:formula="of:=IF([.U196]=&quot;UNKNOWN&quot;;&quot;COMPLETE OR ASSERT REQUIRED EVIDENCE BEFORE REVIEW&quot;;IF([.U196]=&quot;BLOCKED&quot;;&quot;RESOLVE CONTRADICTION BEFORE REVIEW — NO AUTHORITY CREATED&quot;;IF([.U19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cell office:value-type="string" table:formula="of:=IF([.U197]=&quot;UNKNOWN&quot;;&quot;COMPLETE OR ASSERT REQUIRED EVIDENCE BEFORE REVIEW&quot;;IF([.U197]=&quot;BLOCKED&quot;;&quot;RESOLVE CONTRADICTION BEFORE REVIEW — NO AUTHORITY CREATED&quot;;IF([.U19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cell office:value-type="string" table:formula="of:=IF([.U198]=&quot;UNKNOWN&quot;;&quot;COMPLETE OR ASSERT REQUIRED EVIDENCE BEFORE REVIEW&quot;;IF([.U198]=&quot;BLOCKED&quot;;&quot;RESOLVE CONTRADICTION BEFORE REVIEW — NO AUTHORITY CREATED&quot;;IF([.U19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cell office:value-type="string" table:formula="of:=IF([.U199]=&quot;UNKNOWN&quot;;&quot;COMPLETE OR ASSERT REQUIRED EVIDENCE BEFORE REVIEW&quot;;IF([.U199]=&quot;BLOCKED&quot;;&quot;RESOLVE CONTRADICTION BEFORE REVIEW — NO AUTHORITY CREATED&quot;;IF([.U19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cell office:value-type="string" table:formula="of:=IF([.U200]=&quot;UNKNOWN&quot;;&quot;COMPLETE OR ASSERT REQUIRED EVIDENCE BEFORE REVIEW&quot;;IF([.U200]=&quot;BLOCKED&quot;;&quot;RESOLVE CONTRADICTION BEFORE REVIEW — NO AUTHORITY CREATED&quot;;IF([.U20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cell office:value-type="string" table:formula="of:=IF([.U201]=&quot;UNKNOWN&quot;;&quot;COMPLETE OR ASSERT REQUIRED EVIDENCE BEFORE REVIEW&quot;;IF([.U201]=&quot;BLOCKED&quot;;&quot;RESOLVE CONTRADICTION BEFORE REVIEW — NO AUTHORITY CREATED&quot;;IF([.U20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cell office:value-type="string" table:formula="of:=IF([.U202]=&quot;UNKNOWN&quot;;&quot;COMPLETE OR ASSERT REQUIRED EVIDENCE BEFORE REVIEW&quot;;IF([.U202]=&quot;BLOCKED&quot;;&quot;RESOLVE CONTRADICTION BEFORE REVIEW — NO AUTHORITY CREATED&quot;;IF([.U20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cell office:value-type="string" table:formula="of:=IF([.U203]=&quot;UNKNOWN&quot;;&quot;COMPLETE OR ASSERT REQUIRED EVIDENCE BEFORE REVIEW&quot;;IF([.U203]=&quot;BLOCKED&quot;;&quot;RESOLVE CONTRADICTION BEFORE REVIEW — NO AUTHORITY CREATED&quot;;IF([.U20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cell office:value-type="string" table:formula="of:=IF([.U204]=&quot;UNKNOWN&quot;;&quot;COMPLETE OR ASSERT REQUIRED EVIDENCE BEFORE REVIEW&quot;;IF([.U204]=&quot;BLOCKED&quot;;&quot;RESOLVE CONTRADICTION BEFORE REVIEW — NO AUTHORITY CREATED&quot;;IF([.U20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cell office:value-type="string" table:formula="of:=IF([.U205]=&quot;UNKNOWN&quot;;&quot;COMPLETE OR ASSERT REQUIRED EVIDENCE BEFORE REVIEW&quot;;IF([.U205]=&quot;BLOCKED&quot;;&quot;RESOLVE CONTRADICTION BEFORE REVIEW — NO AUTHORITY CREATED&quot;;IF([.U20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cell office:value-type="string" table:formula="of:=IF([.U206]=&quot;UNKNOWN&quot;;&quot;COMPLETE OR ASSERT REQUIRED EVIDENCE BEFORE REVIEW&quot;;IF([.U206]=&quot;BLOCKED&quot;;&quot;RESOLVE CONTRADICTION BEFORE REVIEW — NO AUTHORITY CREATED&quot;;IF([.U20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cell office:value-type="string" table:formula="of:=IF([.U207]=&quot;UNKNOWN&quot;;&quot;COMPLETE OR ASSERT REQUIRED EVIDENCE BEFORE REVIEW&quot;;IF([.U207]=&quot;BLOCKED&quot;;&quot;RESOLVE CONTRADICTION BEFORE REVIEW — NO AUTHORITY CREATED&quot;;IF([.U20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cell office:value-type="string" table:formula="of:=IF([.U208]=&quot;UNKNOWN&quot;;&quot;COMPLETE OR ASSERT REQUIRED EVIDENCE BEFORE REVIEW&quot;;IF([.U208]=&quot;BLOCKED&quot;;&quot;RESOLVE CONTRADICTION BEFORE REVIEW — NO AUTHORITY CREATED&quot;;IF([.U20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cell office:value-type="string" table:formula="of:=IF([.U209]=&quot;UNKNOWN&quot;;&quot;COMPLETE OR ASSERT REQUIRED EVIDENCE BEFORE REVIEW&quot;;IF([.U209]=&quot;BLOCKED&quot;;&quot;RESOLVE CONTRADICTION BEFORE REVIEW — NO AUTHORITY CREATED&quot;;IF([.U20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cell office:value-type="string" table:formula="of:=IF([.U210]=&quot;UNKNOWN&quot;;&quot;COMPLETE OR ASSERT REQUIRED EVIDENCE BEFORE REVIEW&quot;;IF([.U210]=&quot;BLOCKED&quot;;&quot;RESOLVE CONTRADICTION BEFORE REVIEW — NO AUTHORITY CREATED&quot;;IF([.U21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cell office:value-type="string" table:formula="of:=IF([.U211]=&quot;UNKNOWN&quot;;&quot;COMPLETE OR ASSERT REQUIRED EVIDENCE BEFORE REVIEW&quot;;IF([.U211]=&quot;BLOCKED&quot;;&quot;RESOLVE CONTRADICTION BEFORE REVIEW — NO AUTHORITY CREATED&quot;;IF([.U21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cell office:value-type="string" table:formula="of:=IF([.U212]=&quot;UNKNOWN&quot;;&quot;COMPLETE OR ASSERT REQUIRED EVIDENCE BEFORE REVIEW&quot;;IF([.U212]=&quot;BLOCKED&quot;;&quot;RESOLVE CONTRADICTION BEFORE REVIEW — NO AUTHORITY CREATED&quot;;IF([.U21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cell office:value-type="string" table:formula="of:=IF([.U213]=&quot;UNKNOWN&quot;;&quot;COMPLETE OR ASSERT REQUIRED EVIDENCE BEFORE REVIEW&quot;;IF([.U213]=&quot;BLOCKED&quot;;&quot;RESOLVE CONTRADICTION BEFORE REVIEW — NO AUTHORITY CREATED&quot;;IF([.U21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cell office:value-type="string" table:formula="of:=IF([.U214]=&quot;UNKNOWN&quot;;&quot;COMPLETE OR ASSERT REQUIRED EVIDENCE BEFORE REVIEW&quot;;IF([.U214]=&quot;BLOCKED&quot;;&quot;RESOLVE CONTRADICTION BEFORE REVIEW — NO AUTHORITY CREATED&quot;;IF([.U21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cell office:value-type="string" table:formula="of:=IF([.U215]=&quot;UNKNOWN&quot;;&quot;COMPLETE OR ASSERT REQUIRED EVIDENCE BEFORE REVIEW&quot;;IF([.U215]=&quot;BLOCKED&quot;;&quot;RESOLVE CONTRADICTION BEFORE REVIEW — NO AUTHORITY CREATED&quot;;IF([.U21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cell office:value-type="string" table:formula="of:=IF([.U216]=&quot;UNKNOWN&quot;;&quot;COMPLETE OR ASSERT REQUIRED EVIDENCE BEFORE REVIEW&quot;;IF([.U216]=&quot;BLOCKED&quot;;&quot;RESOLVE CONTRADICTION BEFORE REVIEW — NO AUTHORITY CREATED&quot;;IF([.U21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cell office:value-type="string" table:formula="of:=IF([.U217]=&quot;UNKNOWN&quot;;&quot;COMPLETE OR ASSERT REQUIRED EVIDENCE BEFORE REVIEW&quot;;IF([.U217]=&quot;BLOCKED&quot;;&quot;RESOLVE CONTRADICTION BEFORE REVIEW — NO AUTHORITY CREATED&quot;;IF([.U21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cell office:value-type="string" table:formula="of:=IF([.U218]=&quot;UNKNOWN&quot;;&quot;COMPLETE OR ASSERT REQUIRED EVIDENCE BEFORE REVIEW&quot;;IF([.U218]=&quot;BLOCKED&quot;;&quot;RESOLVE CONTRADICTION BEFORE REVIEW — NO AUTHORITY CREATED&quot;;IF([.U21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cell office:value-type="string" table:formula="of:=IF([.U219]=&quot;UNKNOWN&quot;;&quot;COMPLETE OR ASSERT REQUIRED EVIDENCE BEFORE REVIEW&quot;;IF([.U219]=&quot;BLOCKED&quot;;&quot;RESOLVE CONTRADICTION BEFORE REVIEW — NO AUTHORITY CREATED&quot;;IF([.U21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cell office:value-type="string" table:formula="of:=IF([.U220]=&quot;UNKNOWN&quot;;&quot;COMPLETE OR ASSERT REQUIRED EVIDENCE BEFORE REVIEW&quot;;IF([.U220]=&quot;BLOCKED&quot;;&quot;RESOLVE CONTRADICTION BEFORE REVIEW — NO AUTHORITY CREATED&quot;;IF([.U22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cell office:value-type="string" table:formula="of:=IF([.U221]=&quot;UNKNOWN&quot;;&quot;COMPLETE OR ASSERT REQUIRED EVIDENCE BEFORE REVIEW&quot;;IF([.U221]=&quot;BLOCKED&quot;;&quot;RESOLVE CONTRADICTION BEFORE REVIEW — NO AUTHORITY CREATED&quot;;IF([.U22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cell office:value-type="string" table:formula="of:=IF([.U222]=&quot;UNKNOWN&quot;;&quot;COMPLETE OR ASSERT REQUIRED EVIDENCE BEFORE REVIEW&quot;;IF([.U222]=&quot;BLOCKED&quot;;&quot;RESOLVE CONTRADICTION BEFORE REVIEW — NO AUTHORITY CREATED&quot;;IF([.U22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cell office:value-type="string" table:formula="of:=IF([.U223]=&quot;UNKNOWN&quot;;&quot;COMPLETE OR ASSERT REQUIRED EVIDENCE BEFORE REVIEW&quot;;IF([.U223]=&quot;BLOCKED&quot;;&quot;RESOLVE CONTRADICTION BEFORE REVIEW — NO AUTHORITY CREATED&quot;;IF([.U22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cell office:value-type="string" table:formula="of:=IF([.U224]=&quot;UNKNOWN&quot;;&quot;COMPLETE OR ASSERT REQUIRED EVIDENCE BEFORE REVIEW&quot;;IF([.U224]=&quot;BLOCKED&quot;;&quot;RESOLVE CONTRADICTION BEFORE REVIEW — NO AUTHORITY CREATED&quot;;IF([.U22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cell office:value-type="string" table:formula="of:=IF([.U225]=&quot;UNKNOWN&quot;;&quot;COMPLETE OR ASSERT REQUIRED EVIDENCE BEFORE REVIEW&quot;;IF([.U225]=&quot;BLOCKED&quot;;&quot;RESOLVE CONTRADICTION BEFORE REVIEW — NO AUTHORITY CREATED&quot;;IF([.U22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cell office:value-type="string" table:formula="of:=IF([.U226]=&quot;UNKNOWN&quot;;&quot;COMPLETE OR ASSERT REQUIRED EVIDENCE BEFORE REVIEW&quot;;IF([.U226]=&quot;BLOCKED&quot;;&quot;RESOLVE CONTRADICTION BEFORE REVIEW — NO AUTHORITY CREATED&quot;;IF([.U22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cell office:value-type="string" table:formula="of:=IF([.U227]=&quot;UNKNOWN&quot;;&quot;COMPLETE OR ASSERT REQUIRED EVIDENCE BEFORE REVIEW&quot;;IF([.U227]=&quot;BLOCKED&quot;;&quot;RESOLVE CONTRADICTION BEFORE REVIEW — NO AUTHORITY CREATED&quot;;IF([.U22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cell office:value-type="string" table:formula="of:=IF([.U228]=&quot;UNKNOWN&quot;;&quot;COMPLETE OR ASSERT REQUIRED EVIDENCE BEFORE REVIEW&quot;;IF([.U228]=&quot;BLOCKED&quot;;&quot;RESOLVE CONTRADICTION BEFORE REVIEW — NO AUTHORITY CREATED&quot;;IF([.U22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cell office:value-type="string" table:formula="of:=IF([.U229]=&quot;UNKNOWN&quot;;&quot;COMPLETE OR ASSERT REQUIRED EVIDENCE BEFORE REVIEW&quot;;IF([.U229]=&quot;BLOCKED&quot;;&quot;RESOLVE CONTRADICTION BEFORE REVIEW — NO AUTHORITY CREATED&quot;;IF([.U22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cell office:value-type="string" table:formula="of:=IF([.U230]=&quot;UNKNOWN&quot;;&quot;COMPLETE OR ASSERT REQUIRED EVIDENCE BEFORE REVIEW&quot;;IF([.U230]=&quot;BLOCKED&quot;;&quot;RESOLVE CONTRADICTION BEFORE REVIEW — NO AUTHORITY CREATED&quot;;IF([.U23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cell office:value-type="string" table:formula="of:=IF([.U231]=&quot;UNKNOWN&quot;;&quot;COMPLETE OR ASSERT REQUIRED EVIDENCE BEFORE REVIEW&quot;;IF([.U231]=&quot;BLOCKED&quot;;&quot;RESOLVE CONTRADICTION BEFORE REVIEW — NO AUTHORITY CREATED&quot;;IF([.U23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cell office:value-type="string" table:formula="of:=IF([.U232]=&quot;UNKNOWN&quot;;&quot;COMPLETE OR ASSERT REQUIRED EVIDENCE BEFORE REVIEW&quot;;IF([.U232]=&quot;BLOCKED&quot;;&quot;RESOLVE CONTRADICTION BEFORE REVIEW — NO AUTHORITY CREATED&quot;;IF([.U23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cell office:value-type="string" table:formula="of:=IF([.U233]=&quot;UNKNOWN&quot;;&quot;COMPLETE OR ASSERT REQUIRED EVIDENCE BEFORE REVIEW&quot;;IF([.U233]=&quot;BLOCKED&quot;;&quot;RESOLVE CONTRADICTION BEFORE REVIEW — NO AUTHORITY CREATED&quot;;IF([.U23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cell office:value-type="string" table:formula="of:=IF([.U234]=&quot;UNKNOWN&quot;;&quot;COMPLETE OR ASSERT REQUIRED EVIDENCE BEFORE REVIEW&quot;;IF([.U234]=&quot;BLOCKED&quot;;&quot;RESOLVE CONTRADICTION BEFORE REVIEW — NO AUTHORITY CREATED&quot;;IF([.U23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cell office:value-type="string" table:formula="of:=IF([.U235]=&quot;UNKNOWN&quot;;&quot;COMPLETE OR ASSERT REQUIRED EVIDENCE BEFORE REVIEW&quot;;IF([.U235]=&quot;BLOCKED&quot;;&quot;RESOLVE CONTRADICTION BEFORE REVIEW — NO AUTHORITY CREATED&quot;;IF([.U23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cell office:value-type="string" table:formula="of:=IF([.U236]=&quot;UNKNOWN&quot;;&quot;COMPLETE OR ASSERT REQUIRED EVIDENCE BEFORE REVIEW&quot;;IF([.U236]=&quot;BLOCKED&quot;;&quot;RESOLVE CONTRADICTION BEFORE REVIEW — NO AUTHORITY CREATED&quot;;IF([.U23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cell office:value-type="string" table:formula="of:=IF([.U237]=&quot;UNKNOWN&quot;;&quot;COMPLETE OR ASSERT REQUIRED EVIDENCE BEFORE REVIEW&quot;;IF([.U237]=&quot;BLOCKED&quot;;&quot;RESOLVE CONTRADICTION BEFORE REVIEW — NO AUTHORITY CREATED&quot;;IF([.U23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cell office:value-type="string" table:formula="of:=IF([.U238]=&quot;UNKNOWN&quot;;&quot;COMPLETE OR ASSERT REQUIRED EVIDENCE BEFORE REVIEW&quot;;IF([.U238]=&quot;BLOCKED&quot;;&quot;RESOLVE CONTRADICTION BEFORE REVIEW — NO AUTHORITY CREATED&quot;;IF([.U23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cell office:value-type="string" table:formula="of:=IF([.U239]=&quot;UNKNOWN&quot;;&quot;COMPLETE OR ASSERT REQUIRED EVIDENCE BEFORE REVIEW&quot;;IF([.U239]=&quot;BLOCKED&quot;;&quot;RESOLVE CONTRADICTION BEFORE REVIEW — NO AUTHORITY CREATED&quot;;IF([.U23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cell office:value-type="string" table:formula="of:=IF([.U240]=&quot;UNKNOWN&quot;;&quot;COMPLETE OR ASSERT REQUIRED EVIDENCE BEFORE REVIEW&quot;;IF([.U240]=&quot;BLOCKED&quot;;&quot;RESOLVE CONTRADICTION BEFORE REVIEW — NO AUTHORITY CREATED&quot;;IF([.U24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cell office:value-type="string" table:formula="of:=IF([.U241]=&quot;UNKNOWN&quot;;&quot;COMPLETE OR ASSERT REQUIRED EVIDENCE BEFORE REVIEW&quot;;IF([.U241]=&quot;BLOCKED&quot;;&quot;RESOLVE CONTRADICTION BEFORE REVIEW — NO AUTHORITY CREATED&quot;;IF([.U241]=&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cell office:value-type="string" table:formula="of:=IF([.U242]=&quot;UNKNOWN&quot;;&quot;COMPLETE OR ASSERT REQUIRED EVIDENCE BEFORE REVIEW&quot;;IF([.U242]=&quot;BLOCKED&quot;;&quot;RESOLVE CONTRADICTION BEFORE REVIEW — NO AUTHORITY CREATED&quot;;IF([.U242]=&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cell office:value-type="string" table:formula="of:=IF([.U243]=&quot;UNKNOWN&quot;;&quot;COMPLETE OR ASSERT REQUIRED EVIDENCE BEFORE REVIEW&quot;;IF([.U243]=&quot;BLOCKED&quot;;&quot;RESOLVE CONTRADICTION BEFORE REVIEW — NO AUTHORITY CREATED&quot;;IF([.U243]=&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cell office:value-type="string" table:formula="of:=IF([.U244]=&quot;UNKNOWN&quot;;&quot;COMPLETE OR ASSERT REQUIRED EVIDENCE BEFORE REVIEW&quot;;IF([.U244]=&quot;BLOCKED&quot;;&quot;RESOLVE CONTRADICTION BEFORE REVIEW — NO AUTHORITY CREATED&quot;;IF([.U244]=&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cell office:value-type="string" table:formula="of:=IF([.U245]=&quot;UNKNOWN&quot;;&quot;COMPLETE OR ASSERT REQUIRED EVIDENCE BEFORE REVIEW&quot;;IF([.U245]=&quot;BLOCKED&quot;;&quot;RESOLVE CONTRADICTION BEFORE REVIEW — NO AUTHORITY CREATED&quot;;IF([.U245]=&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cell office:value-type="string" table:formula="of:=IF([.U246]=&quot;UNKNOWN&quot;;&quot;COMPLETE OR ASSERT REQUIRED EVIDENCE BEFORE REVIEW&quot;;IF([.U246]=&quot;BLOCKED&quot;;&quot;RESOLVE CONTRADICTION BEFORE REVIEW — NO AUTHORITY CREATED&quot;;IF([.U246]=&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cell office:value-type="string" table:formula="of:=IF([.U247]=&quot;UNKNOWN&quot;;&quot;COMPLETE OR ASSERT REQUIRED EVIDENCE BEFORE REVIEW&quot;;IF([.U247]=&quot;BLOCKED&quot;;&quot;RESOLVE CONTRADICTION BEFORE REVIEW — NO AUTHORITY CREATED&quot;;IF([.U247]=&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cell office:value-type="string" table:formula="of:=IF([.U248]=&quot;UNKNOWN&quot;;&quot;COMPLETE OR ASSERT REQUIRED EVIDENCE BEFORE REVIEW&quot;;IF([.U248]=&quot;BLOCKED&quot;;&quot;RESOLVE CONTRADICTION BEFORE REVIEW — NO AUTHORITY CREATED&quot;;IF([.U248]=&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cell office:value-type="string" table:formula="of:=IF([.U249]=&quot;UNKNOWN&quot;;&quot;COMPLETE OR ASSERT REQUIRED EVIDENCE BEFORE REVIEW&quot;;IF([.U249]=&quot;BLOCKED&quot;;&quot;RESOLVE CONTRADICTION BEFORE REVIEW — NO AUTHORITY CREATED&quot;;IF([.U249]=&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cell office:value-type="string" table:formula="of:=IF([.U250]=&quot;UNKNOWN&quot;;&quot;COMPLETE OR ASSERT REQUIRED EVIDENCE BEFORE REVIEW&quot;;IF([.U250]=&quot;BLOCKED&quot;;&quot;RESOLVE CONTRADICTION BEFORE REVIEW — NO AUTHORITY CREATED&quot;;IF([.U250]=&quot;READY FOR REVIEW&quot;;&quot;OPERATOR REVIEW ELIGIBLE ONLY — NOT VERIFIED, RECONCILED, SETTLED, OR AUTHORITATIVE&quot;;&quot;REVIEW READINESS CLASSIFICATION — FAIL CLOSED&quot;)))">
            <text:p>REVIEW READINESS CLASSIFICATION — FAIL CLOS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cell office:value-type="string" table:formula="of:=IF([.U251]=&quot;UNKNOWN&quot;;&quot;COMPLETE OR ASSERT REQUIRED EVIDENCE BEFORE REVIEW&quot;;IF([.U251]=&quot;BLOCKED&quot;;&quot;RESOLVE CONTRADICTION BEFORE REVIEW — NO AUTHORITY CREATED&quot;;IF([.U251]=&quot;READY FOR REVIEW&quot;;&quot;OPERATOR REVIEW ELIGIBLE ONLY — NOT VERIFIED, RECONCILED, SETTLED, OR AUTHORITATIVE&quot;;&quot;REVIEW READINESS CLASSIFICATION — FAIL CLOSED&quot;)))">
            <text:p>REVIEW READINESS CLASSIFICATION — FAIL CLOSED</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