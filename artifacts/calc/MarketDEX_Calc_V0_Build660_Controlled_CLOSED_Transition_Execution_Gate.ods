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COST BASIS EVIDENCE · BUILDS 421–440">
            <text:p>📦 INVENTORY COST BASIS EVIDENCE · BUILDS 42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4" office:value-type="string" office:string-value="SOLD STATE VALID">
            <text:p>SOLD STATE VALID</text:p>
          </table:table-cell>
          <table:covered-table-cell/>
          <table:covered-table-cell/>
          <table:covered-table-cell/>
          <table:table-cell table:style-name="ce53" table:number-columns-spanned="4" office:value-type="string" office:string-value="COST BASIS RECEIVED">
            <text:p>COST BASIS RECEIVED</text:p>
          </table:table-cell>
          <table:covered-table-cell/>
          <table:covered-table-cell/>
          <table:covered-table-cell/>
          <table:table-cell table:style-name="ce53" table:number-columns-spanned="4" office:value-type="string" office:string-value="UNIT COST BASIS">
            <text:p>UNIT COST BASIS</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INV-000001">
            <text:p>INV-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0.00">
            <text:p>50.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SOLD STATE VALID">
            <text:p>SOLD STATE VALID</text:p>
          </table:table-cell>
          <table:covered-table-cell/>
          <table:covered-table-cell/>
          <table:table-cell table:style-name="ce53" table:number-columns-spanned="3" office:value-type="string" office:string-value="COST BASIS RECEIVED VALID">
            <text:p>COST BASIS RECEIVED VALID</text:p>
          </table:table-cell>
          <table:covered-table-cell/>
          <table:covered-table-cell/>
          <table:table-cell table:style-name="ce53" table:number-columns-spanned="3" office:value-type="string" office:string-value="UNIT COST VALID">
            <text:p>UNIT COST VALID</text:p>
          </table:table-cell>
          <table:covered-table-cell/>
          <table:covered-table-cell/>
          <table:table-cell table:style-name="ce53" table:number-columns-spanned="3" office:value-type="string" office:string-value="QUANTITY MATCH">
            <text:p>QUANTITY MATCH</text:p>
          </table:table-cell>
          <table:covered-table-cell/>
          <table:covered-table-cell/>
          <table:table-cell table:style-name="ce53" table:number-columns-spanned="3" office:value-type="string" office:string-value="COST BASIS EVIDENCE COMPLETE">
            <text:p>COST BASIS EVIDENCE COMPLETE</text:p>
          </table:table-cell>
          <table:covered-table-cell/>
          <table:covered-table-cell/>
        </table:table-row>
        <table:table-row table:style-name="ro21">
          <table:table-cell table:style-name="ce54" table:number-columns-spanned="3" office:value-type="string" office:string-value="YES" table:formula="of:=IF(UPPER(TRIM([.A936]))=UPPER(TRIM([.D886]));&quot;YES&quot;;&quot;NO&quot;)">
            <text:p>YES</text:p>
          </table:table-cell>
          <table:covered-table-cell/>
          <table:covered-table-cell/>
          <table:table-cell table:style-name="ce54" table:number-columns-spanned="3" office:value-type="string" office:string-value="YES" table:formula="of:=IF(UPPER(TRIM([.D936]))=&quot;YES&quot;;&quot;YES&quot;;&quot;NO&quot;)">
            <text:p>YES</text:p>
          </table:table-cell>
          <table:covered-table-cell/>
          <table:covered-table-cell/>
          <table:table-cell table:style-name="ce54" table:number-columns-spanned="3" office:value-type="string" office:string-value="YES" table:formula="of:=IF(UPPER(TRIM([.H936]))=&quot;YES&quot;;&quot;YES&quot;;&quot;NO&quot;)">
            <text:p>YES</text:p>
          </table:table-cell>
          <table:covered-table-cell/>
          <table:covered-table-cell/>
          <table:table-cell table:style-name="ce54" table:number-columns-spanned="3" office:value-type="string" office:string-value="YES" table:formula="of:=IF(VALUE([.L936])&gt;=0;&quot;YES&quot;;&quot;NO&quot;)">
            <text:p>YES</text:p>
          </table:table-cell>
          <table:covered-table-cell/>
          <table:covered-table-cell/>
          <table:table-cell table:style-name="ce54" table:number-columns-spanned="3" office:value-type="string" office:string-value="YES" table:formula="of:=IF(VALUE([.P936])=VALUE([.P910]);&quot;YES&quot;;&quot;NO&quot;)">
            <text:p>YES</text:p>
          </table:table-cell>
          <table:covered-table-cell/>
          <table:covered-table-cell/>
          <table:table-cell table:style-name="ce54" table:number-columns-spanned="3" office:value-type="string" office:string-value="YES" table:formula="of:=IF(AND(UPPER(TRIM([.A938]))=&quot;YES&quot;;UPPER(TRIM([.D938]))=&quot;YES&quot;;UPPER(TRIM([.G938]))=&quot;YES&quot;;UPPER(TRIM([.J938]))=&quot;YES&quot;;UPPER(TRIM([.M938]))=&quot;YES&quot;);&quot;YES&quot;;&quot;NO&quot;)">
            <text:p>YES</text:p>
          </table:table-cell>
          <table:covered-table-cell/>
          <table:covered-table-cell/>
        </table:table-row>
        <table:table-row table:style-name="ro5">
          <table:table-cell table:style-name="ce52" table:number-columns-spanned="18" office:value-type="string" office:string-value="🔍 AUTHORITATIVE COST BASIS CROSS-CHECK · BUILDS 431–440">
            <text:p>🔍 AUTHORITATIVE COST BASIS CROSS-CHECK · BUILDS 43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COST BASIS EVIDENCE COMPLETE">
            <text:p>COST BASIS EVIDENCE COMPLETE</text:p>
          </table:table-cell>
          <table:covered-table-cell/>
          <table:covered-table-cell/>
          <table:covered-table-cell/>
          <table:covered-table-cell/>
          <table:table-cell table:style-name="ce53" table:number-columns-spanned="4" office:value-type="string" office:string-value="RECORD IDENTITY VALID">
            <text:p>RECORD IDENTITY VALID</text:p>
          </table:table-cell>
          <table:covered-table-cell/>
          <table:covered-table-cell/>
          <table:covered-table-cell/>
          <table:table-cell table:style-name="ce53" table:number-columns-spanned="5" office:value-type="string" office:string-value="AUTHORITATIVE TOTAL COST BASIS">
            <text:p>AUTHORITATIVE TOTAL COST BASIS</text:p>
          </table:table-cell>
          <table:covered-table-cell/>
          <table:covered-table-cell/>
          <table:covered-table-cell/>
          <table:covered-table-cell/>
          <table:table-cell table:style-name="ce53" table:number-columns-spanned="4" office:value-type="string" office:string-value="COST BASIS RESULT">
            <text:p>COST BASIS RESULT</text:p>
          </table:table-cell>
          <table:covered-table-cell/>
          <table:covered-table-cell/>
          <table:covered-table-cell/>
        </table:table-row>
        <table:table-row table:style-name="ro21">
          <table:table-cell table:style-name="ce54" table:number-columns-spanned="5" office:value-type="string" office:string-value="YES" table:formula="of:=[.P938]">
            <text:p>YES</text:p>
          </table:table-cell>
          <table:covered-table-cell/>
          <table:covered-table-cell/>
          <table:covered-table-cell/>
          <table:covered-table-cell/>
          <table:table-cell table:style-name="ce54" table:number-columns-spanned="4" office:value-type="string" office:string-value="YES" table:formula="of:=IF(UPPER(TRIM([.A938]))=&quot;YES&quot;;&quot;YES&quot;;&quot;NO&quot;)">
            <text:p>YES</text:p>
          </table:table-cell>
          <table:covered-table-cell/>
          <table:covered-table-cell/>
          <table:covered-table-cell/>
          <table:table-cell table:style-name="ce54" table:number-columns-spanned="5" office:value-type="string" office:string-value="50.00" table:formula="of:=IF(AND(UPPER(TRIM([.A941]))=&quot;YES&quot;;UPPER(TRIM([.F941]))=&quot;YES&quot;);VALUE([.L936])*VALUE([.P936]);&quot;0.00&quot;)">
            <text:p>50.00</text:p>
          </table:table-cell>
          <table:covered-table-cell/>
          <table:covered-table-cell/>
          <table:covered-table-cell/>
          <table:covered-table-cell/>
          <table:table-cell table:style-name="ce54" table:number-columns-spanned="4" office:value-type="string" office:string-value="COST BASIS VERIFIED" table:formula="of:=IF(VALUE([.J941])&gt;=0;&quot;COST BASIS VERIFIED&quot;;&quot;COST BASIS NOT VERIFIED&quot;)">
            <text:p>COST BASIS VERIFIED</text:p>
          </table:table-cell>
          <table:covered-table-cell/>
          <table:covered-table-cell/>
          <table:covered-table-cell/>
        </table:table-row>
        <table:table-row table:style-name="ro5">
          <table:table-cell table:style-name="ce52" table:number-columns-spanned="18" office:value-type="string" office:string-value="💰 NET PROFIT DERIVATION · BUILDS 441–460">
            <text:p>💰 NET PROFIT DERIVATION · BUILDS 44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AUTHORITATIVE MARKETPLACE FEE">
            <text:p>AUTHORITATIVE MARKETPLACE FEE</text:p>
          </table:table-cell>
          <table:covered-table-cell/>
          <table:covered-table-cell/>
          <table:covered-table-cell/>
          <table:table-cell table:style-name="ce53" table:number-columns-spanned="5" office:value-type="string" office:string-value="TOTAL FULFILLMENT COST">
            <text:p>TOTAL FULFILLMENT COST</text:p>
          </table:table-cell>
          <table:covered-table-cell/>
          <table:covered-table-cell/>
          <table:covered-table-cell/>
          <table:covered-table-cell/>
          <table:table-cell table:style-name="ce53" table:number-columns-spanned="4" office:value-type="string" office:string-value="AUTHORITATIVE TOTAL COST BASIS">
            <text:p>AUTHORITATIVE TOTAL COST BASIS</text:p>
          </table:table-cell>
          <table:covered-table-cell/>
          <table:covered-table-cell/>
          <table:covered-table-cell/>
        </table:table-row>
        <table:table-row table:style-name="ro21">
          <table:table-cell table:style-name="ce54" table:number-columns-spanned="5" office:value-type="string" office:string-value="102.00" table:formula="of:=[.J915]">
            <text:p>102.00</text:p>
          </table:table-cell>
          <table:covered-table-cell/>
          <table:covered-table-cell/>
          <table:covered-table-cell/>
          <table:covered-table-cell/>
          <table:table-cell table:style-name="ce54" table:number-columns-spanned="4" office:value-type="string" office:string-value="13.26" table:formula="of:=[.J923]">
            <text:p>13.26</text:p>
          </table:table-cell>
          <table:covered-table-cell/>
          <table:covered-table-cell/>
          <table:covered-table-cell/>
          <table:table-cell table:style-name="ce54" table:number-columns-spanned="5" office:value-type="string" office:string-value="6.00" table:formula="of:=[.M931]">
            <text:p>6.00</text:p>
          </table:table-cell>
          <table:covered-table-cell/>
          <table:covered-table-cell/>
          <table:covered-table-cell/>
          <table:covered-table-cell/>
          <table:table-cell table:style-name="ce54" table:number-columns-spanned="4" office:value-type="string" office:string-value="50.00" table:formula="of:=[.J941]">
            <text:p>50.00</text:p>
          </table:table-cell>
          <table:covered-table-cell/>
          <table:covered-table-cell/>
          <table:covered-table-cell/>
        </table:table-row>
        <table:table-row table:style-name="ro5">
          <table:table-cell table:style-name="ce53" table:number-columns-spanned="4" office:value-type="string" office:string-value="REVENUE VALID">
            <text:p>REVENUE VALID</text:p>
          </table:table-cell>
          <table:covered-table-cell/>
          <table:covered-table-cell/>
          <table:covered-table-cell/>
          <table:table-cell table:style-name="ce53" table:number-columns-spanned="3" office:value-type="string" office:string-value="FEE VALID">
            <text:p>FEE VALID</text:p>
          </table:table-cell>
          <table:covered-table-cell/>
          <table:covered-table-cell/>
          <table:table-cell table:style-name="ce53" table:number-columns-spanned="4" office:value-type="string" office:string-value="FULFILLMENT COST VALID">
            <text:p>FULFILLMENT COST VALID</text:p>
          </table:table-cell>
          <table:covered-table-cell/>
          <table:covered-table-cell/>
          <table:covered-table-cell/>
          <table:table-cell table:style-name="ce53" table:number-columns-spanned="4" office:value-type="string" office:string-value="COST BASIS VALID">
            <text:p>COST BASIS VALID</text:p>
          </table:table-cell>
          <table:covered-table-cell/>
          <table:covered-table-cell/>
          <table:covered-table-cell/>
          <table:table-cell table:style-name="ce53" table:number-columns-spanned="3" office:value-type="string" office:string-value="NET PROFIT">
            <text:p>NET PROFIT</text:p>
          </table:table-cell>
          <table:covered-table-cell/>
          <table:covered-table-cell/>
        </table:table-row>
        <table:table-row table:style-name="ro21">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4" office:value-type="string" office:string-value="YES" table:formula="of:=IF(UPPER(TRIM([.P931]))=&quot;COST VERIFIED&quot;;&quot;YES&quot;;&quot;NO&quot;)">
            <text:p>YES</text:p>
          </table:table-cell>
          <table:covered-table-cell/>
          <table:covered-table-cell/>
          <table:covered-table-cell/>
          <table:table-cell table:style-name="ce54" table:number-columns-spanned="4" office:value-type="string" office:string-value="YES" table:formula="of:=IF(UPPER(TRIM([.O941]))=&quot;COST BASIS VERIFIED&quot;;&quot;YES&quot;;&quot;NO&quot;)">
            <text:p>YES</text:p>
          </table:table-cell>
          <table:covered-table-cell/>
          <table:covered-table-cell/>
          <table:covered-table-cell/>
          <table:table-cell table:style-name="ce54" table:number-columns-spanned="3" office:value-type="string" office:string-value="32.74" table:formula="of:=IF(AND(UPPER(TRIM([.A946]))=&quot;YES&quot;;UPPER(TRIM([.E946]))=&quot;YES&quot;;UPPER(TRIM([.H946]))=&quot;YES&quot;;UPPER(TRIM([.L946]))=&quot;YES&quot;);VALUE([.A944])-VALUE([.F944])-VALUE([.J944])-VALUE([.O944]);&quot;0.00&quot;)">
            <text:p>32.74</text:p>
          </table:table-cell>
          <table:covered-table-cell/>
          <table:covered-table-cell/>
        </table:table-row>
        <table:table-row table:style-name="ro5">
          <table:table-cell table:style-name="ce52" table:number-columns-spanned="18" office:value-type="string" office:string-value="📈 NET PROFIT RESULT · BUILDS 451–460">
            <text:p>📈 NET PROFIT RESULT · BUILDS 45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NET PROFIT">
            <text:p>NET PROFIT</text:p>
          </table:table-cell>
          <table:covered-table-cell/>
          <table:covered-table-cell/>
          <table:covered-table-cell/>
          <table:covered-table-cell/>
          <table:covered-table-cell/>
          <table:table-cell table:style-name="ce53" table:number-columns-spanned="6" office:value-type="string" office:string-value="PROFIT STATUS">
            <text:p>PROFIT STATUS</text:p>
          </table:table-cell>
          <table:covered-table-cell/>
          <table:covered-table-cell/>
          <table:covered-table-cell/>
          <table:covered-table-cell/>
          <table:covered-table-cell/>
          <table:table-cell table:style-name="ce53" table:number-columns-spanned="6" office:value-type="string" office:string-value="FINANCIAL COMPONENTS COMPLETE">
            <text:p>FINANCIAL COMPONENTS COMPLETE</text:p>
          </table:table-cell>
          <table:covered-table-cell/>
          <table:covered-table-cell/>
          <table:covered-table-cell/>
          <table:covered-table-cell/>
          <table:covered-table-cell/>
        </table:table-row>
        <table:table-row table:style-name="ro21">
          <table:table-cell table:style-name="ce54" table:number-columns-spanned="6" office:value-type="string" office:string-value="32.74" table:formula="of:=[.P946]">
            <text:p>32.74</text:p>
          </table:table-cell>
          <table:covered-table-cell/>
          <table:covered-table-cell/>
          <table:covered-table-cell/>
          <table:covered-table-cell/>
          <table:covered-table-cell/>
          <table:table-cell table:style-name="ce54" table:number-columns-spanned="6" office:value-type="string" office:string-value="PROFIT" table:formula="of:=IF(VALUE([.A949])&gt;0;&quot;PROFIT&quot;;IF(VALUE([.A949])&lt;0;&quot;LOSS&quot;;&quot;BREAK EVEN&quot;))">
            <text:p>PROFIT</text:p>
          </table:table-cell>
          <table:covered-table-cell/>
          <table:covered-table-cell/>
          <table:covered-table-cell/>
          <table:covered-table-cell/>
          <table:covered-table-cell/>
          <table:table-cell table:style-name="ce54" table:number-columns-spanned="6" office:value-type="string" office:string-value="YES" table:formula="of:=IF(AND(UPPER(TRIM([.A946]))=&quot;YES&quot;;UPPER(TRIM([.E946]))=&quot;YES&quot;;UPPER(TRIM([.H946]))=&quot;YES&quot;;UPPER(TRIM([.L946]))=&quot;YES&quot;);&quot;YES&quot;;&quot;NO&quot;)">
            <text:p>YES</text:p>
          </table:table-cell>
          <table:covered-table-cell/>
          <table:covered-table-cell/>
          <table:covered-table-cell/>
          <table:covered-table-cell/>
          <table:covered-table-cell/>
        </table:table-row>
        <table:table-row table:style-name="ro5">
          <table:table-cell table:style-name="ce52" table:number-columns-spanned="18" office:value-type="string" office:string-value="🔍 FINANCIAL TRUTH CROSS-CHECK · BUILDS 461–479">
            <text:p>🔍 FINANCIAL TRUTH CROSS-CHECK · BUILDS 461–4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VENUE VERIFIED">
            <text:p>REVENUE VERIFIED</text:p>
          </table:table-cell>
          <table:covered-table-cell/>
          <table:covered-table-cell/>
          <table:table-cell table:style-name="ce53" table:number-columns-spanned="3" office:value-type="string" office:string-value="FEE VERIFIED">
            <text:p>FEE VERIFIED</text:p>
          </table:table-cell>
          <table:covered-table-cell/>
          <table:covered-table-cell/>
          <table:table-cell table:style-name="ce53" table:number-columns-spanned="3" office:value-type="string" office:string-value="COST VERIFIED">
            <text:p>COST VERIFIED</text:p>
          </table:table-cell>
          <table:covered-table-cell/>
          <table:covered-table-cell/>
          <table:table-cell table:style-name="ce53" table:number-columns-spanned="3" office:value-type="string" office:string-value="COST BASIS VERIFIED">
            <text:p>COST BASIS VERIFIED</text:p>
          </table:table-cell>
          <table:covered-table-cell/>
          <table:covered-table-cell/>
          <table:table-cell table:style-name="ce53" table:number-columns-spanned="3" office:value-type="string" office:string-value="COMPONENTS COMPLETE">
            <text:p>COMPONENTS COMPLETE</text:p>
          </table:table-cell>
          <table:covered-table-cell/>
          <table:covered-table-cell/>
          <table:table-cell table:style-name="ce53" table:number-columns-spanned="3" office:value-type="string" office:string-value="FINANCIAL TRUTH">
            <text:p>FINANCIAL TRUTH</text:p>
          </table:table-cell>
          <table:covered-table-cell/>
          <table:covered-table-cell/>
        </table:table-row>
        <table:table-row table:style-name="ro21">
          <table:table-cell table:style-name="ce54" table:number-columns-spanned="3" office:value-type="string" office:string-value="YES" table:formula="of:=IF(UPPER(TRIM([.O915]))=&quot;REVENUE VERIFIED&quot;;&quot;YES&quot;;&quot;NO&quot;)">
            <text:p>YES</text:p>
          </table: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3" office:value-type="string" office:string-value="YES" table:formula="of:=IF(UPPER(TRIM([.P931]))=&quot;COST VERIFIED&quot;;&quot;YES&quot;;&quot;NO&quot;)">
            <text:p>YES</text:p>
          </table:table-cell>
          <table:covered-table-cell/>
          <table:covered-table-cell/>
          <table:table-cell table:style-name="ce54" table:number-columns-spanned="3" office:value-type="string" office:string-value="YES" table:formula="of:=IF(UPPER(TRIM([.O941]))=&quot;COST BASIS VERIFIED&quot;;&quot;YES&quot;;&quot;NO&quot;)">
            <text:p>YES</text:p>
          </table:table-cell>
          <table:covered-table-cell/>
          <table:covered-table-cell/>
          <table:table-cell table:style-name="ce54" table:number-columns-spanned="3" office:value-type="string" office:string-value="YES" table:formula="of:=[.M949]">
            <text:p>YES</text:p>
          </table:table-cell>
          <table:covered-table-cell/>
          <table:covered-table-cell/>
          <table:table-cell table:style-name="ce54" table:number-columns-spanned="3" office:value-type="string" office:string-value="VERIFIED" table:formula="of:=IF(AND(UPPER(TRIM([.A952]))=&quot;YES&quot;;UPPER(TRIM([.D952]))=&quot;YES&quot;;UPPER(TRIM([.G952]))=&quot;YES&quot;;UPPER(TRIM([.J952]))=&quot;YES&quot;;UPPER(TRIM([.M952]))=&quot;YES&quot;);&quot;VERIFIED&quot;;&quot;NOT VERIFIED&quot;)">
            <text:p>VERIFIED</text:p>
          </table:table-cell>
          <table:covered-table-cell/>
          <table:covered-table-cell/>
        </table:table-row>
        <table:table-row table:style-name="ro5">
          <table:table-cell table:style-name="ce52" table:number-columns-spanned="18" office:value-type="string" office:string-value="🏁 CONTROLLED FINANCIAL TRUTH CROSS-CHECK GATE · BUILD 480">
            <text:p>🏁 CONTROLLED FINANCIAL TRUTH CROSS-CHECK GATE ·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AUTHORITATIVE GROSS REVENUE">
            <text:p>AUTHORITATIVE GROSS REVENUE</text:p>
          </table:table-cell>
          <table:covered-table-cell/>
          <table:covered-table-cell/>
          <table:covered-table-cell/>
          <table:table-cell table:style-name="ce53" table:number-columns-spanned="4" office:value-type="string" office:string-value="TOTAL DEDUCTIONS">
            <text:p>TOTAL DEDUCTIONS</text:p>
          </table:table-cell>
          <table:covered-table-cell/>
          <table:covered-table-cell/>
          <table:covered-table-cell/>
          <table:table-cell table:style-name="ce53" table:number-columns-spanned="4" office:value-type="string" office:string-value="NET PROFIT">
            <text:p>NET PROFIT</text:p>
          </table:table-cell>
          <table:covered-table-cell/>
          <table:covered-table-cell/>
          <table:covered-table-cell/>
          <table:table-cell table:style-name="ce53" table:number-columns-spanned="3" office:value-type="string" office:string-value="PROFIT STATUS">
            <text:p>PROFIT STATUS</text:p>
          </table:table-cell>
          <table:covered-table-cell/>
          <table:covered-table-cell/>
          <table:table-cell table:style-name="ce53" table:number-columns-spanned="3" office:value-type="string" office:string-value="FINANCIAL TRUTH RESULT">
            <text:p>FINANCIAL TRUTH RESULT</text:p>
          </table:table-cell>
          <table:covered-table-cell/>
          <table:covered-table-cell/>
        </table:table-row>
        <table:table-row table:style-name="ro21">
          <table:table-cell table:style-name="ce54" table:number-columns-spanned="4" office:value-type="string" office:string-value="102.00" table:formula="of:=[.A944]">
            <text:p>102.00</text:p>
          </table:table-cell>
          <table:covered-table-cell/>
          <table:covered-table-cell/>
          <table:covered-table-cell/>
          <table:table-cell table:style-name="ce54" table:number-columns-spanned="4" office:value-type="string" office:string-value="69.26" table:formula="of:=VALUE([.F944])+VALUE([.J944])+VALUE([.O944])">
            <text:p>69.26</text:p>
          </table:table-cell>
          <table:covered-table-cell/>
          <table:covered-table-cell/>
          <table:covered-table-cell/>
          <table:table-cell table:style-name="ce54" table:number-columns-spanned="4" office:value-type="string" office:string-value="32.74" table:formula="of:=[.A949]">
            <text:p>32.74</text:p>
          </table:table-cell>
          <table:covered-table-cell/>
          <table:covered-table-cell/>
          <table:covered-table-cell/>
          <table:table-cell table:style-name="ce54" table:number-columns-spanned="3" office:value-type="string" office:string-value="PROFIT" table:formula="of:=[.G949]">
            <text:p>PROFIT</text:p>
          </table:table-cell>
          <table:covered-table-cell/>
          <table:covered-table-cell/>
          <table:table-cell table:style-name="ce54" table:number-columns-spanned="3" office:value-type="string" office:string-value="FINANCIAL TRUTH VERIFIED" table:formula="of:=IF(UPPER(TRIM([.P952]))=&quot;VERIFIED&quot;;&quot;FINANCIAL TRUTH VERIFIED&quot;;&quot;FINANCIAL TRUTH NOT VERIFIED&quot;)">
            <text:p>FINANCIAL TRUTH VERIFIED</text:p>
          </table:table-cell>
          <table:covered-table-cell/>
          <table:covered-table-cell/>
        </table:table-row>
        <table:table-row table:style-name="ro5">
          <table:table-cell table:style-name="ce54" table:number-columns-spanned="18" office:value-type="string" office:string-value="AUTHORITATIVE FINANCIAL TRUTH REQUIRES VERIFIED REVENUE + VERIFIED MARKETPLACE FEE + VERIFIED FULFILLMENT COST + VERIFIED COST BASIS · NET PROFIT = GROSS REVENUE − MARKETPLACE FEE − FULFILLMENT COST − COST BASIS · NO CASH SETTLEMENT OR TAX AUTHORITY CREATED IN BUILD 480">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MARKETPLACE SETTLEMENT EVIDENCE INTAKE · BUILDS 481–500">
            <text:p>💵 MARKETPLACE SETTLEMENT EVIDENCE INTAKE · BUILDS 481–5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ETTLEMENT QUESTION">
            <text:p>SETTLEMENT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FINANCIAL TRUTH BECOME VERIFIED CASH SETTLEMENT?">
            <text:p>MAY VERIFIED FINANCIAL TRUTH BECOME VERIFIED CASH SETTLEMENT?</text:p>
          </table:table-cell>
          <table:covered-table-cell/>
          <table:covered-table-cell/>
          <table:covered-table-cell/>
          <table:covered-table-cell/>
          <table:covered-table-cell/>
          <table:table-cell table:style-name="ce54" table:number-columns-spanned="6" office:value-type="string" office:string-value="SETTLEMENT EVIDENCE + SALE IDENTITY + PLATFORM + PAYOUT + TIME">
            <text:p>SETTLEMENT EVIDENCE + SALE IDENTITY + PLATFORM + PAYOUT + TIME</text:p>
          </table:table-cell>
          <table:covered-table-cell/>
          <table:covered-table-cell/>
          <table:covered-table-cell/>
          <table:covered-table-cell/>
          <table:covered-table-cell/>
          <table:table-cell table:style-name="ce54" table:number-columns-spanned="6" office:value-type="string" office:string-value="DERIVED PROFIT ≠ CASH RECEIVED · SETTLEMENT CLAIM ≠ VERIFIED SETTLEMENT">
            <text:p>DERIVED PROFIT ≠ CASH RECEIVED · SETTLEMENT CLAIM ≠ VERIFIED SETTLEMENT</text:p>
          </table: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ETTLEMENT RECEIVED">
            <text:p>SETTLEMENT RECEIVED</text:p>
          </table:table-cell>
          <table:covered-table-cell/>
          <table:covered-table-cell/>
          <table:table-cell table:style-name="ce53" table:number-columns-spanned="3" office:value-type="string" office:string-value="PAYOUT AMOUNT">
            <text:p>PAYOUT AMOUNT</text:p>
          </table:table-cell>
          <table:covered-table-cell/>
          <table:covered-table-cell/>
          <table:table-cell table:style-name="ce53" table:number-columns-spanned="3" office:value-type="string" office:string-value="SETTLED AT">
            <text:p>SETTLED AT</text:p>
          </table:table-cell>
          <table:covered-table-cell/>
          <table:covered-table-cell/>
        </table:table-row>
        <table:table-row table:style-name="ro5">
          <table:table-cell table:style-name="ce54" table:number-columns-spanned="3" office:value-type="string" office:string-value="SET-000001">
            <text:p>SET-000001</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88.74">
            <text:p>88.74</text:p>
          </table:table-cell>
          <table:covered-table-cell/>
          <table:covered-table-cell/>
          <table:table-cell table:style-name="ce54" table:number-columns-spanned="3" office:value-type="string" office:string-value="2026-07-08T21:00:00-04:00">
            <text:p>2026-07-08T21:00:00-04:00</text:p>
          </table:table-cell>
          <table:covered-table-cell/>
          <table:covered-table-cell/>
        </table:table-row>
        <table:table-row table:style-name="ro5">
          <table:table-cell table:style-name="ce53" table:number-columns-spanned="3" office:value-type="string" office:string-value="SETTLEMENT ID PRESENT">
            <text:p>SETTLEMENT ID PRESENT</text:p>
          </table:table-cell>
          <table:covered-table-cell/>
          <table:covered-table-cell/>
          <table:table-cell table:style-name="ce53" table:number-columns-spanned="3" office:value-type="string" office:string-value="SALE ID PRESENT">
            <text:p>SALE ID PRESENT</text:p>
          </table:table-cell>
          <table:covered-table-cell/>
          <table:covered-table-cell/>
          <table:table-cell table:style-name="ce53" table:number-columns-spanned="3" office:value-type="string" office:string-value="PLATFORM PRESENT">
            <text:p>PLATFORM PRESENT</text:p>
          </table:table-cell>
          <table:covered-table-cell/>
          <table:covered-table-cell/>
          <table:table-cell table:style-name="ce53" table:number-columns-spanned="3" office:value-type="string" office:string-value="SETTLEMENT RECEIVED VALID">
            <text:p>SETTLEMENT RECEIVED VALID</text:p>
          </table:table-cell>
          <table:covered-table-cell/>
          <table:covered-table-cell/>
          <table:table-cell table:style-name="ce53" table:number-columns-spanned="3" office:value-type="string" office:string-value="PAYOUT PRESENT">
            <text:p>PAYOUT PRESENT</text:p>
          </table:table-cell>
          <table:covered-table-cell/>
          <table:covered-table-cell/>
          <table:table-cell table:style-name="ce53" table:number-columns-spanned="3" office:value-type="string" office:string-value="SETTLED TIME PRESENT">
            <text:p>SETTLED TIME PRESENT</text:p>
          </table:table-cell>
          <table:covered-table-cell/>
          <table:covered-table-cell/>
        </table:table-row>
        <table:table-row table:style-name="ro21">
          <table:table-cell table:style-name="ce54" table:number-columns-spanned="3" office:value-type="string" office:string-value="YES" table:formula="of:=IF(TRIM([.A961])&lt;&gt;&quot;&quot;;&quot;YES&quot;;&quot;NO&quot;)">
            <text:p>YES</text:p>
          </table:table-cell>
          <table:covered-table-cell/>
          <table:covered-table-cell/>
          <table:table-cell table:style-name="ce54" table:number-columns-spanned="3" office:value-type="string" office:string-value="YES" table:formula="of:=IF(TRIM([.D961])&lt;&gt;&quot;&quot;;&quot;YES&quot;;&quot;NO&quot;)">
            <text:p>YES</text:p>
          </table:table-cell>
          <table:covered-table-cell/>
          <table:covered-table-cell/>
          <table:table-cell table:style-name="ce54" table:number-columns-spanned="3" office:value-type="string" office:string-value="YES" table:formula="of:=IF(TRIM([.G961])&lt;&gt;&quot;&quot;;&quot;YES&quot;;&quot;NO&quot;)">
            <text:p>YES</text:p>
          </table:table-cell>
          <table:covered-table-cell/>
          <table:covered-table-cell/>
          <table:table-cell table:style-name="ce54" table:number-columns-spanned="3" office:value-type="string" office:string-value="YES" table:formula="of:=IF(UPPER(TRIM([.J961]))=&quot;YES&quot;;&quot;YES&quot;;&quot;NO&quot;)">
            <text:p>YES</text:p>
          </table:table-cell>
          <table:covered-table-cell/>
          <table:covered-table-cell/>
          <table:table-cell table:style-name="ce54" table:number-columns-spanned="3" office:value-type="string" office:string-value="YES" table:formula="of:=IF(TRIM([.M961])&lt;&gt;&quot;&quot;;&quot;YES&quot;;&quot;NO&quot;)">
            <text:p>YES</text:p>
          </table:table-cell>
          <table:covered-table-cell/>
          <table:covered-table-cell/>
          <table:table-cell table:style-name="ce54" table:number-columns-spanned="3" office:value-type="string" office:string-value="YES" table:formula="of:=IF(TRIM([.P961])&lt;&gt;&quot;&quot;;&quot;YES&quot;;&quot;NO&quot;)">
            <text:p>YES</text:p>
          </table:table-cell>
          <table:covered-table-cell/>
          <table:covered-table-cell/>
        </table:table-row>
        <table:table-row table:style-name="ro5">
          <table:table-cell table:style-name="ce52" table:number-columns-spanned="18" office:value-type="string" office:string-value="🔍 SALE + PLATFORM IDENTITY MATCH · BUILDS 501–520">
            <text:p>🔍 SALE + PLATFORM IDENTITY MATCH · BUILDS 501–5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ID MATCH">
            <text:p>SALE ID MATCH</text:p>
          </table:table-cell>
          <table:covered-table-cell/>
          <table:covered-table-cell/>
          <table:covered-table-cell/>
          <table:table-cell table:style-name="ce53" table:number-columns-spanned="4" office:value-type="string" office:string-value="PLATFORM MATCH">
            <text:p>PLATFORM MATCH</text:p>
          </table:table-cell>
          <table:covered-table-cell/>
          <table:covered-table-cell/>
          <table:covered-table-cell/>
          <table:table-cell table:style-name="ce53" table:number-columns-spanned="4" office:value-type="string" office:string-value="FINANCIAL TRUTH VERIFIED">
            <text:p>FINANCIAL TRUTH VERIFIED</text:p>
          </table:table-cell>
          <table:covered-table-cell/>
          <table:covered-table-cell/>
          <table:covered-table-cell/>
          <table:table-cell table:style-name="ce53" table:number-columns-spanned="3" office:value-type="string" office:string-value="SETTLEMENT ID VALID">
            <text:p>SETTLEMENT ID VALID</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row>
        <table:table-row table:style-name="ro21">
          <table:table-cell table:style-name="ce54" table:number-columns-spanned="4" office:value-type="string" office:string-value="YES" table:formula="of:=IF(UPPER(TRIM([.D961]))=UPPER(TRIM([.D915]));&quot;YES&quot;;&quot;NO&quot;)">
            <text:p>YES</text:p>
          </table:table-cell>
          <table:covered-table-cell/>
          <table:covered-table-cell/>
          <table:covered-table-cell/>
          <table:table-cell table:style-name="ce54" table:number-columns-spanned="4" office:value-type="string" office:string-value="YES" table:formula="of:=IF(UPPER(TRIM([.G961]))=UPPER(TRIM([.A918]));&quot;YES&quot;;&quot;NO&quot;)">
            <text:p>YES</text:p>
          </table:table-cell>
          <table:covered-table-cell/>
          <table:covered-table-cell/>
          <table:covered-table-cell/>
          <table:table-cell table:style-name="ce54" table:number-columns-spanned="4" office:value-type="string" office:string-value="YES" table:formula="of:=IF(UPPER(TRIM([.P955]))=&quot;FINANCIAL TRUTH VERIFIED&quot;;&quot;YES&quot;;&quot;NO&quot;)">
            <text:p>YES</text:p>
          </table:table-cell>
          <table:covered-table-cell/>
          <table:covered-table-cell/>
          <table:covered-table-cell/>
          <table:table-cell table:style-name="ce54" table:number-columns-spanned="3" office:value-type="string" office:string-value="YES" table:formula="of:=IF(UPPER(TRIM([.A963]))=&quot;YES&quot;;&quot;YES&quot;;&quot;NO&quot;)">
            <text:p>YES</text:p>
          </table:table-cell>
          <table:covered-table-cell/>
          <table:covered-table-cell/>
          <table:table-cell table:style-name="ce54" table:number-columns-spanned="3" office:value-type="string" office:string-value="YES" table:formula="of:=IF(AND(UPPER(TRIM([.A966]))=&quot;YES&quot;;UPPER(TRIM([.E966]))=&quot;YES&quot;;UPPER(TRIM([.I966]))=&quot;YES&quot;;UPPER(TRIM([.M966]))=&quot;YES&quot;);&quot;YES&quot;;&quot;NO&quot;)">
            <text:p>YES</text:p>
          </table:table-cell>
          <table:covered-table-cell/>
          <table:covered-table-cell/>
        </table:table-row>
        <table:table-row table:style-name="ro5">
          <table:table-cell table:style-name="ce52" table:number-columns-spanned="18" office:value-type="string" office:string-value="💵 PAYOUT + SETTLEMENT VALIDATION · BUILDS 521–539">
            <text:p>💵 PAYOUT + SETTLEMENT VALIDATION · BUILDS 521–53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ETTLEMENT RECEIVED VALID">
            <text:p>SETTLEMENT RECEIVED VALID</text:p>
          </table:table-cell>
          <table:covered-table-cell/>
          <table:covered-table-cell/>
          <table:covered-table-cell/>
          <table:table-cell table:style-name="ce53" table:number-columns-spanned="4" office:value-type="string" office:string-value="PAYOUT AMOUNT VALID">
            <text:p>PAYOUT AMOUNT VALID</text:p>
          </table:table-cell>
          <table:covered-table-cell/>
          <table:covered-table-cell/>
          <table:covered-table-cell/>
          <table:table-cell table:style-name="ce53" table:number-columns-spanned="4" office:value-type="string" office:string-value="SETTLED TIME VALID">
            <text:p>SETTLED TIME VALID</text:p>
          </table:table-cell>
          <table:covered-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ETTLEMENT EVIDENCE COMPLETE">
            <text:p>SETTLEMENT EVIDENCE COMPLETE</text:p>
          </table:table-cell>
          <table:covered-table-cell/>
          <table:covered-table-cell/>
        </table:table-row>
        <table:table-row table:style-name="ro21">
          <table:table-cell table:style-name="ce54" table:number-columns-spanned="4" office:value-type="string" office:string-value="YES" table:formula="of:=[.J963]">
            <text:p>YES</text:p>
          </table:table-cell>
          <table:covered-table-cell/>
          <table:covered-table-cell/>
          <table:covered-table-cell/>
          <table:table-cell table:style-name="ce54" table:number-columns-spanned="4" office:value-type="string" office:string-value="YES" table:formula="of:=IF(VALUE([.M961])&gt;=0;&quot;YES&quot;;&quot;NO&quot;)">
            <text:p>YES</text:p>
          </table:table-cell>
          <table:covered-table-cell/>
          <table:covered-table-cell/>
          <table:covered-table-cell/>
          <table:table-cell table:style-name="ce54" table:number-columns-spanned="4" office:value-type="string" office:string-value="YES" table:formula="of:=IF(TRIM([.P961])&lt;&gt;&quot;&quot;;&quot;YES&quot;;&quot;NO&quot;)">
            <text:p>YES</text:p>
          </table:table-cell>
          <table:covered-table-cell/>
          <table:covered-table-cell/>
          <table:covered-table-cell/>
          <table:table-cell table:style-name="ce54" table:number-columns-spanned="3" office:value-type="string" office:string-value="YES" table:formula="of:=[.P966]">
            <text:p>YES</text:p>
          </table:table-cell>
          <table:covered-table-cell/>
          <table:covered-table-cell/>
          <table:table-cell table:style-name="ce54" table:number-columns-spanned="3" office:value-type="string" office:string-value="YES" table:formula="of:=IF(AND(UPPER(TRIM([.A969]))=&quot;YES&quot;;UPPER(TRIM([.E969]))=&quot;YES&quot;;UPPER(TRIM([.I969]))=&quot;YES&quot;;UPPER(TRIM([.M969]))=&quot;YES&quot;);&quot;YES&quot;;&quot;NO&quot;)">
            <text:p>YES</text:p>
          </table:table-cell>
          <table:covered-table-cell/>
          <table:covered-table-cell/>
        </table:table-row>
        <table:table-row table:style-name="ro5">
          <table:table-cell table:style-name="ce52" table:number-columns-spanned="18" office:value-type="string" office:string-value="🏁 CONTROLLED MARKETPLACE SETTLEMENT EVIDENCE GATE · BUILD 540">
            <text:p>🏁 CONTROLLED MARKETPLACE SETTLEMENT EVIDENCE GATE ·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ENTITY VALID">
            <text:p>SALE IDENTITY VALID</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PAYOUT VALID">
            <text:p>PAYOUT VALID</text:p>
          </table:table-cell>
          <table:covered-table-cell/>
          <table:covered-table-cell/>
          <table:table-cell table:style-name="ce53" table:number-columns-spanned="3" office:value-type="string" office:string-value="SETTLEMENT TIME VALID">
            <text:p>SETTLEMENT TIME VALID</text:p>
          </table:table-cell>
          <table:covered-table-cell/>
          <table:covered-table-cell/>
          <table:table-cell table:style-name="ce53" table:number-columns-spanned="3" office:value-type="string" office:string-value="SETTLEMENT RESULT">
            <text:p>SETTLEMENT RESULT</text:p>
          </table:table-cell>
          <table:covered-table-cell/>
          <table:covered-table-cell/>
        </table:table-row>
        <table:table-row table:style-name="ro21">
          <table:table-cell table:style-name="ce54" table:number-columns-spanned="3" office:value-type="string" office:string-value="SET-000001" table:formula="of:=[.A961]">
            <text:p>SET-000001</text:p>
          </table:table-cell>
          <table:covered-table-cell/>
          <table:covered-table-cell/>
          <table:table-cell table:style-name="ce54" table:number-columns-spanned="3" office:value-type="string" office:string-value="YES" table:formula="of:=[.A966]">
            <text:p>YES</text:p>
          </table:table-cell>
          <table:covered-table-cell/>
          <table:covered-table-cell/>
          <table:table-cell table:style-name="ce54" table:number-columns-spanned="3" office:value-type="string" office:string-value="YES" table:formula="of:=[.E966]">
            <text:p>YES</text:p>
          </table:table-cell>
          <table:covered-table-cell/>
          <table:covered-table-cell/>
          <table:table-cell table:style-name="ce54" table:number-columns-spanned="3" office:value-type="string" office:string-value="YES" table:formula="of:=[.E969]">
            <text:p>YES</text:p>
          </table:table-cell>
          <table:covered-table-cell/>
          <table:covered-table-cell/>
          <table:table-cell table:style-name="ce54" table:number-columns-spanned="3" office:value-type="string" office:string-value="YES" table:formula="of:=[.I969]">
            <text:p>YES</text:p>
          </table:table-cell>
          <table:covered-table-cell/>
          <table:covered-table-cell/>
          <table:table-cell table:style-name="ce54" table:number-columns-spanned="3" office:value-type="string" office:string-value="VERIFIED SETTLEMENT" table:formula="of:=IF(AND(UPPER(TRIM([.P969]))=&quot;YES&quot;;UPPER(TRIM([.P966]))=&quot;YES&quot;);&quot;VERIFIED SETTLEMENT&quot;;&quot;SETTLEMENT NOT VERIFIED&quot;)">
            <text:p>VERIFIED SETTLEMENT</text:p>
          </table:table-cell>
          <table:covered-table-cell/>
          <table:covered-table-cell/>
        </table:table-row>
        <table:table-row table:style-name="ro5">
          <table:table-cell table:style-name="ce54" table:number-columns-spanned="18" office:value-type="string" office:string-value="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ETTLEMENT TRANSITION ELIGIBILITY · BUILDS 541–550">
            <text:p>🔐 CONTROLLED SETTLEMENT TRANSITION ELIGIBILITY · BUILDS 541–5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ETTLEMENT BECOME AUTHORITATIVE SETTLED STATE?">
            <text:p>MAY VERIFIED SETTLEMENT BECOME AUTHORITATIVE SETTL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ETTLEMENT ≠ SETTLED · AUTHORITY + EXECUTION REQUIRED">
            <text:p>VERIFIED SETTLEMENT ≠ SETTLED · AUTHORITY + EXECUTION REQUIR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ETTLED TRANSITION REQUEST · BUILDS 551–560">
            <text:p>📥 EXPLICIT SETTLED TRANSITION REQUEST · BUILDS 551–5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VERIFIED SETTLEMENT → SETTLED">
            <text:p>VERIFIED SETTLEMENT → SETTL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YES" table:formula="of:=IF(UPPER(TRIM([.F979]))=&quot;VERIFIED SETTLEMENT → SETTLED&quot;;&quot;YES&quot;;&quot;NO&quot;)">
            <text:p>YES</text:p>
          </table:table-cell>
          <table:covered-table-cell/>
          <table:covered-table-cell/>
          <table:covered-table-cell/>
          <table:covered-table-cell/>
          <table:table-cell table:style-name="ce54" table:number-columns-spanned="4" office:value-type="string" office:string-value="YES" table:formula="of:=IF(TRIM([.N979])&lt;&gt;&quot;&quot;;&quot;YES&quot;;&quot;NO&quot;)">
            <text:p>YES</text:p>
          </table:table-cell>
          <table:covered-table-cell/>
          <table:covered-table-cell/>
          <table:covered-table-cell/>
          <table:table-cell table:style-name="ce54" table:number-columns-spanned="5" office:value-type="string" office:string-value="VALID REQUEST" table:formula="of:=IF(AND(UPPER(TRIM([.A981]))=&quot;YES&quot;;UPPER(TRIM([.E981]))=&quot;YES&quot;;UPPER(TRIM([.J98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ETTLED TRANSITION AUTHORITY · BUILDS 561–570">
            <text:p>🛡️ SETTLED TRANSITION AUTHORITY · BUILDS 561–5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M893]))=&quot;YES&quot;;&quot;YES&quot;;&quot;NO&quot;)">
            <text:p>YES</text:p>
          </table: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4" office:value-type="string" office:string-value="YES" table:formula="of:=IF(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N979]))=&quot;MARK · OPERATOR&quot;;&quot;YES&quot;;&quot;NO&quot;)">
            <text:p>YES</text:p>
          </table:table-cell>
          <table:covered-table-cell/>
          <table:covered-table-cell/>
          <table:table-cell table:style-name="ce54" table:number-columns-spanned="3" office:value-type="string" office:string-value="GRANTED" table:formula="of:=IF(AND(UPPER(TRIM([.A984]))=&quot;YES&quot;;UPPER(TRIM([.E984]))=&quot;YES&quot;;UPPER(TRIM([.I984]))=&quot;YES&quot;;UPPER(TRIM([.M984]))=&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SETTLED STATE WRITE · BUILDS 571–580">
            <text:p>⚙️ EXECUTION COMMIT + CONTROLLED SETTLED STATE WRITE · BUILDS 571–5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ETTLED TRANSITION">
            <text:p>EXECUTE SETTLED TRANSITION</text:p>
          </table:table-cell>
          <table:covered-table-cell/>
          <table:covered-table-cell/>
          <table:covered-table-cell/>
          <table:table-cell table:style-name="ce54" table:number-columns-spanned="4" office:value-type="string" office:string-value="YES" table:formula="of:=IF(UPPER(TRIM([.P984]))=&quot;GRANTED&quot;;&quot;YES&quot;;&quot;NO&quot;)">
            <text:p>YES</text:p>
          </table:table-cell>
          <table:covered-table-cell/>
          <table:covered-table-cell/>
          <table:covered-table-cell/>
          <table:table-cell table:style-name="ce54" table:number-columns-spanned="4" office:value-type="string" office:string-value="YES" table:formula="of:=IF(AND(UPPER(TRIM([.E987]))=&quot;YES&quot;;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I987]))=&quot;YES&quot;;&quot;YES&quot;;&quot;NO&quot;)">
            <text:p>YES</text:p>
          </table:table-cell>
          <table:covered-table-cell/>
          <table:covered-table-cell/>
          <table:table-cell table:style-name="ce54" table:number-columns-spanned="3" office:value-type="string" office:string-value="SETTLED" table:formula="of:=IF(UPPER(TRIM([.M987]))=&quot;YES&quot;;&quot;SETTLED&quot;;&quot;NO STATE WRITE&quot;)">
            <text:p>SETTLED</text:p>
          </table:table-cell>
          <table:covered-table-cell/>
          <table:covered-table-cell/>
        </table:table-row>
        <table:table-row table:style-name="ro5">
          <table:table-cell table:style-name="ce52" table:number-columns-spanned="18" office:value-type="string" office:string-value="📜 APPEND-ONLY SETTLED TRANSITION HISTORY · BUILDS 581–590">
            <text:p>📜 APPEND-ONLY SETTLED TRANSITION HISTORY · BUILDS 581–5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4">
            <text:p>TRN-000004</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VERIFIED SETTLEMENT">
            <text:p>VERIFIED SETTLEMENT</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591–599">
            <text:p>🔍 POST-WRITE VERIFICATION + REPLAY PROTECTION · BUILDS 591–59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987]))=&quot;YES&quot;;&quot;YES&quot;;&quot;NO&quot;)">
            <text:p>YES</text:p>
          </table:table-cell>
          <table:covered-table-cell/>
          <table:covered-table-cell/>
          <table:table-cell table:style-name="ce54" table:number-columns-spanned="3" office:value-type="string" office:string-value="YES" table:formula="of:=IF(AND(UPPER(TRIM([.D990]))=&quot;INV-000001&quot;;UPPER(TRIM([.J990]))=&quot;SETTLED&quot;);&quot;YES&quot;;&quot;NO&quot;)">
            <text:p>YES</text:p>
          </table:table-cell>
          <table:covered-table-cell/>
          <table:covered-table-cell/>
          <table:table-cell table:style-name="ce54" table:number-columns-spanned="3" office:value-type="string" office:string-value="YES" table:formula="of:=IF(UPPER(TRIM([.P987]))=UPPER(TRIM([.J990]));&quot;YES&quot;;&quot;NO&quot;)">
            <text:p>YES</text:p>
          </table:table-cell>
          <table:covered-table-cell/>
          <table:covered-table-cell/>
          <table:table-cell table:style-name="ce54" table:number-columns-spanned="3" office:value-type="string" office:string-value="COMPLETED" table:formula="of:=IF(AND(UPPER(TRIM([.A993]))=&quot;YES&quot;;UPPER(TRIM([.D993]))=&quot;YES&quot;;UPPER(TRIM([.G993]))=&quot;YES&quot;);&quot;COMPLETED&quot;;&quot;INCOMPLETE&quot;)">
            <text:p>COMPLETED</text:p>
          </table:table-cell>
          <table:covered-table-cell/>
          <table:covered-table-cell/>
          <table:table-cell table:style-name="ce54" table:number-columns-spanned="3" office:value-type="string" office:string-value="ALREADY EXECUTED" table:formula="of:=IF(UPPER(TRIM([.J993]))=&quot;COMPLETED&quot;;&quot;ALREADY EXECUTED&quot;;&quot;NOT EXECUTED&quot;)">
            <text:p>ALREADY EXECUTED</text:p>
          </table:table-cell>
          <table:covered-table-cell/>
          <table:covered-table-cell/>
          <table:table-cell table:style-name="ce54" table:number-columns-spanned="3" office:value-type="string" office:string-value="NO" table:formula="of:=IF(UPPER(TRIM([.M993]))=&quot;ALREADY EXECUTED&quot;;&quot;NO&quot;;&quot;YES&quot;)">
            <text:p>NO</text:p>
          </table:table-cell>
          <table:covered-table-cell/>
          <table:covered-table-cell/>
        </table:table-row>
        <table:table-row table:style-name="ro5">
          <table:table-cell table:style-name="ce52" table:number-columns-spanned="18" office:value-type="string" office:string-value="🏁 CONTROLLED SETTLED TRANSITION EXECUTION GATE · BUILD 600">
            <text:p>🏁 CONTROLLED SETTLED TRANSITION EXECUTION GATE · BUILD 6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VERIFIED SETTLEMENT">
            <text:p>VERIFIED SETTLEMENT</text:p>
          </table:table-cell>
          <table:covered-table-cell/>
          <table:covered-table-cell/>
          <table:table-cell table:style-name="ce53" table:number-columns-spanned="3" office:value-type="string" office:string-value="ELIGIBILITY">
            <text:p>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IF(UPPER(TRIM([.P972]))=&quot;VERIFIED SETTLEMENT&quot;;&quot;YES&quot;;&quot;NO&quot;)">
            <text:p>YES</text:p>
          </table:table-cell>
          <table:covered-table-cell/>
          <table:covered-table-cell/>
          <table:table-cell table:style-name="ce54" table:number-columns-spanned="3" office:value-type="string" office:string-value="YES" table:formula="of:=[.A981]">
            <text:p>YES</text:p>
          </table:table-cell>
          <table:covered-table-cell/>
          <table:covered-table-cell/>
          <table:table-cell table:style-name="ce54" table:number-columns-spanned="3" office:value-type="string" office:string-value="YES" table:formula="of:=[.E981]">
            <text:p>YES</text:p>
          </table:table-cell>
          <table:covered-table-cell/>
          <table:covered-table-cell/>
          <table:table-cell table:style-name="ce54" table:number-columns-spanned="3" office:value-type="string" office:string-value="GRANTED" table:formula="of:=[.P984]">
            <text:p>GRANTED</text:p>
          </table:table-cell>
          <table:covered-table-cell/>
          <table:covered-table-cell/>
          <table:table-cell table:style-name="ce54" table:number-columns-spanned="3" office:value-type="string" office:string-value="COMPLETED" table:formula="of:=[.J993]">
            <text:p>COMPLETED</text:p>
          </table:table-cell>
          <table:covered-table-cell/>
          <table:covered-table-cell/>
          <table:table-cell table:style-name="ce54" table:number-columns-spanned="3" office:value-type="string" office:string-value="SETTLED" table:formula="of:=IF(AND(UPPER(TRIM([.A996]))=&quot;YES&quot;;UPPER(TRIM([.D996]))=&quot;YES&quot;;UPPER(TRIM([.G996]))=&quot;YES&quot;;UPPER(TRIM([.J996]))=&quot;GRANTED&quot;;UPPER(TRIM([.M996]))=&quot;COMPLETED&quot;);&quot;SETTLED&quot;;&quot;NOT SETTLED&quot;)">
            <text:p>SETTLED</text:p>
          </table:table-cell>
          <table:covered-table-cell/>
          <table:covered-table-cell/>
        </table:table-row>
        <table:table-row table:style-name="ro5">
          <table:table-cell table:style-name="ce54" table:number-columns-spanned="18" office:value-type="string" office:string-value="VERIFIED SETTLEMENT → SETTLED REQUIRES EXPLICIT REQUEST + VALID ELIGIBILITY + GRANTED AUTHORITY + EXECUTION COMMIT + CONTROLLED WRITE + APPEND-ONLY HISTORY + POST-WRITE VERIFICATION · REPLAY MUST NOT CREATE A SECOND WRITE · BUILD 600 CREATES NO TAX AUTHORITY">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CLOSE ELIGIBILITY · BUILDS 601–610">
            <text:p>🔐 CONTROLLED CLOSE ELIGIBILITY · BUILDS 601–6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CLOSE QUESTION">
            <text:p>CLOS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UTHORITATIVE SETTLED STATE BECOME CLOSED?">
            <text:p>MAY AUTHORITATIVE SETTLED STATE BECOME CLOSED?</text:p>
          </table:table-cell>
          <table:covered-table-cell/>
          <table:covered-table-cell/>
          <table:covered-table-cell/>
          <table:covered-table-cell/>
          <table:covered-table-cell/>
          <table:table-cell table:style-name="ce54" table:number-columns-spanned="6" office:value-type="string" office:string-value="SETTLED STATE + FINANCIAL TRUTH + VERIFIED SETTLEMENT + EXPLICIT CLOSE CONTROL">
            <text:p>SETTLED STATE + FINANCIAL TRUTH + VERIFIED SETTLEMENT + EXPLICIT CLOSE CONTROL</text:p>
          </table:table-cell>
          <table:covered-table-cell/>
          <table:covered-table-cell/>
          <table:covered-table-cell/>
          <table:covered-table-cell/>
          <table:covered-table-cell/>
          <table:table-cell table:style-name="ce54" table:number-columns-spanned="6" office:value-type="string" office:string-value="SETTLED ≠ CLOSED · VERIFIED FINANCIAL TRUTH ≠ CLOSE AUTHORITY">
            <text:p>SETTLED ≠ CLOSED · VERIFIED FINANCIAL TRUTH ≠ CLOSE AUTHORITY</text:p>
          </table:table-cell>
          <table:covered-table-cell/>
          <table:covered-table-cell/>
          <table:covered-table-cell/>
          <table:covered-table-cell/>
          <table:covered-table-cell/>
        </table:table-row>
        <table:table-row table:style-name="ro5">
          <table:table-cell table:style-name="ce53" table:number-columns-spanned="4" office:value-type="string" office:string-value="SETTLED STATE VALID">
            <text:p>SETTLED STATE VALID</text:p>
          </table:table-cell>
          <table:covered-table-cell/>
          <table:covered-table-cell/>
          <table:covered-table-cell/>
          <table:table-cell table:style-name="ce53" table:number-columns-spanned="5" office:value-type="string" office:string-value="FINANCIAL TRUTH VALID">
            <text:p>FINANCIAL TRUTH VALID</text:p>
          </table:table-cell>
          <table:covered-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5" office:value-type="string" office:string-value="CLOSE ELIGIBILITY">
            <text:p>CLOSE ELIGIBILITY</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5" office:value-type="string" office:string-value="YES" table:formula="of:=IF(UPPER(TRIM([.P955]))=&quot;FINANCIAL TRUTH VERIFIED&quot;;&quot;YES&quot;;&quot;NO&quot;)">
            <text:p>YES</text:p>
          </table:table-cell>
          <table:covered-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ELIGIBLE" table:formula="of:=IF(AND(UPPER(TRIM([.A1001]))=&quot;YES&quot;;UPPER(TRIM([.E1001]))=&quot;YES&quot;;UPPER(TRIM([.J1001]))=&quot;YES&quot;);&quot;ELIGIBLE&quot;;&quot;NOT ELIGIBLE&quot;)">
            <text:p>ELIGIBLE</text:p>
          </table:table-cell>
          <table:covered-table-cell/>
          <table:covered-table-cell/>
          <table:covered-table-cell/>
          <table:covered-table-cell/>
        </table:table-row>
        <table:table-row table:style-name="ro5">
          <table:table-cell table:style-name="ce52" table:number-columns-spanned="18" office:value-type="string" office:string-value="📥 EXPLICIT CLOSE REQUEST · BUILDS 611–620">
            <text:p>📥 EXPLICIT CLOSE REQUEST · BUILDS 611–6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SETTLED → CLOSED">
            <text:p>SETTLED → CLOS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5" office:value-type="string" office:string-value="YES" table:formula="of:=IF(UPPER(TRIM([.F1004]))=&quot;SETTLED → CLOSED&quot;;&quot;YES&quot;;&quot;NO&quot;)">
            <text:p>YES</text:p>
          </table:table-cell>
          <table:covered-table-cell/>
          <table:covered-table-cell/>
          <table:covered-table-cell/>
          <table:covered-table-cell/>
          <table:table-cell table:style-name="ce54" table:number-columns-spanned="4" office:value-type="string" office:string-value="YES" table:formula="of:=IF(TRIM([.N1004])&lt;&gt;&quot;&quot;;&quot;YES&quot;;&quot;NO&quot;)">
            <text:p>YES</text:p>
          </table:table-cell>
          <table:covered-table-cell/>
          <table:covered-table-cell/>
          <table:covered-table-cell/>
          <table:table-cell table:style-name="ce54" table:number-columns-spanned="5" office:value-type="string" office:string-value="VALID REQUEST" table:formula="of:=IF(AND(UPPER(TRIM([.A1006]))=&quot;YES&quot;;UPPER(TRIM([.E1006]))=&quot;YES&quot;;UPPER(TRIM([.J1006]))=&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CLOSE TRANSITION AUTHORITY · BUILDS 621–630">
            <text:p>🛡️ CLOSE TRANSITION AUTHORITY · BUILDS 621–6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CLOSE ELIGIBILITY VALID">
            <text:p>CLOSE ELIGIBILITY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4" office:value-type="string" office:string-value="YES" table:formula="of:=IF(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N1004]))=&quot;MARK · OPERATOR&quot;;&quot;YES&quot;;&quot;NO&quot;)">
            <text:p>YES</text:p>
          </table:table-cell>
          <table:covered-table-cell/>
          <table:covered-table-cell/>
          <table:table-cell table:style-name="ce54" table:number-columns-spanned="3" office:value-type="string" office:string-value="GRANTED" table:formula="of:=IF(AND(UPPER(TRIM([.A1009]))=&quot;YES&quot;;UPPER(TRIM([.E1009]))=&quot;YES&quot;;UPPER(TRIM([.I1009]))=&quot;YES&quot;;UPPER(TRIM([.M1009]))=&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CLOSED STATE WRITE · BUILDS 631–640">
            <text:p>⚙️ EXECUTION COMMIT + CONTROLLED CLOSED STATE WRITE · BUILDS 631–6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CLOSE TRANSITION">
            <text:p>EXECUTE CLOSE TRANSITION</text:p>
          </table:table-cell>
          <table:covered-table-cell/>
          <table:covered-table-cell/>
          <table:covered-table-cell/>
          <table:table-cell table:style-name="ce54" table:number-columns-spanned="4" office:value-type="string" office:string-value="YES" table:formula="of:=IF(UPPER(TRIM([.P1009]))=&quot;GRANTED&quot;;&quot;YES&quot;;&quot;NO&quot;)">
            <text:p>YES</text:p>
          </table:table-cell>
          <table:covered-table-cell/>
          <table:covered-table-cell/>
          <table:covered-table-cell/>
          <table:table-cell table:style-name="ce54" table:number-columns-spanned="4" office:value-type="string" office:string-value="YES" table:formula="of:=IF(AND(UPPER(TRIM([.E1012]))=&quot;YES&quot;;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I1012]))=&quot;YES&quot;;&quot;YES&quot;;&quot;NO&quot;)">
            <text:p>YES</text:p>
          </table:table-cell>
          <table:covered-table-cell/>
          <table:covered-table-cell/>
          <table:table-cell table:style-name="ce54" table:number-columns-spanned="3" office:value-type="string" office:string-value="CLOSED" table:formula="of:=IF(UPPER(TRIM([.M1012]))=&quot;YES&quot;;&quot;CLOSED&quot;;&quot;NO STATE WRITE&quot;)">
            <text:p>CLOSED</text:p>
          </table:table-cell>
          <table:covered-table-cell/>
          <table:covered-table-cell/>
        </table:table-row>
        <table:table-row table:style-name="ro5">
          <table:table-cell table:style-name="ce52" table:number-columns-spanned="18" office:value-type="string" office:string-value="📜 APPEND-ONLY CLOSE TRANSITION HISTORY · BUILDS 641–650">
            <text:p>📜 APPEND-ONLY CLOSE TRANSITION HISTORY · BUILDS 641–6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5">
            <text:p>TRN-000005</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CLOSED">
            <text:p>CLOS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651–659">
            <text:p>🔍 POST-WRITE VERIFICATION + REPLAY PROTECTION · BUILDS 651–6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1012]))=&quot;YES&quot;;&quot;YES&quot;;&quot;NO&quot;)">
            <text:p>YES</text:p>
          </table:table-cell>
          <table:covered-table-cell/>
          <table:covered-table-cell/>
          <table:table-cell table:style-name="ce54" table:number-columns-spanned="3" office:value-type="string" office:string-value="YES" table:formula="of:=IF(AND(UPPER(TRIM([.D1015]))=&quot;INV-000001&quot;;UPPER(TRIM([.J1015]))=&quot;CLOSED&quot;);&quot;YES&quot;;&quot;NO&quot;)">
            <text:p>YES</text:p>
          </table:table-cell>
          <table:covered-table-cell/>
          <table:covered-table-cell/>
          <table:table-cell table:style-name="ce54" table:number-columns-spanned="3" office:value-type="string" office:string-value="YES" table:formula="of:=IF(UPPER(TRIM([.P1012]))=UPPER(TRIM([.J1015]));&quot;YES&quot;;&quot;NO&quot;)">
            <text:p>YES</text:p>
          </table:table-cell>
          <table:covered-table-cell/>
          <table:covered-table-cell/>
          <table:table-cell table:style-name="ce54" table:number-columns-spanned="3" office:value-type="string" office:string-value="COMPLETED" table:formula="of:=IF(AND(UPPER(TRIM([.A1018]))=&quot;YES&quot;;UPPER(TRIM([.D1018]))=&quot;YES&quot;;UPPER(TRIM([.G1018]))=&quot;YES&quot;);&quot;COMPLETED&quot;;&quot;INCOMPLETE&quot;)">
            <text:p>COMPLETED</text:p>
          </table:table-cell>
          <table:covered-table-cell/>
          <table:covered-table-cell/>
          <table:table-cell table:style-name="ce54" table:number-columns-spanned="3" office:value-type="string" office:string-value="ALREADY EXECUTED" table:formula="of:=IF(UPPER(TRIM([.J1018]))=&quot;COMPLETED&quot;;&quot;ALREADY EXECUTED&quot;;&quot;NOT EXECUTED&quot;)">
            <text:p>ALREADY EXECUTED</text:p>
          </table:table-cell>
          <table:covered-table-cell/>
          <table:covered-table-cell/>
          <table:table-cell table:style-name="ce54" table:number-columns-spanned="3" office:value-type="string" office:string-value="NO" table:formula="of:=IF(UPPER(TRIM([.M1018]))=&quot;ALREADY EXECUTED&quot;;&quot;NO&quot;;&quot;YES&quot;)">
            <text:p>NO</text:p>
          </table:table-cell>
          <table:covered-table-cell/>
          <table:covered-table-cell/>
        </table:table-row>
        <table:table-row table:style-name="ro5">
          <table:table-cell table:style-name="ce52" table:number-columns-spanned="18" office:value-type="string" office:string-value="🏁 CONTROLLED CLOSED TRANSITION EXECUTION GATE · BUILD 660">
            <text:p>🏁 CONTROLLED CLOSED TRANSITION EXECUTION GATE · BUILD 6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D STATE">
            <text:p>SETTLED STATE</text:p>
          </table:table-cell>
          <table:covered-table-cell/>
          <table:covered-table-cell/>
          <table:table-cell table:style-name="ce53" table:number-columns-spanned="3" office:value-type="string" office:string-value="CLOSE ELIGIBILITY">
            <text:p>CLOSE 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A1001]">
            <text:p>YES</text:p>
          </table:table-cell>
          <table:covered-table-cell/>
          <table:covered-table-cell/>
          <table:table-cell table:style-name="ce54" table:number-columns-spanned="3" office:value-type="string" office:string-value="ELIGIBLE" table:formula="of:=[.N1001]">
            <text:p>ELIGIBLE</text:p>
          </table:table-cell>
          <table:covered-table-cell/>
          <table:covered-table-cell/>
          <table:table-cell table:style-name="ce54" table:number-columns-spanned="3" office:value-type="string" office:string-value="VALID REQUEST" table:formula="of:=[.N1006]">
            <text:p>VALID REQUEST</text:p>
          </table:table-cell>
          <table:covered-table-cell/>
          <table:covered-table-cell/>
          <table:table-cell table:style-name="ce54" table:number-columns-spanned="3" office:value-type="string" office:string-value="GRANTED" table:formula="of:=[.P1009]">
            <text:p>GRANTED</text:p>
          </table:table-cell>
          <table:covered-table-cell/>
          <table:covered-table-cell/>
          <table:table-cell table:style-name="ce54" table:number-columns-spanned="3" office:value-type="string" office:string-value="COMPLETED" table:formula="of:=[.J1018]">
            <text:p>COMPLETED</text:p>
          </table:table-cell>
          <table:covered-table-cell/>
          <table:covered-table-cell/>
          <table:table-cell table:style-name="ce54" table:number-columns-spanned="3" office:value-type="string" office:string-value="CLOSED" table:formula="of:=IF(AND(UPPER(TRIM([.A1021]))=&quot;YES&quot;;UPPER(TRIM([.D1021]))=&quot;ELIGIBLE&quot;;UPPER(TRIM([.G1021]))=&quot;VALID REQUEST&quot;;UPPER(TRIM([.J1021]))=&quot;GRANTED&quot;;UPPER(TRIM([.M1021]))=&quot;COMPLETED&quot;);&quot;CLOSED&quot;;&quot;NOT CLOSED&quot;)">
            <text:p>CLOSED</text:p>
          </table:table-cell>
          <table:covered-table-cell/>
          <table:covered-table-cell/>
        </table:table-row>
        <table:table-row table:style-name="ro5">
          <table:table-cell table:style-name="ce54" table:number-columns-spanned="18" office:value-type="string" office:string-value="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