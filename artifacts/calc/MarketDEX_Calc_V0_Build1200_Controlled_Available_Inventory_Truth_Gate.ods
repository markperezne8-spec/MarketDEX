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ETTLEMENT TRANSITION ELIGIBILITY · BUILDS 541–550">
            <text:p>🔐 CONTROLLED SETTLEMENT TRANSITION ELIGIBILITY · BUILDS 541–5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ETTLEMENT BECOME AUTHORITATIVE SETTLED STATE?">
            <text:p>MAY VERIFIED SETTLEMENT BECOME AUTHORITATIVE SETTL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ETTLEMENT ≠ SETTLED · AUTHORITY + EXECUTION REQUIRED">
            <text:p>VERIFIED SETTLEMENT ≠ SETTLED · AUTHORITY + EXECUTION REQUIR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ETTLED TRANSITION REQUEST · BUILDS 551–560">
            <text:p>📥 EXPLICIT SETTLED TRANSITION REQUEST · BUILDS 551–5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VERIFIED SETTLEMENT → SETTLED">
            <text:p>VERIFIED SETTLEMENT → SETTL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YES" table:formula="of:=IF(UPPER(TRIM([.F979]))=&quot;VERIFIED SETTLEMENT → SETTLED&quot;;&quot;YES&quot;;&quot;NO&quot;)">
            <text:p>YES</text:p>
          </table:table-cell>
          <table:covered-table-cell/>
          <table:covered-table-cell/>
          <table:covered-table-cell/>
          <table:covered-table-cell/>
          <table:table-cell table:style-name="ce54" table:number-columns-spanned="4" office:value-type="string" office:string-value="YES" table:formula="of:=IF(TRIM([.N979])&lt;&gt;&quot;&quot;;&quot;YES&quot;;&quot;NO&quot;)">
            <text:p>YES</text:p>
          </table:table-cell>
          <table:covered-table-cell/>
          <table:covered-table-cell/>
          <table:covered-table-cell/>
          <table:table-cell table:style-name="ce54" table:number-columns-spanned="5" office:value-type="string" office:string-value="VALID REQUEST" table:formula="of:=IF(AND(UPPER(TRIM([.A981]))=&quot;YES&quot;;UPPER(TRIM([.E981]))=&quot;YES&quot;;UPPER(TRIM([.J98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ETTLED TRANSITION AUTHORITY · BUILDS 561–570">
            <text:p>🛡️ SETTLED TRANSITION AUTHORITY · BUILDS 561–5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M893]))=&quot;YES&quot;;&quot;YES&quot;;&quot;NO&quot;)">
            <text:p>YES</text:p>
          </table: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4" office:value-type="string" office:string-value="YES" table:formula="of:=IF(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N979]))=&quot;MARK · OPERATOR&quot;;&quot;YES&quot;;&quot;NO&quot;)">
            <text:p>YES</text:p>
          </table:table-cell>
          <table:covered-table-cell/>
          <table:covered-table-cell/>
          <table:table-cell table:style-name="ce54" table:number-columns-spanned="3" office:value-type="string" office:string-value="GRANTED" table:formula="of:=IF(AND(UPPER(TRIM([.A984]))=&quot;YES&quot;;UPPER(TRIM([.E984]))=&quot;YES&quot;;UPPER(TRIM([.I984]))=&quot;YES&quot;;UPPER(TRIM([.M984]))=&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SETTLED STATE WRITE · BUILDS 571–580">
            <text:p>⚙️ EXECUTION COMMIT + CONTROLLED SETTLED STATE WRITE · BUILDS 571–5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ETTLED TRANSITION">
            <text:p>EXECUTE SETTLED TRANSITION</text:p>
          </table:table-cell>
          <table:covered-table-cell/>
          <table:covered-table-cell/>
          <table:covered-table-cell/>
          <table:table-cell table:style-name="ce54" table:number-columns-spanned="4" office:value-type="string" office:string-value="YES" table:formula="of:=IF(UPPER(TRIM([.P984]))=&quot;GRANTED&quot;;&quot;YES&quot;;&quot;NO&quot;)">
            <text:p>YES</text:p>
          </table:table-cell>
          <table:covered-table-cell/>
          <table:covered-table-cell/>
          <table:covered-table-cell/>
          <table:table-cell table:style-name="ce54" table:number-columns-spanned="4" office:value-type="string" office:string-value="YES" table:formula="of:=IF(AND(UPPER(TRIM([.E987]))=&quot;YES&quot;;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I987]))=&quot;YES&quot;;&quot;YES&quot;;&quot;NO&quot;)">
            <text:p>YES</text:p>
          </table:table-cell>
          <table:covered-table-cell/>
          <table:covered-table-cell/>
          <table:table-cell table:style-name="ce54" table:number-columns-spanned="3" office:value-type="string" office:string-value="SETTLED" table:formula="of:=IF(UPPER(TRIM([.M987]))=&quot;YES&quot;;&quot;SETTLED&quot;;&quot;NO STATE WRITE&quot;)">
            <text:p>SETTLED</text:p>
          </table:table-cell>
          <table:covered-table-cell/>
          <table:covered-table-cell/>
        </table:table-row>
        <table:table-row table:style-name="ro5">
          <table:table-cell table:style-name="ce52" table:number-columns-spanned="18" office:value-type="string" office:string-value="📜 APPEND-ONLY SETTLED TRANSITION HISTORY · BUILDS 581–590">
            <text:p>📜 APPEND-ONLY SETTLED TRANSITION HISTORY · BUILDS 581–5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4">
            <text:p>TRN-000004</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VERIFIED SETTLEMENT">
            <text:p>VERIFIED SETTLEMENT</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591–599">
            <text:p>🔍 POST-WRITE VERIFICATION + REPLAY PROTECTION · BUILDS 591–5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987]))=&quot;YES&quot;;&quot;YES&quot;;&quot;NO&quot;)">
            <text:p>YES</text:p>
          </table:table-cell>
          <table:covered-table-cell/>
          <table:covered-table-cell/>
          <table:table-cell table:style-name="ce54" table:number-columns-spanned="3" office:value-type="string" office:string-value="YES" table:formula="of:=IF(AND(UPPER(TRIM([.D990]))=&quot;INV-000001&quot;;UPPER(TRIM([.J990]))=&quot;SETTLED&quot;);&quot;YES&quot;;&quot;NO&quot;)">
            <text:p>YES</text:p>
          </table:table-cell>
          <table:covered-table-cell/>
          <table:covered-table-cell/>
          <table:table-cell table:style-name="ce54" table:number-columns-spanned="3" office:value-type="string" office:string-value="YES" table:formula="of:=IF(UPPER(TRIM([.P987]))=UPPER(TRIM([.J990]));&quot;YES&quot;;&quot;NO&quot;)">
            <text:p>YES</text:p>
          </table:table-cell>
          <table:covered-table-cell/>
          <table:covered-table-cell/>
          <table:table-cell table:style-name="ce54" table:number-columns-spanned="3" office:value-type="string" office:string-value="COMPLETED" table:formula="of:=IF(AND(UPPER(TRIM([.A993]))=&quot;YES&quot;;UPPER(TRIM([.D993]))=&quot;YES&quot;;UPPER(TRIM([.G993]))=&quot;YES&quot;);&quot;COMPLETED&quot;;&quot;INCOMPLETE&quot;)">
            <text:p>COMPLETED</text:p>
          </table:table-cell>
          <table:covered-table-cell/>
          <table:covered-table-cell/>
          <table:table-cell table:style-name="ce54" table:number-columns-spanned="3" office:value-type="string" office:string-value="ALREADY EXECUTED" table:formula="of:=IF(UPPER(TRIM([.J993]))=&quot;COMPLETED&quot;;&quot;ALREADY EXECUTED&quot;;&quot;NOT EXECUTED&quot;)">
            <text:p>ALREADY EXECUTED</text:p>
          </table:table-cell>
          <table:covered-table-cell/>
          <table:covered-table-cell/>
          <table:table-cell table:style-name="ce54" table:number-columns-spanned="3" office:value-type="string" office:string-value="NO" table:formula="of:=IF(UPPER(TRIM([.M993]))=&quot;ALREADY EXECUTED&quot;;&quot;NO&quot;;&quot;YES&quot;)">
            <text:p>NO</text:p>
          </table:table-cell>
          <table:covered-table-cell/>
          <table:covered-table-cell/>
        </table:table-row>
        <table:table-row table:style-name="ro5">
          <table:table-cell table:style-name="ce52" table:number-columns-spanned="18" office:value-type="string" office:string-value="🏁 CONTROLLED SETTLED TRANSITION EXECUTION GATE · BUILD 600">
            <text:p>🏁 CONTROLLED SETTLED TRANSITION EXECUTION GATE · BUILD 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ETTLEMENT">
            <text:p>VERIFIED SETTLEMENT</text:p>
          </table:table-cell>
          <table:covered-table-cell/>
          <table:covered-table-cell/>
          <table:table-cell table:style-name="ce53" table:number-columns-spanned="3" office:value-type="string" office:string-value="ELIGIBILITY">
            <text:p>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IF(UPPER(TRIM([.P972]))=&quot;VERIFIED SETTLEMENT&quot;;&quot;YES&quot;;&quot;NO&quot;)">
            <text:p>YES</text:p>
          </table:table-cell>
          <table:covered-table-cell/>
          <table:covered-table-cell/>
          <table:table-cell table:style-name="ce54" table:number-columns-spanned="3" office:value-type="string" office:string-value="YES" table:formula="of:=[.A981]">
            <text:p>YES</text:p>
          </table:table-cell>
          <table:covered-table-cell/>
          <table:covered-table-cell/>
          <table:table-cell table:style-name="ce54" table:number-columns-spanned="3" office:value-type="string" office:string-value="YES" table:formula="of:=[.E981]">
            <text:p>YES</text:p>
          </table:table-cell>
          <table:covered-table-cell/>
          <table:covered-table-cell/>
          <table:table-cell table:style-name="ce54" table:number-columns-spanned="3" office:value-type="string" office:string-value="GRANTED" table:formula="of:=[.P984]">
            <text:p>GRANTED</text:p>
          </table:table-cell>
          <table:covered-table-cell/>
          <table:covered-table-cell/>
          <table:table-cell table:style-name="ce54" table:number-columns-spanned="3" office:value-type="string" office:string-value="COMPLETED" table:formula="of:=[.J993]">
            <text:p>COMPLETED</text:p>
          </table:table-cell>
          <table:covered-table-cell/>
          <table:covered-table-cell/>
          <table:table-cell table:style-name="ce54" table:number-columns-spanned="3" office:value-type="string" office:string-value="SETTLED" table:formula="of:=IF(AND(UPPER(TRIM([.A996]))=&quot;YES&quot;;UPPER(TRIM([.D996]))=&quot;YES&quot;;UPPER(TRIM([.G996]))=&quot;YES&quot;;UPPER(TRIM([.J996]))=&quot;GRANTED&quot;;UPPER(TRIM([.M996]))=&quot;COMPLETED&quot;);&quot;SETTLED&quot;;&quot;NOT SETTLED&quot;)">
            <text:p>SETTLED</text:p>
          </table:table-cell>
          <table:covered-table-cell/>
          <table:covered-table-cell/>
        </table:table-row>
        <table:table-row table:style-name="ro5">
          <table:table-cell table:style-name="ce54" table:number-columns-spanned="18" office:value-type="string" office:string-value="VERIFIED SETTLEMENT → SETTLED REQUIRES EXPLICIT REQUEST + VALID ELIGIBILITY + GRANTED AUTHORITY + EXECUTION COMMIT + CONTROLLED WRITE + APPEND-ONLY HISTORY + POST-WRITE VERIFICATION · REPLAY MUST NOT CREATE A SECOND WRITE · BUILD 600 CREATES NO TAX AUTHORITY">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CLOSE ELIGIBILITY · BUILDS 601–610">
            <text:p>🔐 CONTROLLED CLOSE ELIGIBILITY · BUILDS 601–6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CLOSE QUESTION">
            <text:p>CLOS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UTHORITATIVE SETTLED STATE BECOME CLOSED?">
            <text:p>MAY AUTHORITATIVE SETTLED STATE BECOME CLOSED?</text:p>
          </table:table-cell>
          <table:covered-table-cell/>
          <table:covered-table-cell/>
          <table:covered-table-cell/>
          <table:covered-table-cell/>
          <table:covered-table-cell/>
          <table:table-cell table:style-name="ce54" table:number-columns-spanned="6" office:value-type="string" office:string-value="SETTLED STATE + FINANCIAL TRUTH + VERIFIED SETTLEMENT + EXPLICIT CLOSE CONTROL">
            <text:p>SETTLED STATE + FINANCIAL TRUTH + VERIFIED SETTLEMENT + EXPLICIT CLOSE CONTROL</text:p>
          </table:table-cell>
          <table:covered-table-cell/>
          <table:covered-table-cell/>
          <table:covered-table-cell/>
          <table:covered-table-cell/>
          <table:covered-table-cell/>
          <table:table-cell table:style-name="ce54" table:number-columns-spanned="6" office:value-type="string" office:string-value="SETTLED ≠ CLOSED · VERIFIED FINANCIAL TRUTH ≠ CLOSE AUTHORITY">
            <text:p>SETTLED ≠ CLOSED · VERIFIED FINANCIAL TRUTH ≠ CLOSE AUTHORITY</text:p>
          </table:table-cell>
          <table:covered-table-cell/>
          <table:covered-table-cell/>
          <table:covered-table-cell/>
          <table:covered-table-cell/>
          <table:covered-table-cell/>
        </table:table-row>
        <table:table-row table:style-name="ro5">
          <table:table-cell table:style-name="ce53" table:number-columns-spanned="4" office:value-type="string" office:string-value="SETTLED STATE VALID">
            <text:p>SETTLED STATE VALID</text:p>
          </table:table-cell>
          <table:covered-table-cell/>
          <table:covered-table-cell/>
          <table:covered-table-cell/>
          <table:table-cell table:style-name="ce53" table:number-columns-spanned="5" office:value-type="string" office:string-value="FINANCIAL TRUTH VALID">
            <text:p>FINANCIAL TRUTH VALID</text:p>
          </table:table-cell>
          <table:covered-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5" office:value-type="string" office:string-value="CLOSE ELIGIBILITY">
            <text:p>CLOSE ELIGIBILITY</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5" office:value-type="string" office:string-value="YES" table:formula="of:=IF(UPPER(TRIM([.P955]))=&quot;FINANCIAL TRUTH VERIFIED&quot;;&quot;YES&quot;;&quot;NO&quot;)">
            <text:p>YES</text:p>
          </table:table-cell>
          <table:covered-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ELIGIBLE" table:formula="of:=IF(AND(UPPER(TRIM([.A1001]))=&quot;YES&quot;;UPPER(TRIM([.E1001]))=&quot;YES&quot;;UPPER(TRIM([.J1001]))=&quot;YES&quot;);&quot;ELIGIBLE&quot;;&quot;NOT ELIGIBLE&quot;)">
            <text:p>ELIGIBLE</text:p>
          </table:table-cell>
          <table:covered-table-cell/>
          <table:covered-table-cell/>
          <table:covered-table-cell/>
          <table:covered-table-cell/>
        </table:table-row>
        <table:table-row table:style-name="ro5">
          <table:table-cell table:style-name="ce52" table:number-columns-spanned="18" office:value-type="string" office:string-value="📥 EXPLICIT CLOSE REQUEST · BUILDS 611–620">
            <text:p>📥 EXPLICIT CLOSE REQUEST · BUILDS 611–6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SETTLED → CLOSED">
            <text:p>SETTLED → CLOS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5" office:value-type="string" office:string-value="YES" table:formula="of:=IF(UPPER(TRIM([.F1004]))=&quot;SETTLED → CLOSED&quot;;&quot;YES&quot;;&quot;NO&quot;)">
            <text:p>YES</text:p>
          </table:table-cell>
          <table:covered-table-cell/>
          <table:covered-table-cell/>
          <table:covered-table-cell/>
          <table:covered-table-cell/>
          <table:table-cell table:style-name="ce54" table:number-columns-spanned="4" office:value-type="string" office:string-value="YES" table:formula="of:=IF(TRIM([.N1004])&lt;&gt;&quot;&quot;;&quot;YES&quot;;&quot;NO&quot;)">
            <text:p>YES</text:p>
          </table:table-cell>
          <table:covered-table-cell/>
          <table:covered-table-cell/>
          <table:covered-table-cell/>
          <table:table-cell table:style-name="ce54" table:number-columns-spanned="5" office:value-type="string" office:string-value="VALID REQUEST" table:formula="of:=IF(AND(UPPER(TRIM([.A1006]))=&quot;YES&quot;;UPPER(TRIM([.E1006]))=&quot;YES&quot;;UPPER(TRIM([.J1006]))=&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CLOSE TRANSITION AUTHORITY · BUILDS 621–630">
            <text:p>🛡️ CLOSE TRANSITION AUTHORITY · BUILDS 621–6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CLOSE ELIGIBILITY VALID">
            <text:p>CLOSE ELIGIBILITY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4" office:value-type="string" office:string-value="YES" table:formula="of:=IF(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N1004]))=&quot;MARK · OPERATOR&quot;;&quot;YES&quot;;&quot;NO&quot;)">
            <text:p>YES</text:p>
          </table:table-cell>
          <table:covered-table-cell/>
          <table:covered-table-cell/>
          <table:table-cell table:style-name="ce54" table:number-columns-spanned="3" office:value-type="string" office:string-value="GRANTED" table:formula="of:=IF(AND(UPPER(TRIM([.A1009]))=&quot;YES&quot;;UPPER(TRIM([.E1009]))=&quot;YES&quot;;UPPER(TRIM([.I1009]))=&quot;YES&quot;;UPPER(TRIM([.M1009]))=&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CLOSED STATE WRITE · BUILDS 631–640">
            <text:p>⚙️ EXECUTION COMMIT + CONTROLLED CLOSED STATE WRITE · BUILDS 631–6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CLOSE TRANSITION">
            <text:p>EXECUTE CLOSE TRANSITION</text:p>
          </table:table-cell>
          <table:covered-table-cell/>
          <table:covered-table-cell/>
          <table:covered-table-cell/>
          <table:table-cell table:style-name="ce54" table:number-columns-spanned="4" office:value-type="string" office:string-value="YES" table:formula="of:=IF(UPPER(TRIM([.P1009]))=&quot;GRANTED&quot;;&quot;YES&quot;;&quot;NO&quot;)">
            <text:p>YES</text:p>
          </table:table-cell>
          <table:covered-table-cell/>
          <table:covered-table-cell/>
          <table:covered-table-cell/>
          <table:table-cell table:style-name="ce54" table:number-columns-spanned="4" office:value-type="string" office:string-value="YES" table:formula="of:=IF(AND(UPPER(TRIM([.E1012]))=&quot;YES&quot;;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I1012]))=&quot;YES&quot;;&quot;YES&quot;;&quot;NO&quot;)">
            <text:p>YES</text:p>
          </table:table-cell>
          <table:covered-table-cell/>
          <table:covered-table-cell/>
          <table:table-cell table:style-name="ce54" table:number-columns-spanned="3" office:value-type="string" office:string-value="CLOSED" table:formula="of:=IF(UPPER(TRIM([.M1012]))=&quot;YES&quot;;&quot;CLOSED&quot;;&quot;NO STATE WRITE&quot;)">
            <text:p>CLOSED</text:p>
          </table:table-cell>
          <table:covered-table-cell/>
          <table:covered-table-cell/>
        </table:table-row>
        <table:table-row table:style-name="ro5">
          <table:table-cell table:style-name="ce52" table:number-columns-spanned="18" office:value-type="string" office:string-value="📜 APPEND-ONLY CLOSE TRANSITION HISTORY · BUILDS 641–650">
            <text:p>📜 APPEND-ONLY CLOSE TRANSITION HISTORY · BUILDS 641–6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5">
            <text:p>TRN-000005</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CLOSED">
            <text:p>CLOS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651–659">
            <text:p>🔍 POST-WRITE VERIFICATION + REPLAY PROTECTION · BUILDS 651–6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12]))=&quot;YES&quot;;&quot;YES&quot;;&quot;NO&quot;)">
            <text:p>YES</text:p>
          </table:table-cell>
          <table:covered-table-cell/>
          <table:covered-table-cell/>
          <table:table-cell table:style-name="ce54" table:number-columns-spanned="3" office:value-type="string" office:string-value="YES" table:formula="of:=IF(AND(UPPER(TRIM([.D1015]))=&quot;INV-000001&quot;;UPPER(TRIM([.J1015]))=&quot;CLOSED&quot;);&quot;YES&quot;;&quot;NO&quot;)">
            <text:p>YES</text:p>
          </table:table-cell>
          <table:covered-table-cell/>
          <table:covered-table-cell/>
          <table:table-cell table:style-name="ce54" table:number-columns-spanned="3" office:value-type="string" office:string-value="YES" table:formula="of:=IF(UPPER(TRIM([.P1012]))=UPPER(TRIM([.J1015]));&quot;YES&quot;;&quot;NO&quot;)">
            <text:p>YES</text:p>
          </table:table-cell>
          <table:covered-table-cell/>
          <table:covered-table-cell/>
          <table:table-cell table:style-name="ce54" table:number-columns-spanned="3" office:value-type="string" office:string-value="COMPLETED" table:formula="of:=IF(AND(UPPER(TRIM([.A1018]))=&quot;YES&quot;;UPPER(TRIM([.D1018]))=&quot;YES&quot;;UPPER(TRIM([.G1018]))=&quot;YES&quot;);&quot;COMPLETED&quot;;&quot;INCOMPLETE&quot;)">
            <text:p>COMPLETED</text:p>
          </table:table-cell>
          <table:covered-table-cell/>
          <table:covered-table-cell/>
          <table:table-cell table:style-name="ce54" table:number-columns-spanned="3" office:value-type="string" office:string-value="ALREADY EXECUTED" table:formula="of:=IF(UPPER(TRIM([.J1018]))=&quot;COMPLETED&quot;;&quot;ALREADY EXECUTED&quot;;&quot;NOT EXECUTED&quot;)">
            <text:p>ALREADY EXECUTED</text:p>
          </table:table-cell>
          <table:covered-table-cell/>
          <table:covered-table-cell/>
          <table:table-cell table:style-name="ce54" table:number-columns-spanned="3" office:value-type="string" office:string-value="NO" table:formula="of:=IF(UPPER(TRIM([.M1018]))=&quot;ALREADY EXECUTED&quot;;&quot;NO&quot;;&quot;YES&quot;)">
            <text:p>NO</text:p>
          </table:table-cell>
          <table:covered-table-cell/>
          <table:covered-table-cell/>
        </table:table-row>
        <table:table-row table:style-name="ro5">
          <table:table-cell table:style-name="ce52" table:number-columns-spanned="18" office:value-type="string" office:string-value="🏁 CONTROLLED CLOSED TRANSITION EXECUTION GATE · BUILD 660">
            <text:p>🏁 CONTROLLED CLOSED TRANSITION EXECUTION GATE · BUILD 6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D STATE">
            <text:p>SETTLED STATE</text:p>
          </table:table-cell>
          <table:covered-table-cell/>
          <table:covered-table-cell/>
          <table:table-cell table:style-name="ce53" table:number-columns-spanned="3" office:value-type="string" office:string-value="CLOSE ELIGIBILITY">
            <text:p>CLOSE 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A1001]">
            <text:p>YES</text:p>
          </table:table-cell>
          <table:covered-table-cell/>
          <table:covered-table-cell/>
          <table:table-cell table:style-name="ce54" table:number-columns-spanned="3" office:value-type="string" office:string-value="ELIGIBLE" table:formula="of:=[.N1001]">
            <text:p>ELIGIBLE</text:p>
          </table:table-cell>
          <table:covered-table-cell/>
          <table:covered-table-cell/>
          <table:table-cell table:style-name="ce54" table:number-columns-spanned="3" office:value-type="string" office:string-value="VALID REQUEST" table:formula="of:=[.N1006]">
            <text:p>VALID REQUEST</text:p>
          </table:table-cell>
          <table:covered-table-cell/>
          <table:covered-table-cell/>
          <table:table-cell table:style-name="ce54" table:number-columns-spanned="3" office:value-type="string" office:string-value="GRANTED" table:formula="of:=[.P1009]">
            <text:p>GRANTED</text:p>
          </table:table-cell>
          <table:covered-table-cell/>
          <table:covered-table-cell/>
          <table:table-cell table:style-name="ce54" table:number-columns-spanned="3" office:value-type="string" office:string-value="COMPLETED" table:formula="of:=[.J1018]">
            <text:p>COMPLETED</text:p>
          </table:table-cell>
          <table:covered-table-cell/>
          <table:covered-table-cell/>
          <table:table-cell table:style-name="ce54" table:number-columns-spanned="3" office:value-type="string" office:string-value="CLOSED" table:formula="of:=IF(AND(UPPER(TRIM([.A1021]))=&quot;YES&quot;;UPPER(TRIM([.D1021]))=&quot;ELIGIBLE&quot;;UPPER(TRIM([.G1021]))=&quot;VALID REQUEST&quot;;UPPER(TRIM([.J1021]))=&quot;GRANTED&quot;;UPPER(TRIM([.M1021]))=&quot;COMPLETED&quot;);&quot;CLOSED&quot;;&quot;NOT CLOSED&quot;)">
            <text:p>CLOSED</text:p>
          </table:table-cell>
          <table:covered-table-cell/>
          <table:covered-table-cell/>
        </table:table-row>
        <table:table-row table:style-name="ro5">
          <table:table-cell table:style-name="ce54" table:number-columns-spanned="18" office:value-type="string" office:string-value="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LOSED INVENTORY RECONCILIATION INTAKE · BUILDS 661–670">
            <text:p>📦 CLOSED INVENTORY RECONCILIATION INTAKE · BUILDS 661–6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RECONCILIATION QUESTION">
            <text:p>RECONCILIA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CLOSED LIFECYCLE RECONCILE AUTHORITATIVE INVENTORY QUANTITY?">
            <text:p>MAY CLOSED LIFECYCLE RECONCILE AUTHORITATIVE INVENTORY QUANTITY?</text:p>
          </table:table-cell>
          <table:covered-table-cell/>
          <table:covered-table-cell/>
          <table:covered-table-cell/>
          <table:covered-table-cell/>
          <table:covered-table-cell/>
          <table:table-cell table:style-name="ce54" table:number-columns-spanned="6" office:value-type="string" office:string-value="CLOSED STATE + RECORD IDENTITY + QUANTITY EVIDENCE + SALE EVIDENCE">
            <text:p>CLOSED STATE + RECORD IDENTITY + QUANTITY EVIDENCE + SALE EVIDENCE</text:p>
          </table:table-cell>
          <table:covered-table-cell/>
          <table:covered-table-cell/>
          <table:covered-table-cell/>
          <table:covered-table-cell/>
          <table:covered-table-cell/>
          <table:table-cell table:style-name="ce54" table:number-columns-spanned="6" office:value-type="string" office:string-value="CLOSED ≠ QUANTITY WRITE · RECONCILIATION MUST PROVE DEPLETION">
            <text:p>CLOSED ≠ QUANTITY WRITE · RECONCILIATION MUST PROVE DEPLETION</text:p>
          </table: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CLOSED STATE VALID">
            <text:p>CLOSED STATE VALID</text:p>
          </table:table-cell>
          <table:covered-table-cell/>
          <table:covered-table-cell/>
          <table:table-cell table:style-name="ce53" table:number-columns-spanned="3" office:value-type="string" office:string-value="UNIT COST BASIS">
            <text:p>UNIT COST BASIS</text:p>
          </table:table-cell>
          <table:covered-table-cell/>
          <table:covered-table-cell/>
          <table:table-cell table:style-name="ce53" table:number-columns-spanned="3" office:value-type="string" office:string-value="ORIGINAL QUANTITY">
            <text:p>ORIGINAL QUANTITY</text:p>
          </table:table-cell>
          <table:covered-table-cell/>
          <table:covered-table-cell/>
          <table:table-cell table:style-name="ce53" table:number-columns-spanned="3" office:value-type="string" office:string-value="QUANTITY SOLD">
            <text:p>QUANTITY SOLD</text:p>
          </table:table-cell>
          <table:covered-table-cell/>
          <table:covered-table-cell/>
          <table:table-cell table:style-name="ce53" table:number-columns-spanned="3" office:value-type="string" office:string-value="RECONCILIATION INTAKE">
            <text:p>RECONCILIATION INTAKE</text:p>
          </table:table-cell>
          <table:covered-table-cell/>
          <table:covered-table-cell/>
        </table:table-row>
        <table:table-row table:style-name="ro21">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able:formula="of:=IF(UPPER(TRIM([.P1018]))=&quot;CLOSED&quot;;&quot;YES&quot;;&quot;NO&quot;)">
            <text:p>YES</text:p>
          </table:table-cell>
          <table:covered-table-cell/>
          <table:covered-table-cell/>
          <table:table-cell table:style-name="ce54" table:number-columns-spanned="3" office:value-type="string" office:string-value="50.00">
            <text:p>50.00</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RECEIVED" table:formula="of:=IF(AND(UPPER(TRIM([.D1025]))=&quot;YES&quot;;VALUE([.J1025])&gt;=0;VALUE([.M1025])&gt;=0);&quot;RECEIVED&quot;;&quot;REJECTED&quot;)">
            <text:p>RECEIVED</text:p>
          </table:table-cell>
          <table:covered-table-cell/>
          <table:covered-table-cell/>
        </table:table-row>
        <table:table-row table:style-name="ro5">
          <table:table-cell table:style-name="ce52" table:number-columns-spanned="18" office:value-type="string" office:string-value="📉 SOLD QUANTITY DEPLETION · BUILDS 671–680">
            <text:p>📉 SOLD QUANTITY DEPLETION · BUILDS 671–6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MATCH">
            <text:p>RECORD MATCH</text:p>
          </table:table-cell>
          <table:covered-table-cell/>
          <table:covered-table-cell/>
          <table:covered-table-cell/>
          <table:table-cell table:style-name="ce53" table:number-columns-spanned="5" office:value-type="string" office:string-value="SALE STATUS VALID">
            <text:p>SALE STATUS VALID</text:p>
          </table:table-cell>
          <table:covered-table-cell/>
          <table:covered-table-cell/>
          <table:covered-table-cell/>
          <table:covered-table-cell/>
          <table:table-cell table:style-name="ce53" table:number-columns-spanned="4" office:value-type="string" office:string-value="QUANTITY SOLD VALID">
            <text:p>QUANTITY SOLD VALID</text:p>
          </table:table-cell>
          <table:covered-table-cell/>
          <table:covered-table-cell/>
          <table:covered-table-cell/>
          <table:table-cell table:style-name="ce53" table:number-columns-spanned="5" office:value-type="string" office:string-value="DEPLETION EVIDENCE COMPLETE">
            <text:p>DEPLETION EVIDENCE COMPLETE</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A1025]))=&quot;INV-000001&quot;;&quot;YES&quot;;&quot;NO&quot;)">
            <text:p>YES</text:p>
          </table:table-cell>
          <table:covered-table-cell/>
          <table:covered-table-cell/>
          <table:covered-table-cell/>
          <table:table-cell table:style-name="ce54" table:number-columns-spanned="5" office:value-type="string" office:string-value="YES" table:formula="of:=IF(UPPER(TRIM([.P870]))=&quot;ELIGIBLE&quot;;&quot;YES&quot;;&quot;NO&quot;)">
            <text:p>YES</text:p>
          </table:table-cell>
          <table:covered-table-cell/>
          <table:covered-table-cell/>
          <table:covered-table-cell/>
          <table:covered-table-cell/>
          <table:table-cell table:style-name="ce54" table:number-columns-spanned="4" office:value-type="string" office:string-value="YES" table:formula="of:=IF(VALUE([.M1025])&gt;0;&quot;YES&quot;;&quot;NO&quot;)">
            <text:p>YES</text:p>
          </table:table-cell>
          <table:covered-table-cell/>
          <table:covered-table-cell/>
          <table:covered-table-cell/>
          <table:table-cell table:style-name="ce54" table:number-columns-spanned="5" office:value-type="string" office:string-value="YES" table:formula="of:=IF(AND(UPPER(TRIM([.A1028]))=&quot;YES&quot;;UPPER(TRIM([.E1028]))=&quot;YES&quot;;UPPER(TRIM([.J1028]))=&quot;YES&quot;);&quot;YES&quot;;&quot;NO&quot;)">
            <text:p>YES</text:p>
          </table:table-cell>
          <table:covered-table-cell/>
          <table:covered-table-cell/>
          <table:covered-table-cell/>
          <table:covered-table-cell/>
        </table:table-row>
        <table:table-row table:style-name="ro5">
          <table:table-cell table:style-name="ce52" table:number-columns-spanned="18" office:value-type="string" office:string-value="🧮 REMAINING QUANTITY TRUTH · BUILDS 681–690">
            <text:p>🧮 REMAINING QUANTITY TRUTH · BUILDS 681–6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ORIGINAL QUANTITY">
            <text:p>ORIGINAL QUANTITY</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cell table:style-name="ce53" table:number-columns-spanned="4" office:value-type="string" office:string-value="DERIVED REMAINING QUANTITY">
            <text:p>DERIVED REMAINING QUANTITY</text:p>
          </table:table-cell>
          <table:covered-table-cell/>
          <table:covered-table-cell/>
          <table:covered-table-cell/>
          <table:table-cell table:style-name="ce53" table:number-columns-spanned="3" office:value-type="string" office:string-value="NEGATIVE QUANTITY">
            <text:p>NEGATIVE QUANTITY</text:p>
          </table:table-cell>
          <table:covered-table-cell/>
          <table:covered-table-cell/>
          <table:table-cell table:style-name="ce53" table:number-columns-spanned="3" office:value-type="string" office:string-value="QUANTITY TRUTH">
            <text:p>QUANTITY TRUTH</text:p>
          </table:table-cell>
          <table:covered-table-cell/>
          <table:covered-table-cell/>
        </table:table-row>
        <table:table-row table:style-name="ro21">
          <table:table-cell table:style-name="ce54" table:number-columns-spanned="4" office:value-type="string" office:string-value="1" table:formula="of:=[.J1025]">
            <text:p>1</text:p>
          </table:table-cell>
          <table:covered-table-cell/>
          <table:covered-table-cell/>
          <table:covered-table-cell/>
          <table:table-cell table:style-name="ce54" table:number-columns-spanned="4" office:value-type="string" office:string-value="1" table:formula="of:=[.M1025]">
            <text:p>1</text:p>
          </table:table-cell>
          <table:covered-table-cell/>
          <table:covered-table-cell/>
          <table:covered-table-cell/>
          <table:table-cell table:style-name="ce54" table:number-columns-spanned="4" office:value-type="string" office:string-value="0" table:formula="of:=VALUE([.A1031])-VALUE([.E1031])">
            <text:p>0</text:p>
          </table:table-cell>
          <table:covered-table-cell/>
          <table:covered-table-cell/>
          <table:covered-table-cell/>
          <table:table-cell table:style-name="ce54" table:number-columns-spanned="3" office:value-type="string" office:string-value="NO" table:formula="of:=IF(VALUE([.I1031])&lt;0;&quot;YES&quot;;&quot;NO&quot;)">
            <text:p>NO</text:p>
          </table:table-cell>
          <table:covered-table-cell/>
          <table:covered-table-cell/>
          <table:table-cell table:style-name="ce54" table:number-columns-spanned="3" office:value-type="string" office:string-value="VERIFIED" table:formula="of:=IF(AND(VALUE([.I1031])&gt;=0;UPPER(TRIM([.M1031]))=&quot;NO&quot;);&quot;VERIFIED&quot;;&quot;INVALID&quot;)">
            <text:p>VERIFIED</text:p>
          </table:table-cell>
          <table:covered-table-cell/>
          <table:covered-table-cell/>
        </table:table-row>
        <table:table-row table:style-name="ro5">
          <table:table-cell table:style-name="ce52" table:number-columns-spanned="18" office:value-type="string" office:string-value="🔗 LIFECYCLE ↔ INVENTORY CROSS-CHECK · BUILDS 691–700">
            <text:p>🔗 LIFECYCLE ↔ INVENTORY CROSS-CHECK · BUILDS 691–7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text:p>CLOSED STATE</text:p>
          </table:table-cell>
          <table:covered-table-cell/>
          <table:covered-table-cell/>
          <table:covered-table-cell/>
          <table:table-cell table:style-name="ce53" table:number-columns-spanned="4" office:value-type="string" office:string-value="RECORD IDENTITY">
            <text:p>RECORD IDENTITY</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DEPLETION COMPLETE">
            <text:p>DEPLETION COMPLETE</text:p>
          </table:table-cell>
          <table:covered-table-cell/>
          <table:covered-table-cell/>
          <table:table-cell table:style-name="ce53" table:number-columns-spanned="3" office:value-type="string" office:string-value="CROSS-CHECK RESULT">
            <text:p>CROSS-CHECK RESULT</text:p>
          </table:table-cell>
          <table:covered-table-cell/>
          <table:covered-table-cell/>
        </table:table-row>
        <table:table-row table:style-name="ro21">
          <table:table-cell table:style-name="ce54" table:number-columns-spanned="4" office:value-type="string" office:string-value="YES" table:formula="of:=[.D1025]">
            <text:p>YES</text:p>
          </table:table-cell>
          <table:covered-table-cell/>
          <table:covered-table-cell/>
          <table:covered-table-cell/>
          <table:table-cell table:style-name="ce54" table:number-columns-spanned="4" office:value-type="string" office:string-value="YES" table:formula="of:=[.A1028]">
            <text:p>YES</text:p>
          </table:table-cell>
          <table:covered-table-cell/>
          <table:covered-table-cell/>
          <table:covered-table-cell/>
          <table:table-cell table:style-name="ce54" table:number-columns-spanned="4" office:value-type="string" office:string-value="YES" table:formula="of:=IF(VALUE([.M1025])=VALUE([.M859]);&quot;YES&quot;;&quot;NO&quot;)">
            <text:p>YES</text:p>
          </table:table-cell>
          <table:covered-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IF(AND(UPPER(TRIM([.A1034]))=&quot;YES&quot;;UPPER(TRIM([.E1034]))=&quot;YES&quot;;UPPER(TRIM([.I1034]))=&quot;YES&quot;;UPPER(TRIM([.M1034]))=&quot;YES&quot;);&quot;VERIFIED&quot;;&quot;FAILED&quot;)">
            <text:p>VERIFIED</text:p>
          </table:table-cell>
          <table:covered-table-cell/>
          <table:covered-table-cell/>
        </table:table-row>
        <table:table-row table:style-name="ro5">
          <table:table-cell table:style-name="ce52" table:number-columns-spanned="18" office:value-type="string" office:string-value="🚨 NEGATIVE QUANTITY FAIL-CLOSE · BUILDS 701–710">
            <text:p>🚨 NEGATIVE QUANTITY FAIL-CLOSE · BUILDS 701–7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EGATIVE DETECTED">
            <text:p>NEGATIVE DETECTED</text:p>
          </table:table-cell>
          <table:covered-table-cell/>
          <table:covered-table-cell/>
          <table:covered-table-cell/>
          <table:table-cell table:style-name="ce53" table:number-columns-spanned="4" office:value-type="string" office:string-value="QUANTITY TRUTH VALID">
            <text:p>QUANTITY TRUTH VALID</text:p>
          </table:table-cell>
          <table:covered-table-cell/>
          <table:covered-table-cell/>
          <table:covered-table-cell/>
          <table:table-cell table:style-name="ce53" table:number-columns-spanned="3" office:value-type="string" office:string-value="WRITE ELIGIBILITY">
            <text:p>WRITE ELIGIBILITY</text:p>
          </table:table-cell>
          <table:covered-table-cell/>
          <table:covered-table-cell/>
          <table:table-cell table:style-name="ce53" table:number-columns-spanned="3" office:value-type="string" office:string-value="FAIL-CLOSE RESULT">
            <text:p>FAIL-CLOSE RESULT</text:p>
          </table:table-cell>
          <table:covered-table-cell/>
          <table:covered-table-cell/>
        </table:table-row>
        <table:table-row table:style-name="ro21">
          <table:table-cell table:style-name="ce54" table:number-columns-spanned="4" office:value-type="string" office:string-value="0" table:formula="of:=[.I1031]">
            <text:p>0</text:p>
          </table:table-cell>
          <table:covered-table-cell/>
          <table:covered-table-cell/>
          <table:covered-table-cell/>
          <table:table-cell table:style-name="ce54" table:number-columns-spanned="4" office:value-type="string" office:string-value="NO" table:formula="of:=[.M1031]">
            <text:p>NO</text:p>
          </table:table-cell>
          <table:covered-table-cell/>
          <table:covered-table-cell/>
          <table:covered-table-cell/>
          <table:table-cell table:style-name="ce54" table:number-columns-spanned="4" office:value-type="string" office:string-value="YES" table:formula="of:=IF(UPPER(TRIM([.P1031]))=&quot;VERIFIED&quot;;&quot;YES&quot;;&quot;NO&quot;)">
            <text:p>YES</text:p>
          </table:table-cell>
          <table:covered-table-cell/>
          <table:covered-table-cell/>
          <table:covered-table-cell/>
          <table:table-cell table:style-name="ce54" table:number-columns-spanned="3" office:value-type="string" office:string-value="ELIGIBLE" table:formula="of:=IF(AND(VALUE([.A1037])&gt;=0;UPPER(TRIM([.E1037]))=&quot;NO&quot;;UPPER(TRIM([.I1037]))=&quot;YES&quot;);&quot;ELIGIBLE&quot;;&quot;NOT ELIGIBLE&quot;)">
            <text:p>ELIGIBLE</text:p>
          </table:table-cell>
          <table:covered-table-cell/>
          <table:covered-table-cell/>
          <table:table-cell table:style-name="ce54" table:number-columns-spanned="3" office:value-type="string" office:string-value="PASS" table:formula="of:=IF(UPPER(TRIM([.M1037]))=&quot;ELIGIBLE&quot;;&quot;PASS&quot;;&quot;FAIL-CLOSED&quot;)">
            <text:p>PASS</text:p>
          </table:table-cell>
          <table:covered-table-cell/>
          <table:covered-table-cell/>
        </table:table-row>
        <table:table-row table:style-name="ro5">
          <table:table-cell table:style-name="ce52" table:number-columns-spanned="18" office:value-type="string" office:string-value="🔁 REPLAY-SAFE RECONCILIATION · BUILDS 711–719">
            <text:p>🔁 REPLAY-SAFE RECONCILIATION · BUILDS 711–7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ID">
            <text:p>RECONCILIA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DERIVED QUANTITY">
            <text:p>DERIVED QUANTITY</text:p>
          </table:table-cell>
          <table:covered-table-cell/>
          <table:covered-table-cell/>
          <table:table-cell table:style-name="ce53" table:number-columns-spanned="3" office:value-type="string" office:string-value="FIRST RESULT">
            <text:p>FIRST RESULT</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DEPLETION">
            <text:p>SECOND DEPLETION</text:p>
          </table:table-cell>
          <table:covered-table-cell/>
          <table:covered-table-cell/>
        </table:table-row>
        <table:table-row table:style-name="ro21">
          <table:table-cell table:style-name="ce54" table:number-columns-spanned="3" office:value-type="string" office:string-value="REC-000001">
            <text:p>REC-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0" table:formula="of:=[.A1037]">
            <text:p>0</text:p>
          </table:table-cell>
          <table:covered-table-cell/>
          <table:covered-table-cell/>
          <table:table-cell table:style-name="ce54" table:number-columns-spanned="3" office:value-type="string" office:string-value="COMPLETED" table:formula="of:=IF(AND(UPPER(TRIM([.P1034]))=&quot;VERIFIED&quot;;UPPER(TRIM([.P1037]))=&quot;PASS&quot;);&quot;COMPLETED&quot;;&quot;INCOMPLETE&quot;)">
            <text:p>COMPLETED</text:p>
          </table:table-cell>
          <table:covered-table-cell/>
          <table:covered-table-cell/>
          <table:table-cell table:style-name="ce54" table:number-columns-spanned="3" office:value-type="string" office:string-value="ALREADY RECONCILED" table:formula="of:=IF(UPPER(TRIM([.J1040]))=&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40]))=&quot;ALREADY RECONCILED&quot;;&quot;NO&quot;;&quot;YES&quot;)">
            <text:p>NO</text:p>
          </table:table-cell>
          <table:covered-table-cell/>
          <table:covered-table-cell/>
        </table:table-row>
        <table:table-row table:style-name="ro5">
          <table:table-cell table:style-name="ce52" table:number-columns-spanned="18" office:value-type="string" office:string-value="🏁 CONTROLLED INVENTORY RECONCILIATION GATE · BUILD 720">
            <text:p>🏁 CONTROLLED INVENTORY RECONCILIATION GATE · BUILD 7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LOSED STATE">
            <text:p>CLOSED STATE</text:p>
          </table:table-cell>
          <table:covered-table-cell/>
          <table:covered-table-cell/>
          <table:table-cell table:style-name="ce53" table:number-columns-spanned="3" office:value-type="string" office:string-value="DEPLETION EVIDENCE">
            <text:p>DEPLETION EVIDENCE</text:p>
          </table:table-cell>
          <table:covered-table-cell/>
          <table:covered-table-cell/>
          <table:table-cell table:style-name="ce53" table:number-columns-spanned="3" office:value-type="string" office:string-value="QUANTITY TRUTH">
            <text:p>QUANTITY TRUTH</text:p>
          </table:table-cell>
          <table:covered-table-cell/>
          <table:covered-table-cell/>
          <table:table-cell table:style-name="ce53" table:number-columns-spanned="3" office:value-type="string" office:string-value="LIFECYCLE CROSS-CHECK">
            <text:p>LIFECYCLE CROSS-CHECK</text:p>
          </table:table-cell>
          <table:covered-table-cell/>
          <table:covered-table-cell/>
          <table:table-cell table:style-name="ce53" table:number-columns-spanned="3" office:value-type="string" office:string-value="FAIL-CLOSE">
            <text:p>FAIL-CLOSE</text:p>
          </table:table-cell>
          <table:covered-table-cell/>
          <table:covered-table-cell/>
          <table:table-cell table:style-name="ce53" table:number-columns-spanned="3" office:value-type="string" office:string-value="RECONCILIATION RESULT">
            <text:p>RECONCILIATION RESULT</text:p>
          </table:table-cell>
          <table:covered-table-cell/>
          <table:covered-table-cell/>
        </table:table-row>
        <table:table-row table:style-name="ro21">
          <table:table-cell table:style-name="ce54" table:number-columns-spanned="3" office:value-type="string" office:string-value="YES" table:formula="of:=[.D1025]">
            <text:p>YES</text:p>
          </table: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P1031]">
            <text:p>VERIFIED</text:p>
          </table:table-cell>
          <table:covered-table-cell/>
          <table:covered-table-cell/>
          <table:table-cell table:style-name="ce54" table:number-columns-spanned="3" office:value-type="string" office:string-value="VERIFIED" table:formula="of:=[.P1034]">
            <text:p>VERIFIED</text:p>
          </table:table-cell>
          <table:covered-table-cell/>
          <table:covered-table-cell/>
          <table:table-cell table:style-name="ce54" table:number-columns-spanned="3" office:value-type="string" office:string-value="PASS" table:formula="of:=[.P1037]">
            <text:p>PASS</text:p>
          </table:table-cell>
          <table:covered-table-cell/>
          <table:covered-table-cell/>
          <table:table-cell table:style-name="ce54" table:number-columns-spanned="3" office:value-type="string" office:string-value="RECONCILED" table:formula="of:=IF(AND(UPPER(TRIM([.A1043]))=&quot;YES&quot;;UPPER(TRIM([.D1043]))=&quot;YES&quot;;UPPER(TRIM([.G1043]))=&quot;VERIFIED&quot;;UPPER(TRIM([.J1043]))=&quot;VERIFIED&quot;;UPPER(TRIM([.M1043]))=&quot;PASS&quot;);&quot;RECONCILED&quot;;&quot;NOT RECONCILED&quot;)">
            <text:p>RECONCILED</text:p>
          </table:table-cell>
          <table:covered-table-cell/>
          <table:covered-table-cell/>
        </table:table-row>
        <table:table-row table:style-name="ro5">
          <table:table-cell table:style-name="ce54" table:number-columns-spanned="18" office:value-type="string" office:string-value="CLOSED LIFECYCLE MAY DERIVE RECONCILIATION ONLY THROUGH MATCHED RECORD IDENTITY + VERIFIED SALE QUANTITY + NONNEGATIVE REMAINING QUANTITY + LIFECYCLE CROSS-CHECK + FAIL-CLOSE PROTECTION · REPLAY MUST NOT CREATE SECOND DEPLETION · BUILD 720 CREATES NO ADJUSTMENT AUTHORITY">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EXPLICIT RECONCILIATION REQUEST · BUILDS 721–730">
            <text:p>📥 EXPLICIT RECONCILIATION REQUEST · BUILDS 721–7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CONCILED QUANTITY WRITE">
            <text:p>RECONCILED QUANTITY WRITE</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RECONCILIATION VALID">
            <text:p>RECONCILIATION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1043]))=&quot;RECONCILED&quot;;&quot;YES&quot;;&quot;NO&quot;)">
            <text:p>YES</text:p>
          </table:table-cell>
          <table:covered-table-cell/>
          <table:covered-table-cell/>
          <table:covered-table-cell/>
          <table:table-cell table:style-name="ce54" table:number-columns-spanned="5" office:value-type="string" office:string-value="YES" table:formula="of:=IF(UPPER(TRIM([.F1048]))=&quot;RECONCILED QUANTITY WRITE&quot;;&quot;YES&quot;;&quot;NO&quot;)">
            <text:p>YES</text:p>
          </table:table-cell>
          <table:covered-table-cell/>
          <table:covered-table-cell/>
          <table:covered-table-cell/>
          <table:covered-table-cell/>
          <table:table-cell table:style-name="ce54" table:number-columns-spanned="4" office:value-type="string" office:string-value="YES" table:formula="of:=IF(TRIM([.N1048])&lt;&gt;&quot;&quot;;&quot;YES&quot;;&quot;NO&quot;)">
            <text:p>YES</text:p>
          </table:table-cell>
          <table:covered-table-cell/>
          <table:covered-table-cell/>
          <table:covered-table-cell/>
          <table:table-cell table:style-name="ce54" table:number-columns-spanned="5" office:value-type="string" office:string-value="VALID REQUEST" table:formula="of:=IF(AND(UPPER(TRIM([.A1050]))=&quot;YES&quot;;UPPER(TRIM([.E1050]))=&quot;YES&quot;;UPPER(TRIM([.J1050]))=&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RECONCILIATION ADJUSTMENT AUTHORITY · BUILDS 731–740">
            <text:p>🛡️ RECONCILIATION ADJUSTMENT AUTHORITY · BUILDS 731–7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VALID">
            <text:p>CLOSED STATE VALID</text:p>
          </table:table-cell>
          <table:covered-table-cell/>
          <table:covered-table-cell/>
          <table:covered-table-cell/>
          <table:table-cell table:style-name="ce53" table:number-columns-spanned="4" office:value-type="string" office:string-value="RECONCILIATION VALID">
            <text:p>RECONCILI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1018]))=&quot;CLOSED&quot;;&quot;YES&quot;;&quot;NO&quot;)">
            <text:p>YES</text:p>
          </table:table-cell>
          <table:covered-table-cell/>
          <table:covered-table-cell/>
          <table:covered-table-cell/>
          <table:table-cell table:style-name="ce54" table:number-columns-spanned="4" office:value-type="string" office:string-value="YES" table:formula="of:=IF(UPPER(TRIM([.P1043]))=&quot;RECONCILED&quot;;&quot;YES&quot;;&quot;NO&quot;)">
            <text:p>YES</text:p>
          </table:table-cell>
          <table:covered-table-cell/>
          <table:covered-table-cell/>
          <table:covered-table-cell/>
          <table:table-cell table:style-name="ce54" table:number-columns-spanned="4" office:value-type="string" office:string-value="YES" table:formula="of:=IF(UPPER(TRIM([.N1050]))=&quot;VALID REQUEST&quot;;&quot;YES&quot;;&quot;NO&quot;)">
            <text:p>YES</text:p>
          </table:table-cell>
          <table:covered-table-cell/>
          <table:covered-table-cell/>
          <table:covered-table-cell/>
          <table:table-cell table:style-name="ce54" table:number-columns-spanned="3" office:value-type="string" office:string-value="YES" table:formula="of:=IF(UPPER(TRIM([.N1048]))=&quot;MARK · OPERATOR&quot;;&quot;YES&quot;;&quot;NO&quot;)">
            <text:p>YES</text:p>
          </table:table-cell>
          <table:covered-table-cell/>
          <table:covered-table-cell/>
          <table:table-cell table:style-name="ce54" table:number-columns-spanned="3" office:value-type="string" office:string-value="GRANTED" table:formula="of:=IF(AND(UPPER(TRIM([.A1053]))=&quot;YES&quot;;UPPER(TRIM([.E1053]))=&quot;YES&quot;;UPPER(TRIM([.I1053]))=&quot;YES&quot;;UPPER(TRIM([.M1053]))=&quot;YES&quot;);&quot;GRANTED&quot;;&quot;DENIED&quot;)">
            <text:p>GRANTED</text:p>
          </table:table-cell>
          <table:covered-table-cell/>
          <table:covered-table-cell/>
        </table:table-row>
        <table:table-row table:style-name="ro5">
          <table:table-cell table:style-name="ce52" table:number-columns-spanned="18" office:value-type="string" office:string-value="🔍 AUTHORIZED QUANTITY ADJUSTMENT VALIDATION · BUILDS 741–750">
            <text:p>🔍 AUTHORIZED QUANTITY ADJUSTMENT VALIDATION · BUILDS 741–7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ONNEGATIVE">
            <text:p>NONNEGATIVE</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ADJUSTMENT VALID">
            <text:p>ADJUSTMENT VALID</text:p>
          </table:table-cell>
          <table:covered-table-cell/>
          <table:covered-table-cell/>
        </table:table-row>
        <table:table-row table:style-name="ro21">
          <table:table-cell table:style-name="ce54" table:number-columns-spanned="4" office:value-type="string" office:string-value="0" table:formula="of:=[.A1037]">
            <text:p>0</text:p>
          </table:table-cell>
          <table:covered-table-cell/>
          <table:covered-table-cell/>
          <table:covered-table-cell/>
          <table:table-cell table:style-name="ce54" table:number-columns-spanned="4" office:value-type="string" office:string-value="YES" table:formula="of:=IF(VALUE([.A1056])&gt;=0;&quot;YES&quot;;&quot;NO&quot;)">
            <text:p>YES</text:p>
          </table:table-cell>
          <table:covered-table-cell/>
          <table:covered-table-cell/>
          <table:covered-table-cell/>
          <table:table-cell table:style-name="ce54" table:number-columns-spanned="4" office:value-type="string" office:string-value="YES" table:formula="of:=[.I1034]">
            <text:p>YES</text:p>
          </table:table-cell>
          <table:covered-table-cell/>
          <table:covered-table-cell/>
          <table:covered-table-cell/>
          <table:table-cell table:style-name="ce54" table:number-columns-spanned="3" office:value-type="string" office:string-value="YES" table:formula="of:=IF(UPPER(TRIM([.P1053]))=&quot;GRANTED&quot;;&quot;YES&quot;;&quot;NO&quot;)">
            <text:p>YES</text:p>
          </table:table-cell>
          <table:covered-table-cell/>
          <table:covered-table-cell/>
          <table:table-cell table:style-name="ce54" table:number-columns-spanned="3" office:value-type="string" office:string-value="YES" table:formula="of:=IF(AND(UPPER(TRIM([.E1056]))=&quot;YES&quot;;UPPER(TRIM([.I1056]))=&quot;YES&quot;;UPPER(TRIM([.M1056]))=&quot;YES&quot;);&quot;YES&quot;;&quot;NO&quot;)">
            <text:p>YES</text:p>
          </table:table-cell>
          <table:covered-table-cell/>
          <table:covered-table-cell/>
        </table:table-row>
        <table:table-row table:style-name="ro5">
          <table:table-cell table:style-name="ce52" table:number-columns-spanned="18" office:value-type="string" office:string-value="⚙️ CONTROLLED QUANTITY WRITE · BUILDS 751–760">
            <text:p>⚙️ CONTROLLED QUANTITY WRITE · BUILDS 751–7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QUANTITY WRITE">
            <text:p>CONTROLLED QUANTITY WRITE</text:p>
          </table:table-cell>
          <table:covered-table-cell/>
          <table:covered-table-cell/>
          <table:table-cell table:style-name="ce53" table:number-columns-spanned="3" office:value-type="string" office:string-value="DERIVED QUANTITY">
            <text:p>DERIVED QUANTITY</text:p>
          </table:table-cell>
          <table:covered-table-cell/>
          <table:covered-table-cell/>
        </table:table-row>
        <table:table-row table:style-name="ro21">
          <table:table-cell table:style-name="ce54" table:number-columns-spanned="4" office:value-type="string" office:string-value="EXECUTE RECONCILIATION">
            <text:p>EXECUTE RECONCILIATION</text:p>
          </table:table-cell>
          <table:covered-table-cell/>
          <table:covered-table-cell/>
          <table:covered-table-cell/>
          <table:table-cell table:style-name="ce54" table:number-columns-spanned="4" office:value-type="string" office:string-value="YES" table:formula="of:=IF(UPPER(TRIM([.P1053]))=&quot;GRANTED&quot;;&quot;YES&quot;;&quot;NO&quot;)">
            <text:p>YES</text:p>
          </table:table-cell>
          <table:covered-table-cell/>
          <table:covered-table-cell/>
          <table:covered-table-cell/>
          <table:table-cell table:style-name="ce54" table:number-columns-spanned="4" office:value-type="string" office:string-value="YES" table:formula="of:=IF(AND(UPPER(TRIM([.E1059]))=&quot;YES&quot;;UPPER(TRIM([.P1056]))=&quot;YES&quot;);&quot;YES&quot;;&quot;NO&quot;)">
            <text:p>YES</text:p>
          </table:table-cell>
          <table:covered-table-cell/>
          <table:covered-table-cell/>
          <table:covered-table-cell/>
          <table:table-cell table:style-name="ce54" table:number-columns-spanned="3" office:value-type="string" office:string-value="YES" table:formula="of:=IF(UPPER(TRIM([.I1059]))=&quot;YES&quot;;&quot;YES&quot;;&quot;NO&quot;)">
            <text:p>YES</text:p>
          </table:table-cell>
          <table:covered-table-cell/>
          <table:covered-table-cell/>
          <table:table-cell table:style-name="ce54" table:number-columns-spanned="3" office:value-type="string" office:string-value="0" table:formula="of:=IF(UPPER(TRIM([.M1059]))=&quot;YES&quot;;[.A1056];&quot;NO WRITE&quot;)">
            <text:p>0</text:p>
          </table:table-cell>
          <table:covered-table-cell/>
          <table:covered-table-cell/>
        </table:table-row>
        <table:table-row table:style-name="ro5">
          <table:table-cell table:style-name="ce52" table:number-columns-spanned="18" office:value-type="string" office:string-value="📜 APPEND-ONLY RECONCILIATION HISTORY · BUILDS 761–770">
            <text:p>📜 APPEND-ONLY RECONCILIATION HISTORY · BUILDS 761–7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DJUSTMENT ID">
            <text:p>ADJUSTMENT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QUANTITY">
            <text:p>FROM QUANTITY</text:p>
          </table:table-cell>
          <table:covered-table-cell/>
          <table:covered-table-cell/>
          <table:table-cell table:style-name="ce53" table:number-columns-spanned="3" office:value-type="string" office:string-value="TO QUANTITY">
            <text:p>TO QUANTITY</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ADJ-000001">
            <text:p>ADJ-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0">
            <text:p>0</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SECOND-WRITE PROTECTION · BUILDS 771–779">
            <text:p>🔁 POST-WRITE VERIFICATION + SECOND-WRITE PROTECTION · BUILDS 771–7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QUANTITY MATCH">
            <text:p>POST-WRITE QUANTITY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59]))=&quot;YES&quot;;&quot;YES&quot;;&quot;NO&quot;)">
            <text:p>YES</text:p>
          </table:table-cell>
          <table:covered-table-cell/>
          <table:covered-table-cell/>
          <table:table-cell table:style-name="ce54" table:number-columns-spanned="3" office:value-type="string" office:string-value="YES" table:formula="of:=IF(AND(UPPER(TRIM([.D1062]))=&quot;INV-000001&quot;;VALUE([.J1062])=VALUE([.P1059]));&quot;YES&quot;;&quot;NO&quot;)">
            <text:p>YES</text:p>
          </table:table-cell>
          <table:covered-table-cell/>
          <table:covered-table-cell/>
          <table:table-cell table:style-name="ce54" table:number-columns-spanned="3" office:value-type="string" office:string-value="YES" table:formula="of:=IF(VALUE([.P1059])=VALUE([.J1062]);&quot;YES&quot;;&quot;NO&quot;)">
            <text:p>YES</text:p>
          </table:table-cell>
          <table:covered-table-cell/>
          <table:covered-table-cell/>
          <table:table-cell table:style-name="ce54" table:number-columns-spanned="3" office:value-type="string" office:string-value="COMPLETED" table:formula="of:=IF(AND(UPPER(TRIM([.A1065]))=&quot;YES&quot;;UPPER(TRIM([.D1065]))=&quot;YES&quot;;UPPER(TRIM([.G1065]))=&quot;YES&quot;);&quot;COMPLETED&quot;;&quot;INCOMPLETE&quot;)">
            <text:p>COMPLETED</text:p>
          </table:table-cell>
          <table:covered-table-cell/>
          <table:covered-table-cell/>
          <table:table-cell table:style-name="ce54" table:number-columns-spanned="3" office:value-type="string" office:string-value="ALREADY RECONCILED" table:formula="of:=IF(UPPER(TRIM([.J1065]))=&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65]))=&quot;ALREADY RECONCILED&quot;;&quot;NO&quot;;&quot;YES&quot;)">
            <text:p>NO</text:p>
          </table:table-cell>
          <table:covered-table-cell/>
          <table:covered-table-cell/>
        </table:table-row>
        <table:table-row table:style-name="ro5">
          <table:table-cell table:style-name="ce52" table:number-columns-spanned="18" office:value-type="string" office:string-value="🏁 CONTROLLED RECONCILED STATE EXECUTION GATE · BUILD 780">
            <text:p>🏁 CONTROLLED RECONCILED STATE EXECUTION GATE · BUILD 7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text:p>RECONCILIATION</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ADJUSTMENT VALID">
            <text:p>ADJUSTMENT VALID</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QUANTITY STATE">
            <text:p>FINAL QUANTITY STATE</text:p>
          </table:table-cell>
          <table:covered-table-cell/>
          <table:covered-table-cell/>
        </table:table-row>
        <table:table-row table:style-name="ro21">
          <table:table-cell table:style-name="ce54" table:number-columns-spanned="3" office:value-type="string" office:string-value="RECONCILED" table:formula="of:=[.P1043]">
            <text:p>RECONCILED</text:p>
          </table:table-cell>
          <table:covered-table-cell/>
          <table:covered-table-cell/>
          <table:table-cell table:style-name="ce54" table:number-columns-spanned="3" office:value-type="string" office:string-value="VALID REQUEST" table:formula="of:=[.N1050]">
            <text:p>VALID REQUEST</text:p>
          </table:table-cell>
          <table:covered-table-cell/>
          <table:covered-table-cell/>
          <table:table-cell table:style-name="ce54" table:number-columns-spanned="3" office:value-type="string" office:string-value="GRANTED" table:formula="of:=[.P1053]">
            <text:p>GRANTED</text:p>
          </table:table-cell>
          <table:covered-table-cell/>
          <table:covered-table-cell/>
          <table:table-cell table:style-name="ce54" table:number-columns-spanned="3" office:value-type="string" office:string-value="YES" table:formula="of:=[.P1056]">
            <text:p>YES</text:p>
          </table:table-cell>
          <table:covered-table-cell/>
          <table:covered-table-cell/>
          <table:table-cell table:style-name="ce54" table:number-columns-spanned="3" office:value-type="string" office:string-value="COMPLETED" table:formula="of:=[.J1065]">
            <text:p>COMPLETED</text:p>
          </table:table-cell>
          <table:covered-table-cell/>
          <table:covered-table-cell/>
          <table:table-cell table:style-name="ce54" table:number-columns-spanned="3" office:value-type="string" office:string-value="0" table:formula="of:=IF(AND(UPPER(TRIM([.A1068]))=&quot;RECONCILED&quot;;UPPER(TRIM([.D1068]))=&quot;VALID REQUEST&quot;;UPPER(TRIM([.G1068]))=&quot;GRANTED&quot;;UPPER(TRIM([.J1068]))=&quot;YES&quot;;UPPER(TRIM([.M1068]))=&quot;COMPLETED&quot;);[.P1059];&quot;NOT WRITTEN&quot;)">
            <text:p>0</text:p>
          </table:table-cell>
          <table:covered-table-cell/>
          <table:covered-table-cell/>
        </table:table-row>
        <table:table-row table:style-name="ro5">
          <table:table-cell table:style-name="ce54" table:number-columns-spanned="18" office:value-type="string" office:string-value="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ADJUSTMENT TRUTH · BUILDS 781–840">
            <text:p>🧮 INVENTORY ADJUSTMENT TRUTH · BUILDS 781–8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RECONCILED STATE">
            <text:p>RECONCILED STATE</text:p>
          </table:table-cell>
          <table:covered-table-cell/>
          <table:covered-table-cell/>
          <table:table-cell table:style-name="ce53" table:number-columns-spanned="3" office:value-type="string" office:string-value="FINAL QUANTITY">
            <text:p>FINAL QUANTITY</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ADJUSTMENT TRUTH">
            <text:p>ADJUSTMENT TRUTH</text:p>
          </table:table-cell>
          <table:covered-table-cell/>
          <table:covered-table-cell/>
          <table:table-cell table:style-name="ce53" table:number-columns-spanned="3" office:value-type="string" office:string-value="TRUTH RESULT">
            <text:p>TRUTH RESULT</text:p>
          </table:table-cell>
          <table:covered-table-cell/>
          <table:covered-table-cell/>
        </table:table-row>
        <table:table-row table:style-name="ro21">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CONCILED" table:formula="of:=IF(UPPER(TRIM([.A1068]))=&quot;RECONCILED&quot;;&quot;RECONCILED&quot;;&quot;INVALID&quot;)">
            <text:p>RECONCILED</text:p>
          </table:table-cell>
          <table:covered-table-cell/>
          <table:covered-table-cell/>
          <table:table-cell table:style-name="ce54" table:number-columns-spanned="3" office:value-type="string" office:string-value="0" table:formula="of:=[.P1068]">
            <text:p>0</text:p>
          </table:table-cell>
          <table:covered-table-cell/>
          <table:covered-table-cell/>
          <table:table-cell table:style-name="ce54" table:number-columns-spanned="3" office:value-type="string" office:string-value="YES" table:formula="of:=IF(AND(UPPER(TRIM([.D1062]))=&quot;INV-000001&quot;;VALUE([.J1062])=VALUE([.G1072]));&quot;YES&quot;;&quot;NO&quot;)">
            <text:p>YES</text:p>
          </table:table-cell>
          <table:covered-table-cell/>
          <table:covered-table-cell/>
          <table:table-cell table:style-name="ce54" table:number-columns-spanned="3" office:value-type="string" office:string-value="VERIFIED" table:formula="of:=IF(AND(UPPER(TRIM([.D1072]))=&quot;RECONCILED&quot;;VALUE([.G1072])&gt;=0;UPPER(TRIM([.J1072]))=&quot;YES&quot;);&quot;VERIFIED&quot;;&quot;INVALID&quot;)">
            <text:p>VERIFIED</text:p>
          </table:table-cell>
          <table:covered-table-cell/>
          <table:covered-table-cell/>
          <table:table-cell table:style-name="ce54" table:number-columns-spanned="3" office:value-type="string" office:string-value="VERIFIED" table:formula="of:=IF(UPPER(TRIM([.M1072]))=&quot;VERIFIED&quot;;&quot;VERIFIED&quot;;&quot;FAILED&quot;)">
            <text:p>VERIFIED</text:p>
          </table:table-cell>
          <table:covered-table-cell/>
          <table:covered-table-cell/>
        </table:table-row>
        <table:table-row table:style-name="ro5">
          <table:table-cell table:style-name="ce54" table:number-columns-spanned="18" office:value-type="string" office:string-value="ADJUSTMENT TRUTH REQUIRES RECONCILED STATE + NONNEGATIVE FINAL QUANTITY + MATCHED APPEND-ONLY HISTORY">
            <text:p>ADJUSTMENT TRUTH REQUIRES RECONCILED STATE + NONNEGATIVE FINAL QUANTITY + MATCHED APPEND-ONLY HIS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TOCK AVAILABILITY DERIVATION · BUILDS 841–900">
            <text:p>📦 STOCK AVAILABILITY DERIVATION · BUILDS 841–9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QUANTITY">
            <text:p>AUTHORITATIVE QUANTITY</text:p>
          </table:table-cell>
          <table:covered-table-cell/>
          <table:covered-table-cell/>
          <table:table-cell table:style-name="ce53" table:number-columns-spanned="3" office:value-type="string" office:string-value="ACTIVE RESERVATIONS">
            <text:p>ACTIVE RESERVATIONS</text:p>
          </table:table-cell>
          <table:covered-table-cell/>
          <table:covered-table-cell/>
          <table:table-cell table:style-name="ce53" table:number-columns-spanned="3" office:value-type="string" office:string-value="DERIVED AVAILABLE">
            <text:p>DERIVED AVAILABLE</text:p>
          </table:table-cell>
          <table:covered-table-cell/>
          <table:covered-table-cell/>
          <table:table-cell table:style-name="ce53" table:number-columns-spanned="3" office:value-type="string" office:string-value="NONNEGATIVE">
            <text:p>NONNEGATIVE</text:p>
          </table:table-cell>
          <table:covered-table-cell/>
          <table:covered-table-cell/>
          <table:table-cell table:style-name="ce53" table:number-columns-spanned="3" office:value-type="string" office:string-value="DERIVATION VALID">
            <text:p>DERIVATION VALID</text:p>
          </table:table-cell>
          <table:covered-table-cell/>
          <table:covered-table-cell/>
          <table:table-cell table:style-name="ce53" table:number-columns-spanned="3" office:value-type="string" office:string-value="AVAILABILITY RESULT">
            <text:p>AVAILABILITY RESULT</text:p>
          </table:table-cell>
          <table:covered-table-cell/>
          <table:covered-table-cell/>
        </table:table-row>
        <table:table-row table:style-name="ro21">
          <table:table-cell table:style-name="ce54" table:number-columns-spanned="3" office:value-type="string" office:string-value="0" table:formula="of:=[.G1072]">
            <text:p>0</text:p>
          </table:table-cell>
          <table:covered-table-cell/>
          <table:covered-table-cell/>
          <table:table-cell table:style-name="ce54" table:number-columns-spanned="3" office:value-type="string" office:string-value="0">
            <text:p>0</text:p>
          </table:table-cell>
          <table:covered-table-cell/>
          <table:covered-table-cell/>
          <table:table-cell table:style-name="ce54" table:number-columns-spanned="3" office:value-type="string" office:string-value="0" table:formula="of:=VALUE([.A1076])-VALUE([.D1076])">
            <text:p>0</text:p>
          </table:table-cell>
          <table:covered-table-cell/>
          <table:covered-table-cell/>
          <table:table-cell table:style-name="ce54" table:number-columns-spanned="3" office:value-type="string" office:string-value="YES" table:formula="of:=IF(VALUE([.G1076])&gt;=0;&quot;YES&quot;;&quot;NO&quot;)">
            <text:p>YES</text:p>
          </table:table-cell>
          <table:covered-table-cell/>
          <table:covered-table-cell/>
          <table:table-cell table:style-name="ce54" table:number-columns-spanned="3" office:value-type="string" office:string-value="YES" table:formula="of:=IF(AND(UPPER(TRIM([.P1072]))=&quot;VERIFIED&quot;;UPPER(TRIM([.J1076]))=&quot;YES&quot;);&quot;YES&quot;;&quot;NO&quot;)">
            <text:p>YES</text:p>
          </table:table-cell>
          <table:covered-table-cell/>
          <table:covered-table-cell/>
          <table:table-cell table:style-name="ce54" table:number-columns-spanned="3" office:value-type="string" office:string-value="VERIFIED" table:formula="of:=IF(UPPER(TRIM([.M1076]))=&quot;YES&quot;;&quot;VERIFIED&quot;;&quot;INVALID&quot;)">
            <text:p>VERIFIED</text:p>
          </table:table-cell>
          <table:covered-table-cell/>
          <table:covered-table-cell/>
        </table:table-row>
        <table:table-row table:style-name="ro5">
          <table:table-cell table:style-name="ce54" table:number-columns-spanned="18" office:value-type="string" office:string-value="AVAILABLE STOCK IS DERIVED ONLY FROM AUTHORITATIVE QUANTITY LESS ACTIVE RESERVATIONS; NEGATIVE AVAILABILITY FAILS CLOSED">
            <text:p>AVAILABLE STOCK IS DERIVED ONLY FROM AUTHORITATIVE QUANTITY LESS ACTIVE RESERVATIONS; NEGATIVE AVAILABILITY FAILS CLO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ELLABLE QUANTITY AUTHORITY · BUILDS 901–960">
            <text:p>🛡️ SELLABLE QUANTITY AUTHORITY · BUILDS 901–9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VAILABILITY VERIFIED">
            <text:p>AVAILABILITY VERIFIE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AVAILABLE QUANTITY">
            <text:p>AVAILABLE QUANTITY</text:p>
          </table:table-cell>
          <table:covered-table-cell/>
          <table:covered-table-cell/>
          <table:table-cell table:style-name="ce53" table:number-columns-spanned="3" office:value-type="string" office:string-value="SELLABLE ELIGIBILITY">
            <text:p>SELLABLE ELIGIBILITY</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3" office:value-type="string" office:string-value="YES" table:formula="of:=IF(UPPER(TRIM([.P1076]))=&quot;VERIFIED&quot;;&quot;YES&quot;;&quot;NO&quot;)">
            <text:p>YES</text:p>
          </table:table-cell>
          <table:covered-table-cell/>
          <table:covered-table-cell/>
          <table:table-cell table:style-name="ce54" table:number-columns-spanned="3" office:value-type="string" office:string-value="YES" table:formula="of:=IF(TRIM([.P810])&lt;&gt;&quot;&quot;;&quot;YES&quot;;&quot;NO&quot;)">
            <text:p>YES</text:p>
          </table:table-cell>
          <table:covered-table-cell/>
          <table:covered-table-cell/>
          <table:table-cell table:style-name="ce54" table:number-columns-spanned="3" office:value-type="string" office:string-value="YES" table:formula="of:=IF(UPPER(TRIM([.D810]))=&quot;EBAY&quot;;&quot;YES&quot;;&quot;NO&quot;)">
            <text:p>YES</text:p>
          </table:table-cell>
          <table:covered-table-cell/>
          <table:covered-table-cell/>
          <table:table-cell table:style-name="ce54" table:number-columns-spanned="3" office:value-type="string" office:string-value="0" table:formula="of:=[.G1076]">
            <text:p>0</text:p>
          </table:table-cell>
          <table:covered-table-cell/>
          <table:covered-table-cell/>
          <table:table-cell table:style-name="ce54" table:number-columns-spanned="3" office:value-type="string" office:string-value="NOT ELIGIBLE" table:formula="of:=IF(AND(UPPER(TRIM([.A1080]))=&quot;YES&quot;;UPPER(TRIM([.D1080]))=&quot;YES&quot;;UPPER(TRIM([.G1080]))=&quot;YES&quot;;VALUE([.J1080])&gt;0);&quot;ELIGIBLE&quot;;&quot;NOT ELIGIBLE&quot;)">
            <text:p>NOT ELIGIBLE</text:p>
          </table:table-cell>
          <table:covered-table-cell/>
          <table:covered-table-cell/>
          <table:table-cell table:style-name="ce54" table:number-columns-spanned="3" office:value-type="string" office:string-value="DENIED" table:formula="of:=IF(UPPER(TRIM([.M1080]))=&quot;ELIGIBLE&quot;;&quot;GRANTED&quot;;&quot;DENIED&quot;)">
            <text:p>DENIED</text:p>
          </table:table-cell>
          <table:covered-table-cell/>
          <table:covered-table-cell/>
        </table:table-row>
        <table:table-row table:style-name="ro5">
          <table:table-cell table:style-name="ce54" table:number-columns-spanned="18" office:value-type="string" office:string-value="ZERO AVAILABLE QUANTITY MUST NEVER RECEIVE SELLABLE AUTHORITY; AUTHORITY IS DERIVED AND FAIL-CLOSED">
            <text:p>ZERO AVAILABLE QUANTITY MUST NEVER RECEIVE SELLABLE AUTHORITY; AUTHORITY IS DERIVED AND FAIL-CLO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RESERVATION EVIDENCE · BUILDS 961–1020">
            <text:p>📥 INVENTORY RESERVATION EVIDENCE · BUILDS 961–10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SERVATION ID">
            <text:p>RESERVA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REQUESTED QUANTITY">
            <text:p>REQUESTED QUANTITY</text:p>
          </table:table-cell>
          <table:covered-table-cell/>
          <table:covered-table-cell/>
          <table:table-cell table:style-name="ce53" table:number-columns-spanned="3" office:value-type="string" office:string-value="SELLABLE AUTHORITY">
            <text:p>SELLABLE AUTHORITY</text:p>
          </table:table-cell>
          <table:covered-table-cell/>
          <table:covered-table-cell/>
          <table:table-cell table:style-name="ce53" table:number-columns-spanned="3" office:value-type="string" office:string-value="REQUEST EVIDENCE">
            <text:p>REQUEST EVIDENCE</text:p>
          </table:table-cell>
          <table:covered-table-cell/>
          <table:covered-table-cell/>
          <table:table-cell table:style-name="ce53" table:number-columns-spanned="3" office:value-type="string" office:string-value="RESERVATION ELIGIBILITY">
            <text:p>RESERVATION ELIGIBILITY</text:p>
          </table:table-cell>
          <table:covered-table-cell/>
          <table:covered-table-cell/>
        </table:table-row>
        <table:table-row table:style-name="ro21">
          <table:table-cell table:style-name="ce54" table:number-columns-spanned="3" office:value-type="string" office:string-value="RSV-000001">
            <text:p>RSV-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DENIED" table:formula="of:=[.P1080]">
            <text:p>DENIED</text:p>
          </table:table-cell>
          <table:covered-table-cell/>
          <table:covered-table-cell/>
          <table:table-cell table:style-name="ce54" table:number-columns-spanned="3" office:value-type="string" office:string-value="COMPLETE" table:formula="of:=IF(AND(TRIM([.A1084])&lt;&gt;&quot;&quot;;TRIM([.D1084])&lt;&gt;&quot;&quot;;VALUE([.G1084])&gt;0);&quot;COMPLETE&quot;;&quot;INCOMPLETE&quot;)">
            <text:p>COMPLETE</text:p>
          </table:table-cell>
          <table:covered-table-cell/>
          <table:covered-table-cell/>
          <table:table-cell table:style-name="ce54" table:number-columns-spanned="3" office:value-type="string" office:string-value="NOT ELIGIBLE" table:formula="of:=IF(AND(UPPER(TRIM([.J1084]))=&quot;GRANTED&quot;;UPPER(TRIM([.M1084]))=&quot;COMPLETE&quot;;VALUE([.G1084])&lt;=VALUE([.J1080]));&quot;ELIGIBLE&quot;;&quot;NOT ELIGIBLE&quot;)">
            <text:p>NOT ELIGIBLE</text:p>
          </table:table-cell>
          <table:covered-table-cell/>
          <table:covered-table-cell/>
        </table:table-row>
        <table:table-row table:style-name="ro5">
          <table:table-cell table:style-name="ce54" table:number-columns-spanned="18" office:value-type="string" office:string-value="RESERVATION EVIDENCE MAY PROVE A REQUEST BUT CANNOT OVERRIDE DENIED SELLABLE AUTHORITY OR INSUFFICIENT QUANTITY">
            <text:p>RESERVATION EVIDENCE MAY PROVE A REQUEST BUT CANNOT OVERRIDE DENIED SELLABLE AUTHORITY OR INSUFFICIENT QUA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RESERVATION EXECUTION CONTROL · BUILDS 1021–1080">
            <text:p>⚙️ RESERVATION EXECUTION CONTROL · BUILDS 1021–10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QUEST VALID">
            <text:p>REQUEST VALID</text:p>
          </table:table-cell>
          <table:covered-table-cell/>
          <table:covered-table-cell/>
          <table:table-cell table:style-name="ce53" table:number-columns-spanned="3" office:value-type="string" office:string-value="RESERVATION ELIGIBLE">
            <text:p>RESERVATION ELIGIBLE</text:p>
          </table:table-cell>
          <table:covered-table-cell/>
          <table:covered-table-cell/>
          <table:table-cell table:style-name="ce53" table:number-columns-spanned="3" office:value-type="string" office:string-value="AUTHORITY REVALIDATED">
            <text:p>AUTHORITY REVALIDATED</text:p>
          </table: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3" office:value-type="string" office:string-value="EXECUTION RESULT">
            <text:p>EXECUTION RESULT</text:p>
          </table:table-cell>
          <table:covered-table-cell/>
          <table:covered-table-cell/>
          <table:table-cell table:style-name="ce53" table:number-columns-spanned="3" office:value-type="string" office:string-value="RESERVED QUANTITY">
            <text:p>RESERVED QUANTITY</text:p>
          </table:table-cell>
          <table:covered-table-cell/>
          <table:covered-table-cell/>
        </table:table-row>
        <table:table-row table:style-name="ro21">
          <table:table-cell table:style-name="ce54" table:number-columns-spanned="3" office:value-type="string" office:string-value="YES" table:formula="of:=IF(UPPER(TRIM([.M1084]))=&quot;COMPLETE&quot;;&quot;YES&quot;;&quot;NO&quot;)">
            <text:p>YES</text:p>
          </table:table-cell>
          <table:covered-table-cell/>
          <table:covered-table-cell/>
          <table:table-cell table:style-name="ce54" table:number-columns-spanned="3" office:value-type="string" office:string-value="NO" table:formula="of:=IF(UPPER(TRIM([.P1084]))=&quot;ELIGIBLE&quot;;&quot;YES&quot;;&quot;NO&quot;)">
            <text:p>NO</text:p>
          </table:table-cell>
          <table:covered-table-cell/>
          <table:covered-table-cell/>
          <table:table-cell table:style-name="ce54" table:number-columns-spanned="3" office:value-type="string" office:string-value="NO" table:formula="of:=IF(UPPER(TRIM([.J1084]))=&quot;GRANTED&quot;;&quot;YES&quot;;&quot;NO&quot;)">
            <text:p>NO</text:p>
          </table:table-cell>
          <table:covered-table-cell/>
          <table:covered-table-cell/>
          <table:table-cell table:style-name="ce54" table:number-columns-spanned="3" office:value-type="string" office:string-value="NO" table:formula="of:=IF(AND(UPPER(TRIM([.A1088]))=&quot;YES&quot;;UPPER(TRIM([.D1088]))=&quot;YES&quot;;UPPER(TRIM([.G1088]))=&quot;YES&quot;);&quot;YES&quot;;&quot;NO&quot;)">
            <text:p>NO</text:p>
          </table:table-cell>
          <table:covered-table-cell/>
          <table:covered-table-cell/>
          <table:table-cell table:style-name="ce54" table:number-columns-spanned="3" office:value-type="string" office:string-value="NO WRITE" table:formula="of:=IF(UPPER(TRIM([.J1088]))=&quot;YES&quot;;&quot;EXECUTED&quot;;&quot;NO WRITE&quot;)">
            <text:p>NO WRITE</text:p>
          </table:table-cell>
          <table:covered-table-cell/>
          <table:covered-table-cell/>
          <table:table-cell table:style-name="ce54" table:number-columns-spanned="3" office:value-type="string" office:string-value="0" table:formula="of:=IF(UPPER(TRIM([.M1088]))=&quot;EXECUTED&quot;;[.G1084];0)">
            <text:p>0</text:p>
          </table:table-cell>
          <table:covered-table-cell/>
          <table:covered-table-cell/>
        </table:table-row>
        <table:table-row table:style-name="ro5">
          <table:table-cell table:style-name="ce54" table:number-columns-spanned="18" office:value-type="string" office:string-value="CONTROLLED RESERVATION WRITE REQUIRES VALID REQUEST + ELIGIBILITY + REVALIDATED AUTHORITY; FAILED CONTROL CREATES NO WRITE">
            <text:p>CONTROLLED RESERVATION WRITE REQUIRES VALID REQUEST + ELIGIBILITY + REVALIDATED AUTHORITY; FAILED CONTROL CREATES NO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RELEASE + CANCELLATION CONTROLS · BUILDS 1081–1140">
            <text:p>🔁 RELEASE + CANCELLATION CONTROLS · BUILDS 1081–11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SERVATION EXECUTED">
            <text:p>RESERVATION EXECUTED</text:p>
          </table:table-cell>
          <table:covered-table-cell/>
          <table:covered-table-cell/>
          <table:table-cell table:style-name="ce53" table:number-columns-spanned="3" office:value-type="string" office:string-value="ACTIVE RESERVATION">
            <text:p>ACTIVE RESERVATION</text:p>
          </table:table-cell>
          <table:covered-table-cell/>
          <table:covered-table-cell/>
          <table:table-cell table:style-name="ce53" table:number-columns-spanned="3" office:value-type="string" office:string-value="RELEASE REQUEST">
            <text:p>RELEASE REQUEST</text:p>
          </table:table-cell>
          <table:covered-table-cell/>
          <table:covered-table-cell/>
          <table:table-cell table:style-name="ce53" table:number-columns-spanned="3" office:value-type="string" office:string-value="CANCEL REQUEST">
            <text:p>CANCEL REQUEST</text:p>
          </table:table-cell>
          <table:covered-table-cell/>
          <table:covered-table-cell/>
          <table:table-cell table:style-name="ce53" table:number-columns-spanned="3" office:value-type="string" office:string-value="RELEASE ELIGIBILITY">
            <text:p>RELEASE ELIGIBILITY</text:p>
          </table:table-cell>
          <table:covered-table-cell/>
          <table:covered-table-cell/>
          <table:table-cell table:style-name="ce53" table:number-columns-spanned="3" office:value-type="string" office:string-value="CONTROL RESULT">
            <text:p>CONTROL RESULT</text:p>
          </table:table-cell>
          <table:covered-table-cell/>
          <table:covered-table-cell/>
        </table:table-row>
        <table:table-row table:style-name="ro21">
          <table:table-cell table:style-name="ce54" table:number-columns-spanned="3" office:value-type="string" office:string-value="NO" table:formula="of:=IF(UPPER(TRIM([.M1088]))=&quot;EXECUTED&quot;;&quot;YES&quot;;&quot;NO&quot;)">
            <text:p>NO</text:p>
          </table:table-cell>
          <table:covered-table-cell/>
          <table:covered-table-cell/>
          <table:table-cell table:style-name="ce54" table:number-columns-spanned="3" office:value-type="string" office:string-value="NO" table:formula="of:=IF(VALUE([.P1088])&gt;0;&quot;YES&quot;;&quot;NO&quot;)">
            <text:p>NO</text:p>
          </table:table-cell>
          <table:covered-table-cell/>
          <table:covered-table-cell/>
          <table:table-cell table:style-name="ce54" table:number-columns-spanned="3" office:value-type="string" office:string-value="NO">
            <text:p>NO</text:p>
          </table:table-cell>
          <table:covered-table-cell/>
          <table:covered-table-cell/>
          <table:table-cell table:style-name="ce54" table:number-columns-spanned="3" office:value-type="string" office:string-value="NO">
            <text:p>NO</text:p>
          </table:table-cell>
          <table:covered-table-cell/>
          <table:covered-table-cell/>
          <table:table-cell table:style-name="ce54" table:number-columns-spanned="3" office:value-type="string" office:string-value="NOT ELIGIBLE" table:formula="of:=IF(AND(UPPER(TRIM([.A1092]))=&quot;YES&quot;;UPPER(TRIM([.D1092]))=&quot;YES&quot;;OR(UPPER(TRIM([.G1092]))=&quot;YES&quot;;UPPER(TRIM([.J1092]))=&quot;YES&quot;));&quot;ELIGIBLE&quot;;&quot;NOT ELIGIBLE&quot;)">
            <text:p>NOT ELIGIBLE</text:p>
          </table:table-cell>
          <table:covered-table-cell/>
          <table:covered-table-cell/>
          <table:table-cell table:style-name="ce54" table:number-columns-spanned="3" office:value-type="string" office:string-value="NO ACTION" table:formula="of:=IF(UPPER(TRIM([.M1092]))=&quot;ELIGIBLE&quot;;&quot;CONTROLLED RELEASE&quot;;&quot;NO ACTION&quot;)">
            <text:p>NO ACTION</text:p>
          </table:table-cell>
          <table:covered-table-cell/>
          <table:covered-table-cell/>
        </table:table-row>
        <table:table-row table:style-name="ro5">
          <table:table-cell table:style-name="ce54" table:number-columns-spanned="18" office:value-type="string" office:string-value="RELEASE OR CANCELLATION CANNOT MUTATE INVENTORY WITHOUT AN EXECUTED ACTIVE RESERVATION AND EXPLICIT CONTROL REQUEST">
            <text:p>RELEASE OR CANCELLATION CANNOT MUTATE INVENTORY WITHOUT AN EXECUTED ACTIVE RESERVATION AND EXPLICIT CONTROL REQUES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AVAILABLE INVENTORY TRUTH GATE · BUILD 1200">
            <text:p>🏁 CONTROLLED AVAILABLE INVENTORY TRUTH GATE · BUILD 12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DJUSTMENT TRUTH">
            <text:p>ADJUSTMENT TRUTH</text:p>
          </table:table-cell>
          <table:covered-table-cell/>
          <table:covered-table-cell/>
          <table:table-cell table:style-name="ce53" table:number-columns-spanned="3" office:value-type="string" office:string-value="AVAILABILITY">
            <text:p>AVAILABILITY</text:p>
          </table:table-cell>
          <table:covered-table-cell/>
          <table:covered-table-cell/>
          <table:table-cell table:style-name="ce53" table:number-columns-spanned="3" office:value-type="string" office:string-value="SELLABLE AUTHORITY">
            <text:p>SELLABLE AUTHORITY</text:p>
          </table:table-cell>
          <table:covered-table-cell/>
          <table:covered-table-cell/>
          <table:table-cell table:style-name="ce53" table:number-columns-spanned="3" office:value-type="string" office:string-value="RESERVATION CONTROL">
            <text:p>RESERVATION CONTROL</text:p>
          </table:table-cell>
          <table:covered-table-cell/>
          <table:covered-table-cell/>
          <table:table-cell table:style-name="ce53" table:number-columns-spanned="3" office:value-type="string" office:string-value="RELEASE CONTROL">
            <text:p>RELEASE CONTROL</text:p>
          </table:table-cell>
          <table:covered-table-cell/>
          <table:covered-table-cell/>
          <table:table-cell table:style-name="ce53" table:number-columns-spanned="3" office:value-type="string" office:string-value="AVAILABLE INVENTORY TRUTH">
            <text:p>AVAILABLE INVENTORY TRUTH</text:p>
          </table:table-cell>
          <table:covered-table-cell/>
          <table:covered-table-cell/>
        </table:table-row>
        <table:table-row table:style-name="ro21">
          <table:table-cell table:style-name="ce54" table:number-columns-spanned="3" office:value-type="string" office:string-value="VERIFIED" table:formula="of:=[.P1072]">
            <text:p>VERIFIED</text:p>
          </table:table-cell>
          <table:covered-table-cell/>
          <table:covered-table-cell/>
          <table:table-cell table:style-name="ce54" table:number-columns-spanned="3" office:value-type="string" office:string-value="VERIFIED" table:formula="of:=[.P1076]">
            <text:p>VERIFIED</text:p>
          </table:table-cell>
          <table:covered-table-cell/>
          <table:covered-table-cell/>
          <table:table-cell table:style-name="ce54" table:number-columns-spanned="3" office:value-type="string" office:string-value="DENIED" table:formula="of:=[.P1080]">
            <text:p>DENIED</text:p>
          </table:table-cell>
          <table:covered-table-cell/>
          <table:covered-table-cell/>
          <table:table-cell table:style-name="ce54" table:number-columns-spanned="3" office:value-type="string" office:string-value="NO WRITE" table:formula="of:=[.M1088]">
            <text:p>NO WRITE</text:p>
          </table:table-cell>
          <table:covered-table-cell/>
          <table:covered-table-cell/>
          <table:table-cell table:style-name="ce54" table:number-columns-spanned="3" office:value-type="string" office:string-value="NO ACTION" table:formula="of:=[.P1092]">
            <text:p>NO ACTION</text:p>
          </table:table-cell>
          <table:covered-table-cell/>
          <table:covered-table-cell/>
          <table:table-cell table:style-name="ce54" table:number-columns-spanned="3" office:value-type="string" office:string-value="VERIFIED ZERO AVAILABLE" table:formula="of:=IF(AND(UPPER(TRIM([.A1096]))=&quot;VERIFIED&quot;;UPPER(TRIM([.D1096]))=&quot;VERIFIED&quot;;UPPER(TRIM([.G1096]))=&quot;DENIED&quot;;UPPER(TRIM([.J1096]))=&quot;NO WRITE&quot;;UPPER(TRIM([.M1096]))=&quot;NO ACTION&quot;;VALUE([.G1076])=0);&quot;VERIFIED ZERO AVAILABLE&quot;;&quot;FAILED&quot;)">
            <text:p>VERIFIED ZERO AVAILABLE</text:p>
          </table:table-cell>
          <table:covered-table-cell/>
          <table:covered-table-cell/>
        </table:table-row>
        <table:table-row table:style-name="ro5">
          <table:table-cell table:style-name="ce54" table:number-columns-spanned="18" office:value-type="string" office:string-value="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