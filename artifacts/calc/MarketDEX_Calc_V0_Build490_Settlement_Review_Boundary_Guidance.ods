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cell table:style-name="Build481Header" office:value-type="string">
            <text:p>Settlement Review Boundary Guidance</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cell office:value-type="string" table:formula="of:=IF([.W2]=&quot;NOT REVIEW ELIGIBLE&quot;;&quot;DO NOT BEGIN SETTLEMENT REVIEW — RESOLVE READINESS OR CONTRADICTION CONDITIONS&quot;;IF([.W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cell office:value-type="string" table:formula="of:=IF([.W3]=&quot;NOT REVIEW ELIGIBLE&quot;;&quot;DO NOT BEGIN SETTLEMENT REVIEW — RESOLVE READINESS OR CONTRADICTION CONDITIONS&quot;;IF([.W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cell office:value-type="string" table:formula="of:=IF([.W4]=&quot;NOT REVIEW ELIGIBLE&quot;;&quot;DO NOT BEGIN SETTLEMENT REVIEW — RESOLVE READINESS OR CONTRADICTION CONDITIONS&quot;;IF([.W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cell office:value-type="string" table:formula="of:=IF([.W5]=&quot;NOT REVIEW ELIGIBLE&quot;;&quot;DO NOT BEGIN SETTLEMENT REVIEW — RESOLVE READINESS OR CONTRADICTION CONDITIONS&quot;;IF([.W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cell office:value-type="string" table:formula="of:=IF([.W6]=&quot;NOT REVIEW ELIGIBLE&quot;;&quot;DO NOT BEGIN SETTLEMENT REVIEW — RESOLVE READINESS OR CONTRADICTION CONDITIONS&quot;;IF([.W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cell office:value-type="string" table:formula="of:=IF([.W7]=&quot;NOT REVIEW ELIGIBLE&quot;;&quot;DO NOT BEGIN SETTLEMENT REVIEW — RESOLVE READINESS OR CONTRADICTION CONDITIONS&quot;;IF([.W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cell office:value-type="string" table:formula="of:=IF([.W8]=&quot;NOT REVIEW ELIGIBLE&quot;;&quot;DO NOT BEGIN SETTLEMENT REVIEW — RESOLVE READINESS OR CONTRADICTION CONDITIONS&quot;;IF([.W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cell office:value-type="string" table:formula="of:=IF([.W9]=&quot;NOT REVIEW ELIGIBLE&quot;;&quot;DO NOT BEGIN SETTLEMENT REVIEW — RESOLVE READINESS OR CONTRADICTION CONDITIONS&quot;;IF([.W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cell office:value-type="string" table:formula="of:=IF([.W10]=&quot;NOT REVIEW ELIGIBLE&quot;;&quot;DO NOT BEGIN SETTLEMENT REVIEW — RESOLVE READINESS OR CONTRADICTION CONDITIONS&quot;;IF([.W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cell office:value-type="string" table:formula="of:=IF([.W11]=&quot;NOT REVIEW ELIGIBLE&quot;;&quot;DO NOT BEGIN SETTLEMENT REVIEW — RESOLVE READINESS OR CONTRADICTION CONDITIONS&quot;;IF([.W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cell office:value-type="string" table:formula="of:=IF([.W12]=&quot;NOT REVIEW ELIGIBLE&quot;;&quot;DO NOT BEGIN SETTLEMENT REVIEW — RESOLVE READINESS OR CONTRADICTION CONDITIONS&quot;;IF([.W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cell office:value-type="string" table:formula="of:=IF([.W13]=&quot;NOT REVIEW ELIGIBLE&quot;;&quot;DO NOT BEGIN SETTLEMENT REVIEW — RESOLVE READINESS OR CONTRADICTION CONDITIONS&quot;;IF([.W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cell office:value-type="string" table:formula="of:=IF([.W14]=&quot;NOT REVIEW ELIGIBLE&quot;;&quot;DO NOT BEGIN SETTLEMENT REVIEW — RESOLVE READINESS OR CONTRADICTION CONDITIONS&quot;;IF([.W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cell office:value-type="string" table:formula="of:=IF([.W15]=&quot;NOT REVIEW ELIGIBLE&quot;;&quot;DO NOT BEGIN SETTLEMENT REVIEW — RESOLVE READINESS OR CONTRADICTION CONDITIONS&quot;;IF([.W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cell office:value-type="string" table:formula="of:=IF([.W16]=&quot;NOT REVIEW ELIGIBLE&quot;;&quot;DO NOT BEGIN SETTLEMENT REVIEW — RESOLVE READINESS OR CONTRADICTION CONDITIONS&quot;;IF([.W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cell office:value-type="string" table:formula="of:=IF([.W17]=&quot;NOT REVIEW ELIGIBLE&quot;;&quot;DO NOT BEGIN SETTLEMENT REVIEW — RESOLVE READINESS OR CONTRADICTION CONDITIONS&quot;;IF([.W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cell office:value-type="string" table:formula="of:=IF([.W18]=&quot;NOT REVIEW ELIGIBLE&quot;;&quot;DO NOT BEGIN SETTLEMENT REVIEW — RESOLVE READINESS OR CONTRADICTION CONDITIONS&quot;;IF([.W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cell office:value-type="string" table:formula="of:=IF([.W19]=&quot;NOT REVIEW ELIGIBLE&quot;;&quot;DO NOT BEGIN SETTLEMENT REVIEW — RESOLVE READINESS OR CONTRADICTION CONDITIONS&quot;;IF([.W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cell office:value-type="string" table:formula="of:=IF([.W20]=&quot;NOT REVIEW ELIGIBLE&quot;;&quot;DO NOT BEGIN SETTLEMENT REVIEW — RESOLVE READINESS OR CONTRADICTION CONDITIONS&quot;;IF([.W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cell office:value-type="string" table:formula="of:=IF([.W21]=&quot;NOT REVIEW ELIGIBLE&quot;;&quot;DO NOT BEGIN SETTLEMENT REVIEW — RESOLVE READINESS OR CONTRADICTION CONDITIONS&quot;;IF([.W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cell office:value-type="string" table:formula="of:=IF([.W22]=&quot;NOT REVIEW ELIGIBLE&quot;;&quot;DO NOT BEGIN SETTLEMENT REVIEW — RESOLVE READINESS OR CONTRADICTION CONDITIONS&quot;;IF([.W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cell office:value-type="string" table:formula="of:=IF([.W23]=&quot;NOT REVIEW ELIGIBLE&quot;;&quot;DO NOT BEGIN SETTLEMENT REVIEW — RESOLVE READINESS OR CONTRADICTION CONDITIONS&quot;;IF([.W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cell office:value-type="string" table:formula="of:=IF([.W24]=&quot;NOT REVIEW ELIGIBLE&quot;;&quot;DO NOT BEGIN SETTLEMENT REVIEW — RESOLVE READINESS OR CONTRADICTION CONDITIONS&quot;;IF([.W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cell office:value-type="string" table:formula="of:=IF([.W25]=&quot;NOT REVIEW ELIGIBLE&quot;;&quot;DO NOT BEGIN SETTLEMENT REVIEW — RESOLVE READINESS OR CONTRADICTION CONDITIONS&quot;;IF([.W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cell office:value-type="string" table:formula="of:=IF([.W26]=&quot;NOT REVIEW ELIGIBLE&quot;;&quot;DO NOT BEGIN SETTLEMENT REVIEW — RESOLVE READINESS OR CONTRADICTION CONDITIONS&quot;;IF([.W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cell office:value-type="string" table:formula="of:=IF([.W27]=&quot;NOT REVIEW ELIGIBLE&quot;;&quot;DO NOT BEGIN SETTLEMENT REVIEW — RESOLVE READINESS OR CONTRADICTION CONDITIONS&quot;;IF([.W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cell office:value-type="string" table:formula="of:=IF([.W28]=&quot;NOT REVIEW ELIGIBLE&quot;;&quot;DO NOT BEGIN SETTLEMENT REVIEW — RESOLVE READINESS OR CONTRADICTION CONDITIONS&quot;;IF([.W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cell office:value-type="string" table:formula="of:=IF([.W29]=&quot;NOT REVIEW ELIGIBLE&quot;;&quot;DO NOT BEGIN SETTLEMENT REVIEW — RESOLVE READINESS OR CONTRADICTION CONDITIONS&quot;;IF([.W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cell office:value-type="string" table:formula="of:=IF([.W30]=&quot;NOT REVIEW ELIGIBLE&quot;;&quot;DO NOT BEGIN SETTLEMENT REVIEW — RESOLVE READINESS OR CONTRADICTION CONDITIONS&quot;;IF([.W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cell office:value-type="string" table:formula="of:=IF([.W31]=&quot;NOT REVIEW ELIGIBLE&quot;;&quot;DO NOT BEGIN SETTLEMENT REVIEW — RESOLVE READINESS OR CONTRADICTION CONDITIONS&quot;;IF([.W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cell office:value-type="string" table:formula="of:=IF([.W32]=&quot;NOT REVIEW ELIGIBLE&quot;;&quot;DO NOT BEGIN SETTLEMENT REVIEW — RESOLVE READINESS OR CONTRADICTION CONDITIONS&quot;;IF([.W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cell office:value-type="string" table:formula="of:=IF([.W33]=&quot;NOT REVIEW ELIGIBLE&quot;;&quot;DO NOT BEGIN SETTLEMENT REVIEW — RESOLVE READINESS OR CONTRADICTION CONDITIONS&quot;;IF([.W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cell office:value-type="string" table:formula="of:=IF([.W34]=&quot;NOT REVIEW ELIGIBLE&quot;;&quot;DO NOT BEGIN SETTLEMENT REVIEW — RESOLVE READINESS OR CONTRADICTION CONDITIONS&quot;;IF([.W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cell office:value-type="string" table:formula="of:=IF([.W35]=&quot;NOT REVIEW ELIGIBLE&quot;;&quot;DO NOT BEGIN SETTLEMENT REVIEW — RESOLVE READINESS OR CONTRADICTION CONDITIONS&quot;;IF([.W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cell office:value-type="string" table:formula="of:=IF([.W36]=&quot;NOT REVIEW ELIGIBLE&quot;;&quot;DO NOT BEGIN SETTLEMENT REVIEW — RESOLVE READINESS OR CONTRADICTION CONDITIONS&quot;;IF([.W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cell office:value-type="string" table:formula="of:=IF([.W37]=&quot;NOT REVIEW ELIGIBLE&quot;;&quot;DO NOT BEGIN SETTLEMENT REVIEW — RESOLVE READINESS OR CONTRADICTION CONDITIONS&quot;;IF([.W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cell office:value-type="string" table:formula="of:=IF([.W38]=&quot;NOT REVIEW ELIGIBLE&quot;;&quot;DO NOT BEGIN SETTLEMENT REVIEW — RESOLVE READINESS OR CONTRADICTION CONDITIONS&quot;;IF([.W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cell office:value-type="string" table:formula="of:=IF([.W39]=&quot;NOT REVIEW ELIGIBLE&quot;;&quot;DO NOT BEGIN SETTLEMENT REVIEW — RESOLVE READINESS OR CONTRADICTION CONDITIONS&quot;;IF([.W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cell office:value-type="string" table:formula="of:=IF([.W40]=&quot;NOT REVIEW ELIGIBLE&quot;;&quot;DO NOT BEGIN SETTLEMENT REVIEW — RESOLVE READINESS OR CONTRADICTION CONDITIONS&quot;;IF([.W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cell office:value-type="string" table:formula="of:=IF([.W41]=&quot;NOT REVIEW ELIGIBLE&quot;;&quot;DO NOT BEGIN SETTLEMENT REVIEW — RESOLVE READINESS OR CONTRADICTION CONDITIONS&quot;;IF([.W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cell office:value-type="string" table:formula="of:=IF([.W42]=&quot;NOT REVIEW ELIGIBLE&quot;;&quot;DO NOT BEGIN SETTLEMENT REVIEW — RESOLVE READINESS OR CONTRADICTION CONDITIONS&quot;;IF([.W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cell office:value-type="string" table:formula="of:=IF([.W43]=&quot;NOT REVIEW ELIGIBLE&quot;;&quot;DO NOT BEGIN SETTLEMENT REVIEW — RESOLVE READINESS OR CONTRADICTION CONDITIONS&quot;;IF([.W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cell office:value-type="string" table:formula="of:=IF([.W44]=&quot;NOT REVIEW ELIGIBLE&quot;;&quot;DO NOT BEGIN SETTLEMENT REVIEW — RESOLVE READINESS OR CONTRADICTION CONDITIONS&quot;;IF([.W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cell office:value-type="string" table:formula="of:=IF([.W45]=&quot;NOT REVIEW ELIGIBLE&quot;;&quot;DO NOT BEGIN SETTLEMENT REVIEW — RESOLVE READINESS OR CONTRADICTION CONDITIONS&quot;;IF([.W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cell office:value-type="string" table:formula="of:=IF([.W46]=&quot;NOT REVIEW ELIGIBLE&quot;;&quot;DO NOT BEGIN SETTLEMENT REVIEW — RESOLVE READINESS OR CONTRADICTION CONDITIONS&quot;;IF([.W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cell office:value-type="string" table:formula="of:=IF([.W47]=&quot;NOT REVIEW ELIGIBLE&quot;;&quot;DO NOT BEGIN SETTLEMENT REVIEW — RESOLVE READINESS OR CONTRADICTION CONDITIONS&quot;;IF([.W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cell office:value-type="string" table:formula="of:=IF([.W48]=&quot;NOT REVIEW ELIGIBLE&quot;;&quot;DO NOT BEGIN SETTLEMENT REVIEW — RESOLVE READINESS OR CONTRADICTION CONDITIONS&quot;;IF([.W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cell office:value-type="string" table:formula="of:=IF([.W49]=&quot;NOT REVIEW ELIGIBLE&quot;;&quot;DO NOT BEGIN SETTLEMENT REVIEW — RESOLVE READINESS OR CONTRADICTION CONDITIONS&quot;;IF([.W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cell office:value-type="string" table:formula="of:=IF([.W50]=&quot;NOT REVIEW ELIGIBLE&quot;;&quot;DO NOT BEGIN SETTLEMENT REVIEW — RESOLVE READINESS OR CONTRADICTION CONDITIONS&quot;;IF([.W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cell office:value-type="string" table:formula="of:=IF([.W51]=&quot;NOT REVIEW ELIGIBLE&quot;;&quot;DO NOT BEGIN SETTLEMENT REVIEW — RESOLVE READINESS OR CONTRADICTION CONDITIONS&quot;;IF([.W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cell office:value-type="string" table:formula="of:=IF([.W52]=&quot;NOT REVIEW ELIGIBLE&quot;;&quot;DO NOT BEGIN SETTLEMENT REVIEW — RESOLVE READINESS OR CONTRADICTION CONDITIONS&quot;;IF([.W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cell office:value-type="string" table:formula="of:=IF([.W53]=&quot;NOT REVIEW ELIGIBLE&quot;;&quot;DO NOT BEGIN SETTLEMENT REVIEW — RESOLVE READINESS OR CONTRADICTION CONDITIONS&quot;;IF([.W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cell office:value-type="string" table:formula="of:=IF([.W54]=&quot;NOT REVIEW ELIGIBLE&quot;;&quot;DO NOT BEGIN SETTLEMENT REVIEW — RESOLVE READINESS OR CONTRADICTION CONDITIONS&quot;;IF([.W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cell office:value-type="string" table:formula="of:=IF([.W55]=&quot;NOT REVIEW ELIGIBLE&quot;;&quot;DO NOT BEGIN SETTLEMENT REVIEW — RESOLVE READINESS OR CONTRADICTION CONDITIONS&quot;;IF([.W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cell office:value-type="string" table:formula="of:=IF([.W56]=&quot;NOT REVIEW ELIGIBLE&quot;;&quot;DO NOT BEGIN SETTLEMENT REVIEW — RESOLVE READINESS OR CONTRADICTION CONDITIONS&quot;;IF([.W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cell office:value-type="string" table:formula="of:=IF([.W57]=&quot;NOT REVIEW ELIGIBLE&quot;;&quot;DO NOT BEGIN SETTLEMENT REVIEW — RESOLVE READINESS OR CONTRADICTION CONDITIONS&quot;;IF([.W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cell office:value-type="string" table:formula="of:=IF([.W58]=&quot;NOT REVIEW ELIGIBLE&quot;;&quot;DO NOT BEGIN SETTLEMENT REVIEW — RESOLVE READINESS OR CONTRADICTION CONDITIONS&quot;;IF([.W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cell office:value-type="string" table:formula="of:=IF([.W59]=&quot;NOT REVIEW ELIGIBLE&quot;;&quot;DO NOT BEGIN SETTLEMENT REVIEW — RESOLVE READINESS OR CONTRADICTION CONDITIONS&quot;;IF([.W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cell office:value-type="string" table:formula="of:=IF([.W60]=&quot;NOT REVIEW ELIGIBLE&quot;;&quot;DO NOT BEGIN SETTLEMENT REVIEW — RESOLVE READINESS OR CONTRADICTION CONDITIONS&quot;;IF([.W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cell office:value-type="string" table:formula="of:=IF([.W61]=&quot;NOT REVIEW ELIGIBLE&quot;;&quot;DO NOT BEGIN SETTLEMENT REVIEW — RESOLVE READINESS OR CONTRADICTION CONDITIONS&quot;;IF([.W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cell office:value-type="string" table:formula="of:=IF([.W62]=&quot;NOT REVIEW ELIGIBLE&quot;;&quot;DO NOT BEGIN SETTLEMENT REVIEW — RESOLVE READINESS OR CONTRADICTION CONDITIONS&quot;;IF([.W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cell office:value-type="string" table:formula="of:=IF([.W63]=&quot;NOT REVIEW ELIGIBLE&quot;;&quot;DO NOT BEGIN SETTLEMENT REVIEW — RESOLVE READINESS OR CONTRADICTION CONDITIONS&quot;;IF([.W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cell office:value-type="string" table:formula="of:=IF([.W64]=&quot;NOT REVIEW ELIGIBLE&quot;;&quot;DO NOT BEGIN SETTLEMENT REVIEW — RESOLVE READINESS OR CONTRADICTION CONDITIONS&quot;;IF([.W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cell office:value-type="string" table:formula="of:=IF([.W65]=&quot;NOT REVIEW ELIGIBLE&quot;;&quot;DO NOT BEGIN SETTLEMENT REVIEW — RESOLVE READINESS OR CONTRADICTION CONDITIONS&quot;;IF([.W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cell office:value-type="string" table:formula="of:=IF([.W66]=&quot;NOT REVIEW ELIGIBLE&quot;;&quot;DO NOT BEGIN SETTLEMENT REVIEW — RESOLVE READINESS OR CONTRADICTION CONDITIONS&quot;;IF([.W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cell office:value-type="string" table:formula="of:=IF([.W67]=&quot;NOT REVIEW ELIGIBLE&quot;;&quot;DO NOT BEGIN SETTLEMENT REVIEW — RESOLVE READINESS OR CONTRADICTION CONDITIONS&quot;;IF([.W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cell office:value-type="string" table:formula="of:=IF([.W68]=&quot;NOT REVIEW ELIGIBLE&quot;;&quot;DO NOT BEGIN SETTLEMENT REVIEW — RESOLVE READINESS OR CONTRADICTION CONDITIONS&quot;;IF([.W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cell office:value-type="string" table:formula="of:=IF([.W69]=&quot;NOT REVIEW ELIGIBLE&quot;;&quot;DO NOT BEGIN SETTLEMENT REVIEW — RESOLVE READINESS OR CONTRADICTION CONDITIONS&quot;;IF([.W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cell office:value-type="string" table:formula="of:=IF([.W70]=&quot;NOT REVIEW ELIGIBLE&quot;;&quot;DO NOT BEGIN SETTLEMENT REVIEW — RESOLVE READINESS OR CONTRADICTION CONDITIONS&quot;;IF([.W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cell office:value-type="string" table:formula="of:=IF([.W71]=&quot;NOT REVIEW ELIGIBLE&quot;;&quot;DO NOT BEGIN SETTLEMENT REVIEW — RESOLVE READINESS OR CONTRADICTION CONDITIONS&quot;;IF([.W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cell office:value-type="string" table:formula="of:=IF([.W72]=&quot;NOT REVIEW ELIGIBLE&quot;;&quot;DO NOT BEGIN SETTLEMENT REVIEW — RESOLVE READINESS OR CONTRADICTION CONDITIONS&quot;;IF([.W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cell office:value-type="string" table:formula="of:=IF([.W73]=&quot;NOT REVIEW ELIGIBLE&quot;;&quot;DO NOT BEGIN SETTLEMENT REVIEW — RESOLVE READINESS OR CONTRADICTION CONDITIONS&quot;;IF([.W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cell office:value-type="string" table:formula="of:=IF([.W74]=&quot;NOT REVIEW ELIGIBLE&quot;;&quot;DO NOT BEGIN SETTLEMENT REVIEW — RESOLVE READINESS OR CONTRADICTION CONDITIONS&quot;;IF([.W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cell office:value-type="string" table:formula="of:=IF([.W75]=&quot;NOT REVIEW ELIGIBLE&quot;;&quot;DO NOT BEGIN SETTLEMENT REVIEW — RESOLVE READINESS OR CONTRADICTION CONDITIONS&quot;;IF([.W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cell office:value-type="string" table:formula="of:=IF([.W76]=&quot;NOT REVIEW ELIGIBLE&quot;;&quot;DO NOT BEGIN SETTLEMENT REVIEW — RESOLVE READINESS OR CONTRADICTION CONDITIONS&quot;;IF([.W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cell office:value-type="string" table:formula="of:=IF([.W77]=&quot;NOT REVIEW ELIGIBLE&quot;;&quot;DO NOT BEGIN SETTLEMENT REVIEW — RESOLVE READINESS OR CONTRADICTION CONDITIONS&quot;;IF([.W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cell office:value-type="string" table:formula="of:=IF([.W78]=&quot;NOT REVIEW ELIGIBLE&quot;;&quot;DO NOT BEGIN SETTLEMENT REVIEW — RESOLVE READINESS OR CONTRADICTION CONDITIONS&quot;;IF([.W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cell office:value-type="string" table:formula="of:=IF([.W79]=&quot;NOT REVIEW ELIGIBLE&quot;;&quot;DO NOT BEGIN SETTLEMENT REVIEW — RESOLVE READINESS OR CONTRADICTION CONDITIONS&quot;;IF([.W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cell office:value-type="string" table:formula="of:=IF([.W80]=&quot;NOT REVIEW ELIGIBLE&quot;;&quot;DO NOT BEGIN SETTLEMENT REVIEW — RESOLVE READINESS OR CONTRADICTION CONDITIONS&quot;;IF([.W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cell office:value-type="string" table:formula="of:=IF([.W81]=&quot;NOT REVIEW ELIGIBLE&quot;;&quot;DO NOT BEGIN SETTLEMENT REVIEW — RESOLVE READINESS OR CONTRADICTION CONDITIONS&quot;;IF([.W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cell office:value-type="string" table:formula="of:=IF([.W82]=&quot;NOT REVIEW ELIGIBLE&quot;;&quot;DO NOT BEGIN SETTLEMENT REVIEW — RESOLVE READINESS OR CONTRADICTION CONDITIONS&quot;;IF([.W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cell office:value-type="string" table:formula="of:=IF([.W83]=&quot;NOT REVIEW ELIGIBLE&quot;;&quot;DO NOT BEGIN SETTLEMENT REVIEW — RESOLVE READINESS OR CONTRADICTION CONDITIONS&quot;;IF([.W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cell office:value-type="string" table:formula="of:=IF([.W84]=&quot;NOT REVIEW ELIGIBLE&quot;;&quot;DO NOT BEGIN SETTLEMENT REVIEW — RESOLVE READINESS OR CONTRADICTION CONDITIONS&quot;;IF([.W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cell office:value-type="string" table:formula="of:=IF([.W85]=&quot;NOT REVIEW ELIGIBLE&quot;;&quot;DO NOT BEGIN SETTLEMENT REVIEW — RESOLVE READINESS OR CONTRADICTION CONDITIONS&quot;;IF([.W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cell office:value-type="string" table:formula="of:=IF([.W86]=&quot;NOT REVIEW ELIGIBLE&quot;;&quot;DO NOT BEGIN SETTLEMENT REVIEW — RESOLVE READINESS OR CONTRADICTION CONDITIONS&quot;;IF([.W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cell office:value-type="string" table:formula="of:=IF([.W87]=&quot;NOT REVIEW ELIGIBLE&quot;;&quot;DO NOT BEGIN SETTLEMENT REVIEW — RESOLVE READINESS OR CONTRADICTION CONDITIONS&quot;;IF([.W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cell office:value-type="string" table:formula="of:=IF([.W88]=&quot;NOT REVIEW ELIGIBLE&quot;;&quot;DO NOT BEGIN SETTLEMENT REVIEW — RESOLVE READINESS OR CONTRADICTION CONDITIONS&quot;;IF([.W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cell office:value-type="string" table:formula="of:=IF([.W89]=&quot;NOT REVIEW ELIGIBLE&quot;;&quot;DO NOT BEGIN SETTLEMENT REVIEW — RESOLVE READINESS OR CONTRADICTION CONDITIONS&quot;;IF([.W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cell office:value-type="string" table:formula="of:=IF([.W90]=&quot;NOT REVIEW ELIGIBLE&quot;;&quot;DO NOT BEGIN SETTLEMENT REVIEW — RESOLVE READINESS OR CONTRADICTION CONDITIONS&quot;;IF([.W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cell office:value-type="string" table:formula="of:=IF([.W91]=&quot;NOT REVIEW ELIGIBLE&quot;;&quot;DO NOT BEGIN SETTLEMENT REVIEW — RESOLVE READINESS OR CONTRADICTION CONDITIONS&quot;;IF([.W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cell office:value-type="string" table:formula="of:=IF([.W92]=&quot;NOT REVIEW ELIGIBLE&quot;;&quot;DO NOT BEGIN SETTLEMENT REVIEW — RESOLVE READINESS OR CONTRADICTION CONDITIONS&quot;;IF([.W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cell office:value-type="string" table:formula="of:=IF([.W93]=&quot;NOT REVIEW ELIGIBLE&quot;;&quot;DO NOT BEGIN SETTLEMENT REVIEW — RESOLVE READINESS OR CONTRADICTION CONDITIONS&quot;;IF([.W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cell office:value-type="string" table:formula="of:=IF([.W94]=&quot;NOT REVIEW ELIGIBLE&quot;;&quot;DO NOT BEGIN SETTLEMENT REVIEW — RESOLVE READINESS OR CONTRADICTION CONDITIONS&quot;;IF([.W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cell office:value-type="string" table:formula="of:=IF([.W95]=&quot;NOT REVIEW ELIGIBLE&quot;;&quot;DO NOT BEGIN SETTLEMENT REVIEW — RESOLVE READINESS OR CONTRADICTION CONDITIONS&quot;;IF([.W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cell office:value-type="string" table:formula="of:=IF([.W96]=&quot;NOT REVIEW ELIGIBLE&quot;;&quot;DO NOT BEGIN SETTLEMENT REVIEW — RESOLVE READINESS OR CONTRADICTION CONDITIONS&quot;;IF([.W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cell office:value-type="string" table:formula="of:=IF([.W97]=&quot;NOT REVIEW ELIGIBLE&quot;;&quot;DO NOT BEGIN SETTLEMENT REVIEW — RESOLVE READINESS OR CONTRADICTION CONDITIONS&quot;;IF([.W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cell office:value-type="string" table:formula="of:=IF([.W98]=&quot;NOT REVIEW ELIGIBLE&quot;;&quot;DO NOT BEGIN SETTLEMENT REVIEW — RESOLVE READINESS OR CONTRADICTION CONDITIONS&quot;;IF([.W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cell office:value-type="string" table:formula="of:=IF([.W99]=&quot;NOT REVIEW ELIGIBLE&quot;;&quot;DO NOT BEGIN SETTLEMENT REVIEW — RESOLVE READINESS OR CONTRADICTION CONDITIONS&quot;;IF([.W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cell office:value-type="string" table:formula="of:=IF([.W100]=&quot;NOT REVIEW ELIGIBLE&quot;;&quot;DO NOT BEGIN SETTLEMENT REVIEW — RESOLVE READINESS OR CONTRADICTION CONDITIONS&quot;;IF([.W1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cell office:value-type="string" table:formula="of:=IF([.W101]=&quot;NOT REVIEW ELIGIBLE&quot;;&quot;DO NOT BEGIN SETTLEMENT REVIEW — RESOLVE READINESS OR CONTRADICTION CONDITIONS&quot;;IF([.W1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cell office:value-type="string" table:formula="of:=IF([.W102]=&quot;NOT REVIEW ELIGIBLE&quot;;&quot;DO NOT BEGIN SETTLEMENT REVIEW — RESOLVE READINESS OR CONTRADICTION CONDITIONS&quot;;IF([.W1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cell office:value-type="string" table:formula="of:=IF([.W103]=&quot;NOT REVIEW ELIGIBLE&quot;;&quot;DO NOT BEGIN SETTLEMENT REVIEW — RESOLVE READINESS OR CONTRADICTION CONDITIONS&quot;;IF([.W1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cell office:value-type="string" table:formula="of:=IF([.W104]=&quot;NOT REVIEW ELIGIBLE&quot;;&quot;DO NOT BEGIN SETTLEMENT REVIEW — RESOLVE READINESS OR CONTRADICTION CONDITIONS&quot;;IF([.W1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cell office:value-type="string" table:formula="of:=IF([.W105]=&quot;NOT REVIEW ELIGIBLE&quot;;&quot;DO NOT BEGIN SETTLEMENT REVIEW — RESOLVE READINESS OR CONTRADICTION CONDITIONS&quot;;IF([.W1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cell office:value-type="string" table:formula="of:=IF([.W106]=&quot;NOT REVIEW ELIGIBLE&quot;;&quot;DO NOT BEGIN SETTLEMENT REVIEW — RESOLVE READINESS OR CONTRADICTION CONDITIONS&quot;;IF([.W1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cell office:value-type="string" table:formula="of:=IF([.W107]=&quot;NOT REVIEW ELIGIBLE&quot;;&quot;DO NOT BEGIN SETTLEMENT REVIEW — RESOLVE READINESS OR CONTRADICTION CONDITIONS&quot;;IF([.W1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cell office:value-type="string" table:formula="of:=IF([.W108]=&quot;NOT REVIEW ELIGIBLE&quot;;&quot;DO NOT BEGIN SETTLEMENT REVIEW — RESOLVE READINESS OR CONTRADICTION CONDITIONS&quot;;IF([.W1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cell office:value-type="string" table:formula="of:=IF([.W109]=&quot;NOT REVIEW ELIGIBLE&quot;;&quot;DO NOT BEGIN SETTLEMENT REVIEW — RESOLVE READINESS OR CONTRADICTION CONDITIONS&quot;;IF([.W1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cell office:value-type="string" table:formula="of:=IF([.W110]=&quot;NOT REVIEW ELIGIBLE&quot;;&quot;DO NOT BEGIN SETTLEMENT REVIEW — RESOLVE READINESS OR CONTRADICTION CONDITIONS&quot;;IF([.W1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cell office:value-type="string" table:formula="of:=IF([.W111]=&quot;NOT REVIEW ELIGIBLE&quot;;&quot;DO NOT BEGIN SETTLEMENT REVIEW — RESOLVE READINESS OR CONTRADICTION CONDITIONS&quot;;IF([.W1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cell office:value-type="string" table:formula="of:=IF([.W112]=&quot;NOT REVIEW ELIGIBLE&quot;;&quot;DO NOT BEGIN SETTLEMENT REVIEW — RESOLVE READINESS OR CONTRADICTION CONDITIONS&quot;;IF([.W1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cell office:value-type="string" table:formula="of:=IF([.W113]=&quot;NOT REVIEW ELIGIBLE&quot;;&quot;DO NOT BEGIN SETTLEMENT REVIEW — RESOLVE READINESS OR CONTRADICTION CONDITIONS&quot;;IF([.W1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cell office:value-type="string" table:formula="of:=IF([.W114]=&quot;NOT REVIEW ELIGIBLE&quot;;&quot;DO NOT BEGIN SETTLEMENT REVIEW — RESOLVE READINESS OR CONTRADICTION CONDITIONS&quot;;IF([.W1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cell office:value-type="string" table:formula="of:=IF([.W115]=&quot;NOT REVIEW ELIGIBLE&quot;;&quot;DO NOT BEGIN SETTLEMENT REVIEW — RESOLVE READINESS OR CONTRADICTION CONDITIONS&quot;;IF([.W1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cell office:value-type="string" table:formula="of:=IF([.W116]=&quot;NOT REVIEW ELIGIBLE&quot;;&quot;DO NOT BEGIN SETTLEMENT REVIEW — RESOLVE READINESS OR CONTRADICTION CONDITIONS&quot;;IF([.W1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cell office:value-type="string" table:formula="of:=IF([.W117]=&quot;NOT REVIEW ELIGIBLE&quot;;&quot;DO NOT BEGIN SETTLEMENT REVIEW — RESOLVE READINESS OR CONTRADICTION CONDITIONS&quot;;IF([.W1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cell office:value-type="string" table:formula="of:=IF([.W118]=&quot;NOT REVIEW ELIGIBLE&quot;;&quot;DO NOT BEGIN SETTLEMENT REVIEW — RESOLVE READINESS OR CONTRADICTION CONDITIONS&quot;;IF([.W1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cell office:value-type="string" table:formula="of:=IF([.W119]=&quot;NOT REVIEW ELIGIBLE&quot;;&quot;DO NOT BEGIN SETTLEMENT REVIEW — RESOLVE READINESS OR CONTRADICTION CONDITIONS&quot;;IF([.W1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cell office:value-type="string" table:formula="of:=IF([.W120]=&quot;NOT REVIEW ELIGIBLE&quot;;&quot;DO NOT BEGIN SETTLEMENT REVIEW — RESOLVE READINESS OR CONTRADICTION CONDITIONS&quot;;IF([.W1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cell office:value-type="string" table:formula="of:=IF([.W121]=&quot;NOT REVIEW ELIGIBLE&quot;;&quot;DO NOT BEGIN SETTLEMENT REVIEW — RESOLVE READINESS OR CONTRADICTION CONDITIONS&quot;;IF([.W1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cell office:value-type="string" table:formula="of:=IF([.W122]=&quot;NOT REVIEW ELIGIBLE&quot;;&quot;DO NOT BEGIN SETTLEMENT REVIEW — RESOLVE READINESS OR CONTRADICTION CONDITIONS&quot;;IF([.W1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cell office:value-type="string" table:formula="of:=IF([.W123]=&quot;NOT REVIEW ELIGIBLE&quot;;&quot;DO NOT BEGIN SETTLEMENT REVIEW — RESOLVE READINESS OR CONTRADICTION CONDITIONS&quot;;IF([.W1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cell office:value-type="string" table:formula="of:=IF([.W124]=&quot;NOT REVIEW ELIGIBLE&quot;;&quot;DO NOT BEGIN SETTLEMENT REVIEW — RESOLVE READINESS OR CONTRADICTION CONDITIONS&quot;;IF([.W1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cell office:value-type="string" table:formula="of:=IF([.W125]=&quot;NOT REVIEW ELIGIBLE&quot;;&quot;DO NOT BEGIN SETTLEMENT REVIEW — RESOLVE READINESS OR CONTRADICTION CONDITIONS&quot;;IF([.W1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cell office:value-type="string" table:formula="of:=IF([.W126]=&quot;NOT REVIEW ELIGIBLE&quot;;&quot;DO NOT BEGIN SETTLEMENT REVIEW — RESOLVE READINESS OR CONTRADICTION CONDITIONS&quot;;IF([.W1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cell office:value-type="string" table:formula="of:=IF([.W127]=&quot;NOT REVIEW ELIGIBLE&quot;;&quot;DO NOT BEGIN SETTLEMENT REVIEW — RESOLVE READINESS OR CONTRADICTION CONDITIONS&quot;;IF([.W1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cell office:value-type="string" table:formula="of:=IF([.W128]=&quot;NOT REVIEW ELIGIBLE&quot;;&quot;DO NOT BEGIN SETTLEMENT REVIEW — RESOLVE READINESS OR CONTRADICTION CONDITIONS&quot;;IF([.W1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cell office:value-type="string" table:formula="of:=IF([.W129]=&quot;NOT REVIEW ELIGIBLE&quot;;&quot;DO NOT BEGIN SETTLEMENT REVIEW — RESOLVE READINESS OR CONTRADICTION CONDITIONS&quot;;IF([.W1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cell office:value-type="string" table:formula="of:=IF([.W130]=&quot;NOT REVIEW ELIGIBLE&quot;;&quot;DO NOT BEGIN SETTLEMENT REVIEW — RESOLVE READINESS OR CONTRADICTION CONDITIONS&quot;;IF([.W1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cell office:value-type="string" table:formula="of:=IF([.W131]=&quot;NOT REVIEW ELIGIBLE&quot;;&quot;DO NOT BEGIN SETTLEMENT REVIEW — RESOLVE READINESS OR CONTRADICTION CONDITIONS&quot;;IF([.W1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cell office:value-type="string" table:formula="of:=IF([.W132]=&quot;NOT REVIEW ELIGIBLE&quot;;&quot;DO NOT BEGIN SETTLEMENT REVIEW — RESOLVE READINESS OR CONTRADICTION CONDITIONS&quot;;IF([.W1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cell office:value-type="string" table:formula="of:=IF([.W133]=&quot;NOT REVIEW ELIGIBLE&quot;;&quot;DO NOT BEGIN SETTLEMENT REVIEW — RESOLVE READINESS OR CONTRADICTION CONDITIONS&quot;;IF([.W1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cell office:value-type="string" table:formula="of:=IF([.W134]=&quot;NOT REVIEW ELIGIBLE&quot;;&quot;DO NOT BEGIN SETTLEMENT REVIEW — RESOLVE READINESS OR CONTRADICTION CONDITIONS&quot;;IF([.W1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cell office:value-type="string" table:formula="of:=IF([.W135]=&quot;NOT REVIEW ELIGIBLE&quot;;&quot;DO NOT BEGIN SETTLEMENT REVIEW — RESOLVE READINESS OR CONTRADICTION CONDITIONS&quot;;IF([.W1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cell office:value-type="string" table:formula="of:=IF([.W136]=&quot;NOT REVIEW ELIGIBLE&quot;;&quot;DO NOT BEGIN SETTLEMENT REVIEW — RESOLVE READINESS OR CONTRADICTION CONDITIONS&quot;;IF([.W1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cell office:value-type="string" table:formula="of:=IF([.W137]=&quot;NOT REVIEW ELIGIBLE&quot;;&quot;DO NOT BEGIN SETTLEMENT REVIEW — RESOLVE READINESS OR CONTRADICTION CONDITIONS&quot;;IF([.W1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cell office:value-type="string" table:formula="of:=IF([.W138]=&quot;NOT REVIEW ELIGIBLE&quot;;&quot;DO NOT BEGIN SETTLEMENT REVIEW — RESOLVE READINESS OR CONTRADICTION CONDITIONS&quot;;IF([.W1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cell office:value-type="string" table:formula="of:=IF([.W139]=&quot;NOT REVIEW ELIGIBLE&quot;;&quot;DO NOT BEGIN SETTLEMENT REVIEW — RESOLVE READINESS OR CONTRADICTION CONDITIONS&quot;;IF([.W1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cell office:value-type="string" table:formula="of:=IF([.W140]=&quot;NOT REVIEW ELIGIBLE&quot;;&quot;DO NOT BEGIN SETTLEMENT REVIEW — RESOLVE READINESS OR CONTRADICTION CONDITIONS&quot;;IF([.W1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cell office:value-type="string" table:formula="of:=IF([.W141]=&quot;NOT REVIEW ELIGIBLE&quot;;&quot;DO NOT BEGIN SETTLEMENT REVIEW — RESOLVE READINESS OR CONTRADICTION CONDITIONS&quot;;IF([.W1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cell office:value-type="string" table:formula="of:=IF([.W142]=&quot;NOT REVIEW ELIGIBLE&quot;;&quot;DO NOT BEGIN SETTLEMENT REVIEW — RESOLVE READINESS OR CONTRADICTION CONDITIONS&quot;;IF([.W1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cell office:value-type="string" table:formula="of:=IF([.W143]=&quot;NOT REVIEW ELIGIBLE&quot;;&quot;DO NOT BEGIN SETTLEMENT REVIEW — RESOLVE READINESS OR CONTRADICTION CONDITIONS&quot;;IF([.W1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cell office:value-type="string" table:formula="of:=IF([.W144]=&quot;NOT REVIEW ELIGIBLE&quot;;&quot;DO NOT BEGIN SETTLEMENT REVIEW — RESOLVE READINESS OR CONTRADICTION CONDITIONS&quot;;IF([.W1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cell office:value-type="string" table:formula="of:=IF([.W145]=&quot;NOT REVIEW ELIGIBLE&quot;;&quot;DO NOT BEGIN SETTLEMENT REVIEW — RESOLVE READINESS OR CONTRADICTION CONDITIONS&quot;;IF([.W1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cell office:value-type="string" table:formula="of:=IF([.W146]=&quot;NOT REVIEW ELIGIBLE&quot;;&quot;DO NOT BEGIN SETTLEMENT REVIEW — RESOLVE READINESS OR CONTRADICTION CONDITIONS&quot;;IF([.W1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cell office:value-type="string" table:formula="of:=IF([.W147]=&quot;NOT REVIEW ELIGIBLE&quot;;&quot;DO NOT BEGIN SETTLEMENT REVIEW — RESOLVE READINESS OR CONTRADICTION CONDITIONS&quot;;IF([.W1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cell office:value-type="string" table:formula="of:=IF([.W148]=&quot;NOT REVIEW ELIGIBLE&quot;;&quot;DO NOT BEGIN SETTLEMENT REVIEW — RESOLVE READINESS OR CONTRADICTION CONDITIONS&quot;;IF([.W1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cell office:value-type="string" table:formula="of:=IF([.W149]=&quot;NOT REVIEW ELIGIBLE&quot;;&quot;DO NOT BEGIN SETTLEMENT REVIEW — RESOLVE READINESS OR CONTRADICTION CONDITIONS&quot;;IF([.W1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cell office:value-type="string" table:formula="of:=IF([.W150]=&quot;NOT REVIEW ELIGIBLE&quot;;&quot;DO NOT BEGIN SETTLEMENT REVIEW — RESOLVE READINESS OR CONTRADICTION CONDITIONS&quot;;IF([.W1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cell office:value-type="string" table:formula="of:=IF([.W151]=&quot;NOT REVIEW ELIGIBLE&quot;;&quot;DO NOT BEGIN SETTLEMENT REVIEW — RESOLVE READINESS OR CONTRADICTION CONDITIONS&quot;;IF([.W1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cell office:value-type="string" table:formula="of:=IF([.W152]=&quot;NOT REVIEW ELIGIBLE&quot;;&quot;DO NOT BEGIN SETTLEMENT REVIEW — RESOLVE READINESS OR CONTRADICTION CONDITIONS&quot;;IF([.W1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cell office:value-type="string" table:formula="of:=IF([.W153]=&quot;NOT REVIEW ELIGIBLE&quot;;&quot;DO NOT BEGIN SETTLEMENT REVIEW — RESOLVE READINESS OR CONTRADICTION CONDITIONS&quot;;IF([.W1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cell office:value-type="string" table:formula="of:=IF([.W154]=&quot;NOT REVIEW ELIGIBLE&quot;;&quot;DO NOT BEGIN SETTLEMENT REVIEW — RESOLVE READINESS OR CONTRADICTION CONDITIONS&quot;;IF([.W1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cell office:value-type="string" table:formula="of:=IF([.W155]=&quot;NOT REVIEW ELIGIBLE&quot;;&quot;DO NOT BEGIN SETTLEMENT REVIEW — RESOLVE READINESS OR CONTRADICTION CONDITIONS&quot;;IF([.W1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cell office:value-type="string" table:formula="of:=IF([.W156]=&quot;NOT REVIEW ELIGIBLE&quot;;&quot;DO NOT BEGIN SETTLEMENT REVIEW — RESOLVE READINESS OR CONTRADICTION CONDITIONS&quot;;IF([.W1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cell office:value-type="string" table:formula="of:=IF([.W157]=&quot;NOT REVIEW ELIGIBLE&quot;;&quot;DO NOT BEGIN SETTLEMENT REVIEW — RESOLVE READINESS OR CONTRADICTION CONDITIONS&quot;;IF([.W1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cell office:value-type="string" table:formula="of:=IF([.W158]=&quot;NOT REVIEW ELIGIBLE&quot;;&quot;DO NOT BEGIN SETTLEMENT REVIEW — RESOLVE READINESS OR CONTRADICTION CONDITIONS&quot;;IF([.W1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cell office:value-type="string" table:formula="of:=IF([.W159]=&quot;NOT REVIEW ELIGIBLE&quot;;&quot;DO NOT BEGIN SETTLEMENT REVIEW — RESOLVE READINESS OR CONTRADICTION CONDITIONS&quot;;IF([.W1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cell office:value-type="string" table:formula="of:=IF([.W160]=&quot;NOT REVIEW ELIGIBLE&quot;;&quot;DO NOT BEGIN SETTLEMENT REVIEW — RESOLVE READINESS OR CONTRADICTION CONDITIONS&quot;;IF([.W1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cell office:value-type="string" table:formula="of:=IF([.W161]=&quot;NOT REVIEW ELIGIBLE&quot;;&quot;DO NOT BEGIN SETTLEMENT REVIEW — RESOLVE READINESS OR CONTRADICTION CONDITIONS&quot;;IF([.W1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cell office:value-type="string" table:formula="of:=IF([.W162]=&quot;NOT REVIEW ELIGIBLE&quot;;&quot;DO NOT BEGIN SETTLEMENT REVIEW — RESOLVE READINESS OR CONTRADICTION CONDITIONS&quot;;IF([.W1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cell office:value-type="string" table:formula="of:=IF([.W163]=&quot;NOT REVIEW ELIGIBLE&quot;;&quot;DO NOT BEGIN SETTLEMENT REVIEW — RESOLVE READINESS OR CONTRADICTION CONDITIONS&quot;;IF([.W1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cell office:value-type="string" table:formula="of:=IF([.W164]=&quot;NOT REVIEW ELIGIBLE&quot;;&quot;DO NOT BEGIN SETTLEMENT REVIEW — RESOLVE READINESS OR CONTRADICTION CONDITIONS&quot;;IF([.W1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cell office:value-type="string" table:formula="of:=IF([.W165]=&quot;NOT REVIEW ELIGIBLE&quot;;&quot;DO NOT BEGIN SETTLEMENT REVIEW — RESOLVE READINESS OR CONTRADICTION CONDITIONS&quot;;IF([.W1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cell office:value-type="string" table:formula="of:=IF([.W166]=&quot;NOT REVIEW ELIGIBLE&quot;;&quot;DO NOT BEGIN SETTLEMENT REVIEW — RESOLVE READINESS OR CONTRADICTION CONDITIONS&quot;;IF([.W1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cell office:value-type="string" table:formula="of:=IF([.W167]=&quot;NOT REVIEW ELIGIBLE&quot;;&quot;DO NOT BEGIN SETTLEMENT REVIEW — RESOLVE READINESS OR CONTRADICTION CONDITIONS&quot;;IF([.W1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cell office:value-type="string" table:formula="of:=IF([.W168]=&quot;NOT REVIEW ELIGIBLE&quot;;&quot;DO NOT BEGIN SETTLEMENT REVIEW — RESOLVE READINESS OR CONTRADICTION CONDITIONS&quot;;IF([.W1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cell office:value-type="string" table:formula="of:=IF([.W169]=&quot;NOT REVIEW ELIGIBLE&quot;;&quot;DO NOT BEGIN SETTLEMENT REVIEW — RESOLVE READINESS OR CONTRADICTION CONDITIONS&quot;;IF([.W1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cell office:value-type="string" table:formula="of:=IF([.W170]=&quot;NOT REVIEW ELIGIBLE&quot;;&quot;DO NOT BEGIN SETTLEMENT REVIEW — RESOLVE READINESS OR CONTRADICTION CONDITIONS&quot;;IF([.W1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cell office:value-type="string" table:formula="of:=IF([.W171]=&quot;NOT REVIEW ELIGIBLE&quot;;&quot;DO NOT BEGIN SETTLEMENT REVIEW — RESOLVE READINESS OR CONTRADICTION CONDITIONS&quot;;IF([.W1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cell office:value-type="string" table:formula="of:=IF([.W172]=&quot;NOT REVIEW ELIGIBLE&quot;;&quot;DO NOT BEGIN SETTLEMENT REVIEW — RESOLVE READINESS OR CONTRADICTION CONDITIONS&quot;;IF([.W1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cell office:value-type="string" table:formula="of:=IF([.W173]=&quot;NOT REVIEW ELIGIBLE&quot;;&quot;DO NOT BEGIN SETTLEMENT REVIEW — RESOLVE READINESS OR CONTRADICTION CONDITIONS&quot;;IF([.W1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cell office:value-type="string" table:formula="of:=IF([.W174]=&quot;NOT REVIEW ELIGIBLE&quot;;&quot;DO NOT BEGIN SETTLEMENT REVIEW — RESOLVE READINESS OR CONTRADICTION CONDITIONS&quot;;IF([.W1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cell office:value-type="string" table:formula="of:=IF([.W175]=&quot;NOT REVIEW ELIGIBLE&quot;;&quot;DO NOT BEGIN SETTLEMENT REVIEW — RESOLVE READINESS OR CONTRADICTION CONDITIONS&quot;;IF([.W1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cell office:value-type="string" table:formula="of:=IF([.W176]=&quot;NOT REVIEW ELIGIBLE&quot;;&quot;DO NOT BEGIN SETTLEMENT REVIEW — RESOLVE READINESS OR CONTRADICTION CONDITIONS&quot;;IF([.W1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cell office:value-type="string" table:formula="of:=IF([.W177]=&quot;NOT REVIEW ELIGIBLE&quot;;&quot;DO NOT BEGIN SETTLEMENT REVIEW — RESOLVE READINESS OR CONTRADICTION CONDITIONS&quot;;IF([.W1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cell office:value-type="string" table:formula="of:=IF([.W178]=&quot;NOT REVIEW ELIGIBLE&quot;;&quot;DO NOT BEGIN SETTLEMENT REVIEW — RESOLVE READINESS OR CONTRADICTION CONDITIONS&quot;;IF([.W1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cell office:value-type="string" table:formula="of:=IF([.W179]=&quot;NOT REVIEW ELIGIBLE&quot;;&quot;DO NOT BEGIN SETTLEMENT REVIEW — RESOLVE READINESS OR CONTRADICTION CONDITIONS&quot;;IF([.W1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cell office:value-type="string" table:formula="of:=IF([.W180]=&quot;NOT REVIEW ELIGIBLE&quot;;&quot;DO NOT BEGIN SETTLEMENT REVIEW — RESOLVE READINESS OR CONTRADICTION CONDITIONS&quot;;IF([.W1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cell office:value-type="string" table:formula="of:=IF([.W181]=&quot;NOT REVIEW ELIGIBLE&quot;;&quot;DO NOT BEGIN SETTLEMENT REVIEW — RESOLVE READINESS OR CONTRADICTION CONDITIONS&quot;;IF([.W1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cell office:value-type="string" table:formula="of:=IF([.W182]=&quot;NOT REVIEW ELIGIBLE&quot;;&quot;DO NOT BEGIN SETTLEMENT REVIEW — RESOLVE READINESS OR CONTRADICTION CONDITIONS&quot;;IF([.W1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cell office:value-type="string" table:formula="of:=IF([.W183]=&quot;NOT REVIEW ELIGIBLE&quot;;&quot;DO NOT BEGIN SETTLEMENT REVIEW — RESOLVE READINESS OR CONTRADICTION CONDITIONS&quot;;IF([.W1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cell office:value-type="string" table:formula="of:=IF([.W184]=&quot;NOT REVIEW ELIGIBLE&quot;;&quot;DO NOT BEGIN SETTLEMENT REVIEW — RESOLVE READINESS OR CONTRADICTION CONDITIONS&quot;;IF([.W1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cell office:value-type="string" table:formula="of:=IF([.W185]=&quot;NOT REVIEW ELIGIBLE&quot;;&quot;DO NOT BEGIN SETTLEMENT REVIEW — RESOLVE READINESS OR CONTRADICTION CONDITIONS&quot;;IF([.W1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cell office:value-type="string" table:formula="of:=IF([.W186]=&quot;NOT REVIEW ELIGIBLE&quot;;&quot;DO NOT BEGIN SETTLEMENT REVIEW — RESOLVE READINESS OR CONTRADICTION CONDITIONS&quot;;IF([.W1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cell office:value-type="string" table:formula="of:=IF([.W187]=&quot;NOT REVIEW ELIGIBLE&quot;;&quot;DO NOT BEGIN SETTLEMENT REVIEW — RESOLVE READINESS OR CONTRADICTION CONDITIONS&quot;;IF([.W1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cell office:value-type="string" table:formula="of:=IF([.W188]=&quot;NOT REVIEW ELIGIBLE&quot;;&quot;DO NOT BEGIN SETTLEMENT REVIEW — RESOLVE READINESS OR CONTRADICTION CONDITIONS&quot;;IF([.W1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cell office:value-type="string" table:formula="of:=IF([.W189]=&quot;NOT REVIEW ELIGIBLE&quot;;&quot;DO NOT BEGIN SETTLEMENT REVIEW — RESOLVE READINESS OR CONTRADICTION CONDITIONS&quot;;IF([.W1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cell office:value-type="string" table:formula="of:=IF([.W190]=&quot;NOT REVIEW ELIGIBLE&quot;;&quot;DO NOT BEGIN SETTLEMENT REVIEW — RESOLVE READINESS OR CONTRADICTION CONDITIONS&quot;;IF([.W1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cell office:value-type="string" table:formula="of:=IF([.W191]=&quot;NOT REVIEW ELIGIBLE&quot;;&quot;DO NOT BEGIN SETTLEMENT REVIEW — RESOLVE READINESS OR CONTRADICTION CONDITIONS&quot;;IF([.W1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cell office:value-type="string" table:formula="of:=IF([.W192]=&quot;NOT REVIEW ELIGIBLE&quot;;&quot;DO NOT BEGIN SETTLEMENT REVIEW — RESOLVE READINESS OR CONTRADICTION CONDITIONS&quot;;IF([.W1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cell office:value-type="string" table:formula="of:=IF([.W193]=&quot;NOT REVIEW ELIGIBLE&quot;;&quot;DO NOT BEGIN SETTLEMENT REVIEW — RESOLVE READINESS OR CONTRADICTION CONDITIONS&quot;;IF([.W1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cell office:value-type="string" table:formula="of:=IF([.W194]=&quot;NOT REVIEW ELIGIBLE&quot;;&quot;DO NOT BEGIN SETTLEMENT REVIEW — RESOLVE READINESS OR CONTRADICTION CONDITIONS&quot;;IF([.W1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cell office:value-type="string" table:formula="of:=IF([.W195]=&quot;NOT REVIEW ELIGIBLE&quot;;&quot;DO NOT BEGIN SETTLEMENT REVIEW — RESOLVE READINESS OR CONTRADICTION CONDITIONS&quot;;IF([.W1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cell office:value-type="string" table:formula="of:=IF([.W196]=&quot;NOT REVIEW ELIGIBLE&quot;;&quot;DO NOT BEGIN SETTLEMENT REVIEW — RESOLVE READINESS OR CONTRADICTION CONDITIONS&quot;;IF([.W1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cell office:value-type="string" table:formula="of:=IF([.W197]=&quot;NOT REVIEW ELIGIBLE&quot;;&quot;DO NOT BEGIN SETTLEMENT REVIEW — RESOLVE READINESS OR CONTRADICTION CONDITIONS&quot;;IF([.W1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cell office:value-type="string" table:formula="of:=IF([.W198]=&quot;NOT REVIEW ELIGIBLE&quot;;&quot;DO NOT BEGIN SETTLEMENT REVIEW — RESOLVE READINESS OR CONTRADICTION CONDITIONS&quot;;IF([.W1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cell office:value-type="string" table:formula="of:=IF([.W199]=&quot;NOT REVIEW ELIGIBLE&quot;;&quot;DO NOT BEGIN SETTLEMENT REVIEW — RESOLVE READINESS OR CONTRADICTION CONDITIONS&quot;;IF([.W1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cell office:value-type="string" table:formula="of:=IF([.W200]=&quot;NOT REVIEW ELIGIBLE&quot;;&quot;DO NOT BEGIN SETTLEMENT REVIEW — RESOLVE READINESS OR CONTRADICTION CONDITIONS&quot;;IF([.W2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cell office:value-type="string" table:formula="of:=IF([.W201]=&quot;NOT REVIEW ELIGIBLE&quot;;&quot;DO NOT BEGIN SETTLEMENT REVIEW — RESOLVE READINESS OR CONTRADICTION CONDITIONS&quot;;IF([.W2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cell office:value-type="string" table:formula="of:=IF([.W202]=&quot;NOT REVIEW ELIGIBLE&quot;;&quot;DO NOT BEGIN SETTLEMENT REVIEW — RESOLVE READINESS OR CONTRADICTION CONDITIONS&quot;;IF([.W2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cell office:value-type="string" table:formula="of:=IF([.W203]=&quot;NOT REVIEW ELIGIBLE&quot;;&quot;DO NOT BEGIN SETTLEMENT REVIEW — RESOLVE READINESS OR CONTRADICTION CONDITIONS&quot;;IF([.W2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cell office:value-type="string" table:formula="of:=IF([.W204]=&quot;NOT REVIEW ELIGIBLE&quot;;&quot;DO NOT BEGIN SETTLEMENT REVIEW — RESOLVE READINESS OR CONTRADICTION CONDITIONS&quot;;IF([.W2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cell office:value-type="string" table:formula="of:=IF([.W205]=&quot;NOT REVIEW ELIGIBLE&quot;;&quot;DO NOT BEGIN SETTLEMENT REVIEW — RESOLVE READINESS OR CONTRADICTION CONDITIONS&quot;;IF([.W2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cell office:value-type="string" table:formula="of:=IF([.W206]=&quot;NOT REVIEW ELIGIBLE&quot;;&quot;DO NOT BEGIN SETTLEMENT REVIEW — RESOLVE READINESS OR CONTRADICTION CONDITIONS&quot;;IF([.W2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cell office:value-type="string" table:formula="of:=IF([.W207]=&quot;NOT REVIEW ELIGIBLE&quot;;&quot;DO NOT BEGIN SETTLEMENT REVIEW — RESOLVE READINESS OR CONTRADICTION CONDITIONS&quot;;IF([.W2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cell office:value-type="string" table:formula="of:=IF([.W208]=&quot;NOT REVIEW ELIGIBLE&quot;;&quot;DO NOT BEGIN SETTLEMENT REVIEW — RESOLVE READINESS OR CONTRADICTION CONDITIONS&quot;;IF([.W2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cell office:value-type="string" table:formula="of:=IF([.W209]=&quot;NOT REVIEW ELIGIBLE&quot;;&quot;DO NOT BEGIN SETTLEMENT REVIEW — RESOLVE READINESS OR CONTRADICTION CONDITIONS&quot;;IF([.W2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cell office:value-type="string" table:formula="of:=IF([.W210]=&quot;NOT REVIEW ELIGIBLE&quot;;&quot;DO NOT BEGIN SETTLEMENT REVIEW — RESOLVE READINESS OR CONTRADICTION CONDITIONS&quot;;IF([.W2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cell office:value-type="string" table:formula="of:=IF([.W211]=&quot;NOT REVIEW ELIGIBLE&quot;;&quot;DO NOT BEGIN SETTLEMENT REVIEW — RESOLVE READINESS OR CONTRADICTION CONDITIONS&quot;;IF([.W2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cell office:value-type="string" table:formula="of:=IF([.W212]=&quot;NOT REVIEW ELIGIBLE&quot;;&quot;DO NOT BEGIN SETTLEMENT REVIEW — RESOLVE READINESS OR CONTRADICTION CONDITIONS&quot;;IF([.W2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cell office:value-type="string" table:formula="of:=IF([.W213]=&quot;NOT REVIEW ELIGIBLE&quot;;&quot;DO NOT BEGIN SETTLEMENT REVIEW — RESOLVE READINESS OR CONTRADICTION CONDITIONS&quot;;IF([.W2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cell office:value-type="string" table:formula="of:=IF([.W214]=&quot;NOT REVIEW ELIGIBLE&quot;;&quot;DO NOT BEGIN SETTLEMENT REVIEW — RESOLVE READINESS OR CONTRADICTION CONDITIONS&quot;;IF([.W2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cell office:value-type="string" table:formula="of:=IF([.W215]=&quot;NOT REVIEW ELIGIBLE&quot;;&quot;DO NOT BEGIN SETTLEMENT REVIEW — RESOLVE READINESS OR CONTRADICTION CONDITIONS&quot;;IF([.W2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cell office:value-type="string" table:formula="of:=IF([.W216]=&quot;NOT REVIEW ELIGIBLE&quot;;&quot;DO NOT BEGIN SETTLEMENT REVIEW — RESOLVE READINESS OR CONTRADICTION CONDITIONS&quot;;IF([.W2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cell office:value-type="string" table:formula="of:=IF([.W217]=&quot;NOT REVIEW ELIGIBLE&quot;;&quot;DO NOT BEGIN SETTLEMENT REVIEW — RESOLVE READINESS OR CONTRADICTION CONDITIONS&quot;;IF([.W2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cell office:value-type="string" table:formula="of:=IF([.W218]=&quot;NOT REVIEW ELIGIBLE&quot;;&quot;DO NOT BEGIN SETTLEMENT REVIEW — RESOLVE READINESS OR CONTRADICTION CONDITIONS&quot;;IF([.W2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cell office:value-type="string" table:formula="of:=IF([.W219]=&quot;NOT REVIEW ELIGIBLE&quot;;&quot;DO NOT BEGIN SETTLEMENT REVIEW — RESOLVE READINESS OR CONTRADICTION CONDITIONS&quot;;IF([.W2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cell office:value-type="string" table:formula="of:=IF([.W220]=&quot;NOT REVIEW ELIGIBLE&quot;;&quot;DO NOT BEGIN SETTLEMENT REVIEW — RESOLVE READINESS OR CONTRADICTION CONDITIONS&quot;;IF([.W2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cell office:value-type="string" table:formula="of:=IF([.W221]=&quot;NOT REVIEW ELIGIBLE&quot;;&quot;DO NOT BEGIN SETTLEMENT REVIEW — RESOLVE READINESS OR CONTRADICTION CONDITIONS&quot;;IF([.W2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cell office:value-type="string" table:formula="of:=IF([.W222]=&quot;NOT REVIEW ELIGIBLE&quot;;&quot;DO NOT BEGIN SETTLEMENT REVIEW — RESOLVE READINESS OR CONTRADICTION CONDITIONS&quot;;IF([.W2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cell office:value-type="string" table:formula="of:=IF([.W223]=&quot;NOT REVIEW ELIGIBLE&quot;;&quot;DO NOT BEGIN SETTLEMENT REVIEW — RESOLVE READINESS OR CONTRADICTION CONDITIONS&quot;;IF([.W2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cell office:value-type="string" table:formula="of:=IF([.W224]=&quot;NOT REVIEW ELIGIBLE&quot;;&quot;DO NOT BEGIN SETTLEMENT REVIEW — RESOLVE READINESS OR CONTRADICTION CONDITIONS&quot;;IF([.W2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cell office:value-type="string" table:formula="of:=IF([.W225]=&quot;NOT REVIEW ELIGIBLE&quot;;&quot;DO NOT BEGIN SETTLEMENT REVIEW — RESOLVE READINESS OR CONTRADICTION CONDITIONS&quot;;IF([.W2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cell office:value-type="string" table:formula="of:=IF([.W226]=&quot;NOT REVIEW ELIGIBLE&quot;;&quot;DO NOT BEGIN SETTLEMENT REVIEW — RESOLVE READINESS OR CONTRADICTION CONDITIONS&quot;;IF([.W2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cell office:value-type="string" table:formula="of:=IF([.W227]=&quot;NOT REVIEW ELIGIBLE&quot;;&quot;DO NOT BEGIN SETTLEMENT REVIEW — RESOLVE READINESS OR CONTRADICTION CONDITIONS&quot;;IF([.W2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cell office:value-type="string" table:formula="of:=IF([.W228]=&quot;NOT REVIEW ELIGIBLE&quot;;&quot;DO NOT BEGIN SETTLEMENT REVIEW — RESOLVE READINESS OR CONTRADICTION CONDITIONS&quot;;IF([.W2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cell office:value-type="string" table:formula="of:=IF([.W229]=&quot;NOT REVIEW ELIGIBLE&quot;;&quot;DO NOT BEGIN SETTLEMENT REVIEW — RESOLVE READINESS OR CONTRADICTION CONDITIONS&quot;;IF([.W2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cell office:value-type="string" table:formula="of:=IF([.W230]=&quot;NOT REVIEW ELIGIBLE&quot;;&quot;DO NOT BEGIN SETTLEMENT REVIEW — RESOLVE READINESS OR CONTRADICTION CONDITIONS&quot;;IF([.W2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cell office:value-type="string" table:formula="of:=IF([.W231]=&quot;NOT REVIEW ELIGIBLE&quot;;&quot;DO NOT BEGIN SETTLEMENT REVIEW — RESOLVE READINESS OR CONTRADICTION CONDITIONS&quot;;IF([.W2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cell office:value-type="string" table:formula="of:=IF([.W232]=&quot;NOT REVIEW ELIGIBLE&quot;;&quot;DO NOT BEGIN SETTLEMENT REVIEW — RESOLVE READINESS OR CONTRADICTION CONDITIONS&quot;;IF([.W2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cell office:value-type="string" table:formula="of:=IF([.W233]=&quot;NOT REVIEW ELIGIBLE&quot;;&quot;DO NOT BEGIN SETTLEMENT REVIEW — RESOLVE READINESS OR CONTRADICTION CONDITIONS&quot;;IF([.W2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cell office:value-type="string" table:formula="of:=IF([.W234]=&quot;NOT REVIEW ELIGIBLE&quot;;&quot;DO NOT BEGIN SETTLEMENT REVIEW — RESOLVE READINESS OR CONTRADICTION CONDITIONS&quot;;IF([.W2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cell office:value-type="string" table:formula="of:=IF([.W235]=&quot;NOT REVIEW ELIGIBLE&quot;;&quot;DO NOT BEGIN SETTLEMENT REVIEW — RESOLVE READINESS OR CONTRADICTION CONDITIONS&quot;;IF([.W2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cell office:value-type="string" table:formula="of:=IF([.W236]=&quot;NOT REVIEW ELIGIBLE&quot;;&quot;DO NOT BEGIN SETTLEMENT REVIEW — RESOLVE READINESS OR CONTRADICTION CONDITIONS&quot;;IF([.W2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cell office:value-type="string" table:formula="of:=IF([.W237]=&quot;NOT REVIEW ELIGIBLE&quot;;&quot;DO NOT BEGIN SETTLEMENT REVIEW — RESOLVE READINESS OR CONTRADICTION CONDITIONS&quot;;IF([.W2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cell office:value-type="string" table:formula="of:=IF([.W238]=&quot;NOT REVIEW ELIGIBLE&quot;;&quot;DO NOT BEGIN SETTLEMENT REVIEW — RESOLVE READINESS OR CONTRADICTION CONDITIONS&quot;;IF([.W2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cell office:value-type="string" table:formula="of:=IF([.W239]=&quot;NOT REVIEW ELIGIBLE&quot;;&quot;DO NOT BEGIN SETTLEMENT REVIEW — RESOLVE READINESS OR CONTRADICTION CONDITIONS&quot;;IF([.W2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cell office:value-type="string" table:formula="of:=IF([.W240]=&quot;NOT REVIEW ELIGIBLE&quot;;&quot;DO NOT BEGIN SETTLEMENT REVIEW — RESOLVE READINESS OR CONTRADICTION CONDITIONS&quot;;IF([.W2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cell office:value-type="string" table:formula="of:=IF([.W241]=&quot;NOT REVIEW ELIGIBLE&quot;;&quot;DO NOT BEGIN SETTLEMENT REVIEW — RESOLVE READINESS OR CONTRADICTION CONDITIONS&quot;;IF([.W2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cell office:value-type="string" table:formula="of:=IF([.W242]=&quot;NOT REVIEW ELIGIBLE&quot;;&quot;DO NOT BEGIN SETTLEMENT REVIEW — RESOLVE READINESS OR CONTRADICTION CONDITIONS&quot;;IF([.W2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cell office:value-type="string" table:formula="of:=IF([.W243]=&quot;NOT REVIEW ELIGIBLE&quot;;&quot;DO NOT BEGIN SETTLEMENT REVIEW — RESOLVE READINESS OR CONTRADICTION CONDITIONS&quot;;IF([.W2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cell office:value-type="string" table:formula="of:=IF([.W244]=&quot;NOT REVIEW ELIGIBLE&quot;;&quot;DO NOT BEGIN SETTLEMENT REVIEW — RESOLVE READINESS OR CONTRADICTION CONDITIONS&quot;;IF([.W2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cell office:value-type="string" table:formula="of:=IF([.W245]=&quot;NOT REVIEW ELIGIBLE&quot;;&quot;DO NOT BEGIN SETTLEMENT REVIEW — RESOLVE READINESS OR CONTRADICTION CONDITIONS&quot;;IF([.W2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cell office:value-type="string" table:formula="of:=IF([.W246]=&quot;NOT REVIEW ELIGIBLE&quot;;&quot;DO NOT BEGIN SETTLEMENT REVIEW — RESOLVE READINESS OR CONTRADICTION CONDITIONS&quot;;IF([.W2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cell office:value-type="string" table:formula="of:=IF([.W247]=&quot;NOT REVIEW ELIGIBLE&quot;;&quot;DO NOT BEGIN SETTLEMENT REVIEW — RESOLVE READINESS OR CONTRADICTION CONDITIONS&quot;;IF([.W2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cell office:value-type="string" table:formula="of:=IF([.W248]=&quot;NOT REVIEW ELIGIBLE&quot;;&quot;DO NOT BEGIN SETTLEMENT REVIEW — RESOLVE READINESS OR CONTRADICTION CONDITIONS&quot;;IF([.W2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cell office:value-type="string" table:formula="of:=IF([.W249]=&quot;NOT REVIEW ELIGIBLE&quot;;&quot;DO NOT BEGIN SETTLEMENT REVIEW — RESOLVE READINESS OR CONTRADICTION CONDITIONS&quot;;IF([.W2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cell office:value-type="string" table:formula="of:=IF([.W250]=&quot;NOT REVIEW ELIGIBLE&quot;;&quot;DO NOT BEGIN SETTLEMENT REVIEW — RESOLVE READINESS OR CONTRADICTION CONDITIONS&quot;;IF([.W2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cell office:value-type="string" table:formula="of:=IF([.W251]=&quot;NOT REVIEW ELIGIBLE&quot;;&quot;DO NOT BEGIN SETTLEMENT REVIEW — RESOLVE READINESS OR CONTRADICTION CONDITIONS&quot;;IF([.W2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