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2LinkageStatus" table:condition="of:cell-content-is-in-list(&quot;UNLINKED&quot;;&quot;LINKED&quot;;&quot;AMBIGUOUS&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2LinkageStatus"/>
          <table:table-cell/>
          <table:table-cell table:content-validation-name="Build482EvidenceStatus"/>
          <table:table-cell/>
          <table:table-cell table:content-validation-name="Build482VerificationResult"/>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