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1B00000493C56D3AD7.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8"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5" table:number-rows-spanned="1">
            <text:p>MISSION CONTROL</text:p>
          </table:table-cell>
          <table:covered-table-cell table:number-columns-repeated="4" table:style-name="ce12"/>
          <table:table-cell table:style-name="ce40" office:value-type="string" ns42:value-type="string" table:number-columns-spanned="3" table:number-rows-spanned="1">
            <text:p>PERIOD</text:p>
            <text:p>90 Days (Default)</text:p>
          </table:table-cell>
          <table:covered-table-cell table:number-columns-repeated="2" table:style-name="ce24"/>
          <table:table-cell table:style-name="ce2" office:value-type="string" ns42:value-type="string" table:number-columns-spanned="2" table:number-rows-spanned="1">
            <text:p>DATE</text:p>
            <text:p>Workbook Local</text:p>
          </table:table-cell>
          <table:covered-table-cell table:style-name="ce4"/>
          <table:table-cell table:style-name="ce13" office:value-type="string" ns42:value-type="string" table:number-columns-spanned="2" table:number-rows-spanned="1">
            <text:p>DATA FRESHNESS</text:p>
            <text:p>Awaiting Data</text:p>
          </table:table-cell>
          <table:covered-table-cell table:style-name="ce15"/>
          <table:table-cell table:style-name="ce40" office:value-type="string" ns42:value-type="string" table:number-columns-spanned="2" table:number-rows-spanned="1">
            <text:p>WORKBOOK HEALTH</text:p>
            <text:p>Not Evaluated</text:p>
          </table:table-cell>
          <table:covered-table-cell table:style-name="ce24"/>
        </table:table-row>
        <table:table-row table:style-name="ro2">
          <table:table-cell table:style-name="ce2" office:value-type="string" ns42:value-type="string" table:number-columns-spanned="3" table:number-rows-spanned="1">
            <text:p>🏠 MISSION CONTROL</text:p>
          </table:table-cell>
          <table:covered-table-cell table:number-columns-repeated="2" table:style-name="ce4"/>
          <table:table-cell table:style-name="ce21" office:value-type="string" ns42: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ns42:value-type="string" table:number-columns-spanned="5" table:number-rows-spanned="1">
            <text:p>🎯 TODAY'S TOP 3 <text:s/>· <text:s/>3 ACTIONS</text:p>
          </table:table-cell>
          <table:covered-table-cell table:number-columns-repeated="4" table:style-name="ce30"/>
          <table:table-cell table:style-name="ce2" office:value-type="string" ns42:value-type="string" table:number-columns-spanned="6" table:number-rows-spanned="1">
            <text:p>💰 CAPITAL HEALTH</text:p>
          </table:table-cell>
          <table:covered-table-cell table:number-columns-repeated="5" table:style-name="ce4"/>
          <table:table-cell table:style-name="ce13" office:value-type="string" ns42:value-type="string" table:number-columns-spanned="4" table:number-rows-spanned="1">
            <text:p>⚠️ OPPORTUNITY + RISK</text:p>
          </table:table-cell>
          <table:covered-table-cell table:number-columns-repeated="3" table:style-name="ce15"/>
          <table:table-cell table:style-name="ce40" office:value-type="string" ns42: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ns42:value-type="string">
            <text:p>1</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3" office:value-type="string" ns42:value-type="string" table:number-columns-spanned="2" table:number-rows-spanned="1">
            <text:p>AVAILABLE CASH</text:p>
          </table:table-cell>
          <table:covered-table-cell table:style-name="ce30"/>
          <table:table-cell table:style-name="ce3" office:value-type="string" ns42:value-type="string" table:number-columns-spanned="2" table:number-rows-spanned="1">
            <text:p>REDEPLOYMENT</text:p>
          </table:table-cell>
          <table:covered-table-cell table:style-name="ce30"/>
          <table:table-cell table:style-name="ce3" office:value-type="string" ns42:value-type="string" table:number-columns-spanned="2" table:number-rows-spanned="1">
            <text:p>RECYCLING RATE</text:p>
          </table:table-cell>
          <table:covered-table-cell table:style-name="ce30"/>
          <table:table-cell table:style-name="ce3" office:value-type="string" ns42:value-type="string" table:number-columns-spanned="2" table:number-rows-spanned="1">
            <text:p>🟢 OPPORTUNITY</text:p>
          </table:table-cell>
          <table:covered-table-cell table:style-name="ce30"/>
          <table:table-cell table:style-name="ce3" office:value-type="string" ns42:value-type="string" table:number-columns-spanned="2" table:number-rows-spanned="1">
            <text:p>🔴 RISK</text:p>
          </table:table-cell>
          <table:covered-table-cell table:style-name="ce30"/>
          <table:table-cell table:style-name="ce30" office:value-type="string" ns42:value-type="string">
            <text:p>SALES</text:p>
          </table:table-cell>
          <table:table-cell table:style-name="ce30" office:value-type="string" ns42:value-type="string">
            <text:p>GAIN</text:p>
          </table:table-cell>
          <table:table-cell table:style-name="ce30" office:value-type="string" ns42:value-type="string">
            <text:p>RECYCLED</text:p>
          </table:table-cell>
        </table:table-row>
        <table:table-row table:style-name="ro3">
          <table:table-cell table:style-name="ce5" office:value-type="string" ns42:value-type="string">
            <text:p>2</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text:p>
          </table:table-cell>
          <table:covered-table-cell table:style-name="ce15"/>
          <table:table-cell table:style-name="ce13" office:value-type="string" ns42:value-type="string" table:number-columns-spanned="2" table:number-rows-spanned="1">
            <text:p>— · 90D</text:p>
          </table:table-cell>
          <table:covered-table-cell table:style-name="ce15"/>
          <table:table-cell table:style-name="ce26" office:value-type="string" ns42:value-type="string" table:number-columns-spanned="2" table:number-rows-spanned="1">
            <text:p>Awaiting evidence</text:p>
          </table:table-cell>
          <table:covered-table-cell table:style-name="ce17"/>
          <table:table-cell table:style-name="ce26" office:value-type="string" ns42:value-type="string" table:number-columns-spanned="2" table:number-rows-spanned="1">
            <text:p>Awaiting evidence</text:p>
          </table:table-cell>
          <table:covered-table-cell table:style-name="ce17"/>
          <table:table-cell table:number-columns-repeated="3" table:style-name="ce15" office:value-type="string" ns42:value-type="string">
            <text:p>—</text:p>
          </table:table-cell>
        </table:table-row>
        <table:table-row table:style-name="ro3">
          <table:table-cell table:style-name="ce6" office:value-type="string" ns42:value-type="string">
            <text:p>3</text:p>
          </table:table-cell>
          <table:table-cell table:style-name="ce14" office:value-type="string" ns42:value-type="string" table:number-columns-spanned="4" table:number-rows-spanned="1">
            <text:p>Awaiting evidence-supported action</text:p>
          </table:table-cell>
          <table:covered-table-cell table:number-columns-repeated="3" table:style-name="ce19"/>
          <table:table-cell table:style-name="ce27" office:value-type="string" ns42:value-type="string" table:number-columns-spanned="3" table:number-rows-spanned="1">
            <text:p>📊 CAPITAL LOCATION</text:p>
          </table:table-cell>
          <table:covered-table-cell table:number-columns-repeated="2" table:style-name="ce18"/>
          <table:table-cell table:style-name="ce27" office:value-type="string" ns42:value-type="string" table:number-columns-spanned="3" table:number-rows-spanned="1">
            <text:p>📈 REUSABLE CAPITAL TREND</text:p>
          </table:table-cell>
          <table:covered-table-cell table:number-columns-repeated="2" table:style-name="ce18"/>
          <table:table-cell table:style-name="ce26" office:value-type="string" ns42:value-type="string" table:number-columns-spanned="4" table:number-rows-spanned="1">
            <text:p>No promoted signal without identifiable support.</text:p>
          </table:table-cell>
          <table:covered-table-cell table:number-columns-repeated="3" table:style-name="ce17"/>
          <table:table-cell table:style-name="ce30" office:value-type="string" ns42:value-type="string">
            <text:p>ORDERS</text:p>
          </table:table-cell>
          <table:table-cell table:style-name="ce30" office:value-type="string" ns42:value-type="string">
            <text:p>ITEMS</text:p>
          </table:table-cell>
          <table:table-cell table:style-name="ce30" office:value-type="string" ns42:value-type="string">
            <text:p>DAYS</text:p>
          </table:table-cell>
        </table:table-row>
        <table:table-row table:style-name="ro4">
          <table:table-cell table:style-name="ce13" office:value-type="string" ns42:value-type="string" table:number-columns-spanned="5" table:number-rows-spanned="1">
            <text:p>⭐ Ranked only when Force Rank evidence exists</text:p>
          </table:table-cell>
          <table:covered-table-cell table:number-columns-repeated="4" table:style-name="ce15"/>
          <table:table-cell table:style-name="ce26" office:value-type="string" ns42:value-type="string" table:number-columns-spanned="3" table:number-rows-spanned="1">
            <text:p>Visual reserved</text:p>
            <text:p>Event-derived capital state</text:p>
          </table:table-cell>
          <table:covered-table-cell table:number-columns-repeated="2" table:style-name="ce17"/>
          <table:table-cell table:style-name="ce26" office:value-type="string" ns42:value-type="string" table:number-columns-spanned="3" table:number-rows-spanned="1">
            <text:p>Trend reserved</text:p>
            <text:p>Historical evidence required</text:p>
          </table:table-cell>
          <table:covered-table-cell table:number-columns-repeated="2" table:style-name="ce17"/>
          <table:table-cell table:style-name="ce13" office:value-type="string" ns42: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ns42:value-type="string">
            <text:p>—</text:p>
          </table:table-cell>
        </table:table-row>
        <table:table-row table:style-name="ro2">
          <table:table-cell table:style-name="ce8" office:value-type="string" ns42: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ns42:value-type="string" table:number-columns-spanned="4" table:number-rows-spanned="1">
            <text:p>🏪 PLATFORM PERFORMANCE</text:p>
          </table:table-cell>
          <table:covered-table-cell table:number-columns-repeated="3" table:style-name="ce30"/>
          <table:table-cell table:style-name="ce3" office:value-type="string" ns42:value-type="string" table:number-columns-spanned="4" table:number-rows-spanned="1">
            <text:p>📈 MARKET ATTENTION TREND</text:p>
          </table:table-cell>
          <table:covered-table-cell table:number-columns-repeated="3" table:style-name="ce30"/>
          <table:table-cell table:style-name="ce3" office:value-type="string" ns42:value-type="string" table:number-columns-spanned="3" table:number-rows-spanned="1">
            <text:p>🔥 ATTENTION HEAT MAP</text:p>
          </table:table-cell>
          <table:covered-table-cell table:number-columns-repeated="2" table:style-name="ce30"/>
          <table:table-cell table:style-name="ce3" office:value-type="string" ns42:value-type="string" table:number-columns-spanned="3" table:number-rows-spanned="1">
            <text:p>📦 INVENTORY MOVEMENT</text:p>
          </table:table-cell>
          <table:covered-table-cell table:number-columns-repeated="2" table:style-name="ce30"/>
          <table:table-cell table:style-name="ce3" office:value-type="string" ns42: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ns42: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ns42: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ns42:value-type="string" table:number-columns-spanned="3" table:number-rows-spanned="1">
            <text:p>VISUAL RESERVED</text:p>
            <text:p>Evidence-backed category attention</text:p>
          </table:table-cell>
          <table:covered-table-cell table:number-columns-repeated="2" table:style-name="ce17"/>
          <table:table-cell table:style-name="ce26" office:value-type="string" ns42:value-type="string" table:number-columns-spanned="3" table:number-rows-spanned="1">
            <text:p>VISUAL RESERVED</text:p>
            <text:p>Inventory event movement</text:p>
          </table:table-cell>
          <table:covered-table-cell table:number-columns-repeated="2" table:style-name="ce17"/>
          <table:table-cell table:style-name="ce26" office:value-type="string" ns42: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ns42:value-type="string" table:number-columns-spanned="4" table:number-rows-spanned="1">
            <text:p>⚡ FORCE RANK: AWAITING DATA</text:p>
          </table:table-cell>
          <table:covered-table-cell table:number-columns-repeated="3" table:style-name="ce18"/>
          <table:table-cell table:style-name="ce27" office:value-type="string" ns42:value-type="string" table:number-columns-spanned="4" table:number-rows-spanned="1">
            <text:p>📊 DATA COVERAGE: NOT EVALUATED</text:p>
          </table:table-cell>
          <table:covered-table-cell table:number-columns-repeated="3" table:style-name="ce18"/>
          <table:table-cell table:style-name="ce27" office:value-type="string" ns42:value-type="string" table:number-columns-spanned="3" table:number-rows-spanned="1">
            <text:p>✅ DATA QUALITY: NOT EVALUATED</text:p>
          </table:table-cell>
          <table:covered-table-cell table:number-columns-repeated="2" table:style-name="ce18"/>
          <table:table-cell table:style-name="ce27" office:value-type="string" ns42:value-type="string" table:number-columns-spanned="3" table:number-rows-spanned="1">
            <text:p>☁ BACKUP: NOT EVALUATED</text:p>
          </table:table-cell>
          <table:covered-table-cell table:number-columns-repeated="2" table:style-name="ce18"/>
          <table:table-cell table:style-name="ce27" office:value-type="string" ns42: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ns42:value-type="string" table:number-columns-spanned="3" table:number-rows-spanned="1">
            <text:p>MarketDEX</text:p>
          </table:table-cell>
          <table:covered-table-cell table:number-columns-repeated="2" table:style-name="ce42"/>
          <table:table-cell table:style-name="ce75" office:value-type="string" ns42:value-type="string" table:number-columns-spanned="6" table:number-rows-spanned="1">
            <text:p>📦 INVENTORY COMMAND CENTER</text:p>
          </table:table-cell>
          <table:covered-table-cell table:number-columns-repeated="5" table:style-name="ce75"/>
          <table:table-cell table:style-name="ce65" office:value-type="string" ns42:value-type="string" table:number-columns-spanned="3" table:number-rows-spanned="1">
            <text:p>OWNED INVENTORY</text:p>
            <text:p>Authoritative Summary</text:p>
          </table:table-cell>
          <table:covered-table-cell table:number-columns-repeated="2" table:style-name="ce65"/>
          <table:table-cell table:style-name="ce86" office:value-type="string" ns42:value-type="string" table:number-columns-spanned="3" table:number-rows-spanned="1">
            <text:p>LISTING READINESS</text:p>
            <text:p>Derived</text:p>
          </table:table-cell>
          <table:covered-table-cell table:number-columns-repeated="2" table:style-name="ce86"/>
          <table:table-cell table:style-name="ce88" office:value-type="string" ns42:value-type="string" table:number-columns-spanned="3" table:number-rows-spanned="1">
            <text:p>DATA TRUST</text:p>
            <text:p>Not Evaluated</text:p>
          </table:table-cell>
          <table:covered-table-cell table:number-columns-repeated="2" table:style-name="ce88"/>
        </table:table-row>
        <table:table-row table:style-name="ro7">
          <table:table-cell table:style-name="ce43" office:value-type="string" ns42: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ns42: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ns42:value-type="string" table:number-columns-spanned="3" table:number-rows-spanned="1">
            <text:p>OWNED POSITIONS</text:p>
          </table:table-cell>
          <table:covered-table-cell table:number-columns-repeated="2" table:style-name="ce45"/>
          <table:table-cell table:style-name="ce45" office:value-type="string" ns42:value-type="string" table:number-columns-spanned="3" table:number-rows-spanned="1">
            <text:p>CURRENT UNITS</text:p>
          </table:table-cell>
          <table:covered-table-cell table:number-columns-repeated="2" table:style-name="ce45"/>
          <table:table-cell table:style-name="ce45" office:value-type="string" ns42:value-type="string" table:number-columns-spanned="3" table:number-rows-spanned="1">
            <text:p>LANDED COST</text:p>
          </table:table-cell>
          <table:covered-table-cell table:number-columns-repeated="2" table:style-name="ce45"/>
          <table:table-cell table:style-name="ce45" office:value-type="string" ns42:value-type="string" table:number-columns-spanned="3" table:number-rows-spanned="1">
            <text:p>READY TO LIST</text:p>
          </table:table-cell>
          <table:covered-table-cell table:number-columns-repeated="2" table:style-name="ce45"/>
          <table:table-cell table:style-name="ce45" office:value-type="string" ns42:value-type="string" table:number-columns-spanned="3" table:number-rows-spanned="1">
            <text:p>INVENTORY AGE</text:p>
          </table:table-cell>
          <table:covered-table-cell table:number-columns-repeated="2" table:style-name="ce45"/>
          <table:table-cell table:style-name="ce45" office:value-type="string" ns42:value-type="string" table:number-columns-spanned="3" table:number-rows-spanned="1">
            <text:p>REVIEW REQUIRED</text:p>
          </table:table-cell>
          <table:covered-table-cell table:number-columns-repeated="2" table:style-name="ce45"/>
        </table:table-row>
        <table:table-row table:style-name="ro8">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46" office:value-type="string" ns42:value-type="string" table:number-columns-spanned="3" table:number-rows-spanned="1">
            <text:p>—</text:p>
          </table:table-cell>
          <table:covered-table-cell table:number-columns-repeated="2" table:style-name="ce46"/>
          <table:table-cell table:style-name="ce83" office:value-type="string" ns42:value-type="string" table:number-columns-spanned="3" table:number-rows-spanned="1">
            <text:p>0</text:p>
          </table:table-cell>
          <table:covered-table-cell table:number-columns-repeated="2" table:style-name="ce83"/>
          <table:table-cell table:style-name="ce49" office:value-type="string" ns42:value-type="string" table:number-columns-spanned="3" table:number-rows-spanned="1">
            <text:p>1 HOLD</text:p>
            <text:p>REVIEW PLANNED</text:p>
          </table:table-cell>
          <table:covered-table-cell table:number-columns-repeated="2" table:style-name="ce49"/>
          <table:table-cell table:style-name="ce46" office:value-type="string" ns42:value-type="string" table:number-columns-spanned="3" table:number-rows-spanned="1">
            <text:p>—</text:p>
          </table:table-cell>
          <table:covered-table-cell table:number-columns-repeated="2" table:style-name="ce46"/>
        </table:table-row>
        <table:table-row table:style-name="ro9">
          <table:table-cell table:style-name="ce47" office:value-type="string" ns42: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ns42: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ns42:value-type="string" table:number-columns-spanned="3" table:number-rows-spanned="1">
            <text:p>DATE</text:p>
          </table:table-cell>
          <table:covered-table-cell table:number-columns-repeated="2" table:style-name="ce49"/>
          <table:table-cell table:style-name="ce49" office:value-type="string" ns42:value-type="string" table:number-columns-spanned="5" table:number-rows-spanned="1">
            <text:p>PRODUCT</text:p>
          </table:table-cell>
          <table:covered-table-cell table:number-columns-repeated="4" table:style-name="ce49"/>
          <table:table-cell table:style-name="ce49" office:value-type="string" ns42:value-type="string" table:number-columns-spanned="2" table:number-rows-spanned="1">
            <text:p>QUANTITY</text:p>
          </table:table-cell>
          <table:covered-table-cell table:style-name="ce49"/>
          <table:table-cell table:style-name="ce49" office:value-type="string" ns42:value-type="string" table:number-columns-spanned="3" table:number-rows-spanned="1">
            <text:p>TOTAL PAID</text:p>
          </table:table-cell>
          <table:covered-table-cell table:number-columns-repeated="2" table:style-name="ce49"/>
          <table:table-cell table:style-name="ce49" office:value-type="string" ns42:value-type="string" table:number-columns-spanned="3" table:number-rows-spanned="1">
            <text:p>SOURCE</text:p>
          </table:table-cell>
          <table:covered-table-cell table:number-columns-repeated="2" table:style-name="ce49"/>
          <table:table-cell table:style-name="ce53" office:value-type="string" ns42:value-type="string" table:number-columns-spanned="2" table:number-rows-spanned="1">
            <text:p>CAPTURE</text:p>
            <text:p>STATUS</text:p>
          </table:table-cell>
          <table:covered-table-cell table:style-name="ce53"/>
        </table:table-row>
        <table:table-row table:style-name="ro8">
          <table:table-cell table:style-name="ce50" office:value-type="string" ns42:value-type="string" table:number-columns-spanned="3" table:number-rows-spanned="1">
            <text:p>06-25-2026</text:p>
          </table:table-cell>
          <table:covered-table-cell table:number-columns-repeated="2" table:style-name="ce50"/>
          <table:table-cell table:style-name="ce50" office:value-type="string" ns42:value-type="string" table:number-columns-spanned="5" table:number-rows-spanned="1">
            <text:p>Mega Greninja ex Premium Collection</text:p>
          </table:table-cell>
          <table:covered-table-cell table:number-columns-repeated="4" table:style-name="ce50"/>
          <table:table-cell table:style-name="ce81" office:value-type="float" office:value="2" ns42:value-type="float" table:number-columns-spanned="2" table:number-rows-spanned="1">
            <text:p>2</text:p>
          </table:table-cell>
          <table:covered-table-cell table:style-name="ce59"/>
          <table:table-cell table:style-name="ce81" office:value-type="float" office:value="97.97" ns42:value-type="float" table:number-columns-spanned="3" table:number-rows-spanned="1">
            <text:p>97.97</text:p>
          </table:table-cell>
          <table:covered-table-cell table:number-columns-repeated="2" table:style-name="ce59"/>
          <table:table-cell table:style-name="ce50" office:value-type="string" ns42:value-type="string" table:number-columns-spanned="3" table:number-rows-spanned="1">
            <text:p>Target</text:p>
          </table:table-cell>
          <table:covered-table-cell table:number-columns-repeated="2" table:style-name="ce50"/>
          <table:table-cell table:style-name="ce76" table:formula="of:=IF(AND([.A9]&lt;&gt;&quot;&quot;;[.D9]&lt;&gt;&quot;&quot;;[.I9]&gt;0;[.K9]&gt;=0;[.N9]&lt;&gt;&quot;&quot;);&quot;READY FOR REVIEW&quot;;&quot;INCOMPLETE&quot;)" office:value-type="string" office:string-value="READY FOR REVIEW" ns42:value-type="string" table:number-columns-spanned="2" table:number-rows-spanned="1">
            <text:p>READY FOR REVIEW</text:p>
          </table:table-cell>
          <table:covered-table-cell table:style-name="ce76"/>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ns42:value-type="string" table:number-columns-spanned="2" table:number-rows-spanned="1">
            <text:p>INCOMPLETE</text:p>
          </table:table-cell>
          <table:covered-table-cell table:style-name="ce45"/>
        </table:table-row>
        <table:table-row table:style-name="ro8">
          <table:table-cell table:style-name="ce52" office:value-type="string" ns42: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ns42: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2" table:number-rows-spanned="1">
            <text:p>FORM</text:p>
          </table:table-cell>
          <table:covered-table-cell table:style-name="ce53"/>
          <table:table-cell table:style-name="ce53" office:value-type="string" ns42:value-type="string" table:number-columns-spanned="2" table:number-rows-spanned="1">
            <text:p>QTY</text:p>
          </table:table-cell>
          <table:covered-table-cell table:style-name="ce53"/>
          <table:table-cell table:style-name="ce53" office:value-type="string" ns42:value-type="string" table:number-columns-spanned="2" table:number-rows-spanned="1">
            <text:p>BUSINESS STATE</text:p>
          </table:table-cell>
          <table:covered-table-cell table:style-name="ce53"/>
          <table:table-cell table:style-name="ce53" office:value-type="string" ns42:value-type="string" table:number-columns-spanned="2" table:number-rows-spanned="1">
            <text:p>LOCATION</text:p>
          </table:table-cell>
          <table:covered-table-cell table:style-name="ce53"/>
          <table:table-cell table:style-name="ce87" office:value-type="string" ns42:value-type="string" table:number-columns-spanned="2" table:number-rows-spanned="1">
            <text:p>AVG UNIT COST</text:p>
          </table:table-cell>
          <table:covered-table-cell table:style-name="ce87"/>
          <table:table-cell table:style-name="ce53" office:value-type="string" ns42:value-type="string" table:number-columns-spanned="2" table:number-rows-spanned="1">
            <text:p>DAYS HELD</text:p>
          </table:table-cell>
          <table:covered-table-cell table:style-name="ce53"/>
          <table:table-cell table:style-name="ce87" office:value-type="string" ns42:value-type="string">
            <text:p>LISTING</text:p>
            <text:p>READY</text:p>
          </table:table-cell>
          <table:table-cell table:style-name="ce53" office:value-type="string" ns42: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ns42:value-type="string" table:number-columns-spanned="4" table:number-rows-spanned="1">
            <text:p>Mega Greninja ex Premium Collection</text:p>
          </table:table-cell>
          <table:covered-table-cell table:number-columns-repeated="3" table:style-name="ce54"/>
          <table:table-cell table:style-name="ce64" table:formula="of:=IF([.$P$24]=&quot;APPROVED FOR PROMOTION&quot;;&quot;SEALED PRODUCT&quot;;&quot;—&quot;)" office:value-type="string" office:string-value="SEALED PRODUCT" ns42:value-type="string" table:number-columns-spanned="2" table:number-rows-spanned="1">
            <text:p>SEALED PRODUCT</text:p>
          </table:table-cell>
          <table:covered-table-cell table:style-name="ce64"/>
          <table:table-cell table:style-name="ce55" table:formula="of:=IF([.$P$24]=&quot;APPROVED FOR PROMOTION&quot;;[.$I$9];&quot;—&quot;)" office:value-type="float" office:value="2" ns42:value-type="float" table:number-columns-spanned="2" table:number-rows-spanned="1">
            <text:p>2</text:p>
          </table:table-cell>
          <table:covered-table-cell table:style-name="ce55"/>
          <table:table-cell table:style-name="ce68" table:formula="of:=IF([.$P$24]=&quot;APPROVED FOR PROMOTION&quot;;&quot;OWNED&quot;;&quot;—&quot;)" office:value-type="string" office:string-value="OWNED" ns42:value-type="string" table:number-columns-spanned="2" table:number-rows-spanned="1">
            <text:p>OWNED</text:p>
          </table:table-cell>
          <table:covered-table-cell table:style-name="ce68"/>
          <table:table-cell table:style-name="ce68" table:formula="of:=IF([.H29]=&quot;&quot;;&quot;STORAGE - UNASSIGNED&quot;;&quot;STORAGE - &quot;&amp;[.H29])" office:value-type="string" office:string-value="STORAGE - Aquarium Stand" ns42:value-type="string" table:number-columns-spanned="2" table:number-rows-spanned="1">
            <text:p>STORAGE - Aquarium Stand</text:p>
          </table:table-cell>
          <table:covered-table-cell table:style-name="ce68"/>
          <table:table-cell table:style-name="ce55" table:formula="of:=IF([.$P$24]=&quot;APPROVED FOR PROMOTION&quot;;[.$K$9]/[.$I$9];&quot;—&quot;)" office:value-type="float" office:value="48.985" ns42: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ns42:value-type="float" table:number-columns-spanned="2" table:number-rows-spanned="1">
            <text:p>11</text:p>
          </table:table-cell>
          <table:covered-table-cell table:style-name="ce55"/>
          <table:table-cell table:style-name="ce66" office:value-type="string" ns42:value-type="string">
            <text:p>SHORT-TERM</text:p>
            <text:p>HOLD</text:p>
          </table:table-cell>
          <table:table-cell table:style-name="ce67" office:value-type="string" ns42:value-type="string">
            <text:p>REVIEW</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0" office:value-type="string" ns42:value-type="string" table:number-columns-spanned="4" table:number-rows-spanned="1">
            <text:p>Awaiting reviewed inventory evidence</text:p>
          </table:table-cell>
          <table:covered-table-cell table:number-columns-repeated="3" table:style-name="ce50"/>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able:number-columns-spanned="2" table:number-rows-spanned="1">
            <text:p>—</text:p>
          </table:table-cell>
          <table:covered-table-cell table:style-name="ce55"/>
          <table:table-cell table:style-name="ce55" office:value-type="string" ns42:value-type="string">
            <text:p>—</text:p>
          </table:table-cell>
          <table:table-cell table:style-name="ce67" office:value-type="string" ns42:value-type="string">
            <text:p>OPEN</text:p>
          </table:table-cell>
        </table:table-row>
        <table:table-row table:style-name="ro8">
          <table:table-cell table:style-name="ce57" office:value-type="string" ns42:value-type="string" table:number-columns-spanned="9" table:number-rows-spanned="1">
            <text:p>📦 INVENTORY COMPOSITION</text:p>
          </table:table-cell>
          <table:covered-table-cell table:number-columns-repeated="8" table:style-name="ce57"/>
          <table:table-cell table:style-name="ce63" office:value-type="string" ns42:value-type="string" table:number-columns-spanned="9" table:number-rows-spanned="1">
            <text:p>⚠ INVENTORY REVIEW GATE</text:p>
          </table:table-cell>
          <table:covered-table-cell table:number-columns-repeated="8" table:style-name="ce63"/>
        </table:table-row>
        <table:table-row table:style-name="ro8">
          <table:table-cell table:style-name="ce47" office:value-type="string" ns42: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ns42:value-type="string" table:number-columns-spanned="3" table:number-rows-spanned="1">
            <text:p>CAPTURE ROW</text:p>
          </table:table-cell>
          <table:covered-table-cell table:number-columns-repeated="2" table:style-name="ce53"/>
          <table:table-cell table:style-name="ce53" office:value-type="string" ns42:value-type="string" table:number-columns-spanned="3" table:number-rows-spanned="1">
            <text:p>REVIEW DECISION</text:p>
          </table:table-cell>
          <table:covered-table-cell table:number-columns-repeated="2" table:style-name="ce53"/>
          <table:table-cell table:style-name="ce53" office:value-type="string" ns42: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5" office:value-type="string" ns42:value-type="string" table:number-columns-spanned="3" table:number-rows-spanned="1">
            <text:p>9</text:p>
          </table:table-cell>
          <table:covered-table-cell table:number-columns-repeated="2" table:style-name="ce85"/>
          <table:table-cell table:style-name="ce45" office:value-type="string" ns42:value-type="string" table:number-columns-spanned="3" table:number-rows-spanned="1">
            <text:p>APPROVE</text:p>
          </table:table-cell>
          <table:covered-table-cell table:number-columns-repeated="2" table:style-name="ce45"/>
          <table:table-cell table:style-name="ce76" table:formula="of:=IF([.Q9]&lt;&gt;&quot;READY FOR REVIEW&quot;;&quot;NOT ELIGIBLE&quot;;IF(UPPER(TRIM([.M24]))=&quot;APPROVE&quot;;&quot;APPROVED FOR PROMOTION&quot;;IF(UPPER(TRIM([.M24]))=&quot;REJECT&quot;;&quot;REJECTED&quot;;&quot;AWAITING DECISION&quot;)))" office:value-type="string" office:string-value="APPROVED FOR PROMOTION" ns42:value-type="string" table:number-columns-spanned="3" table:number-rows-spanned="1">
            <text:p>APPROVED FOR PROMOTION</text:p>
          </table:table-cell>
          <table:covered-table-cell table:number-columns-repeated="2" table:style-name="ce76"/>
        </table:table-row>
        <table:table-row table:style-name="ro12">
          <table:covered-table-cell table:number-columns-repeated="9" table:style-name="ce47"/>
          <table:table-cell table:style-name="ce71" office:value-type="string" ns42: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1"/>
        </table:table-row>
        <table:table-row table:style-name="ro13">
          <table:table-cell table:style-name="ce58"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ns42:value-type="string" table:number-columns-spanned="18" table:number-rows-spanned="1">
            <text:p>✓ PROMOTED POSITION ACTIVE · SOURCE CAPTURE ROW 9 · CAPTURE HISTORY PRESERVED</text:p>
          </table:table-cell>
          <table:covered-table-cell table:number-columns-repeated="3" table:style-name="ce58"/>
          <table:covered-table-cell table:style-name="ce58" office:value-type="string" ns42:value-type="string">
            <text:p>💰 COST LAYERS · PROTECTED</text:p>
          </table:covered-table-cell>
          <table:covered-table-cell table:number-columns-repeated="3" table:style-name="ce58"/>
          <table:covered-table-cell table:style-name="ce58" office:value-type="string" ns42:value-type="string">
            <text:p>📍 LOCATION HISTORY · PROTECTED</text:p>
          </table:covered-table-cell>
          <table:covered-table-cell table:number-columns-repeated="3" table:style-name="ce58"/>
          <table:covered-table-cell table:style-name="ce58" office:value-type="string" ns42:value-type="string">
            <text:p>🔨 TRANSFORMATIONS</text:p>
            <text:p>SEPARATE HISTORY</text:p>
          </table:covered-table-cell>
          <table:covered-table-cell table:number-columns-repeated="2" table:style-name="ce58"/>
          <table:covered-table-cell table:style-name="ce58" office:value-type="string" ns42:value-type="string">
            <text:p>🔍 RECONCILIATION</text:p>
            <text:p>EVENT-BASED</text:p>
          </table:covered-table-cell>
          <table:covered-table-cell table:number-columns-repeated="2" table:style-name="ce58"/>
        </table:table-row>
        <table:table-row table:style-name="ro8">
          <table:table-cell table:style-name="ce60" office:value-type="string" ns42:value-type="string" table:number-columns-spanned="18" table:number-rows-spanned="1">
            <text:p>📍 STORAGE POSITION ASSIGNMENT · CURRENT INVENTORY POSITION</text:p>
          </table:table-cell>
          <table:covered-table-cell table:number-columns-repeated="17" table:style-name="ce60"/>
        </table:table-row>
        <table:table-row table:style-name="ro8">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LOCATION TYPE</text:p>
          </table:table-cell>
          <table:covered-table-cell table:number-columns-repeated="2" table:style-name="ce53"/>
          <table:table-cell table:style-name="ce53" office:value-type="string" ns42:value-type="string" table:number-columns-spanned="6" table:number-rows-spanned="1">
            <text:p>PHYSICAL STORAGE POSITION</text:p>
          </table:table-cell>
          <table:covered-table-cell table:number-columns-repeated="5" table:style-name="ce53"/>
          <table:table-cell table:style-name="ce53" office:value-type="string" ns42:value-type="string" table:number-columns-spanned="5" table:number-rows-spanned="1">
            <text:p>ASSIGNMENT STATUS</text:p>
          </table:table-cell>
          <table:covered-table-cell table:number-columns-repeated="4" table:style-name="ce53"/>
        </table:table-row>
        <table:table-row table:style-name="ro12">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table:formula="of:=IF([.H29]=&quot;&quot;;&quot;POSITION REQUIRED&quot;;&quot;LOCATION ASSIGNED&quot;)" office:value-type="string" office:string-value="LOCATION ASSIGNED" ns42:value-type="string" table:number-columns-spanned="5" table:number-rows-spanned="1">
            <text:p>LOCATION ASSIGNED</text:p>
          </table:table-cell>
          <table:covered-table-cell table:number-columns-repeated="4" table:style-name="ce76"/>
        </table:table-row>
        <table:table-row table:style-name="ro11">
          <table:table-cell table:style-name="ce62" office:value-type="string" ns42: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2"/>
        </table:table-row>
        <table:table-row table:style-name="ro5">
          <table:table-cell table:number-columns-repeated="18"/>
        </table:table-row>
        <table:table-row table:style-name="ro13">
          <table:table-cell table:style-name="ce63" office:value-type="string" ns42:value-type="string" table:number-columns-spanned="18" table:number-rows-spanned="1">
            <text:p>🚚 INVENTORY LOCATION MOVE · CONTROLLED MOVEMENT</text:p>
          </table:table-cell>
          <table:covered-table-cell table:number-columns-repeated="17" table:style-name="ce63"/>
        </table:table-row>
        <table:table-row table:style-name="ro1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CURRENT POSITION</text:p>
          </table:table-cell>
          <table:covered-table-cell table:number-columns-repeated="2" table:style-name="ce53"/>
          <table:table-cell table:style-name="ce53" office:value-type="string" ns42:value-type="string" table:number-columns-spanned="6" table:number-rows-spanned="1">
            <text:p>MOVE TO POSITION</text:p>
          </table:table-cell>
          <table:covered-table-cell table:number-columns-repeated="5" table:style-name="ce53"/>
          <table:table-cell table:style-name="ce53" office:value-type="string" ns42:value-type="string" table:number-columns-spanned="5" table:number-rows-spanned="1">
            <text:p>MOVE STATUS</text:p>
          </table:table-cell>
          <table:covered-table-cell table:number-columns-repeated="4" table:style-name="ce53"/>
        </table:table-row>
        <table:table-row table:style-name="ro13">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50" office:value-type="string" ns42:value-type="string" table:number-columns-spanned="6" table:number-rows-spanned="1">
            <text:p>Aquarium Stand</text:p>
          </table:table-cell>
          <table:covered-table-cell table:number-columns-repeated="5" table:style-name="ce50"/>
          <table:table-cell table:style-name="ce76" office:value-type="string" ns42:value-type="string" table:number-columns-spanned="5" table:number-rows-spanned="1">
            <text:p>MOVE EXECUTED · QTY 2</text:p>
          </table:table-cell>
          <table:covered-table-cell table:number-columns-repeated="4" table:style-name="ce76"/>
        </table:table-row>
        <table:table-row table:style-name="ro12">
          <table:table-cell table:style-name="ce62" office:value-type="string" ns42: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2"/>
        </table:table-row>
        <table:table-row table:style-name="ro13">
          <table:table-cell table:number-columns-repeated="18"/>
        </table:table-row>
        <table:table-row table:style-name="ro13">
          <table:table-cell table:style-name="ce60" office:value-type="string" ns42:value-type="string" table:number-columns-spanned="18" table:number-rows-spanned="1">
            <text:p>📍 LOCATION HISTORY · RECORDED MOVE EVENT</text:p>
          </table:table-cell>
          <table:covered-table-cell table:number-columns-repeated="17" table:style-name="ce60"/>
        </table:table-row>
        <table:table-row table:style-name="ro13">
          <table:table-cell table:style-name="ce53" office:value-type="string" ns42:value-type="string" table:number-columns-spanned="3" table:number-rows-spanned="1">
            <text:p>MOVE DATE</text:p>
          </table:table-cell>
          <table:covered-table-cell table:number-columns-repeated="2" table:style-name="ce53"/>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FROM</text:p>
          </table:table-cell>
          <table:covered-table-cell table:number-columns-repeated="2" table:style-name="ce53"/>
          <table:table-cell table:style-name="ce53" office:value-type="string" ns42:value-type="string" table:number-columns-spanned="3" table:number-rows-spanned="1">
            <text:p>TO</text:p>
          </table:table-cell>
          <table:covered-table-cell table:number-columns-repeated="2" table:style-name="ce53"/>
          <table:table-cell table:style-name="ce53" office:value-type="string" ns42:value-type="string" table:number-columns-spanned="5" table:number-rows-spanned="1">
            <text:p>EVENT STATE</text:p>
          </table:table-cell>
          <table:covered-table-cell table:number-columns-repeated="4" table:style-name="ce53"/>
        </table:table-row>
        <table:table-row table:style-name="ro13">
          <table:table-cell table:style-name="ce64" office:value-type="string" ns42:value-type="string" table:number-columns-spanned="3" table:number-rows-spanned="1">
            <text:p>07-05-2026</text:p>
          </table:table-cell>
          <table:covered-table-cell table:number-columns-repeated="2" table:style-name="ce6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Light Box Storage</text:p>
          </table:table-cell>
          <table:covered-table-cell table:number-columns-repeated="2" table:style-name="ce68"/>
          <table:table-cell table:style-name="ce68" office:value-type="string" ns42:value-type="string" table:number-columns-spanned="3" table:number-rows-spanned="1">
            <text:p>Aquarium Stand</text:p>
          </table:table-cell>
          <table:covered-table-cell table:number-columns-repeated="2" table:style-name="ce68"/>
          <table:table-cell table:style-name="ce68" office:value-type="string" ns42:value-type="string" table:number-columns-spanned="5" table:number-rows-spanned="1">
            <text:p>COMPLETED · QTY 2</text:p>
          </table:table-cell>
          <table:covered-table-cell table:number-columns-repeated="4" table:style-name="ce68"/>
        </table:table-row>
        <table:table-row table:style-name="ro12">
          <table:table-cell table:style-name="ce62" office:value-type="string" ns42: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2"/>
        </table:table-row>
        <table:table-row table:style-name="ro5">
          <table:table-cell table:number-columns-repeated="18"/>
        </table:table-row>
        <table:table-row table:style-name="ro14">
          <table:table-cell table:style-name="ce60" office:value-type="string" ns42:value-type="string" table:number-columns-spanned="18" table:number-rows-spanned="1">
            <text:p>💰 HOLD REVIEW · PROFIT POTENTIAL</text:p>
          </table:table-cell>
          <table:covered-table-cell table:number-columns-repeated="17" table:style-name="ce60"/>
        </table:table-row>
        <table:table-row table:style-name="ro14">
          <table:table-cell table:style-name="ce53" office:value-type="string" ns42:value-type="string" table:number-columns-spanned="4" table:number-rows-spanned="1">
            <text:p>PRODUCT / POSITION</text:p>
          </table:table-cell>
          <table:covered-table-cell table:number-columns-repeated="3" table:style-name="ce53"/>
          <table:table-cell table:style-name="ce53" office:value-type="string" ns42:value-type="string" table:number-columns-spanned="3" table:number-rows-spanned="1">
            <text:p>HOLD PLAN</text:p>
          </table:table-cell>
          <table:covered-table-cell table:number-columns-repeated="2" table:style-name="ce53"/>
          <table:table-cell table:style-name="ce53" office:value-type="string" ns42:value-type="string" table:number-columns-spanned="3" table:number-rows-spanned="1">
            <text:p>REVIEW WINDOW</text:p>
          </table:table-cell>
          <table:covered-table-cell table:number-columns-repeated="2" table:style-name="ce53"/>
          <table:table-cell table:style-name="ce53" office:value-type="string" ns42:value-type="string" table:number-columns-spanned="3" table:number-rows-spanned="1">
            <text:p>PRIMARY DECISION DRIVER</text:p>
          </table:table-cell>
          <table:covered-table-cell table:number-columns-repeated="2" table:style-name="ce53"/>
          <table:table-cell table:style-name="ce53" office:value-type="string" ns42:value-type="string" table:number-columns-spanned="5" table:number-rows-spanned="1">
            <text:p>REVIEW STATE</text:p>
          </table:table-cell>
          <table:covered-table-cell table:number-columns-repeated="4" table:style-name="ce53"/>
        </table:table-row>
        <table:table-row table:style-name="ro14">
          <table:table-cell table:style-name="ce61" office:value-type="string" ns42:value-type="string" table:number-columns-spanned="4" table:number-rows-spanned="1">
            <text:p>Mega Greninja ex Premium Collection</text:p>
          </table:table-cell>
          <table:covered-table-cell table:number-columns-repeated="3" table:style-name="ce61"/>
          <table:table-cell table:style-name="ce68" office:value-type="string" ns42:value-type="string" table:number-columns-spanned="3" table:number-rows-spanned="1">
            <text:p>SHORT-TERM HOLD</text:p>
          </table:table-cell>
          <table:covered-table-cell table:number-columns-repeated="2" table:style-name="ce68"/>
          <table:table-cell table:style-name="ce68" office:value-type="string" ns42:value-type="string" table:number-columns-spanned="3" table:number-rows-spanned="1">
            <text:p>EARLY DEC 2026</text:p>
          </table:table-cell>
          <table:covered-table-cell table:number-columns-repeated="2" table:style-name="ce68"/>
          <table:table-cell table:style-name="ce68" office:value-type="string" ns42:value-type="string" table:number-columns-spanned="3" table:number-rows-spanned="1">
            <text:p>PROFIT POTENTIAL</text:p>
          </table:table-cell>
          <table:covered-table-cell table:number-columns-repeated="2" table:style-name="ce68"/>
          <table:table-cell table:style-name="ce76" office:value-type="string" ns42:value-type="string" table:number-columns-spanned="5" table:number-rows-spanned="1">
            <text:p>PLANNED REVIEW</text:p>
          </table:table-cell>
          <table:covered-table-cell table:number-columns-repeated="4" table:style-name="ce76"/>
        </table:table-row>
        <table:table-row table:style-name="ro10">
          <table:table-cell table:style-name="ce62" office:value-type="string" ns42: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eBAY PROFIT TARGET · DECEMBER SELL REVIEW</text:p>
          </table:table-cell>
          <table:covered-table-cell table:number-columns-repeated="17" table:style-name="ce63"/>
        </table:table-row>
        <table:table-row table:style-name="ro12">
          <table:table-cell table:style-name="ce53" office:value-type="string" ns42:value-type="string" table:number-columns-spanned="3" table:number-rows-spanned="1">
            <text:p>MARKETPLACE</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QUANTITY</text:p>
          </table:table-cell>
          <table:covered-table-cell table:number-columns-repeated="2" table:style-name="ce53"/>
          <table:table-cell table:style-name="ce53" office:value-type="string" ns42:value-type="string" table:number-columns-spanned="3" table:number-rows-spanned="1">
            <text:p>TOTAL PROFIT TARGET</text:p>
          </table:table-cell>
          <table:covered-table-cell table:number-columns-repeated="2" table:style-name="ce53"/>
          <table:table-cell table:style-name="ce53" office:value-type="string" ns42:value-type="string" table:number-columns-spanned="3" table:number-rows-spanned="1">
            <text:p>FEE ASSUMPTION</text:p>
          </table:table-cell>
          <table:covered-table-cell table:number-columns-repeated="2" table:style-name="ce53"/>
          <table:table-cell table:style-name="ce53" office:value-type="string" ns42:value-type="string" table:number-columns-spanned="3" table:number-rows-spanned="1">
            <text:p>TARGET STATE</text:p>
          </table:table-cell>
          <table:covered-table-cell table:number-columns-repeated="2" table:style-name="ce53"/>
        </table:table-row>
        <table:table-row table:style-name="ro12">
          <table:table-cell table:style-name="ce45" office:value-type="string" ns42:value-type="string" table:number-columns-spanned="3" table:number-rows-spanned="1">
            <text:p>eBay</text:p>
          </table:table-cell>
          <table:covered-table-cell table:number-columns-repeated="2" table:style-name="ce45"/>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2</text:p>
          </table:table-cell>
          <table:covered-table-cell table:number-columns-repeated="2" table:style-name="ce70"/>
          <table:table-cell table:style-name="ce70" office:value-type="string" ns42:value-type="string" table:number-columns-spanned="3" table:number-rows-spanned="1">
            <text:p>$200.00</text:p>
          </table:table-cell>
          <table:covered-table-cell table:number-columns-repeated="2" table:style-name="ce70"/>
          <table:table-cell table:style-name="ce80" office:value-type="string" ns42:value-type="string" table:number-columns-spanned="3" table:number-rows-spanned="1">
            <text:p>REVIEW REQUIRED</text:p>
          </table:table-cell>
          <table:covered-table-cell table:number-columns-repeated="2" table:style-name="ce80"/>
          <table:table-cell table:style-name="ce76" office:value-type="string" ns42:value-type="string" table:number-columns-spanned="3" table:number-rows-spanned="1">
            <text:p>PRICE TARGET PENDING</text:p>
          </table:table-cell>
          <table:covered-table-cell table:number-columns-repeated="2" table:style-name="ce76"/>
        </table:table-row>
        <table:table-row table:style-name="ro12">
          <table:table-cell table:style-name="ce65" office:value-type="string" ns42:value-type="string" table:number-columns-spanned="6" table:number-rows-spanned="1">
            <text:p>SELLER PROFILE</text:p>
          </table:table-cell>
          <table:covered-table-cell table:number-columns-repeated="5" table:style-name="ce65"/>
          <table:table-cell table:style-name="ce65" office:value-type="string" ns42:value-type="string" table:number-columns-spanned="6" table:number-rows-spanned="1">
            <text:p>TARGET DEFINITION</text:p>
          </table:table-cell>
          <table:covered-table-cell table:number-columns-repeated="5" table:style-name="ce65"/>
          <table:table-cell table:style-name="ce65" office:value-type="string" ns42:value-type="string" table:number-columns-spanned="6" table:number-rows-spanned="1">
            <text:p>FEE CONTROL</text:p>
          </table:table-cell>
          <table:covered-table-cell table:number-columns-repeated="5" table:style-name="ce65"/>
        </table:table-row>
        <table:table-row table:style-name="ro15">
          <table:table-cell table:style-name="ce62" office:value-type="string" ns42:value-type="string" table:number-columns-spanned="6" table:number-rows-spanned="1">
            <text:p>NO STORE SUBSCRIPTION · NO PROMOTED LISTINGS</text:p>
          </table:table-cell>
          <table:covered-table-cell table:number-columns-repeated="5" table:style-name="ce62"/>
          <table:table-cell table:style-name="ce62" office:value-type="string" ns42:value-type="string" table:number-columns-spanned="6" table:number-rows-spanned="1">
            <text:p>$100 PROFIT PER BOX AFTER eBAY MARKETPLACE FEES · SHIPPING AND PACKAGING EXCLUDED</text:p>
          </table:table-cell>
          <table:covered-table-cell table:number-columns-repeated="5" table:style-name="ce62"/>
          <table:table-cell table:style-name="ce71" office:value-type="string" ns42:value-type="string" table:number-columns-spanned="6" table:number-rows-spanned="1">
            <text:p>FEE RATE IS NOT HARD-CODED UNTIL THE APPLICABLE eBAY CATEGORY FEE ASSUMPTION IS VERIFIED AND IDENTIFIED.</text:p>
          </table:table-cell>
          <table:covered-table-cell table:number-columns-repeated="5" table:style-name="ce71"/>
        </table:table-row>
        <table:table-row table:style-name="ro10">
          <table:table-cell table:style-name="ce62" office:value-type="string" ns42: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ns42:value-type="string" table:number-columns-spanned="18" table:number-rows-spanned="1">
            <text:p>🧪 DECEMBER SELL DECISION SIMULATOR · DEMO ASSUMPTIONS</text:p>
          </table:table-cell>
          <table:covered-table-cell table:number-columns-repeated="17" table:style-name="ce63"/>
        </table:table-row>
        <table:table-row table:style-name="ro12">
          <table:table-cell table:style-name="ce53" office:value-type="string" ns42:value-type="string" table:number-columns-spanned="3" table:number-rows-spanned="1">
            <text:p>SALE FORMAT</text:p>
          </table:table-cell>
          <table:covered-table-cell table:number-columns-repeated="2" table:style-name="ce53"/>
          <table:table-cell table:style-name="ce53" office:value-type="string" ns42:value-type="string" table:number-columns-spanned="3" table:number-rows-spanned="1">
            <text:p>MARKET PRICE / BOX</text:p>
          </table:table-cell>
          <table:covered-table-cell table:number-columns-repeated="2" table:style-name="ce53"/>
          <table:table-cell table:style-name="ce53" office:value-type="string" ns42:value-type="string" table:number-columns-spanned="3" table:number-rows-spanned="1">
            <text:p>LISTING PRICE / BOX</text:p>
          </table:table-cell>
          <table:covered-table-cell table:number-columns-repeated="2" table:style-name="ce53"/>
          <table:table-cell table:style-name="ce53" office:value-type="string" ns42:value-type="string" table:number-columns-spanned="3" table:number-rows-spanned="1">
            <text:p>DEMO FEE RATE</text:p>
          </table:table-cell>
          <table:covered-table-cell table:number-columns-repeated="2" table:style-name="ce53"/>
          <table:table-cell table:style-name="ce53" office:value-type="string" ns42:value-type="string" table:number-columns-spanned="3" table:number-rows-spanned="1">
            <text:p>SHIPPING ASSUMPTION</text:p>
          </table:table-cell>
          <table:covered-table-cell table:number-columns-repeated="2" table:style-name="ce53"/>
          <table:table-cell table:style-name="ce53" office:value-type="string" ns42:value-type="string" table:number-columns-spanned="3" table:number-rows-spanned="1">
            <text:p>DECISION</text:p>
          </table:table-cell>
          <table:covered-table-cell table:number-columns-repeated="2" table:style-name="ce53"/>
        </table:table-row>
        <table:table-row table:style-name="ro12">
          <table:table-cell table:style-name="ce68" office:value-type="string" ns42:value-type="string" table:number-columns-spanned="3" table:number-rows-spanned="1">
            <text:p>INDIVIDUALLY</text:p>
          </table:table-cell>
          <table:covered-table-cell table:number-columns-repeated="2" table:style-name="ce68"/>
          <table:table-cell table:style-name="ce76" office:value-type="string" ns42:value-type="string" table:number-columns-spanned="3" table:number-rows-spanned="1">
            <text:p>$175.00 · DEMO</text:p>
          </table:table-cell>
          <table:covered-table-cell table:number-columns-repeated="2" table:style-name="ce76"/>
          <table:table-cell table:style-name="ce76" office:value-type="string" ns42:value-type="string" table:number-columns-spanned="3" table:number-rows-spanned="1">
            <text:p>$185.00 · DEMO</text:p>
          </table:table-cell>
          <table:covered-table-cell table:number-columns-repeated="2" table:style-name="ce76"/>
          <table:table-cell table:style-name="ce80" office:value-type="string" ns42:value-type="string" table:number-columns-spanned="3" table:number-rows-spanned="1">
            <text:p>13.25% · DEMO</text:p>
          </table:table-cell>
          <table:covered-table-cell table:number-columns-repeated="2" table:style-name="ce80"/>
          <table:table-cell table:style-name="ce80" office:value-type="string" ns42:value-type="string" table:number-columns-spanned="3" table:number-rows-spanned="1">
            <text:p>BUYER PAYS · DEMO</text:p>
          </table:table-cell>
          <table:covered-table-cell table:number-columns-repeated="2" table:style-name="ce80"/>
          <table:table-cell table:style-name="ce76" office:value-type="string" ns42:value-type="string" table:number-columns-spanned="3" table:number-rows-spanned="1">
            <text:p>TESTING</text:p>
          </table:table-cell>
          <table:covered-table-cell table:number-columns-repeated="2" table:style-name="ce76"/>
        </table:table-row>
        <table:table-row table:style-name="ro12">
          <table:table-cell table:style-name="ce69" office:value-type="string" ns42:value-type="string" table:number-columns-spanned="3" table:number-rows-spanned="1">
            <text:p>AVG UNIT COST</text:p>
          </table:table-cell>
          <table:covered-table-cell table:number-columns-repeated="2" table:style-name="ce69"/>
          <table:table-cell table:style-name="ce69" office:value-type="string" ns42:value-type="string" table:number-columns-spanned="3" table:number-rows-spanned="1">
            <text:p>TARGET PROFIT / BOX</text:p>
          </table:table-cell>
          <table:covered-table-cell table:number-columns-repeated="2" table:style-name="ce69"/>
          <table:table-cell table:style-name="ce69" office:value-type="string" ns42:value-type="string" table:number-columns-spanned="3" table:number-rows-spanned="1">
            <text:p>REQUIRED NET / BOX</text:p>
          </table:table-cell>
          <table:covered-table-cell table:number-columns-repeated="2" table:style-name="ce69"/>
          <table:table-cell table:style-name="ce69" office:value-type="string" ns42:value-type="string" table:number-columns-spanned="3" table:number-rows-spanned="1">
            <text:p>DEMO NET @ LIST PRICE</text:p>
          </table:table-cell>
          <table:covered-table-cell table:number-columns-repeated="2" table:style-name="ce69"/>
          <table:table-cell table:style-name="ce69" office:value-type="string" ns42:value-type="string" table:number-columns-spanned="3" table:number-rows-spanned="1">
            <text:p>DEMO PROFIT / BOX</text:p>
          </table:table-cell>
          <table:covered-table-cell table:number-columns-repeated="2" table:style-name="ce69"/>
          <table:table-cell table:style-name="ce69" office:value-type="string" ns42:value-type="string" table:number-columns-spanned="3" table:number-rows-spanned="1">
            <text:p>TARGET RESULT</text:p>
          </table:table-cell>
          <table:covered-table-cell table:number-columns-repeated="2" table:style-name="ce69"/>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70" office:value-type="string" ns42:value-type="string" table:number-columns-spanned="3" table:number-rows-spanned="1">
            <text:p>$148.985</text:p>
          </table:table-cell>
          <table:covered-table-cell table:number-columns-repeated="2" table:style-name="ce70"/>
          <table:table-cell table:style-name="ce70" office:value-type="string" ns42:value-type="string" table:number-columns-spanned="3" table:number-rows-spanned="1">
            <text:p>$160.49</text:p>
          </table:table-cell>
          <table:covered-table-cell table:number-columns-repeated="2" table:style-name="ce70"/>
          <table:table-cell table:style-name="ce70" office:value-type="string" ns42:value-type="string" table:number-columns-spanned="3" table:number-rows-spanned="1">
            <text:p>$111.50</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5">
          <table:table-cell table:style-name="ce62" office:value-type="string" ns42: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THRESHOLD COMPARISON · DEMO DECISION TEST</text:p>
          </table:table-cell>
          <table:covered-table-cell table:number-columns-repeated="17" table:style-name="ce63"/>
        </table:table-row>
        <table:table-row table:style-name="ro12">
          <table:table-cell table:style-name="ce53" office:value-type="string" ns42:value-type="string" table:number-columns-spanned="3" table:number-rows-spanned="1">
            <text:p>COST / BOX</text:p>
          </table:table-cell>
          <table:covered-table-cell table:number-columns-repeated="2" table:style-name="ce53"/>
          <table:table-cell table:style-name="ce53" office:value-type="string" ns42:value-type="string" table:number-columns-spanned="3" table:number-rows-spanned="1">
            <text:p>PROFIT TARGET / BOX</text:p>
          </table:table-cell>
          <table:covered-table-cell table:number-columns-repeated="2" table:style-name="ce53"/>
          <table:table-cell table:style-name="ce53" office:value-type="string" ns42:value-type="string" table:number-columns-spanned="3" table:number-rows-spanned="1">
            <text:p>DEMO FEE BASIS</text:p>
          </table:table-cell>
          <table:covered-table-cell table:number-columns-repeated="2" table:style-name="ce53"/>
          <table:table-cell table:style-name="ce53" office:value-type="string" ns42:value-type="string" table:number-columns-spanned="3" table:number-rows-spanned="1">
            <text:p>MINIMUM SALE PRICE</text:p>
          </table:table-cell>
          <table:covered-table-cell table:number-columns-repeated="2" table:style-name="ce53"/>
          <table:table-cell table:style-name="ce53" office:value-type="string" ns42:value-type="string" table:number-columns-spanned="3" table:number-rows-spanned="1">
            <text:p>DEMO MARKET PRICE</text:p>
          </table:table-cell>
          <table:covered-table-cell table:number-columns-repeated="2" table:style-name="ce53"/>
          <table:table-cell table:style-name="ce53" office:value-type="string" ns42:value-type="string" table:number-columns-spanned="3" table:number-rows-spanned="1">
            <text:p>MARKET TEST</text:p>
          </table:table-cell>
          <table:covered-table-cell table:number-columns-repeated="2" table:style-name="ce53"/>
        </table:table-row>
        <table:table-row table:style-name="ro12">
          <table:table-cell table:style-name="ce70" office:value-type="string" ns42:value-type="string" table:number-columns-spanned="3" table:number-rows-spanned="1">
            <text:p>$48.985</text:p>
          </table:table-cell>
          <table:covered-table-cell table:number-columns-repeated="2" table:style-name="ce70"/>
          <table:table-cell table:style-name="ce70" office:value-type="string" ns42:value-type="string" table:number-columns-spanned="3" table:number-rows-spanned="1">
            <text:p>$100.00</text:p>
          </table:table-cell>
          <table:covered-table-cell table:number-columns-repeated="2" table:style-name="ce70"/>
          <table:table-cell table:style-name="ce80" office:value-type="string" ns42:value-type="string" table:number-columns-spanned="3" table:number-rows-spanned="1">
            <text:p>13.25% · DEMO</text:p>
          </table:table-cell>
          <table:covered-table-cell table:number-columns-repeated="2" table:style-name="ce80"/>
          <table:table-cell table:style-name="ce45" office:value-type="string" ns42:value-type="string" table:number-columns-spanned="3" table:number-rows-spanned="1">
            <text:p>$171.74 · DEMO</text:p>
          </table:table-cell>
          <table:covered-table-cell table:number-columns-repeated="2" table:style-name="ce45"/>
          <table:table-cell table:style-name="ce45" office:value-type="string" ns42:value-type="string" table:number-columns-spanned="3" table:number-rows-spanned="1">
            <text:p>$175.00 · DEMO</text:p>
          </table:table-cell>
          <table:covered-table-cell table:number-columns-repeated="2" table:style-name="ce45"/>
          <table:table-cell table:style-name="ce53" office:value-type="string" ns42:value-type="string" table:number-columns-spanned="3" table:number-rows-spanned="1">
            <text:p>CLEARS TARGET · DEMO</text:p>
          </table:table-cell>
          <table:covered-table-cell table:number-columns-repeated="2" table:style-name="ce53"/>
        </table:table-row>
        <table:table-row table:style-name="ro12">
          <table:table-cell table:style-name="ce72" office:value-type="string" ns42:value-type="string" table:number-columns-spanned="3" table:number-rows-spanned="1">
            <text:p>DEMO LISTING PRICE</text:p>
          </table:table-cell>
          <table:covered-table-cell table:number-columns-repeated="2" table:style-name="ce72"/>
          <table:table-cell table:style-name="ce72" office:value-type="string" ns42:value-type="string" table:number-columns-spanned="3" table:number-rows-spanned="1">
            <text:p>NET AFTER DEMO FEE</text:p>
          </table:table-cell>
          <table:covered-table-cell table:number-columns-repeated="2" table:style-name="ce72"/>
          <table:table-cell table:style-name="ce72" office:value-type="string" ns42:value-type="string" table:number-columns-spanned="3" table:number-rows-spanned="1">
            <text:p>PROFIT / BOX</text:p>
          </table:table-cell>
          <table:covered-table-cell table:number-columns-repeated="2" table:style-name="ce72"/>
          <table:table-cell table:style-name="ce72" office:value-type="string" ns42:value-type="string" table:number-columns-spanned="3" table:number-rows-spanned="1">
            <text:p>ABOVE MINIMUM</text:p>
          </table:table-cell>
          <table:covered-table-cell table:number-columns-repeated="2" table:style-name="ce72"/>
          <table:table-cell table:style-name="ce72" office:value-type="string" ns42:value-type="string" table:number-columns-spanned="3" table:number-rows-spanned="1">
            <text:p>QUANTITY</text:p>
          </table:table-cell>
          <table:covered-table-cell table:number-columns-repeated="2" table:style-name="ce72"/>
          <table:table-cell table:style-name="ce72" office:value-type="string" ns42:value-type="string" table:number-columns-spanned="3" table:number-rows-spanned="1">
            <text:p>DECISION STATE</text:p>
          </table:table-cell>
          <table:covered-table-cell table:number-columns-repeated="2" table:style-name="ce72"/>
        </table:table-row>
        <table:table-row table:style-name="ro12">
          <table:table-cell table:style-name="ce73" office:value-type="string" ns42:value-type="string" table:number-columns-spanned="3" table:number-rows-spanned="1">
            <text:p>$185.00 · DEMO</text:p>
          </table:table-cell>
          <table:covered-table-cell table:number-columns-repeated="2" table:style-name="ce73"/>
          <table:table-cell table:style-name="ce73" office:value-type="string" ns42:value-type="string" table:number-columns-spanned="3" table:number-rows-spanned="1">
            <text:p>$160.49 · DEMO</text:p>
          </table:table-cell>
          <table:covered-table-cell table:number-columns-repeated="2" table:style-name="ce73"/>
          <table:table-cell table:style-name="ce73" office:value-type="string" ns42:value-type="string" table:number-columns-spanned="3" table:number-rows-spanned="1">
            <text:p>$111.50 · DEMO</text:p>
          </table:table-cell>
          <table:covered-table-cell table:number-columns-repeated="2" table:style-name="ce73"/>
          <table:table-cell table:style-name="ce73" office:value-type="string" ns42:value-type="string" table:number-columns-spanned="3" table:number-rows-spanned="1">
            <text:p>+$13.26 · DEMO</text:p>
          </table:table-cell>
          <table:covered-table-cell table:number-columns-repeated="2" table:style-name="ce73"/>
          <table:table-cell table:style-name="ce70" office:value-type="string" ns42:value-type="string" table:number-columns-spanned="3" table:number-rows-spanned="1">
            <text:p>2</text:p>
          </table:table-cell>
          <table:covered-table-cell table:number-columns-repeated="2" table:style-name="ce70"/>
          <table:table-cell table:style-name="ce53" office:value-type="string" ns42:value-type="string" table:number-columns-spanned="3" table:number-rows-spanned="1">
            <text:p>READY TO SELL · DEMO</text:p>
          </table:table-cell>
          <table:covered-table-cell table:number-columns-repeated="2" table:style-name="ce53"/>
        </table:table-row>
        <table:table-row table:style-name="ro16">
          <table:table-cell table:style-name="ce62" office:value-type="string" ns42: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2"/>
        </table:table-row>
        <table:table-row table:style-name="ro17">
          <table:table-cell table:style-name="ce71" office:value-type="string" ns42: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ACTION BANDS · DEMO DECISION TRANSLATION</text:p>
          </table:table-cell>
          <table:covered-table-cell table:number-columns-repeated="17" table:style-name="ce63"/>
        </table:table-row>
        <table:table-row table:style-name="ro12">
          <table:table-cell table:style-name="ce53" office:value-type="string" ns42:value-type="string" table:number-columns-spanned="4" table:number-rows-spanned="1">
            <text:p>PRICE CONDITION</text:p>
          </table:table-cell>
          <table:covered-table-cell table:number-columns-repeated="3" table:style-name="ce53"/>
          <table:table-cell table:style-name="ce53" office:value-type="string" ns42:value-type="string" table:number-columns-spanned="4" table:number-rows-spanned="1">
            <text:p>PROFIT SIGNAL</text:p>
          </table:table-cell>
          <table:covered-table-cell table:number-columns-repeated="3" table:style-name="ce53"/>
          <table:table-cell table:style-name="ce53" office:value-type="string" ns42:value-type="string" table:number-columns-spanned="4" table:number-rows-spanned="1">
            <text:p>MARKETDEX ACTION</text:p>
          </table:table-cell>
          <table:covered-table-cell table:number-columns-repeated="3" table:style-name="ce53"/>
          <table:table-cell table:style-name="ce53" office:value-type="string" ns42:value-type="string" table:number-columns-spanned="6" table:number-rows-spanned="1">
            <text:p>BUSINESS MEANING</text:p>
          </table:table-cell>
          <table:covered-table-cell table:number-columns-repeated="5" table:style-name="ce53"/>
        </table:table-row>
        <table:table-row table:style-name="ro12">
          <table:table-cell table:style-name="ce68" office:value-type="string" ns42:value-type="string" table:number-columns-spanned="4" table:number-rows-spanned="1">
            <text:p>BELOW $171.74 · DEMO</text:p>
          </table:table-cell>
          <table:covered-table-cell table:number-columns-repeated="3" table:style-name="ce68"/>
          <table:table-cell table:style-name="ce78" office:value-type="string" ns42:value-type="string" table:number-columns-spanned="4" table:number-rows-spanned="1">
            <text:p>TARGET NOT MET</text:p>
          </table:table-cell>
          <table:covered-table-cell table:number-columns-repeated="3" table:style-name="ce78"/>
          <table:table-cell table:style-name="ce73" office:value-type="string" ns42:value-type="string" table:number-columns-spanned="4" table:number-rows-spanned="1">
            <text:p>HOLD</text:p>
          </table:table-cell>
          <table:covered-table-cell table:number-columns-repeated="3" table:style-name="ce73"/>
          <table:table-cell table:style-name="ce54" office:value-type="string" ns42: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8" office:value-type="string" ns42:value-type="string" table:number-columns-spanned="4" table:number-rows-spanned="1">
            <text:p>$171.74–$184.99 · DEMO</text:p>
          </table:table-cell>
          <table:covered-table-cell table:number-columns-repeated="3" table:style-name="ce68"/>
          <table:table-cell table:style-name="ce68" office:value-type="string" ns42:value-type="string" table:number-columns-spanned="4" table:number-rows-spanned="1">
            <text:p>TARGET MET</text:p>
          </table:table-cell>
          <table:covered-table-cell table:number-columns-repeated="3" table:style-name="ce68"/>
          <table:table-cell table:style-name="ce49" office:value-type="string" ns42:value-type="string" table:number-columns-spanned="4" table:number-rows-spanned="1">
            <text:p>READY TO SELL</text:p>
          </table:table-cell>
          <table:covered-table-cell table:number-columns-repeated="3" table:style-name="ce49"/>
          <table:table-cell table:style-name="ce54" office:value-type="string" ns42: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8" office:value-type="string" ns42:value-type="string" table:number-columns-spanned="4" table:number-rows-spanned="1">
            <text:p>$185.00+ · DEMO</text:p>
          </table:table-cell>
          <table:covered-table-cell table:number-columns-repeated="3" table:style-name="ce68"/>
          <table:table-cell table:style-name="ce79" office:value-type="string" ns42:value-type="string" table:number-columns-spanned="4" table:number-rows-spanned="1">
            <text:p>TARGET EXCEEDED</text:p>
          </table:table-cell>
          <table:covered-table-cell table:number-columns-repeated="3" table:style-name="ce79"/>
          <table:table-cell table:style-name="ce49" office:value-type="string" ns42:value-type="string" table:number-columns-spanned="4" table:number-rows-spanned="1">
            <text:p>SELL OPPORTUNITY</text:p>
          </table:table-cell>
          <table:covered-table-cell table:number-columns-repeated="3" table:style-name="ce49"/>
          <table:table-cell table:style-name="ce54" office:value-type="string" ns42: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9" office:value-type="string" ns42:value-type="string" table:number-columns-spanned="6" table:number-rows-spanned="1">
            <text:p>CURRENT DEMO MARKET CONTEXT</text:p>
          </table:table-cell>
          <table:covered-table-cell table:number-columns-repeated="5" table:style-name="ce69"/>
          <table:table-cell table:style-name="ce69" office:value-type="string" ns42:value-type="string" table:number-columns-spanned="6" table:number-rows-spanned="1">
            <text:p>CURRENT DEMO LISTING CONTEXT</text:p>
          </table:table-cell>
          <table:covered-table-cell table:number-columns-repeated="5" table:style-name="ce69"/>
          <table:table-cell table:style-name="ce69" office:value-type="string" ns42:value-type="string" table:number-columns-spanned="6" table:number-rows-spanned="1">
            <text:p>CURRENT TEST INTERPRETATION</text:p>
          </table:table-cell>
          <table:covered-table-cell table:number-columns-repeated="5" table:style-name="ce69"/>
        </table:table-row>
        <table:table-row table:style-name="ro12">
          <table:table-cell table:style-name="ce73" office:value-type="string" ns42:value-type="string" table:number-columns-spanned="6" table:number-rows-spanned="1">
            <text:p>$175.00 · READY TO SELL</text:p>
          </table:table-cell>
          <table:covered-table-cell table:number-columns-repeated="5" table:style-name="ce73"/>
          <table:table-cell table:style-name="ce73" office:value-type="string" ns42:value-type="string" table:number-columns-spanned="6" table:number-rows-spanned="1">
            <text:p>$185.00 · SELL OPPORTUNITY</text:p>
          </table:table-cell>
          <table:covered-table-cell table:number-columns-repeated="5" table:style-name="ce73"/>
          <table:table-cell table:style-name="ce53" office:value-type="string" ns42:value-type="string" table:number-columns-spanned="6" table:number-rows-spanned="1">
            <text:p>TARGET CLEARED · ACTION VISIBLE</text:p>
          </table:table-cell>
          <table:covered-table-cell table:number-columns-repeated="5" table:style-name="ce53"/>
        </table:table-row>
        <table:table-row table:style-name="ro16">
          <table:table-cell table:style-name="ce62" office:value-type="string" ns42: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ns42:value-type="string" table:number-columns-spanned="18" table:number-rows-spanned="1">
            <text:p>🏁 SELL PRIORITY SIGNAL · DEMO ATTENTION TEST</text:p>
          </table:table-cell>
          <table:covered-table-cell table:number-columns-repeated="17" table:style-name="ce63"/>
        </table:table-row>
        <table:table-row table:style-name="ro12">
          <table:table-cell table:style-name="ce53" office:value-type="string" ns42:value-type="string" table:number-columns-spanned="3" table:number-rows-spanned="1">
            <text:p>PROFIT SIGNAL</text:p>
          </table:table-cell>
          <table:covered-table-cell table:number-columns-repeated="2" table:style-name="ce53"/>
          <table:table-cell table:style-name="ce53" office:value-type="string" ns42:value-type="string" table:number-columns-spanned="3" table:number-rows-spanned="1">
            <text:p>DAYS HELD</text:p>
          </table:table-cell>
          <table:covered-table-cell table:number-columns-repeated="2" table:style-name="ce53"/>
          <table:table-cell table:style-name="ce53" office:value-type="string" ns42:value-type="string" table:number-columns-spanned="3" table:number-rows-spanned="1">
            <text:p>LISTING READINESS</text:p>
          </table:table-cell>
          <table:covered-table-cell table:number-columns-repeated="2" table:style-name="ce53"/>
          <table:table-cell table:style-name="ce53" office:value-type="string" ns42:value-type="string" table:number-columns-spanned="3" table:number-rows-spanned="1">
            <text:p>REVIEW TIMING</text:p>
          </table:table-cell>
          <table:covered-table-cell table:number-columns-repeated="2" table:style-name="ce53"/>
          <table:table-cell table:style-name="ce53" office:value-type="string" ns42:value-type="string" table:number-columns-spanned="3" table:number-rows-spanned="1">
            <text:p>PRIORITY</text:p>
          </table:table-cell>
          <table:covered-table-cell table:number-columns-repeated="2" table:style-name="ce53"/>
          <table:table-cell table:style-name="ce53" office:value-type="string" ns42:value-type="string" table:number-columns-spanned="3" table:number-rows-spanned="1">
            <text:p>ACTION FOCUS</text:p>
          </table:table-cell>
          <table:covered-table-cell table:number-columns-repeated="2" table:style-name="ce53"/>
        </table:table-row>
        <table:table-row table:style-name="ro12">
          <table:table-cell table:style-name="ce68" office:value-type="string" ns42:value-type="string" table:number-columns-spanned="3" table:number-rows-spanned="1">
            <text:p>SELL OPPORTUNITY · DEMO</text:p>
          </table:table-cell>
          <table:covered-table-cell table:number-columns-repeated="2" table:style-name="ce68"/>
          <table:table-cell table:style-name="ce73" office:value-type="string" ns42:value-type="string" table:number-columns-spanned="3" table:number-rows-spanned="1">
            <text:p>10 DAYS</text:p>
          </table:table-cell>
          <table:covered-table-cell table:number-columns-repeated="2" table:style-name="ce73"/>
          <table:table-cell table:style-name="ce78" office:value-type="string" ns42:value-type="string" table:number-columns-spanned="3" table:number-rows-spanned="1">
            <text:p>PREPARATION NEEDED</text:p>
          </table:table-cell>
          <table:covered-table-cell table:number-columns-repeated="2" table:style-name="ce78"/>
          <table:table-cell table:style-name="ce68" office:value-type="string" ns42:value-type="string" table:number-columns-spanned="3" table:number-rows-spanned="1">
            <text:p>EARLY DEC 2026</text:p>
          </table:table-cell>
          <table:covered-table-cell table:number-columns-repeated="2" table:style-name="ce68"/>
          <table:table-cell table:style-name="ce49" office:value-type="string" ns42:value-type="string" table:number-columns-spanned="3" table:number-rows-spanned="1">
            <text:p>NORMAL · DEMO</text:p>
          </table:table-cell>
          <table:covered-table-cell table:number-columns-repeated="2" table:style-name="ce49"/>
          <table:table-cell table:style-name="ce68" office:value-type="string" ns42:value-type="string" table:number-columns-spanned="3" table:number-rows-spanned="1">
            <text:p>PREPARE, DO NOT RUSH</text:p>
          </table:table-cell>
          <table:covered-table-cell table:number-columns-repeated="2" table:style-name="ce68"/>
        </table:table-row>
        <table:table-row table:style-name="ro12">
          <table:table-cell table:style-name="ce69" office:value-type="string" ns42:value-type="string" table:number-columns-spanned="6" table:number-rows-spanned="1">
            <text:p>PRIORITY RULE</text:p>
          </table:table-cell>
          <table:covered-table-cell table:number-columns-repeated="5" table:style-name="ce69"/>
          <table:table-cell table:style-name="ce69" office:value-type="string" ns42:value-type="string" table:number-columns-spanned="6" table:number-rows-spanned="1">
            <text:p>WHY NORMAL?</text:p>
          </table:table-cell>
          <table:covered-table-cell table:number-columns-repeated="5" table:style-name="ce69"/>
          <table:table-cell table:style-name="ce69" office:value-type="string" ns42:value-type="string" table:number-columns-spanned="6" table:number-rows-spanned="1">
            <text:p>WHAT WOULD MAKE IT HIGH?</text:p>
          </table:table-cell>
          <table:covered-table-cell table:number-columns-repeated="5" table:style-name="ce69"/>
        </table:table-row>
        <table:table-row table:style-name="ro16">
          <table:table-cell table:style-name="ce62" office:value-type="string" ns42:value-type="string" table:number-columns-spanned="6" table:number-rows-spanned="1">
            <text:p>Profit signal + inventory age + listing readiness + planned review timing</text:p>
          </table:table-cell>
          <table:covered-table-cell table:number-columns-repeated="5" table:style-name="ce62"/>
          <table:table-cell table:style-name="ce54" office:value-type="string" ns42: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ns42: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4" office:value-type="string" ns42:value-type="string" table:number-columns-spanned="4" table:number-rows-spanned="1">
            <text:p>LOW</text:p>
          </table:table-cell>
          <table:covered-table-cell table:number-columns-repeated="3" table:style-name="ce74"/>
          <table:table-cell table:style-name="ce49" office:value-type="string" ns42:value-type="string" table:number-columns-spanned="4" table:number-rows-spanned="1">
            <text:p>NORMAL</text:p>
          </table:table-cell>
          <table:covered-table-cell table:number-columns-repeated="3" table:style-name="ce49"/>
          <table:table-cell table:style-name="ce82" office:value-type="string" ns42:value-type="string" table:number-columns-spanned="4" table:number-rows-spanned="1">
            <text:p>HIGH</text:p>
          </table:table-cell>
          <table:covered-table-cell table:number-columns-repeated="3" table:style-name="ce82"/>
          <table:table-cell table:style-name="ce49" office:value-type="string" ns42: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ns42:value-type="string" table:number-columns-spanned="4" table:number-rows-spanned="1">
            <text:p>No meaningful sell attention needed.</text:p>
          </table:table-cell>
          <table:covered-table-cell table:number-columns-repeated="3" table:style-name="ce54"/>
          <table:table-cell table:style-name="ce54" office:value-type="string" ns42:value-type="string" table:number-columns-spanned="4" table:number-rows-spanned="1">
            <text:p>Keep visible and prepare around the planned review.</text:p>
          </table:table-cell>
          <table:covered-table-cell table:number-columns-repeated="3" table:style-name="ce54"/>
          <table:table-cell table:style-name="ce54" office:value-type="string" ns42:value-type="string" table:number-columns-spanned="4" table:number-rows-spanned="1">
            <text:p>Needs near-term seller attention.</text:p>
          </table:table-cell>
          <table:covered-table-cell table:number-columns-repeated="3" table:style-name="ce54"/>
          <table:table-cell table:style-name="ce54" office:value-type="string" ns42: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2" office:value-type="string" ns42: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2"/>
        </table:table-row>
        <table:table-row table:style-name="ro12">
          <table:table-cell table:style-name="ce71" office:value-type="string" ns42: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1"/>
        </table:table-row>
        <table:table-row table:style-name="ro5">
          <table:table-cell table:style-name="ce63" office:value-type="string" ns42:value-type="string" table:number-columns-spanned="18" table:number-rows-spanned="1">
            <text:p>🏷 LISTING READINESS PREPARATION GATE · DEMO EVIDENCE TEST</text:p>
          </table:table-cell>
          <table:covered-table-cell table:number-columns-repeated="17" table:style-name="ce63"/>
        </table:table-row>
        <table:table-row table:style-name="ro5">
          <table:table-cell table:style-name="ce74" office:value-type="string" ns42:value-type="string" table:number-columns-spanned="4" table:number-rows-spanned="1">
            <text:p>READINESS FACTOR</text:p>
          </table:table-cell>
          <table:covered-table-cell table:number-columns-repeated="3" table:style-name="ce74"/>
          <table:table-cell table:style-name="ce49" office:value-type="string" ns42:value-type="string" table:number-columns-spanned="4" table:number-rows-spanned="1">
            <text:p>FACTOR STATUS</text:p>
          </table:table-cell>
          <table:covered-table-cell table:number-columns-repeated="3" table:style-name="ce49"/>
          <table:table-cell table:style-name="ce82" office:value-type="string" ns42:value-type="string" table:number-columns-spanned="4" table:number-rows-spanned="1">
            <text:p>CURRENT EVIDENCE</text:p>
          </table:table-cell>
          <table:covered-table-cell table:number-columns-repeated="3" table:style-name="ce82"/>
          <table:table-cell table:style-name="ce49" office:value-type="string" ns42: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ns42:value-type="string" table:number-columns-spanned="4" table:number-rows-spanned="1">
            <text:p>PRODUCT MATCH</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position identified</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QUANTITY VERIFICATION</text:p>
          </table:table-cell>
          <table:covered-table-cell table:number-columns-repeated="3" table:style-name="ce54"/>
          <table:table-cell table:style-name="ce54" office:value-type="string" ns42:value-type="string" table:number-columns-spanned="4" table:number-rows-spanned="1">
            <text:p>COMPLETE</text:p>
          </table:table-cell>
          <table:covered-table-cell table:number-columns-repeated="3" table:style-name="ce54"/>
          <table:table-cell table:style-name="ce54" office:value-type="string" ns42:value-type="string" table:number-columns-spanned="4" table:number-rows-spanned="1">
            <text:p>Promoted quantity: 2</text:p>
          </table:table-cell>
          <table:covered-table-cell table:number-columns-repeated="3" table:style-name="ce54"/>
          <table:table-cell table:style-name="ce54" office:value-type="string" ns42: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ns42:value-type="string" table:number-columns-spanned="4" table:number-rows-spanned="1">
            <text:p>CONDITION</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condition evidence</text:p>
          </table:table-cell>
          <table:covered-table-cell table:number-columns-repeated="3" table:style-name="ce54"/>
          <table:table-cell table:style-name="ce54" office:value-type="string" ns42: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photo-ready evidence</text:p>
          </table:table-cell>
          <table:covered-table-cell table:number-columns-repeated="3" table:style-name="ce54"/>
          <table:table-cell table:style-name="ce54" office:value-type="string" ns42: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No listing draft evidence</text:p>
          </table:table-cell>
          <table:covered-table-cell table:number-columns-repeated="3" table:style-name="ce54"/>
          <table:table-cell table:style-name="ce54" office:value-type="string" ns42: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ns42:value-type="string" table:number-columns-spanned="4" table:number-rows-spanned="1">
            <text:p>PRICE DECISION</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Only fictional price tests exist</text:p>
          </table:table-cell>
          <table:covered-table-cell table:number-columns-repeated="3" table:style-name="ce54"/>
          <table:table-cell table:style-name="ce54" office:value-type="string" ns42: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ns42:value-type="string" table:number-columns-spanned="4" table:number-rows-spanned="1">
            <text:p>PLATFORM</text:p>
          </table:table-cell>
          <table:covered-table-cell table:number-columns-repeated="3" table:style-name="ce54"/>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eBay is test context only</text:p>
          </table:table-cell>
          <table:covered-table-cell table:number-columns-repeated="3" table:style-name="ce54"/>
          <table:table-cell table:style-name="ce54" office:value-type="string" ns42: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ns42:value-type="string" table:number-columns-spanned="4" table:number-rows-spanned="1">
            <text:p>SHIPPING REVIEW</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No reviewed shipping path</text:p>
          </table:table-cell>
          <table:covered-table-cell table:number-columns-repeated="3" table:style-name="ce54"/>
          <table:table-cell table:style-name="ce54" office:value-type="string" ns42: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ns42:value-type="string" table:number-columns-spanned="4" table:number-rows-spanned="1">
            <text:p>DATA-QUALITY CLEARANCE</text:p>
          </table:table-cell>
          <table:covered-table-cell table:number-columns-repeated="3" table:style-name="ce54"/>
          <table:table-cell table:style-name="ce54" office:value-type="string" ns42:value-type="string" table:number-columns-spanned="4" table:number-rows-spanned="1">
            <text:p>NOT EVALUATED · DEMO</text:p>
          </table:table-cell>
          <table:covered-table-cell table:number-columns-repeated="3" table:style-name="ce54"/>
          <table:table-cell table:style-name="ce54" office:value-type="string" ns42:value-type="string" table:number-columns-spanned="4" table:number-rows-spanned="1">
            <text:p>Clearance not performed</text:p>
          </table:table-cell>
          <table:covered-table-cell table:number-columns-repeated="3" table:style-name="ce54"/>
          <table:table-cell table:style-name="ce54" office:value-type="string" ns42: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9" office:value-type="string" ns42:value-type="string" table:number-columns-spanned="6" table:number-rows-spanned="1">
            <text:p>OVERALL LISTING READINESS</text:p>
          </table:table-cell>
          <table:covered-table-cell table:number-columns-repeated="5" table:style-name="ce69"/>
          <table:table-cell table:style-name="ce69" office:value-type="string" ns42:value-type="string" table:number-columns-spanned="6" table:number-rows-spanned="1">
            <text:p>VISIBLE BLOCKING REASONS</text:p>
          </table:table-cell>
          <table:covered-table-cell table:number-columns-repeated="5" table:style-name="ce69"/>
          <table:table-cell table:style-name="ce69" office:value-type="string" ns42:value-type="string" table:number-columns-spanned="6" table:number-rows-spanned="1">
            <text:p>NEXT PREPARATION ACTION</text:p>
          </table:table-cell>
          <table:covered-table-cell table:number-columns-repeated="5" table:style-name="ce69"/>
        </table:table-row>
        <table:table-row table:style-name="ro19">
          <table:table-cell table:style-name="ce62" table:formula="of:=IF(COUNTA([.E91:.E99])=0;&quot;NOT EVALUATED&quot;;IF(COUNTIF([.E91:.E99];&quot;.*BLOCKED.*&quot;)&gt;0;&quot;BLOCKED&quot;;IF(COUNTIF([.E91:.E99];&quot;.*PREPARATION NEEDED.*&quot;)+COUNTIF([.E91:.E99];&quot;.*NOT EVALUATED.*&quot;)&gt;0;&quot;PREPARATION NEEDED&quot;;&quot;READY TO LIST&quot;)))" office:value-type="string" office:string-value="READY TO LIST" ns42:value-type="string" table:number-columns-spanned="6" table:number-rows-spanned="1">
            <text:p>READY TO LIST</text:p>
          </table:table-cell>
          <table:covered-table-cell table:number-columns-repeated="5" table:style-name="ce62"/>
          <table:table-cell table:style-name="ce54" office:value-type="string" ns42: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ns42: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2" office:value-type="string" ns42: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2"/>
        </table:table-row>
        <table:table-row table:style-name="ro19">
          <table:table-cell table:style-name="ce62" office:value-type="string" ns42: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2"/>
        </table:table-row>
        <table:table-row table:style-name="ro5">
          <table:table-cell table:style-name="ce74" office:value-type="string" ns42:value-type="string" table:number-columns-spanned="4" table:number-rows-spanned="1">
            <text:p>READY TO LIST</text:p>
          </table:table-cell>
          <table:covered-table-cell table:number-columns-repeated="3" table:style-name="ce74"/>
          <table:table-cell table:style-name="ce49" office:value-type="string" ns42:value-type="string" table:number-columns-spanned="4" table:number-rows-spanned="1">
            <text:p>PREPARATION NEEDED</text:p>
          </table:table-cell>
          <table:covered-table-cell table:number-columns-repeated="3" table:style-name="ce49"/>
          <table:table-cell table:style-name="ce82" office:value-type="string" ns42:value-type="string" table:number-columns-spanned="4" table:number-rows-spanned="1">
            <text:p>BLOCKED</text:p>
          </table:table-cell>
          <table:covered-table-cell table:number-columns-repeated="3" table:style-name="ce82"/>
          <table:table-cell table:style-name="ce49" office:value-type="string" ns42:value-type="string" table:number-columns-spanned="6" table:number-rows-spanned="1">
            <text:p>NOT EVALUATED</text:p>
          </table:table-cell>
          <table:covered-table-cell table:number-columns-repeated="5" table:style-name="ce49"/>
        </table:table-row>
        <table:table-row table:style-name="ro20">
          <table:table-cell table:style-name="ce71" office:value-type="string" ns42: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1"/>
        </table:table-row>
        <table:table-row table:style-name="ro5">
          <table:table-cell table:style-name="ce63" office:value-type="string" ns42:value-type="string" table:number-columns-spanned="18" table:number-rows-spanned="1">
            <text:p>📸 LISTING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BLOCKER AFFECTED</text:p>
          </table:table-cell>
          <table:covered-table-cell table:number-columns-repeated="3" table:style-name="ce82"/>
          <table:table-cell table:style-name="ce49" office:value-type="string" ns42: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ns42:value-type="string" table:number-columns-spanned="4" table:number-rows-spanned="1">
            <text:p>PREPARE PRODUCT PHOTO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HOTOS</text:p>
          </table:table-cell>
          <table:covered-table-cell table:number-columns-repeated="3" table:style-name="ce54"/>
          <table:table-cell table:style-name="ce54" office:value-type="string" ns42:value-type="string" table:number-columns-spanned="6" table:number-rows-spanned="1">
            <text:p>PHOTOS CLEARED · DEMO</text:p>
          </table:table-cell>
          <table:covered-table-cell table:number-columns-repeated="5" table:style-name="ce54"/>
        </table:table-row>
        <table:table-row table:style-name="ro5">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cell table:style-name="ce69" office:value-type="string" ns42:value-type="string" table:number-columns-spanned="6" table:number-rows-spanned="1">
            <text:p>PROTECTED BLOCKERS</text:p>
          </table:table-cell>
          <table:covered-table-cell table:number-columns-repeated="5" table:style-name="ce69"/>
        </table:table-row>
        <table:table-row table:style-name="ro20">
          <table:table-cell table:style-name="ce62" office:value-type="string" ns42:value-type="string" table:number-columns-spanned="6" table:number-rows-spanned="1">
            <text:p>PREPARATION NEEDED</text:p>
          </table:table-cell>
          <table:covered-table-cell table:number-columns-repeated="5" table:style-name="ce62"/>
          <table:table-cell table:style-name="ce54" office:value-type="string" ns42:value-type="string" table:number-columns-spanned="6" table:number-rows-spanned="1">
            <text:p>CONDITION</text:p>
          </table:table-cell>
          <table:covered-table-cell table:number-columns-repeated="5" table:style-name="ce54"/>
          <table:table-cell table:style-name="ce54" office:value-type="string" ns42: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2"/>
        </table:table-row>
        <table:table-row table:style-name="ro5">
          <table:table-cell table:style-name="ce63" office:value-type="string" ns42:value-type="string" table:number-columns-spanned="18" table:number-rows-spanned="1">
            <text:p>🔎 CONDIT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DI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PRODUCT COND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ALED · ACCEPTABLE FOR LISTING · DEMO</text:p>
          </table:table-cell>
          <table:covered-table-cell table:number-columns-repeated="3" table:style-name="ce54"/>
          <table:table-cell table:style-name="ce54" office:value-type="string" ns42:value-type="string" table:number-columns-spanned="6" table:number-rows-spanned="1">
            <text:p>CONDI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CONDITION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LISTING CO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CONTENT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CO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TITLE + BASIC DESCRIPTION PREPARED · DEMO</text:p>
          </table:table-cell>
          <table:covered-table-cell table:number-columns-repeated="3" table:style-name="ce54"/>
          <table:table-cell table:style-name="ce54" office:value-type="string" ns42:value-type="string" table:number-columns-spanned="6" table:number-rows-spanned="1">
            <text:p>LISTING CONTEN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CONTENT PREPAR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PRICE DECISION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VIEWED PRIC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LISTING PRI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102.00 · REVIEWED FOR LISTING · DEMO</text:p>
          </table:table-cell>
          <table:covered-table-cell table:number-columns-repeated="3" table:style-name="ce54"/>
          <table:table-cell table:style-name="ce54" office:value-type="string" ns42:value-type="string" table:number-columns-spanned="6" table:number-rows-spanned="1">
            <text:p>PRICE DECIS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REVIEWED LISTING PRICE RECORD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LATFORM SELECTION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SELECT LISTING PLATFORM</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EBAY · SELECTED FOR LISTING · DEMO</text:p>
          </table:table-cell>
          <table:covered-table-cell table:number-columns-repeated="3" table:style-name="ce54"/>
          <table:table-cell table:style-name="ce54" office:value-type="string" ns42:value-type="string" table:number-columns-spanned="6" table:number-rows-spanned="1">
            <text:p>PLATFORM</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LISTING PLATFORM SELECT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ns42: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SHIPPING REVIEW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PING REVIEW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SHIPPING PATH</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PING PATH REVIEWED · DEMO</text:p>
          </table:table-cell>
          <table:covered-table-cell table:number-columns-repeated="3" table:style-name="ce54"/>
          <table:table-cell table:style-name="ce54" office:value-type="string" ns42:value-type="string" table:number-columns-spanned="6" table:number-rows-spanned="1">
            <text:p>SHIPPING REVIEW</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READINESS AFTER ACTION</text:p>
          </table:table-cell>
          <table:covered-table-cell table:number-columns-repeated="5" table:style-name="ce69"/>
          <table:table-cell table:style-name="ce69" office:value-type="string" ns42: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ns42:value-type="string" table:number-columns-spanned="6" table:number-rows-spanned="1">
            <text:p>SHIPPING PATH REVIEWED · DEMO</text:p>
          </table:table-cell>
          <table:covered-table-cell table:number-columns-repeated="5" table:style-name="ce62"/>
          <table:table-cell table:style-name="ce54" office:value-type="string" ns42:value-type="string" table:number-columns-spanned="6" table:number-rows-spanned="1">
            <text:p>PREPARATION NEEDED</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19">
          <table:table-cell table:style-name="ce62" office:value-type="string" ns42: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2"/>
        </table:table-row>
        <table:table-row table:style-name="ro19">
          <table:table-cell table:style-name="ce62" office:value-type="string" ns42: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2"/>
        </table:table-row>
        <table:table-row table:style-name="ro5">
          <table:table-cell table:style-name="ce63" office:value-type="string" ns42:value-type="string" table:number-columns-spanned="18" table:number-rows-spanned="1">
            <text:p>🧾 DATA-QUALITY CLEARANCE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ATA-QUALITY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ns42:value-type="string" table:number-columns-spanned="4" table:number-rows-spanned="1">
            <text:p>REVIEW DATA QUALITY</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KNOWN UNRESOLVED DATA-QUALITY ISSUE · DEMO</text:p>
          </table:table-cell>
          <table:covered-table-cell table:number-columns-repeated="3" table:style-name="ce54"/>
          <table:table-cell table:style-name="ce54" office:value-type="string" ns42:value-type="string" table:number-columns-spanned="6" table:number-rows-spanned="1">
            <text:p>DATA-QUALITY CLEARA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L READINESS CROSS-CHECK</text:p>
          </table:table-cell>
          <table:covered-table-cell table:number-columns-repeated="5" table:style-name="ce69"/>
          <table:table-cell table:style-name="ce69" office:value-type="string" ns42:value-type="string" table:number-columns-spanned="6" table:number-rows-spanned="1">
            <text:p>READINESS AFTER CROSS-CHECK</text:p>
          </table:table-cell>
          <table:covered-table-cell table:number-columns-repeated="5" table:style-name="ce69"/>
        </table:table-row>
        <table:table-row table:style-name="ro5">
          <table:table-cell table:style-name="ce62" office:value-type="string" ns42:value-type="string" table:number-columns-spanned="6" table:number-rows-spanned="1">
            <text:p>DATA-QUALITY CLEARED · DEMO</text:p>
          </table:table-cell>
          <table:covered-table-cell table:number-columns-repeated="5" table:style-name="ce62"/>
          <table:table-cell table:style-name="ce54" office:value-type="string" ns42:value-type="string" table:number-columns-spanned="6" table:number-rows-spanned="1">
            <text:p>7 OF 7 LISTING READINESS FACTORS SUPPORTED · DEMO</text:p>
          </table:table-cell>
          <table:covered-table-cell table:number-columns-repeated="5" table:style-name="ce54"/>
          <table:table-cell table:style-name="ce54" office:value-type="string" ns42:value-type="string" table:number-columns-spanned="6" table:number-rows-spanned="1">
            <text:p>READY TO LIST · DEMO</text:p>
          </table:table-cell>
          <table:covered-table-cell table:number-columns-repeated="5" table:style-name="ce54"/>
        </table:table-row>
        <table:table-row table:style-name="ro19">
          <table:table-cell table:style-name="ce62" office:value-type="string" ns42: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2"/>
        </table:table-row>
        <table:table-row table:style-name="ro19">
          <table:table-cell table:style-name="ce62" office:value-type="string" ns42: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2"/>
        </table:table-row>
        <table:table-row table:style-name="ro5">
          <table:table-cell table:style-name="ce63" office:value-type="string" ns42:value-type="string" table:number-columns-spanned="18" table:number-rows-spanned="1">
            <text:p>🎯 LISTING INT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INT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CONFIRM LISTING INTEN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REPARE LISTING · DEMO</text:p>
          </table:table-cell>
          <table:covered-table-cell table:number-columns-repeated="3" table:style-name="ce54"/>
          <table:table-cell table:style-name="ce54" office:value-type="string" ns42:value-type="string" table:number-columns-spanned="6" table:number-rows-spanned="1">
            <text:p>NO PUBLICATION</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BUSINESS STATE AFTER ACTION</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INTENT CONFIRMED · DEMO</text:p>
          </table:table-cell>
          <table:covered-table-cell table:number-columns-repeated="5" table:style-name="ce62"/>
          <table:table-cell table:style-name="ce54" office:value-type="string" ns42:value-type="string" table:number-columns-spanned="6" table:number-rows-spanned="1">
            <text:p>READY TO LIST · DEMO</text:p>
          </table:table-cell>
          <table:covered-table-cell table:number-columns-repeated="5" table:style-name="ce54"/>
          <table:table-cell table:style-name="ce54" office:value-type="string" ns42:value-type="string" table:number-columns-spanned="6" table:number-rows-spanned="1">
            <text:p>LISTING RECORD PREPARATION</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Confirming listing intent records seller intent only. READY TO LIST remains the readiness sta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Listing intent does not create, publish, or expose a marketplace listing.</text:p>
          </table:table-cell>
          <table:covered-table-cell table:number-columns-repeated="17" table:style-name="ce62"/>
        </table:table-row>
        <table:table-row table:style-name="ro5">
          <table:table-cell table:style-name="ce63" office:value-type="string" ns42:value-type="string" table:number-columns-spanned="18" table:number-rows-spanned="1">
            <text:p>📝 LISTING RECORD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RAFT RESULT</text:p>
          </table:table-cell>
          <table:covered-table-cell table:number-columns-repeated="3" table:style-name="ce82"/>
          <table:table-cell table:style-name="ce49" office:value-type="string" ns42: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ns42:value-type="string" table:number-columns-spanned="4" table:number-rows-spanned="1">
            <text:p>PREPARE LISTING RECORD</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LISTING RECORD DRAFT PREPARED · DEMO</text:p>
          </table:table-cell>
          <table:covered-table-cell table:number-columns-repeated="3" table:style-name="ce54"/>
          <table:table-cell table:style-name="ce54" office:value-type="string" ns42:value-type="string" table:number-columns-spanned="6" table:number-rows-spanned="1">
            <text:p>INVENTORY RECORD → LISTING RECORD DRAF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STING RECORD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LISTING DRAFT PREPARED · DEMO</text:p>
          </table:table-cell>
          <table:covered-table-cell table:number-columns-repeated="5" table:style-name="ce62"/>
          <table:table-cell table:style-name="ce54" office:value-type="string" ns42:value-type="string" table:number-columns-spanned="6" table:number-rows-spanned="1">
            <text:p>DRAFT · DEMO</text:p>
          </table:table-cell>
          <table:covered-table-cell table:number-columns-repeated="5" table:style-name="ce54"/>
          <table:table-cell table:style-name="ce54" office:value-type="string" ns42:value-type="string" table:number-columns-spanned="6" table:number-rows-spanned="1">
            <text:p>PUBLICATION READINESS GATE</text:p>
          </table:table-cell>
          <table:covered-table-cell table:number-columns-repeated="5" table:style-name="ce54"/>
        </table:table-row>
        <table:table-row table:style-name="ro19">
          <table:table-cell table:style-name="ce62" office:value-type="string" ns42: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 LISTING RECORD DRAFT is not LISTED, PUBLISHED, EXPOSED,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READINESS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ns42:value-type="string" table:number-columns-spanned="4" table:number-rows-spanned="1">
            <text:p>REVIEW PUBLICATION READINESS</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PUBLICATION · DEMO</text:p>
          </table:table-cell>
          <table:covered-table-cell table:number-columns-repeated="3" table:style-name="ce54"/>
          <table:table-cell table:style-name="ce54" office:value-type="string" ns42:value-type="string" table:number-columns-spanned="6" table:number-rows-spanned="1">
            <text:p>PUBLICATION READINESS</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READY FOR PUBLICATION · DEMO</text:p>
          </table:table-cell>
          <table:covered-table-cell table:number-columns-repeated="5" table:style-name="ce62"/>
          <table:table-cell table:style-name="ce54" office:value-type="string" ns42:value-type="string" table:number-columns-spanned="6" table:number-rows-spanned="1">
            <text:p>NOT PUBLISHED · DEMO</text:p>
          </table:table-cell>
          <table:covered-table-cell table:number-columns-repeated="5" table:style-name="ce54"/>
          <table:table-cell table:style-name="ce54" office:value-type="string" ns42:value-type="string" table:number-columns-spanned="6" table:number-rows-spanned="1">
            <text:p>PUBLICATION / MARKETPLACE EXPOSURE</text:p>
          </table:table-cell>
          <table:covered-table-cell table:number-columns-repeated="5" table:style-name="ce54"/>
        </table:table-row>
        <table:table-row table:style-name="ro5">
          <table:table-cell table:style-name="ce62" office:value-type="string" ns42: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AUTHORIZ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AUTHORIZ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19">
          <table:table-cell table:style-name="ce54" office:value-type="string" ns42:value-type="string" table:number-columns-spanned="4" table:number-rows-spanned="1">
            <text:p>AUTHORIZE PUBLIC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ELLER AUTHORIZED PUBLICATION · DEMO</text:p>
          </table:table-cell>
          <table:covered-table-cell table:number-columns-repeated="3" table:style-name="ce54"/>
          <table:table-cell table:style-name="ce54" office:value-type="string" ns42:value-type="string" table:number-columns-spanned="6" table:number-rows-spanned="1">
            <text:p>NOT YET PUBLISH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UBLICATION AUTHORITY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AUTHORIZED · DEMO</text:p>
          </table:table-cell>
          <table:covered-table-cell table:number-columns-repeated="5" table:style-name="ce62"/>
          <table:table-cell table:style-name="ce54" office:value-type="string" ns42:value-type="string" table:number-columns-spanned="6" table:number-rows-spanned="1">
            <text:p>AUTHORIZED · DEMO</text:p>
          </table:table-cell>
          <table:covered-table-cell table:number-columns-repeated="5" table:style-name="ce54"/>
          <table:table-cell table:style-name="ce54" office:value-type="string" ns42:value-type="string" table:number-columns-spanned="6" table:number-rows-spanned="1">
            <text:p>PUBLICATION RESUL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EVENT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PUBLICATION RESULT</text:p>
          </table:table-cell>
          <table:covered-table-cell table:number-columns-repeated="3" table:style-name="ce82"/>
          <table:table-cell table:style-name="ce49" office:value-type="string" ns42: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ns42:value-type="string" table:number-columns-spanned="4" table:number-rows-spanned="1">
            <text:p>RECORD PUBLICATION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UBLISHED · DEMO</text:p>
          </table:table-cell>
          <table:covered-table-cell table:number-columns-repeated="3" table:style-name="ce54"/>
          <table:table-cell table:style-name="ce54" office:value-type="string" ns42:value-type="string" table:number-columns-spanned="6" table:number-rows-spanned="1">
            <text:p>EBAY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EV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ns42:value-type="string" table:number-columns-spanned="6" table:number-rows-spanned="1">
            <text:p>PUBLICATION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PLATFORM EXPOSURE REVIEW</text:p>
          </table:table-cell>
          <table:covered-table-cell table:number-columns-repeated="5" table:style-name="ce54"/>
        </table:table-row>
        <table:table-row table:style-name="ro5">
          <table:table-cell table:style-name="ce62" office:value-type="string" ns42: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CONTROLLED PUBLICATION OUTCOMES: PUBLISHED · FAIL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 listing ID, URL, marketplace response, or publication fact.</text:p>
          </table:table-cell>
          <table:covered-table-cell table:number-columns-repeated="17" table:style-name="ce62"/>
        </table:table-row>
        <table:table-row table:style-name="ro5">
          <table:table-cell table:style-name="ce63" office:value-type="string" ns42:value-type="string" table:number-columns-spanned="18" table:number-rows-spanned="1">
            <text:p>📣 PLATFORM EXPOSURE ACTI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EXPOSURE RESULT</text:p>
          </table:table-cell>
          <table:covered-table-cell table:number-columns-repeated="3" table:style-name="ce82"/>
          <table:table-cell table:style-name="ce49" office:value-type="string" ns42: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ns42:value-type="string" table:number-columns-spanned="4" table:number-rows-spanned="1">
            <text:p>REVIEW PLATFORM EXPOSUR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ACTIVE · DEMO</text:p>
          </table:table-cell>
          <table:covered-table-cell table:number-columns-repeated="3" table:style-name="ce54"/>
          <table:table-cell table:style-name="ce54" office:value-type="string" ns42:value-type="string" table:number-columns-spanned="6" table:number-rows-spanned="1">
            <text:p>PUBLISHED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PLATFORM EXPOSURE STATE</text:p>
          </table:table-cell>
          <table:covered-table-cell table:number-columns-repeated="5" table:style-name="ce69"/>
          <table:table-cell table:style-name="ce69" office:value-type="string" ns42: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ns42:value-type="string" table:number-columns-spanned="6" table:number-rows-spanned="1">
            <text:p>PLATFORM EXPOSURE ACTIVAT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POST-PUBLICATION / SALE BOUNDARY</text:p>
          </table:table-cell>
          <table:covered-table-cell table:number-columns-repeated="5" table:style-name="ce54"/>
        </table:table-row>
        <table:table-row table:style-name="ro5">
          <table:table-cell table:style-name="ce62" office:value-type="string" ns42:value-type="string" table:number-columns-spanned="18" table:number-rows-spanned="1">
            <text:p>EXPOSURE ACTIVATION RULE · DEMO: Only factual PUBLISHED publication evidence ma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FAILED, PENDING REVIEW, or UNKNOWN REVIEW publication results cannot silently activate Platform Exposure.</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UTHORIZED ≠ PUBLISHED · PUBLISHED ≠ SOLD · ACTIVE PLATFORM EXPOSURE ≠ SOLD.</text:p>
          </table:table-cell>
          <table:covered-table-cell table:number-columns-repeated="17" table:style-name="ce62"/>
        </table:table-row>
        <table:table-row table:style-name="ro19">
          <table:table-cell table:style-name="ce62" office:value-type="string" ns42: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ALE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ALE OBSERVATION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SALE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OBSERVED · DEMO</text:p>
          </table:table-cell>
          <table:covered-table-cell table:number-columns-repeated="3" table:style-name="ce54"/>
          <table:table-cell table:style-name="ce54" office:value-type="string" ns42:value-type="string" table:number-columns-spanned="6" table:number-rows-spanned="1">
            <text:p>ACTIVE EXPOSURE IS NOT A SAL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ALE EVIDENCE OBSERVED · DEMO</text:p>
          </table:table-cell>
          <table:covered-table-cell table:number-columns-repeated="5" table:style-name="ce62"/>
          <table:table-cell table:style-name="ce54" office:value-type="string" ns42:value-type="string" table:number-columns-spanned="6" table:number-rows-spanned="1">
            <text:p>FACTUAL OBSERVATION · DEMO</text:p>
          </table:table-cell>
          <table:covered-table-cell table:number-columns-repeated="5" table:style-name="ce54"/>
          <table:table-cell table:style-name="ce54" office:value-type="string" ns42:value-type="string" table:number-columns-spanned="6" table:number-rows-spanned="1">
            <text:p>SALE RELATIONSHIP RECORD</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ALE OBSERVATION OUTCOMES: SALE OBSERVED · NO SALE OBSERV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2"/>
        </table:table-row>
        <table:table-row table:style-name="ro5">
          <table:table-cell table:style-name="ce63" office:value-type="string" ns42:value-type="string" table:number-columns-spanned="18" table:number-rows-spanned="1">
            <text:p>🧾 SALE RELATIONSHIP RECORD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RELATIONSHIP RESULT</text:p>
          </table:table-cell>
          <table:covered-table-cell table:number-columns-repeated="3" table:style-name="ce82"/>
          <table:table-cell table:style-name="ce49" office:value-type="string" ns42: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ns42:value-type="string" table:number-columns-spanned="4" table:number-rows-spanned="1">
            <text:p>RECORD SALE RELATIONSHIP</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ALE RELATIONSHIP RECORDED · DEMO</text:p>
          </table:table-cell>
          <table:covered-table-cell table:number-columns-repeated="3" table:style-name="ce54"/>
          <table:table-cell table:style-name="ce54" office:value-type="string" ns42:value-type="string" table:number-columns-spanned="6" table:number-rows-spanned="1">
            <text:p>1 UNIT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ALE RELATIONSHIP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INVENTORY ↔ SALE RELATIONSHIP RECORDED · DEMO</text:p>
          </table:table-cell>
          <table:covered-table-cell table:number-columns-repeated="5" table:style-name="ce62"/>
          <table:table-cell table:style-name="ce54" office:value-type="string" ns42:value-type="string" table:number-columns-spanned="6" table:number-rows-spanned="1">
            <text:p>RECORDED · DEMO</text:p>
          </table:table-cell>
          <table:covered-table-cell table:number-columns-repeated="5" table:style-name="ce54"/>
          <table:table-cell table:style-name="ce54" office:value-type="string" ns42:value-type="string" table:number-columns-spanned="6" table:number-rows-spanned="1">
            <text:p>SOL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2"/>
        </table:table-row>
        <table:table-row table:style-name="ro5">
          <table:table-cell table:style-name="ce62" office:value-type="string" ns42: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2"/>
        </table:table-row>
        <table:table-row table:style-name="ro5">
          <table:table-cell table:style-name="ce63" office:value-type="string" ns42:value-type="string" table:number-columns-spanned="18" table:number-rows-spanned="1">
            <text:p>🚧 SOL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OL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OLD TRANSITION · DEMO</text:p>
          </table:table-cell>
          <table:covered-table-cell table:number-columns-repeated="3" table:style-name="ce54"/>
          <table:table-cell table:style-name="ce54" office:value-type="string" ns42:value-type="string" table:number-columns-spanned="6" table:number-rows-spanned="1">
            <text:p>1 UNIT SOL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OLD INVENTORY STATE</text:p>
          </table:table-cell>
          <table:covered-table-cell table:number-columns-repeated="5" table:style-name="ce69"/>
          <table:table-cell table:style-name="ce69" office:value-type="string" ns42:value-type="string" table:number-columns-spanned="6" table:number-rows-spanned="1">
            <text:p>REMAINING INVENTORY RULE</text:p>
          </table:table-cell>
          <table:covered-table-cell table:number-columns-repeated="5" table:style-name="ce69"/>
        </table:table-row>
        <table:table-row table:style-name="ro20">
          <table:table-cell table:style-name="ce62" office:value-type="string" ns42:value-type="string" table:number-columns-spanned="6" table:number-rows-spanned="1">
            <text:p>SOLD TRANSITION SUPPORTED · DEMO</text:p>
          </table:table-cell>
          <table:covered-table-cell table:number-columns-repeated="5" table:style-name="ce62"/>
          <table:table-cell table:style-name="ce54" office:value-type="string" ns42:value-type="string" table:number-columns-spanned="6" table:number-rows-spanned="1">
            <text:p>SOLD · DEMO</text:p>
          </table:table-cell>
          <table:covered-table-cell table:number-columns-repeated="5" table:style-name="ce54"/>
          <table:table-cell table:style-name="ce54" office:value-type="string" ns42:value-type="string" table:number-columns-spanned="6" table:number-rows-spanned="1">
            <text:p>UNSOLD QUANTITY RETAINS CORRECT STATE</text:p>
          </table:table-cell>
          <table:covered-table-cell table:number-columns-repeated="5" table:style-name="ce54"/>
        </table:table-row>
        <table:table-row table:style-name="ro5">
          <table:table-cell table:style-name="ce62" office:value-type="string" ns42: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Historical Platform Exposure evidence remains preserved after the supported sol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ACTIVE PLATFORM EXPOSURE ≠ SALE OBSERVED ≠ SALE RELATIONSHIP RECORDED ≠ SOL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FULFILLMENT PREPAR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FULFILLMENT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CKAGING + SHIPMENT PATH REVIEWED · DEMO</text:p>
          </table:table-cell>
          <table:covered-table-cell table:number-columns-repeated="3" table:style-name="ce54"/>
          <table:table-cell table:style-name="ce54" office:value-type="string" ns42:value-type="string" table:number-columns-spanned="6" table:number-rows-spanned="1">
            <text:p>NOT YET SHIPPED</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FULFILLMENT PREPARATION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READY FOR SHIPMENT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SHIPMENT EVENT EVIDENCE</text:p>
          </table:table-cell>
          <table:covered-table-cell table:number-columns-repeated="5" table:style-name="ce54"/>
        </table:table-row>
        <table:table-row table:style-name="ro5">
          <table:table-cell table:style-name="ce62" office:value-type="string" ns42: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EVEN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HIPMENT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CORD SHIPMENT RESULT</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FACTUAL SHIP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SHIPMENT EVENT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HIPPED INVENTORY TRANSI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HIPMENT OUTCOMES: SHIPPED · NOT SHIPP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SHIPMENT EVIDENCE: A factual shipment result is recorded for the supported sol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CARRIER, SERVICE, TRACKING, WEIGHT, POSTAGE, AND SHIPMENT REFERENCE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carrier, tracking, postage, label, or shipment facts. READY FOR SHIPMENT ≠ SHIPPED.</text:p>
          </table:table-cell>
          <table:covered-table-cell table:number-columns-repeated="17" table:style-name="ce62"/>
        </table:table-row>
        <table:table-row table:style-name="ro5">
          <table:table-cell table:style-name="ce63" office:value-type="string" ns42:value-type="string" table:number-columns-spanned="18" table:number-rows-spanned="1">
            <text:p>🚧 SHIPPED INVENTORY TRANSI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QUANTITY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SHIPPED TRANSI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SHIPPED TRANSITION · DEMO</text:p>
          </table:table-cell>
          <table:covered-table-cell table:number-columns-repeated="3" table:style-name="ce54"/>
          <table:table-cell table:style-name="ce54" office:value-type="string" ns42:value-type="string" table:number-columns-spanned="6" table:number-rows-spanned="1">
            <text:p>1 SOLD UNIT SHIPPED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HIPPED INVENTORY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SHIPPED TRANSITION SUPPORT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ALE + PLATFORM EXPOSURE PRESERVED</text:p>
          </table:table-cell>
          <table:covered-table-cell table:number-columns-repeated="5" table:style-name="ce54"/>
        </table:table-row>
        <table:table-row table:style-name="ro5">
          <table:table-cell table:style-name="ce62" office:value-type="string" ns42:value-type="string" table:number-columns-spanned="18" table:number-rows-spanned="1">
            <text:p>SHIPPED TRANSITION CROSS-CHECK · DEMO: factual SHIPPED evidence + supported sold quantity relationship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QUANTITY CONTROL: Only the supported sold quantity tied to factual SHIPPED evidence may transition to SHIPP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OLD ≠ READY FOR SHIPMENT ≠ SHIPPE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OBSERVATION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DELIVERY RESULT</text:p>
          </table:table-cell>
          <table:covered-table-cell table:number-columns-repeated="3" table:style-name="ce82"/>
          <table:table-cell table:style-name="ce49" office:value-type="string" ns42:value-type="string" table:number-columns-spanned="6" table:number-rows-spanned="1">
            <text:p>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FACTUAL 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DELIVERY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DELIVERY EVENT OBSERV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SETTLEMENT / PAYOUT EVIDENC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DELIVERY OUTCOMES: DELIVERED · NOT DELIVERED · PENDING REVIEW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DEMO DELIVERY RESULT: Factual delivery evidence is observed for the supported shipped quantity.</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 SHIPPED ≠ DELIVERED.</text:p>
          </table:table-cell>
          <table:covered-table-cell table:number-columns-repeated="17" table:style-name="ce62"/>
        </table:table-row>
        <table:table-row table:style-name="ro5">
          <table:table-cell table:style-name="ce63" office:value-type="string" ns42:value-type="string" table:number-columns-spanned="18" table:number-rows-spanned="1">
            <text:p>💵 SETTLEMENT / PAYOUT EVIDENCE ACTION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SETTLEMENT RESULT</text:p>
          </table:table-cell>
          <table:covered-table-cell table:number-columns-repeated="3" table:style-name="ce82"/>
          <table:table-cell table:style-name="ce49" office:value-type="string" ns42: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ns42:value-type="string" table:number-columns-spanned="4" table:number-rows-spanned="1">
            <text:p>REVIEW SETTLEMENT EVIDENCE</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PAID OUT · DEMO</text:p>
          </table:table-cell>
          <table:covered-table-cell table:number-columns-repeated="3" table:style-name="ce54"/>
          <table:table-cell table:style-name="ce54" office:value-type="string" ns42:value-type="string" table:number-columns-spanned="6" table:number-rows-spanned="1">
            <text:p>FACTUAL SETTLEMENT EVIDENCE</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SETTLEMENT EVIDENCE STATE</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6" table:number-rows-spanned="1">
            <text:p>PAYOUT EVIDENCE RECORDED · DEMO</text:p>
          </table:table-cell>
          <table:covered-table-cell table:number-columns-repeated="5" table:style-name="ce62"/>
          <table:table-cell table:style-name="ce54" office:value-type="string" ns42:value-type="string" table:number-columns-spanned="6" table:number-rows-spanned="1">
            <text:p>FACTUAL RESULT RECORDED · DEMO</text:p>
          </table:table-cell>
          <table:covered-table-cell table:number-columns-repeated="5" table:style-name="ce54"/>
          <table:table-cell table:style-name="ce54" office:value-type="string" ns42:value-type="string" table:number-columns-spanned="6" table:number-rows-spanned="1">
            <text:p>LIFECYCLE COMPLETION GATE</text:p>
          </table:table-cell>
          <table:covered-table-cell table:number-columns-repeated="5" table:style-name="ce54"/>
        </table:table-row>
        <table:table-row table:style-name="ro5">
          <table:table-cell table:style-name="ce62" office:value-type="string" ns42:value-type="string" table:number-columns-spanned="18" table:number-rows-spanned="1">
            <text:p>CONTROLLED SETTLEMENT OUTCOMES: PAID OUT · PENDING PAYOUT · HELD · UNKNOWN REVIEW.</text:p>
          </table:table-cell>
          <table:covered-table-cell table:number-columns-repeated="17" table:style-name="ce62"/>
        </table:table-row>
        <table:table-row table:style-name="ro5">
          <table:table-cell table:style-name="ce62" office:value-type="string" ns42:value-type="string" table:number-columns-spanned="18" table:number-rows-spanned="1">
            <text:p>FEES, TAXES, MARKETPLACE ADJUSTMENTS, AND PAYOUT AMOUNTS: Record only when factually know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financial settlement facts. DELIVERED ≠ PAID OUT.</text:p>
          </table:table-cell>
          <table:covered-table-cell table:number-columns-repeated="17" table:style-name="ce62"/>
        </table:table-row>
        <table:table-row table:style-name="ro5">
          <table:table-cell table:style-name="ce63" office:value-type="string" ns42:value-type="string" table:number-columns-spanned="18" table:number-rows-spanned="1">
            <text:p>🚧 LIFECYCLE COMPLETION GATE · DEMO TASK PROGRESS</text:p>
          </table:table-cell>
          <table:covered-table-cell table:number-columns-repeated="17" table:style-name="ce63"/>
        </table:table-row>
        <table:table-row table:style-name="ro5">
          <table:table-cell table:style-name="ce74" office:value-type="string" ns42:value-type="string" table:number-columns-spanned="4" table:number-rows-spanned="1">
            <text:p>CURRENT TASK</text:p>
          </table:table-cell>
          <table:covered-table-cell table:number-columns-repeated="3" table:style-name="ce74"/>
          <table:table-cell table:style-name="ce49" office:value-type="string" ns42:value-type="string" table:number-columns-spanned="4" table:number-rows-spanned="1">
            <text:p>TASK STATE</text:p>
          </table:table-cell>
          <table:covered-table-cell table:number-columns-repeated="3" table:style-name="ce49"/>
          <table:table-cell table:style-name="ce82" office:value-type="string" ns42:value-type="string" table:number-columns-spanned="4" table:number-rows-spanned="1">
            <text:p>GATE RESULT</text:p>
          </table:table-cell>
          <table:covered-table-cell table:number-columns-repeated="3" table:style-name="ce82"/>
          <table:table-cell table:style-name="ce49" office:value-type="string" ns42: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ns42:value-type="string" table:number-columns-spanned="4" table:number-rows-spanned="1">
            <text:p>REVIEW LIFECYCLE COMPLETION</text:p>
          </table:table-cell>
          <table:covered-table-cell table:number-columns-repeated="3" table:style-name="ce54"/>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SUPPORTED FOR COMPLETION · DEMO</text:p>
          </table:table-cell>
          <table:covered-table-cell table:number-columns-repeated="3" table:style-name="ce54"/>
          <table:table-cell table:style-name="ce54" office:value-type="string" ns42:value-type="string" table:number-columns-spanned="6" table:number-rows-spanned="1">
            <text:p>COMPLETE · DEMO</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COMPLETION</text:p>
          </table:table-cell>
          <table:covered-table-cell table:number-columns-repeated="5" table:style-name="ce69"/>
          <table:table-cell table:style-name="ce69" office:value-type="string" ns42:value-type="string" table:number-columns-spanned="6" table:number-rows-spanned="1">
            <text:p>LIFECYCLE STAT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LIFECYCLE COMPLETION SUPPORTED · DEMO</text:p>
          </table:table-cell>
          <table:covered-table-cell table:number-columns-repeated="5" table:style-name="ce62"/>
          <table:table-cell table:style-name="ce54" office:value-type="string" ns42:value-type="string" table:number-columns-spanned="6" table:number-rows-spanned="1">
            <text:p>COMPLETE · DEMO</text:p>
          </table:table-cell>
          <table:covered-table-cell table:number-columns-repeated="5" table:style-name="ce54"/>
          <table:table-cell table:style-name="ce54" office:value-type="string" ns42: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2"/>
        </table:table-row>
        <table:table-row table:style-name="ro5">
          <table:table-cell table:style-name="ce62" office:value-type="string" ns42: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2"/>
        </table:table-row>
        <table:table-row table:style-name="ro5">
          <table:table-cell table:style-name="ce62" office:value-type="string" ns42:value-type="string" table:number-columns-spanned="18" table:number-rows-spanned="1">
            <text:p>VOCABULARY CONTRACT: SHIPPED ≠ DELIVERED · DELIVERED ≠ PAID OUT · PAID OUT ≠ COMPLET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COMPLETE requires the explicit lifecycle cross-check. No missing delivery or settlement fact is invented.</text:p>
          </table:table-cell>
          <table:covered-table-cell table:number-columns-repeated="17" table:style-name="ce62"/>
        </table:table-row>
        <table:table-row table:style-name="ro5">
          <table:table-cell table:style-name="ce63" office:value-type="string" ns42:value-type="string" table:number-columns-spanned="18" table:number-rows-spanned="1">
            <text:p>🎯 OPERATOR RECORD SELECTION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OPERATOR RESPONSIBILITY</text:p>
          </table:table-cell>
          <table:covered-table-cell table:number-columns-repeated="3" table:style-name="ce74"/>
          <table:table-cell table:style-name="ce49" office:value-type="string" ns42:value-type="string" table:number-columns-spanned="4" table:number-rows-spanned="1">
            <text:p>SELECTION STATE</text:p>
          </table:table-cell>
          <table:covered-table-cell table:number-columns-repeated="3" table:style-name="ce49"/>
          <table:table-cell table:style-name="ce82" office:value-type="string" ns42:value-type="string" table:number-columns-spanned="4" table:number-rows-spanned="1">
            <text:p>SELECTED RECO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INVENTORY RECORD</text:p>
          </table:table-cell>
          <table:covered-table-cell table:number-columns-repeated="3" table:style-name="ce54"/>
          <table:table-cell table:style-name="ce54" office:value-type="string" ns42:value-type="string" table:number-columns-spanned="4" table:number-rows-spanned="1">
            <text:p>SELECTED · DEMO</text:p>
          </table:table-cell>
          <table:covered-table-cell table:number-columns-repeated="3" table:style-name="ce54"/>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6" table:number-rows-spanned="1">
            <text:p>ONE WORKING RECORD CONTEXT</text:p>
          </table:table-cell>
          <table:covered-table-cell table:number-columns-repeated="5" table:style-name="ce54"/>
        </table:table-row>
        <table:table-row table:style-name="ro5">
          <table:table-cell table:style-name="ce69" office:value-type="string" ns42:value-type="string" table:number-columns-spanned="6" table:number-rows-spanned="1">
            <text:p>RESULT AFTER SELECTION</text:p>
          </table:table-cell>
          <table:covered-table-cell table:number-columns-repeated="5" table:style-name="ce69"/>
          <table:table-cell table:style-name="ce69" office:value-type="string" ns42:value-type="string" table:number-columns-spanned="6" table:number-rows-spanned="1">
            <text:p>WORKING CONTEXT</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CORD CONTEXT ESTABLISHED · DEMO</text:p>
          </table:table-cell>
          <table:covered-table-cell table:number-columns-repeated="5" table:style-name="ce62"/>
          <table:table-cell table:style-name="ce54" office:value-type="string" ns42:value-type="string" table:number-columns-spanned="6" table:number-rows-spanned="1">
            <text:p>ACTIVE · DEMO</text:p>
          </table:table-cell>
          <table:covered-table-cell table:number-columns-repeated="5" table:style-name="ce54"/>
          <table:table-cell table:style-name="ce54" office:value-type="string" ns42:value-type="string" table:number-columns-spanned="6" table:number-rows-spanned="1">
            <text:p>CURRENT LIFECYCLE STATE</text:p>
          </table:table-cell>
          <table:covered-table-cell table:number-columns-repeated="5" table:style-name="ce54"/>
        </table:table-row>
        <table:table-row table:style-name="ro5">
          <table:table-cell table:style-name="ce62" office:value-type="string" ns42:value-type="string" table:number-columns-spanned="18" table:number-rows-spanned="1">
            <text:p>OPERATOR CONTRACT: MarketDEX establishes which Inventory record is being reviewed before presenting lifecycle guida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ecord selection does not alter quantity, cost, state, exposure, sale, shipment, settlement, or history.</text:p>
          </table:table-cell>
          <table:covered-table-cell table:number-columns-repeated="17" table:style-name="ce62"/>
        </table:table-row>
        <table:table-row table:style-name="ro5">
          <table:table-cell table:style-name="ce63" office:value-type="string" ns42:value-type="string" table:number-columns-spanned="18" table:number-rows-spanned="1">
            <text:p>📍 CURRENT LIFECYCLE STATE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RECORD</text:p>
          </table:table-cell>
          <table:covered-table-cell table:number-columns-repeated="3" table:style-name="ce74"/>
          <table:table-cell table:style-name="ce49" office:value-type="string" ns42:value-type="string" table:number-columns-spanned="4" table:number-rows-spanned="1">
            <text:p>SUPPORTED STATE</text:p>
          </table:table-cell>
          <table:covered-table-cell table:number-columns-repeated="3" table:style-name="ce49"/>
          <table:table-cell table:style-name="ce82" office:value-type="string" ns42:value-type="string" table:number-columns-spanned="4" table:number-rows-spanned="1">
            <text:p>STATE SOURC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SUPPORTED LIFECYCLE EVIDENCE</text:p>
          </table:table-cell>
          <table:covered-table-cell table:number-columns-repeated="3" table:style-name="ce54"/>
          <table:table-cell table:style-name="ce54" office:value-type="string" ns42:value-type="string" table:number-columns-spanned="6" table:number-rows-spanned="1">
            <text:p>READ-ORIENTED STATE</text:p>
          </table:table-cell>
          <table:covered-table-cell table:number-columns-repeated="5" table:style-name="ce54"/>
        </table:table-row>
        <table:table-row table:style-name="ro5">
          <table:table-cell table:style-name="ce69" office:value-type="string" ns42:value-type="string" table:number-columns-spanned="6" table:number-rows-spanned="1">
            <text:p>STATE SURFACE RESULT</text:p>
          </table:table-cell>
          <table:covered-table-cell table:number-columns-repeated="5" table:style-name="ce69"/>
          <table:table-cell table:style-name="ce69" office:value-type="string" ns42:value-type="string" table:number-columns-spanned="6" table:number-rows-spanned="1">
            <text:p>CURRENT BUSINESS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CURRENT STATE SHOWN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NEXT REQUIRED ACTION</text:p>
          </table:table-cell>
          <table:covered-table-cell table:number-columns-repeated="5" table:style-name="ce54"/>
        </table:table-row>
        <table:table-row table:style-name="ro5">
          <table:table-cell table:style-name="ce62" office:value-type="string" ns42:value-type="string" table:number-columns-spanned="18" table:number-rows-spanned="1">
            <text:p>STATE CONTRACT: The operator sees the current supported business state for the selected record.</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2"/>
        </table:table-row>
        <table:table-row table:style-name="ro5">
          <table:table-cell table:style-name="ce63" office:value-type="string" ns42:value-type="string" table:number-columns-spanned="18" table:number-rows-spanned="1">
            <text:p>👉 NEXT REQUIRED ACTION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ACTION BASI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6" table:number-rows-spanned="1">
            <text:p>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ACTION SURFAC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NEXT ACTION SHOWN · DEMO</text:p>
          </table:table-cell>
          <table:covered-table-cell table:number-columns-repeated="5" table:style-name="ce62"/>
          <table:table-cell table:style-name="ce54" office:value-type="string" ns42:value-type="string" table:number-columns-spanned="6" table:number-rows-spanned="1">
            <text:p>REVIEW DELIVERY EVIDENCE</text:p>
          </table:table-cell>
          <table:covered-table-cell table:number-columns-repeated="5" table:style-name="ce54"/>
          <table:table-cell table:style-name="ce54" office:value-type="string" ns42:value-type="string" table:number-columns-spanned="6" table:number-rows-spanned="1">
            <text:p>ACTIVE BLOCKER</text:p>
          </table:table-cell>
          <table:covered-table-cell table:number-columns-repeated="5" table:style-name="ce54"/>
        </table:table-row>
        <table:table-row table:style-name="ro5">
          <table:table-cell table:style-name="ce62" office:value-type="string" ns42:value-type="string" table:number-columns-spanned="18" table:number-rows-spanned="1">
            <text:p>NEXT-ACTION CONTRACT: The next responsibility is derived from supported current state and the locked lifecycle sequ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Guidance does not silently complete the action or change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ACTIVE BLOCKER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ACTION</text:p>
          </table:table-cell>
          <table:covered-table-cell table:number-columns-repeated="3" table:style-name="ce74"/>
          <table:table-cell table:style-name="ce49" office:value-type="string" ns42:value-type="string" table:number-columns-spanned="4" table:number-rows-spanned="1">
            <text:p>ACTIVE BLOCKER</text:p>
          </table:table-cell>
          <table:covered-table-cell table:number-columns-repeated="3" table:style-name="ce49"/>
          <table:table-cell table:style-name="ce82" office:value-type="string" ns42:value-type="string" table:number-columns-spanned="4" table:number-rows-spanned="1">
            <text:p>BLOCKER STAT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UNRESOLVED · DEMO</text:p>
          </table:table-cell>
          <table:covered-table-cell table:number-columns-repeated="3" table:style-name="ce54"/>
          <table:table-cell table:style-name="ce54" office:value-type="string" ns42:value-type="string" table:number-columns-spanned="6" table:number-rows-spanned="1">
            <text:p>ONE EXPLICIT BLOCKER</text:p>
          </table:table-cell>
          <table:covered-table-cell table:number-columns-repeated="5" table:style-name="ce54"/>
        </table:table-row>
        <table:table-row table:style-name="ro5">
          <table:table-cell table:style-name="ce69" office:value-type="string" ns42:value-type="string" table:number-columns-spanned="6" table:number-rows-spanned="1">
            <text:p>BLOCKER SURFACE RESULT</text:p>
          </table:table-cell>
          <table:covered-table-cell table:number-columns-repeated="5" table:style-name="ce69"/>
          <table:table-cell table:style-name="ce69" office:value-type="string" ns42:value-type="string" table:number-columns-spanned="6" table:number-rows-spanned="1">
            <text:p>ADVANCEMENT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BLOCKER EXPOSED · DEMO</text:p>
          </table:table-cell>
          <table:covered-table-cell table:number-columns-repeated="5" table:style-name="ce62"/>
          <table:table-cell table:style-name="ce54" office:value-type="string" ns42:value-type="string" table:number-columns-spanned="6" table:number-rows-spanned="1">
            <text:p>ADVANCEMENT BLOCKED · DEMO</text:p>
          </table:table-cell>
          <table:covered-table-cell table:number-columns-repeated="5" table:style-name="ce54"/>
          <table:table-cell table:style-name="ce54" office:value-type="string" ns42:value-type="string" table:number-columns-spanned="6" table:number-rows-spanned="1">
            <text:p>EVIDENCE NEEDED</text:p>
          </table:table-cell>
          <table:covered-table-cell table:number-columns-repeated="5" table:style-name="ce54"/>
        </table:table-row>
        <table:table-row table:style-name="ro5">
          <table:table-cell table:style-name="ce62" office:value-type="string" ns42: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An unresolved blocker cannot be silently cleared by unrelated evidence.</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NEEDED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ACTIVE BLOCKER</text:p>
          </table:table-cell>
          <table:covered-table-cell table:number-columns-repeated="3" table:style-name="ce74"/>
          <table:table-cell table:style-name="ce49" office:value-type="string" ns42:value-type="string" table:number-columns-spanned="4" table:number-rows-spanned="1">
            <text:p>EVIDENCE NEEDED</text:p>
          </table:table-cell>
          <table:covered-table-cell table:number-columns-repeated="3" table:style-name="ce49"/>
          <table:table-cell table:style-name="ce82" office:value-type="string" ns42:value-type="string" table:number-columns-spanned="4" table:number-rows-spanned="1">
            <text:p>EVIDENCE STANDARD</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4" table:number-rows-spanned="1">
            <text:p>SUPPORTED FACT ONLY</text:p>
          </table:table-cell>
          <table:covered-table-cell table:number-columns-repeated="3" table:style-name="ce54"/>
          <table:table-cell table:style-name="ce54" office:value-type="string" ns42:value-type="string" table:number-columns-spanned="6" table:number-rows-spanned="1">
            <text:p>NO INVENTED FACTS</text:p>
          </table:table-cell>
          <table:covered-table-cell table:number-columns-repeated="5" table:style-name="ce54"/>
        </table:table-row>
        <table:table-row table:style-name="ro5">
          <table:table-cell table:style-name="ce69" office:value-type="string" ns42:value-type="string" table:number-columns-spanned="6" table:number-rows-spanned="1">
            <text:p>EVIDENCE SURFACE RESULT</text:p>
          </table:table-cell>
          <table:covered-table-cell table:number-columns-repeated="5" table:style-name="ce69"/>
          <table:table-cell table:style-name="ce69" office:value-type="string" ns42:value-type="string" table:number-columns-spanned="6" table:number-rows-spanned="1">
            <text:p>OPERATOR QUESTION</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EQUIRED EVIDENCE SHOWN · DEMO</text:p>
          </table:table-cell>
          <table:covered-table-cell table:number-columns-repeated="5" table:style-name="ce62"/>
          <table:table-cell table:style-name="ce54" office:value-type="string" ns42:value-type="string" table:number-columns-spanned="6" table:number-rows-spanned="1">
            <text:p>WHAT FACTUAL DELIVERY RESULT IS SUPPORTED?</text:p>
          </table:table-cell>
          <table:covered-table-cell table:number-columns-repeated="5" table:style-name="ce54"/>
          <table:table-cell table:style-name="ce54" office:value-type="string" ns42:value-type="string" table:number-columns-spanned="6" table:number-rows-spanned="1">
            <text:p>CONTROLLED OPERATOR INPUT</text:p>
          </table:table-cell>
          <table:covered-table-cell table:number-columns-repeated="5" table:style-name="ce54"/>
        </table:table-row>
        <table:table-row table:style-name="ro5">
          <table:table-cell table:style-name="ce62" office:value-type="string" ns42:value-type="string" table:number-columns-spanned="18" table:number-rows-spanned="1">
            <text:p>EVIDENCE CONTRACT: The operator is told what factual evidence is required next before entering a resul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cking visibility alone cannot silently prove delivery.</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OPERATOR INPU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INPUT</text:p>
          </table:table-cell>
          <table:covered-table-cell table:number-columns-repeated="3" table:style-name="ce49"/>
          <table:table-cell table:style-name="ce82" office:value-type="string" ns42:value-type="string" table:number-columns-spanned="4" table:number-rows-spanned="1">
            <text:p>DEMO ENTRY</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RECORD SUPPORTED EVIDENCE</text:p>
          </table:table-cell>
          <table:covered-table-cell table:number-columns-repeated="3" table:style-name="ce54"/>
          <table:table-cell table:style-name="ce54" office:value-type="string" ns42:value-type="string" table:number-columns-spanned="4" table:number-rows-spanned="1">
            <text:p>DELIVERED / NOT DELIVERED / PENDING REVIEW / UNKNOWN REVIEW</text:p>
          </table:table-cell>
          <table:covered-table-cell table:number-columns-repeated="3" table:style-name="ce54"/>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6" table:number-rows-spanned="1">
            <text:p>CONTROLLED VOCABULARY</text:p>
          </table:table-cell>
          <table:covered-table-cell table:number-columns-repeated="5" table:style-name="ce54"/>
        </table:table-row>
        <table:table-row table:style-name="ro5">
          <table:table-cell table:style-name="ce69" office:value-type="string" ns42:value-type="string" table:number-columns-spanned="6" table:number-rows-spanned="1">
            <text:p>INPUT SURFACE RESULT</text:p>
          </table:table-cell>
          <table:covered-table-cell table:number-columns-repeated="5" table:style-name="ce69"/>
          <table:table-cell table:style-name="ce69" office:value-type="string" ns42:value-type="string" table:number-columns-spanned="6" table:number-rows-spanned="1">
            <text:p>RECORDED EVIDEN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OPERATOR EVIDENCE RECORDED · DEMO</text:p>
          </table:table-cell>
          <table:covered-table-cell table:number-columns-repeated="5" table:style-name="ce62"/>
          <table:table-cell table:style-name="ce54" office:value-type="string" ns42:value-type="string" table:number-columns-spanned="6" table:number-rows-spanned="1">
            <text:p>DELIVERED · DEMO</text:p>
          </table:table-cell>
          <table:covered-table-cell table:number-columns-repeated="5" table:style-name="ce54"/>
          <table:table-cell table:style-name="ce54" office:value-type="string" ns42:value-type="string" table:number-columns-spanned="6" table:number-rows-spanned="1">
            <text:p>EVIDENCE REVIEW RESULT</text:p>
          </table:table-cell>
          <table:covered-table-cell table:number-columns-repeated="5" table:style-name="ce54"/>
        </table:table-row>
        <table:table-row table:style-name="ro5">
          <table:table-cell table:style-name="ce62" office:value-type="string" ns42: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2"/>
        </table:table-row>
        <table:table-row table:style-name="ro5">
          <table:table-cell table:style-name="ce63" office:value-type="string" ns42:value-type="string" table:number-columns-spanned="18" table:number-rows-spanned="1">
            <text:p>🧾 EVIDENCE REVIEW RESULT SURFAC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ECORDED EVIDENCE</text:p>
          </table:table-cell>
          <table:covered-table-cell table:number-columns-repeated="3" table:style-name="ce74"/>
          <table:table-cell table:style-name="ce49" office:value-type="string" ns42:value-type="string" table:number-columns-spanned="4" table:number-rows-spanned="1">
            <text:p>REVIEW RESULT</text:p>
          </table:table-cell>
          <table:covered-table-cell table:number-columns-repeated="3" table:style-name="ce49"/>
          <table:table-cell table:style-name="ce82" office:value-type="string" ns42:value-type="string" table:number-columns-spanned="4" table:number-rows-spanned="1">
            <text:p>CONTROLLED REVIEW STATES</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DELIVERED · DEMO</text:p>
          </table:table-cell>
          <table:covered-table-cell table:number-columns-repeated="3" table:style-name="ce54"/>
          <table:table-cell table:style-name="ce54" office:value-type="string" ns42:value-type="string" table:number-columns-spanned="4" table:number-rows-spanned="1">
            <text:p>SUPPORTED · DEMO</text:p>
          </table:table-cell>
          <table:covered-table-cell table:number-columns-repeated="3" table:style-name="ce54"/>
          <table:table-cell table:style-name="ce54" office:value-type="string" ns42:value-type="string" table:number-columns-spanned="4" table:number-rows-spanned="1">
            <text:p>SUPPORTED / UNSUPPORTED / PENDING REVIEW / UNKNOWN</text:p>
          </table:table-cell>
          <table:covered-table-cell table:number-columns-repeated="3" table:style-name="ce54"/>
          <table:table-cell table:style-name="ce54" office:value-type="string" ns42:value-type="string" table:number-columns-spanned="6" table:number-rows-spanned="1">
            <text:p>REVIEW BEFORE TRANSITION</text:p>
          </table:table-cell>
          <table:covered-table-cell table:number-columns-repeated="5" table:style-name="ce54"/>
        </table:table-row>
        <table:table-row table:style-name="ro5">
          <table:table-cell table:style-name="ce69" office:value-type="string" ns42:value-type="string" table:number-columns-spanned="6" table:number-rows-spanned="1">
            <text:p>REVIEW SURFACE RESULT</text:p>
          </table:table-cell>
          <table:covered-table-cell table:number-columns-repeated="5" table:style-name="ce69"/>
          <table:table-cell table:style-name="ce69" office:value-type="string" ns42:value-type="string" table:number-columns-spanned="6" table:number-rows-spanned="1">
            <text:p>EVIDENCE STAT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EVIDENCE REVIEWED · DEMO</text:p>
          </table:table-cell>
          <table:covered-table-cell table:number-columns-repeated="5" table:style-name="ce62"/>
          <table:table-cell table:style-name="ce54" office:value-type="string" ns42:value-type="string" table:number-columns-spanned="6" table:number-rows-spanned="1">
            <text:p>SUPPORTED · DEMO</text:p>
          </table:table-cell>
          <table:covered-table-cell table:number-columns-repeated="5" table:style-name="ce54"/>
          <table:table-cell table:style-name="ce54" office:value-type="string" ns42:value-type="string" table:number-columns-spanned="6" table:number-rows-spanned="1">
            <text:p>DERIVED TRANSITION PREVIEW</text:p>
          </table:table-cell>
          <table:covered-table-cell table:number-columns-repeated="5" table:style-name="ce54"/>
        </table:table-row>
        <table:table-row table:style-name="ro5">
          <table:table-cell table:style-name="ce62" office:value-type="string" ns42:value-type="string" table:number-columns-spanned="18" table:number-rows-spanned="1">
            <text:p>REVIEW CONTRACT: Recorded evidence is explicitly reviewed before MarketDEX may present a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 or unknown evidence cannot produc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RIVED TRANSITION PREVIEW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CURRENT STATE</text:p>
          </table:table-cell>
          <table:covered-table-cell table:number-columns-repeated="3" table:style-name="ce74"/>
          <table:table-cell table:style-name="ce49" office:value-type="string" ns42:value-type="string" table:number-columns-spanned="4" table:number-rows-spanned="1">
            <text:p>SUPPORTED EVIDENCE</text:p>
          </table:table-cell>
          <table:covered-table-cell table:number-columns-repeated="3" table:style-name="ce49"/>
          <table:table-cell table:style-name="ce82" office:value-type="string" ns42:value-type="string" table:number-columns-spanned="4" table:number-rows-spanned="1">
            <text:p>TRANSITION PREVIEW</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DELIVERED · SUPPORTED · DEMO</text:p>
          </table:table-cell>
          <table:covered-table-cell table:number-columns-repeated="3" table:style-name="ce54"/>
          <table:table-cell table:style-name="ce54" office:value-type="string" ns42:value-type="string" table:number-columns-spanned="4" table:number-rows-spanned="1">
            <text:p>SHIPPED → DELIVERED · DEMO PREVIEW</text:p>
          </table:table-cell>
          <table:covered-table-cell table:number-columns-repeated="3" table:style-name="ce54"/>
          <table:table-cell table:style-name="ce54" office:value-type="string" ns42:value-type="string" table:number-columns-spanned="6" table:number-rows-spanned="1">
            <text:p>PREVIEW ONLY</text:p>
          </table:table-cell>
          <table:covered-table-cell table:number-columns-repeated="5" table:style-name="ce54"/>
        </table:table-row>
        <table:table-row table:style-name="ro5">
          <table:table-cell table:style-name="ce69" office:value-type="string" ns42:value-type="string" table:number-columns-spanned="6" table:number-rows-spanned="1">
            <text:p>PREVIEW SURFACE RESULT</text:p>
          </table:table-cell>
          <table:covered-table-cell table:number-columns-repeated="5" table:style-name="ce69"/>
          <table:table-cell table:style-name="ce69" office:value-type="string" ns42:value-type="string" table:number-columns-spanned="6" table:number-rows-spanned="1">
            <text:p>STATE CHANGE STATU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SUPPORTED TRANSITION SHOWN · DEMO</text:p>
          </table:table-cell>
          <table:covered-table-cell table:number-columns-repeated="5" table:style-name="ce62"/>
          <table:table-cell table:style-name="ce54" office:value-type="string" ns42:value-type="string" table:number-columns-spanned="6" table:number-rows-spanned="1">
            <text:p>NOT APPLIED · DEMO</text:p>
          </table:table-cell>
          <table:covered-table-cell table:number-columns-repeated="5" table:style-name="ce54"/>
          <table:table-cell table:style-name="ce54" office:value-type="string" ns42:value-type="string" table:number-columns-spanned="6" table:number-rows-spanned="1">
            <text:p>INVENTORY ACTION CENTER GATE</text:p>
          </table:table-cell>
          <table:covered-table-cell table:number-columns-repeated="5" table:style-name="ce54"/>
        </table:table-row>
        <table:table-row table:style-name="ro5">
          <table:table-cell table:style-name="ce62" office:value-type="string" ns42:value-type="string" table:number-columns-spanned="18" table:number-rows-spanned="1">
            <text:p>PREVIEW CONTRACT: MarketDEX shows which transition would become supported from the reviewed evidence.</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2"/>
        </table:table-row>
        <table:table-row table:style-name="ro5">
          <table:table-cell table:style-name="ce63" office:value-type="string" ns42:value-type="string" table:number-columns-spanned="18" table:number-rows-spanned="1">
            <text:p>🎛️ INVENTORY ACTION CENTER GATE · DEMO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CURRENT STATE</text:p>
          </table:table-cell>
          <table:covered-table-cell table:number-columns-repeated="3" table:style-name="ce49"/>
          <table:table-cell table:style-name="ce82" office:value-type="string" ns42:value-type="string" table:number-columns-spanned="4" table:number-rows-spanned="1">
            <text:p>NEXT ACTION</text:p>
          </table:table-cell>
          <table:covered-table-cell table:number-columns-repeated="3" table:style-name="ce82"/>
          <table:table-cell table:style-name="ce49" office:value-type="string" ns42:value-type="string" table:number-columns-spanned="6" table:number-rows-spanned="1">
            <text:p>ACTIVE BLOCKER</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LIVERY EVIDENCE</text:p>
          </table:table-cell>
          <table:covered-table-cell table:number-columns-repeated="5" table:style-name="ce54"/>
        </table:table-row>
        <table:table-row table:style-name="ro5">
          <table:table-cell table:style-name="ce69" office:value-type="string" ns42:value-type="string" table:number-columns-spanned="6" table:number-rows-spanned="1">
            <text:p>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OPERATING BOUNDARY</text:p>
          </table:table-cell>
          <table:covered-table-cell table:number-columns-repeated="5" table:style-name="ce69"/>
        </table:table-row>
        <table:table-row table:style-name="ro20">
          <table:table-cell table:style-name="ce62" office:value-type="string" ns42:value-type="string" table:number-columns-spanned="6" table:number-rows-spanned="1">
            <text:p>DELIVERED · DEMO → SUPPORTED · DEMO → SHIPPED → DELIVERED PREVIEW</text:p>
          </table:table-cell>
          <table:covered-table-cell table:number-columns-repeated="5" table:style-name="ce62"/>
          <table:table-cell table:style-name="ce54" office:value-type="string" ns42:value-type="string" table:number-columns-spanned="6" table:number-rows-spanned="1">
            <text:p>OPERATOR PATH SUPPORTED · DEMO</text:p>
          </table:table-cell>
          <table:covered-table-cell table:number-columns-repeated="5"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The Action Center does not create automation, macros, buttons, marketplace connectors, or silent state changes.</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The operator should not need to read the full linear demo chain to understand what to do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LIFECYCLE ROUTING MAP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ROUTING INPUT</text:p>
          </table:table-cell>
          <table:covered-table-cell table:number-columns-repeated="3" table:style-name="ce74"/>
          <table:table-cell table:style-name="ce49" office:value-type="string" ns42:value-type="string" table:number-columns-spanned="4" table:number-rows-spanned="1">
            <text:p>ROUTING BASIS</text:p>
          </table:table-cell>
          <table:covered-table-cell table:number-columns-repeated="3" table:style-name="ce49"/>
          <table:table-cell table:style-name="ce82" office:value-type="string" ns42:value-type="string" table:number-columns-spanned="4" table:number-rows-spanned="1">
            <text:p>ROUTING OUTPU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UPPORTED CURRENT STATE</text:p>
          </table:table-cell>
          <table:covered-table-cell table:number-columns-repeated="3" table:style-name="ce54"/>
          <table:table-cell table:style-name="ce54" office:value-type="string" ns42:value-type="string" table:number-columns-spanned="4" table:number-rows-spanned="1">
            <text:p>LOCKED LIFECYCLE CONTRACT</text:p>
          </table:table-cell>
          <table:covered-table-cell table:number-columns-repeated="3" table:style-name="ce54"/>
          <table:table-cell table:style-name="ce54" office:value-type="string" ns42:value-type="string" table:number-columns-spanned="4" table:number-rows-spanned="1">
            <text:p>NEXT ACTION + BLOCKER + EVIDENCE</text:p>
          </table:table-cell>
          <table:covered-table-cell table:number-columns-repeated="3" table:style-name="ce54"/>
          <table:table-cell table:style-name="ce54" office:value-type="string" ns42:value-type="string" table:number-columns-spanned="6" table:number-rows-spanned="1">
            <text:p>NO STATE MUTATION</text:p>
          </table:table-cell>
          <table:covered-table-cell table:number-columns-repeated="5" table:style-name="ce54"/>
        </table:table-row>
        <table:table-row table:style-name="ro5">
          <table:table-cell table:style-name="ce69" office:value-type="string" ns42:value-type="string" table:number-columns-spanned="6" table:number-rows-spanned="1">
            <text:p>MAP RESULT</text:p>
          </table:table-cell>
          <table:covered-table-cell table:number-columns-repeated="5" table:style-name="ce69"/>
          <table:table-cell table:style-name="ce69" office:value-type="string" ns42:value-type="string" table:number-columns-spanned="6" table:number-rows-spanned="1">
            <text:p>CONTROLLED ROUTING STATES</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6" table:number-rows-spanned="1">
            <text:p>ROUTING MAP ESTABLISHED · DEMO</text:p>
          </table:table-cell>
          <table:covered-table-cell table:number-columns-repeated="5" table:style-name="ce62"/>
          <table:table-cell table:style-name="ce54" office:value-type="string" ns42:value-type="string" table:number-columns-spanned="6" table:number-rows-spanned="1">
            <text:p>PREPARATION NEEDED → COMPLETE</text:p>
          </table:table-cell>
          <table:covered-table-cell table:number-columns-repeated="5" table:style-name="ce54"/>
          <table:table-cell table:style-name="ce54" office:value-type="string" ns42:value-type="string" table:number-columns-spanned="6" table:number-rows-spanned="1">
            <text:p>STATE-SPECIFIC ROUTING</text:p>
          </table:table-cell>
          <table:covered-table-cell table:number-columns-repeated="5" table:style-name="ce54"/>
        </table:table-row>
        <table:table-row table:style-name="ro5">
          <table:table-cell table:style-name="ce62" office:value-type="string" ns42:value-type="string" table:number-columns-spanned="18" table:number-rows-spanned="1">
            <text:p>ROUTING CONTRACT: One supported current state selects one controlled operator route.</text:p>
          </table:table-cell>
          <table:covered-table-cell table:number-columns-repeated="17" table:style-name="ce62"/>
        </table:table-row>
        <table:table-row table:style-name="ro5">
          <table:table-cell table:style-name="ce62" office:value-type="string" ns42:value-type="string" table:number-columns-spanned="18" table:number-rows-spanned="1">
            <text:p>ROUTE OUTPUT: next action + active blocker + required evidence vocabulary + review responsibility + transition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Routing guidance cannot silently alter Inventory state.</text:p>
          </table:table-cell>
          <table:covered-table-cell table:number-columns-repeated="17" table:style-name="ce62"/>
        </table:table-row>
        <table:table-row table:style-name="ro5">
          <table:table-cell table:style-name="ce63" office:value-type="string" ns42:value-type="string" table:number-columns-spanned="18" table:number-rows-spanned="1">
            <text:p>🧰 PREPARATION NEEDE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REPARATION NEEDED · DEMO</text:p>
          </table:table-cell>
          <table:covered-table-cell table:number-columns-repeated="3" table:style-name="ce54"/>
          <table:table-cell table:style-name="ce54" office:value-type="string" ns42:value-type="string" table:number-columns-spanned="4" table:number-rows-spanned="1">
            <text:p>COMPLETE NEXT PREPARATION RESPONSIBILITY</text:p>
          </table:table-cell>
          <table:covered-table-cell table:number-columns-repeated="3" table:style-name="ce54"/>
          <table:table-cell table:style-name="ce54" office:value-type="string" ns42:value-type="string" table:number-columns-spanned="4" table:number-rows-spanned="1">
            <text:p>NEXT READINESS BLOCKER</text:p>
          </table:table-cell>
          <table:covered-table-cell table:number-columns-repeated="3" table:style-name="ce54"/>
          <table:table-cell table:style-name="ce54" office:value-type="string" ns42:value-type="string" table:number-columns-spanned="6" table:number-rows-spanned="1">
            <text:p>SUPPORTED PREPAR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REPARATION ADVANCE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READY-STAT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TO LIST / READY FOR PUBLICATION · DEMO</text:p>
          </table:table-cell>
          <table:covered-table-cell table:number-columns-repeated="3" table:style-name="ce54"/>
          <table:table-cell table:style-name="ce54" office:value-type="string" ns42:value-type="string" table:number-columns-spanned="4" table:number-rows-spanned="1">
            <text:p>CONFIRM LISTING INTENT / AUTHORIZE PUBLICATION</text:p>
          </table:table-cell>
          <table:covered-table-cell table:number-columns-repeated="3" table:style-name="ce54"/>
          <table:table-cell table:style-name="ce54" office:value-type="string" ns42:value-type="string" table:number-columns-spanned="4" table:number-rows-spanned="1">
            <text:p>LISTING RECORD / PUBLICATION AUTHORITY</text:p>
          </table:table-cell>
          <table:covered-table-cell table:number-columns-repeated="3" table:style-name="ce54"/>
          <table:table-cell table:style-name="ce54" office:value-type="string" ns42: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PUBLICATION + EXPOSURE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PUBLISHED / ACTIVE PLATFORM EXPOSURE · DEMO</text:p>
          </table:table-cell>
          <table:covered-table-cell table:number-columns-repeated="3" table:style-name="ce54"/>
          <table:table-cell table:style-name="ce54" office:value-type="string" ns42:value-type="string" table:number-columns-spanned="4" table:number-rows-spanned="1">
            <text:p>REVIEW PLATFORM EXPOSURE / OBSERVE SALE</text:p>
          </table:table-cell>
          <table:covered-table-cell table:number-columns-repeated="3" table:style-name="ce54"/>
          <table:table-cell table:style-name="ce54" office:value-type="string" ns42:value-type="string" table:number-columns-spanned="4" table:number-rows-spanned="1">
            <text:p>SALE EVIDENCE</text:p>
          </table:table-cell>
          <table:covered-table-cell table:number-columns-repeated="3" table:style-name="ce54"/>
          <table:table-cell table:style-name="ce54" office:value-type="string" ns42: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ALE-RESPONSIBILITY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OLD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SOLD · DEMO</text:p>
          </table:table-cell>
          <table:covered-table-cell table:number-columns-repeated="3" table:style-name="ce54"/>
          <table:table-cell table:style-name="ce54" office:value-type="string" ns42:value-type="string" table:number-columns-spanned="4" table:number-rows-spanned="1">
            <text:p>REVIEW FULFILLMENT PREPARATION</text:p>
          </table:table-cell>
          <table:covered-table-cell table:number-columns-repeated="3" table:style-name="ce54"/>
          <table:table-cell table:style-name="ce54" office:value-type="string" ns42:value-type="string" table:number-columns-spanned="4" table:number-rows-spanned="1">
            <text:p>FULFILLMENT PREPARATION</text:p>
          </table:table-cell>
          <table:covered-table-cell table:number-columns-repeated="3" table:style-name="ce54"/>
          <table:table-cell table:style-name="ce54" office:value-type="string" ns42: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READY FOR SHIPMENT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SOL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SHIP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READY FOR SHIPMENT / SHIPPED · DEMO</text:p>
          </table:table-cell>
          <table:covered-table-cell table:number-columns-repeated="3" table:style-name="ce54"/>
          <table:table-cell table:style-name="ce54" office:value-type="string" ns42:value-type="string" table:number-columns-spanned="4" table:number-rows-spanned="1">
            <text:p>RECORD SHIPMENT RESULT / REVIEW DELIVERY EVIDENCE</text:p>
          </table:table-cell>
          <table:covered-table-cell table:number-columns-repeated="3" table:style-name="ce54"/>
          <table:table-cell table:style-name="ce54" office:value-type="string" ns42:value-type="string" table:number-columns-spanned="4" table:number-rows-spanned="1">
            <text:p>SHIPMENT OR DELIVERY EVIDENCE</text:p>
          </table:table-cell>
          <table:covered-table-cell table:number-columns-repeated="3" table:style-name="ce54"/>
          <table:table-cell table:style-name="ce54" office:value-type="string" ns42:value-type="string" table:number-columns-spanned="6" table:number-rows-spanned="1">
            <text:p>FACTUAL SHIPMENT OR DELIVERY RESULT</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SHIPPED OR DELIVERED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DELIVERY + SETTLEMENT ROU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ROUTED ACTIVE BLOCKER</text:p>
          </table:table-cell>
          <table:covered-table-cell table:number-columns-repeated="3" table:style-name="ce82"/>
          <table:table-cell table:style-name="ce49" office:value-type="string" ns42: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ns42:value-type="string" table:number-columns-spanned="4" table:number-rows-spanned="1">
            <text:p>DELIVERED / PAID OUT · DEMO</text:p>
          </table:table-cell>
          <table:covered-table-cell table:number-columns-repeated="3" table:style-name="ce54"/>
          <table:table-cell table:style-name="ce54" office:value-type="string" ns42:value-type="string" table:number-columns-spanned="4" table:number-rows-spanned="1">
            <text:p>REVIEW SETTLEMENT EVIDENCE / REVIEW LIFECYCLE COMPLETION</text:p>
          </table:table-cell>
          <table:covered-table-cell table:number-columns-repeated="3" table:style-name="ce54"/>
          <table:table-cell table:style-name="ce54" office:value-type="string" ns42:value-type="string" table:number-columns-spanned="4" table:number-rows-spanned="1">
            <text:p>SETTLEMENT OR COMPLETION CROSS-CHECK</text:p>
          </table:table-cell>
          <table:covered-table-cell table:number-columns-repeated="3" table:style-name="ce54"/>
          <table:table-cell table:style-name="ce54" office:value-type="string" ns42: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9" office:value-type="string" ns42:value-type="string" table:number-columns-spanned="6" table:number-rows-spanned="1">
            <text:p>ROUTING RESULT</text:p>
          </table:table-cell>
          <table:covered-table-cell table:number-columns-repeated="5" table:style-name="ce69"/>
          <table:table-cell table:style-name="ce69" office:value-type="string" ns42:value-type="string" table:number-columns-spanned="6" table:number-rows-spanned="1">
            <text:p>CONTROLLED REVIEW RESPONSIBILITY</text:p>
          </table:table-cell>
          <table:covered-table-cell table:number-columns-repeated="5" table:style-name="ce69"/>
          <table:table-cell table:style-name="ce69" office:value-type="string" ns42: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ns42:value-type="string" table:number-columns-spanned="6" table:number-rows-spanned="1">
            <text:p>STATE ROUTE SUPPORTED · DEMO</text:p>
          </table:table-cell>
          <table:covered-table-cell table:number-columns-repeated="5" table:style-name="ce62"/>
          <table:table-cell table:style-name="ce54" office:value-type="string" ns42:value-type="string" table:number-columns-spanned="6" table:number-rows-spanned="1">
            <text:p>REVIEW ROUTED EVIDENCE</text:p>
          </table:table-cell>
          <table:covered-table-cell table:number-columns-repeated="5" table:style-name="ce54"/>
          <table:table-cell table:style-name="ce54" office:value-type="string" ns42:value-type="string" table:number-columns-spanned="6" table:number-rows-spanned="1">
            <text:p>PAID OUT OR COMPLETE PREVIEW · DEMO</text:p>
          </table:table-cell>
          <table:covered-table-cell table:number-columns-repeated="5" table:style-name="ce54"/>
        </table:table-row>
        <table:table-row table:style-name="ro5">
          <table:table-cell table:style-name="ce62" office:value-type="string" ns42: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ns42: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ns42:value-type="string" table:number-columns-spanned="18" table:number-rows-spanned="1">
            <text:p>🏁 COMPLETE TERMINAL-STATE PROTECTION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UPPORTED CURRENT STATE</text:p>
          </table:table-cell>
          <table:covered-table-cell table:number-columns-repeated="3" table:style-name="ce74"/>
          <table:table-cell table:style-name="ce49" office:value-type="string" ns42:value-type="string" table:number-columns-spanned="4" table:number-rows-spanned="1">
            <text:p>ROUTED NEXT ACTION</text:p>
          </table:table-cell>
          <table:covered-table-cell table:number-columns-repeated="3" table:style-name="ce49"/>
          <table:table-cell table:style-name="ce82" office:value-type="string" ns42:value-type="string" table:number-columns-spanned="4" table:number-rows-spanned="1">
            <text:p>ACTIVE BLOCKER</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COMPLETE · DEMO</text:p>
          </table:table-cell>
          <table:covered-table-cell table:number-columns-repeated="3" table:style-name="ce54"/>
          <table:table-cell table:style-name="ce54" office:value-type="string" ns42:value-type="string" table:number-columns-spanned="4" table:number-rows-spanned="1">
            <text:p>NO NEXT LIFECYCLE ACTION</text:p>
          </table:table-cell>
          <table:covered-table-cell table:number-columns-repeated="3" table:style-name="ce54"/>
          <table:table-cell table:style-name="ce54" office:value-type="string" ns42:value-type="string" table:number-columns-spanned="4" table:number-rows-spanned="1">
            <text:p>NONE · TERMINAL STATE</text:p>
          </table:table-cell>
          <table:covered-table-cell table:number-columns-repeated="3" table:style-name="ce54"/>
          <table:table-cell table:style-name="ce54" office:value-type="string" ns42:value-type="string" table:number-columns-spanned="6" table:number-rows-spanned="1">
            <text:p>NONE · TERMINAL STATE</text:p>
          </table:table-cell>
          <table:covered-table-cell table:number-columns-repeated="5" table:style-name="ce54"/>
        </table:table-row>
        <table:table-row table:style-name="ro5">
          <table:table-cell table:style-name="ce69" office:value-type="string" ns42:value-type="string" table:number-columns-spanned="6" table:number-rows-spanned="1">
            <text:p>TERMINAL ROUTE RESULT</text:p>
          </table:table-cell>
          <table:covered-table-cell table:number-columns-repeated="5" table:style-name="ce69"/>
          <table:table-cell table:style-name="ce69" office:value-type="string" ns42:value-type="string" table:number-columns-spanned="6" table:number-rows-spanned="1">
            <text:p>OPERATOR GUIDANCE</text:p>
          </table:table-cell>
          <table:covered-table-cell table:number-columns-repeated="5" table:style-name="ce69"/>
          <table:table-cell table:style-name="ce69" office:value-type="string" ns42: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ns42:value-type="string" table:number-columns-spanned="6" table:number-rows-spanned="1">
            <text:p>COMPLETE ROUTE PROTECTED · DEMO</text:p>
          </table:table-cell>
          <table:covered-table-cell table:number-columns-repeated="5" table:style-name="ce62"/>
          <table:table-cell table:style-name="ce54" office:value-type="string" ns42:value-type="string" table:number-columns-spanned="6" table:number-rows-spanned="1">
            <text:p>LIFECYCLE COMPLETE · NO INVENTED NEXT ACTION</text:p>
          </table:table-cell>
          <table:covered-table-cell table:number-columns-repeated="5" table:style-name="ce54"/>
          <table:table-cell table:style-name="ce54" office:value-type="string" ns42:value-type="string" table:number-columns-spanned="6" table:number-rows-spanned="1">
            <text:p>ALL SUPPORTED HISTORY PRESERVED</text:p>
          </table:table-cell>
          <table:covered-table-cell table:number-columns-repeated="5" table:style-name="ce54"/>
        </table:table-row>
        <table:table-row table:style-name="ro5">
          <table:table-cell table:style-name="ce62" office:value-type="string" ns42:value-type="string" table:number-columns-spanned="18" table:number-rows-spanned="1">
            <text:p>TERMINAL CONTRACT: COMPLETE is a terminal sale-lifecycle state for this proven contract.</text:p>
          </table:table-cell>
          <table:covered-table-cell table:number-columns-repeated="17" table:style-name="ce62"/>
        </table:table-row>
        <table:table-row table:style-name="ro5">
          <table:table-cell table:style-name="ce62" office:value-type="string" ns42:value-type="string" table:number-columns-spanned="18" table:number-rows-spanned="1">
            <text:p>BOUNDARY: MarketDEX does not invent another lifecycle step merely to keep the workflow moving.</text:p>
          </table:table-cell>
          <table:covered-table-cell table:number-columns-repeated="17" table:style-name="ce62"/>
        </table:table-row>
        <table:table-row table:style-name="ro5">
          <table:table-cell table:style-name="ce62" office:value-type="string" ns42:value-type="string" table:number-columns-spanned="18" table:number-rows-spanned="1">
            <text:p>REVIEW / UNKNOWN CONDITIONS: unresolved factual evidence remains routed to review and is not treated as COMPLETE.</text:p>
          </table:table-cell>
          <table:covered-table-cell table:number-columns-repeated="17" table:style-name="ce62"/>
        </table:table-row>
        <table:table-row table:style-name="ro5">
          <table:table-cell table:style-name="ce63" office:value-type="string" ns42:value-type="string" table:number-columns-spanned="18" table:number-rows-spanned="1">
            <text:p>🎛️ STATE-DRIVEN INVENTORY ACTION CENTER GATE · DEMO ROU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RECORD</text:p>
          </table:table-cell>
          <table:covered-table-cell table:number-columns-repeated="3" table:style-name="ce74"/>
          <table:table-cell table:style-name="ce49" office:value-type="string" ns42:value-type="string" table:number-columns-spanned="4" table:number-rows-spanned="1">
            <text:p>SUPPORTED CURRENT STATE</text:p>
          </table:table-cell>
          <table:covered-table-cell table:number-columns-repeated="3" table:style-name="ce49"/>
          <table:table-cell table:style-name="ce82" office:value-type="string" ns42:value-type="string" table:number-columns-spanned="4" table:number-rows-spanned="1">
            <text:p>ROUTED OPERATOR PATH</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INVENTORY RECORD · DEMO</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STATE-DRIVEN CROSS-CHECK</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TERMINAL PROTECTION</text:p>
          </table:table-cell>
          <table:covered-table-cell table:number-columns-repeated="5" table:style-name="ce69"/>
        </table:table-row>
        <table:table-row table:style-name="ro20">
          <table:table-cell table:style-name="ce62" office:value-type="string" ns42:value-type="string" table:number-columns-spanned="6" table:number-rows-spanned="1">
            <text:p>STATE → ACTION → BLOCKER → EVIDENCE → REVIEW → PREVIEW · SUPPORTED</text:p>
          </table:table-cell>
          <table:covered-table-cell table:number-columns-repeated="5" table:style-name="ce62"/>
          <table:table-cell table:style-name="ce54" office:value-type="string" ns42:value-type="string" table:number-columns-spanned="6" table:number-rows-spanned="1">
            <text:p>STATE-DRIVEN OPERATOR ROUTING SUPPORTED · DEMO</text:p>
          </table:table-cell>
          <table:covered-table-cell table:number-columns-repeated="5" table:style-name="ce54"/>
          <table:table-cell table:style-name="ce54" office:value-type="string" ns42:value-type="string" table:number-columns-spanned="6" table:number-rows-spanned="1">
            <text:p>COMPLETE → NO INVENTED NEXT ACTION</text:p>
          </table:table-cell>
          <table:covered-table-cell table:number-columns-repeated="5" table:style-name="ce54"/>
        </table:table-row>
        <table:table-row table:style-name="ro5">
          <table:table-cell table:style-name="ce62" office:value-type="string" ns42: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2"/>
        </table:table-row>
        <table:table-row table:style-name="ro5">
          <table:table-cell table:style-name="ce62" office:value-type="string" ns42:value-type="string" table:number-columns-spanned="18" table:number-rows-spanned="1">
            <text:p>BOUNDARY: No buttons, macros, connectors, automatic state writes, or silent state mutation are created.</text:p>
          </table:table-cell>
          <table:covered-table-cell table:number-columns-repeated="17" table:style-name="ce62"/>
        </table:table-row>
        <table:table-row table:style-name="ro5">
          <table:table-cell table:style-name="ce62" office:value-type="string" ns42:value-type="string" table:number-columns-spanned="18" table:number-rows-spanned="1">
            <text:p>OPERATING PRINCIPLE: One current supported state should tell the operator what responsibility comes next.</text:p>
          </table:table-cell>
          <table:covered-table-cell table:number-columns-repeated="17" table:style-name="ce62"/>
        </table:table-row>
        <table:table-row table:style-name="ro5">
          <table:table-cell table:style-name="ce63" office:value-type="string" ns42:value-type="string" table:number-columns-spanned="18" table:number-rows-spanned="1">
            <text:p>🎯 CONTROLLED SELECTED-STATE INPUT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RESPONSIBILITY</text:p>
          </table:table-cell>
          <table:covered-table-cell table:number-columns-repeated="3" table:style-name="ce74"/>
          <table:table-cell table:style-name="ce49" office:value-type="string" ns42:value-type="string" table:number-columns-spanned="4" table:number-rows-spanned="1">
            <text:p>CONTROLLED SELECTED STATE</text:p>
          </table:table-cell>
          <table:covered-table-cell table:number-columns-repeated="3" table:style-name="ce49"/>
          <table:table-cell table:style-name="ce82" office:value-type="string" ns42:value-type="string" table:number-columns-spanned="4" table:number-rows-spanned="1">
            <text:p>SOURCE ROLE</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ELECT CURRENT SUPPORTED STATE</text:p>
          </table:table-cell>
          <table:covered-table-cell table:number-columns-repeated="3" table:style-name="ce54"/>
          <table:table-cell table:style-name="ce54" office:value-type="string" ns42:value-type="string" table:number-columns-spanned="4" table:number-rows-spanned="1">
            <text:p>SHIPPED</text:p>
          </table:table-cell>
          <table:covered-table-cell table:number-columns-repeated="3" table:style-name="ce54"/>
          <table:table-cell table:style-name="ce54" office:value-type="string" ns42:value-type="string" table:number-columns-spanned="4" table:number-rows-spanned="1">
            <text:p>ACTION CENTER ROUTING SOURCE</text:p>
          </table:table-cell>
          <table:covered-table-cell table:number-columns-repeated="3" table:style-name="ce54"/>
          <table:table-cell table:style-name="ce54" office:value-type="string" ns42:value-type="string" table:number-columns-spanned="6" table:number-rows-spanned="1">
            <text:p>ONE CONTROLLED INPUT</text:p>
          </table:table-cell>
          <table:covered-table-cell table:number-columns-repeated="5" table:style-name="ce54"/>
        </table:table-row>
        <table:table-row table:style-name="ro5">
          <table:table-cell table:style-name="ce69" office:value-type="string" ns42:value-type="string" table:number-columns-spanned="6" table:number-rows-spanned="1">
            <text:p>INPUT RESULT</text:p>
          </table:table-cell>
          <table:covered-table-cell table:number-columns-repeated="5" table:style-name="ce69"/>
          <table:table-cell table:style-name="ce69" office:value-type="string" ns42:value-type="string" table:number-columns-spanned="6" table:number-rows-spanned="1">
            <text:p>SELECTED STATE SOURC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5">
          <table:table-cell table:style-name="ce62" office:value-type="string" ns42:value-type="string" table:number-columns-spanned="6" table:number-rows-spanned="1">
            <text:p>STATE INPUT RECORDED · DEMO</text:p>
          </table:table-cell>
          <table:covered-table-cell table:number-columns-repeated="5" table:style-name="ce62"/>
          <table:table-cell table:style-name="ce54" office:value-type="string" ns42:value-type="string" table:number-columns-spanned="6" table:number-rows-spanned="1">
            <text:p>SHIPPED · DEMO</text:p>
          </table:table-cell>
          <table:covered-table-cell table:number-columns-repeated="5" table:style-name="ce54"/>
          <table:table-cell table:style-name="ce54" office:value-type="string" ns42: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ns42: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ns42: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STATE NORMALIZATION + FAIL-SAFE LAY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OURCE INPUT</text:p>
          </table:table-cell>
          <table:covered-table-cell table:number-columns-repeated="3" table:style-name="ce74"/>
          <table:table-cell table:style-name="ce49" office:value-type="string" ns42:value-type="string" table:number-columns-spanned="4" table:number-rows-spanned="1">
            <text:p>NORMALIZATION RULE</text:p>
          </table:table-cell>
          <table:covered-table-cell table:number-columns-repeated="3" table:style-name="ce49"/>
          <table:table-cell table:style-name="ce82" office:value-type="string" ns42:value-type="string" table:number-columns-spanned="4" table:number-rows-spanned="1">
            <text:p>NORMALIZED STATE</text:p>
          </table:table-cell>
          <table:covered-table-cell table:number-columns-repeated="3" table:style-name="ce82"/>
          <table:table-cell table:style-name="ce49" office:value-type="string" ns42:value-type="string" table:number-columns-spanned="6" table:number-rows-spanned="1">
            <text:p>FAIL-SAFE</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IM + UPPERCASE + CONTROLLED MAP</text:p>
          </table:table-cell>
          <table:covered-table-cell table:number-columns-repeated="3" table:style-name="ce54"/>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69" office:value-type="string" ns42:value-type="string" table:number-columns-spanned="6" table:number-rows-spanned="1">
            <text:p>NORMALIZATION RESULT</text:p>
          </table:table-cell>
          <table:covered-table-cell table:number-columns-repeated="5" table:style-name="ce69"/>
          <table:table-cell table:style-name="ce69" office:value-type="string" ns42:value-type="string" table:number-columns-spanned="6" table:number-rows-spanned="1">
            <text:p>FORMULA ROLE</text:p>
          </table:table-cell>
          <table:covered-table-cell table:number-columns-repeated="5" table:style-name="ce69"/>
          <table:table-cell table:style-name="ce69" office:value-type="string" ns42:value-type="string" table:number-columns-spanned="6" table:number-rows-spanned="1">
            <text:p>NEXT SURFACE</text:p>
          </table:table-cell>
          <table:covered-table-cell table:number-columns-repeated="5" table:style-name="ce69"/>
        </table:table-row>
        <table:table-row table:style-name="ro20">
          <table:table-cell table:style-name="ce62" office:value-type="string" ns42:value-type="string" table:number-columns-spanned="9" table:number-rows-spanned="1">
            <text:p>NORMALIZED STATE · FORMULA</text:p>
          </table:table-cell>
          <table:covered-table-cell table:number-columns-repeated="8" table:style-name="ce62"/>
          <table:table-cell table:style-name="ce54" table:formula="of:=IF(LEN(TRIM([.E421]))=0;&quot;BLANK&quot;;UPPER(TRIM([.E421])))" office:value-type="string" office:string-value="BLANK" ns42:value-type="string" table:number-columns-spanned="9" table:number-rows-spanned="1">
            <text:p>BLANK</text:p>
          </table:table-cell>
          <table:covered-table-cell table:number-columns-repeated="8" table:style-name="ce54"/>
        </table:table-row>
        <table:table-row table:style-name="ro5">
          <table:table-cell table:style-name="ce54" office:value-type="string" ns42: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NEXT A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NEXT ACTION</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NEXT ACTION · FORMULA</text:p>
          </table:table-cell>
          <table:covered-table-cell table:number-columns-repeated="8" table:style-name="ce62"/>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ns42:value-type="string" table:number-columns-spanned="9" table:number-rows-spanned="1">
            <text:p>REVIEW REQUIRED</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ACTIVE BLOCKER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ACTIVE BLOCKER</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ACTIVE BLOCKER · FORMULA</text:p>
          </table:table-cell>
          <table:covered-table-cell table:number-columns-repeated="8" table:style-name="ce62"/>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ns42:value-type="string" table:number-columns-spanned="9" table:number-rows-spanned="1">
            <text:p>UNMAPP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EVIDENCE NEEDED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EVIDENCE NEEDED</text:p>
          </table:table-cell>
          <table:covered-table-cell table:number-columns-repeated="3" table:style-name="ce54"/>
          <table:table-cell table:style-name="ce54" office:value-type="string" ns42:value-type="string" table:number-columns-spanned="4" table:number-rows-spanned="1">
            <text:p>FACTUAL DELIVERY RESULT</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EVIDENCE NEEDED · FORMULA</text:p>
          </table:table-cell>
          <table:covered-table-cell table:number-columns-repeated="8" table:style-name="ce62"/>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ns42: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REVIEW RESPONSIBILITY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RESPONSIBILITY</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REVIEW RESPONSIBILITY · FORMULA</text:p>
          </table:table-cell>
          <table:covered-table-cell table:number-columns-repeated="8" table:style-name="ce62"/>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ns42: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FORMULA-DERIVED TRANSITION PREVIEW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ATION TARGET</text:p>
          </table:table-cell>
          <table:covered-table-cell table:number-columns-repeated="3" table:style-name="ce49"/>
          <table:table-cell table:style-name="ce82" office:value-type="string" ns42:value-type="string" table:number-columns-spanned="4" table:number-rows-spanned="1">
            <text:p>FORMULA RESULT</text:p>
          </table:table-cell>
          <table:covered-table-cell table:number-columns-repeated="3" table:style-name="ce82"/>
          <table:table-cell table:style-name="ce49" office:value-type="string" ns42:value-type="string" table:number-columns-spanned="6" table:number-rows-spanned="1">
            <text:p>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TRANSITION PREVIEW</text:p>
          </table:table-cell>
          <table:covered-table-cell table:number-columns-repeated="3" table:style-name="ce54"/>
          <table:table-cell table:style-name="ce54" office:value-type="string" ns42:value-type="string" table:number-columns-spanned="4" table:number-rows-spanned="1">
            <text:p>SHIPPED → DELIVERED · PREVIEW</text:p>
          </table:table-cell>
          <table:covered-table-cell table:number-columns-repeated="3" table:style-name="ce54"/>
          <table:table-cell table:style-name="ce54" office:value-type="string" ns42: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ns42:value-type="string" table:number-columns-spanned="6" table:number-rows-spanned="1">
            <text:p>FORMULA CROSS-CHECK</text:p>
          </table:table-cell>
          <table:covered-table-cell table:number-columns-repeated="5" table:style-name="ce69"/>
          <table:table-cell table:style-name="ce69" office:value-type="string" ns42:value-type="string" table:number-columns-spanned="6" table:number-rows-spanned="1">
            <text:p>DERIVED OUTPUT</text:p>
          </table:table-cell>
          <table:covered-table-cell table:number-columns-repeated="5" table:style-name="ce69"/>
          <table:table-cell table:style-name="ce69" office:value-type="string" ns42: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ns42:value-type="string" table:number-columns-spanned="9" table:number-rows-spanned="1">
            <text:p>TRANSITION PREVIEW · FORMULA</text:p>
          </table:table-cell>
          <table:covered-table-cell table:number-columns-repeated="8" table:style-name="ce62"/>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ns42: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ns42: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ns42:value-type="string" table:number-columns-spanned="18" table:number-rows-spanned="1">
            <text:p>🛑 BLANK + UNKNOWN + UNMAPPED FAIL-CLOSED PROTECTION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INPUT CONDITION</text:p>
          </table:table-cell>
          <table:covered-table-cell table:number-columns-repeated="3" table:style-name="ce74"/>
          <table:table-cell table:style-name="ce49" office:value-type="string" ns42:value-type="string" table:number-columns-spanned="4" table:number-rows-spanned="1">
            <text:p>ROUTING RESULT</text:p>
          </table:table-cell>
          <table:covered-table-cell table:number-columns-repeated="3" table:style-name="ce49"/>
          <table:table-cell table:style-name="ce82" office:value-type="string" ns42:value-type="string" table:number-columns-spanned="4" table:number-rows-spanned="1">
            <text:p>OPERATOR GUIDANCE</text:p>
          </table:table-cell>
          <table:covered-table-cell table:number-columns-repeated="3" table:style-name="ce82"/>
          <table:table-cell table:style-name="ce49" office:value-type="string" ns42: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ns42:value-type="string" table:number-columns-spanned="4" table:number-rows-spanned="1">
            <text:p>BLANK / UNKNOWN / UNSUPPORTED / UNMAPPED</text:p>
          </table:table-cell>
          <table:covered-table-cell table:number-columns-repeated="3" table:style-name="ce54"/>
          <table:table-cell table:style-name="ce54" office:value-type="string" ns42:value-type="string" table:number-columns-spanned="4" table:number-rows-spanned="1">
            <text:p>REVIEW REQUIRED</text:p>
          </table:table-cell>
          <table:covered-table-cell table:number-columns-repeated="3" table:style-name="ce54"/>
          <table:table-cell table:style-name="ce54" office:value-type="string" ns42:value-type="string" table:number-columns-spanned="4" table:number-rows-spanned="1">
            <text:p>REVIEW SELECTED STATE</text:p>
          </table:table-cell>
          <table:covered-table-cell table:number-columns-repeated="3" table:style-name="ce54"/>
          <table:table-cell table:style-name="ce54" office:value-type="string" ns42:value-type="string" table:number-columns-spanned="6" table:number-rows-spanned="1">
            <text:p>NO TRANSITION PREVIEW</text:p>
          </table:table-cell>
          <table:covered-table-cell table:number-columns-repeated="5" table:style-name="ce54"/>
        </table:table-row>
        <table:table-row table:style-name="ro5">
          <table:table-cell table:style-name="ce69" office:value-type="string" ns42:value-type="string" table:number-columns-spanned="6" table:number-rows-spanned="1">
            <text:p>FAIL-CLOSED RESULT</text:p>
          </table:table-cell>
          <table:covered-table-cell table:number-columns-repeated="5" table:style-name="ce69"/>
          <table:table-cell table:style-name="ce69" office:value-type="string" ns42:value-type="string" table:number-columns-spanned="6" table:number-rows-spanned="1">
            <text:p>INVENTED ROUTE</text:p>
          </table:table-cell>
          <table:covered-table-cell table:number-columns-repeated="5" table:style-name="ce69"/>
          <table:table-cell table:style-name="ce69" office:value-type="string" ns42:value-type="string" table:number-columns-spanned="6" table:number-rows-spanned="1">
            <text:p>STATE MUTATION</text:p>
          </table:table-cell>
          <table:covered-table-cell table:number-columns-repeated="5" table:style-name="ce69"/>
        </table:table-row>
        <table:table-row table:style-name="ro5">
          <table:table-cell table:style-name="ce62" office:value-type="string" ns42:value-type="string" table:number-columns-spanned="6" table:number-rows-spanned="1">
            <text:p>SAFE REVIEW BOUNDARY · DEMO</text:p>
          </table:table-cell>
          <table:covered-table-cell table:number-columns-repeated="5" table:style-name="ce62"/>
          <table:table-cell table:style-name="ce54" office:value-type="string" ns42:value-type="string" table:number-columns-spanned="6" table:number-rows-spanned="1">
            <text:p>PROHIBITED</text:p>
          </table:table-cell>
          <table:covered-table-cell table:number-columns-repeated="5" table:style-name="ce54"/>
          <table:table-cell table:style-name="ce54" office:value-type="string" ns42:value-type="string" table:number-columns-spanned="6" table:number-rows-spanned="1">
            <text:p>PROHIBITED</text:p>
          </table:table-cell>
          <table:covered-table-cell table:number-columns-repeated="5" table:style-name="ce54"/>
        </table:table-row>
        <table:table-row table:style-name="ro5">
          <table:table-cell table:style-name="ce54" office:value-type="string" ns42: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ns42: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3" office:value-type="string" ns42:value-type="string" table:number-columns-spanned="18" table:number-rows-spanned="1">
            <text:p>🎛️ FORMULA-DRIVEN INVENTORY ACTION CENTER GATE · FORMULA OPERATING SURFACE</text:p>
          </table:table-cell>
          <table:covered-table-cell table:number-columns-repeated="17" table:style-name="ce63"/>
        </table:table-row>
        <table:table-row table:style-name="ro5">
          <table:table-cell table:style-name="ce74" office:value-type="string" ns42:value-type="string" table:number-columns-spanned="4" table:number-rows-spanned="1">
            <text:p>SELECTED STATE</text:p>
          </table:table-cell>
          <table:covered-table-cell table:number-columns-repeated="3" table:style-name="ce74"/>
          <table:table-cell table:style-name="ce49" office:value-type="string" ns42:value-type="string" table:number-columns-spanned="4" table:number-rows-spanned="1">
            <text:p>DERIVED NEXT ACTION</text:p>
          </table:table-cell>
          <table:covered-table-cell table:number-columns-repeated="3" table:style-name="ce49"/>
          <table:table-cell table:style-name="ce82" office:value-type="string" ns42:value-type="string" table:number-columns-spanned="4" table:number-rows-spanned="1">
            <text:p>DERIVED ACTIVE BLOCKER</text:p>
          </table:table-cell>
          <table:covered-table-cell table:number-columns-repeated="3" table:style-name="ce82"/>
          <table:table-cell table:style-name="ce49" office:value-type="string" ns42: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ns42:value-type="string" table:number-columns-spanned="4" table:number-rows-spanned="1">
            <text:p>SHIPPED · DEMO</text:p>
          </table:table-cell>
          <table:covered-table-cell table:number-columns-repeated="3" table:style-name="ce54"/>
          <table:table-cell table:style-name="ce54" office:value-type="string" ns42:value-type="string" table:number-columns-spanned="4" table:number-rows-spanned="1">
            <text:p>REVIEW DELIVERY EVIDENCE</text:p>
          </table:table-cell>
          <table:covered-table-cell table:number-columns-repeated="3" table:style-name="ce54"/>
          <table:table-cell table:style-name="ce54" office:value-type="string" ns42:value-type="string" table:number-columns-spanned="4" table:number-rows-spanned="1">
            <text:p>DELIVERY EVIDENCE</text:p>
          </table:table-cell>
          <table:covered-table-cell table:number-columns-repeated="3" table:style-name="ce54"/>
          <table:table-cell table:style-name="ce54" office:value-type="string" ns42: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ns42:value-type="string" table:number-columns-spanned="6" table:number-rows-spanned="1">
            <text:p>DERIVED EVIDENCE + REVIEW + PREVIEW</text:p>
          </table:table-cell>
          <table:covered-table-cell table:number-columns-repeated="5" table:style-name="ce69"/>
          <table:table-cell table:style-name="ce69" office:value-type="string" ns42:value-type="string" table:number-columns-spanned="6" table:number-rows-spanned="1">
            <text:p>ACTION CENTER RESULT</text:p>
          </table:table-cell>
          <table:covered-table-cell table:number-columns-repeated="5" table:style-name="ce69"/>
          <table:table-cell table:style-name="ce69" office:value-type="string" ns42:value-type="string" table:number-columns-spanned="6" table:number-rows-spanned="1">
            <text:p>FAIL-CLOSED PROTECTION</text:p>
          </table:table-cell>
          <table:covered-table-cell table:number-columns-repeated="5" table:style-name="ce69"/>
        </table:table-row>
        <table:table-row table:style-name="ro5">
          <table:table-cell table:style-name="ce62" office:value-type="string" ns42:value-type="string" table:number-columns-spanned="6" table:number-rows-spanned="1">
            <text:p>FACTUAL DELIVERY RESULT → REVIEW DELIVERY EVIDENCE → SHIPPED → DELIVERED PREVIEW</text:p>
          </table:table-cell>
          <table:covered-table-cell table:number-columns-repeated="5" table:style-name="ce62"/>
          <table:table-cell table:style-name="ce54" office:value-type="string" ns42:value-type="string" table:number-columns-spanned="6" table:number-rows-spanned="1">
            <text:p>FORMULA-DRIVEN ROUTING SUPPORTED · DEMO</text:p>
          </table:table-cell>
          <table:covered-table-cell table:number-columns-repeated="5" table:style-name="ce54"/>
          <table:table-cell table:style-name="ce54" office:value-type="string" ns42: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ns42: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ns42: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ns42: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ns42:value-type="string" table:number-columns-spanned="3" table:number-rows-spanned="1">
            <text:p>TEST INPUT</text:p>
          </table:table-cell>
          <table:covered-table-cell table:number-columns-repeated="2" table:style-name="ce53"/>
          <table:table-cell table:style-name="ce53" office:value-type="string" ns42:value-type="string" table:number-columns-spanned="3" table:number-rows-spanned="1">
            <text:p>DERIVED NEXT ACTION</text:p>
          </table:table-cell>
          <table:covered-table-cell table:number-columns-repeated="2" table:style-name="ce53"/>
          <table:table-cell table:style-name="ce53" office:value-type="string" ns42:value-type="string" table:number-columns-spanned="3" table:number-rows-spanned="1">
            <text:p>DERIVED BLOCKER</text:p>
          </table:table-cell>
          <table:covered-table-cell table:number-columns-repeated="2" table:style-name="ce53"/>
          <table:table-cell table:style-name="ce53" office:value-type="string" ns42:value-type="string" table:number-columns-spanned="3" table:number-rows-spanned="1">
            <text:p>DERIVED EVIDENCE</text:p>
          </table:table-cell>
          <table:covered-table-cell table:number-columns-repeated="2" table:style-name="ce53"/>
          <table:table-cell table:style-name="ce53" office:value-type="string" ns42:value-type="string" table:number-columns-spanned="3" table:number-rows-spanned="1">
            <text:p>DERIVED REVIEW</text:p>
          </table:table-cell>
          <table:covered-table-cell table:number-columns-repeated="2" table:style-name="ce53"/>
          <table:table-cell table:style-name="ce53" office:value-type="string" ns42:value-type="string" table:number-columns-spanned="3" table:number-rows-spanned="1">
            <text:p>DERIVED PREVIEW</text:p>
          </table:table-cell>
          <table:covered-table-cell table:number-columns-repeated="2"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ns42: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ns42: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ns42: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ns42: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ns42: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ns42: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ns42: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ns42: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ns42: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ns42: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ns42: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ns42: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ns42: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ns42: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ns42: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ns42: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ns42: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ns42: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ns42: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ns42: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ns42: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ns42: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ns42: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ns42: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ns42: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ns42: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ns42: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ns42: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ns42: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ns42: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ns42: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ns42: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ns42: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ns42: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ns42: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ns42: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ns42: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ns42: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ns42: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ns42: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ns42: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ns42:value-type="string" table:number-columns-spanned="4" table:number-rows-spanned="1">
            <text:p>ONE OPERATOR SELECTION</text:p>
          </table:table-cell>
          <table:covered-table-cell table:number-columns-repeated="3" table:style-name="ce53"/>
          <table:table-cell table:style-name="ce53" office:value-type="string" ns42:value-type="string" table:number-columns-spanned="5" table:number-rows-spanned="1">
            <text:p>ACTION + BLOCKER + EVIDENCE + REVIEW + PREVIEW</text:p>
          </table:table-cell>
          <table:covered-table-cell table:number-columns-repeated="4" table:style-name="ce53"/>
          <table:table-cell table:style-name="ce53" office:value-type="string" ns42:value-type="string" table:number-columns-spanned="4" table:number-rows-spanned="1">
            <text:p>TERMINAL PROTECTION</text:p>
          </table:table-cell>
          <table:covered-table-cell table:number-columns-repeated="3" table:style-name="ce53"/>
          <table:table-cell table:style-name="ce53" office:value-type="string" ns42: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ns42:value-type="string" table:number-columns-spanned="4" table:number-rows-spanned="1">
            <text:p>CONTROLLED STATE LIST</text:p>
          </table:table-cell>
          <table:covered-table-cell table:number-columns-repeated="3" table:style-name="ce54"/>
          <table:table-cell table:style-name="ce54" office:value-type="string" ns42:value-type="string" table:number-columns-spanned="5" table:number-rows-spanned="1">
            <text:p>FORMULA-DERIVED GUIDANCE EVERYWHERE</text:p>
          </table:table-cell>
          <table:covered-table-cell table:number-columns-repeated="4" table:style-name="ce54"/>
          <table:table-cell table:style-name="ce54" office:value-type="string" ns42:value-type="string" table:number-columns-spanned="4" table:number-rows-spanned="1">
            <text:p>COMPLETE → NO INVENTED NEXT ACTION</text:p>
          </table:table-cell>
          <table:covered-table-cell table:number-columns-repeated="3" table:style-name="ce54"/>
          <table:table-cell table:style-name="ce54" office:value-type="string" ns42: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ns42: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ns42: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ns42: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ns42: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ns42:value-type="string" table:number-columns-spanned="6" table:number-rows-spanned="1">
            <text:p>INVENTORY RECORD ID</text:p>
          </table:table-cell>
          <table:covered-table-cell table:number-columns-repeated="5" table:style-name="ce53"/>
          <table:table-cell table:style-name="ce53" office:value-type="string" ns42:value-type="string" table:number-columns-spanned="6" table:number-rows-spanned="1">
            <text:p>PRODUCT IDENTITY</text:p>
          </table:table-cell>
          <table:covered-table-cell table:number-columns-repeated="5" table:style-name="ce53"/>
          <table:table-cell table:style-name="ce53" office:value-type="string" ns42: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office:value-type="string" ns42:value-type="string" table:number-columns-spanned="6" table:number-rows-spanned="1">
            <text:p>Example Sealed Product</text:p>
          </table:table-cell>
          <table:covered-table-cell table:number-columns-repeated="5" table:style-name="ce54"/>
          <table:table-cell table:style-name="ce54" office:value-type="string" ns42:value-type="string" table:number-columns-spanned="6" table:number-rows-spanned="1">
            <text:p>SHIPPED</text:p>
          </table:table-cell>
          <table:covered-table-cell table:number-columns-repeated="5" table:style-name="ce54"/>
        </table:table-row>
        <table:table-row table:style-name="ro5">
          <table:table-cell table:style-name="ce54" office:value-type="string" ns42:value-type="string" table:number-columns-spanned="6" table:number-rows-spanned="1">
            <text:p>INV-000002</text:p>
          </table:table-cell>
          <table:covered-table-cell table:number-columns-repeated="5" table:style-name="ce54"/>
          <table:table-cell table:style-name="ce54" office:value-type="string" ns42:value-type="string" table:number-columns-spanned="6" table:number-rows-spanned="1">
            <text:p>Example Single Card</text:p>
          </table:table-cell>
          <table:covered-table-cell table:number-columns-repeated="5" table:style-name="ce54"/>
          <table:table-cell table:style-name="ce54" office:value-type="string" ns42:value-type="string" table:number-columns-spanned="6" table:number-rows-spanned="1">
            <text:p>READY TO LIST</text:p>
          </table:table-cell>
          <table:covered-table-cell table:number-columns-repeated="5" table:style-name="ce54"/>
        </table:table-row>
        <table:table-row table:style-name="ro5">
          <table:table-cell table:style-name="ce54" office:value-type="string" ns42:value-type="string" table:number-columns-spanned="6" table:number-rows-spanned="1">
            <text:p>INV-000003</text:p>
          </table:table-cell>
          <table:covered-table-cell table:number-columns-repeated="5" table:style-name="ce54"/>
          <table:table-cell table:style-name="ce54" office:value-type="string" ns42:value-type="string" table:number-columns-spanned="6" table:number-rows-spanned="1">
            <text:p>Example Sold Product</text:p>
          </table:table-cell>
          <table:covered-table-cell table:number-columns-repeated="5" table:style-name="ce54"/>
          <table:table-cell table:style-name="ce54" office:value-type="string" ns42:value-type="string" table:number-columns-spanned="6" table:number-rows-spanned="1">
            <text:p>SOLD</text:p>
          </table:table-cell>
          <table:covered-table-cell table:number-columns-repeated="5" table:style-name="ce54"/>
        </table:table-row>
        <table:table-row table:style-name="ro5">
          <table:table-cell table:style-name="ce54" office:value-type="string" ns42:value-type="string" table:number-columns-spanned="6" table:number-rows-spanned="1">
            <text:p>INV-000004</text:p>
          </table:table-cell>
          <table:covered-table-cell table:number-columns-repeated="5" table:style-name="ce54"/>
          <table:table-cell table:style-name="ce54" office:value-type="string" ns42:value-type="string" table:number-columns-spanned="6" table:number-rows-spanned="1">
            <text:p>Example Complete Record</text:p>
          </table:table-cell>
          <table:covered-table-cell table:number-columns-repeated="5" table:style-name="ce54"/>
          <table:table-cell table:style-name="ce54" office:value-type="string" ns42:value-type="string" table:number-columns-spanned="6" table:number-rows-spanned="1">
            <text:p>COMPLETE</text:p>
          </table:table-cell>
          <table:covered-table-cell table:number-columns-repeated="5" table:style-name="ce54"/>
        </table:table-row>
        <table:table-row table:style-name="ro5">
          <table:table-cell table:style-name="ce52" office:value-type="string" ns42: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4" table:number-rows-spanned="1">
            <text:p>UNKNOWN ID</text:p>
          </table:table-cell>
          <table:covered-table-cell table:number-columns-repeated="3"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3" table:number-rows-spanned="1">
            <text:p>MISSING STATE</text:p>
          </table:table-cell>
          <table:covered-table-cell table:number-columns-repeated="2"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4" table:number-rows-spanned="1">
            <text:p>RECORD NOT FOUND</text:p>
          </table:table-cell>
          <table:covered-table-cell table:number-columns-repeated="3"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3" table:number-rows-spanned="1">
            <text:p>STATE EVIDENCE MISSING · REVIEW REQUIRED</text:p>
          </table:table-cell>
          <table:covered-table-cell table:number-columns-repeated="2"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ns42: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ns42: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ns42: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ns42:value-type="string" table:number-columns-spanned="6" table:number-rows-spanned="1">
            <text:p>DISCOVERED GAP</text:p>
          </table:table-cell>
          <table:covered-table-cell table:number-columns-repeated="5" table:style-name="ce53"/>
          <table:table-cell table:style-name="ce53" office:value-type="string" ns42:value-type="string" table:number-columns-spanned="6" table:number-rows-spanned="1">
            <text:p>REAL PROMOTED POSITION</text:p>
          </table:table-cell>
          <table:covered-table-cell table:number-columns-repeated="5" table:style-name="ce53"/>
          <table:table-cell table:style-name="ce53" office:value-type="string" ns42: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ns42:value-type="string" table:number-columns-spanned="6" table:number-rows-spanned="1">
            <text:p>NO CANONICAL RECORD ID SURFACE</text:p>
          </table:table-cell>
          <table:covered-table-cell table:number-columns-repeated="5" table:style-name="ce54"/>
          <table:table-cell table:style-name="ce54" office:value-type="string" ns42:value-type="string" table:number-columns-spanned="6" table:number-rows-spanned="1">
            <text:p>Mega Greninja ex Premium Collection</text:p>
          </table:table-cell>
          <table:covered-table-cell table:number-columns-repeated="5" table:style-name="ce54"/>
          <table:table-cell table:style-name="ce54" office:value-type="string" ns42: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ns42: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2" table:number-rows-spanned="1">
            <text:p>QUANTITY</text:p>
          </table:table-cell>
          <table:covered-table-cell table:style-name="ce53"/>
          <table:table-cell table:style-name="ce53" office:value-type="string" ns42:value-type="string" table:number-columns-spanned="3" table:number-rows-spanned="1">
            <text:p>BUSINESS STATE</text:p>
          </table:table-cell>
          <table:covered-table-cell table:number-columns-repeated="2" table:style-name="ce53"/>
          <table:table-cell table:style-name="ce53" office:value-type="string" ns42: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5" table:number-rows-spanned="1">
            <text:p>Mega Greninja ex Premium Collection</text:p>
          </table:table-cell>
          <table:covered-table-cell table:number-columns-repeated="4" table:style-name="ce54"/>
          <table:table-cell table:style-name="ce54" office:value-type="string" ns42:value-type="string" table:number-columns-spanned="2" table:number-rows-spanned="1">
            <text:p>2</text:p>
          </table:table-cell>
          <table:covered-table-cell table:style-name="ce54"/>
          <table:table-cell table:style-name="ce54" office:value-type="string" ns42:value-type="string" table:number-columns-spanned="3" table:number-rows-spanned="1">
            <text:p>OWNED</text:p>
          </table:table-cell>
          <table:covered-table-cell table:number-columns-repeated="2" table:style-name="ce54"/>
          <table:table-cell table:style-name="ce54" office:value-type="string" ns42:value-type="string" table:number-columns-spanned="4" table:number-rows-spanned="1">
            <text:p>Aquarium Stand</text:p>
          </table:table-cell>
          <table:covered-table-cell table:number-columns-repeated="3" table:style-name="ce54"/>
        </table:table-row>
        <table:table-row table:style-name="ro5">
          <table:table-cell table:style-name="ce54" office:value-type="string" ns42: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ns42: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ns42:value-type="string" table:number-columns-spanned="6" table:number-rows-spanned="1">
            <text:p>SELECTED INVENTORY RECORD ID</text:p>
          </table:table-cell>
          <table:covered-table-cell table:number-columns-repeated="5" table:style-name="ce53"/>
          <table:table-cell table:style-name="ce53" office:value-type="string" ns42:value-type="string" table:number-columns-spanned="6" table:number-rows-spanned="1">
            <text:p>EXISTING PRODUCT IDENTITY</text:p>
          </table:table-cell>
          <table:covered-table-cell table:number-columns-repeated="5" table:style-name="ce53"/>
          <table:table-cell table:style-name="ce53" office:value-type="string" ns42: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ns42: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ns42: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ns42:value-type="string" table:number-columns-spanned="6" table:number-rows-spanned="1">
            <text:p>OWNED</text:p>
          </table:table-cell>
          <table:covered-table-cell table:number-columns-repeated="5" table:style-name="ce54"/>
        </table:table-row>
        <table:table-row table:style-name="ro5">
          <table:table-cell table:style-name="ce52" office:value-type="string" ns42: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ns42: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ns42: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ns42: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ns42: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ns42: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ns42: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ns42:value-type="string" table:number-columns-spanned="3" table:number-rows-spanned="1">
            <text:p>BLANK ID</text:p>
          </table:table-cell>
          <table:covered-table-cell table:number-columns-repeated="2" table:style-name="ce53"/>
          <table:table-cell table:style-name="ce53" office:value-type="string" ns42:value-type="string" table:number-columns-spanned="3" table:number-rows-spanned="1">
            <text:p>ZERO MATCHES</text:p>
          </table:table-cell>
          <table:covered-table-cell table:number-columns-repeated="2" table:style-name="ce53"/>
          <table:table-cell table:style-name="ce53" office:value-type="string" ns42:value-type="string" table:number-columns-spanned="4" table:number-rows-spanned="1">
            <text:p>DUPLICATE ID</text:p>
          </table:table-cell>
          <table:covered-table-cell table:number-columns-repeated="3" table:style-name="ce53"/>
          <table:table-cell table:style-name="ce53" office:value-type="string" ns42:value-type="string" table:number-columns-spanned="4" table:number-rows-spanned="1">
            <text:p>MISSING PRODUCT / STATE</text:p>
          </table:table-cell>
          <table:covered-table-cell table:number-columns-repeated="3" table:style-name="ce53"/>
          <table:table-cell table:style-name="ce53" office:value-type="string" ns42: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ns42:value-type="string" table:number-columns-spanned="3" table:number-rows-spanned="1">
            <text:p>REVIEW REQUIRED</text:p>
          </table:table-cell>
          <table:covered-table-cell table:number-columns-repeated="2" table:style-name="ce54"/>
          <table:table-cell table:style-name="ce54" office:value-type="string" ns42:value-type="string" table:number-columns-spanned="3" table:number-rows-spanned="1">
            <text:p>RECORD NOT FOUND</text:p>
          </table:table-cell>
          <table:covered-table-cell table:number-columns-repeated="2" table:style-name="ce54"/>
          <table:table-cell table:style-name="ce54" office:value-type="string" ns42:value-type="string" table:number-columns-spanned="4" table:number-rows-spanned="1">
            <text:p>IDENTITY CONFLICT · REVIEW REQUIRED</text:p>
          </table:table-cell>
          <table:covered-table-cell table:number-columns-repeated="3" table:style-name="ce54"/>
          <table:table-cell table:style-name="ce54" office:value-type="string" ns42:value-type="string" table:number-columns-spanned="4" table:number-rows-spanned="1">
            <text:p>MISSING EVIDENCE · REVIEW REQUIRED</text:p>
          </table:table-cell>
          <table:covered-table-cell table:number-columns-repeated="3" table:style-name="ce54"/>
          <table:table-cell table:style-name="ce54" office:value-type="string" ns42: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ns42: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ns42: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ns42: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ns42:value-type="string" table:number-columns-spanned="6" table:number-rows-spanned="1">
            <text:p>BUSINESS DIMENSION</text:p>
          </table:table-cell>
          <table:covered-table-cell table:number-columns-repeated="5" table:style-name="ce53"/>
          <table:table-cell table:style-name="ce53" office:value-type="string" ns42:value-type="string" table:number-columns-spanned="6" table:number-rows-spanned="1">
            <text:p>CURRENT VALUE</text:p>
          </table:table-cell>
          <table:covered-table-cell table:number-columns-repeated="5" table:style-name="ce53"/>
          <table:table-cell table:style-name="ce53" office:value-type="string" ns42: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ns42:value-type="string" table:number-columns-spanned="6" table:number-rows-spanned="1">
            <text:p>BUSINESS INVENTORY CONDITION</text:p>
          </table:table-cell>
          <table:covered-table-cell table:number-columns-repeated="5"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office:value-type="string" ns42: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ns42:value-type="string" table:number-columns-spanned="6" table:number-rows-spanned="1">
            <text:p>OPERATIONAL LIFECYCLE STATE</text:p>
          </table:table-cell>
          <table:covered-table-cell table:number-columns-repeated="5" table:style-name="ce54"/>
          <table:table-cell table:style-name="ce54" office:value-type="string" ns42:value-type="string" table:number-columns-spanned="6" table:number-rows-spanned="1">
            <text:p>SEPARATE RESPONSIBILITY</text:p>
          </table:table-cell>
          <table:covered-table-cell table:number-columns-repeated="5" table:style-name="ce54"/>
          <table:table-cell table:style-name="ce54" office:value-type="string" ns42: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ns42: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5" table:number-rows-spanned="1">
            <text:p>PRODUCT / POSITION</text:p>
          </table:table-cell>
          <table:covered-table-cell table:number-columns-repeated="4" table:style-name="ce53"/>
          <table:table-cell table:style-name="ce53" office:value-type="string" ns42:value-type="string" table:number-columns-spanned="4" table:number-rows-spanned="1">
            <text:p>INVENTORY CONDITION</text:p>
          </table:table-cell>
          <table:covered-table-cell table:number-columns-repeated="3" table:style-name="ce53"/>
          <table:table-cell table:style-name="ce53" office:value-type="string" ns42: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ns42: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ns42: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ns42: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ns42: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ns42:value-type="string" table:number-columns-spanned="6" table:number-rows-spanned="1">
            <text:p>OWNERSHIP EVIDENCE</text:p>
          </table:table-cell>
          <table:covered-table-cell table:number-columns-repeated="5" table:style-name="ce53"/>
          <table:table-cell table:style-name="ce53" office:value-type="string" ns42:value-type="string" table:number-columns-spanned="6" table:number-rows-spanned="1">
            <text:p>LIFECYCLE EVIDENCE</text:p>
          </table:table-cell>
          <table:covered-table-cell table:number-columns-repeated="5" table:style-name="ce53"/>
          <table:table-cell table:style-name="ce53" office:value-type="string" ns42: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ns42:value-type="string" table:number-columns-spanned="6" table:number-rows-spanned="1">
            <text:p>SUPPORTED · OWNED</text:p>
          </table:table-cell>
          <table:covered-table-cell table:number-columns-repeated="5" table:style-name="ce54"/>
          <table:table-cell table:style-name="ce54" office:value-type="string" ns42:value-type="string" table:number-columns-spanned="6" table:number-rows-spanned="1">
            <text:p>NOT AUTHORITATIVELY ESTABLISHED</text:p>
          </table:table-cell>
          <table:covered-table-cell table:number-columns-repeated="5" table:style-name="ce54"/>
          <table:table-cell table:style-name="ce54" office:value-type="string" ns42: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ns42: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ns42: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ns42:value-type="string" table:number-columns-spanned="6" table:number-rows-spanned="1">
            <text:p>ACTION CENTER INPUT</text:p>
          </table:table-cell>
          <table:covered-table-cell table:number-columns-repeated="5" table:style-name="ce53"/>
          <table:table-cell table:style-name="ce53" office:value-type="string" ns42:value-type="string" table:number-columns-spanned="6" table:number-rows-spanned="1">
            <text:p>ROUTING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ns42: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ns42:value-type="string" table:number-columns-spanned="6" table:number-rows-spanned="1">
            <text:p>REVIEW REQUIRED · FAIL CLOSED</text:p>
          </table:table-cell>
          <table:covered-table-cell table:number-columns-repeated="5" table:style-name="ce54"/>
          <table:table-cell table:style-name="ce54" office:value-type="string" ns42:value-type="string" table:number-columns-spanned="6" table:number-rows-spanned="1">
            <text:p>NONE · READ ONLY</text:p>
          </table:table-cell>
          <table:covered-table-cell table:number-columns-repeated="5" table:style-name="ce54"/>
        </table:table-row>
        <table:table-row table:style-name="ro5">
          <table:table-cell table:style-name="ce54" office:value-type="string" ns42: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ns42: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ns42: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ns42: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ns42:value-type="string" table:number-columns-spanned="6" table:number-rows-spanned="1">
            <text:p>CLASSIFICATION QUESTION</text:p>
          </table:table-cell>
          <table:covered-table-cell table:number-columns-repeated="5" table:style-name="ce53"/>
          <table:table-cell table:style-name="ce53" office:value-type="string" ns42:value-type="string" table:number-columns-spanned="6" table:number-rows-spanned="1">
            <text:p>EVIDENC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AT CAN I LIST NOW, AND WHAT BLOCKS THE REST?</text:p>
          </table:table-cell>
          <table:covered-table-cell table:number-columns-repeated="5" table:style-name="ce54"/>
          <table:table-cell table:style-name="ce54" office:value-type="string" ns42:value-type="string" table:number-columns-spanned="6" table:number-rows-spanned="1">
            <text:p>LISTING READINESS FACTORS</text:p>
          </table:table-cell>
          <table:covered-table-cell table:number-columns-repeated="5" table:style-name="ce54"/>
          <table:table-cell table:style-name="ce54" office:value-type="string" ns42: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ns42: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ns42:value-type="string" table:number-columns-spanned="4" table:number-rows-spanned="1">
            <text:p>INVENTORY RECORD ID</text:p>
          </table:table-cell>
          <table:covered-table-cell table:number-columns-repeated="3" table:style-name="ce53"/>
          <table:table-cell table:style-name="ce53" office:value-type="string" ns42:value-type="string" table:number-columns-spanned="4" table:number-rows-spanned="1">
            <text:p>PRODUCT MATCHED</text:p>
          </table:table-cell>
          <table:covered-table-cell table:number-columns-repeated="3" table:style-name="ce53"/>
          <table:table-cell table:style-name="ce53" office:value-type="string" ns42:value-type="string" table:number-columns-spanned="3" table:number-rows-spanned="1">
            <text:p>QUANTITY VERIFIED</text:p>
          </table:table-cell>
          <table:covered-table-cell table:number-columns-repeated="2"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ns42:value-type="string" table:number-columns-spanned="4" table:number-rows-spanned="1">
            <text:p>INV-000001</text:p>
          </table:table-cell>
          <table:covered-table-cell table:number-columns-repeated="3" table:style-name="ce54"/>
          <table:table-cell table:style-name="ce54" office:value-type="string" ns42:value-type="string" table:number-columns-spanned="4" table:number-rows-spanned="1">
            <text:p>YES</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3" table:number-rows-spanned="1">
            <text:p>NOT APPLICABLE</text:p>
          </table:table-cell>
          <table:covered-table-cell table:number-columns-repeated="2" table:style-name="ce54"/>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cell table:style-name="ce53" office:value-type="string" ns42:value-type="string" table:number-columns-spanned="3" table:number-rows-spanned="1">
            <text:p>SHIPPING PATH REVIEWED</text:p>
          </table:table-cell>
          <table:covered-table-cell table:number-columns-repeated="2" table:style-name="ce53"/>
          <table:table-cell table:style-name="ce53" office:value-type="string" ns42: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ns42:value-type="string" table:number-columns-spanned="4" table:number-rows-spanned="1">
            <text:p>EVIDENCE STATUS</text:p>
          </table:table-cell>
          <table:covered-table-cell table:number-columns-repeated="3" table:style-name="ce53"/>
          <table:table-cell table:style-name="ce53" office:value-type="string" ns42:value-type="string" table:number-columns-spanned="4" table:number-rows-spanned="1">
            <text:p>DATA QUALITY GATE</text:p>
          </table:table-cell>
          <table:covered-table-cell table:number-columns-repeated="3" table:style-name="ce53"/>
          <table:table-cell table:style-name="ce53" office:value-type="string" ns42:value-type="string" table:number-columns-spanned="5" table:number-rows-spanned="1">
            <text:p>PREPARATION FACTORS</text:p>
          </table:table-cell>
          <table:covered-table-cell table:number-columns-repeated="4" table:style-name="ce53"/>
          <table:table-cell table:style-name="ce53" office:value-type="string" ns42: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ns42:value-type="string" table:number-columns-spanned="4" table:number-rows-spanned="1">
            <text:p>EVALUATED</text:p>
          </table:table-cell>
          <table:covered-table-cell table:number-columns-repeated="3" table:style-name="ce54"/>
          <table:table-cell table:style-name="ce54" office:value-type="string" ns42:value-type="string" table:number-columns-spanned="4" table:number-rows-spanned="1">
            <text:p>CLEAR</text:p>
          </table:table-cell>
          <table:covered-table-cell table:number-columns-repeated="3" table:style-name="ce54"/>
          <table:table-cell table:style-name="ce54" office:value-type="string" ns42: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ns42: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ns42:value-type="string" table:number-columns-spanned="4" table:number-rows-spanned="1">
            <text:p>⚪ NOT EVALUATED</text:p>
          </table:table-cell>
          <table:covered-table-cell table:number-columns-repeated="3" table:style-name="ce53"/>
          <table:table-cell table:style-name="ce53" office:value-type="string" ns42:value-type="string" table:number-columns-spanned="4" table:number-rows-spanned="1">
            <text:p>🛑 BLOCKED</text:p>
          </table:table-cell>
          <table:covered-table-cell table:number-columns-repeated="3" table:style-name="ce53"/>
          <table:table-cell table:style-name="ce53" office:value-type="string" ns42:value-type="string" table:number-columns-spanned="5" table:number-rows-spanned="1">
            <text:p>🚧 PREPARATION NEEDED</text:p>
          </table:table-cell>
          <table:covered-table-cell table:number-columns-repeated="4" table:style-name="ce53"/>
          <table:table-cell table:style-name="ce53" office:value-type="string" ns42:value-type="string" table:number-columns-spanned="5" table:number-rows-spanned="1">
            <text:p>🟢 READY TO LIST</text:p>
          </table:table-cell>
          <table:covered-table-cell table:number-columns-repeated="4" table:style-name="ce53"/>
        </table:table-row>
        <table:table-row table:style-name="ro5">
          <table:table-cell table:style-name="ce54" office:value-type="string" ns42:value-type="string" table:number-columns-spanned="4" table:number-rows-spanned="1">
            <text:p>EVIDENCE NOT EVALUATED</text:p>
          </table:table-cell>
          <table:covered-table-cell table:number-columns-repeated="3" table:style-name="ce54"/>
          <table:table-cell table:style-name="ce54" office:value-type="string" ns42:value-type="string" table:number-columns-spanned="4" table:number-rows-spanned="1">
            <text:p>BLOCKING DATA QUALITY ISSUE</text:p>
          </table:table-cell>
          <table:covered-table-cell table:number-columns-repeated="3" table:style-name="ce54"/>
          <table:table-cell table:style-name="ce54" office:value-type="string" ns42:value-type="string" table:number-columns-spanned="5" table:number-rows-spanned="1">
            <text:p>≥1 APPLICABLE FACTOR NOT READY</text:p>
          </table:table-cell>
          <table:covered-table-cell table:number-columns-repeated="4" table:style-name="ce54"/>
          <table:table-cell table:style-name="ce54" office:value-type="string" ns42: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ns42:value-type="string" table:number-columns-spanned="5" table:number-rows-spanned="1">
            <text:p>INVENTORY RECORD ID</text:p>
          </table:table-cell>
          <table:covered-table-cell table:number-columns-repeated="4" table:style-name="ce53"/>
          <table:table-cell table:style-name="ce53" office:value-type="string" ns42:value-type="string" table:number-columns-spanned="6" table:number-rows-spanned="1">
            <text:p>BUSINESS INVENTORY CONDITION</text:p>
          </table:table-cell>
          <table:covered-table-cell table:number-columns-repeated="5" table:style-name="ce53"/>
          <table:table-cell table:style-name="ce53" office:value-type="string" ns42: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ns42:value-type="string" table:number-columns-spanned="5" table:number-rows-spanned="1">
            <text:p>INV-000001</text:p>
          </table:table-cell>
          <table:covered-table-cell table:number-columns-repeated="4" table:style-name="ce54"/>
          <table:table-cell table:style-name="ce54" office:value-type="string" ns42:value-type="string" table:number-columns-spanned="6" table:number-rows-spanned="1">
            <text:p>OWNED</text:p>
          </table:table-cell>
          <table:covered-table-cell table:number-columns-repeated="5" table:style-name="ce54"/>
          <table:table-cell table:style-name="ce54" table:formula="of:=[.N562]" office:value-type="string" office:string-value="PREPARATION NEEDED" ns42: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ns42: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ns42: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ns42: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ns42: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ns42: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ns42: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ns42: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OWNED ALONE</text:p>
          </table:table-cell>
          <table:covered-table-cell table:number-columns-repeated="3" table:style-name="ce53"/>
          <table:table-cell table:style-name="ce53" office:value-type="string" ns42:value-type="string" table:number-columns-spanned="5" table:number-rows-spanned="1">
            <text:p>CONDITION WHEN NOT APPLICABLE</text:p>
          </table:table-cell>
          <table:covered-table-cell table:number-columns-repeated="4" table:style-name="ce53"/>
          <table:table-cell table:style-name="ce53" office:value-type="string" ns42:value-type="string" table:number-columns-spanned="4" table:number-rows-spanned="1">
            <text:p>BLOCKING DATA QUALITY ISSUE</text:p>
          </table:table-cell>
          <table:covered-table-cell table:number-columns-repeated="3" table:style-name="ce53"/>
          <table:table-cell table:style-name="ce53" office:value-type="string" ns42: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ns42:value-type="string" table:number-columns-spanned="4" table:number-rows-spanned="1">
            <text:p>NO LIFECYCLE INFERENCE</text:p>
          </table:table-cell>
          <table:covered-table-cell table:number-columns-repeated="3" table:style-name="ce54"/>
          <table:table-cell table:style-name="ce54" office:value-type="string" ns42:value-type="string" table:number-columns-spanned="5" table:number-rows-spanned="1">
            <text:p>DO NOT FORCE CONDITION WORKFLOW</text:p>
          </table:table-cell>
          <table:covered-table-cell table:number-columns-repeated="4" table:style-name="ce54"/>
          <table:table-cell table:style-name="ce54" office:value-type="string" ns42:value-type="string" table:number-columns-spanned="4" table:number-rows-spanned="1">
            <text:p>BLOCKED</text:p>
          </table:table-cell>
          <table:covered-table-cell table:number-columns-repeated="3" table:style-name="ce54"/>
          <table:table-cell table:style-name="ce54" office:value-type="string" ns42: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ns42: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ns42: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ns42: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ns42:value-type="string" table:number-columns-spanned="6" table:number-rows-spanned="1">
            <text:p>ENGINE QUESTION</text:p>
          </table:table-cell>
          <table:covered-table-cell table:number-columns-repeated="5" table:style-name="ce53"/>
          <table:table-cell table:style-name="ce53" office:value-type="string" ns42:value-type="string" table:number-columns-spanned="6" table:number-rows-spanned="1">
            <text:p>SCOPE AUTHOR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WHICH FACTOR MAY THIS EVIDENCE RESOLVE?</text:p>
          </table:table-cell>
          <table:covered-table-cell table:number-columns-repeated="5" table:style-name="ce54"/>
          <table:table-cell table:style-name="ce54" office:value-type="string" ns42:value-type="string" table:number-columns-spanned="6" table:number-rows-spanned="1">
            <text:p>EVIDENCE TYPE → EXACT FACTOR SCOPE</text:p>
          </table:table-cell>
          <table:covered-table-cell table:number-columns-repeated="5" table:style-name="ce54"/>
          <table:table-cell table:style-name="ce54" office:value-type="string" ns42: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ns42: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ns42:value-type="string" table:number-columns-spanned="6" table:number-rows-spanned="1">
            <text:p>EVIDENCE TYPE</text:p>
          </table:table-cell>
          <table:covered-table-cell table:number-columns-repeated="5" table:style-name="ce53"/>
          <table:table-cell table:style-name="ce53" office:value-type="string" ns42:value-type="string" table:number-columns-spanned="6" table:number-rows-spanned="1">
            <text:p>EXACT FACTOR SCOPE</text:p>
          </table:table-cell>
          <table:covered-table-cell table:number-columns-repeated="5" table:style-name="ce53"/>
          <table:table-cell table:style-name="ce53" office:value-type="string" ns42: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ns42:value-type="string" table:number-columns-spanned="6" table:number-rows-spanned="1">
            <text:p>PRODUCT PHOTO EVIDENCE</text:p>
          </table:table-cell>
          <table:covered-table-cell table:number-columns-repeated="5" table:style-name="ce54"/>
          <table:table-cell table:style-name="ce54" office:value-type="string" ns42:value-type="string" table:number-columns-spanned="6" table:number-rows-spanned="1">
            <text:p>PHOTOS</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LISTING CONTENT EVIDENCE</text:p>
          </table:table-cell>
          <table:covered-table-cell table:number-columns-repeated="5" table:style-name="ce54"/>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 EVIDENCE</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PLATFORM SELECTION EVIDENCE</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 EVIDENCE</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ns42:value-type="string" table:number-columns-spanned="6" table:number-rows-spanned="1">
            <text:p>DATA QUALITY EVIDENCE</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ns42: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4" table:number-rows-spanned="1">
            <text:p>EVIDENCE TYPE</text:p>
          </table:table-cell>
          <table:covered-table-cell table:number-columns-repeated="3" table:style-name="ce53"/>
          <table:table-cell table:style-name="ce53" office:value-type="string" ns42:value-type="string" table:number-columns-spanned="3" table:number-rows-spanned="1">
            <text:p>REVIEW STATUS</text:p>
          </table:table-cell>
          <table:covered-table-cell table:number-columns-repeated="2" table:style-name="ce53"/>
          <table:table-cell table:style-name="ce53" office:value-type="string" ns42:value-type="string" table:number-columns-spanned="4" table:number-rows-spanned="1">
            <text:p>SUPPORTE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4" table:number-rows-spanned="1">
            <text:p>LISTING CONTENT</text:p>
          </table:table-cell>
          <table:covered-table-cell table:number-columns-repeated="3" table:style-name="ce54"/>
          <table:table-cell table:style-name="ce54" office:value-type="string" ns42:value-type="string" table:number-columns-spanned="4" table:number-rows-spanned="1">
            <text:p>LISTING CONTENT EVIDENCE</text:p>
          </table:table-cell>
          <table:covered-table-cell table:number-columns-repeated="3" table:style-name="ce54"/>
          <table:table-cell table:style-name="ce54" office:value-type="string" ns42:value-type="string" table:number-columns-spanned="3" table:number-rows-spanned="1">
            <text:p>REVIEWED</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MAPPED FACTOR</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SCOPE MATCH</text:p>
          </table:table-cell>
          <table:covered-table-cell table:number-columns-repeated="2" table:style-name="ce53"/>
          <table:table-cell table:style-name="ce53" office:value-type="string" ns42:value-type="string" table:number-columns-spanned="3" table:number-rows-spanned="1">
            <text:p>SUPPORT CHECK</text:p>
          </table:table-cell>
          <table:covered-table-cell table:number-columns-repeated="2" table:style-name="ce53"/>
          <table:table-cell table:style-name="ce53" office:value-type="string" ns42: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ns42:value-type="string" table:number-columns-spanned="4" table:number-rows-spanned="1">
            <text:p>UNMAPPED</text:p>
          </table:table-cell>
          <table:covered-table-cell table:number-columns-repeated="3" table:style-name="ce54"/>
          <table:table-cell table:style-name="ce54" table:formula="of:=[.D597]" office:value-type="float" office:value="0" ns42: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ns42: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ns42: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ns42:value-type="string" table:number-columns-spanned="3" table:number-rows-spanned="1">
            <text:p>RESOLVED FACTOR</text:p>
          </table:table-cell>
          <table:covered-table-cell table:number-columns-repeated="2" table:style-name="ce53"/>
          <table:table-cell table:style-name="ce53" office:value-type="string" ns42:value-type="string" table:number-columns-spanned="4" table:number-rows-spanned="1">
            <text:p>FACTOR RESULT</text:p>
          </table:table-cell>
          <table:covered-table-cell table:number-columns-repeated="3" table:style-name="ce53"/>
          <table:table-cell table:style-name="ce53" office:value-type="string" ns42:value-type="string" table:number-columns-spanned="4" table:number-rows-spanned="1">
            <text:p>CROSS-FACTOR CLEARING</text:p>
          </table:table-cell>
          <table:covered-table-cell table:number-columns-repeated="3" table:style-name="ce53"/>
          <table:table-cell table:style-name="ce53" office:value-type="string" ns42:value-type="string" table:number-columns-spanned="3" table:number-rows-spanned="1">
            <text:p>REPEATED EVIDENCE</text:p>
          </table:table-cell>
          <table:covered-table-cell table:number-columns-repeated="2" table:style-name="ce53"/>
          <table:table-cell table:style-name="ce53" office:value-type="string" ns42: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ns42: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ns42:value-type="string" table:number-columns-spanned="4" table:number-rows-spanned="1">
            <text:p>NO RESOLUTION</text:p>
          </table:table-cell>
          <table:covered-table-cell table:number-columns-repeated="3" table:style-name="ce54"/>
          <table:table-cell table:style-name="ce54" office:value-type="string" ns42:value-type="string" table:number-columns-spanned="4" table:number-rows-spanned="1">
            <text:p>PROHIBITED</text:p>
          </table:table-cell>
          <table:covered-table-cell table:number-columns-repeated="3" table:style-name="ce54"/>
          <table:table-cell table:style-name="ce54" office:value-type="string" ns42:value-type="string" table:number-columns-spanned="3" table:number-rows-spanned="1">
            <text:p>NO DUPLICATE CLEARING</text:p>
          </table:table-cell>
          <table:covered-table-cell table:number-columns-repeated="2" table:style-name="ce54"/>
          <table:table-cell table:style-name="ce54" office:value-type="string" ns42:value-type="string" table:number-columns-spanned="4" table:number-rows-spanned="1">
            <text:p>PRESERVED</text:p>
          </table:table-cell>
          <table:covered-table-cell table:number-columns-repeated="3" table:style-name="ce54"/>
        </table:table-row>
        <table:table-row table:style-name="ro5">
          <table:table-cell table:style-name="ce52" office:value-type="string" ns42: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ns42:value-type="string" table:number-columns-spanned="6" table:number-rows-spanned="1">
            <text:p>RESOLVED FACTOR</text:p>
          </table:table-cell>
          <table:covered-table-cell table:number-columns-repeated="5" table:style-name="ce53"/>
          <table:table-cell table:style-name="ce53" office:value-type="string" ns42:value-type="string" table:number-columns-spanned="6" table:number-rows-spanned="1">
            <text:p>NEXT EXACT BLOCKER</text:p>
          </table:table-cell>
          <table:covered-table-cell table:number-columns-repeated="5" table:style-name="ce53"/>
          <table:table-cell table:style-name="ce53" office:value-type="string" ns42: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ns42:value-type="string" table:number-columns-spanned="6" table:number-rows-spanned="1">
            <text:p>LISTING CONTENT</text:p>
          </table:table-cell>
          <table:covered-table-cell table:number-columns-repeated="5" table:style-name="ce54"/>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ns42:value-type="string" table:number-columns-spanned="6" table:number-rows-spanned="1">
            <text:p>PRICE DECISION</text:p>
          </table:table-cell>
          <table:covered-table-cell table:number-columns-repeated="5" table:style-name="ce54"/>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ELECT PLATFORM</text:p>
          </table:table-cell>
          <table:covered-table-cell table:number-columns-repeated="5" table:style-name="ce54"/>
        </table:table-row>
        <table:table-row table:style-name="ro5">
          <table:table-cell table:style-name="ce54" office:value-type="string" ns42:value-type="string" table:number-columns-spanned="6" table:number-rows-spanned="1">
            <text:p>PLATFORM</text:p>
          </table:table-cell>
          <table:covered-table-cell table:number-columns-repeated="5" table:style-name="ce54"/>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ns42:value-type="string" table:number-columns-spanned="6" table:number-rows-spanned="1">
            <text:p>SHIPPING REVIEW</text:p>
          </table:table-cell>
          <table:covered-table-cell table:number-columns-repeated="5" table:style-name="ce54"/>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ns42:value-type="string" table:number-columns-spanned="6" table:number-rows-spanned="1">
            <text:p>DATA-QUALITY CLEARANCE</text:p>
          </table:table-cell>
          <table:covered-table-cell table:number-columns-repeated="5" table:style-name="ce54"/>
          <table:table-cell table:style-name="ce54" office:value-type="string" ns42:value-type="string" table:number-columns-spanned="6" table:number-rows-spanned="1">
            <text:p>FULL READINESS CROSS-CHECK</text:p>
          </table:table-cell>
          <table:covered-table-cell table:number-columns-repeated="5" table:style-name="ce54"/>
          <table:table-cell table:style-name="ce54" office:value-type="string" ns42: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ns42: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ns42:value-type="string" table:number-columns-spanned="4" table:number-rows-spanned="1">
            <text:p>CONDITION NOT APPLICABLE</text:p>
          </table:table-cell>
          <table:covered-table-cell table:number-columns-repeated="3" table:style-name="ce53"/>
          <table:table-cell table:style-name="ce53" office:value-type="string" ns42:value-type="string" table:number-columns-spanned="5" table:number-rows-spanned="1">
            <text:p>UNSUPPORTED EVIDENCE</text:p>
          </table:table-cell>
          <table:covered-table-cell table:number-columns-repeated="4" table:style-name="ce53"/>
          <table:table-cell table:style-name="ce53" office:value-type="string" ns42:value-type="string" table:number-columns-spanned="5" table:number-rows-spanned="1">
            <text:p>SCOPE MISMATCH</text:p>
          </table:table-cell>
          <table:covered-table-cell table:number-columns-repeated="4" table:style-name="ce53"/>
          <table:table-cell table:style-name="ce53" office:value-type="string" ns42: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ns42:value-type="string" table:number-columns-spanned="4" table:number-rows-spanned="1">
            <text:p>SKIP CONDITION</text:p>
          </table:table-cell>
          <table:covered-table-cell table:number-columns-repeated="3"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5" table:number-rows-spanned="1">
            <text:p>NO RESOLUTION</text:p>
          </table:table-cell>
          <table:covered-table-cell table:number-columns-repeated="4" table:style-name="ce54"/>
          <table:table-cell table:style-name="ce54" office:value-type="string" ns42:value-type="string" table:number-columns-spanned="4" table:number-rows-spanned="1">
            <text:p>NO RESOLUTION</text:p>
          </table:table-cell>
          <table:covered-table-cell table:number-columns-repeated="3" table:style-name="ce54"/>
        </table:table-row>
        <table:table-row table:style-name="ro5">
          <table:table-cell table:style-name="ce52" office:value-type="string" ns42: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ns42:value-type="string" table:number-columns-spanned="3" table:number-rows-spanned="1">
            <text:p>LIFECYCLE STATE</text:p>
          </table:table-cell>
          <table:covered-table-cell table:number-columns-repeated="2" table:style-name="ce53"/>
          <table:table-cell table:style-name="ce53" office:value-type="string" ns42:value-type="string" table:number-columns-spanned="4" table:number-rows-spanned="1">
            <text:p>RESOLVED FACTOR</text:p>
          </table:table-cell>
          <table:covered-table-cell table:number-columns-repeated="3" table:style-name="ce53"/>
          <table:table-cell table:style-name="ce53" office:value-type="string" ns42:value-type="string" table:number-columns-spanned="4" table:number-rows-spanned="1">
            <text:p>RESOLUTION RESULT</text:p>
          </table:table-cell>
          <table:covered-table-cell table:number-columns-repeated="3"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4" table:number-rows-spanned="1">
            <text:p>NEXT ACTION</text:p>
          </table:table-cell>
          <table:covered-table-cell table:number-columns-repeated="3" table:style-name="ce53"/>
        </table:table-row>
        <table:table-row table:style-name="ro5">
          <table:table-cell table:style-name="ce54" office:value-type="string" ns42: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ns42: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ns42: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ns42: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ns42:value-type="string" table:number-columns-spanned="4" table:number-rows-spanned="1">
            <text:p>REVIEW REQUIRED</text:p>
          </table:table-cell>
          <table:covered-table-cell table:number-columns-repeated="3" table:style-name="ce54"/>
        </table:table-row>
        <table:table-row table:style-name="ro5">
          <table:table-cell table:style-name="ce52" office:value-type="string" ns42: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ns42:value-type="string" table:number-columns-spanned="4" table:number-rows-spanned="1">
            <text:p>NEXT ACTION</text:p>
          </table:table-cell>
          <table:covered-table-cell table:number-columns-repeated="3" table:style-name="ce53"/>
          <table:table-cell table:style-name="ce53" office:value-type="string" ns42:value-type="string" table:number-columns-spanned="4" table:number-rows-spanned="1">
            <text:p>ACTIVE BLOCKER</text:p>
          </table:table-cell>
          <table:covered-table-cell table:number-columns-repeated="3" table:style-name="ce53"/>
          <table:table-cell table:style-name="ce53" office:value-type="string" ns42:value-type="string" table:number-columns-spanned="3" table:number-rows-spanned="1">
            <text:p>EVIDENCE NEEDED</text:p>
          </table:table-cell>
          <table:covered-table-cell table:number-columns-repeated="2" table:style-name="ce53"/>
          <table:table-cell table:style-name="ce53" office:value-type="string" ns42:value-type="string" table:number-columns-spanned="3" table:number-rows-spanned="1">
            <text:p>REVIEW RESPONSIBILITY</text:p>
          </table:table-cell>
          <table:covered-table-cell table:number-columns-repeated="2" table:style-name="ce53"/>
          <table:table-cell table:style-name="ce53" office:value-type="string" ns42: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ns42:value-type="float" table:number-columns-spanned="4" table:number-rows-spanned="1">
            <text:p>0</text:p>
          </table:table-cell>
          <table:covered-table-cell table:number-columns-repeated="3" table:style-name="ce54"/>
          <table:table-cell table:style-name="ce54" table:formula="of:=[.L616]" office:value-type="float" office:value="0" ns42: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ns42: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ns42:value-type="string" table:number-columns-spanned="3" table:number-rows-spanned="1">
            <text:p>REVIEW </text:p>
          </table:table-cell>
          <table:covered-table-cell table:number-columns-repeated="2" table:style-name="ce54"/>
          <table:table-cell table:style-name="ce54" office:value-type="string" ns42: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ns42: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INPUT</text:p>
          </table:table-cell>
          <table:covered-table-cell table:number-columns-repeated="2" table:style-name="ce53"/>
          <table:table-cell table:style-name="ce53" office:value-type="string" ns42:value-type="string" table:number-columns-spanned="3" table:number-rows-spanned="1">
            <text:p>MAPPED SCOPE</text:p>
          </table:table-cell>
          <table:covered-table-cell table:number-columns-repeated="2" table:style-name="ce53"/>
          <table:table-cell table:style-name="ce53" office:value-type="string" ns42:value-type="string" table:number-columns-spanned="3" table:number-rows-spanned="1">
            <text:p>MATCH</text:p>
          </table:table-cell>
          <table:covered-table-cell table:number-columns-repeated="2" table:style-name="ce53"/>
          <table:table-cell table:style-name="ce53" office:value-type="string" ns42:value-type="string" table:number-columns-spanned="3" table:number-rows-spanned="1">
            <text:p>RESOLUTION</text:p>
          </table:table-cell>
          <table:covered-table-cell table:number-columns-repeated="2" table:style-name="ce53"/>
          <table:table-cell table:style-name="ce53" office:value-type="string" ns42:value-type="string" table:number-columns-spanned="3" table:number-rows-spanned="1">
            <text:p>NEXT BLOCKER</text:p>
          </table:table-cell>
          <table:covered-table-cell table:number-columns-repeated="2" table:style-name="ce53"/>
          <table:table-cell table:style-name="ce53" office:value-type="string" ns42:value-type="string" table:number-columns-spanned="3" table:number-rows-spanned="1">
            <text:p>BOUNDARY</text:p>
          </table:table-cell>
          <table:covered-table-cell table:number-columns-repeated="2" table:style-name="ce53"/>
        </table:table-row>
        <table:table-row table:style-name="ro5">
          <table:table-cell table:style-name="ce54" office:value-type="string" ns42:value-type="string" table:number-columns-spanned="3" table:number-rows-spanned="1">
            <text:p>LISTING CONTENT EVIDENCE</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LISTING CONTENT ONLY</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ICE DECISION EVIDENCE</text:p>
          </table:table-cell>
          <table:covered-table-cell table:number-columns-repeated="2" table:style-name="ce54"/>
          <table:table-cell table:style-name="ce54" office:value-type="string" ns42:value-type="string" table:number-columns-spanned="3" table:number-rows-spanned="1">
            <text:p>PRICE DECISION</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RICE DECISION ONLY</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LATFORM SELECTION EVIDENCE</text:p>
          </table:table-cell>
          <table:covered-table-cell table:number-columns-repeated="2" table:style-name="ce54"/>
          <table:table-cell table:style-name="ce54" office:value-type="string" ns42:value-type="string" table:number-columns-spanned="3" table:number-rows-spanned="1">
            <text:p>PLATFORM</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PLATFORM ONLY</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SHIPPING REVIEW EVIDENCE</text:p>
          </table:table-cell>
          <table:covered-table-cell table:number-columns-repeated="2" table:style-name="ce54"/>
          <table:table-cell table:style-name="ce54" office:value-type="string" ns42:value-type="string" table:number-columns-spanned="3" table:number-rows-spanned="1">
            <text:p>SHIPPING REVIEW</text:p>
          </table:table-cell>
          <table:covered-table-cell table:number-columns-repeated="2" table:style-name="ce54"/>
          <table:table-cell table:style-name="ce54" office:value-type="string" ns42:value-type="string" table:number-columns-spanned="3" table:number-rows-spanned="1">
            <text:p>MATCH</text:p>
          </table:table-cell>
          <table:covered-table-cell table:number-columns-repeated="2" table:style-name="ce54"/>
          <table:table-cell table:style-name="ce54" office:value-type="string" ns42:value-type="string" table:number-columns-spanned="3" table:number-rows-spanned="1">
            <text:p>SHIPPING REVIEW ONLY</text:p>
          </table:table-cell>
          <table:covered-table-cell table:number-columns-repeated="2" table:style-name="ce54"/>
          <table:table-cell table:style-name="ce54" office:value-type="string" ns42:value-type="string" table:number-columns-spanned="3" table:number-rows-spanned="1">
            <text:p>DATA-QUALITY CLEARANCE</text:p>
          </table:table-cell>
          <table:covered-table-cell table:number-columns-repeated="2" table:style-name="ce54"/>
          <table:table-cell table:style-name="ce54" office:value-type="string" ns42:value-type="string" table:number-columns-spanned="3" table:number-rows-spanned="1">
            <text:p>PASS</text:p>
          </table:table-cell>
          <table:covered-table-cell table:number-columns-repeated="2" table:style-name="ce54"/>
        </table:table-row>
        <table:table-row table:style-name="ro5">
          <table:table-cell table:style-name="ce54" office:value-type="string" ns42:value-type="string" table:number-columns-spanned="3" table:number-rows-spanned="1">
            <text:p>PRODUCT PHOTO EVIDENCE</text:p>
          </table:table-cell>
          <table:covered-table-cell table:number-columns-repeated="2" table:style-name="ce54"/>
          <table:table-cell table:style-name="ce54" office:value-type="string" ns42:value-type="string" table:number-columns-spanned="3" table:number-rows-spanned="1">
            <text:p>PHOTOS</text:p>
          </table:table-cell>
          <table:covered-table-cell table:number-columns-repeated="2" table:style-name="ce54"/>
          <table:table-cell table:style-name="ce54" office:value-type="string" ns42:value-type="string" table:number-columns-spanned="3" table:number-rows-spanned="1">
            <text:p>MISMATCH</text:p>
          </table:table-cell>
          <table:covered-table-cell table:number-columns-repeated="2" table:style-name="ce54"/>
          <table:table-cell table:style-name="ce54" office:value-type="string" ns42:value-type="string" table:number-columns-spanned="3" table:number-rows-spanned="1">
            <text:p>NO RESOLUTION</text:p>
          </table:table-cell>
          <table:covered-table-cell table:number-columns-repeated="2" table:style-name="ce54"/>
          <table:table-cell table:style-name="ce54" office:value-type="string" ns42:value-type="string" table:number-columns-spanned="3" table:number-rows-spanned="1">
            <text:p>LISTING CONTENT</text:p>
          </table:table-cell>
          <table:covered-table-cell table:number-columns-repeated="2" table:style-name="ce54"/>
          <table:table-cell table:style-name="ce54" office:value-type="string" ns42:value-type="string" table:number-columns-spanned="3" table:number-rows-spanned="1">
            <text:p>FAIL CLOSED</text:p>
          </table:table-cell>
          <table:covered-table-cell table:number-columns-repeated="2" table:style-name="ce54"/>
        </table:table-row>
        <table:table-row table:style-name="ro5">
          <table:table-cell table:style-name="ce52" office:value-type="string" ns42: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ns42: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ns42: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ns42:value-type="string" table:number-columns-spanned="6" table:number-rows-spanned="1">
            <text:p>READINESS QUESTION</text:p>
          </table:table-cell>
          <table:covered-table-cell table:number-columns-repeated="5" table:style-name="ce53"/>
          <table:table-cell table:style-name="ce53" office:value-type="string" ns42:value-type="string" table:number-columns-spanned="6" table:number-rows-spanned="1">
            <text:p>AUTHORITY</text:p>
          </table:table-cell>
          <table:covered-table-cell table:number-columns-repeated="5" table:style-name="ce53"/>
          <table:table-cell table:style-name="ce53" office:value-type="string" ns42: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ns42:value-type="string" table:number-columns-spanned="6" table:number-rows-spanned="1">
            <text:p>ARE ALL APPLICABLE FACTORS FACTUALLY SUPPORTED?</text:p>
          </table:table-cell>
          <table:covered-table-cell table:number-columns-repeated="5" table:style-name="ce54"/>
          <table:table-cell table:style-name="ce54" office:value-type="string" ns42:value-type="string" table:number-columns-spanned="6" table:number-rows-spanned="1">
            <text:p>CURRENT READINESS FACTORS</text:p>
          </table:table-cell>
          <table:covered-table-cell table:number-columns-repeated="5" table:style-name="ce54"/>
          <table:table-cell table:style-name="ce54" office:value-type="string" ns42: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ns42: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CONDITION APPLICABILITY</text:p>
          </table:table-cell>
          <table:covered-table-cell table:number-columns-repeated="2" table:style-name="ce53"/>
          <table:table-cell table:style-name="ce53" office:value-type="string" ns42:value-type="string" table:number-columns-spanned="3" table:number-rows-spanned="1">
            <text:p>CONDITION EVALUATED</text:p>
          </table:table-cell>
          <table:covered-table-cell table:number-columns-repeated="2" table:style-name="ce53"/>
          <table:table-cell table:style-name="ce53" office:value-type="string" ns42:value-type="string" table:number-columns-spanned="3" table:number-rows-spanned="1">
            <text:p>LISTING CONTENT READY</text:p>
          </table:table-cell>
          <table:covered-table-cell table:number-columns-repeated="2" table:style-name="ce53"/>
          <table:table-cell table:style-name="ce53" office:value-type="string" ns42:value-type="string" table:number-columns-spanned="3" table:number-rows-spanned="1">
            <text:p>PRICE DECISION READY</text:p>
          </table:table-cell>
          <table:covered-table-cell table:number-columns-repeated="2" table:style-name="ce53"/>
          <table:table-cell table:style-name="ce53" office:value-type="string" ns42: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NOT APPLICABLE</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row>
        <table:table-row table:style-name="ro5">
          <table:table-cell table:style-name="ce53" office:value-type="string" ns42:value-type="string" table:number-columns-spanned="6" table:number-rows-spanned="1">
            <text:p>SHIPPING PATH REVIEWED</text:p>
          </table:table-cell>
          <table:covered-table-cell table:number-columns-repeated="5" table:style-name="ce53"/>
          <table:table-cell table:style-name="ce53" office:value-type="string" ns42:value-type="string" table:number-columns-spanned="6" table:number-rows-spanned="1">
            <text:p>BLOCKING DATA-QUALITY ISSUE</text:p>
          </table:table-cell>
          <table:covered-table-cell table:number-columns-repeated="5" table:style-name="ce53"/>
          <table:table-cell table:style-name="ce53" office:value-type="string" ns42: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ns42:value-type="string" table:number-columns-spanned="5" table:number-rows-spanned="1">
            <text:p>MISSING FACTOR</text:p>
          </table:table-cell>
          <table:covered-table-cell table:number-columns-repeated="4" table:style-name="ce53"/>
          <table:table-cell table:style-name="ce53" office:value-type="string" ns42:value-type="string" table:number-columns-spanned="5" table:number-rows-spanned="1">
            <text:p>CROSS-CHECK RESULT</text:p>
          </table:table-cell>
          <table:covered-table-cell table:number-columns-repeated="4" table:style-name="ce53"/>
          <table:table-cell table:style-name="ce53" office:value-type="string" ns42:value-type="string" table:number-columns-spanned="4" table:number-rows-spanned="1">
            <text:p>ELIGIBILITY RESULT</text:p>
          </table:table-cell>
          <table:covered-table-cell table:number-columns-repeated="3" table:style-name="ce53"/>
          <table:table-cell table:style-name="ce53" office:value-type="string" ns42: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ns42: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ns42: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ns42:value-type="string" table:number-columns-spanned="4" table:number-rows-spanned="1">
            <text:p>NOT READY TO LIST ELIGIBLE</text:p>
          </table:table-cell>
          <table:covered-table-cell table:number-columns-repeated="3" table:style-name="ce54"/>
          <table:table-cell table:style-name="ce54" office:value-type="string" ns42:value-type="string" table:number-columns-spanned="4" table:number-rows-spanned="1">
            <text:p>NONE · READ ONLY</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ns42:value-type="string" table:number-columns-spanned="5" table:number-rows-spanned="1">
            <text:p>ALL APPLICABLE FACTORS SUPPORTED</text:p>
          </table:table-cell>
          <table:covered-table-cell table:number-columns-repeated="4" table:style-name="ce53"/>
          <table:table-cell table:style-name="ce53" office:value-type="string" ns42:value-type="string" table:number-columns-spanned="5" table:number-rows-spanned="1">
            <text:p>FULL CROSS-CHECK</text:p>
          </table:table-cell>
          <table:covered-table-cell table:number-columns-repeated="4" table:style-name="ce53"/>
          <table:table-cell table:style-name="ce53" office:value-type="string" ns42:value-type="string" table:number-columns-spanned="4" table:number-rows-spanned="1">
            <text:p>READ-ONLY RESULT</text:p>
          </table:table-cell>
          <table:covered-table-cell table:number-columns-repeated="3" table:style-name="ce53"/>
          <table:table-cell table:style-name="ce53" office:value-type="string" ns42: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ns42:value-type="string" table:number-columns-spanned="5" table:number-rows-spanned="1">
            <text:p>REQUIRED</text:p>
          </table:table-cell>
          <table:covered-table-cell table:number-columns-repeated="4" table:style-name="ce54"/>
          <table:table-cell table:style-name="ce54" office:value-type="string" ns42:value-type="string" table:number-columns-spanned="5" table:number-rows-spanned="1">
            <text:p>MUST PASS</text:p>
          </table:table-cell>
          <table:covered-table-cell table:number-columns-repeated="4" table:style-name="ce54"/>
          <table:table-cell table:style-name="ce54" office:value-type="string" ns42:value-type="string" table:number-columns-spanned="4" table:number-rows-spanned="1">
            <text:p>READY TO LIST ELIGIBLE</text:p>
          </table:table-cell>
          <table:covered-table-cell table:number-columns-repeated="3" table:style-name="ce54"/>
          <table:table-cell table:style-name="ce54" office:value-type="string" ns42: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ns42: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ns42:value-type="string" table:number-columns-spanned="6" table:number-rows-spanned="1">
            <text:p>AUTHORITY QUESTION</text:p>
          </table:table-cell>
          <table:covered-table-cell table:number-columns-repeated="5" table:style-name="ce53"/>
          <table:table-cell table:style-name="ce53" office:value-type="string" ns42:value-type="string" table:number-columns-spanned="6" table:number-rows-spanned="1">
            <text:p>TRANSITION 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CORD TRANSITION TO READY TO LIST?</text:p>
          </table:table-cell>
          <table:covered-table-cell table:number-columns-repeated="5" table:style-name="ce54"/>
          <table:table-cell table:style-name="ce54" office:value-type="string" ns42:value-type="string" table:number-columns-spanned="6" table:number-rows-spanned="1">
            <text:p>EXPLICIT VALIDATED TRANSITION AUTHORITY</text:p>
          </table:table-cell>
          <table:covered-table-cell table:number-columns-repeated="5" table:style-name="ce54"/>
          <table:table-cell table:style-name="ce54" office:value-type="string" ns42: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ns42: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REQUESTED TRANSITION</text:p>
          </table:table-cell>
          <table:covered-table-cell table:number-columns-repeated="4"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3" table:number-rows-spanned="1">
            <text:p>REQUESTED BY</text:p>
          </table:table-cell>
          <table:covered-table-cell table:number-columns-repeated="2" table:style-name="ce53"/>
          <table:table-cell table:style-name="ce53" office:value-type="string" ns42: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ns42: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4" table:number-rows-spanned="1">
            <text:p>REQUEST CURRENT STATE</text:p>
          </table:table-cell>
          <table:covered-table-cell table:number-columns-repeated="3" table:style-name="ce53"/>
          <table:table-cell table:style-name="ce53" office:value-type="string" ns42:value-type="string" table:number-columns-spanned="3" table:number-rows-spanned="1">
            <text:p>TARGET STATE</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4" table:number-rows-spanned="1">
            <text:p>PREPARATION NEEDED</text:p>
          </table:table-cell>
          <table:covered-table-cell table:number-columns-repeated="3"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ns42:value-type="string" table:number-columns-spanned="5" table:number-rows-spanned="1">
            <text:p>FULL READINESS RESULT</text:p>
          </table:table-cell>
          <table:covered-table-cell table:number-columns-repeated="4" table:style-name="ce53"/>
          <table:table-cell table:style-name="ce53" office:value-type="string" ns42:value-type="string" table:number-columns-spanned="5" table:number-rows-spanned="1">
            <text:p>ELIGIBILITY RESULT</text:p>
          </table:table-cell>
          <table:covered-table-cell table:number-columns-repeated="4" table:style-name="ce53"/>
          <table:table-cell table:style-name="ce53" office:value-type="string" ns42:value-type="string" table:number-columns-spanned="4" table:number-rows-spanned="1">
            <text:p>ELIGIBILITY CURRENT?</text:p>
          </table:table-cell>
          <table:covered-table-cell table:number-columns-repeated="3" table:style-name="ce53"/>
          <table:table-cell table:style-name="ce53" office:value-type="string" ns42: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ns42:value-type="string" table:number-columns-spanned="5" table:number-rows-spanned="1">
            <text:p>PASSED</text:p>
          </table:table-cell>
          <table:covered-table-cell table:number-columns-repeated="4" table:style-name="ce54"/>
          <table:table-cell table:style-name="ce54" office:value-type="string" ns42:value-type="string" table:number-columns-spanned="5" table:number-rows-spanned="1">
            <text:p>READY TO LIST ELIGIBLE</text:p>
          </table:table-cell>
          <table:covered-table-cell table:number-columns-repeated="4" table:style-name="ce54"/>
          <table:table-cell table:style-name="ce54" office:value-type="string" ns42: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ns42:value-type="string" table:number-columns-spanned="4" table:number-rows-spanned="1">
            <text:p>VALID</text:p>
          </table:table-cell>
          <table:covered-table-cell table:number-columns-repeated="3" table:style-name="ce54"/>
        </table:table-row>
        <table:table-row table:style-name="ro5">
          <table:table-cell table:style-name="ce52" office:value-type="string" ns42: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ns42:value-type="string" table:number-columns-spanned="4" table:number-rows-spanned="1">
            <text:p>REQUESTED BY</text:p>
          </table:table-cell>
          <table:covered-table-cell table:number-columns-repeated="3"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4" table:number-rows-spanned="1">
            <text:p>REQUIRED EVIDENCE</text:p>
          </table:table-cell>
          <table:covered-table-cell table:number-columns-repeated="3" table:style-name="ce53"/>
          <table:table-cell table:style-name="ce53" office:value-type="string" ns42:value-type="string" table:number-columns-spanned="3" table:number-rows-spanned="1">
            <text:p>EVIDENCE PRESENT?</text:p>
          </table:table-cell>
          <table:covered-table-cell table:number-columns-repeated="2" table:style-name="ce53"/>
          <table:table-cell table:style-name="ce53" office:value-type="string" ns42:value-type="string" table:number-columns-spanned="4" table:number-rows-spanned="1">
            <text:p>EVIDENCE VALID?</text:p>
          </table:table-cell>
          <table:covered-table-cell table:number-columns-repeated="3" table:style-name="ce53"/>
        </table:table-row>
        <table:table-row table:style-name="ro5">
          <table:table-cell table:style-name="ce54" office:value-type="string" ns42:value-type="string" table:number-columns-spanned="4" table:number-rows-spanned="1">
            <text:p>MARK · OPERATOR</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FULL READINESS PASSED</text:p>
          </table:table-cell>
          <table:covered-table-cell table:number-columns-repeated="3"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4" table:number-rows-spanned="1">
            <text:p>YES</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CURRENT STATE VALID</text:p>
          </table:table-cell>
          <table:covered-table-cell table:number-columns-repeated="2" table:style-name="ce53"/>
          <table:table-cell table:style-name="ce53" office:value-type="string" ns42:value-type="string" table:number-columns-spanned="3" table:number-rows-spanned="1">
            <text:p>TARGET STATE VALID</text:p>
          </table:table-cell>
          <table:covered-table-cell table:number-columns-repeated="2" table:style-name="ce53"/>
          <table:table-cell table:style-name="ce53" office:value-type="string" ns42:value-type="string" table:number-columns-spanned="3" table:number-rows-spanned="1">
            <text:p>ELIGIBILITY VALID</text:p>
          </table:table-cell>
          <table:covered-table-cell table:number-columns-repeated="2" table:style-name="ce53"/>
          <table:table-cell table:style-name="ce53" office:value-type="string" ns42:value-type="string" table:number-columns-spanned="3" table:number-rows-spanned="1">
            <text:p>ACTOR VALID</text:p>
          </table:table-cell>
          <table:covered-table-cell table:number-columns-repeated="2" table:style-name="ce53"/>
          <table:table-cell table:style-name="ce53" office:value-type="string" ns42: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L645]" office:value-type="string" office:string-value="YES" ns42:value-type="string" table:number-columns-spanned="3" table:number-rows-spanned="1">
            <text:p>YES</text:p>
          </table:table-cell>
          <table:covered-table-cell table:number-columns-repeated="2" table:style-name="ce54"/>
          <table:table-cell table:style-name="ce54" table:formula="of:=[.O645]" office:value-type="string" office:string-value="YES" ns42: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E651]" office:value-type="string" office:string-value="YES" ns42:value-type="string" table:number-columns-spanned="3" table:number-rows-spanned="1">
            <text:p>YES</text:p>
          </table:table-cell>
          <table:covered-table-cell table:number-columns-repeated="2" table:style-name="ce54"/>
          <table:table-cell table:style-name="ce54" table:formula="of:=[.O651]"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CURRENT STATE CHANGED?</text:p>
          </table:table-cell>
          <table:covered-table-cell table:number-columns-repeated="4" table:style-name="ce53"/>
          <table:table-cell table:style-name="ce53" office:value-type="string" ns42:value-type="string" table:number-columns-spanned="4" table:number-rows-spanned="1">
            <text:p>REQUEST STALE?</text:p>
          </table:table-cell>
          <table:covered-table-cell table:number-columns-repeated="3" table:style-name="ce53"/>
          <table:table-cell table:style-name="ce53" office:value-type="string" ns42:value-type="string" table:number-columns-spanned="5" table:number-rows-spanned="1">
            <text:p>TRANSITION ALREADY COMPLE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ns42:value-type="string" table:number-columns-spanned="5" table:number-rows-spanned="1">
            <text:p>TRANSITION AUTHORITY</text:p>
          </table:table-cell>
          <table:covered-table-cell table:number-columns-repeated="4" table:style-name="ce53"/>
          <table:table-cell table:style-name="ce53" office:value-type="string" ns42:value-type="string" table:number-columns-spanned="5" table:number-rows-spanned="1">
            <text:p>STATE MUTATION AUTHORITY</text:p>
          </table:table-cell>
          <table:covered-table-cell table:number-columns-repeated="4" table:style-name="ce53"/>
          <table:table-cell table:style-name="ce53" office:value-type="string" ns42:value-type="string" table:number-columns-spanned="4" table:number-rows-spanned="1">
            <text:p>AUTHORIZED TRANSITION</text:p>
          </table:table-cell>
          <table:covered-table-cell table:number-columns-repeated="3" table:style-name="ce53"/>
          <table:table-cell table:style-name="ce53" office:value-type="string" ns42: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ns42: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ns42: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ns42:value-type="string" table:number-columns-spanned="4" table:number-rows-spanned="1">
            <text:p>PREPARATION NEEDED → READY TO LIST</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cell table:style-name="ce53" office:value-type="string" ns42:value-type="string" table:number-columns-spanned="3" table:number-rows-spanned="1">
            <text:p>ACTOR</text:p>
          </table:table-cell>
          <table:covered-table-cell table:number-columns-repeated="2" table:style-name="ce53"/>
          <table:table-cell table:style-name="ce53" office:value-type="string" ns42:value-type="string" table:number-columns-spanned="3" table:number-rows-spanned="1">
            <text:p>AUDIT STATUS</text:p>
          </table:table-cell>
          <table:covered-table-cell table:number-columns-repeated="2"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A660]" office:value-type="string" office:string-value="AUTHORIZED" ns42:value-type="string" table:number-columns-spanned="3" table:number-rows-spanned="1">
            <text:p>AUTHORIZED</text:p>
          </table:table-cell>
          <table:covered-table-cell table:number-columns-repeated="2" table:style-name="ce54"/>
          <table:table-cell table:style-name="ce54" office:value-type="string" ns42: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ns42: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ns42: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FULL READINESS</text:p>
          </table:table-cell>
          <table:covered-table-cell table:number-columns-repeated="3" table:style-name="ce53"/>
          <table:table-cell table:style-name="ce53" office:value-type="string" ns42:value-type="string" table:number-columns-spanned="4" table:number-rows-spanned="1">
            <text:p>ELIGIBILITY</text:p>
          </table:table-cell>
          <table:covered-table-cell table:number-columns-repeated="3" table:style-name="ce53"/>
          <table:table-cell table:style-name="ce53" office:value-type="string" ns42:value-type="string" table:number-columns-spanned="3" table:number-rows-spanned="1">
            <text:p>ACTION CENTER</text:p>
          </table:table-cell>
          <table:covered-table-cell table:number-columns-repeated="2" table:style-name="ce53"/>
          <table:table-cell table:style-name="ce53" office:value-type="string" ns42:value-type="string" table:number-columns-spanned="3" table:number-rows-spanned="1">
            <text:p>TRANSITION AUTHORITY</text:p>
          </table:table-cell>
          <table:covered-table-cell table:number-columns-repeated="2" table:style-name="ce53"/>
          <table:table-cell table:style-name="ce53" office:value-type="string" ns42: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ns42:value-type="string" table:number-columns-spanned="4" table:number-rows-spanned="1">
            <text:p>EVIDENCE CLASSIFICATION</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office:value-type="string" ns42:value-type="string" table:number-columns-spanned="3" table:number-rows-spanned="1">
            <text:p>READ-ONLY GUIDANCE</text:p>
          </table:table-cell>
          <table:covered-table-cell table:number-columns-repeated="2" table:style-name="ce54"/>
          <table:table-cell table:style-name="ce54" office:value-type="string" ns42:value-type="string" table:number-columns-spanned="3" table:number-rows-spanned="1">
            <text:p>EXPLICIT VALIDATION</text:p>
          </table:table-cell>
          <table:covered-table-cell table:number-columns-repeated="2" table:style-name="ce54"/>
          <table:table-cell table:style-name="ce54" office:value-type="string" ns42: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AUTHORITY RESULT</text:p>
          </table:table-cell>
          <table:covered-table-cell table:number-columns-repeated="5" table:style-name="ce53"/>
          <table:table-cell table:style-name="ce53" office:value-type="string" ns42: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ns42:value-type="string" table:number-columns-spanned="6" table:number-rows-spanned="1">
            <text:p>MISSING TRANSITION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KNOWN CURREN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INVALID TARGET STAT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STALE ELIGIBILITY</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FULL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MISSING TRANSITION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CURRENT STATE CHANGED SINCE REQUE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4" office:value-type="string" ns42:value-type="string" table:number-columns-spanned="6" table:number-rows-spanned="1">
            <text:p>DUPLICATE COMPLETED TRANSITION</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N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ns42: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ns42:value-type="string" table:number-columns-spanned="6" table:number-rows-spanned="1">
            <text:p>EXECUTION QUESTION</text:p>
          </table:table-cell>
          <table:covered-table-cell table:number-columns-repeated="5" table:style-name="ce53"/>
          <table:table-cell table:style-name="ce53" office:value-type="string" ns42:value-type="string" table:number-columns-spanned="6" table:number-rows-spanned="1">
            <text:p>EXECUTION RESPONSIBILITY</text:p>
          </table:table-cell>
          <table:covered-table-cell table:number-columns-repeated="5" table:style-name="ce53"/>
          <table:table-cell table:style-name="ce53" office:value-type="string" ns42:value-type="string" table:number-columns-spanned="6" table:number-rows-spanned="1">
            <text:p>WRITE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E GRANTED TRANSITION NOW EXECUTE?</text:p>
          </table:table-cell>
          <table:covered-table-cell table:number-columns-repeated="5" table:style-name="ce54"/>
          <table:table-cell table:style-name="ce54" office:value-type="string" ns42:value-type="string" table:number-columns-spanned="6" table:number-rows-spanned="1">
            <text:p>EXPLICIT COMMIT + PRE-WRITE REVALIDATION</text:p>
          </table:table-cell>
          <table:covered-table-cell table:number-columns-repeated="5" table:style-name="ce54"/>
          <table:table-cell table:style-name="ce54" office:value-type="string" ns42: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ns42: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EXECUTION COMMIT</text:p>
          </table:table-cell>
          <table:covered-table-cell table:number-columns-repeated="2" table:style-name="ce53"/>
          <table:table-cell table:style-name="ce53" office:value-type="string" ns42:value-type="string" table:number-columns-spanned="5" table:number-rows-spanned="1">
            <text:p>AUTHORIZED TRANSITION</text:p>
          </table:table-cell>
          <table:covered-table-cell table:number-columns-repeated="4" table:style-name="ce53"/>
          <table:table-cell table:style-name="ce53" office:value-type="string" ns42: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XEC-000001</text:p>
          </table:table-cell>
          <table:covered-table-cell table:number-columns-repeated="2" table:style-name="ce54"/>
          <table:table-cell table:style-name="ce54" office:value-type="string" ns42:value-type="string" table:number-columns-spanned="3" table:number-rows-spanned="1">
            <text:p>EXECUTE</text:p>
          </table:table-cell>
          <table:covered-table-cell table:number-columns-repeated="2" table:style-name="ce54"/>
          <table:table-cell table:style-name="ce54" office:value-type="string" ns42:value-type="string" table:number-columns-spanned="5" table:number-rows-spanned="1">
            <text:p>PREPARATION NEEDED → READY TO LIST</text:p>
          </table:table-cell>
          <table:covered-table-cell table:number-columns-repeated="4" table:style-name="ce54"/>
          <table:table-cell table:style-name="ce54" office:value-type="string" ns42:value-type="string" table:number-columns-spanned="4" table:number-rows-spanned="1">
            <text:p>GRANTED</text:p>
          </table:table-cell>
          <table:covered-table-cell table:number-columns-repeated="3" table:style-name="ce54"/>
        </table:table-row>
        <table:table-row table:style-name="ro5">
          <table:table-cell table:style-name="ce52" office:value-type="string" ns42: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RECORD EXISTS?</text:p>
          </table:table-cell>
          <table:covered-table-cell table:number-columns-repeated="2" table:style-name="ce53"/>
          <table:table-cell table:style-name="ce53" office:value-type="string" ns42:value-type="string" table:number-columns-spanned="3" table:number-rows-spanned="1">
            <text:p>CURRENT AUTHORITATIVE STATE</text:p>
          </table:table-cell>
          <table:covered-table-cell table:number-columns-repeated="2" table:style-name="ce53"/>
          <table:table-cell table:style-name="ce53" office:value-type="string" ns42:value-type="string" table:number-columns-spanned="3" table:number-rows-spanned="1">
            <text:p>AUTHORIZED FROM STATE</text:p>
          </table:table-cell>
          <table:covered-table-cell table:number-columns-repeated="2" table:style-name="ce53"/>
          <table:table-cell table:style-name="ce53" office:value-type="string" ns42:value-type="string" table:number-columns-spanned="3" table:number-rows-spanned="1">
            <text:p>AUTHORIZED TO STATE</text:p>
          </table:table-cell>
          <table:covered-table-cell table:number-columns-repeated="2" table:style-name="ce53"/>
          <table:table-cell table:style-name="ce53" office:value-type="string" ns42:value-type="string" table:number-columns-spanned="3" table:number-rows-spanned="1">
            <text:p>FROM STATE MATCH?</text:p>
          </table:table-cell>
          <table:covered-table-cell table:number-columns-repeated="2" table:style-name="ce53"/>
          <table:table-cell table:style-name="ce53" office:value-type="string" ns42: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PREPARATION NEEDED</text:p>
          </table:table-cell>
          <table:covered-table-cell table:number-columns-repeated="2" table:style-name="ce54"/>
          <table:table-cell table:style-name="ce54" office:value-type="string" ns42: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ns42:value-type="string" table:number-columns-spanned="5" table:number-rows-spanned="1">
            <text:p>EXECUTION ID UNIQUE?</text:p>
          </table:table-cell>
          <table:covered-table-cell table:number-columns-repeated="4" table:style-name="ce53"/>
          <table:table-cell table:style-name="ce53" office:value-type="string" ns42:value-type="string" table:number-columns-spanned="4" table:number-rows-spanned="1">
            <text:p>EXECUTION ALREADY COMPLETED?</text:p>
          </table:table-cell>
          <table:covered-table-cell table:number-columns-repeated="3" table:style-name="ce53"/>
          <table:table-cell table:style-name="ce53" office:value-type="string" ns42:value-type="string" table:number-columns-spanned="5" table:number-rows-spanned="1">
            <text:p>TRANSITION ALREADY EXECUTED?</text:p>
          </table:table-cell>
          <table:covered-table-cell table:number-columns-repeated="4" table:style-name="ce53"/>
          <table:table-cell table:style-name="ce53" office:value-type="string" ns42: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cell table:style-name="ce54" office:value-type="string" ns42:value-type="string" table:number-columns-spanned="4" table:number-rows-spanned="1">
            <text:p>CLEAR</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RECORD VALID</text:p>
          </table:table-cell>
          <table:covered-table-cell table:number-columns-repeated="2" table:style-name="ce53"/>
          <table:table-cell table:style-name="ce53" office:value-type="string" ns42:value-type="string" table:number-columns-spanned="3" table:number-rows-spanned="1">
            <text:p>FROM STATE VALID</text:p>
          </table:table-cell>
          <table:covered-table-cell table:number-columns-repeated="2" table:style-name="ce53"/>
          <table:table-cell table:style-name="ce53" office:value-type="string" ns42:value-type="string" table:number-columns-spanned="3" table:number-rows-spanned="1">
            <text:p>TRANSITION VALID</text:p>
          </table:table-cell>
          <table:covered-table-cell table:number-columns-repeated="2" table:style-name="ce53"/>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A689]" office:value-type="string" office:string-value="YES" ns42:value-type="string" table:number-columns-spanned="3" table:number-rows-spanned="1">
            <text:p>YES</text:p>
          </table:table-cell>
          <table:covered-table-cell table:number-columns-repeated="2" table:style-name="ce54"/>
          <table:table-cell table:style-name="ce54" table:formula="of:=[.M689]" office:value-type="string" office:string-value="YES" ns42: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P689]" office:value-type="string" office:string-value="YES" ns42: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ns42:value-type="string" table:number-columns-spanned="3" table:number-rows-spanned="1">
            <text:p>YES</text:p>
          </table:table-cell>
          <table:covered-table-cell table:number-columns-repeated="2" table:style-name="ce54"/>
        </table:table-row>
        <table:table-row table:style-name="ro5">
          <table:table-cell table:style-name="ce52" office:value-type="string" ns42: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ns42:value-type="string" table:number-columns-spanned="4" table:number-rows-spanned="1">
            <text:p>EXECUTION RESULT</text:p>
          </table:table-cell>
          <table:covered-table-cell table:number-columns-repeated="3"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4" table:number-rows-spanned="1">
            <text:p>WRITTEN AUTHORITATIVE STATE</text:p>
          </table:table-cell>
          <table:covered-table-cell table:number-columns-repeated="3" table:style-name="ce53"/>
          <table:table-cell table:style-name="ce53" office:value-type="string" ns42:value-type="string" table:number-columns-spanned="3" table:number-rows-spanned="1">
            <text:p>WRITE PERFORMED?</text:p>
          </table:table-cell>
          <table:covered-table-cell table:number-columns-repeated="2" table:style-name="ce53"/>
          <table:table-cell table:style-name="ce53" office:value-type="string" ns42: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ns42: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D686]" office:value-type="string" office:string-value="EXEC-000001" ns42:value-type="string" table:number-columns-spanned="4" table:number-rows-spanned="1">
            <text:p>EXEC-000001</text:p>
          </table:table-cell>
          <table:covered-table-cell table:number-columns-repeated="3" table:style-name="ce54"/>
        </table:table-row>
        <table:table-row table:style-name="ro5">
          <table:table-cell table:style-name="ce52" office:value-type="string" ns42: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ns42:value-type="string" table:number-columns-spanned="3" table:number-rows-spanned="1">
            <text:p>EVENT ID</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FROM STATE</text:p>
          </table:table-cell>
          <table:covered-table-cell table:number-columns-repeated="2" table:style-name="ce53"/>
          <table:table-cell table:style-name="ce53" office:value-type="string" ns42:value-type="string" table:number-columns-spanned="3" table:number-rows-spanned="1">
            <text:p>TO STATE</text:p>
          </table:table-cell>
          <table:covered-table-cell table:number-columns-repeated="2" table:style-name="ce53"/>
          <table:table-cell table:style-name="ce53" office:value-type="string" ns42:value-type="string" table:number-columns-spanned="3" table:number-rows-spanned="1">
            <text:p>EXECUTION ID</text:p>
          </table:table-cell>
          <table:covered-table-cell table:number-columns-repeated="2" table:style-name="ce53"/>
          <table:table-cell table:style-name="ce53" office:value-type="string" ns42:value-type="string" table:number-columns-spanned="3" table:number-rows-spanned="1">
            <text:p>HISTORY RESULT</text:p>
          </table:table-cell>
          <table:covered-table-cell table:number-columns-repeated="2" table:style-name="ce53"/>
        </table:table-row>
        <table:table-row table:style-name="ro5">
          <table:table-cell table:style-name="ce54" office:value-type="string" ns42:value-type="string" table:number-columns-spanned="3" table:number-rows-spanned="1">
            <text:p>TRN-000001</text:p>
          </table:table-cell>
          <table:covered-table-cell table:number-columns-repeated="2" table:style-name="ce54"/>
          <table:table-cell table:style-name="ce54" table:formula="of:=[.A686]" office:value-type="string" office:string-value="INV-000001" ns42: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ns42: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ns42:value-type="string" table:number-columns-spanned="3" table:number-rows-spanned="1">
            <text:p>READY TO LIST</text:p>
          </table:table-cell>
          <table:covered-table-cell table:number-columns-repeated="2" table:style-name="ce54"/>
          <table:table-cell table:style-name="ce54" table:formula="of:=[.O698]" office:value-type="string" office:string-value="EXEC-000001" ns42: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ns42:value-type="string" table:number-columns-spanned="3" table:number-rows-spanned="1">
            <text:p>APPENDED</text:p>
          </table:table-cell>
          <table:covered-table-cell table:number-columns-repeated="2" table:style-name="ce54"/>
        </table:table-row>
        <table:table-row table:style-name="ro5">
          <table:table-cell table:style-name="ce52" office:value-type="string" ns42: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ns42:value-type="string" table:number-columns-spanned="4" table:number-rows-spanned="1">
            <text:p>EXPECTED STATE</text:p>
          </table:table-cell>
          <table:covered-table-cell table:number-columns-repeated="3" table:style-name="ce53"/>
          <table:table-cell table:style-name="ce53" office:value-type="string" ns42:value-type="string" table:number-columns-spanned="4" table:number-rows-spanned="1">
            <text:p>CURRENT AUTHORITATIVE STATE</text:p>
          </table:table-cell>
          <table:covered-table-cell table:number-columns-repeated="3" table:style-name="ce53"/>
          <table:table-cell table:style-name="ce53" office:value-type="string" ns42:value-type="string" table:number-columns-spanned="3" table:number-rows-spanned="1">
            <text:p>STATE MATCH?</text:p>
          </table:table-cell>
          <table:covered-table-cell table:number-columns-repeated="2" table:style-name="ce53"/>
          <table:table-cell table:style-name="ce53" office:value-type="string" ns42:value-type="string" table:number-columns-spanned="3" table:number-rows-spanned="1">
            <text:p>HISTORY EVENT PRESENT?</text:p>
          </table:table-cell>
          <table:covered-table-cell table:number-columns-repeated="2" table:style-name="ce53"/>
          <table:table-cell table:style-name="ce53" office:value-type="string" ns42: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ns42: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ns42: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ns42:value-type="string" table:number-columns-spanned="4" table:number-rows-spanned="1">
            <text:p>VERIFIED</text:p>
          </table:table-cell>
          <table:covered-table-cell table:number-columns-repeated="3" table:style-name="ce54"/>
        </table:table-row>
        <table:table-row table:style-name="ro5">
          <table:table-cell table:style-name="ce52" office:value-type="string" ns42: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EXECUTION STATUS</text:p>
          </table:table-cell>
          <table:covered-table-cell table:number-columns-repeated="3" table:style-name="ce53"/>
          <table:table-cell table:style-name="ce53" office:value-type="string" ns42:value-type="string" table:number-columns-spanned="4" table:number-rows-spanned="1">
            <text:p>REPLAY ATTEMPT RESULT</text:p>
          </table:table-cell>
          <table:covered-table-cell table:number-columns-repeated="3" table:style-name="ce53"/>
          <table:table-cell table:style-name="ce53" office:value-type="string" ns42:value-type="string" table:number-columns-spanned="3" table:number-rows-spanned="1">
            <text:p>SECOND STATE WRITE</text:p>
          </table:table-cell>
          <table:covered-table-cell table:number-columns-repeated="2" table:style-name="ce53"/>
          <table:table-cell table:style-name="ce53" office:value-type="string" ns42:value-type="string" table:number-columns-spanned="3" table:number-rows-spanned="1">
            <text:p>DUPLICATE HISTORY EVENT</text:p>
          </table:table-cell>
          <table:covered-table-cell table:number-columns-repeated="2" table:style-name="ce53"/>
          <table:table-cell table:style-name="ce53" office:value-type="string" ns42: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ns42: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ns42: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ns42: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ns42: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ns42:value-type="string" table:number-columns-spanned="5" table:number-rows-spanned="1">
            <text:p>FAILURE CONDITION</text:p>
          </table:table-cell>
          <table:covered-table-cell table:number-columns-repeated="4" table:style-name="ce53"/>
          <table:table-cell table:style-name="ce53" office:value-type="string" ns42:value-type="string" table:number-columns-spanned="5" table:number-rows-spanned="1">
            <text:p>EXECUTION RESULT</text:p>
          </table:table-cell>
          <table:covered-table-cell table:number-columns-repeated="4" table:style-name="ce53"/>
          <table:table-cell table:style-name="ce53" office:value-type="string" ns42:value-type="string" table:number-columns-spanned="4" table:number-rows-spanned="1">
            <text:p>STATE WRITE</text:p>
          </table:table-cell>
          <table:covered-table-cell table:number-columns-repeated="3" table:style-name="ce53"/>
          <table:table-cell table:style-name="ce53" office:value-type="string" ns42:value-type="string" table:number-columns-spanned="4" table:number-rows-spanned="1">
            <text:p>HISTORY APPEND</text:p>
          </table:table-cell>
          <table:covered-table-cell table:number-columns-repeated="3" table:style-name="ce53"/>
        </table:table-row>
        <table:table-row table:style-name="ro5">
          <table:table-cell table:style-name="ce54" office:value-type="string" ns42:value-type="string" table:number-columns-spanned="5" table:number-rows-spanned="1">
            <text:p>RECORD NOT FOUN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CURRENT STATE CHANG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FROM STATE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AUTHORIZED TARGET MISMATCH</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MUTATION AUTHORITY NOT GRAN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EXECUTION COMMIT MISSING</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TRANSITION ALREADY EXECUT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DUPLICATE EXECUTION I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4" office:value-type="string" ns42:value-type="string" table:number-columns-spanned="5" table:number-rows-spanned="1">
            <text:p>POST-WRITE STATE VERIFICATION FAILED</text:p>
          </table:table-cell>
          <table:covered-table-cell table:number-columns-repeated="4" table:style-name="ce54"/>
          <table:table-cell table:style-name="ce54" office:value-type="string" ns42:value-type="string" table:number-columns-spanned="5" table:number-rows-spanned="1">
            <text:p>DENIED</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ns42: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ns42: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ns42:value-type="string" table:number-columns-spanned="6" table:number-rows-spanned="1">
            <text:p>PUBLICATION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ns42:value-type="string" table:number-columns-spanned="6" table:number-rows-spanned="1">
            <text:p>PLATFORM EVIDENCE + EXPLICIT PUBLICATION AUTHORITY</text:p>
          </table:table-cell>
          <table:covered-table-cell table:number-columns-repeated="5" table:style-name="ce54"/>
          <table:table-cell table:style-name="ce54" office:value-type="string" ns42: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AUTHORITATIVE INVENTORY STATE</text:p>
          </table:table-cell>
          <table:covered-table-cell table:number-columns-repeated="4" table:style-name="ce53"/>
          <table:table-cell table:style-name="ce53" office:value-type="string" ns42:value-type="string" table:number-columns-spanned="5" table:number-rows-spanned="1">
            <text:p>LISTING RESPONSIBILITY</text:p>
          </table:table-cell>
          <table:covered-table-cell table:number-columns-repeated="4" table:style-name="ce53"/>
          <table:table-cell table:style-name="ce53" office:value-type="string" ns42:value-type="string" table:number-columns-spanned="5" table:number-rows-spanned="1">
            <text:p>PLATFORM TARGET</text:p>
          </table:table-cell>
          <table:covered-table-cell table:number-columns-repeated="4"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READY TO LIST</text:p>
          </table:table-cell>
          <table:covered-table-cell table:number-columns-repeated="4" table:style-name="ce54"/>
          <table:table-cell table:style-name="ce54" office:value-type="string" ns42:value-type="string" table:number-columns-spanned="5" table:number-rows-spanned="1">
            <text:p>CREATE LISTING</text:p>
          </table:table-cell>
          <table:covered-table-cell table:number-columns-repeated="4" table:style-name="ce54"/>
          <table:table-cell table:style-name="ce54" office:value-type="string" ns42:value-type="string" table:number-columns-spanned="5" table:number-rows-spanned="1">
            <text:p>EBAY</text:p>
          </table:table-cell>
          <table:covered-table-cell table:number-columns-repeated="4" table:style-name="ce54"/>
        </table:table-row>
        <table:table-row table:style-name="ro5">
          <table:table-cell table:style-name="ce52" office:value-type="string" ns42: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ns42:value-type="string" table:number-columns-spanned="6" table:number-rows-spanned="1">
            <text:p>PLATFORM</text:p>
          </table:table-cell>
          <table:covered-table-cell table:number-columns-repeated="5" table:style-name="ce53"/>
          <table:table-cell table:style-name="ce53" office:value-type="string" ns42:value-type="string" table:number-columns-spanned="6" table:number-rows-spanned="1">
            <text:p>PROFILE RESPONSIBILITY</text:p>
          </table:table-cell>
          <table:covered-table-cell table:number-columns-repeated="5" table:style-name="ce53"/>
          <table:table-cell table:style-name="ce53" office:value-type="string" ns42: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ns42:value-type="string" table:number-columns-spanned="6" table:number-rows-spanned="1">
            <text:p>EBAY</text:p>
          </table:table-cell>
          <table:covered-table-cell table:number-columns-repeated="5" table:style-name="ce54"/>
          <table:table-cell table:style-name="ce54" office:value-type="string" ns42:value-type="string" table:number-columns-spanned="6" table:number-rows-spanned="1">
            <text:p>EBAY LISTING EVIDENCE</text:p>
          </table:table-cell>
          <table:covered-table-cell table:number-columns-repeated="5" table:style-name="ce54"/>
          <table:table-cell table:style-name="ce54" office:value-type="string" ns42:value-type="string" table:number-columns-spanned="6" table:number-rows-spanned="1">
            <text:p>SUPPORTED</text:p>
          </table:table-cell>
          <table:covered-table-cell table:number-columns-repeated="5" table:style-name="ce54"/>
        </table:table-row>
        <table:table-row table:style-name="ro5">
          <table:table-cell table:style-name="ce54" office:value-type="string" ns42:value-type="string" table:number-columns-spanned="6" table:number-rows-spanned="1">
            <text:p>TCGPLAYER</text:p>
          </table:table-cell>
          <table:covered-table-cell table:number-columns-repeated="5" table:style-name="ce54"/>
          <table:table-cell table:style-name="ce54" office:value-type="string" ns42:value-type="string" table:number-columns-spanned="6" table:number-rows-spanned="1">
            <text:p>TCGPLAYER LISTING EVIDENCE</text:p>
          </table:table-cell>
          <table:covered-table-cell table:number-columns-repeated="5" table:style-name="ce54"/>
          <table:table-cell table:style-name="ce54" office:value-type="string" ns42:value-type="string" table:number-columns-spanned="6" table:number-rows-spanned="1">
            <text:p>FUTURE PROFILE</text:p>
          </table:table-cell>
          <table:covered-table-cell table:number-columns-repeated="5" table:style-name="ce54"/>
        </table:table-row>
        <table:table-row table:style-name="ro5">
          <table:table-cell table:style-name="ce52" office:value-type="string" ns42: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ns42:value-type="string" table:number-columns-spanned="3" table:number-rows-spanned="1">
            <text:p>TITLE READY</text:p>
          </table:table-cell>
          <table:covered-table-cell table:number-columns-repeated="2" table:style-name="ce53"/>
          <table:table-cell table:style-name="ce53" office:value-type="string" ns42:value-type="string" table:number-columns-spanned="3" table:number-rows-spanned="1">
            <text:p>DESCRIPTION READY</text:p>
          </table:table-cell>
          <table:covered-table-cell table:number-columns-repeated="2" table:style-name="ce53"/>
          <table:table-cell table:style-name="ce53" office:value-type="string" ns42:value-type="string" table:number-columns-spanned="3" table:number-rows-spanned="1">
            <text:p>PRICE READY</text:p>
          </table:table-cell>
          <table:covered-table-cell table:number-columns-repeated="2" table:style-name="ce53"/>
          <table:table-cell table:style-name="ce53" office:value-type="string" ns42:value-type="string" table:number-columns-spanned="3" table:number-rows-spanned="1">
            <text:p>QUANTITY READY</text:p>
          </table:table-cell>
          <table:covered-table-cell table:number-columns-repeated="2" table:style-name="ce53"/>
          <table:table-cell table:style-name="ce53" office:value-type="string" ns42:value-type="string" table:number-columns-spanned="3" table:number-rows-spanned="1">
            <text:p>PHOTOS READY</text:p>
          </table:table-cell>
          <table:covered-table-cell table:number-columns-repeated="2" table:style-name="ce53"/>
          <table:table-cell table:style-name="ce53" office:value-type="string" ns42:value-type="string" table:number-columns-spanned="3" table:number-rows-spanned="1">
            <text:p>SHIPPING READY</text:p>
          </table:table-cell>
          <table:covered-table-cell table:number-columns-repeated="2" table:style-name="ce53"/>
        </table:table-row>
        <table:table-row table:style-name="ro5">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cell table:style-name="ce54" office:value-type="string" ns42:value-type="string" table:number-columns-spanned="3" table:number-rows-spanned="1">
            <text:p>YES</text:p>
          </table:table-cell>
          <table:covered-table-cell table:number-columns-repeated="2" table:style-name="ce54"/>
        </table:table-row>
        <table:table-row table:style-name="ro5">
          <table:table-cell table:style-name="ce53" office:value-type="string" ns42:value-type="string" table:number-columns-spanned="5" table:number-rows-spanned="1">
            <text:p>CATEGORY READY</text:p>
          </table:table-cell>
          <table:covered-table-cell table:number-columns-repeated="4" table:style-name="ce53"/>
          <table:table-cell table:style-name="ce53" office:value-type="string" ns42:value-type="string" table:number-columns-spanned="4" table:number-rows-spanned="1">
            <text:p>CONDITION APPLICABLE</text:p>
          </table:table-cell>
          <table:covered-table-cell table:number-columns-repeated="3" table:style-name="ce53"/>
          <table:table-cell table:style-name="ce53" office:value-type="string" ns42:value-type="string" table:number-columns-spanned="4" table:number-rows-spanned="1">
            <text:p>CONDITION EVALUATED</text:p>
          </table:table-cell>
          <table:covered-table-cell table:number-columns-repeated="3" table:style-name="ce53"/>
          <table:table-cell table:style-name="ce53" office:value-type="string" ns42: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ns42:value-type="string" table:number-columns-spanned="5" table:number-rows-spanned="1">
            <text:p>YES</text:p>
          </table:table-cell>
          <table:covered-table-cell table:number-columns-repeated="4" table:style-name="ce54"/>
          <table:table-cell table:style-name="ce54" office:value-type="string" ns42:value-type="string" table:number-columns-spanned="4" table:number-rows-spanned="1">
            <text:p>NO</text:p>
          </table:table-cell>
          <table:covered-table-cell table:number-columns-repeated="3" table:style-name="ce54"/>
          <table:table-cell table:style-name="ce54" office:value-type="string" ns42:value-type="string" table:number-columns-spanned="4" table:number-rows-spanned="1">
            <text:p>NOT APPLICABLE</text:p>
          </table:table-cell>
          <table:covered-table-cell table:number-columns-repeated="3" table:style-name="ce54"/>
          <table:table-cell table:style-name="ce54" office:value-type="string" ns42:value-type="string" table:number-columns-spanned="5" table:number-rows-spanned="1">
            <text:p>NO</text:p>
          </table:table-cell>
          <table:covered-table-cell table:number-columns-repeated="4" table:style-name="ce54"/>
        </table:table-row>
        <table:table-row table:style-name="ro5">
          <table:table-cell table:style-name="ce52" office:value-type="string" ns42: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ns42:value-type="string" table:number-columns-spanned="6" table:number-rows-spanned="1">
            <text:p>APPLICABLE FACTORS SUPPORTED?</text:p>
          </table:table-cell>
          <table:covered-table-cell table:number-columns-repeated="5" table:style-name="ce53"/>
          <table:table-cell table:style-name="ce53" office:value-type="string" ns42:value-type="string" table:number-columns-spanned="6" table:number-rows-spanned="1">
            <text:p>FIRST MISSING PLATFORM FACTOR</text:p>
          </table:table-cell>
          <table:covered-table-cell table:number-columns-repeated="5" table:style-name="ce53"/>
          <table:table-cell table:style-name="ce53" office:value-type="string" ns42: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ns42: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ns42: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ns42: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ns42: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5" table:number-rows-spanned="1">
            <text:p>PUBLICATION REQUEST</text:p>
          </table:table-cell>
          <table:covered-table-cell table:number-columns-repeated="4" table:style-name="ce53"/>
          <table:table-cell table:style-name="ce53" office:value-type="string" ns42:value-type="string" table:number-columns-spanned="3" table:number-rows-spanned="1">
            <text:p>PLATFORM TARGET</text:p>
          </table:table-cell>
          <table:covered-table-cell table:number-columns-repeated="2" table:style-name="ce53"/>
          <table:table-cell table:style-name="ce53" office:value-type="string" ns42:value-type="string" table:number-columns-spanned="3" table:number-rows-spanned="1">
            <text:p>REQUEST STATUS</text:p>
          </table:table-cell>
          <table:covered-table-cell table:number-columns-repeated="2" table:style-name="ce53"/>
          <table:table-cell table:style-name="ce53" office:value-type="string" ns42:value-type="string" table:number-columns-spanned="4" table:number-rows-spanned="1">
            <text:p>REQUESTED BY</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5" table:number-rows-spanned="1">
            <text:p>PUBLISH LISTING</text:p>
          </table:table-cell>
          <table:covered-table-cell table:number-columns-repeated="4"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REQUESTED</text:p>
          </table:table-cell>
          <table:covered-table-cell table:number-columns-repeated="2" table:style-name="ce54"/>
          <table:table-cell table:style-name="ce54" office:value-type="string" ns42:value-type="string" table:number-columns-spanned="4" table:number-rows-spanned="1">
            <text:p>MARK · OPERATOR</text:p>
          </table:table-cell>
          <table:covered-table-cell table:number-columns-repeated="3" table:style-name="ce54"/>
        </table:table-row>
        <table:table-row table:style-name="ro5">
          <table:table-cell table:style-name="ce52" office:value-type="string" ns42: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ns42:value-type="string" table:number-columns-spanned="3" table:number-rows-spanned="1">
            <text:p>STATE VALID</text:p>
          </table:table-cell>
          <table:covered-table-cell table:number-columns-repeated="2" table:style-name="ce53"/>
          <table:table-cell table:style-name="ce53" office:value-type="string" ns42:value-type="string" table:number-columns-spanned="3" table:number-rows-spanned="1">
            <text:p>PLATFORM VALID</text:p>
          </table:table-cell>
          <table:covered-table-cell table:number-columns-repeated="2" table:style-name="ce53"/>
          <table:table-cell table:style-name="ce53" office:value-type="string" ns42:value-type="string" table:number-columns-spanned="3" table:number-rows-spanned="1">
            <text:p>READINESS VALID</text:p>
          </table:table-cell>
          <table:covered-table-cell table:number-columns-repeated="2" table:style-name="ce53"/>
          <table:table-cell table:style-name="ce53" office:value-type="string" ns42:value-type="string" table:number-columns-spanned="3" table:number-rows-spanned="1">
            <text:p>ACTOR AUTHORIZED</text:p>
          </table:table-cell>
          <table:covered-table-cell table:number-columns-repeated="2" table:style-name="ce53"/>
          <table:table-cell table:style-name="ce53" office:value-type="string" ns42:value-type="string" table:number-columns-spanned="3" table:number-rows-spanned="1">
            <text:p>REQUEST VALID</text:p>
          </table:table-cell>
          <table:covered-table-cell table:number-columns-repeated="2" table:style-name="ce53"/>
          <table:table-cell table:style-name="ce53" office:value-type="string" ns42: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ns42:value-type="string" table:number-columns-spanned="3" table:number-rows-spanned="1">
            <text:p>GRANT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READY TO LIST</text:p>
          </table:table-cell>
          <table:covered-table-cell table:number-columns-repeated="3" table:style-name="ce53"/>
          <table:table-cell table:style-name="ce53" office:value-type="string" ns42:value-type="string" table:number-columns-spanned="4" table:number-rows-spanned="1">
            <text:p>PLATFORM SELECTED</text:p>
          </table:table-cell>
          <table:covered-table-cell table:number-columns-repeated="3" table:style-name="ce53"/>
          <table:table-cell table:style-name="ce53" office:value-type="string" ns42:value-type="string" table:number-columns-spanned="4" table:number-rows-spanned="1">
            <text:p>READY FOR PUBLICATION</text:p>
          </table:table-cell>
          <table:covered-table-cell table:number-columns-repeated="3" table:style-name="ce53"/>
          <table:table-cell table:style-name="ce53" office:value-type="string" ns42:value-type="string" table:number-columns-spanned="3" table:number-rows-spanned="1">
            <text:p>PUBLICATION AUTHORITY</text:p>
          </table:table-cell>
          <table:covered-table-cell table:number-columns-repeated="2" table:style-name="ce53"/>
          <table:table-cell table:style-name="ce53" office:value-type="string" ns42: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ns42:value-type="string" table:number-columns-spanned="4" table:number-rows-spanned="1">
            <text:p>INVENTORY STATE</text:p>
          </table:table-cell>
          <table:covered-table-cell table:number-columns-repeated="3" table:style-name="ce54"/>
          <table:table-cell table:style-name="ce54" office:value-type="string" ns42:value-type="string" table:number-columns-spanned="4" table:number-rows-spanned="1">
            <text:p>TARGET ONLY</text:p>
          </table:table-cell>
          <table:covered-table-cell table:number-columns-repeated="3" table:style-name="ce54"/>
          <table:table-cell table:style-name="ce54" office:value-type="string" ns42:value-type="string" table:number-columns-spanned="4" table:number-rows-spanned="1">
            <text:p>READ-ONLY RESULT</text:p>
          </table:table-cell>
          <table:covered-table-cell table:number-columns-repeated="3" table:style-name="ce54"/>
          <table:table-cell table:style-name="ce54" table:formula="of:=[.P744]" office:value-type="string" office:string-value="GRANTED" ns42:value-type="string" table:number-columns-spanned="3" table:number-rows-spanned="1">
            <text:p>GRANTED</text:p>
          </table:table-cell>
          <table:covered-table-cell table:number-columns-repeated="2" table:style-name="ce54"/>
          <table:table-cell table:style-name="ce54" table:formula="of:=&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ns42:value-type="string" table:number-columns-spanned="6" table:number-rows-spanned="1">
            <text:p>FAILURE CONDITION</text:p>
          </table:table-cell>
          <table:covered-table-cell table:number-columns-repeated="5" table:style-name="ce53"/>
          <table:table-cell table:style-name="ce53" office:value-type="string" ns42:value-type="string" table:number-columns-spanned="6" table:number-rows-spanned="1">
            <text:p>PUBLICATION AUTHORITY</text:p>
          </table:table-cell>
          <table:covered-table-cell table:number-columns-repeated="5" table:style-name="ce53"/>
          <table:table-cell table:style-name="ce53" office:value-type="string" ns42: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ns42:value-type="string" table:number-columns-spanned="6" table:number-rows-spanned="1">
            <text:p>INVENTORY STATE NOT READY TO LIST</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NOT SUPPORT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MISSING PLATFORM EVIDENC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BLOCKING DATA QUALITY ISSUE</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ADINESS FAIL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UBLICATION REQUEST MISSING</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UNAUTHORIZED ACTOR</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PLATFORM TARGET CHANGED</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4" office:value-type="string" ns42:value-type="string" table:number-columns-spanned="6" table:number-rows-spanned="1">
            <text:p>STALE PUBLICATION READINESS</text:p>
          </table:table-cell>
          <table:covered-table-cell table:number-columns-repeated="5" table:style-name="ce54"/>
          <table:table-cell table:style-name="ce54" office:value-type="string" ns42:value-type="string" table:number-columns-spanned="6" table:number-rows-spanned="1">
            <text:p>DENIE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ns42: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ns42: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ns42:value-type="string" table:number-columns-spanned="6" table:number-rows-spanned="1">
            <text:p>EVIDENCE QUESTION</text:p>
          </table:table-cell>
          <table:covered-table-cell table:number-columns-repeated="5" table:style-name="ce53"/>
          <table:table-cell table:style-name="ce53" office:value-type="string" ns42:value-type="string" table:number-columns-spanned="6" table:number-rows-spanned="1">
            <text:p>RESPONSIBILITY</text:p>
          </table:table-cell>
          <table:covered-table-cell table:number-columns-repeated="5" table:style-name="ce53"/>
          <table:table-cell table:style-name="ce53" office:value-type="string" ns42: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ns42: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ns42:value-type="string" table:number-columns-spanned="6" table:number-rows-spanned="1">
            <text:p>VALIDATE EXTERNAL RESULT + IDENTITY CHAIN</text:p>
          </table:table-cell>
          <table:covered-table-cell table:number-columns-repeated="5" table:style-name="ce54"/>
          <table:table-cell table:style-name="ce54" office:value-type="string" ns42: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ns42: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4" table:number-rows-spanned="1">
            <text:p>PUBLICATION AUTHORITY</text:p>
          </table:table-cell>
          <table:covered-table-cell table:number-columns-repeated="3" table:style-name="ce53"/>
          <table:table-cell table:style-name="ce53" office:value-type="string" ns42:value-type="string" table:number-columns-spanned="4" table:number-rows-spanned="1">
            <text:p>EXECUTION COMMIT</text:p>
          </table:table-cell>
          <table:covered-table-cell table:number-columns-repeated="3" table:style-name="ce53"/>
          <table:table-cell table:style-name="ce53" office:value-type="string" ns42: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4" table:number-rows-spanned="1">
            <text:p>GRANTED</text:p>
          </table:table-cell>
          <table:covered-table-cell table:number-columns-repeated="3" table:style-name="ce54"/>
          <table:table-cell table:style-name="ce54" office:value-type="string" ns42:value-type="string" table:number-columns-spanned="4" table:number-rows-spanned="1">
            <text:p>EXECUTE PUBLICATION</text:p>
          </table:table-cell>
          <table:covered-table-cell table:number-columns-repeated="3" table:style-name="ce54"/>
          <table:table-cell table:style-name="ce54" office:value-type="string" ns42:value-type="string" table:number-columns-spanned="4" table:number-rows-spanned="1">
            <text:p>PUB-000001</text:p>
          </table:table-cell>
          <table:covered-table-cell table:number-columns-repeated="3" table:style-name="ce54"/>
        </table:table-row>
        <table:table-row table:style-name="ro5">
          <table:table-cell table:style-name="ce52" office:value-type="string" ns42: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ns42:value-type="string" table:number-columns-spanned="6" table:number-rows-spanned="1">
            <text:p>CONNECTOR RESPONSIBILITY</text:p>
          </table:table-cell>
          <table:covered-table-cell table:number-columns-repeated="5" table:style-name="ce53"/>
          <table:table-cell table:style-name="ce53" office:value-type="string" ns42:value-type="string" table:number-columns-spanned="6" table:number-rows-spanned="1">
            <text:p>CONNECTOR CALL PERFORMED</text:p>
          </table:table-cell>
          <table:covered-table-cell table:number-columns-repeated="5" table:style-name="ce53"/>
          <table:table-cell table:style-name="ce53" office:value-type="string" ns42: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ns42:value-type="string" table:number-columns-spanned="6" table:number-rows-spanned="1">
            <text:p>FUTURE CONNECTOR</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row>
        <table:table-row table:style-name="ro5">
          <table:table-cell table:style-name="ce52" office:value-type="string" ns42: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ns42:value-type="string" table:number-columns-spanned="3" table:number-rows-spanned="1">
            <text:p>ATTEMPT ID</text:p>
          </table:table-cell>
          <table:covered-table-cell table:number-columns-repeated="2" table:style-name="ce53"/>
          <table:table-cell table:style-name="ce53" office:value-type="string" ns42:value-type="string" table:number-columns-spanned="3" table:number-rows-spanned="1">
            <text:p>PLATFORM</text:p>
          </table:table-cell>
          <table:covered-table-cell table:number-columns-repeated="2" table:style-name="ce53"/>
          <table:table-cell table:style-name="ce53" office:value-type="string" ns42:value-type="string" table:number-columns-spanned="3" table:number-rows-spanned="1">
            <text:p>RECORD ID</text:p>
          </table:table-cell>
          <table:covered-table-cell table:number-columns-repeated="2" table:style-name="ce53"/>
          <table:table-cell table:style-name="ce53" office:value-type="string" ns42:value-type="string" table:number-columns-spanned="3" table:number-rows-spanned="1">
            <text:p>EXTERNAL RESULT RECEIVED?</text:p>
          </table:table-cell>
          <table:covered-table-cell table:number-columns-repeated="2" table:style-name="ce53"/>
          <table:table-cell table:style-name="ce53" office:value-type="string" ns42:value-type="string" table:number-columns-spanned="3" table:number-rows-spanned="1">
            <text:p>EXTERNAL RESULT STATUS</text:p>
          </table:table-cell>
          <table:covered-table-cell table:number-columns-repeated="2" table:style-name="ce53"/>
          <table:table-cell table:style-name="ce53" office:value-type="string" ns42: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ns42:value-type="string" table:number-columns-spanned="3" table:number-rows-spanned="1">
            <text:p>PUB-000001</text:p>
          </table:table-cell>
          <table:covered-table-cell table:number-columns-repeated="2" table:style-name="ce54"/>
          <table:table-cell table:style-name="ce54" office:value-type="string" ns42:value-type="string" table:number-columns-spanned="3" table:number-rows-spanned="1">
            <text:p>EBAY</text:p>
          </table:table-cell>
          <table:covered-table-cell table:number-columns-repeated="2" table:style-name="ce54"/>
          <table:table-cell table:style-name="ce54" office:value-type="string" ns42:value-type="string" table:number-columns-spanned="3" table:number-rows-spanned="1">
            <text:p>INV-000001</text:p>
          </table:table-cell>
          <table:covered-table-cell table:number-columns-repeated="2" table:style-name="ce54"/>
          <table:table-cell table:style-name="ce54" office:value-type="string" ns42:value-type="string" table:number-columns-spanned="3" table:number-rows-spanned="1">
            <text:p>NO</text:p>
          </table:table-cell>
          <table:covered-table-cell table:number-columns-repeated="2" table:style-name="ce54"/>
          <table:table-cell table:style-name="ce54" office:value-type="string" ns42:value-type="string" table:number-columns-spanned="3" table:number-rows-spanned="1">
            <text:p>NO RESULT</text:p>
          </table:table-cell>
          <table:covered-table-cell table:number-columns-repeated="2" table:style-name="ce54"/>
          <table:table-cell table:style-name="ce54" office:value-type="string" ns42:value-type="string" table:number-columns-spanned="3" table:number-rows-spanned="1">
            <text:p>NONE</text:p>
          </table:table-cell>
          <table:covered-table-cell table:number-columns-repeated="2" table:style-name="ce54"/>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style-name="ce53"/>
          <table:table-cell table:style-name="ce53" office:value-type="string" ns42: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ns42:value-type="string" table:number-columns-spanned="9" table:number-rows-spanned="1">
            <text:p>NONE</text:p>
          </table:table-cell>
          <table:covered-table-cell table:number-columns-repeated="8" table:style-name="ce54"/>
          <table:table-cell table:style-name="ce54" office:value-type="string" ns42:value-type="string" table:number-columns-spanned="9" table:number-rows-spanned="1">
            <text:p>NONE</text:p>
          </table:table-cell>
          <table:covered-table-cell table:number-columns-repeated="8" table:style-name="ce54"/>
        </table:table-row>
        <table:table-row table:style-name="ro5">
          <table:table-cell table:style-name="ce52" office:value-type="string" ns42: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ns42:value-type="string" table:number-columns-spanned="3" table:number-rows-spanned="1">
            <text:p>AUTHORITY VALID</text:p>
          </table:table-cell>
          <table:covered-table-cell table:number-columns-repeated="2" table:style-name="ce53"/>
          <table:table-cell table:style-name="ce53" office:value-type="string" ns42:value-type="string" table:number-columns-spanned="3" table:number-rows-spanned="1">
            <text:p>COMMIT VALID</text:p>
          </table:table-cell>
          <table:covered-table-cell table:number-columns-repeated="2" table:style-name="ce53"/>
          <table:table-cell table:style-name="ce53" office:value-type="string" ns42:value-type="string" table:number-columns-spanned="3" table:number-rows-spanned="1">
            <text:p>ATTEMPT MATCH</text:p>
          </table:table-cell>
          <table:covered-table-cell table:number-columns-repeated="2" table:style-name="ce53"/>
          <table:table-cell table:style-name="ce53" office:value-type="string" ns42:value-type="string" table:number-columns-spanned="3" table:number-rows-spanned="1">
            <text:p>PLATFORM MATCH</text:p>
          </table:table-cell>
          <table:covered-table-cell table:number-columns-repeated="2" table:style-name="ce53"/>
          <table:table-cell table:style-name="ce53" office:value-type="string" ns42:value-type="string" table:number-columns-spanned="3" table:number-rows-spanned="1">
            <text:p>RECORD MATCH</text:p>
          </table:table-cell>
          <table:covered-table-cell table:number-columns-repeated="2" table:style-name="ce53"/>
          <table:table-cell table:style-name="ce53" office:value-type="string" ns42: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ns42: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ns42:value-type="string" table:number-columns-spanned="3" table:number-rows-spanned="1">
            <text:p>NO</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ns42:value-type="string" table:number-columns-spanned="6" table:number-rows-spanned="1">
            <text:p>RAW EXTERNAL STATUS</text:p>
          </table:table-cell>
          <table:covered-table-cell table:number-columns-repeated="5" table:style-name="ce53"/>
          <table:table-cell table:style-name="ce53" office:value-type="string" ns42:value-type="string" table:number-columns-spanned="6" table:number-rows-spanned="1">
            <text:p>CLASSIFIED RESULT</text:p>
          </table:table-cell>
          <table:covered-table-cell table:number-columns-repeated="5" table:style-name="ce53"/>
          <table:table-cell table:style-name="ce53" office:value-type="string" ns42: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ns42: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ns42: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ns42: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ns42:value-type="string" table:number-columns-spanned="5" table:number-rows-spanned="1">
            <text:p>LISTING ID PRESENT</text:p>
          </table:table-cell>
          <table:covered-table-cell table:number-columns-repeated="4" table:style-name="ce53"/>
          <table:table-cell table:style-name="ce53" office:value-type="string" ns42:value-type="string" table:number-columns-spanned="5" table:number-rows-spanned="1">
            <text:p>RESULT REFERENCE PRESENT</text:p>
          </table:table-cell>
          <table:covered-table-cell table:number-columns-repeated="4" table:style-name="ce53"/>
          <table:table-cell table:style-name="ce53" office:value-type="string" ns42:value-type="string" table:number-columns-spanned="4" table:number-rows-spanned="1">
            <text:p>RESULT TIME PRESENT</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ns42: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ns42:value-type="string" table:number-columns-spanned="4" table:number-rows-spanned="1">
            <text:p>CLASSIFIED RESULT</text:p>
          </table:table-cell>
          <table:covered-table-cell table:number-columns-repeated="3" table:style-name="ce53"/>
          <table:table-cell table:style-name="ce53" office:value-type="string" ns42:value-type="string" table:number-columns-spanned="4" table:number-rows-spanned="1">
            <text:p>IDENTITY CHAIN VALID</text:p>
          </table:table-cell>
          <table:covered-table-cell table:number-columns-repeated="3" table:style-name="ce53"/>
          <table:table-cell table:style-name="ce53" office:value-type="string" ns42:value-type="string" table:number-columns-spanned="4" table:number-rows-spanned="1">
            <text:p>SUCCESS EVIDENCE COMPLETE</text:p>
          </table:table-cell>
          <table:covered-table-cell table:number-columns-repeated="3" table:style-name="ce53"/>
          <table:table-cell table:style-name="ce53" office:value-type="string" ns42:value-type="string" table:number-columns-spanned="3" table:number-rows-spanned="1">
            <text:p>VERIFIED PUBLICATION</text:p>
          </table:table-cell>
          <table:covered-table-cell table:number-columns-repeated="2" table:style-name="ce53"/>
          <table:table-cell table:style-name="ce53" office:value-type="string" ns42: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ns42: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ns42:value-type="string" table:number-columns-spanned="4" table:number-rows-spanned="1">
            <text:p>NO</text:p>
          </table:table-cell>
          <table:covered-table-cell table:number-columns-repeated="3" table:style-name="ce54"/>
          <table:table-cell table:style-name="ce54" table:formula="of:=[.O783]" office:value-type="string" office:string-value="NO" ns42: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ns42: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ns42:value-type="string" table:number-columns-spanned="3" table:number-rows-spanned="1">
            <text:p>NOT VERIFIED</text:p>
          </table:table-cell>
          <table:covered-table-cell table:number-columns-repeated="2" table:style-name="ce54"/>
        </table:table-row>
        <table:table-row table:style-name="ro5">
          <table:table-cell table:style-name="ce52" office:value-type="string" ns42: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ns42:value-type="string" table:number-columns-spanned="4" table:number-rows-spanned="1">
            <text:p>VERIFIED PUBLICATION</text:p>
          </table:table-cell>
          <table:covered-table-cell table:number-columns-repeated="3" table:style-name="ce53"/>
          <table:table-cell table:style-name="ce53" office:value-type="string" ns42:value-type="string" table:number-columns-spanned="5" table:number-rows-spanned="1">
            <text:p>PUBLICATION CONSEQUENCE</text:p>
          </table:table-cell>
          <table:covered-table-cell table:number-columns-repeated="4" table:style-name="ce53"/>
          <table:table-cell table:style-name="ce53" office:value-type="string" ns42:value-type="string" table:number-columns-spanned="5" table:number-rows-spanned="1">
            <text:p>LISTED TRANSITION ELIGIBILITY</text:p>
          </table:table-cell>
          <table:covered-table-cell table:number-columns-repeated="4" table:style-name="ce53"/>
          <table:table-cell table:style-name="ce53" office:value-type="string" ns42: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ns42: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ns42: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ns42:value-type="string" table:number-columns-spanned="5" table:number-rows-spanned="1">
            <text:p>NOT ELIGIBLE</text:p>
          </table:table-cell>
          <table:covered-table-cell table:number-columns-repeated="4" table:style-name="ce54"/>
          <table:table-cell table:style-name="ce54" table:formula="of:=&quot;NO&quot;" office:value-type="string" office:string-value="NO" ns42:value-type="string" table:number-columns-spanned="4" table:number-rows-spanned="1">
            <text:p>NO</text:p>
          </table:table-cell>
          <table:covered-table-cell table:number-columns-repeated="3" table:style-name="ce54"/>
        </table:table-row>
        <table:table-row table:style-name="ro5">
          <table:table-cell table:style-name="ce52" office:value-type="string" ns42: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ns42:value-type="string" table:number-columns-spanned="6" table:number-rows-spanned="1">
            <text:p>EVIDENCE CONDITION</text:p>
          </table:table-cell>
          <table:covered-table-cell table:number-columns-repeated="5" table:style-name="ce53"/>
          <table:table-cell table:style-name="ce53" office:value-type="string" ns42:value-type="string" table:number-columns-spanned="6" table:number-rows-spanned="1">
            <text:p>VERIFIED PUBLICATION</text:p>
          </table:table-cell>
          <table:covered-table-cell table:number-columns-repeated="5" table:style-name="ce53"/>
          <table:table-cell table:style-name="ce53" office:value-type="string" ns42: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ns42:value-type="string" table:number-columns-spanned="6" table:number-rows-spanned="1">
            <text:p>NO EXTERNAL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ENDING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LISTING ID</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REFERENC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SUCCESS WITHOUT RESULT TIME</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ATTEMPT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PLATFORM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CORD ID MISMATCH</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FAIL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REJECTED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4" office:value-type="string" ns42:value-type="string" table:number-columns-spanned="6" table:number-rows-spanned="1">
            <text:p>UNKNOWN RESULT</text:p>
          </table:table-cell>
          <table:covered-table-cell table:number-columns-repeated="5" table:style-name="ce54"/>
          <table:table-cell table:style-name="ce54" office:value-type="string" ns42:value-type="string" table:number-columns-spanned="6" table:number-rows-spanned="1">
            <text:p>NO</text:p>
          </table:table-cell>
          <table:covered-table-cell table:number-columns-repeated="5" table:style-name="ce54"/>
          <table:table-cell table:style-name="ce54" office:value-type="string" ns42:value-type="string" table:number-columns-spanned="6" table:number-rows-spanned="1">
            <text:p>NOT ELIGIBLE</text:p>
          </table:table-cell>
          <table:covered-table-cell table:number-columns-repeated="5" table:style-name="ce54"/>
        </table:table-row>
        <table:table-row table:style-name="ro5">
          <table:table-cell table:style-name="ce52" office:value-type="string" ns42: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ns42: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office:value-type="string" ns42:value-type="string" table:number-columns-spanned="18" table:number-rows-spanned="1">
            <text:p>✅ VERIFIED PUBLICATION SUCCESS EVIDENCE · BUILDS 251–260</text:p>
          </table:table-cell>
          <table:covered-table-cell table:number-columns-repeated="17"/>
        </table:table-row>
        <table:table-row table:style-name="ro5">
          <table:table-cell table:style-name="ce53" office:value-type="string" ns42:value-type="string" table:number-columns-spanned="6" table:number-rows-spanned="1">
            <text:p>EVIDENC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OPERATING BOUNDARY</text:p>
          </table:table-cell>
          <table:covered-table-cell table:number-columns-repeated="5"/>
        </table:table-row>
        <table:table-row table:style-name="ro5">
          <table:table-cell table:style-name="ce54" office:value-type="string" ns42:value-type="string" table:number-columns-spanned="6" table:number-rows-spanned="1">
            <text:p>CAN A MARKETPLACE SUCCESS RESULT BECOME VERIFIED PUBLICATION?</text:p>
          </table:table-cell>
          <table:covered-table-cell table:number-columns-repeated="5"/>
          <table:table-cell table:style-name="ce54" office:value-type="string" ns42:value-type="string" table:number-columns-spanned="6" table:number-rows-spanned="1">
            <text:p>REVALIDATE SUCCESS EVIDENCE + IDENTITY CHAIN</text:p>
          </table:table-cell>
          <table:covered-table-cell table:number-columns-repeated="5"/>
          <table:table-cell table:style-name="ce54" office:value-type="string" ns42:value-type="string" table:number-columns-spanned="6" table:number-rows-spanned="1">
            <text:p>SUCCESS CLAIM ≠ VERIFIED PUBLICATION · VERIFIED PUBLICATION ≠ LISTED</text:p>
          </table:table-cell>
          <table:covered-table-cell table:number-columns-repeated="5"/>
        </table:table-row>
        <table:table-row table:style-name="ro5">
          <table:table-cell table:style-name="ce52" office:value-type="string" ns42:value-type="string" table:number-columns-spanned="18" table:number-rows-spanned="1">
            <text:p>📥 SUCCESS RESULT FACTUAL INTAKE</text:p>
          </table:table-cell>
          <table:covered-table-cell table:number-columns-repeated="17"/>
        </table:table-row>
        <table:table-row table:style-name="ro5">
          <table:table-cell table:style-name="ce53" office:value-type="string" ns42:value-type="string" table:number-columns-spanned="3" table:number-rows-spanned="1">
            <text:p>ATTEMPT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EXTERNAL RESULT RECEIVED?</text:p>
          </table:table-cell>
          <table:covered-table-cell table:number-columns-repeated="2"/>
          <table:table-cell table:style-name="ce53" office:value-type="string" ns42:value-type="string" table:number-columns-spanned="3" table:number-rows-spanned="1">
            <text:p>EXTERNAL RESULT STATUS</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row>
        <table:table-row table:style-name="ro5">
          <table:table-cell table:style-name="ce54" office:value-type="string" ns42:value-type="string" table:number-columns-spanned="3" table:number-rows-spanned="1">
            <text:p>PUB-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UCCESS</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row>
        <table:table-row table:style-name="ro5">
          <table:table-cell table:style-name="ce53" office:value-type="string" ns42:value-type="string" table:number-columns-spanned="9" table:number-rows-spanned="1">
            <text:p>EXTERNAL RESULT REFERENCE</text:p>
          </table:table-cell>
          <table:covered-table-cell table:number-columns-repeated="8"/>
          <table:table-cell table:style-name="ce53" office:value-type="string" ns42:value-type="string" table:number-columns-spanned="9" table:number-rows-spanned="1">
            <text:p>RESULT RECEIVED AT</text:p>
          </table:table-cell>
          <table:covered-table-cell table:number-columns-repeated="8"/>
        </table:table-row>
        <table:table-row table:style-name="ro5">
          <table:table-cell table:style-name="ce54" office:value-type="string" ns42:value-type="string" table:number-columns-spanned="9" table:number-rows-spanned="1">
            <text:p>EBAY-RESULT-REF-000001</text:p>
          </table:table-cell>
          <table:covered-table-cell table:number-columns-repeated="8"/>
          <table:table-cell table:style-name="ce54" office:value-type="string" ns42:value-type="string" table:number-columns-spanned="9" table:number-rows-spanned="1">
            <text:p>2026-07-06T19:55:00-04:00</text:p>
          </table:table-cell>
          <table:covered-table-cell table:number-columns-repeated="8"/>
        </table:table-row>
        <table:table-row table:style-name="ro5">
          <table:table-cell table:style-name="ce52" office:value-type="string" ns42:value-type="string" table:number-columns-spanned="18" table:number-rows-spanned="1">
            <text:p>🔎 SUCCESS STATUS + REQUIRED EVIDENCE VALIDATION</text:p>
          </table:table-cell>
          <table:covered-table-cell table:number-columns-repeated="17"/>
        </table:table-row>
        <table:table-row table:style-name="ro5">
          <table:table-cell table:style-name="ce53" office:value-type="string" ns42:value-type="string" table:number-columns-spanned="3" table:number-rows-spanned="1">
            <text:p>SUCCESS STATUS VALI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RESULT REFERENCE PRESENT</text:p>
          </table:table-cell>
          <table:covered-table-cell table:number-columns-repeated="2"/>
          <table:table-cell table:style-name="ce53" office:value-type="string" ns42:value-type="string" table:number-columns-spanned="3" table:number-rows-spanned="1">
            <text:p>RESULT TIME PRESENT</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row>
        <table:table-row table:style-name="ro21">
          <table:table-cell table:style-name="ce54" table:formula="of:=IF(AND(UPPER(TRIM([.J810]))=&quot;YES&quot;;UPPER(TRIM([.M810]))=&quot;SUCCES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10]))&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12]))&lt;&gt;&quot;NONE&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0]))=UPPER(TRIM([.O766]));UPPER(TRIM([.D810]))=UPPER(TRIM([.D766]));UPPER(TRIM([.G810]))=UPPER(TRIM([.A766])));&quot;YES&quot;;&quot;NO&quot;)" office:value-type="string" office:string-value="YES" ns42:value-type="string" table:number-columns-spanned="3" table:number-rows-spanned="1">
            <text:p>YES</text:p>
          </table:table-cell>
          <table:covered-table-cell table:number-columns-repeated="2"/>
          <table:table-cell table:style-name="ce54" table:formula="of:=IF(AND(UPPER(TRIM([.A815]))=&quot;YES&quot;;UPPER(TRIM([.D815]))=&quot;YES&quot;;UPPER(TRIM([.G815]))=&quot;YES&quot;;UPPER(TRIM([.J815]))=&quot;YES&quot;;UPPER(TRIM([.M815]))=&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VERIFIED PUBLICATION CROSS-CHECK</text:p>
          </table:table-cell>
          <table:covered-table-cell table:number-columns-repeated="17"/>
        </table:table-row>
        <table:table-row table:style-name="ro5">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COMMIT VALID</text:p>
          </table:table-cell>
          <table:covered-table-cell table:number-columns-repeated="2"/>
          <table:table-cell table:style-name="ce53" office:value-type="string" ns42:value-type="string" table:number-columns-spanned="3" table:number-rows-spanned="1">
            <text:p>ATTEMPT MATCH</text:p>
          </table:table-cell>
          <table:covered-table-cell table:number-columns-repeated="2"/>
          <table:table-cell table:style-name="ce53" office:value-type="string" ns42:value-type="string" table:number-columns-spanned="3" table:number-rows-spanned="1">
            <text:p>SUCCESS EVIDENCE COMPLETE</text:p>
          </table:table-cell>
          <table:covered-table-cell table:number-columns-repeated="2"/>
          <table:table-cell table:style-name="ce53" office:value-type="string" ns42:value-type="string" table:number-columns-spanned="3" table:number-rows-spanned="1">
            <text:p>VERIFIED PUBLICATION</text:p>
          </table:table-cell>
          <table:covered-table-cell table:number-columns-repeated="2"/>
          <table:table-cell table:style-name="ce53" office:value-type="string" ns42:value-type="string" table:number-columns-spanned="3" table:number-rows-spanned="1">
            <text:p>VERIFICATION RESULT</text:p>
          </table:table-cell>
          <table:covered-table-cell table:number-columns-repeated="2"/>
        </table:table-row>
        <table:table-row table:style-name="ro21">
          <table:table-cell table:style-name="ce54" table:formula="of:=IF(UPPER(TRIM([.G766]))=&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K766]))=&quot;EXECUTE PUBLICATION&quot;;&quot;YES&quot;;&quot;NO&quot;)" office:value-type="string" office:string-value="YES" ns42:value-type="string" table:number-columns-spanned="3" table:number-rows-spanned="1">
            <text:p>YES</text:p>
          </table:table-cell>
          <table:covered-table-cell table:number-columns-repeated="2"/>
          <table:table-cell table:style-name="ce54" table:formula="of:=IF(UPPER(TRIM([.A810]))=UPPER(TRIM([.O766]));&quot;YES&quot;;&quot;NO&quot;)" office:value-type="string" office:string-value="YES" ns42:value-type="string" table:number-columns-spanned="3" table:number-rows-spanned="1">
            <text:p>YES</text:p>
          </table:table-cell>
          <table:covered-table-cell table:number-columns-repeated="2"/>
          <table:table-cell table:style-name="ce54" table:formula="of:=[.P815]" office:value-type="string" office:string-value="YES" ns42:value-type="string" table:number-columns-spanned="3" table:number-rows-spanned="1">
            <text:p>YES</text:p>
          </table:table-cell>
          <table:covered-table-cell table:number-columns-repeated="2"/>
          <table:table-cell table:style-name="ce54" table:formula="of:=IF(AND(UPPER(TRIM([.A818]))=&quot;YES&quot;;UPPER(TRIM([.D818]))=&quot;YES&quot;;UPPER(TRIM([.G818]))=&quot;YES&quot;;UPPER(TRIM([.J818]))=&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VERIFIED PUBLISHED&quot;;&quot;NOT VERIFIED&quot;)" office:value-type="string" office:string-value="VERIFIED PUBLISHED" ns42:value-type="string" table:number-columns-spanned="3" table:number-rows-spanned="1">
            <text:p>VERIFIED PUBLISHED</text:p>
          </table:table-cell>
          <table:covered-table-cell table:number-columns-repeated="2"/>
        </table:table-row>
        <table:table-row table:style-name="ro5">
          <table:table-cell table:style-name="ce52" office:value-type="string" ns42:value-type="string" table:number-columns-spanned="18" table:number-rows-spanned="1">
            <text:p>🔗 LISTED ELIGIBILITY REVALIDATION</text:p>
          </table:table-cell>
          <table:covered-table-cell table:number-columns-repeated="17"/>
        </table:table-row>
        <table:table-row table:style-name="ro5">
          <table:table-cell table:style-name="ce53" office:value-type="string" ns42:value-type="string" table:number-columns-spanned="4" table:number-rows-spanned="1">
            <text:p>VERIFIED PUBLICATION</text:p>
          </table:table-cell>
          <table:covered-table-cell table:number-columns-repeated="3"/>
          <table:table-cell table:style-name="ce53" office:value-type="string" ns42:value-type="string" table:number-columns-spanned="5" table:number-rows-spanned="1">
            <text:p>PUBLICATION CONSEQUENCE</text:p>
          </table:table-cell>
          <table:covered-table-cell table:number-columns-repeated="4"/>
          <table:table-cell table:style-name="ce53" office:value-type="string" ns42:value-type="string" table:number-columns-spanned="5" table:number-rows-spanned="1">
            <text:p>LISTED TRANSITION ELIGIBILITY</text:p>
          </table:table-cell>
          <table:covered-table-cell table:number-columns-repeated="4"/>
          <table:table-cell table:style-name="ce53" office:value-type="string" ns42:value-type="string" table:number-columns-spanned="4" table:number-rows-spanned="1">
            <text:p>AUTHORITATIVE INVENTORY STATE WRITE</text:p>
          </table:table-cell>
          <table:covered-table-cell table:number-columns-repeated="3"/>
        </table:table-row>
        <table:table-row table:style-name="ro21">
          <table:table-cell table:style-name="ce54" table:formula="of:=[.M818]" office:value-type="string" office:string-value="YES" ns42:value-type="string" table:number-columns-spanned="4" table:number-rows-spanned="1">
            <text:p>YES</text:p>
          </table:table-cell>
          <table:covered-table-cell table:number-columns-repeated="3"/>
          <table:table-cell table:style-name="ce54" table:formula="of:=IF(UPPER(TRIM([.A821]))=&quot;YES&quot;;&quot;PUBLICATION VERIFIED&quot;;&quot;NONE&quot;)" office:value-type="string" office:string-value="PUBLICATION VERIFIED" ns42:value-type="string" table:number-columns-spanned="5" table:number-rows-spanned="1">
            <text:p>PUBLICATION VERIFIED</text:p>
          </table:table-cell>
          <table:covered-table-cell table:number-columns-repeated="4"/>
          <table:table-cell table:style-name="ce54" table:formula="of:=IF(AND(UPPER(TRIM([.A821]))=&quot;YES&quot;;UPPER(TRIM([.E821]))=&quot;PUBLICATION VERIFIED&quot;);&quot;ELIGIBLE&quot;;&quot;NOT ELIGIBLE&quot;)" office:value-type="string" office:string-value="ELIGIBLE" ns42:value-type="string" table:number-columns-spanned="5" table:number-rows-spanned="1">
            <text:p>ELIGIBLE</text:p>
          </table:table-cell>
          <table:covered-table-cell table:number-columns-repeated="4"/>
          <table:table-cell table:style-name="ce54" table:formula="of:=&quot;NO&quot;" office:value-type="string" office:string-value="NO" ns42:value-type="string" table:number-columns-spanned="4" table:number-rows-spanned="1">
            <text:p>NO</text:p>
          </table:table-cell>
          <table:covered-table-cell table:number-columns-repeated="3"/>
        </table:table-row>
        <table:table-row table:style-name="ro5">
          <table:table-cell table:style-name="ce52" office:value-type="string" ns42:value-type="string" table:number-columns-spanned="18" table:number-rows-spanned="1">
            <text:p>🚫 FAIL-CLOSED VERIFIED PUBLICATION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PUBLICATION</text:p>
          </table:table-cell>
          <table:covered-table-cell table:number-columns-repeated="4"/>
          <table:table-cell table:style-name="ce53" office:value-type="string" ns42:value-type="string" table:number-columns-spanned="5" table:number-rows-spanned="1">
            <text:p>LISTED ELIGIBILITY</text:p>
          </table:table-cell>
          <table:covered-table-cell table:number-columns-repeated="4"/>
        </table:table-row>
        <table:table-row table:style-name="ro5">
          <table:table-cell table:style-name="ce54" office:value-type="string" ns42:value-type="string" table:number-columns-spanned="8" table:number-rows-spanned="1">
            <text:p>SUCCESS WITHOUT LISTING ID</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UCCESS WITHOUT RESULT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ATTEMPT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ID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PUBLICATION GATE · BUILD 260</text:p>
          </table:table-cell>
          <table:covered-table-cell table:number-columns-repeated="17"/>
        </table:table-row>
        <table:table-row table:style-name="ro5">
          <table:table-cell table:style-name="ce54" office:value-type="string" ns42:value-type="string" table:number-columns-spanned="18" table:number-rows-spanned="1">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LISTED TRANSITION EXECUTION · BUILDS 261–28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PUBLICATION BECOME AUTHORITATIVE LIST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PUBLICATION ≠ LISTE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LISTED TRANSITION REQUEST · BUILDS 261–265</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ADY TO LIST → LIST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J82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39]))=&quot;INV-000001&quot;;UPPER(TRIM([.E839]))=&quot;READY TO LIST → LISTED&quot;;UPPER(TRIM([.J83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3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1]))=&quot;YES&quot;;UPPER(TRIM([.E841]))=&quot;YES&quot;;UPPER(TRIM([.J84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LISTED TRANSITION AUTHORITY · BUILDS 266–27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PUBLIC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B726]))=&quot;READY TO LIST&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18]))=&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4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3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44]))=&quot;YES&quot;;UPPER(TRIM([.D844]))=&quot;YES&quot;;UPPER(TRIM([.H844]))=&quot;YES&quot;;UPPER(TRIM([.L84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TATE WRITE · BUILDS 271–275</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LISTED TRANSITION</text:p>
          </table:table-cell>
          <table:covered-table-cell table:number-columns-repeated="3"/>
          <table:table-cell table:style-name="ce54" table:formula="of:=IF(UPPER(TRIM([.O84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47]))=&quot;EXECUTE LISTED TRANSITION&quot;;UPPER(TRIM([.E84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4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47]))=&quot;YES&quot;;&quot;LISTED&quot;;&quot;READY TO LIST&quot;)" office:value-type="string" office:string-value="LISTED" ns42:value-type="string" table:number-columns-spanned="3" table:number-rows-spanned="1">
            <text:p>LISTED</text:p>
          </table:table-cell>
          <table:covered-table-cell table:number-columns-repeated="2"/>
        </table:table-row>
        <table:table-row table:style-name="ro5">
          <table:table-cell table:style-name="ce52" office:value-type="string" ns42:value-type="string" table:number-columns-spanned="18" table:number-rows-spanned="1">
            <text:p>📜 APPEND-ONLY LISTED TRANSITION HISTORY · BUILDS 276–277</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2</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READY TO LIST</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278–2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47]" office:value-type="string" office:string-value="YES" ns42:value-type="string" table:number-columns-spanned="3" table:number-rows-spanned="1">
            <text:p>YES</text:p>
          </table:table-cell>
          <table:covered-table-cell table:number-columns-repeated="2"/>
          <table:table-cell table:style-name="ce54" table:formula="of:=IF(AND(UPPER(TRIM([.D850]))=&quot;INV-000001&quot;;UPPER(TRIM([.G850]))=&quot;READY TO LIST&quot;;UPPER(TRIM([.J850]))=&quot;LISTED&quot;;UPPER(TRIM([.P85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47]))=UPPER(TRIM([.J85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53]))=&quot;YES&quot;;UPPER(TRIM([.D853]))=&quot;YES&quot;;UPPER(TRIM([.G85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85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85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LISTED TRANSITION EXECUTION GATE · BUILD 280</text:p>
          </table:table-cell>
          <table:covered-table-cell table:number-columns-repeated="17"/>
        </table:table-row>
        <table:table-row table:style-name="ro5">
          <table:table-cell table:style-name="ce54" office:value-type="string" ns42:value-type="string" table:number-columns-spanned="18" table:number-rows-spanned="1">
            <text:p>VERIFIED PUBLICATION → ELIGIBILITY ONLY · EXPLICIT REQUEST + GRANTED AUTHORITY + EXECUTION COMMIT REQUIRED · CONTROLLED WRITE DERIVES LISTE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CONTROLLED SALE EVIDENCE · BUILDS 281–320</text:p>
          </table:table-cell>
          <table:covered-table-cell table:number-columns-repeated="17"/>
        </table:table-row>
        <table:table-row table:style-name="ro5">
          <table:table-cell table:style-name="ce53" office:value-type="string" ns42:value-type="string" table:number-columns-spanned="6" table:number-rows-spanned="1">
            <text:p>SAL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 LISTED ASSET BECOME VERIFIED SOLD?</text:p>
          </table:table-cell>
          <table:covered-table-cell table:number-columns-repeated="5"/>
          <table:table-cell table:style-name="ce54" office:value-type="string" ns42:value-type="string" table:number-columns-spanned="6" table:number-rows-spanned="1">
            <text:p>INTAKE + IDENTITY + VALUE + QUANTITY + CROSS-CHECK</text:p>
          </table:table-cell>
          <table:covered-table-cell table:number-columns-repeated="5"/>
          <table:table-cell table:style-name="ce54" office:value-type="string" ns42:value-type="string" table:number-columns-spanned="6" table:number-rows-spanned="1">
            <text:p>LISTED ≠ SOLD · SALE CLAIM ≠ VERIFIED SALE</text:p>
          </table:table-cell>
          <table:covered-table-cell table:number-columns-repeated="5"/>
        </table:table-row>
        <table:table-row table:style-name="ro5">
          <table:table-cell table:style-name="ce52" office:value-type="string" ns42:value-type="string" table:number-columns-spanned="18" table:number-rows-spanned="1">
            <text:p>📥 SALE EVIDENCE INTAKE · BUILDS 281–29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MARKETPLACE LISTING ID</text:p>
          </table:table-cell>
          <table:covered-table-cell table:number-columns-repeated="2"/>
          <table:table-cell table:style-name="ce53" office:value-type="string" ns42:value-type="string" table:number-columns-spanned="3" table:number-rows-spanned="1">
            <text:p>SALE RECEIVED?</text:p>
          </table:table-cell>
          <table:covered-table-cell table:number-columns-repeated="2"/>
          <table:table-cell table:style-name="ce53" office:value-type="string" ns42:value-type="string" table:number-columns-spanned="3" table:number-rows-spanned="1">
            <text:p>SALE STATUS</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EBAY-123456789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row>
        <table:table-row table:style-name="ro5">
          <table:table-cell table:style-name="ce53" office:value-type="string" ns42:value-type="string" table:number-columns-spanned="5" table:number-rows-spanned="1">
            <text:p>SALE REFERENCE</text:p>
          </table:table-cell>
          <table:covered-table-cell table:number-columns-repeated="4"/>
          <table:table-cell table:style-name="ce53" office:value-type="string" ns42:value-type="string" table:number-columns-spanned="5" table:number-rows-spanned="1">
            <text:p>SOLD AT</text:p>
          </table:table-cell>
          <table:covered-table-cell table:number-columns-repeated="4"/>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row>
        <table:table-row table:style-name="ro5">
          <table:table-cell table:style-name="ce54" office:value-type="string" ns42:value-type="string" table:number-columns-spanned="5" table:number-rows-spanned="1">
            <text:p>EBAY-SALE-REF-000001</text:p>
          </table:table-cell>
          <table:covered-table-cell table:number-columns-repeated="4"/>
          <table:table-cell table:style-name="ce54" office:value-type="string" ns42:value-type="string" table:number-columns-spanned="5" table:number-rows-spanned="1">
            <text:p>2026-07-06T20:30:00-04:00</text:p>
          </table:table-cell>
          <table:covered-table-cell table:number-columns-repeated="4"/>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4" table:number-rows-spanned="1">
            <text:p>1</text:p>
          </table:table-cell>
          <table:covered-table-cell table:number-columns-repeated="3"/>
        </table:table-row>
        <table:table-row table:style-name="ro5">
          <table:table-cell table:style-name="ce52" office:value-type="string" ns42:value-type="string" table:number-columns-spanned="18" table:number-rows-spanned="1">
            <text:p>🔗 SALE IDENTITY + MARKETPLACE MATCH · BUILDS 291–300</text:p>
          </table:table-cell>
          <table:covered-table-cell table:number-columns-repeated="17"/>
        </table:table-row>
        <table:table-row table:style-name="ro5">
          <table:table-cell table:style-name="ce53" office:value-type="string" ns42:value-type="string" table:number-columns-spanned="3" table:number-rows-spanned="1">
            <text:p>AUTHORITATIVE STATE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PLATFORM MATCH</text:p>
          </table:table-cell>
          <table:covered-table-cell table:number-columns-repeated="2"/>
          <table:table-cell table:style-name="ce53" office:value-type="string" ns42:value-type="string" table:number-columns-spanned="3" table:number-rows-spanned="1">
            <text:p>LISTING ID MATCH</text:p>
          </table:table-cell>
          <table:covered-table-cell table:number-columns-repeated="2"/>
          <table:table-cell table:style-name="ce53" office:value-type="string" ns42:value-type="string" table:number-columns-spanned="3" table:number-rows-spanned="1">
            <text:p>SALE RECEIVED VALID</text:p>
          </table:table-cell>
          <table:covered-table-cell table:number-columns-repeated="2"/>
          <table:table-cell table:style-name="ce53" office:value-type="string" ns42:value-type="string" table:number-columns-spanned="3" table:number-rows-spanned="1">
            <text:p>SALE STATUS VALID</text:p>
          </table:table-cell>
          <table:covered-table-cell table:number-columns-repeated="2"/>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61]))=&quot;INV-000001&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61]))=&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J861]))=&quot;EBAY-1234567890&quot;;&quot;YES&quot;;&quot;NO&quot;)" office:value-type="string" office:string-value="YES" ns42:value-type="string" table:number-columns-spanned="3" table:number-rows-spanned="1">
            <text:p>YES</text:p>
          </table:table-cell>
          <table:covered-table-cell table:number-columns-repeated="2"/>
          <table:table-cell table:style-name="ce54" table:formula="of:=IF(UPPER(TRIM([.M861]))=&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61]))=&quot;SOLD&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AMOUNT + QUANTITY VALIDATION · BUILDS 301–310</text:p>
          </table:table-cell>
          <table:covered-table-cell table:number-columns-repeated="17"/>
        </table:table-row>
        <table:table-row table:style-name="ro5">
          <table:table-cell table:style-name="ce53" office:value-type="string" ns42:value-type="string" table:number-columns-spanned="4" table:number-rows-spanned="1">
            <text:p>SALE REFERENCE PRESENT</text:p>
          </table:table-cell>
          <table:covered-table-cell table:number-columns-repeated="3"/>
          <table:table-cell table:style-name="ce53" office:value-type="string" ns42:value-type="string" table:number-columns-spanned="4" table:number-rows-spanned="1">
            <text:p>SOLD TIME PRESENT</text:p>
          </table:table-cell>
          <table:covered-table-cell table:number-columns-repeated="3"/>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4" table:number-rows-spanned="1">
            <text:p>SALE EVIDENCE COMPLETE</text:p>
          </table:table-cell>
          <table:covered-table-cell table:number-columns-repeated="3"/>
        </table:table-row>
        <table:table-row table:style-name="ro21">
          <table:table-cell table:style-name="ce54" table:formula="of:=IF(UPPER(TRIM([.A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863]))&lt;&gt;&quot;NONE&quot;;&quot;YES&quot;;&quot;NO&quot;)" office:value-type="string" office:string-value="YES" ns42:value-type="string" table:number-columns-spanned="4" table:number-rows-spanned="1">
            <text:p>YES</text:p>
          </table:table-cell>
          <table:covered-table-cell table:number-columns-repeated="3"/>
          <table:table-cell table:style-name="ce54" table:formula="of:=IF(VALUE([.K863])&gt;0;&quot;YES&quot;;&quot;NO&quot;)" office:value-type="string" office:string-value="YES" ns42:value-type="string" table:number-columns-spanned="3" table:number-rows-spanned="1">
            <text:p>YES</text:p>
          </table:table-cell>
          <table:covered-table-cell table:number-columns-repeated="2"/>
          <table:table-cell table:style-name="ce54" table:formula="of:=IF(VALUE([.O863])&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office:value-type="string" office:string-value="YES" ns42:value-type="string" table:number-columns-spanned="4" table:number-rows-spanned="1">
            <text:p>YES</text:p>
          </table:table-cell>
          <table:covered-table-cell table:number-columns-repeated="3"/>
        </table:table-row>
        <table:table-row table:style-name="ro5">
          <table:table-cell table:style-name="ce52" office:value-type="string" ns42:value-type="string" table:number-columns-spanned="18" table:number-rows-spanned="1">
            <text:p>✅ VERIFIED SALE CROSS-CHECK · BUILDS 311–320</text:p>
          </table:table-cell>
          <table:covered-table-cell table:number-columns-repeated="17"/>
        </table:table-row>
        <table:table-row table:style-name="ro5">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ALE EVIDENCE COMPLETE</text:p>
          </table:table-cell>
          <table:covered-table-cell table:number-columns-repeated="2"/>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SALE CONSEQUENCE</text:p>
          </table:table-cell>
          <table:covered-table-cell table:number-columns-repeated="2"/>
          <table:table-cell table:style-name="ce53" office:value-type="string" ns42:value-type="string" table:number-columns-spanned="3" table:number-rows-spanned="1">
            <text:p>SOLD TRANSITION ELIGIBILITY</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row>
        <table:table-row table:style-name="ro21">
          <table:table-cell table:style-name="ce54" table:formula="of:=IF(AND(UPPER(TRIM([.A866]))=&quot;YES&quot;;UPPER(TRIM([.D866]))=&quot;YES&quot;;UPPER(TRIM([.G866]))=&quot;YES&quot;;UPPER(TRIM([.J866]))=&quot;YES&quot;);&quot;YES&quot;;&quot;NO&quot;)" office:value-type="string" office:string-value="YES" ns42:value-type="string" table:number-columns-spanned="3" table:number-rows-spanned="1">
            <text:p>YES</text:p>
          </table:table-cell>
          <table:covered-table-cell table:number-columns-repeated="2"/>
          <table:table-cell table:style-name="ce54" table:formula="of:=[.O869]" office:value-type="string" office:string-value="YES" ns42:value-type="string" table:number-columns-spanned="3" table:number-rows-spanned="1">
            <text:p>YES</text:p>
          </table:table-cell>
          <table:covered-table-cell table:number-columns-repeated="2"/>
          <table:table-cell table:style-name="ce54" table:formula="of:=IF(AND(UPPER(TRIM([.A872]))=&quot;YES&quot;;UPPER(TRIM([.D87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SALE VERIFIED&quot;;&quot;NONE&quot;)" office:value-type="string" office:string-value="SALE VERIFIED" ns42:value-type="string" table:number-columns-spanned="3" table:number-rows-spanned="1">
            <text:p>SALE VERIFIED</text:p>
          </table:table-cell>
          <table:covered-table-cell table:number-columns-repeated="2"/>
          <table:table-cell table:style-name="ce54" table:formula="of:=IF(AND(UPPER(TRIM([.G872]))=&quot;YES&quot;;UPPER(TRIM([.J872]))=&quot;SALE VERIFIED&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quot;NO&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FAIL-CLOSED SALE CASES</text:p>
          </table:table-cell>
          <table:covered-table-cell table:number-columns-repeated="17"/>
        </table:table-row>
        <table:table-row table:style-name="ro5">
          <table:table-cell table:style-name="ce53" office:value-type="string" ns42:value-type="string" table:number-columns-spanned="8" table:number-rows-spanned="1">
            <text:p>EVIDENCE CONDITION</text:p>
          </table:table-cell>
          <table:covered-table-cell table:number-columns-repeated="7"/>
          <table:table-cell table:style-name="ce53" office:value-type="string" ns42:value-type="string" table:number-columns-spanned="5" table:number-rows-spanned="1">
            <text:p>VERIFIED SALE</text:p>
          </table:table-cell>
          <table:covered-table-cell table:number-columns-repeated="4"/>
          <table:table-cell table:style-name="ce53" office:value-type="string" ns42:value-type="string" table:number-columns-spanned="5" table:number-rows-spanned="1">
            <text:p>SOLD ELIGIBILITY</text:p>
          </table:table-cell>
          <table:covered-table-cell table:number-columns-repeated="4"/>
        </table:table-row>
        <table:table-row table:style-name="ro5">
          <table:table-cell table:style-name="ce54" office:value-type="string" ns42:value-type="string" table:number-columns-spanned="8" table:number-rows-spanned="1">
            <text:p>SALE WITHOUT LISTING ID 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REFERENC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SALE WITHOUT SOLD TIME</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AMOUNT</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ZERO OR INVALID QUANTITY</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4" office:value-type="string" ns42:value-type="string" table:number-columns-spanned="8" table:number-rows-spanned="1">
            <text:p>RECORD OR PLATFORM MISMATCH</text:p>
          </table:table-cell>
          <table:covered-table-cell table:number-columns-repeated="7"/>
          <table:table-cell table:style-name="ce54" office:value-type="string" ns42:value-type="string" table:number-columns-spanned="5" table:number-rows-spanned="1">
            <text:p>NO</text:p>
          </table:table-cell>
          <table:covered-table-cell table:number-columns-repeated="4"/>
          <table:table-cell table:style-name="ce54" office:value-type="string" ns42:value-type="string" table:number-columns-spanned="5" table:number-rows-spanned="1">
            <text:p>NOT ELIGIBLE</text:p>
          </table:table-cell>
          <table:covered-table-cell table:number-columns-repeated="4"/>
        </table:table-row>
        <table:table-row table:style-name="ro5">
          <table:table-cell table:style-name="ce52" office:value-type="string" ns42:value-type="string" table:number-columns-spanned="18" table:number-rows-spanned="1">
            <text:p>🏁 CONTROLLED VERIFIED SALE EVIDENCE GATE · BUILD 320</text:p>
          </table:table-cell>
          <table:covered-table-cell table:number-columns-repeated="17"/>
        </table:table-row>
        <table:table-row table:style-name="ro5">
          <table:table-cell table:style-name="ce54" office:value-type="string" ns42:value-type="string" table:number-columns-spanned="18" table:number-rows-spanned="1">
            <text:p>LISTED ≠ SOLD · SALE CLAIM ≠ VERIFIED SALE · VALID IDENTITY + LISTING MATCH + SALE REFERENCE + SOLD TIME + POSITIVE AMOUNT + POSITIVE QUANTITY REQUIRED · VERIFIED SALE → SOLD TRANSITION ELIGIBILITY ONLY · NO DIRECT INVENTORY STATE WRITE</text:p>
          </table:table-cell>
          <table:covered-table-cell table:number-columns-repeated="17"/>
        </table:table-row>
        <table:table-row table:style-name="ro5">
          <table:table-cell table:style-name="ce52" office:value-type="string" ns42:value-type="string" table:number-columns-spanned="18" table:number-rows-spanned="1">
            <text:p>💰 CONTROLLED SOLD TRANSITION EXECUTION · BUILDS 321–36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BECOME AUTHORITATIVE SOL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ALE ≠ SOLD · AUTHORITY ≠ EXECUTION</text:p>
          </table:table-cell>
          <table:covered-table-cell table:number-columns-repeated="5"/>
        </table:table-row>
        <table:table-row table:style-name="ro5">
          <table:table-cell table:style-name="ce52" office:value-type="string" ns42:value-type="string" table:number-columns-spanned="18" table:number-rows-spanned="1">
            <text:p>📥 EXPLICIT SOLD TRANSITION REQUEST · BUILDS 321–3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LISTED → SOL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M872]))=&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89]))=&quot;INV-000001&quot;;UPPER(TRIM([.E889]))=&quot;LISTED → SOLD&quot;;UPPER(TRIM([.J889]))=&quot;REQUESTED&quot;);&quot;YES&quot;;&quot;NO&quot;)" office:value-type="string" office:string-value="YES" ns42:value-type="string" table:number-columns-spanned="5" table:number-rows-spanned="1">
            <text:p>YES</text:p>
          </table:table-cell>
          <table:covered-table-cell table:number-columns-repeated="4"/>
          <table:table-cell table:style-name="ce54" table:formula="of:=IF(TRIM([.N88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1]))=&quot;YES&quot;;UPPER(TRIM([.E891]))=&quot;YES&quot;;UPPER(TRIM([.J89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OLD TRANSITION AUTHORITY · BUILDS 331–340</text:p>
          </table:table-cell>
          <table:covered-table-cell table:number-columns-repeated="17"/>
        </table:table-row>
        <table:table-row table:style-name="ro5">
          <table:table-cell table:style-name="ce53" office:value-type="string" ns42:value-type="string" table:number-columns-spanned="3" table:number-rows-spanned="1">
            <text:p>CURRENT STATE VALID</text:p>
          </table:table-cell>
          <table:covered-table-cell table:number-columns-repeated="2"/>
          <table:table-cell table:style-name="ce53" office:value-type="string" ns42:value-type="string" table:number-columns-spanned="4" table:number-rows-spanned="1">
            <text:p>VERIFIED SALE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4" table:number-rows-spanned="1">
            <text:p>AUTHORITY RESULT</text:p>
          </table:table-cell>
          <table:covered-table-cell table:number-columns-repeated="3"/>
        </table:table-row>
        <table:table-row table:style-name="ro21">
          <table:table-cell table:style-name="ce54" table:formula="of:=IF(UPPER(TRIM([.P847]))=&quot;LIS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G872]))=&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9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88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894]))=&quot;YES&quot;;UPPER(TRIM([.D894]))=&quot;YES&quot;;UPPER(TRIM([.H894]))=&quot;YES&quot;;UPPER(TRIM([.L894]))=&quot;YES&quot;);&quot;GRANTED&quot;;&quot;DENIED&quot;)" office:value-type="string" office:string-value="GRANTED" ns42:value-type="string" table:number-columns-spanned="4" table:number-rows-spanned="1">
            <text:p>GRANTED</text:p>
          </table:table-cell>
          <table:covered-table-cell table:number-columns-repeated="3"/>
        </table:table-row>
        <table:table-row table:style-name="ro5">
          <table:table-cell table:style-name="ce52" office:value-type="string" ns42:value-type="string" table:number-columns-spanned="18" table:number-rows-spanned="1">
            <text:p>⚙️ EXECUTION COMMIT + CONTROLLED SOLD STATE WRITE · BUILDS 341–35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4" table:number-rows-spanned="1">
            <text:p>CONTROLLED STATE WRITE</text:p>
          </table:table-cell>
          <table:covered-table-cell table:number-columns-repeated="3"/>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OLD TRANSITION</text:p>
          </table:table-cell>
          <table:covered-table-cell table:number-columns-repeated="3"/>
          <table:table-cell table:style-name="ce54" table:formula="of:=IF(UPPER(TRIM([.O89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897]))=&quot;EXECUTE SOLD TRANSITION&quot;;UPPER(TRIM([.E89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I897]))=&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L897]))=&quot;YES&quot;;&quot;SOLD&quot;;&quot;LISTED&quot;)" office:value-type="string" office:string-value="SOLD" ns42:value-type="string" table:number-columns-spanned="3" table:number-rows-spanned="1">
            <text:p>SOLD</text:p>
          </table:table-cell>
          <table:covered-table-cell table:number-columns-repeated="2"/>
        </table:table-row>
        <table:table-row table:style-name="ro5">
          <table:table-cell table:style-name="ce52" office:value-type="string" ns42:value-type="string" table:number-columns-spanned="18" table:number-rows-spanned="1">
            <text:p>📜 APPEND-ONLY SOLD TRANSITION HISTORY · BUILDS 351–354</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3</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LISTED</text:p>
          </table:table-cell>
          <table:covered-table-cell table:number-columns-repeated="2"/>
          <table:table-cell table:style-name="ce54" office:value-type="string" ns42:value-type="string" table:number-columns-spanned="3" table:number-rows-spanned="1">
            <text:p>SOL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355–3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L897]" office:value-type="string" office:string-value="YES" ns42:value-type="string" table:number-columns-spanned="3" table:number-rows-spanned="1">
            <text:p>YES</text:p>
          </table:table-cell>
          <table:covered-table-cell table:number-columns-repeated="2"/>
          <table:table-cell table:style-name="ce54" table:formula="of:=IF(AND(UPPER(TRIM([.D900]))=&quot;INV-000001&quot;;UPPER(TRIM([.G900]))=&quot;LISTED&quot;;UPPER(TRIM([.J900]))=&quot;SOLD&quot;;UPPER(TRIM([.P900]))=&quot;EXECUT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897]))=UPPER(TRIM([.J90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03]))=&quot;YES&quot;;UPPER(TRIM([.D903]))=&quot;YES&quot;;UPPER(TRIM([.G90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03]))=&quot;COMPLETED&quot;;&quot;ALREADY EXECUTED&quot;;&quot;EXECUTION AVAILABLE&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0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OLD TRANSITION EXECUTION GATE · BUILD 360</text:p>
          </table:table-cell>
          <table:covered-table-cell table:number-columns-repeated="17"/>
        </table:table-row>
        <table:table-row table:style-name="ro5">
          <table:table-cell table:style-name="ce54" office:value-type="string" ns42:value-type="string" table:number-columns-spanned="18" table:number-rows-spanned="1">
            <text:p>VERIFIED SALE → SOLD ELIGIBILITY ONLY · EXPLICIT REQUEST + GRANTED AUTHORITY + EXECUTION COMMIT REQUIRED · CONTROLLED WRITE DERIVES SOLD · APPEND-ONLY HISTORY + POST-WRITE VERIFICATION REQUIRED · REPLAY MUST NOT CREATE SECOND WRITE</text:p>
          </table:table-cell>
          <table:covered-table-cell table:number-columns-repeated="17"/>
        </table:table-row>
        <table:table-row table:style-name="ro5">
          <table:table-cell table:style-name="ce52" office:value-type="string" ns42:value-type="string" table:number-columns-spanned="18" table:number-rows-spanned="1">
            <text:p>💵 SALE REVENUE AUTHORITY · BUILDS 361–380</text:p>
          </table:table-cell>
          <table:covered-table-cell table:number-columns-repeated="17"/>
        </table:table-row>
        <table:table-row table:style-name="ro5">
          <table:table-cell table:style-name="ce53" office:value-type="string" ns42:value-type="string" table:number-columns-spanned="6" table:number-rows-spanned="1">
            <text:p>FINANCIAL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ALE VALUE BECOME AUTHORITATIVE REVENUE?</text:p>
          </table:table-cell>
          <table:covered-table-cell table:number-columns-repeated="5"/>
          <table:table-cell table:style-name="ce54" office:value-type="string" ns42:value-type="string" table:number-columns-spanned="6" table:number-rows-spanned="1">
            <text:p>SALE IDENTITY + VERIFIED SALE + AMOUNT + QUANTITY + CROSS-CHECK</text:p>
          </table:table-cell>
          <table:covered-table-cell table:number-columns-repeated="5"/>
          <table:table-cell table:style-name="ce54" office:value-type="string" ns42:value-type="string" table:number-columns-spanned="6" table:number-rows-spanned="1">
            <text:p>SALE CLAIM ≠ REVENUE · SOLD STATE ≠ REVENUE</text:p>
          </table:table-cell>
          <table:covered-table-cell table:number-columns-repeated="5"/>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4" table:number-rows-spanned="1">
            <text:p>VERIFIED SALE</text:p>
          </table:table-cell>
          <table:covered-table-cell table:number-columns-repeated="3"/>
          <table:table-cell table:style-name="ce53" office:value-type="string" ns42:value-type="string" table:number-columns-spanned="4" table:number-rows-spanned="1">
            <text:p>GROSS SALE AMOUNT</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02.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SALE ID VALID</text:p>
          </table:table-cell>
          <table:covered-table-cell table:number-columns-repeated="2"/>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VERIFIED SALE VALID</text:p>
          </table:table-cell>
          <table:covered-table-cell table:number-columns-repeated="2"/>
          <table:table-cell table:style-name="ce53" office:value-type="string" ns42:value-type="string" table:number-columns-spanned="3" table:number-rows-spanned="1">
            <text:p>AMOUNT VALID</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REVENUE EVIDENCE COMPLETE</text:p>
          </table:table-cell>
          <table:covered-table-cell table:number-columns-repeated="2"/>
        </table:table-row>
        <table:table-row table:style-name="ro21">
          <table:table-cell table:style-name="ce54" table:formula="of:=IF(TRIM([.A9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0]))=UPPER(TRIM([.D867]));&quot;YES&quot;;&quot;NO&quot;)" office:value-type="string" office:string-value="YES" ns42:value-type="string" table:number-columns-spanned="3" table:number-rows-spanned="1">
            <text:p>YES</text:p>
          </table:table-cell>
          <table:covered-table-cell table:number-columns-repeated="2"/>
          <table:table-cell table:style-name="ce54" table:formula="of:=IF(UPPER(TRIM([.H910]))=UPPER(TRIM([.G870]));&quot;YES&quot;;&quot;NO&quot;)" office:value-type="string" office:string-value="YES" ns42:value-type="string" table:number-columns-spanned="3" table:number-rows-spanned="1">
            <text:p>YES</text:p>
          </table:table-cell>
          <table:covered-table-cell table:number-columns-repeated="2"/>
          <table:table-cell table:style-name="ce54" table:formula="of:=IF(VALUE([.L910])&gt;0;&quot;YES&quot;;&quot;NO&quot;)" office:value-type="string" office:string-value="YES" ns42:value-type="string" table:number-columns-spanned="3" table:number-rows-spanned="1">
            <text:p>YES</text:p>
          </table:table-cell>
          <table:covered-table-cell table:number-columns-repeated="2"/>
          <table:table-cell table:style-name="ce54" table:formula="of:=IF(VALUE([.P910])&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12]))=&quot;YES&quot;;UPPER(TRIM([.D912]))=&quot;YES&quot;;UPPER(TRIM([.G912]))=&quot;YES&quot;;UPPER(TRIM([.J912]))=&quot;YES&quot;;UPPER(TRIM([.M912]))=&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REVENUE CROSS-CHECK · BUILDS 371–380</text:p>
          </table:table-cell>
          <table:covered-table-cell table:number-columns-repeated="17"/>
        </table:table-row>
        <table:table-row table:style-name="ro5">
          <table:table-cell table:style-name="ce53" office:value-type="string" ns42:value-type="string" table:number-columns-spanned="5" table:number-rows-spanned="1">
            <text:p>REVENUE EVIDENCE COMPLETE</text:p>
          </table:table-cell>
          <table:covered-table-cell table:number-columns-repeated="4"/>
          <table:table-cell table:style-name="ce53" office:value-type="string" ns42:value-type="string" table:number-columns-spanned="4" table:number-rows-spanned="1">
            <text:p>SALE IDENTITY VALID</text:p>
          </table:table-cell>
          <table:covered-table-cell table:number-columns-repeated="3"/>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REVENUE RESULT</text:p>
          </table:table-cell>
          <table:covered-table-cell table:number-columns-repeated="3"/>
        </table:table-row>
        <table:table-row table:style-name="ro21">
          <table:table-cell table:style-name="ce54" table:formula="of:=[.P912]" office:value-type="string" office:string-value="YES" ns42:value-type="string" table:number-columns-spanned="5" table:number-rows-spanned="1">
            <text:p>YES</text:p>
          </table:table-cell>
          <table:covered-table-cell table:number-columns-repeated="4"/>
          <table:table-cell table:style-name="ce54" table:formula="of:=IF(AND(UPPER(TRIM([.A912]))=&quot;YES&quot;;UPPER(TRIM([.D912]))=&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15]))=&quot;YES&quot;;UPPER(TRIM([.F915]))=&quot;YES&quot;);[.L910];&quot;0.00&quot;)" office:value-type="string" office:string-value="102.00" ns42:value-type="string" table:number-columns-spanned="5" table:number-rows-spanned="1">
            <text:p>102.00</text:p>
          </table:table-cell>
          <table:covered-table-cell table:number-columns-repeated="4"/>
          <table:table-cell table:style-name="ce54" table:formula="of:=IF(VALUE([.J915])&gt;0;&quot;REVENUE VERIFIED&quot;;&quot;REVENUE NOT VERIFIED&quot;)" office:value-type="string" office:string-value="REVENUE VERIFIED" ns42:value-type="string" table:number-columns-spanned="4" table:number-rows-spanned="1">
            <text:p>REVENUE VERIFIED</text:p>
          </table:table-cell>
          <table:covered-table-cell table:number-columns-repeated="3"/>
        </table:table-row>
        <table:table-row table:style-name="ro5">
          <table:table-cell table:style-name="ce52" office:value-type="string" ns42:value-type="string" table:number-columns-spanned="18" table:number-rows-spanned="1">
            <text:p>🏪 MARKETPLACE FEE EVIDENCE · BUILDS 381–400</text:p>
          </table:table-cell>
          <table:covered-table-cell table:number-columns-repeated="17"/>
        </table:table-row>
        <table:table-row table:style-name="ro5">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FEE EVIDENCE RECEIVED</text:p>
          </table:table-cell>
          <table:covered-table-cell table:number-columns-repeated="3"/>
          <table:table-cell table:style-name="ce53" office:value-type="string" ns42:value-type="string" table:number-columns-spanned="4" table:number-rows-spanned="1">
            <text:p>MARKETPLACE FEE</text:p>
          </table:table-cell>
          <table:covered-table-cell table:number-columns-repeated="3"/>
          <table:table-cell table:style-name="ce53" office:value-type="string" ns42:value-type="string" table:number-columns-spanned="4" table:number-rows-spanned="1">
            <text:p>FEE REFERENCE</text:p>
          </table:table-cell>
          <table:covered-table-cell table:number-columns-repeated="3"/>
        </table:table-row>
        <table:table-row table:style-name="ro5">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13.26</text:p>
          </table:table-cell>
          <table:covered-table-cell table:number-columns-repeated="3"/>
          <table:table-cell table:style-name="ce54" office:value-type="string" ns42:value-type="string" table:number-columns-spanned="4" table:number-rows-spanned="1">
            <text:p>EBAY-FEE-REF-000001</text:p>
          </table:table-cell>
          <table:covered-table-cell table:number-columns-repeated="3"/>
        </table:table-row>
        <table:table-row table:style-name="ro5">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FEE RECEIVED VALID</text:p>
          </table:table-cell>
          <table:covered-table-cell table:number-columns-repeated="2"/>
          <table:table-cell table:style-name="ce53" office:value-type="string" ns42:value-type="string" table:number-columns-spanned="3" table:number-rows-spanned="1">
            <text:p>FEE AMOUNT VALID</text:p>
          </table:table-cell>
          <table:covered-table-cell table:number-columns-repeated="2"/>
          <table:table-cell table:style-name="ce53" office:value-type="string" ns42:value-type="string" table:number-columns-spanned="3" table:number-rows-spanned="1">
            <text:p>FEE REFERENCE PRESENT</text:p>
          </table:table-cell>
          <table:covered-table-cell table:number-columns-repeated="2"/>
          <table:table-cell table:style-name="ce53" office:value-type="string" ns42:value-type="string" table:number-columns-spanned="3" table:number-rows-spanned="1">
            <text:p>FEE EVIDENCE COMPLETE</text:p>
          </table:table-cell>
          <table:covered-table-cell table:number-columns-repeated="2"/>
        </table:table-row>
        <table:table-row table:style-name="ro21">
          <table:table-cell table:style-name="ce54" table:formula="of:=IF(UPPER(TRIM([.A918]))=&quot;EBAY&quot;;&quot;YES&quot;;&quot;NO&quot;)" office:value-type="string" office:string-value="YES" ns42:value-type="string" table:number-columns-spanned="3" table:number-rows-spanned="1">
            <text:p>YES</text:p>
          </table:table-cell>
          <table:covered-table-cell table:number-columns-repeated="2"/>
          <table:table-cell table:style-name="ce54" table:formula="of:=IF(UPPER(TRIM([.D918]))=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G918]))=&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K918])&gt;=0;&quot;YES&quot;;&quot;NO&quot;)" office:value-type="string" office:string-value="YES" ns42:value-type="string" table:number-columns-spanned="3" table:number-rows-spanned="1">
            <text:p>YES</text:p>
          </table:table-cell>
          <table:covered-table-cell table:number-columns-repeated="2"/>
          <table:table-cell table:style-name="ce54" table:formula="of:=IF(TRIM([.O918])&lt;&gt;&quot;&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0]))=&quot;YES&quot;;UPPER(TRIM([.D920]))=&quot;YES&quot;;UPPER(TRIM([.G920]))=&quot;YES&quot;;UPPER(TRIM([.J920]))=&quot;YES&quot;;UPPER(TRIM([.M920]))=&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MARKETPLACE FEE AUTHORITY · BUILDS 391–400</text:p>
          </table:table-cell>
          <table:covered-table-cell table:number-columns-repeated="17"/>
        </table:table-row>
        <table:table-row table:style-name="ro5">
          <table:table-cell table:style-name="ce53" office:value-type="string" ns42:value-type="string" table:number-columns-spanned="5" table:number-rows-spanned="1">
            <text:p>FEE EVIDENCE COMPLETE</text:p>
          </table:table-cell>
          <table:covered-table-cell table:number-columns-repeated="4"/>
          <table:table-cell table:style-name="ce53" office:value-type="string" ns42:value-type="string" table:number-columns-spanned="4" table:number-rows-spanned="1">
            <text:p>REVENUE VERIFIED</text:p>
          </table:table-cell>
          <table:covered-table-cell table:number-columns-repeated="3"/>
          <table:table-cell table:style-name="ce53" office:value-type="string" ns42:value-type="string" table:number-columns-spanned="5" table:number-rows-spanned="1">
            <text:p>AUTHORITATIVE MARKETPLACE FEE</text:p>
          </table:table-cell>
          <table:covered-table-cell table:number-columns-repeated="4"/>
          <table:table-cell table:style-name="ce53" office:value-type="string" ns42:value-type="string" table:number-columns-spanned="4" table:number-rows-spanned="1">
            <text:p>FEE RESULT</text:p>
          </table:table-cell>
          <table:covered-table-cell table:number-columns-repeated="3"/>
        </table:table-row>
        <table:table-row table:style-name="ro21">
          <table:table-cell table:style-name="ce54" table:formula="of:=[.P920]" office:value-type="string" office:string-value="YES" ns42:value-type="string" table:number-columns-spanned="5" table:number-rows-spanned="1">
            <text:p>YES</text:p>
          </table:table-cell>
          <table:covered-table-cell table:number-columns-repeated="4"/>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23]))=&quot;YES&quot;;UPPER(TRIM([.F923]))=&quot;YES&quot;);[.K918];&quot;0.00&quot;)" office:value-type="string" office:string-value="13.26" ns42:value-type="string" table:number-columns-spanned="5" table:number-rows-spanned="1">
            <text:p>13.26</text:p>
          </table:table-cell>
          <table:covered-table-cell table:number-columns-repeated="4"/>
          <table:table-cell table:style-name="ce54" table:formula="of:=IF(AND(UPPER(TRIM([.A923]))=&quot;YES&quot;;UPPER(TRIM([.F923]))=&quot;YES&quot;);&quot;FEE VERIFIED&quot;;&quot;FEE NOT VERIFIED&quot;)" office:value-type="string" office:string-value="FEE VERIFIED" ns42:value-type="string" table:number-columns-spanned="4" table:number-rows-spanned="1">
            <text:p>FEE VERIFIED</text:p>
          </table:table-cell>
          <table:covered-table-cell table:number-columns-repeated="3"/>
        </table:table-row>
        <table:table-row table:style-name="ro5">
          <table:table-cell table:style-name="ce52" office:value-type="string" ns42:value-type="string" table:number-columns-spanned="18" table:number-rows-spanned="1">
            <text:p>📦 SHIPPING + PACKAGING COST EVIDENCE · BUILDS 401–420</text:p>
          </table:table-cell>
          <table:covered-table-cell table:number-columns-repeated="17"/>
        </table:table-row>
        <table:table-row table:style-name="ro5">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4" table:number-rows-spanned="1">
            <text:p>SHIPPING COST RECEIVED</text:p>
          </table:table-cell>
          <table:covered-table-cell table:number-columns-repeated="3"/>
          <table:table-cell table:style-name="ce53" office:value-type="string" ns42:value-type="string" table:number-columns-spanned="4" table:number-rows-spanned="1">
            <text:p>SHIPPING COST</text:p>
          </table:table-cell>
          <table:covered-table-cell table:number-columns-repeated="3"/>
          <table:table-cell table:style-name="ce53" office:value-type="string" ns42:value-type="string" table:number-columns-spanned="4" table:number-rows-spanned="1">
            <text:p>PACKAGING COST RECEIVED</text:p>
          </table:table-cell>
          <table:covered-table-cell table:number-columns-repeated="3"/>
          <table:table-cell table:style-name="ce53" office:value-type="string" ns42:value-type="string" table:number-columns-spanned="3" table:number-rows-spanned="1">
            <text:p>PACKAGING COST</text:p>
          </table:table-cell>
          <table:covered-table-cell table:number-columns-repeated="2"/>
        </table:table-row>
        <table:table-row table:style-name="ro5">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25</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3" table:number-rows-spanned="1">
            <text:p>0.75</text:p>
          </table:table-cell>
          <table:covered-table-cell table:number-columns-repeated="2"/>
        </table:table-row>
        <table:table-row table:style-name="ro5">
          <table:table-cell table:style-name="ce53" office:value-type="string" ns42:value-type="string" table:number-columns-spanned="3" table:number-rows-spanned="1">
            <text:p>SALE MATCH</text:p>
          </table:table-cell>
          <table:covered-table-cell table:number-columns-repeated="2"/>
          <table:table-cell table:style-name="ce53" office:value-type="string" ns42:value-type="string" table:number-columns-spanned="3" table:number-rows-spanned="1">
            <text:p>SHIPPING RECEIVED VALID</text:p>
          </table:table-cell>
          <table:covered-table-cell table:number-columns-repeated="2"/>
          <table:table-cell table:style-name="ce53" office:value-type="string" ns42:value-type="string" table:number-columns-spanned="3" table:number-rows-spanned="1">
            <text:p>SHIPPING AMOUNT VALID</text:p>
          </table:table-cell>
          <table:covered-table-cell table:number-columns-repeated="2"/>
          <table:table-cell table:style-name="ce53" office:value-type="string" ns42:value-type="string" table:number-columns-spanned="3" table:number-rows-spanned="1">
            <text:p>PACKAGING RECEIVED VALID</text:p>
          </table:table-cell>
          <table:covered-table-cell table:number-columns-repeated="2"/>
          <table:table-cell table:style-name="ce53" office:value-type="string" ns42:value-type="string" table:number-columns-spanned="3" table:number-rows-spanned="1">
            <text:p>PACKAGING AMOUNT VALID</text:p>
          </table:table-cell>
          <table:covered-table-cell table:number-columns-repeated="2"/>
          <table:table-cell table:style-name="ce53" office:value-type="string" ns42:value-type="string" table:number-columns-spanned="3" table:number-rows-spanned="1">
            <text:p>COST EVIDENCE COMPLETE</text:p>
          </table:table-cell>
          <table:covered-table-cell table:number-columns-repeated="2"/>
        </table:table-row>
        <table:table-row table:style-name="ro21">
          <table:table-cell table:style-name="ce54" table:formula="of:=IF(UPPER(TRIM([.A926]))=UPPER(TRIM([.A910]));&quot;YES&quot;;&quot;NO&quot;)" office:value-type="string" office:string-value="YES" ns42:value-type="string" table:number-columns-spanned="3" table:number-rows-spanned="1">
            <text:p>YES</text:p>
          </table:table-cell>
          <table:covered-table-cell table:number-columns-repeated="2"/>
          <table:table-cell table:style-name="ce54" table:formula="of:=IF(UPPER(TRIM([.D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H926])&gt;=0;&quot;YES&quot;;&quot;NO&quot;)" office:value-type="string" office:string-value="YES" ns42:value-type="string" table:number-columns-spanned="3" table:number-rows-spanned="1">
            <text:p>YES</text:p>
          </table:table-cell>
          <table:covered-table-cell table:number-columns-repeated="2"/>
          <table:table-cell table:style-name="ce54" table:formula="of:=IF(UPPER(TRIM([.L92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P92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28]))=&quot;YES&quot;;UPPER(TRIM([.D928]))=&quot;YES&quot;;UPPER(TRIM([.G928]))=&quot;YES&quot;;UPPER(TRIM([.J928]))=&quot;YES&quot;;UPPER(TRIM([.M92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SALE COST EVIDENCE GATE · BUILD 420</text:p>
          </table:table-cell>
          <table:covered-table-cell table:number-columns-repeated="17"/>
        </table:table-row>
        <table:table-row table:style-name="ro5">
          <table:table-cell table:style-name="ce53" office:value-type="string" ns42:value-type="string" table:number-columns-spanned="4" table:number-rows-spanned="1">
            <text:p>COST EVIDENCE COMPLETE</text:p>
          </table:table-cell>
          <table:covered-table-cell table:number-columns-repeated="3"/>
          <table:table-cell table:style-name="ce53" office:value-type="string" ns42:value-type="string" table:number-columns-spanned="4" table:number-rows-spanned="1">
            <text:p>AUTHORITATIVE SHIPPING COST</text:p>
          </table:table-cell>
          <table:covered-table-cell table:number-columns-repeated="3"/>
          <table:table-cell table:style-name="ce53" office:value-type="string" ns42:value-type="string" table:number-columns-spanned="4" table:number-rows-spanned="1">
            <text:p>AUTHORITATIVE PACKAGING COST</text:p>
          </table:table-cell>
          <table:covered-table-cell table:number-columns-repeated="3"/>
          <table:table-cell table:style-name="ce53" office:value-type="string" ns42:value-type="string" table:number-columns-spanned="3" table:number-rows-spanned="1">
            <text:p>TOTAL FULFILLMENT COST</text:p>
          </table:table-cell>
          <table:covered-table-cell table:number-columns-repeated="2"/>
          <table:table-cell table:style-name="ce53" office:value-type="string" ns42:value-type="string" table:number-columns-spanned="3" table:number-rows-spanned="1">
            <text:p>COST RESULT</text:p>
          </table:table-cell>
          <table:covered-table-cell table:number-columns-repeated="2"/>
        </table:table-row>
        <table:table-row table:style-name="ro21">
          <table:table-cell table:style-name="ce54" table:formula="of:=[.P928]" office:value-type="string" office:string-value="YES" ns42:value-type="string" table:number-columns-spanned="4" table:number-rows-spanned="1">
            <text:p>YES</text:p>
          </table:table-cell>
          <table:covered-table-cell table:number-columns-repeated="3"/>
          <table:table-cell table:style-name="ce54" table:formula="of:=IF(UPPER(TRIM([.A931]))=&quot;YES&quot;;[.H926];&quot;0.00&quot;)" office:value-type="string" office:string-value="5.25" ns42:value-type="string" table:number-columns-spanned="4" table:number-rows-spanned="1">
            <text:p>5.25</text:p>
          </table:table-cell>
          <table:covered-table-cell table:number-columns-repeated="3"/>
          <table:table-cell table:style-name="ce54" table:formula="of:=IF(UPPER(TRIM([.A931]))=&quot;YES&quot;;[.P926];&quot;0.00&quot;)" office:value-type="string" office:string-value="0.75" ns42:value-type="string" table:number-columns-spanned="4" table:number-rows-spanned="1">
            <text:p>0.75</text:p>
          </table:table-cell>
          <table:covered-table-cell table:number-columns-repeated="3"/>
          <table:table-cell table:style-name="ce54" table:formula="of:=IF(UPPER(TRIM([.A931]))=&quot;YES&quot;;VALUE([.E931])+VALUE([.I931]);&quot;0.00&quot;)" office:value-type="string" office:string-value="6.00" ns42:value-type="string" table:number-columns-spanned="3" table:number-rows-spanned="1">
            <text:p>6.00</text:p>
          </table:table-cell>
          <table:covered-table-cell table:number-columns-repeated="2"/>
          <table:table-cell table:style-name="ce54" table:formula="of:=IF(UPPER(TRIM([.A931]))=&quot;YES&quot;;&quot;COST VERIFIED&quot;;&quot;COST NOT VERIFIED&quot;)" office:value-type="string" office:string-value="COST VERIFIED" ns42:value-type="string" table:number-columns-spanned="3" table:number-rows-spanned="1">
            <text:p>COST VERIFIED</text:p>
          </table:table-cell>
          <table:covered-table-cell table:number-columns-repeated="2"/>
        </table:table-row>
        <table:table-row table:style-name="ro5">
          <table:table-cell table:style-name="ce54" office:value-type="string" ns42:value-type="string" table:number-columns-spanned="18" table:number-rows-spanned="1">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number-columns-repeated="17"/>
        </table:table-row>
        <table:table-row table:style-name="ro5">
          <table:table-cell table:style-name="ce52" office:value-type="string" ns42:value-type="string" table:number-columns-spanned="18" table:number-rows-spanned="1">
            <text:p>📦 INVENTORY COST BASIS EVIDENCE · BUILDS 421–4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4" table:number-rows-spanned="1">
            <text:p>SOLD STATE VALID</text:p>
          </table:table-cell>
          <table:covered-table-cell table:number-columns-repeated="3"/>
          <table:table-cell table:style-name="ce53" office:value-type="string" ns42:value-type="string" table:number-columns-spanned="4" table:number-rows-spanned="1">
            <text:p>COST BASIS RECEIVED</text:p>
          </table:table-cell>
          <table:covered-table-cell table:number-columns-repeated="3"/>
          <table:table-cell table:style-name="ce53" office:value-type="string" ns42:value-type="string" table:number-columns-spanned="4" table:number-rows-spanned="1">
            <text:p>UNIT COST BASIS</text:p>
          </table:table-cell>
          <table:covered-table-cell table:number-columns-repeated="3"/>
          <table:table-cell table:style-name="ce53" office:value-type="string" ns42:value-type="string" table:number-columns-spanned="3" table:number-rows-spanned="1">
            <text:p>QUANTITY SOLD</text:p>
          </table:table-cell>
          <table:covered-table-cell table:number-columns-repeated="2"/>
        </table:table-row>
        <table:table-row table:style-name="ro5">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YES</text:p>
          </table:table-cell>
          <table:covered-table-cell table:number-columns-repeated="3"/>
          <table:table-cell table:style-name="ce54" office:value-type="string" ns42:value-type="string" table:number-columns-spanned="4" table:number-rows-spanned="1">
            <text:p>50.00</text:p>
          </table:table-cell>
          <table:covered-table-cell table:number-columns-repeated="3"/>
          <table:table-cell table:style-name="ce54" office:value-type="string" ns42:value-type="string" table:number-columns-spanned="3" table:number-rows-spanned="1">
            <text:p>1</text:p>
          </table:table-cell>
          <table:covered-table-cell table:number-columns-repeated="2"/>
        </table:table-row>
        <table:table-row table:style-name="ro5">
          <table:table-cell table:style-name="ce53" office:value-type="string" ns42:value-type="string" table:number-columns-spanned="3" table:number-rows-spanned="1">
            <text:p>RECORD MATCH</text:p>
          </table:table-cell>
          <table:covered-table-cell table:number-columns-repeated="2"/>
          <table:table-cell table:style-name="ce53" office:value-type="string" ns42:value-type="string" table:number-columns-spanned="3" table:number-rows-spanned="1">
            <text:p>SOLD STATE VALID</text:p>
          </table:table-cell>
          <table:covered-table-cell table:number-columns-repeated="2"/>
          <table:table-cell table:style-name="ce53" office:value-type="string" ns42:value-type="string" table:number-columns-spanned="3" table:number-rows-spanned="1">
            <text:p>COST BASIS RECEIVED VALID</text:p>
          </table:table-cell>
          <table:covered-table-cell table:number-columns-repeated="2"/>
          <table:table-cell table:style-name="ce53" office:value-type="string" ns42:value-type="string" table:number-columns-spanned="3" table:number-rows-spanned="1">
            <text:p>UNIT COST VALID</text:p>
          </table:table-cell>
          <table:covered-table-cell table:number-columns-repeated="2"/>
          <table:table-cell table:style-name="ce53" office:value-type="string" ns42:value-type="string" table:number-columns-spanned="3" table:number-rows-spanned="1">
            <text:p>QUANTITY MATCH</text:p>
          </table:table-cell>
          <table:covered-table-cell table:number-columns-repeated="2"/>
          <table:table-cell table:style-name="ce53" office:value-type="string" ns42:value-type="string" table:number-columns-spanned="3" table:number-rows-spanned="1">
            <text:p>COST BASIS EVIDENCE COMPLETE</text:p>
          </table:table-cell>
          <table:covered-table-cell table:number-columns-repeated="2"/>
        </table:table-row>
        <table:table-row table:style-name="ro21">
          <table:table-cell table:style-name="ce54" table:formula="of:=IF(UPPER(TRIM([.A936]))=UPPER(TRIM([.D886]));&quot;YES&quot;;&quot;NO&quot;)" office:value-type="string" office:string-value="YES" ns42:value-type="string" table:number-columns-spanned="3" table:number-rows-spanned="1">
            <text:p>YES</text:p>
          </table:table-cell>
          <table:covered-table-cell table:number-columns-repeated="2"/>
          <table:table-cell table:style-name="ce54" table:formula="of:=IF(UPPER(TRIM([.D93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H936]))=&quot;YES&quot;;&quot;YES&quot;;&quot;NO&quot;)" office:value-type="string" office:string-value="YES" ns42:value-type="string" table:number-columns-spanned="3" table:number-rows-spanned="1">
            <text:p>YES</text:p>
          </table:table-cell>
          <table:covered-table-cell table:number-columns-repeated="2"/>
          <table:table-cell table:style-name="ce54" table:formula="of:=IF(VALUE([.L936])&gt;=0;&quot;YES&quot;;&quot;NO&quot;)" office:value-type="string" office:string-value="YES" ns42:value-type="string" table:number-columns-spanned="3" table:number-rows-spanned="1">
            <text:p>YES</text:p>
          </table:table-cell>
          <table:covered-table-cell table:number-columns-repeated="2"/>
          <table:table-cell table:style-name="ce54" table:formula="of:=IF(VALUE([.P936])=VALUE([.P91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38]))=&quot;YES&quot;;UPPER(TRIM([.D938]))=&quot;YES&quot;;UPPER(TRIM([.G938]))=&quot;YES&quot;;UPPER(TRIM([.J938]))=&quot;YES&quot;;UPPER(TRIM([.M938]))=&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AUTHORITATIVE COST BASIS CROSS-CHECK · BUILDS 431–440</text:p>
          </table:table-cell>
          <table:covered-table-cell table:number-columns-repeated="17"/>
        </table:table-row>
        <table:table-row table:style-name="ro5">
          <table:table-cell table:style-name="ce53" office:value-type="string" ns42:value-type="string" table:number-columns-spanned="5" table:number-rows-spanned="1">
            <text:p>COST BASIS EVIDENCE COMPLETE</text:p>
          </table:table-cell>
          <table:covered-table-cell table:number-columns-repeated="4"/>
          <table:table-cell table:style-name="ce53" office:value-type="string" ns42:value-type="string" table:number-columns-spanned="4" table:number-rows-spanned="1">
            <text:p>RECORD IDENTITY VALID</text:p>
          </table:table-cell>
          <table:covered-table-cell table:number-columns-repeated="3"/>
          <table:table-cell table:style-name="ce53" office:value-type="string" ns42:value-type="string" table:number-columns-spanned="5" table:number-rows-spanned="1">
            <text:p>AUTHORITATIVE TOTAL COST BASIS</text:p>
          </table:table-cell>
          <table:covered-table-cell table:number-columns-repeated="4"/>
          <table:table-cell table:style-name="ce53" office:value-type="string" ns42:value-type="string" table:number-columns-spanned="4" table:number-rows-spanned="1">
            <text:p>COST BASIS RESULT</text:p>
          </table:table-cell>
          <table:covered-table-cell table:number-columns-repeated="3"/>
        </table:table-row>
        <table:table-row table:style-name="ro21">
          <table:table-cell table:style-name="ce54" table:formula="of:=[.P938]" office:value-type="string" office:string-value="YES" ns42:value-type="string" table:number-columns-spanned="5" table:number-rows-spanned="1">
            <text:p>YES</text:p>
          </table:table-cell>
          <table:covered-table-cell table:number-columns-repeated="4"/>
          <table:table-cell table:style-name="ce54" table:formula="of:=IF(UPPER(TRIM([.A938]))=&quot;YES&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1]))=&quot;YES&quot;;UPPER(TRIM([.F941]))=&quot;YES&quot;);VALUE([.L936])*VALUE([.P936]);&quot;0.00&quot;)" office:value-type="string" office:string-value="50.00" ns42:value-type="string" table:number-columns-spanned="5" table:number-rows-spanned="1">
            <text:p>50.00</text:p>
          </table:table-cell>
          <table:covered-table-cell table:number-columns-repeated="4"/>
          <table:table-cell table:style-name="ce54" table:formula="of:=IF(VALUE([.J941])&gt;=0;&quot;COST BASIS VERIFIED&quot;;&quot;COST BASIS NOT VERIFIED&quot;)" office:value-type="string" office:string-value="COST BASIS VERIFIED" ns42:value-type="string" table:number-columns-spanned="4" table:number-rows-spanned="1">
            <text:p>COST BASIS VERIFIED</text:p>
          </table:table-cell>
          <table:covered-table-cell table:number-columns-repeated="3"/>
        </table:table-row>
        <table:table-row table:style-name="ro5">
          <table:table-cell table:style-name="ce52" office:value-type="string" ns42:value-type="string" table:number-columns-spanned="18" table:number-rows-spanned="1">
            <text:p>💰 NET PROFIT DERIVATION · BUILDS 441–460</text:p>
          </table:table-cell>
          <table:covered-table-cell table:number-columns-repeated="17"/>
        </table:table-row>
        <table:table-row table:style-name="ro5">
          <table:table-cell table:style-name="ce53" office:value-type="string" ns42:value-type="string" table:number-columns-spanned="5" table:number-rows-spanned="1">
            <text:p>AUTHORITATIVE GROSS REVENUE</text:p>
          </table:table-cell>
          <table:covered-table-cell table:number-columns-repeated="4"/>
          <table:table-cell table:style-name="ce53" office:value-type="string" ns42:value-type="string" table:number-columns-spanned="4" table:number-rows-spanned="1">
            <text:p>AUTHORITATIVE MARKETPLACE FEE</text:p>
          </table:table-cell>
          <table:covered-table-cell table:number-columns-repeated="3"/>
          <table:table-cell table:style-name="ce53" office:value-type="string" ns42:value-type="string" table:number-columns-spanned="5" table:number-rows-spanned="1">
            <text:p>TOTAL FULFILLMENT COST</text:p>
          </table:table-cell>
          <table:covered-table-cell table:number-columns-repeated="4"/>
          <table:table-cell table:style-name="ce53" office:value-type="string" ns42:value-type="string" table:number-columns-spanned="4" table:number-rows-spanned="1">
            <text:p>AUTHORITATIVE TOTAL COST BASIS</text:p>
          </table:table-cell>
          <table:covered-table-cell table:number-columns-repeated="3"/>
        </table:table-row>
        <table:table-row table:style-name="ro21">
          <table:table-cell table:style-name="ce54" table:formula="of:=[.J915]" office:value-type="string" office:string-value="102.00" ns42:value-type="string" table:number-columns-spanned="5" table:number-rows-spanned="1">
            <text:p>102.00</text:p>
          </table:table-cell>
          <table:covered-table-cell table:number-columns-repeated="4"/>
          <table:table-cell table:style-name="ce54" table:formula="of:=[.J923]" office:value-type="string" office:string-value="13.26" ns42:value-type="string" table:number-columns-spanned="4" table:number-rows-spanned="1">
            <text:p>13.26</text:p>
          </table:table-cell>
          <table:covered-table-cell table:number-columns-repeated="3"/>
          <table:table-cell table:style-name="ce54" table:formula="of:=[.M931]" office:value-type="string" office:string-value="6.00" ns42:value-type="string" table:number-columns-spanned="5" table:number-rows-spanned="1">
            <text:p>6.00</text:p>
          </table:table-cell>
          <table:covered-table-cell table:number-columns-repeated="4"/>
          <table:table-cell table:style-name="ce54" table:formula="of:=[.J941]" office:value-type="string" office:string-value="50.00" ns42:value-type="string" table:number-columns-spanned="4" table:number-rows-spanned="1">
            <text:p>50.00</text:p>
          </table:table-cell>
          <table:covered-table-cell table:number-columns-repeated="3"/>
        </table:table-row>
        <table:table-row table:style-name="ro5">
          <table:table-cell table:style-name="ce53" office:value-type="string" ns42:value-type="string" table:number-columns-spanned="4" table:number-rows-spanned="1">
            <text:p>REVENUE VALID</text:p>
          </table:table-cell>
          <table:covered-table-cell table:number-columns-repeated="3"/>
          <table:table-cell table:style-name="ce53" office:value-type="string" ns42:value-type="string" table:number-columns-spanned="3" table:number-rows-spanned="1">
            <text:p>FEE VALID</text:p>
          </table:table-cell>
          <table:covered-table-cell table:number-columns-repeated="2"/>
          <table:table-cell table:style-name="ce53" office:value-type="string" ns42:value-type="string" table:number-columns-spanned="4" table:number-rows-spanned="1">
            <text:p>FULFILLMENT COST VALID</text:p>
          </table:table-cell>
          <table:covered-table-cell table:number-columns-repeated="3"/>
          <table:table-cell table:style-name="ce53" office:value-type="string" ns42:value-type="string" table:number-columns-spanned="4" table:number-rows-spanned="1">
            <text:p>COST BASIS VALID</text:p>
          </table:table-cell>
          <table:covered-table-cell table:number-columns-repeated="3"/>
          <table:table-cell table:style-name="ce53" office:value-type="string" ns42:value-type="string" table:number-columns-spanned="3" table:number-rows-spanned="1">
            <text:p>NET PROFIT</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O941]))=&quot;COST BASIS 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46]))=&quot;YES&quot;;UPPER(TRIM([.E946]))=&quot;YES&quot;;UPPER(TRIM([.H946]))=&quot;YES&quot;;UPPER(TRIM([.L946]))=&quot;YES&quot;);VALUE([.A944])-VALUE([.F944])-VALUE([.J944])-VALUE([.O944]);&quot;0.00&quot;)" office:value-type="string" office:string-value="32.74" ns42:value-type="string" table:number-columns-spanned="3" table:number-rows-spanned="1">
            <text:p>32.74</text:p>
          </table:table-cell>
          <table:covered-table-cell table:number-columns-repeated="2"/>
        </table:table-row>
        <table:table-row table:style-name="ro5">
          <table:table-cell table:style-name="ce52" office:value-type="string" ns42:value-type="string" table:number-columns-spanned="18" table:number-rows-spanned="1">
            <text:p>📈 NET PROFIT RESULT · BUILDS 451–460</text:p>
          </table:table-cell>
          <table:covered-table-cell table:number-columns-repeated="17"/>
        </table:table-row>
        <table:table-row table:style-name="ro5">
          <table:table-cell table:style-name="ce53" office:value-type="string" ns42:value-type="string" table:number-columns-spanned="6" table:number-rows-spanned="1">
            <text:p>NET PROFIT</text:p>
          </table:table-cell>
          <table:covered-table-cell table:number-columns-repeated="5"/>
          <table:table-cell table:style-name="ce53" office:value-type="string" ns42:value-type="string" table:number-columns-spanned="6" table:number-rows-spanned="1">
            <text:p>PROFIT STATUS</text:p>
          </table:table-cell>
          <table:covered-table-cell table:number-columns-repeated="5"/>
          <table:table-cell table:style-name="ce53" office:value-type="string" ns42:value-type="string" table:number-columns-spanned="6" table:number-rows-spanned="1">
            <text:p>FINANCIAL COMPONENTS COMPLETE</text:p>
          </table:table-cell>
          <table:covered-table-cell table:number-columns-repeated="5"/>
        </table:table-row>
        <table:table-row table:style-name="ro21">
          <table:table-cell table:style-name="ce54" table:formula="of:=[.P946]" office:value-type="string" office:string-value="32.74" ns42:value-type="string" table:number-columns-spanned="6" table:number-rows-spanned="1">
            <text:p>32.74</text:p>
          </table:table-cell>
          <table:covered-table-cell table:number-columns-repeated="5"/>
          <table:table-cell table:style-name="ce54" table:formula="of:=IF(VALUE([.A949])&gt;0;&quot;PROFIT&quot;;IF(VALUE([.A949])&lt;0;&quot;LOSS&quot;;&quot;BREAK EVEN&quot;))" office:value-type="string" office:string-value="PROFIT" ns42:value-type="string" table:number-columns-spanned="6" table:number-rows-spanned="1">
            <text:p>PROFIT</text:p>
          </table:table-cell>
          <table:covered-table-cell table:number-columns-repeated="5"/>
          <table:table-cell table:style-name="ce54" table:formula="of:=IF(AND(UPPER(TRIM([.A946]))=&quot;YES&quot;;UPPER(TRIM([.E946]))=&quot;YES&quot;;UPPER(TRIM([.H946]))=&quot;YES&quot;;UPPER(TRIM([.L946]))=&quot;YES&quot;);&quot;YES&quot;;&quot;NO&quot;)" office:value-type="string" office:string-value="YES" ns42:value-type="string" table:number-columns-spanned="6" table:number-rows-spanned="1">
            <text:p>YES</text:p>
          </table:table-cell>
          <table:covered-table-cell table:number-columns-repeated="5"/>
        </table:table-row>
        <table:table-row table:style-name="ro5">
          <table:table-cell table:style-name="ce52" office:value-type="string" ns42:value-type="string" table:number-columns-spanned="18" table:number-rows-spanned="1">
            <text:p>🔍 FINANCIAL TRUTH CROSS-CHECK · BUILDS 461–479</text:p>
          </table:table-cell>
          <table:covered-table-cell table:number-columns-repeated="17"/>
        </table:table-row>
        <table:table-row table:style-name="ro5">
          <table:table-cell table:style-name="ce53" office:value-type="string" ns42:value-type="string" table:number-columns-spanned="3" table:number-rows-spanned="1">
            <text:p>REVENUE VERIFIED</text:p>
          </table:table-cell>
          <table:covered-table-cell table:number-columns-repeated="2"/>
          <table:table-cell table:style-name="ce53" office:value-type="string" ns42:value-type="string" table:number-columns-spanned="3" table:number-rows-spanned="1">
            <text:p>FEE VERIFIED</text:p>
          </table:table-cell>
          <table:covered-table-cell table:number-columns-repeated="2"/>
          <table:table-cell table:style-name="ce53" office:value-type="string" ns42:value-type="string" table:number-columns-spanned="3" table:number-rows-spanned="1">
            <text:p>COST VERIFIED</text:p>
          </table:table-cell>
          <table:covered-table-cell table:number-columns-repeated="2"/>
          <table:table-cell table:style-name="ce53" office:value-type="string" ns42:value-type="string" table:number-columns-spanned="3" table:number-rows-spanned="1">
            <text:p>COST BASIS VERIFIED</text:p>
          </table:table-cell>
          <table:covered-table-cell table:number-columns-repeated="2"/>
          <table:table-cell table:style-name="ce53" office:value-type="string" ns42:value-type="string" table:number-columns-spanned="3" table:number-rows-spanned="1">
            <text:p>COMPONENTS COMPLETE</text:p>
          </table:table-cell>
          <table:covered-table-cell table:number-columns-repeated="2"/>
          <table:table-cell table:style-name="ce53" office:value-type="string" ns42:value-type="string" table:number-columns-spanned="3" table:number-rows-spanned="1">
            <text:p>FINANCIAL TRUTH</text:p>
          </table:table-cell>
          <table:covered-table-cell table:number-columns-repeated="2"/>
        </table:table-row>
        <table:table-row table:style-name="ro21">
          <table:table-cell table:style-name="ce54" table:formula="of:=IF(UPPER(TRIM([.O915]))=&quot;REVENU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23]))=&quot;FEE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O941]))=&quot;COST BASIS VERIFIED&quot;;&quot;YES&quot;;&quot;NO&quot;)" office:value-type="string" office:string-value="YES" ns42:value-type="string" table:number-columns-spanned="3" table:number-rows-spanned="1">
            <text:p>YES</text:p>
          </table:table-cell>
          <table:covered-table-cell table:number-columns-repeated="2"/>
          <table:table-cell table:style-name="ce54" table:formula="of:=[.M949]" office:value-type="string" office:string-value="YES" ns42:value-type="string" table:number-columns-spanned="3" table:number-rows-spanned="1">
            <text:p>YES</text:p>
          </table:table-cell>
          <table:covered-table-cell table:number-columns-repeated="2"/>
          <table:table-cell table:style-name="ce54" table:formula="of:=IF(AND(UPPER(TRIM([.A952]))=&quot;YES&quot;;UPPER(TRIM([.D952]))=&quot;YES&quot;;UPPER(TRIM([.G952]))=&quot;YES&quot;;UPPER(TRIM([.J952]))=&quot;YES&quot;;UPPER(TRIM([.M952]))=&quot;YES&quot;);&quot;VERIFIED&quot;;&quot;NOT VERIFI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CONTROLLED FINANCIAL TRUTH CROSS-CHECK GATE · BUILD 480</text:p>
          </table:table-cell>
          <table:covered-table-cell table:number-columns-repeated="17"/>
        </table:table-row>
        <table:table-row table:style-name="ro5">
          <table:table-cell table:style-name="ce53" office:value-type="string" ns42:value-type="string" table:number-columns-spanned="4" table:number-rows-spanned="1">
            <text:p>AUTHORITATIVE GROSS REVENUE</text:p>
          </table:table-cell>
          <table:covered-table-cell table:number-columns-repeated="3"/>
          <table:table-cell table:style-name="ce53" office:value-type="string" ns42:value-type="string" table:number-columns-spanned="4" table:number-rows-spanned="1">
            <text:p>TOTAL DEDUCTIONS</text:p>
          </table:table-cell>
          <table:covered-table-cell table:number-columns-repeated="3"/>
          <table:table-cell table:style-name="ce53" office:value-type="string" ns42:value-type="string" table:number-columns-spanned="4" table:number-rows-spanned="1">
            <text:p>NET PROFIT</text:p>
          </table:table-cell>
          <table:covered-table-cell table:number-columns-repeated="3"/>
          <table:table-cell table:style-name="ce53" office:value-type="string" ns42:value-type="string" table:number-columns-spanned="3" table:number-rows-spanned="1">
            <text:p>PROFIT STATUS</text:p>
          </table:table-cell>
          <table:covered-table-cell table:number-columns-repeated="2"/>
          <table:table-cell table:style-name="ce53" office:value-type="string" ns42:value-type="string" table:number-columns-spanned="3" table:number-rows-spanned="1">
            <text:p>FINANCIAL TRUTH RESULT</text:p>
          </table:table-cell>
          <table:covered-table-cell table:number-columns-repeated="2"/>
        </table:table-row>
        <table:table-row table:style-name="ro21">
          <table:table-cell table:style-name="ce54" table:formula="of:=[.A944]" office:value-type="string" office:string-value="102.00" ns42:value-type="string" table:number-columns-spanned="4" table:number-rows-spanned="1">
            <text:p>102.00</text:p>
          </table:table-cell>
          <table:covered-table-cell table:number-columns-repeated="3"/>
          <table:table-cell table:style-name="ce54" table:formula="of:=VALUE([.F944])+VALUE([.J944])+VALUE([.O944])" office:value-type="string" office:string-value="69.26" ns42:value-type="string" table:number-columns-spanned="4" table:number-rows-spanned="1">
            <text:p>69.26</text:p>
          </table:table-cell>
          <table:covered-table-cell table:number-columns-repeated="3"/>
          <table:table-cell table:style-name="ce54" table:formula="of:=[.A949]" office:value-type="string" office:string-value="32.74" ns42:value-type="string" table:number-columns-spanned="4" table:number-rows-spanned="1">
            <text:p>32.74</text:p>
          </table:table-cell>
          <table:covered-table-cell table:number-columns-repeated="3"/>
          <table:table-cell table:style-name="ce54" table:formula="of:=[.G949]" office:value-type="string" office:string-value="PROFIT" ns42:value-type="string" table:number-columns-spanned="3" table:number-rows-spanned="1">
            <text:p>PROFIT</text:p>
          </table:table-cell>
          <table:covered-table-cell table:number-columns-repeated="2"/>
          <table:table-cell table:style-name="ce54" table:formula="of:=IF(UPPER(TRIM([.P952]))=&quot;VERIFIED&quot;;&quot;FINANCIAL TRUTH VERIFIED&quot;;&quot;FINANCIAL TRUTH NOT VERIFIED&quot;)" office:value-type="string" office:string-value="FINANCIAL TRUTH VERIFIED" ns42:value-type="string" table:number-columns-spanned="3" table:number-rows-spanned="1">
            <text:p>FINANCIAL TRUTH VERIFIED</text:p>
          </table:table-cell>
          <table:covered-table-cell table:number-columns-repeated="2"/>
        </table:table-row>
        <table:table-row table:style-name="ro5">
          <table:table-cell table:style-name="ce54" office:value-type="string" ns42:value-type="string" table:number-columns-spanned="18" table:number-rows-spanned="1">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number-columns-repeated="17"/>
        </table:table-row>
        <table:table-row table:style-name="ro5">
          <table:table-cell table:style-name="ce52" office:value-type="string" ns42:value-type="string" table:number-columns-spanned="18" table:number-rows-spanned="1">
            <text:p>💵 MARKETPLACE SETTLEMENT EVIDENCE INTAKE · BUILDS 481–500</text:p>
          </table:table-cell>
          <table:covered-table-cell table:number-columns-repeated="17"/>
        </table:table-row>
        <table:table-row table:style-name="ro5">
          <table:table-cell table:style-name="ce53" office:value-type="string" ns42:value-type="string" table:number-columns-spanned="6" table:number-rows-spanned="1">
            <text:p>SETTLEMENT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FINANCIAL TRUTH BECOME VERIFIED CASH SETTLEMENT?</text:p>
          </table:table-cell>
          <table:covered-table-cell table:number-columns-repeated="5"/>
          <table:table-cell table:style-name="ce54" office:value-type="string" ns42:value-type="string" table:number-columns-spanned="6" table:number-rows-spanned="1">
            <text:p>SETTLEMENT EVIDENCE + SALE IDENTITY + PLATFORM + PAYOUT + TIME</text:p>
          </table:table-cell>
          <table:covered-table-cell table:number-columns-repeated="5"/>
          <table:table-cell table:style-name="ce54" office:value-type="string" ns42:value-type="string" table:number-columns-spanned="6" table:number-rows-spanned="1">
            <text:p>DERIVED PROFIT ≠ CASH RECEIVED · SETTLEMENT CLAIM ≠ VERIFIED SETTLEMENT</text:p>
          </table:table-cell>
          <table:covered-table-cell table:number-columns-repeated="5"/>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text:p>
          </table:table-cell>
          <table:covered-table-cell table:number-columns-repeated="2"/>
          <table:table-cell table:style-name="ce53" office:value-type="string" ns42:value-type="string" table:number-columns-spanned="3" table:number-rows-spanned="1">
            <text:p>PLATFORM</text:p>
          </table:table-cell>
          <table:covered-table-cell table:number-columns-repeated="2"/>
          <table:table-cell table:style-name="ce53" office:value-type="string" ns42:value-type="string" table:number-columns-spanned="3" table:number-rows-spanned="1">
            <text:p>SETTLEMENT RECEIVED</text:p>
          </table:table-cell>
          <table:covered-table-cell table:number-columns-repeated="2"/>
          <table:table-cell table:style-name="ce53" office:value-type="string" ns42:value-type="string" table:number-columns-spanned="3" table:number-rows-spanned="1">
            <text:p>PAYOUT AMOUNT</text:p>
          </table:table-cell>
          <table:covered-table-cell table:number-columns-repeated="2"/>
          <table:table-cell table:style-name="ce53" office:value-type="string" ns42:value-type="string" table:number-columns-spanned="3" table:number-rows-spanned="1">
            <text:p>SETTLED AT</text:p>
          </table:table-cell>
          <table:covered-table-cell table:number-columns-repeated="2"/>
        </table:table-row>
        <table:table-row table:style-name="ro5">
          <table:table-cell table:style-name="ce54" office:value-type="string" ns42:value-type="string" table:number-columns-spanned="3" table:number-rows-spanned="1">
            <text:p>SET-000001</text:p>
          </table:table-cell>
          <table:covered-table-cell table:number-columns-repeated="2"/>
          <table:table-cell table:style-name="ce54" office:value-type="string" ns42:value-type="string" table:number-columns-spanned="3" table:number-rows-spanned="1">
            <text:p>SALE-000001</text:p>
          </table:table-cell>
          <table:covered-table-cell table:number-columns-repeated="2"/>
          <table:table-cell table:style-name="ce54" office:value-type="string" ns42:value-type="string" table:number-columns-spanned="3" table:number-rows-spanned="1">
            <text:p>EBAY</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88.74</text:p>
          </table:table-cell>
          <table:covered-table-cell table:number-columns-repeated="2"/>
          <table:table-cell table:style-name="ce54" office:value-type="string" ns42:value-type="string" table:number-columns-spanned="3" table:number-rows-spanned="1">
            <text:p>2026-07-08T21:00:00-04:00</text:p>
          </table:table-cell>
          <table:covered-table-cell table:number-columns-repeated="2"/>
        </table:table-row>
        <table:table-row table:style-name="ro5">
          <table:table-cell table:style-name="ce53" office:value-type="string" ns42:value-type="string" table:number-columns-spanned="3" table:number-rows-spanned="1">
            <text:p>SETTLEMENT ID PRESENT</text:p>
          </table:table-cell>
          <table:covered-table-cell table:number-columns-repeated="2"/>
          <table:table-cell table:style-name="ce53" office:value-type="string" ns42:value-type="string" table:number-columns-spanned="3" table:number-rows-spanned="1">
            <text:p>SALE ID PRESENT</text:p>
          </table:table-cell>
          <table:covered-table-cell table:number-columns-repeated="2"/>
          <table:table-cell table:style-name="ce53" office:value-type="string" ns42:value-type="string" table:number-columns-spanned="3" table:number-rows-spanned="1">
            <text:p>PLATFORM PRESENT</text:p>
          </table:table-cell>
          <table:covered-table-cell table:number-columns-repeated="2"/>
          <table:table-cell table:style-name="ce53" office:value-type="string" ns42:value-type="string" table:number-columns-spanned="3" table:number-rows-spanned="1">
            <text:p>SETTLEMENT RECEIVED VALID</text:p>
          </table:table-cell>
          <table:covered-table-cell table:number-columns-repeated="2"/>
          <table:table-cell table:style-name="ce53" office:value-type="string" ns42:value-type="string" table:number-columns-spanned="3" table:number-rows-spanned="1">
            <text:p>PAYOUT PRESENT</text:p>
          </table:table-cell>
          <table:covered-table-cell table:number-columns-repeated="2"/>
          <table:table-cell table:style-name="ce53" office:value-type="string" ns42:value-type="string" table:number-columns-spanned="3" table:number-rows-spanned="1">
            <text:p>SETTLED TIME PRESENT</text:p>
          </table:table-cell>
          <table:covered-table-cell table:number-columns-repeated="2"/>
        </table:table-row>
        <table:table-row table:style-name="ro21">
          <table:table-cell table:style-name="ce54" table:formula="of:=IF(TRIM([.A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D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G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J961]))=&quot;YES&quot;;&quot;YES&quot;;&quot;NO&quot;)" office:value-type="string" office:string-value="YES" ns42:value-type="string" table:number-columns-spanned="3" table:number-rows-spanned="1">
            <text:p>YES</text:p>
          </table:table-cell>
          <table:covered-table-cell table:number-columns-repeated="2"/>
          <table:table-cell table:style-name="ce54" table:formula="of:=IF(TRIM([.M961])&lt;&gt;&quot;&quot;;&quot;YES&quot;;&quot;NO&quot;)" office:value-type="string" office:string-value="YES" ns42:value-type="string" table:number-columns-spanned="3" table:number-rows-spanned="1">
            <text:p>YES</text:p>
          </table:table-cell>
          <table:covered-table-cell table:number-columns-repeated="2"/>
          <table:table-cell table:style-name="ce54" table:formula="of:=IF(TRIM([.P961])&lt;&gt;&quot;&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SALE + PLATFORM IDENTITY MATCH · BUILDS 501–520</text:p>
          </table:table-cell>
          <table:covered-table-cell table:number-columns-repeated="17"/>
        </table:table-row>
        <table:table-row table:style-name="ro5">
          <table:table-cell table:style-name="ce53" office:value-type="string" ns42:value-type="string" table:number-columns-spanned="4" table:number-rows-spanned="1">
            <text:p>SALE ID MATCH</text:p>
          </table:table-cell>
          <table:covered-table-cell table:number-columns-repeated="3"/>
          <table:table-cell table:style-name="ce53" office:value-type="string" ns42:value-type="string" table:number-columns-spanned="4" table:number-rows-spanned="1">
            <text:p>PLATFORM MATCH</text:p>
          </table:table-cell>
          <table:covered-table-cell table:number-columns-repeated="3"/>
          <table:table-cell table:style-name="ce53" office:value-type="string" ns42:value-type="string" table:number-columns-spanned="4" table:number-rows-spanned="1">
            <text:p>FINANCIAL TRUTH VERIFIED</text:p>
          </table:table-cell>
          <table:covered-table-cell table:number-columns-repeated="3"/>
          <table:table-cell table:style-name="ce53" office:value-type="string" ns42:value-type="string" table:number-columns-spanned="3" table:number-rows-spanned="1">
            <text:p>SETTLEMENT ID VALID</text:p>
          </table:table-cell>
          <table:covered-table-cell table:number-columns-repeated="2"/>
          <table:table-cell table:style-name="ce53" office:value-type="string" ns42:value-type="string" table:number-columns-spanned="3" table:number-rows-spanned="1">
            <text:p>IDENTITY CHAIN VALID</text:p>
          </table:table-cell>
          <table:covered-table-cell table:number-columns-repeated="2"/>
        </table:table-row>
        <table:table-row table:style-name="ro21">
          <table:table-cell table:style-name="ce54" table:formula="of:=IF(UPPER(TRIM([.D961]))=UPPER(TRIM([.D915]));&quot;YES&quot;;&quot;NO&quot;)" office:value-type="string" office:string-value="YES" ns42:value-type="string" table:number-columns-spanned="4" table:number-rows-spanned="1">
            <text:p>YES</text:p>
          </table:table-cell>
          <table:covered-table-cell table:number-columns-repeated="3"/>
          <table:table-cell table:style-name="ce54" table:formula="of:=IF(UPPER(TRIM([.G961]))=UPPER(TRIM([.A918]));&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A963]))=&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66]))=&quot;YES&quot;;UPPER(TRIM([.E966]))=&quot;YES&quot;;UPPER(TRIM([.I966]))=&quot;YES&quot;;UPPER(TRIM([.M96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PAYOUT + SETTLEMENT VALIDATION · BUILDS 521–539</text:p>
          </table:table-cell>
          <table:covered-table-cell table:number-columns-repeated="17"/>
        </table:table-row>
        <table:table-row table:style-name="ro5">
          <table:table-cell table:style-name="ce53" office:value-type="string" ns42:value-type="string" table:number-columns-spanned="4" table:number-rows-spanned="1">
            <text:p>SETTLEMENT RECEIVED VALID</text:p>
          </table:table-cell>
          <table:covered-table-cell table:number-columns-repeated="3"/>
          <table:table-cell table:style-name="ce53" office:value-type="string" ns42:value-type="string" table:number-columns-spanned="4" table:number-rows-spanned="1">
            <text:p>PAYOUT AMOUNT VALID</text:p>
          </table:table-cell>
          <table:covered-table-cell table:number-columns-repeated="3"/>
          <table:table-cell table:style-name="ce53" office:value-type="string" ns42:value-type="string" table:number-columns-spanned="4" table:number-rows-spanned="1">
            <text:p>SETTLED TIME VALID</text:p>
          </table:table-cell>
          <table:covered-table-cell table:number-columns-repeated="3"/>
          <table:table-cell table:style-name="ce53" office:value-type="string" ns42:value-type="string" table:number-columns-spanned="3" table:number-rows-spanned="1">
            <text:p>IDENTITY CHAIN VALID</text:p>
          </table:table-cell>
          <table:covered-table-cell table:number-columns-repeated="2"/>
          <table:table-cell table:style-name="ce53" office:value-type="string" ns42:value-type="string" table:number-columns-spanned="3" table:number-rows-spanned="1">
            <text:p>SETTLEMENT EVIDENCE COMPLETE</text:p>
          </table:table-cell>
          <table:covered-table-cell table:number-columns-repeated="2"/>
        </table:table-row>
        <table:table-row table:style-name="ro21">
          <table:table-cell table:style-name="ce54" table:formula="of:=[.J963]" office:value-type="string" office:string-value="YES" ns42:value-type="string" table:number-columns-spanned="4" table:number-rows-spanned="1">
            <text:p>YES</text:p>
          </table:table-cell>
          <table:covered-table-cell table:number-columns-repeated="3"/>
          <table:table-cell table:style-name="ce54" table:formula="of:=IF(VALUE([.M961])&gt;=0;&quot;YES&quot;;&quot;NO&quot;)" office:value-type="string" office:string-value="YES" ns42:value-type="string" table:number-columns-spanned="4" table:number-rows-spanned="1">
            <text:p>YES</text:p>
          </table:table-cell>
          <table:covered-table-cell table:number-columns-repeated="3"/>
          <table:table-cell table:style-name="ce54" table:formula="of:=IF(TRIM([.P961])&lt;&gt;&quot;&quot;;&quot;YES&quot;;&quot;NO&quot;)" office:value-type="string" office:string-value="YES" ns42:value-type="string" table:number-columns-spanned="4" table:number-rows-spanned="1">
            <text:p>YES</text:p>
          </table:table-cell>
          <table:covered-table-cell table:number-columns-repeated="3"/>
          <table:table-cell table:style-name="ce54" table:formula="of:=[.P966]" office:value-type="string" office:string-value="YES" ns42:value-type="string" table:number-columns-spanned="3" table:number-rows-spanned="1">
            <text:p>YES</text:p>
          </table:table-cell>
          <table:covered-table-cell table:number-columns-repeated="2"/>
          <table:table-cell table:style-name="ce54" table:formula="of:=IF(AND(UPPER(TRIM([.A969]))=&quot;YES&quot;;UPPER(TRIM([.E969]))=&quot;YES&quot;;UPPER(TRIM([.I969]))=&quot;YES&quot;;UPPER(TRIM([.M969]))=&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MARKETPLACE SETTLEMENT EVIDENCE GATE · BUILD 540</text:p>
          </table:table-cell>
          <table:covered-table-cell table:number-columns-repeated="17"/>
        </table:table-row>
        <table:table-row table:style-name="ro5">
          <table:table-cell table:style-name="ce53" office:value-type="string" ns42:value-type="string" table:number-columns-spanned="3" table:number-rows-spanned="1">
            <text:p>SETTLEMENT ID</text:p>
          </table:table-cell>
          <table:covered-table-cell table:number-columns-repeated="2"/>
          <table:table-cell table:style-name="ce53" office:value-type="string" ns42:value-type="string" table:number-columns-spanned="3" table:number-rows-spanned="1">
            <text:p>SALE IDENTITY VALID</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PAYOUT VALID</text:p>
          </table:table-cell>
          <table:covered-table-cell table:number-columns-repeated="2"/>
          <table:table-cell table:style-name="ce53" office:value-type="string" ns42:value-type="string" table:number-columns-spanned="3" table:number-rows-spanned="1">
            <text:p>SETTLEMENT TIME VALID</text:p>
          </table:table-cell>
          <table:covered-table-cell table:number-columns-repeated="2"/>
          <table:table-cell table:style-name="ce53" office:value-type="string" ns42:value-type="string" table:number-columns-spanned="3" table:number-rows-spanned="1">
            <text:p>SETTLEMENT RESULT</text:p>
          </table:table-cell>
          <table:covered-table-cell table:number-columns-repeated="2"/>
        </table:table-row>
        <table:table-row table:style-name="ro21">
          <table:table-cell table:style-name="ce54" table:formula="of:=[.A961]" office:value-type="string" office:string-value="SET-000001" ns42:value-type="string" table:number-columns-spanned="3" table:number-rows-spanned="1">
            <text:p>SET-000001</text:p>
          </table:table-cell>
          <table:covered-table-cell table:number-columns-repeated="2"/>
          <table:table-cell table:style-name="ce54" table:formula="of:=[.A966]" office:value-type="string" office:string-value="YES" ns42:value-type="string" table:number-columns-spanned="3" table:number-rows-spanned="1">
            <text:p>YES</text:p>
          </table:table-cell>
          <table:covered-table-cell table:number-columns-repeated="2"/>
          <table:table-cell table:style-name="ce54" table:formula="of:=[.E966]" office:value-type="string" office:string-value="YES" ns42:value-type="string" table:number-columns-spanned="3" table:number-rows-spanned="1">
            <text:p>YES</text:p>
          </table:table-cell>
          <table:covered-table-cell table:number-columns-repeated="2"/>
          <table:table-cell table:style-name="ce54" table:formula="of:=[.E969]" office:value-type="string" office:string-value="YES" ns42:value-type="string" table:number-columns-spanned="3" table:number-rows-spanned="1">
            <text:p>YES</text:p>
          </table:table-cell>
          <table:covered-table-cell table:number-columns-repeated="2"/>
          <table:table-cell table:style-name="ce54" table:formula="of:=[.I969]" office:value-type="string" office:string-value="YES" ns42:value-type="string" table:number-columns-spanned="3" table:number-rows-spanned="1">
            <text:p>YES</text:p>
          </table:table-cell>
          <table:covered-table-cell table:number-columns-repeated="2"/>
          <table:table-cell table:style-name="ce54" table:formula="of:=IF(AND(UPPER(TRIM([.P969]))=&quot;YES&quot;;UPPER(TRIM([.P966]))=&quot;YES&quot;);&quot;VERIFIED SETTLEMENT&quot;;&quot;SETTLEMENT NOT VERIFIED&quot;)" office:value-type="string" office:string-value="VERIFIED SETTLEMENT" ns42:value-type="string" table:number-columns-spanned="3" table:number-rows-spanned="1">
            <text:p>VERIFIED SETTLEMENT</text:p>
          </table:table-cell>
          <table:covered-table-cell table:number-columns-repeated="2"/>
        </table:table-row>
        <table:table-row table:style-name="ro5">
          <table:table-cell table:style-name="ce54" office:value-type="string" ns42:value-type="string" table:number-columns-spanned="18" table:number-rows-spanned="1">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number-columns-repeated="17"/>
        </table:table-row>
        <table:table-row table:style-name="ro5">
          <table:table-cell table:style-name="ce52" office:value-type="string" ns42:value-type="string" table:number-columns-spanned="18" table:number-rows-spanned="1">
            <text:p>🔐 CONTROLLED SETTLEMENT TRANSITION ELIGIBILITY · BUILDS 541–550</text:p>
          </table:table-cell>
          <table:covered-table-cell table:number-columns-repeated="17"/>
        </table:table-row>
        <table:table-row table:style-name="ro5">
          <table:table-cell table:style-name="ce53" office:value-type="string" ns42:value-type="string" table:number-columns-spanned="6" table:number-rows-spanned="1">
            <text:p>TRANSI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VERIFIED SETTLEMENT BECOME AUTHORITATIVE SETTLED STATE?</text:p>
          </table:table-cell>
          <table:covered-table-cell table:number-columns-repeated="5"/>
          <table:table-cell table:style-name="ce54" office:value-type="string" ns42:value-type="string" table:number-columns-spanned="6" table:number-rows-spanned="1">
            <text:p>REQUEST + AUTHORIZE + COMMIT + EXECUTE + VERIFY</text:p>
          </table:table-cell>
          <table:covered-table-cell table:number-columns-repeated="5"/>
          <table:table-cell table:style-name="ce54" office:value-type="string" ns42:value-type="string" table:number-columns-spanned="6" table:number-rows-spanned="1">
            <text:p>VERIFIED SETTLEMENT ≠ SETTLED · AUTHORITY + EXECUTION REQUIRED</text:p>
          </table:table-cell>
          <table:covered-table-cell table:number-columns-repeated="5"/>
        </table:table-row>
        <table:table-row table:style-name="ro5">
          <table:table-cell table:style-name="ce52" office:value-type="string" ns42:value-type="string" table:number-columns-spanned="18" table:number-rows-spanned="1">
            <text:p>📥 EXPLICIT SETTLED TRANSITION REQUEST · BUILDS 551–56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VERIFIED SETTLEMENT → SETTL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F979]))=&quot;VERIFIED SETTLEMENT → SETTLED&quot;;&quot;YES&quot;;&quot;NO&quot;)" office:value-type="string" office:string-value="YES" ns42:value-type="string" table:number-columns-spanned="5" table:number-rows-spanned="1">
            <text:p>YES</text:p>
          </table:table-cell>
          <table:covered-table-cell table:number-columns-repeated="4"/>
          <table:table-cell table:style-name="ce54" table:formula="of:=IF(TRIM([.N979])&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981]))=&quot;YES&quot;;UPPER(TRIM([.E981]))=&quot;YES&quot;;UPPER(TRIM([.J981]))=&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SETTLED TRANSITION AUTHORITY · BUILDS 561–57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M893]))=&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979]))=&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984]))=&quot;YES&quot;;UPPER(TRIM([.E984]))=&quot;YES&quot;;UPPER(TRIM([.I984]))=&quot;YES&quot;;UPPER(TRIM([.M984]))=&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SETTLED STATE WRITE · BUILDS 571–58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SETTLED TRANSITION</text:p>
          </table:table-cell>
          <table:covered-table-cell table:number-columns-repeated="3"/>
          <table:table-cell table:style-name="ce54" table:formula="of:=IF(UPPER(TRIM([.P984]))=&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987]))=&quot;YES&quot;;UPPER(TRIM([.N981]))=&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987]))=&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987]))=&quot;YES&quot;;&quot;SETTLED&quot;;&quot;NO STATE WRITE&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2" office:value-type="string" ns42:value-type="string" table:number-columns-spanned="18" table:number-rows-spanned="1">
            <text:p>📜 APPEND-ONLY SETTLED TRANSITION HISTORY · BUILDS 581–59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4</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VERIFIED SETTLEMENT</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591–59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987]))=&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990]))=&quot;INV-000001&quot;;UPPER(TRIM([.J990]))=&quot;SETTL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987]))=UPPER(TRIM([.J990]));&quot;YES&quot;;&quot;NO&quot;)" office:value-type="string" office:string-value="YES" ns42:value-type="string" table:number-columns-spanned="3" table:number-rows-spanned="1">
            <text:p>YES</text:p>
          </table:table-cell>
          <table:covered-table-cell table:number-columns-repeated="2"/>
          <table:table-cell table:style-name="ce54" table:formula="of:=IF(AND(UPPER(TRIM([.A993]))=&quot;YES&quot;;UPPER(TRIM([.D993]))=&quot;YES&quot;;UPPER(TRIM([.G993]))=&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993]))=&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993]))=&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SETTLED TRANSITION EXECUTION GATE · BUILD 600</text:p>
          </table:table-cell>
          <table:covered-table-cell table:number-columns-repeated="17"/>
        </table:table-row>
        <table:table-row table:style-name="ro5">
          <table:table-cell table:style-name="ce53" office:value-type="string" ns42:value-type="string" table:number-columns-spanned="3" table:number-rows-spanned="1">
            <text:p>VERIFIED SETTLEMENT</text:p>
          </table:table-cell>
          <table:covered-table-cell table:number-columns-repeated="2"/>
          <table:table-cell table:style-name="ce53" office:value-type="string" ns42:value-type="string" table:number-columns-spanned="3" table:number-rows-spanned="1">
            <text:p>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IF(UPPER(TRIM([.P972]))=&quot;VERIFIED SETTLEMENT&quot;;&quot;YES&quot;;&quot;NO&quot;)" office:value-type="string" office:string-value="YES" ns42:value-type="string" table:number-columns-spanned="3" table:number-rows-spanned="1">
            <text:p>YES</text:p>
          </table:table-cell>
          <table:covered-table-cell table:number-columns-repeated="2"/>
          <table:table-cell table:style-name="ce54" table:formula="of:=[.A981]" office:value-type="string" office:string-value="YES" ns42:value-type="string" table:number-columns-spanned="3" table:number-rows-spanned="1">
            <text:p>YES</text:p>
          </table:table-cell>
          <table:covered-table-cell table:number-columns-repeated="2"/>
          <table:table-cell table:style-name="ce54" table:formula="of:=[.E981]" office:value-type="string" office:string-value="YES" ns42:value-type="string" table:number-columns-spanned="3" table:number-rows-spanned="1">
            <text:p>YES</text:p>
          </table:table-cell>
          <table:covered-table-cell table:number-columns-repeated="2"/>
          <table:table-cell table:style-name="ce54" table:formula="of:=[.P984]" office:value-type="string" office:string-value="GRANTED" ns42:value-type="string" table:number-columns-spanned="3" table:number-rows-spanned="1">
            <text:p>GRANTED</text:p>
          </table:table-cell>
          <table:covered-table-cell table:number-columns-repeated="2"/>
          <table:table-cell table:style-name="ce54" table:formula="of:=[.J993]" office:value-type="string" office:string-value="COMPLETED" ns42:value-type="string" table:number-columns-spanned="3" table:number-rows-spanned="1">
            <text:p>COMPLETED</text:p>
          </table:table-cell>
          <table:covered-table-cell table:number-columns-repeated="2"/>
          <table:table-cell table:style-name="ce54" table:formula="of:=IF(AND(UPPER(TRIM([.A996]))=&quot;YES&quot;;UPPER(TRIM([.D996]))=&quot;YES&quot;;UPPER(TRIM([.G996]))=&quot;YES&quot;;UPPER(TRIM([.J996]))=&quot;GRANTED&quot;;UPPER(TRIM([.M996]))=&quot;COMPLETED&quot;);&quot;SETTLED&quot;;&quot;NOT SETTLED&quot;)" office:value-type="string" office:string-value="SETTLED" ns42:value-type="string" table:number-columns-spanned="3" table:number-rows-spanned="1">
            <text:p>SETTLED</text:p>
          </table:table-cell>
          <table:covered-table-cell table:number-columns-repeated="2"/>
        </table:table-row>
        <table:table-row table:style-name="ro5">
          <table:table-cell table:style-name="ce54" office:value-type="string" ns42:value-type="string" table:number-columns-spanned="18" table:number-rows-spanned="1">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number-columns-repeated="17"/>
        </table:table-row>
        <table:table-row table:style-name="ro5">
          <table:table-cell table:style-name="ce52" office:value-type="string" ns42:value-type="string" table:number-columns-spanned="18" table:number-rows-spanned="1">
            <text:p>🔐 CONTROLLED CLOSE ELIGIBILITY · BUILDS 601–610</text:p>
          </table:table-cell>
          <table:covered-table-cell table:number-columns-repeated="17"/>
        </table:table-row>
        <table:table-row table:style-name="ro5">
          <table:table-cell table:style-name="ce53" office:value-type="string" ns42:value-type="string" table:number-columns-spanned="6" table:number-rows-spanned="1">
            <text:p>CLOSE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AUTHORITATIVE SETTLED STATE BECOME CLOSED?</text:p>
          </table:table-cell>
          <table:covered-table-cell table:number-columns-repeated="5"/>
          <table:table-cell table:style-name="ce54" office:value-type="string" ns42:value-type="string" table:number-columns-spanned="6" table:number-rows-spanned="1">
            <text:p>SETTLED STATE + FINANCIAL TRUTH + VERIFIED SETTLEMENT + EXPLICIT CLOSE CONTROL</text:p>
          </table:table-cell>
          <table:covered-table-cell table:number-columns-repeated="5"/>
          <table:table-cell table:style-name="ce54" office:value-type="string" ns42:value-type="string" table:number-columns-spanned="6" table:number-rows-spanned="1">
            <text:p>SETTLED ≠ CLOSED · VERIFIED FINANCIAL TRUTH ≠ CLOSE AUTHORITY</text:p>
          </table:table-cell>
          <table:covered-table-cell table:number-columns-repeated="5"/>
        </table:table-row>
        <table:table-row table:style-name="ro5">
          <table:table-cell table:style-name="ce53" office:value-type="string" ns42:value-type="string" table:number-columns-spanned="4" table:number-rows-spanned="1">
            <text:p>SETTLED STATE VALID</text:p>
          </table:table-cell>
          <table:covered-table-cell table:number-columns-repeated="3"/>
          <table:table-cell table:style-name="ce53" office:value-type="string" ns42:value-type="string" table:number-columns-spanned="5" table:number-rows-spanned="1">
            <text:p>FINANCIAL TRUTH VALID</text:p>
          </table:table-cell>
          <table:covered-table-cell table:number-columns-repeated="4"/>
          <table:table-cell table:style-name="ce53" office:value-type="string" ns42:value-type="string" table:number-columns-spanned="4" table:number-rows-spanned="1">
            <text:p>VERIFIED SETTLEMENT VALID</text:p>
          </table:table-cell>
          <table:covered-table-cell table:number-columns-repeated="3"/>
          <table:table-cell table:style-name="ce53" office:value-type="string" ns42:value-type="string" table:number-columns-spanned="5" table:number-rows-spanned="1">
            <text:p>CLOSE ELIGIBILITY</text:p>
          </table:table-cell>
          <table:covered-table-cell table:number-columns-repeated="4"/>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ns42:value-type="string" table:number-columns-spanned="5" table:number-rows-spanned="1">
            <text:p>YES</text:p>
          </table:table-cell>
          <table:covered-table-cell table:number-columns-repeated="4"/>
          <table:table-cell table:style-name="ce54" table:formula="of:=IF(UPPER(TRIM([.P972]))=&quot;VERIFIED SETTLEMEN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1]))=&quot;YES&quot;;UPPER(TRIM([.E1001]))=&quot;YES&quot;;UPPER(TRIM([.J1001]))=&quot;YES&quot;);&quot;ELIGIBLE&quot;;&quot;NOT ELIGIBLE&quot;)" office:value-type="string" office:string-value="ELIGIBLE" ns42:value-type="string" table:number-columns-spanned="5" table:number-rows-spanned="1">
            <text:p>ELIGIBLE</text:p>
          </table:table-cell>
          <table:covered-table-cell table:number-columns-repeated="4"/>
        </table:table-row>
        <table:table-row table:style-name="ro5">
          <table:table-cell table:style-name="ce52" office:value-type="string" ns42:value-type="string" table:number-columns-spanned="18" table:number-rows-spanned="1">
            <text:p>📥 EXPLICIT CLOSE REQUEST · BUILDS 611–62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SETTLED → CLOSED</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ELIGIBILITY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04]))=&quot;SETTLED → CLOSED&quot;;&quot;YES&quot;;&quot;NO&quot;)" office:value-type="string" office:string-value="YES" ns42:value-type="string" table:number-columns-spanned="5" table:number-rows-spanned="1">
            <text:p>YES</text:p>
          </table:table-cell>
          <table:covered-table-cell table:number-columns-repeated="4"/>
          <table:table-cell table:style-name="ce54" table:formula="of:=IF(TRIM([.N1004])&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06]))=&quot;YES&quot;;UPPER(TRIM([.E1006]))=&quot;YES&quot;;UPPER(TRIM([.J1006]))=&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CLOSE TRANSITION AUTHORITY · BUILDS 621–630</text:p>
          </table:table-cell>
          <table:covered-table-cell table:number-columns-repeated="17"/>
        </table:table-row>
        <table:table-row table:style-name="ro5">
          <table:table-cell table:style-name="ce53" office:value-type="string" ns42:value-type="string" table:number-columns-spanned="4" table:number-rows-spanned="1">
            <text:p>CURRENT STATE VALID</text:p>
          </table:table-cell>
          <table:covered-table-cell table:number-columns-repeated="3"/>
          <table:table-cell table:style-name="ce53" office:value-type="string" ns42:value-type="string" table:number-columns-spanned="4" table:number-rows-spanned="1">
            <text:p>CLOSE ELIGIBILITY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996]))=&quot;SETT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1]))=&quot;ELIGIBLE&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04]))=&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09]))=&quot;YES&quot;;UPPER(TRIM([.E1009]))=&quot;YES&quot;;UPPER(TRIM([.I1009]))=&quot;YES&quot;;UPPER(TRIM([.M1009]))=&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EXECUTION COMMIT + CONTROLLED CLOSED STATE WRITE · BUILDS 631–64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STATE WRITE</text:p>
          </table:table-cell>
          <table:covered-table-cell table:number-columns-repeated="2"/>
          <table:table-cell table:style-name="ce53" office:value-type="string" ns42:value-type="string" table:number-columns-spanned="3" table:number-rows-spanned="1">
            <text:p>DERIVED NEW STATE</text:p>
          </table:table-cell>
          <table:covered-table-cell table:number-columns-repeated="2"/>
        </table:table-row>
        <table:table-row table:style-name="ro21">
          <table:table-cell table:style-name="ce54" office:value-type="string" ns42:value-type="string" table:number-columns-spanned="4" table:number-rows-spanned="1">
            <text:p>EXECUTE CLOSE TRANSITION</text:p>
          </table:table-cell>
          <table:covered-table-cell table:number-columns-repeated="3"/>
          <table:table-cell table:style-name="ce54" table:formula="of:=IF(UPPER(TRIM([.P1009]))=&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12]))=&quot;YES&quot;;UPPER(TRIM([.N1006]))=&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12]))=&quot;YES&quot;;&quot;CLOSED&quot;;&quot;NO STATE WRITE&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2" office:value-type="string" ns42:value-type="string" table:number-columns-spanned="18" table:number-rows-spanned="1">
            <text:p>📜 APPEND-ONLY CLOSE TRANSITION HISTORY · BUILDS 641–650</text:p>
          </table:table-cell>
          <table:covered-table-cell table:number-columns-repeated="17"/>
        </table:table-row>
        <table:table-row table:style-name="ro5">
          <table:table-cell table:style-name="ce53" office:value-type="string" ns42:value-type="string" table:number-columns-spanned="3" table:number-rows-spanned="1">
            <text:p>TRANSI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STATE</text:p>
          </table:table-cell>
          <table:covered-table-cell table:number-columns-repeated="2"/>
          <table:table-cell table:style-name="ce53" office:value-type="string" ns42:value-type="string" table:number-columns-spanned="3" table:number-rows-spanned="1">
            <text:p>TO STATE</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TRN-000005</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ETTLED</text:p>
          </table:table-cell>
          <table:covered-table-cell table:number-columns-repeated="2"/>
          <table:table-cell table:style-name="ce54" office:value-type="string" ns42:value-type="string" table:number-columns-spanned="3" table:number-rows-spanned="1">
            <text:p>CLOSED</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REPLAY PROTECTION · BUILDS 651–65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STATE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12]))=&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15]))=&quot;INV-000001&quot;;UPPER(TRIM([.J1015]))=&quot;CLOSED&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12]))=UPPER(TRIM([.J1015]));&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18]))=&quot;YES&quot;;UPPER(TRIM([.D1018]))=&quot;YES&quot;;UPPER(TRIM([.G1018]))=&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18]))=&quot;COMPLETED&quot;;&quot;ALREADY EXECUTED&quot;;&quot;NOT EXECUTED&quot;)" office:value-type="string" office:string-value="ALREADY EXECUTED" ns42:value-type="string" table:number-columns-spanned="3" table:number-rows-spanned="1">
            <text:p>ALREADY EXECUTED</text:p>
          </table:table-cell>
          <table:covered-table-cell table:number-columns-repeated="2"/>
          <table:table-cell table:style-name="ce54" table:formula="of:=IF(UPPER(TRIM([.M1018]))=&quot;ALREADY EXECUT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CLOSED TRANSITION EXECUTION GATE · BUILD 660</text:p>
          </table:table-cell>
          <table:covered-table-cell table:number-columns-repeated="17"/>
        </table:table-row>
        <table:table-row table:style-name="ro5">
          <table:table-cell table:style-name="ce53" office:value-type="string" ns42:value-type="string" table:number-columns-spanned="3" table:number-rows-spanned="1">
            <text:p>SETTLED STATE</text:p>
          </table:table-cell>
          <table:covered-table-cell table:number-columns-repeated="2"/>
          <table:table-cell table:style-name="ce53" office:value-type="string" ns42:value-type="string" table:number-columns-spanned="3" table:number-rows-spanned="1">
            <text:p>CLOSE ELIGIBILITY</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STATE</text:p>
          </table:table-cell>
          <table:covered-table-cell table:number-columns-repeated="2"/>
        </table:table-row>
        <table:table-row table:style-name="ro21">
          <table:table-cell table:style-name="ce54" table:formula="of:=[.A1001]" office:value-type="string" office:string-value="YES" ns42:value-type="string" table:number-columns-spanned="3" table:number-rows-spanned="1">
            <text:p>YES</text:p>
          </table:table-cell>
          <table:covered-table-cell table:number-columns-repeated="2"/>
          <table:table-cell table:style-name="ce54" table:formula="of:=[.N1001]" office:value-type="string" office:string-value="ELIGIBLE" ns42:value-type="string" table:number-columns-spanned="3" table:number-rows-spanned="1">
            <text:p>ELIGIBLE</text:p>
          </table:table-cell>
          <table:covered-table-cell table:number-columns-repeated="2"/>
          <table:table-cell table:style-name="ce54" table:formula="of:=[.N1006]" office:value-type="string" office:string-value="VALID REQUEST" ns42:value-type="string" table:number-columns-spanned="3" table:number-rows-spanned="1">
            <text:p>VALID REQUEST</text:p>
          </table:table-cell>
          <table:covered-table-cell table:number-columns-repeated="2"/>
          <table:table-cell table:style-name="ce54" table:formula="of:=[.P1009]" office:value-type="string" office:string-value="GRANTED" ns42:value-type="string" table:number-columns-spanned="3" table:number-rows-spanned="1">
            <text:p>GRANTED</text:p>
          </table:table-cell>
          <table:covered-table-cell table:number-columns-repeated="2"/>
          <table:table-cell table:style-name="ce54" table:formula="of:=[.J1018]" office:value-type="string" office:string-value="COMPLETED" ns42:value-type="string" table:number-columns-spanned="3" table:number-rows-spanned="1">
            <text:p>COMPLETED</text:p>
          </table:table-cell>
          <table:covered-table-cell table:number-columns-repeated="2"/>
          <table:table-cell table:style-name="ce54" table:formula="of:=IF(AND(UPPER(TRIM([.A1021]))=&quot;YES&quot;;UPPER(TRIM([.D1021]))=&quot;ELIGIBLE&quot;;UPPER(TRIM([.G1021]))=&quot;VALID REQUEST&quot;;UPPER(TRIM([.J1021]))=&quot;GRANTED&quot;;UPPER(TRIM([.M1021]))=&quot;COMPLETED&quot;);&quot;CLOSED&quot;;&quot;NOT CLOSED&quot;)" office:value-type="string" office:string-value="CLOSED" ns42:value-type="string" table:number-columns-spanned="3" table:number-rows-spanned="1">
            <text:p>CLOSED</text:p>
          </table:table-cell>
          <table:covered-table-cell table:number-columns-repeated="2"/>
        </table:table-row>
        <table:table-row table:style-name="ro5">
          <table:table-cell table:style-name="ce54" office:value-type="string" ns42:value-type="string" table:number-columns-spanned="18" table:number-rows-spanned="1">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number-columns-repeated="17"/>
        </table:table-row>
        <table:table-row table:style-name="ro5">
          <table:table-cell table:style-name="ce52" office:value-type="string" ns42:value-type="string" table:number-columns-spanned="18" table:number-rows-spanned="1">
            <text:p>📦 CLOSED INVENTORY RECONCILIATION INTAKE · BUILDS 661–670</text:p>
          </table:table-cell>
          <table:covered-table-cell table:number-columns-repeated="17"/>
        </table:table-row>
        <table:table-row table:style-name="ro5">
          <table:table-cell table:style-name="ce53" office:value-type="string" ns42:value-type="string" table:number-columns-spanned="6" table:number-rows-spanned="1">
            <text:p>RECONCILIATION QUESTION</text:p>
          </table:table-cell>
          <table:covered-table-cell table:number-columns-repeated="5"/>
          <table:table-cell table:style-name="ce53" office:value-type="string" ns42:value-type="string" table:number-columns-spanned="6" table:number-rows-spanned="1">
            <text:p>RESPONSIBILITY</text:p>
          </table:table-cell>
          <table:covered-table-cell table:number-columns-repeated="5"/>
          <table:table-cell table:style-name="ce53" office:value-type="string" ns42:value-type="string" table:number-columns-spanned="6" table:number-rows-spanned="1">
            <text:p>BOUNDARY</text:p>
          </table:table-cell>
          <table:covered-table-cell table:number-columns-repeated="5"/>
        </table:table-row>
        <table:table-row table:style-name="ro5">
          <table:table-cell table:style-name="ce54" office:value-type="string" ns42:value-type="string" table:number-columns-spanned="6" table:number-rows-spanned="1">
            <text:p>MAY CLOSED LIFECYCLE RECONCILE AUTHORITATIVE INVENTORY QUANTITY?</text:p>
          </table:table-cell>
          <table:covered-table-cell table:number-columns-repeated="5"/>
          <table:table-cell table:style-name="ce54" office:value-type="string" ns42:value-type="string" table:number-columns-spanned="6" table:number-rows-spanned="1">
            <text:p>CLOSED STATE + RECORD IDENTITY + QUANTITY EVIDENCE + SALE EVIDENCE</text:p>
          </table:table-cell>
          <table:covered-table-cell table:number-columns-repeated="5"/>
          <table:table-cell table:style-name="ce54" office:value-type="string" ns42:value-type="string" table:number-columns-spanned="6" table:number-rows-spanned="1">
            <text:p>CLOSED ≠ QUANTITY WRITE · RECONCILIATION MUST PROVE DEPLETION</text:p>
          </table:table-cell>
          <table:covered-table-cell table:number-columns-repeated="5"/>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CLOSED STATE VALID</text:p>
          </table:table-cell>
          <table:covered-table-cell table:number-columns-repeated="2"/>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UANTITY</text:p>
          </table:table-cell>
          <table:covered-table-cell table:number-columns-repeated="2"/>
          <table:table-cell table:style-name="ce53" office:value-type="string" ns42:value-type="string" table:number-columns-spanned="3" table:number-rows-spanned="1">
            <text:p>QUANTITY SOLD</text:p>
          </table:table-cell>
          <table:covered-table-cell table:number-columns-repeated="2"/>
          <table:table-cell table:style-name="ce53" office:value-type="string" ns42:value-type="string" table:number-columns-spanned="3" table:number-rows-spanned="1">
            <text:p>RECONCILIATION INTAKE</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P1018]))=&quot;CLOSED&quot;;&quot;YES&quot;;&quot;NO&quot;)" office:value-type="string" office:string-value="YES"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AND(UPPER(TRIM([.D1025]))=&quot;YES&quot;;VALUE([.J1025])&gt;=0;VALUE([.M1025])&gt;=0);&quot;RECEIVED&quot;;&quot;REJECTED&quot;)" office:value-type="string" office:string-value="RECEIVED" ns42:value-type="string" table:number-columns-spanned="3" table:number-rows-spanned="1">
            <text:p>RECEIVED</text:p>
          </table:table-cell>
          <table:covered-table-cell table:number-columns-repeated="2"/>
        </table:table-row>
        <table:table-row table:style-name="ro5">
          <table:table-cell table:style-name="ce52" office:value-type="string" ns42:value-type="string" table:number-columns-spanned="18" table:number-rows-spanned="1">
            <text:p>📉 SOLD QUANTITY DEPLETION · BUILDS 671–680</text:p>
          </table:table-cell>
          <table:covered-table-cell table:number-columns-repeated="17"/>
        </table:table-row>
        <table:table-row table:style-name="ro5">
          <table:table-cell table:style-name="ce53" office:value-type="string" ns42:value-type="string" table:number-columns-spanned="4" table:number-rows-spanned="1">
            <text:p>RECORD MATCH</text:p>
          </table:table-cell>
          <table:covered-table-cell table:number-columns-repeated="3"/>
          <table:table-cell table:style-name="ce53" office:value-type="string" ns42:value-type="string" table:number-columns-spanned="5" table:number-rows-spanned="1">
            <text:p>SALE STATUS VALID</text:p>
          </table:table-cell>
          <table:covered-table-cell table:number-columns-repeated="4"/>
          <table:table-cell table:style-name="ce53" office:value-type="string" ns42:value-type="string" table:number-columns-spanned="4" table:number-rows-spanned="1">
            <text:p>QUANTITY SOLD VALID</text:p>
          </table:table-cell>
          <table:covered-table-cell table:number-columns-repeated="3"/>
          <table:table-cell table:style-name="ce53" office:value-type="string" ns42:value-type="string" table:number-columns-spanned="5" table:number-rows-spanned="1">
            <text:p>DEPLETION EVIDENCE COMPLETE</text:p>
          </table:table-cell>
          <table:covered-table-cell table:number-columns-repeated="4"/>
        </table:table-row>
        <table:table-row table:style-name="ro21">
          <table:table-cell table:style-name="ce54" table:formula="of:=IF(UPPER(TRIM([.A1025]))=&quot;INV-000001&quot;;&quot;YES&quot;;&quot;NO&quot;)" office:value-type="string" office:string-value="YES" ns42:value-type="string" table:number-columns-spanned="4" table:number-rows-spanned="1">
            <text:p>YES</text:p>
          </table:table-cell>
          <table:covered-table-cell table:number-columns-repeated="3"/>
          <table:table-cell table:style-name="ce54" table:formula="of:=IF(UPPER(TRIM([.P870]))=&quot;ELIGIBLE&quot;;&quot;YES&quot;;&quot;NO&quot;)" office:value-type="string" office:string-value="YES" ns42:value-type="string" table:number-columns-spanned="5" table:number-rows-spanned="1">
            <text:p>YES</text:p>
          </table:table-cell>
          <table:covered-table-cell table:number-columns-repeated="4"/>
          <table:table-cell table:style-name="ce54" table:formula="of:=IF(VALUE([.M1025])&gt;0;&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28]))=&quot;YES&quot;;UPPER(TRIM([.E1028]))=&quot;YES&quot;;UPPER(TRIM([.J1028]))=&quot;YES&quot;);&quot;YES&quot;;&quot;NO&quot;)" office:value-type="string" office:string-value="YES" ns42:value-type="string" table:number-columns-spanned="5" table:number-rows-spanned="1">
            <text:p>YES</text:p>
          </table:table-cell>
          <table:covered-table-cell table:number-columns-repeated="4"/>
        </table:table-row>
        <table:table-row table:style-name="ro5">
          <table:table-cell table:style-name="ce52" office:value-type="string" ns42:value-type="string" table:number-columns-spanned="18" table:number-rows-spanned="1">
            <text:p>🧮 REMAINING QUANTITY TRUTH · BUILDS 681–690</text:p>
          </table:table-cell>
          <table:covered-table-cell table:number-columns-repeated="17"/>
        </table:table-row>
        <table:table-row table:style-name="ro5">
          <table:table-cell table:style-name="ce53" office:value-type="string" ns42:value-type="string" table:number-columns-spanned="4" table:number-rows-spanned="1">
            <text:p>ORIGINAL QUANTITY</text:p>
          </table:table-cell>
          <table:covered-table-cell table:number-columns-repeated="3"/>
          <table:table-cell table:style-name="ce53" office:value-type="string" ns42:value-type="string" table:number-columns-spanned="4" table:number-rows-spanned="1">
            <text:p>QUANTITY SOLD</text:p>
          </table:table-cell>
          <table:covered-table-cell table:number-columns-repeated="3"/>
          <table:table-cell table:style-name="ce53" office:value-type="string" ns42:value-type="string" table:number-columns-spanned="4" table:number-rows-spanned="1">
            <text:p>DERIVED REMAINING QUANTITY</text:p>
          </table:table-cell>
          <table:covered-table-cell table:number-columns-repeated="3"/>
          <table:table-cell table:style-name="ce53" office:value-type="string" ns42:value-type="string" table:number-columns-spanned="3" table:number-rows-spanned="1">
            <text:p>NEGATIVE QUANTITY</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row>
        <table:table-row table:style-name="ro21">
          <table:table-cell table:style-name="ce54" table:formula="of:=[.J1025]" office:value-type="string" office:string-value="1" ns42:value-type="string" table:number-columns-spanned="4" table:number-rows-spanned="1">
            <text:p>1</text:p>
          </table:table-cell>
          <table:covered-table-cell table:number-columns-repeated="3"/>
          <table:table-cell table:style-name="ce54" table:formula="of:=[.M1025]" office:value-type="string" office:string-value="1" ns42:value-type="string" table:number-columns-spanned="4" table:number-rows-spanned="1">
            <text:p>1</text:p>
          </table:table-cell>
          <table:covered-table-cell table:number-columns-repeated="3"/>
          <table:table-cell table:style-name="ce54" table:formula="of:=VALUE([.A1031])-VALUE([.E1031])" office:value-type="string" office:string-value="0" ns42:value-type="string" table:number-columns-spanned="4" table:number-rows-spanned="1">
            <text:p>0</text:p>
          </table:table-cell>
          <table:covered-table-cell table:number-columns-repeated="3"/>
          <table:table-cell table:style-name="ce54" table:formula="of:=IF(VALUE([.I1031])&lt;0;&quot;YES&quot;;&quot;NO&quot;)" office:value-type="string" office:string-value="NO" ns42:value-type="string" table:number-columns-spanned="3" table:number-rows-spanned="1">
            <text:p>NO</text:p>
          </table:table-cell>
          <table:covered-table-cell table:number-columns-repeated="2"/>
          <table:table-cell table:style-name="ce54" table:formula="of:=IF(AND(VALUE([.I1031])&gt;=0;UPPER(TRIM([.M1031]))=&quot;NO&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LIFECYCLE ↔ INVENTORY CROSS-CHECK · BUILDS 691–700</text:p>
          </table:table-cell>
          <table:covered-table-cell table:number-columns-repeated="17"/>
        </table:table-row>
        <table:table-row table:style-name="ro5">
          <table:table-cell table:style-name="ce53" office:value-type="string" ns42:value-type="string" table:number-columns-spanned="4" table:number-rows-spanned="1">
            <text:p>CLOSED STATE</text:p>
          </table:table-cell>
          <table:covered-table-cell table:number-columns-repeated="3"/>
          <table:table-cell table:style-name="ce53" office:value-type="string" ns42:value-type="string" table:number-columns-spanned="4" table:number-rows-spanned="1">
            <text:p>RECORD IDENTITY</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DEPLETION COMPLETE</text:p>
          </table:table-cell>
          <table:covered-table-cell table:number-columns-repeated="2"/>
          <table:table-cell table:style-name="ce53" office:value-type="string" ns42:value-type="string" table:number-columns-spanned="3" table:number-rows-spanned="1">
            <text:p>CROSS-CHECK RESULT</text:p>
          </table:table-cell>
          <table:covered-table-cell table:number-columns-repeated="2"/>
        </table:table-row>
        <table:table-row table:style-name="ro21">
          <table:table-cell table:style-name="ce54" table:formula="of:=[.D1025]" office:value-type="string" office:string-value="YES" ns42:value-type="string" table:number-columns-spanned="4" table:number-rows-spanned="1">
            <text:p>YES</text:p>
          </table:table-cell>
          <table:covered-table-cell table:number-columns-repeated="3"/>
          <table:table-cell table:style-name="ce54" table:formula="of:=[.A1028]" office:value-type="string" office:string-value="YES" ns42:value-type="string" table:number-columns-spanned="4" table:number-rows-spanned="1">
            <text:p>YES</text:p>
          </table:table-cell>
          <table:covered-table-cell table:number-columns-repeated="3"/>
          <table:table-cell table:style-name="ce54" table:formula="of:=IF(VALUE([.M1025])=VALUE([.M859]);&quot;YES&quot;;&quot;NO&quot;)" office:value-type="string" office:string-value="YES" ns42:value-type="string" table:number-columns-spanned="4" table:number-rows-spanned="1">
            <text:p>YES</text:p>
          </table:table-cell>
          <table:covered-table-cell table:number-columns-repeated="3"/>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IF(AND(UPPER(TRIM([.A1034]))=&quot;YES&quot;;UPPER(TRIM([.E1034]))=&quot;YES&quot;;UPPER(TRIM([.I1034]))=&quot;YES&quot;;UPPER(TRIM([.M103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2" office:value-type="string" ns42:value-type="string" table:number-columns-spanned="18" table:number-rows-spanned="1">
            <text:p>🚨 NEGATIVE QUANTITY FAIL-CLOSE · BUILDS 701–71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EGATIVE DETECTED</text:p>
          </table:table-cell>
          <table:covered-table-cell table:number-columns-repeated="3"/>
          <table:table-cell table:style-name="ce53" office:value-type="string" ns42:value-type="string" table:number-columns-spanned="4" table:number-rows-spanned="1">
            <text:p>QUANTITY TRUTH VALID</text:p>
          </table:table-cell>
          <table:covered-table-cell table:number-columns-repeated="3"/>
          <table:table-cell table:style-name="ce53" office:value-type="string" ns42:value-type="string" table:number-columns-spanned="3" table:number-rows-spanned="1">
            <text:p>WRITE ELIGIBILITY</text:p>
          </table:table-cell>
          <table:covered-table-cell table:number-columns-repeated="2"/>
          <table:table-cell table:style-name="ce53" office:value-type="string" ns42:value-type="string" table:number-columns-spanned="3" table:number-rows-spanned="1">
            <text:p>FAIL-CLOSE RESULT</text:p>
          </table:table-cell>
          <table:covered-table-cell table:number-columns-repeated="2"/>
        </table:table-row>
        <table:table-row table:style-name="ro21">
          <table:table-cell table:style-name="ce54" table:formula="of:=[.I1031]" office:value-type="string" office:string-value="0" ns42:value-type="string" table:number-columns-spanned="4" table:number-rows-spanned="1">
            <text:p>0</text:p>
          </table:table-cell>
          <table:covered-table-cell table:number-columns-repeated="3"/>
          <table:table-cell table:style-name="ce54" table:formula="of:=[.M1031]" office:value-type="string" office:string-value="NO" ns42:value-type="string" table:number-columns-spanned="4" table:number-rows-spanned="1">
            <text:p>NO</text:p>
          </table:table-cell>
          <table:covered-table-cell table:number-columns-repeated="3"/>
          <table:table-cell table:style-name="ce54" table:formula="of:=IF(UPPER(TRIM([.P1031]))=&quot;VERIFIED&quot;;&quot;YES&quot;;&quot;NO&quot;)" office:value-type="string" office:string-value="YES" ns42:value-type="string" table:number-columns-spanned="4" table:number-rows-spanned="1">
            <text:p>YES</text:p>
          </table:table-cell>
          <table:covered-table-cell table:number-columns-repeated="3"/>
          <table:table-cell table:style-name="ce54" table:formula="of:=IF(AND(VALUE([.A1037])&gt;=0;UPPER(TRIM([.E1037]))=&quot;NO&quot;;UPPER(TRIM([.I1037]))=&quot;YES&quot;);&quot;ELIGIBLE&quot;;&quot;NOT ELIGIBLE&quot;)" office:value-type="string" office:string-value="ELIGIBLE" ns42:value-type="string" table:number-columns-spanned="3" table:number-rows-spanned="1">
            <text:p>ELIGIBLE</text:p>
          </table:table-cell>
          <table:covered-table-cell table:number-columns-repeated="2"/>
          <table:table-cell table:style-name="ce54" table:formula="of:=IF(UPPER(TRIM([.M1037]))=&quot;ELIGIBLE&quot;;&quot;PASS&quot;;&quot;FAIL-CLOS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2" office:value-type="string" ns42:value-type="string" table:number-columns-spanned="18" table:number-rows-spanned="1">
            <text:p>🔁 REPLAY-SAFE RECONCILIATION · BUILDS 711–719</text:p>
          </table:table-cell>
          <table:covered-table-cell table:number-columns-repeated="17"/>
        </table:table-row>
        <table:table-row table:style-name="ro5">
          <table:table-cell table:style-name="ce53" office:value-type="string" ns42:value-type="string" table:number-columns-spanned="3" table:number-rows-spanned="1">
            <text:p>RECONCILI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cell table:style-name="ce53" office:value-type="string" ns42:value-type="string" table:number-columns-spanned="3" table:number-rows-spanned="1">
            <text:p>FIRST RESULT</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row>
        <table:table-row table:style-name="ro21">
          <table:table-cell table:style-name="ce54" office:value-type="string" ns42:value-type="string" table:number-columns-spanned="3" table:number-rows-spanned="1">
            <text:p>REC-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table:formula="of:=[.A1037]" office:value-type="string" office:string-value="0" ns42:value-type="string" table:number-columns-spanned="3" table:number-rows-spanned="1">
            <text:p>0</text:p>
          </table:table-cell>
          <table:covered-table-cell table:number-columns-repeated="2"/>
          <table:table-cell table:style-name="ce54" table:formula="of:=IF(AND(UPPER(TRIM([.P1034]))=&quot;VERIFIED&quot;;UPPER(TRIM([.P1037]))=&quot;PAS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40]))=&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40]))=&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INVENTORY RECONCILIATION GATE · BUILD 720</text:p>
          </table:table-cell>
          <table:covered-table-cell table:number-columns-repeated="17"/>
        </table:table-row>
        <table:table-row table:style-name="ro5">
          <table:table-cell table:style-name="ce53" office:value-type="string" ns42:value-type="string" table:number-columns-spanned="3" table:number-rows-spanned="1">
            <text:p>CLOSED STATE</text:p>
          </table:table-cell>
          <table:covered-table-cell table:number-columns-repeated="2"/>
          <table:table-cell table:style-name="ce53" office:value-type="string" ns42:value-type="string" table:number-columns-spanned="3" table:number-rows-spanned="1">
            <text:p>DEPLETION EVIDENCE</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LIFECYCLE CROSS-CHECK</text:p>
          </table:table-cell>
          <table:covered-table-cell table:number-columns-repeated="2"/>
          <table:table-cell table:style-name="ce53" office:value-type="string" ns42:value-type="string" table:number-columns-spanned="3" table:number-rows-spanned="1">
            <text:p>FAIL-CLOSE</text:p>
          </table:table-cell>
          <table:covered-table-cell table:number-columns-repeated="2"/>
          <table:table-cell table:style-name="ce53" office:value-type="string" ns42:value-type="string" table:number-columns-spanned="3" table:number-rows-spanned="1">
            <text:p>RECONCILIATION RESULT</text:p>
          </table:table-cell>
          <table:covered-table-cell table:number-columns-repeated="2"/>
        </table:table-row>
        <table:table-row table:style-name="ro21">
          <table:table-cell table:style-name="ce54" table:formula="of:=[.D1025]" office:value-type="string" office:string-value="YES" ns42:value-type="string" table:number-columns-spanned="3" table:number-rows-spanned="1">
            <text:p>YES</text:p>
          </table:table-cell>
          <table:covered-table-cell table:number-columns-repeated="2"/>
          <table:table-cell table:style-name="ce54" table:formula="of:=[.N1028]" office:value-type="string" office:string-value="YES" ns42:value-type="string" table:number-columns-spanned="3" table:number-rows-spanned="1">
            <text:p>YES</text:p>
          </table:table-cell>
          <table:covered-table-cell table:number-columns-repeated="2"/>
          <table:table-cell table:style-name="ce54" table:formula="of:=[.P1031]" office:value-type="string" office:string-value="VERIFIED" ns42:value-type="string" table:number-columns-spanned="3" table:number-rows-spanned="1">
            <text:p>VERIFIED</text:p>
          </table:table-cell>
          <table:covered-table-cell table:number-columns-repeated="2"/>
          <table:table-cell table:style-name="ce54" table:formula="of:=[.P1034]" office:value-type="string" office:string-value="VERIFIED" ns42:value-type="string" table:number-columns-spanned="3" table:number-rows-spanned="1">
            <text:p>VERIFIED</text:p>
          </table:table-cell>
          <table:covered-table-cell table:number-columns-repeated="2"/>
          <table:table-cell table:style-name="ce54" table:formula="of:=[.P1037]" office:value-type="string" office:string-value="PASS" ns42:value-type="string" table:number-columns-spanned="3" table:number-rows-spanned="1">
            <text:p>PASS</text:p>
          </table:table-cell>
          <table:covered-table-cell table:number-columns-repeated="2"/>
          <table:table-cell table:style-name="ce54" table:formula="of:=IF(AND(UPPER(TRIM([.A1043]))=&quot;YES&quot;;UPPER(TRIM([.D1043]))=&quot;YES&quot;;UPPER(TRIM([.G1043]))=&quot;VERIFIED&quot;;UPPER(TRIM([.J1043]))=&quot;VERIFIED&quot;;UPPER(TRIM([.M1043]))=&quot;PASS&quot;);&quot;RECONCILED&quot;;&quot;NOT RECONCILED&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number-columns-repeated="17"/>
        </table:table-row>
        <table:table-row table:style-name="ro5">
          <table:table-cell table:style-name="ce52" office:value-type="string" ns42:value-type="string" table:number-columns-spanned="18" table:number-rows-spanned="1">
            <text:p>📥 EXPLICIT RECONCILIATION REQUEST · BUILDS 721–730</text:p>
          </table:table-cell>
          <table:covered-table-cell table:number-columns-repeated="17"/>
        </table:table-row>
        <table:table-row table:style-name="ro5">
          <table:table-cell table:style-name="ce53" office:value-type="string" ns42:value-type="string" table:number-columns-spanned="4" table:number-rows-spanned="1">
            <text:p>RECORD ID</text:p>
          </table:table-cell>
          <table:covered-table-cell table:number-columns-repeated="3"/>
          <table:table-cell table:style-name="ce53" office:value-type="string" ns42:value-type="string" table:number-columns-spanned="5" table:number-rows-spanned="1">
            <text:p>REQUESTED TRANSITION</text:p>
          </table:table-cell>
          <table:covered-table-cell table:number-columns-repeated="4"/>
          <table:table-cell table:style-name="ce53" office:value-type="string" ns42:value-type="string" table:number-columns-spanned="4" table:number-rows-spanned="1">
            <text:p>REQUEST STATUS</text:p>
          </table:table-cell>
          <table:covered-table-cell table:number-columns-repeated="3"/>
          <table:table-cell table:style-name="ce53" office:value-type="string" ns42:value-type="string" table:number-columns-spanned="5" table:number-rows-spanned="1">
            <text:p>REQUESTED BY</text:p>
          </table:table-cell>
          <table:covered-table-cell table:number-columns-repeated="4"/>
        </table:table-row>
        <table:table-row table:style-name="ro5">
          <table:table-cell table:style-name="ce54" office:value-type="string" ns42:value-type="string" table:number-columns-spanned="4" table:number-rows-spanned="1">
            <text:p>INV-000001</text:p>
          </table:table-cell>
          <table:covered-table-cell table:number-columns-repeated="3"/>
          <table:table-cell table:style-name="ce54" office:value-type="string" ns42:value-type="string" table:number-columns-spanned="5" table:number-rows-spanned="1">
            <text:p>RECONCILED QUANTITY WRITE</text:p>
          </table:table-cell>
          <table:covered-table-cell table:number-columns-repeated="4"/>
          <table:table-cell table:style-name="ce54" office:value-type="string" ns42:value-type="string" table:number-columns-spanned="4" table:number-rows-spanned="1">
            <text:p>REQUESTED</text:p>
          </table:table-cell>
          <table:covered-table-cell table:number-columns-repeated="3"/>
          <table:table-cell table:style-name="ce54" office:value-type="string" ns42:value-type="string" table:number-columns-spanned="5" table:number-rows-spanned="1">
            <text:p>MARK · OPERATOR</text:p>
          </table:table-cell>
          <table:covered-table-cell table:number-columns-repeated="4"/>
        </table:table-row>
        <table:table-row table:style-name="ro5">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5" table:number-rows-spanned="1">
            <text:p>REQUEST VALID</text:p>
          </table:table-cell>
          <table:covered-table-cell table:number-columns-repeated="4"/>
          <table:table-cell table:style-name="ce53" office:value-type="string" ns42:value-type="string" table:number-columns-spanned="4" table:number-rows-spanned="1">
            <text:p>ACTOR PRESENT</text:p>
          </table:table-cell>
          <table:covered-table-cell table:number-columns-repeated="3"/>
          <table:table-cell table:style-name="ce53" office:value-type="string" ns42:value-type="string" table:number-columns-spanned="5" table:number-rows-spanned="1">
            <text:p>REQUEST RESULT</text:p>
          </table:table-cell>
          <table:covered-table-cell table:number-columns-repeated="4"/>
        </table:table-row>
        <table:table-row table:style-name="ro21">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F1048]))=&quot;RECONCILED QUANTITY WRITE&quot;;&quot;YES&quot;;&quot;NO&quot;)" office:value-type="string" office:string-value="YES" ns42:value-type="string" table:number-columns-spanned="5" table:number-rows-spanned="1">
            <text:p>YES</text:p>
          </table:table-cell>
          <table:covered-table-cell table:number-columns-repeated="4"/>
          <table:table-cell table:style-name="ce54" table:formula="of:=IF(TRIM([.N1048])&lt;&gt;&quot;&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A1050]))=&quot;YES&quot;;UPPER(TRIM([.E1050]))=&quot;YES&quot;;UPPER(TRIM([.J1050]))=&quot;YES&quot;);&quot;VALID REQUEST&quot;;&quot;INVALID REQUEST&quot;)" office:value-type="string" office:string-value="VALID REQUEST" ns42:value-type="string" table:number-columns-spanned="5" table:number-rows-spanned="1">
            <text:p>VALID REQUEST</text:p>
          </table:table-cell>
          <table:covered-table-cell table:number-columns-repeated="4"/>
        </table:table-row>
        <table:table-row table:style-name="ro5">
          <table:table-cell table:style-name="ce52" office:value-type="string" ns42:value-type="string" table:number-columns-spanned="18" table:number-rows-spanned="1">
            <text:p>🛡️ RECONCILIATION ADJUSTMENT AUTHORITY · BUILDS 731–740</text:p>
          </table:table-cell>
          <table:covered-table-cell table:number-columns-repeated="17"/>
        </table:table-row>
        <table:table-row table:style-name="ro5">
          <table:table-cell table:style-name="ce53" office:value-type="string" ns42:value-type="string" table:number-columns-spanned="4" table:number-rows-spanned="1">
            <text:p>CLOSED STATE VALID</text:p>
          </table:table-cell>
          <table:covered-table-cell table:number-columns-repeated="3"/>
          <table:table-cell table:style-name="ce53" office:value-type="string" ns42:value-type="string" table:number-columns-spanned="4" table:number-rows-spanned="1">
            <text:p>RECONCILIATION VALID</text:p>
          </table:table-cell>
          <table:covered-table-cell table:number-columns-repeated="3"/>
          <table:table-cell table:style-name="ce53" office:value-type="string" ns42:value-type="string" table:number-columns-spanned="4" table:number-rows-spanned="1">
            <text:p>REQUEST VALID</text:p>
          </table:table-cell>
          <table:covered-table-cell table:number-columns-repeated="3"/>
          <table:table-cell table:style-name="ce53" office:value-type="string" ns42:value-type="string" table:number-columns-spanned="3" table:number-rows-spanned="1">
            <text:p>ACTOR AUTHORIZED</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18]))=&quot;CLOS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P1043]))=&quot;RECONCILED&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50]))=&quot;VALID REQUEST&quot;;&quot;YES&quot;;&quot;NO&quot;)" office:value-type="string" office:string-value="YES" ns42:value-type="string" table:number-columns-spanned="4" table:number-rows-spanned="1">
            <text:p>YES</text:p>
          </table:table-cell>
          <table:covered-table-cell table:number-columns-repeated="3"/>
          <table:table-cell table:style-name="ce54" table:formula="of:=IF(UPPER(TRIM([.N1048]))=&quot;MARK · OPERATOR&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53]))=&quot;YES&quot;;UPPER(TRIM([.E1053]))=&quot;YES&quot;;UPPER(TRIM([.I1053]))=&quot;YES&quot;;UPPER(TRIM([.M1053]))=&quot;YES&quot;);&quot;GRANTED&quot;;&quot;DENIED&quot;)" office:value-type="string" office:string-value="GRANTED" ns42:value-type="string" table:number-columns-spanned="3" table:number-rows-spanned="1">
            <text:p>GRANTED</text:p>
          </table:table-cell>
          <table:covered-table-cell table:number-columns-repeated="2"/>
        </table:table-row>
        <table:table-row table:style-name="ro5">
          <table:table-cell table:style-name="ce52" office:value-type="string" ns42:value-type="string" table:number-columns-spanned="18" table:number-rows-spanned="1">
            <text:p>🔍 AUTHORIZED QUANTITY ADJUSTMENT VALIDATION · BUILDS 741–750</text:p>
          </table:table-cell>
          <table:covered-table-cell table:number-columns-repeated="17"/>
        </table:table-row>
        <table:table-row table:style-name="ro5">
          <table:table-cell table:style-name="ce53" office:value-type="string" ns42:value-type="string" table:number-columns-spanned="4" table:number-rows-spanned="1">
            <text:p>DERIVED QUANTITY</text:p>
          </table:table-cell>
          <table:covered-table-cell table:number-columns-repeated="3"/>
          <table:table-cell table:style-name="ce53" office:value-type="string" ns42:value-type="string" table:number-columns-spanned="4" table:number-rows-spanned="1">
            <text:p>NONNEGATIVE</text:p>
          </table:table-cell>
          <table:covered-table-cell table:number-columns-repeated="3"/>
          <table:table-cell table:style-name="ce53" office:value-type="string" ns42:value-type="string" table:number-columns-spanned="4" table:number-rows-spanned="1">
            <text:p>SALE QUANTITY MATCH</text:p>
          </table:table-cell>
          <table:covered-table-cell table:number-columns-repeated="3"/>
          <table:table-cell table:style-name="ce53" office:value-type="string" ns42:value-type="string" table:number-columns-spanned="3" table:number-rows-spanned="1">
            <text:p>AUTHORITY VALID</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row>
        <table:table-row table:style-name="ro21">
          <table:table-cell table:style-name="ce54" table:formula="of:=[.A1037]" office:value-type="string" office:string-value="0" ns42:value-type="string" table:number-columns-spanned="4" table:number-rows-spanned="1">
            <text:p>0</text:p>
          </table:table-cell>
          <table:covered-table-cell table:number-columns-repeated="3"/>
          <table:table-cell table:style-name="ce54" table:formula="of:=IF(VALUE([.A1056])&gt;=0;&quot;YES&quot;;&quot;NO&quot;)" office:value-type="string" office:string-value="YES" ns42:value-type="string" table:number-columns-spanned="4" table:number-rows-spanned="1">
            <text:p>YES</text:p>
          </table:table-cell>
          <table:covered-table-cell table:number-columns-repeated="3"/>
          <table:table-cell table:style-name="ce54" table:formula="of:=[.I1034]" office:value-type="string" office:string-value="YES" ns42:value-type="string" table:number-columns-spanned="4" table:number-rows-spanned="1">
            <text:p>YES</text:p>
          </table:table-cell>
          <table:covered-table-cell table:number-columns-repeated="3"/>
          <table:table-cell table:style-name="ce54" table:formula="of:=IF(UPPER(TRIM([.P1053]))=&quot;GRANTED&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E1056]))=&quot;YES&quot;;UPPER(TRIM([.I1056]))=&quot;YES&quot;;UPPER(TRIM([.M1056]))=&quot;YES&quot;);&quot;YES&quot;;&quot;NO&quot;)" office:value-type="string" office:string-value="YES" ns42:value-type="string" table:number-columns-spanned="3" table:number-rows-spanned="1">
            <text:p>YES</text:p>
          </table:table-cell>
          <table:covered-table-cell table:number-columns-repeated="2"/>
        </table:table-row>
        <table:table-row table:style-name="ro5">
          <table:table-cell table:style-name="ce52" office:value-type="string" ns42:value-type="string" table:number-columns-spanned="18" table:number-rows-spanned="1">
            <text:p>⚙️ CONTROLLED QUANTITY WRITE · BUILDS 751–760</text:p>
          </table:table-cell>
          <table:covered-table-cell table:number-columns-repeated="17"/>
        </table:table-row>
        <table:table-row table:style-name="ro5">
          <table:table-cell table:style-name="ce53" office:value-type="string" ns42:value-type="string" table:number-columns-spanned="4" table:number-rows-spanned="1">
            <text:p>EXECUTION COMMIT</text:p>
          </table:table-cell>
          <table:covered-table-cell table:number-columns-repeated="3"/>
          <table:table-cell table:style-name="ce53" office:value-type="string" ns42:value-type="string" table:number-columns-spanned="4" table:number-rows-spanned="1">
            <text:p>AUTHORITY REVALIDATED</text:p>
          </table:table-cell>
          <table:covered-table-cell table:number-columns-repeated="3"/>
          <table:table-cell table:style-name="ce53" office:value-type="string" ns42:value-type="string" table:number-columns-spanned="4" table:number-rows-spanned="1">
            <text:p>WRITE ELIGIBLE</text:p>
          </table:table-cell>
          <table:covered-table-cell table:number-columns-repeated="3"/>
          <table:table-cell table:style-name="ce53" office:value-type="string" ns42:value-type="string" table:number-columns-spanned="3" table:number-rows-spanned="1">
            <text:p>CONTROLLED QUANTITY WRITE</text:p>
          </table:table-cell>
          <table:covered-table-cell table:number-columns-repeated="2"/>
          <table:table-cell table:style-name="ce53" office:value-type="string" ns42:value-type="string" table:number-columns-spanned="3" table:number-rows-spanned="1">
            <text:p>DERIVED QUANTITY</text:p>
          </table:table-cell>
          <table:covered-table-cell table:number-columns-repeated="2"/>
        </table:table-row>
        <table:table-row table:style-name="ro21">
          <table:table-cell table:style-name="ce54" office:value-type="string" ns42:value-type="string" table:number-columns-spanned="4" table:number-rows-spanned="1">
            <text:p>EXECUTE RECONCILIATION</text:p>
          </table:table-cell>
          <table:covered-table-cell table:number-columns-repeated="3"/>
          <table:table-cell table:style-name="ce54" table:formula="of:=IF(UPPER(TRIM([.P1053]))=&quot;GRANTED&quot;;&quot;YES&quot;;&quot;NO&quot;)" office:value-type="string" office:string-value="YES" ns42:value-type="string" table:number-columns-spanned="4" table:number-rows-spanned="1">
            <text:p>YES</text:p>
          </table:table-cell>
          <table:covered-table-cell table:number-columns-repeated="3"/>
          <table:table-cell table:style-name="ce54" table:formula="of:=IF(AND(UPPER(TRIM([.E1059]))=&quot;YES&quot;;UPPER(TRIM([.P1056]))=&quot;YES&quot;);&quot;YES&quot;;&quot;NO&quot;)" office:value-type="string" office:string-value="YES" ns42:value-type="string" table:number-columns-spanned="4" table:number-rows-spanned="1">
            <text:p>YES</text:p>
          </table:table-cell>
          <table:covered-table-cell table:number-columns-repeated="3"/>
          <table:table-cell table:style-name="ce54" table:formula="of:=IF(UPPER(TRIM([.I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59]))=&quot;YES&quot;;[.A1056];&quot;NO WRITE&quot;)" office:value-type="string" office:string-value="0" ns42:value-type="string" table:number-columns-spanned="3" table:number-rows-spanned="1">
            <text:p>0</text:p>
          </table:table-cell>
          <table:covered-table-cell table:number-columns-repeated="2"/>
        </table:table-row>
        <table:table-row table:style-name="ro5">
          <table:table-cell table:style-name="ce52" office:value-type="string" ns42:value-type="string" table:number-columns-spanned="18" table:number-rows-spanned="1">
            <text:p>📜 APPEND-ONLY RECONCILIATION HISTORY · BUILDS 761–770</text:p>
          </table:table-cell>
          <table:covered-table-cell table:number-columns-repeated="17"/>
        </table:table-row>
        <table:table-row table:style-name="ro5">
          <table:table-cell table:style-name="ce53" office:value-type="string" ns42:value-type="string" table:number-columns-spanned="3" table:number-rows-spanned="1">
            <text:p>ADJUSTMENT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FROM QUANTITY</text:p>
          </table:table-cell>
          <table:covered-table-cell table:number-columns-repeated="2"/>
          <table:table-cell table:style-name="ce53" office:value-type="string" ns42:value-type="string" table:number-columns-spanned="3" table:number-rows-spanned="1">
            <text:p>TO QUANTITY</text:p>
          </table:table-cell>
          <table:covered-table-cell table:number-columns-repeated="2"/>
          <table:table-cell table:style-name="ce53" office:value-type="string" ns42:value-type="string" table:number-columns-spanned="3" table:number-rows-spanned="1">
            <text:p>ACTOR</text:p>
          </table:table-cell>
          <table:covered-table-cell table:number-columns-repeated="2"/>
          <table:table-cell table:style-name="ce53" office:value-type="string" ns42:value-type="string" table:number-columns-spanned="3" table:number-rows-spanned="1">
            <text:p>RESULT</text:p>
          </table:table-cell>
          <table:covered-table-cell table:number-columns-repeated="2"/>
        </table:table-row>
        <table:table-row table:style-name="ro5">
          <table:table-cell table:style-name="ce54" office:value-type="string" ns42:value-type="string" table:number-columns-spanned="3" table:number-rows-spanned="1">
            <text:p>ADJ-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MARK · OPERATOR</text:p>
          </table:table-cell>
          <table:covered-table-cell table:number-columns-repeated="2"/>
          <table:table-cell table:style-name="ce54" office:value-type="string" ns42:value-type="string" table:number-columns-spanned="3" table:number-rows-spanned="1">
            <text:p>EXECUTED</text:p>
          </table:table-cell>
          <table:covered-table-cell table:number-columns-repeated="2"/>
        </table:table-row>
        <table:table-row table:style-name="ro5">
          <table:table-cell table:style-name="ce52" office:value-type="string" ns42:value-type="string" table:number-columns-spanned="18" table:number-rows-spanned="1">
            <text:p>🔁 POST-WRITE VERIFICATION + SECOND-WRITE PROTECTION · BUILDS 771–779</text:p>
          </table:table-cell>
          <table:covered-table-cell table:number-columns-repeated="17"/>
        </table:table-row>
        <table:table-row table:style-name="ro5">
          <table:table-cell table:style-name="ce53" office:value-type="string" ns42:value-type="string" table:number-columns-spanned="3" table:number-rows-spanned="1">
            <text:p>WRITE RESULT</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POST-WRITE QUANTITY MATCH</text:p>
          </table:table-cell>
          <table:covered-table-cell table:number-columns-repeated="2"/>
          <table:table-cell table:style-name="ce53" office:value-type="string" ns42:value-type="string" table:number-columns-spanned="3" table:number-rows-spanned="1">
            <text:p>COMPLETION</text:p>
          </table:table-cell>
          <table:covered-table-cell table:number-columns-repeated="2"/>
          <table:table-cell table:style-name="ce53" office:value-type="string" ns42:value-type="string" table:number-columns-spanned="3" table:number-rows-spanned="1">
            <text:p>REPLAY RESULT</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row>
        <table:table-row table:style-name="ro21">
          <table:table-cell table:style-name="ce54" table:formula="of:=IF(UPPER(TRIM([.M1059]))=&quot;YES&quot;;&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62]))=&quot;INV-000001&quot;;VALUE([.J1062])=VALUE([.P1059]));&quot;YES&quot;;&quot;NO&quot;)" office:value-type="string" office:string-value="YES" ns42:value-type="string" table:number-columns-spanned="3" table:number-rows-spanned="1">
            <text:p>YES</text:p>
          </table:table-cell>
          <table:covered-table-cell table:number-columns-repeated="2"/>
          <table:table-cell table:style-name="ce54" table:formula="of:=IF(VALUE([.P1059])=VALUE([.J1062]);&quot;YES&quot;;&quot;NO&quot;)" office:value-type="string" office:string-value="YES" ns42:value-type="string" table:number-columns-spanned="3" table:number-rows-spanned="1">
            <text:p>YES</text:p>
          </table:table-cell>
          <table:covered-table-cell table:number-columns-repeated="2"/>
          <table:table-cell table:style-name="ce54" table:formula="of:=IF(AND(UPPER(TRIM([.A1065]))=&quot;YES&quot;;UPPER(TRIM([.D1065]))=&quot;YES&quot;;UPPER(TRIM([.G1065]))=&quot;YES&quot;);&quot;COMPLETED&quot;;&quot;INCOMPLETE&quot;)" office:value-type="string" office:string-value="COMPLETED" ns42:value-type="string" table:number-columns-spanned="3" table:number-rows-spanned="1">
            <text:p>COMPLETED</text:p>
          </table:table-cell>
          <table:covered-table-cell table:number-columns-repeated="2"/>
          <table:table-cell table:style-name="ce54" table:formula="of:=IF(UPPER(TRIM([.J1065]))=&quot;COMPLETED&quot;;&quot;ALREADY RECONCILED&quot;;&quot;NOT RECONCILED&quot;)" office:value-type="string" office:string-value="ALREADY RECONCILED" ns42:value-type="string" table:number-columns-spanned="3" table:number-rows-spanned="1">
            <text:p>ALREADY RECONCILED</text:p>
          </table:table-cell>
          <table:covered-table-cell table:number-columns-repeated="2"/>
          <table:table-cell table:style-name="ce54" table:formula="of:=IF(UPPER(TRIM([.M1065]))=&quot;ALREADY RECONCILED&quot;;&quot;NO&quot;;&quot;YES&quot;)" office:value-type="string" office:string-value="NO" ns42:value-type="string" table:number-columns-spanned="3" table:number-rows-spanned="1">
            <text:p>NO</text:p>
          </table:table-cell>
          <table:covered-table-cell table:number-columns-repeated="2"/>
        </table:table-row>
        <table:table-row table:style-name="ro5">
          <table:table-cell table:style-name="ce52" office:value-type="string" ns42:value-type="string" table:number-columns-spanned="18" table:number-rows-spanned="1">
            <text:p>🏁 CONTROLLED RECONCILED STATE EXECUTION GATE · BUILD 780</text:p>
          </table:table-cell>
          <table:covered-table-cell table:number-columns-repeated="17"/>
        </table:table-row>
        <table:table-row table:style-name="ro5">
          <table:table-cell table:style-name="ce53" office:value-type="string" ns42:value-type="string" table:number-columns-spanned="3" table:number-rows-spanned="1">
            <text:p>RECONCILIATION</text:p>
          </table:table-cell>
          <table:covered-table-cell table:number-columns-repeated="2"/>
          <table:table-cell table:style-name="ce53" office:value-type="string" ns42:value-type="string" table:number-columns-spanned="3" table:number-rows-spanned="1">
            <text:p>EXPLICIT REQUEST</text:p>
          </table:table-cell>
          <table:covered-table-cell table:number-columns-repeated="2"/>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DJUSTMENT VALID</text:p>
          </table:table-cell>
          <table:covered-table-cell table:number-columns-repeated="2"/>
          <table:table-cell table:style-name="ce53" office:value-type="string" ns42:value-type="string" table:number-columns-spanned="3" table:number-rows-spanned="1">
            <text:p>EXECUTION</text:p>
          </table:table-cell>
          <table:covered-table-cell table:number-columns-repeated="2"/>
          <table:table-cell table:style-name="ce53" office:value-type="string" ns42:value-type="string" table:number-columns-spanned="3" table:number-rows-spanned="1">
            <text:p>FINAL QUANTITY STATE</text:p>
          </table:table-cell>
          <table:covered-table-cell table:number-columns-repeated="2"/>
        </table:table-row>
        <table:table-row table:style-name="ro21">
          <table:table-cell table:style-name="ce54" table:formula="of:=[.P1043]" office:value-type="string" office:string-value="RECONCILED" ns42:value-type="string" table:number-columns-spanned="3" table:number-rows-spanned="1">
            <text:p>RECONCILED</text:p>
          </table:table-cell>
          <table:covered-table-cell table:number-columns-repeated="2"/>
          <table:table-cell table:style-name="ce54" table:formula="of:=[.N1050]" office:value-type="string" office:string-value="VALID REQUEST" ns42:value-type="string" table:number-columns-spanned="3" table:number-rows-spanned="1">
            <text:p>VALID REQUEST</text:p>
          </table:table-cell>
          <table:covered-table-cell table:number-columns-repeated="2"/>
          <table:table-cell table:style-name="ce54" table:formula="of:=[.P1053]" office:value-type="string" office:string-value="GRANTED" ns42:value-type="string" table:number-columns-spanned="3" table:number-rows-spanned="1">
            <text:p>GRANTED</text:p>
          </table:table-cell>
          <table:covered-table-cell table:number-columns-repeated="2"/>
          <table:table-cell table:style-name="ce54" table:formula="of:=[.P1056]" office:value-type="string" office:string-value="YES" ns42:value-type="string" table:number-columns-spanned="3" table:number-rows-spanned="1">
            <text:p>YES</text:p>
          </table:table-cell>
          <table:covered-table-cell table:number-columns-repeated="2"/>
          <table:table-cell table:style-name="ce54" table:formula="of:=[.J1065]" office:value-type="string" office:string-value="COMPLETED" ns42:value-type="string" table:number-columns-spanned="3" table:number-rows-spanned="1">
            <text:p>COMPLETED</text:p>
          </table:table-cell>
          <table:covered-table-cell table:number-columns-repeated="2"/>
          <table:table-cell table:style-name="ce54" table:formula="of:=IF(AND(UPPER(TRIM([.A1068]))=&quot;RECONCILED&quot;;UPPER(TRIM([.D1068]))=&quot;VALID REQUEST&quot;;UPPER(TRIM([.G1068]))=&quot;GRANTED&quot;;UPPER(TRIM([.J1068]))=&quot;YES&quot;;UPPER(TRIM([.M1068]))=&quot;COMPLETED&quot;);[.P1059];&quot;NOT WRITTEN&quot;)"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ADJUSTMENT TRUTH · BUILDS 781–84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CONCILED STATE</text:p>
          </table:table-cell>
          <table:covered-table-cell table:number-columns-repeated="2"/>
          <table:table-cell table:style-name="ce53" office:value-type="string" ns42:value-type="string" table:number-columns-spanned="3" table:number-rows-spanned="1">
            <text:p>FINAL QUANTITY</text:p>
          </table:table-cell>
          <table:covered-table-cell table:number-columns-repeated="2"/>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office:value-type="string" ns42:value-type="string" table:number-columns-spanned="3" table:number-rows-spanned="1">
            <text:p>INV-000001</text:p>
          </table:table-cell>
          <table:covered-table-cell table:number-columns-repeated="2"/>
          <table:table-cell table:style-name="ce54" table:formula="of:=IF(UPPER(TRIM([.A1068]))=&quot;RECONCILED&quot;;&quot;RECONCILED&quot;;&quot;INVALID&quot;)" office:value-type="string" office:string-value="RECONCILED" ns42:value-type="string" table:number-columns-spanned="3" table:number-rows-spanned="1">
            <text:p>RECONCILED</text:p>
          </table:table-cell>
          <table:covered-table-cell table:number-columns-repeated="2"/>
          <table:table-cell table:style-name="ce54" table:formula="of:=[.P1068]" office:value-type="string" office:string-value="0" ns42:value-type="string" table:number-columns-spanned="3" table:number-rows-spanned="1">
            <text:p>0</text:p>
          </table:table-cell>
          <table:covered-table-cell table:number-columns-repeated="2"/>
          <table:table-cell table:style-name="ce54" table:formula="of:=IF(AND(UPPER(TRIM([.D1062]))=&quot;INV-000001&quot;;VALUE([.J1062])=VALUE([.G1072]));&quot;YES&quot;;&quot;NO&quot;)" office:value-type="string" office:string-value="YES" ns42:value-type="string" table:number-columns-spanned="3" table:number-rows-spanned="1">
            <text:p>YES</text:p>
          </table:table-cell>
          <table:covered-table-cell table:number-columns-repeated="2"/>
          <table:table-cell table:style-name="ce54" table:formula="of:=IF(AND(UPPER(TRIM([.D1072]))=&quot;RECONCILED&quot;;VALUE([.G1072])&gt;=0;UPPER(TRIM([.J1072]))=&quot;YES&quot;);&quot;VERIFIED&quot;;&quot;INVALID&quot;)" office:value-type="string" office:string-value="VERIFIED" ns42:value-type="string" table:number-columns-spanned="3" table:number-rows-spanned="1">
            <text:p>VERIFIED</text:p>
          </table:table-cell>
          <table:covered-table-cell table:number-columns-repeated="2"/>
          <table:table-cell table:style-name="ce54" table:formula="of:=IF(UPPER(TRIM([.M1072]))=&quot;VERIFIED&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DJUSTMENT TRUTH REQUIRES RECONCILED STATE + NONNEGATIVE FINAL QUANTITY + MATCHED APPEND-ONLY HISTORY</text:p>
          </table:table-cell>
          <table:covered-table-cell table:number-columns-repeated="17"/>
        </table:table-row>
        <table:table-row table:style-name="ro5">
          <table:table-cell table:style-name="ce52" office:value-type="string" ns42:value-type="string" table:number-columns-spanned="18" table:number-rows-spanned="1">
            <text:p>📦 STOCK AVAILABILITY DERIVATION · BUILDS 841–900</text:p>
          </table:table-cell>
          <table:covered-table-cell table:number-columns-repeated="17"/>
        </table:table-row>
        <table:table-row table:style-name="ro5">
          <table:table-cell table:style-name="ce53" office:value-type="string" ns42:value-type="string" table:number-columns-spanned="3" table:number-rows-spanned="1">
            <text:p>AUTHORITATIVE QUANTITY</text:p>
          </table:table-cell>
          <table:covered-table-cell table:number-columns-repeated="2"/>
          <table:table-cell table:style-name="ce53" office:value-type="string" ns42:value-type="string" table:number-columns-spanned="3" table:number-rows-spanned="1">
            <text:p>ACTIVE RESERVATIONS</text:p>
          </table:table-cell>
          <table:covered-table-cell table:number-columns-repeated="2"/>
          <table:table-cell table:style-name="ce53" office:value-type="string" ns42:value-type="string" table:number-columns-spanned="3" table:number-rows-spanned="1">
            <text:p>DERIVED AVAILABLE</text:p>
          </table:table-cell>
          <table:covered-table-cell table:number-columns-repeated="2"/>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DERIVATION VALID</text:p>
          </table:table-cell>
          <table:covered-table-cell table:number-columns-repeated="2"/>
          <table:table-cell table:style-name="ce53" office:value-type="string" ns42:value-type="string" table:number-columns-spanned="3" table:number-rows-spanned="1">
            <text:p>AVAILABILITY RESULT</text:p>
          </table:table-cell>
          <table:covered-table-cell table:number-columns-repeated="2"/>
        </table:table-row>
        <table:table-row table:style-name="ro21">
          <table:table-cell table:style-name="ce54" table:formula="of:=[.G1072]" office:value-type="string" office:string-value="0"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table:formula="of:=VALUE([.A1076])-VALUE([.D1076])" office:value-type="string" office:string-value="0" ns42:value-type="string" table:number-columns-spanned="3" table:number-rows-spanned="1">
            <text:p>0</text:p>
          </table:table-cell>
          <table:covered-table-cell table:number-columns-repeated="2"/>
          <table:table-cell table:style-name="ce54" table:formula="of:=IF(VALUE([.G1076])&gt;=0;&quot;YES&quot;;&quot;NO&quot;)" office:value-type="string" office:string-value="YES" ns42:value-type="string" table:number-columns-spanned="3" table:number-rows-spanned="1">
            <text:p>YES</text:p>
          </table:table-cell>
          <table:covered-table-cell table:number-columns-repeated="2"/>
          <table:table-cell table:style-name="ce54" table:formula="of:=IF(AND(UPPER(TRIM([.P1072]))=&quot;VERIFIED&quot;;UPPER(TRIM([.J1076]))=&quot;YES&quot;);&quot;YES&quot;;&quot;NO&quot;)" office:value-type="string" office:string-value="YES" ns42:value-type="string" table:number-columns-spanned="3" table:number-rows-spanned="1">
            <text:p>YES</text:p>
          </table:table-cell>
          <table:covered-table-cell table:number-columns-repeated="2"/>
          <table:table-cell table:style-name="ce54" table:formula="of:=IF(UPPER(TRIM([.M1076]))=&quot;YES&quot;;&quot;VERIFIED&quot;;&quot;INVALI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VAILABLE STOCK IS DERIVED ONLY FROM AUTHORITATIVE QUANTITY LESS ACTIVE RESERVATIONS; NEGATIVE AVAILABILITY FAILS CLOSED</text:p>
          </table:table-cell>
          <table:covered-table-cell table:number-columns-repeated="17"/>
        </table:table-row>
        <table:table-row table:style-name="ro5">
          <table:table-cell table:style-name="ce52" office:value-type="string" ns42:value-type="string" table:number-columns-spanned="18" table:number-rows-spanned="1">
            <text:p>🛡️ SELLABLE QUANTITY AUTHORITY · BUILDS 901–960</text:p>
          </table:table-cell>
          <table:covered-table-cell table:number-columns-repeated="17"/>
        </table:table-row>
        <table:table-row table:style-name="ro5">
          <table:table-cell table:style-name="ce53" office:value-type="string" ns42:value-type="string" table:number-columns-spanned="3" table:number-rows-spanned="1">
            <text:p>AVAILABILITY VERIFIED</text:p>
          </table:table-cell>
          <table:covered-table-cell table:number-columns-repeated="2"/>
          <table:table-cell table:style-name="ce53" office:value-type="string" ns42:value-type="string" table:number-columns-spanned="3" table:number-rows-spanned="1">
            <text:p>LISTING ID PRESENT</text:p>
          </table:table-cell>
          <table:covered-table-cell table:number-columns-repeated="2"/>
          <table:table-cell table:style-name="ce53" office:value-type="string" ns42:value-type="string" table:number-columns-spanned="3" table:number-rows-spanned="1">
            <text:p>PLATFORM VALID</text:p>
          </table:table-cell>
          <table:covered-table-cell table:number-columns-repeated="2"/>
          <table:table-cell table:style-name="ce53" office:value-type="string" ns42:value-type="string" table:number-columns-spanned="3" table:number-rows-spanned="1">
            <text:p>AVAILABLE QUANTITY</text:p>
          </table:table-cell>
          <table:covered-table-cell table:number-columns-repeated="2"/>
          <table:table-cell table:style-name="ce53" office:value-type="string" ns42:value-type="string" table:number-columns-spanned="3" table:number-rows-spanned="1">
            <text:p>SELLABLE ELIGIBILITY</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table:formula="of:=IF(UPPER(TRIM([.P1076]))=&quot;VERIFIED&quot;;&quot;YES&quot;;&quot;NO&quot;)" office:value-type="string" office:string-value="YES" ns42:value-type="string" table:number-columns-spanned="3" table:number-rows-spanned="1">
            <text:p>YES</text:p>
          </table:table-cell>
          <table:covered-table-cell table:number-columns-repeated="2"/>
          <table:table-cell table:style-name="ce54" table:formula="of:=IF(TRIM([.P810])&lt;&gt;&quot;&quot;;&quot;YES&quot;;&quot;NO&quot;)" office:value-type="string" office:string-value="YES" ns42:value-type="string" table:number-columns-spanned="3" table:number-rows-spanned="1">
            <text:p>YES</text:p>
          </table:table-cell>
          <table:covered-table-cell table:number-columns-repeated="2"/>
          <table:table-cell table:style-name="ce54" table:formula="of:=IF(UPPER(TRIM([.D810]))=&quot;EBAY&quot;;&quot;YES&quot;;&quot;NO&quot;)" office:value-type="string" office:string-value="YES" ns42:value-type="string" table:number-columns-spanned="3" table:number-rows-spanned="1">
            <text:p>YES</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IF(AND(UPPER(TRIM([.A1080]))=&quot;YES&quot;;UPPER(TRIM([.D1080]))=&quot;YES&quot;;UPPER(TRIM([.G1080]))=&quot;YES&quot;;VALUE([.J108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80]))=&quot;ELIGIBLE&quot;;&quot;GRANTED&quot;;&quot;DENI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ZERO AVAILABLE QUANTITY MUST NEVER RECEIVE SELLABLE AUTHORITY; AUTHORITY IS DERIVED AND FAIL-CLOSED</text:p>
          </table:table-cell>
          <table:covered-table-cell table:number-columns-repeated="17"/>
        </table:table-row>
        <table:table-row table:style-name="ro5">
          <table:table-cell table:style-name="ce52" office:value-type="string" ns42:value-type="string" table:number-columns-spanned="18" table:number-rows-spanned="1">
            <text:p>📥 INVENTORY RESERVATION EVIDENCE · BUILDS 961–1020</text:p>
          </table:table-cell>
          <table:covered-table-cell table:number-columns-repeated="17"/>
        </table:table-row>
        <table:table-row table:style-name="ro5">
          <table:table-cell table:style-name="ce53" office:value-type="string" ns42:value-type="string" table:number-columns-spanned="3" table:number-rows-spanned="1">
            <text:p>RESERVATION ID</text:p>
          </table:table-cell>
          <table:covered-table-cell table:number-columns-repeated="2"/>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REQUESTED QUANT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QUEST EVIDENCE</text:p>
          </table:table-cell>
          <table:covered-table-cell table:number-columns-repeated="2"/>
          <table:table-cell table:style-name="ce53" office:value-type="string" ns42:value-type="string" table:number-columns-spanned="3" table:number-rows-spanned="1">
            <text:p>RESERVATION ELIGIBILITY</text:p>
          </table:table-cell>
          <table:covered-table-cell table:number-columns-repeated="2"/>
        </table:table-row>
        <table:table-row table:style-name="ro21">
          <table:table-cell table:style-name="ce54" office:value-type="string" ns42:value-type="string" table:number-columns-spanned="3" table:number-rows-spanned="1">
            <text:p>RSV-000001</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IF(AND(TRIM([.A1084])&lt;&gt;&quot;&quot;;TRIM([.D1084])&lt;&gt;&quot;&quot;;VALUE([.G1084])&gt;0);&quot;COMPLETE&quot;;&quot;INCOMPLETE&quot;)" office:value-type="string" office:string-value="COMPLETE" ns42:value-type="string" table:number-columns-spanned="3" table:number-rows-spanned="1">
            <text:p>COMPLETE</text:p>
          </table:table-cell>
          <table:covered-table-cell table:number-columns-repeated="2"/>
          <table:table-cell table:style-name="ce54" table:formula="of:=IF(AND(UPPER(TRIM([.J1084]))=&quot;GRANTED&quot;;UPPER(TRIM([.M1084]))=&quot;COMPLETE&quot;;VALUE([.G1084])&lt;=VALUE([.J1080]));&quot;ELIGIBLE&quot;;&quot;NOT ELIGIBLE&quot;)" office:value-type="string" office:string-value="NOT ELIGIBLE" ns42:value-type="string" table:number-columns-spanned="3" table:number-rows-spanned="1">
            <text:p>NOT ELIGIBLE</text:p>
          </table:table-cell>
          <table:covered-table-cell table:number-columns-repeated="2"/>
        </table:table-row>
        <table:table-row table:style-name="ro5">
          <table:table-cell table:style-name="ce54" office:value-type="string" ns42:value-type="string" table:number-columns-spanned="18" table:number-rows-spanned="1">
            <text:p>RESERVATION EVIDENCE MAY PROVE A REQUEST BUT CANNOT OVERRIDE DENIED SELLABLE AUTHORITY OR INSUFFICIENT QUANTITY</text:p>
          </table:table-cell>
          <table:covered-table-cell table:number-columns-repeated="17"/>
        </table:table-row>
        <table:table-row table:style-name="ro5">
          <table:table-cell table:style-name="ce52" office:value-type="string" ns42:value-type="string" table:number-columns-spanned="18" table:number-rows-spanned="1">
            <text:p>⚙️ RESERVATION EXECUTION CONTROL · BUILDS 1021–1080</text:p>
          </table:table-cell>
          <table:covered-table-cell table:number-columns-repeated="17"/>
        </table:table-row>
        <table:table-row table:style-name="ro5">
          <table:table-cell table:style-name="ce53" office:value-type="string" ns42:value-type="string" table:number-columns-spanned="3" table:number-rows-spanned="1">
            <text:p>REQUEST VALID</text:p>
          </table:table-cell>
          <table:covered-table-cell table:number-columns-repeated="2"/>
          <table:table-cell table:style-name="ce53" office:value-type="string" ns42:value-type="string" table:number-columns-spanned="3" table:number-rows-spanned="1">
            <text:p>RESERVATION ELIGIBLE</text:p>
          </table:table-cell>
          <table:covered-table-cell table:number-columns-repeated="2"/>
          <table:table-cell table:style-name="ce53" office:value-type="string" ns42:value-type="string" table:number-columns-spanned="3" table:number-rows-spanned="1">
            <text:p>AUTHORITY REVALIDATE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EXECUTION RESULT</text:p>
          </table:table-cell>
          <table:covered-table-cell table:number-columns-repeated="2"/>
          <table:table-cell table:style-name="ce53" office:value-type="string" ns42:value-type="string" table:number-columns-spanned="3" table:number-rows-spanned="1">
            <text:p>RESERVED QUANTITY</text:p>
          </table:table-cell>
          <table:covered-table-cell table:number-columns-repeated="2"/>
        </table:table-row>
        <table:table-row table:style-name="ro21">
          <table:table-cell table:style-name="ce54" table:formula="of:=IF(UPPER(TRIM([.M1084]))=&quot;COMPLETE&quot;;&quot;YES&quot;;&quot;NO&quot;)" office:value-type="string" office:string-value="YES" ns42:value-type="string" table:number-columns-spanned="3" table:number-rows-spanned="1">
            <text:p>YES</text:p>
          </table:table-cell>
          <table:covered-table-cell table:number-columns-repeated="2"/>
          <table:table-cell table:style-name="ce54" table:formula="of:=IF(UPPER(TRIM([.P1084]))=&quot;ELIGIBLE&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4]))=&quot;GRANTED&quot;;&quot;YES&quot;;&quot;NO&quot;)" office:value-type="string" office:string-value="NO" ns42:value-type="string" table:number-columns-spanned="3" table:number-rows-spanned="1">
            <text:p>NO</text:p>
          </table:table-cell>
          <table:covered-table-cell table:number-columns-repeated="2"/>
          <table:table-cell table:style-name="ce54" table:formula="of:=IF(AND(UPPER(TRIM([.A1088]))=&quot;YES&quot;;UPPER(TRIM([.D1088]))=&quot;YES&quot;;UPPER(TRIM([.G1088]))=&quot;YES&quot;);&quot;YES&quot;;&quot;NO&quot;)" office:value-type="string" office:string-value="NO" ns42:value-type="string" table:number-columns-spanned="3" table:number-rows-spanned="1">
            <text:p>NO</text:p>
          </table:table-cell>
          <table:covered-table-cell table:number-columns-repeated="2"/>
          <table:table-cell table:style-name="ce54" table:formula="of:=IF(UPPER(TRIM([.J1088]))=&quot;YES&quot;;&quot;EXECUTED&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088]))=&quot;EXECUTED&quot;;[.G1084];0)" office:value-type="string" office:string-value="0" ns42:value-type="string" table:number-columns-spanned="3" table:number-rows-spanned="1">
            <text:p>0</text:p>
          </table:table-cell>
          <table:covered-table-cell table:number-columns-repeated="2"/>
        </table:table-row>
        <table:table-row table:style-name="ro5">
          <table:table-cell table:style-name="ce54" office:value-type="string" ns42:value-type="string" table:number-columns-spanned="18" table:number-rows-spanned="1">
            <text:p>CONTROLLED RESERVATION WRITE REQUIRES VALID REQUEST + ELIGIBILITY + REVALIDATED AUTHORITY; FAILED CONTROL CREATES NO WRITE</text:p>
          </table:table-cell>
          <table:covered-table-cell table:number-columns-repeated="17"/>
        </table:table-row>
        <table:table-row table:style-name="ro5">
          <table:table-cell table:style-name="ce52" office:value-type="string" ns42:value-type="string" table:number-columns-spanned="18" table:number-rows-spanned="1">
            <text:p>🔁 RELEASE + CANCELLATION CONTROLS · BUILDS 1081–1140</text:p>
          </table:table-cell>
          <table:covered-table-cell table:number-columns-repeated="17"/>
        </table:table-row>
        <table:table-row table:style-name="ro5">
          <table:table-cell table:style-name="ce53" office:value-type="string" ns42:value-type="string" table:number-columns-spanned="3" table:number-rows-spanned="1">
            <text:p>RESERVATION EXECUTED</text:p>
          </table:table-cell>
          <table:covered-table-cell table:number-columns-repeated="2"/>
          <table:table-cell table:style-name="ce53" office:value-type="string" ns42:value-type="string" table:number-columns-spanned="3" table:number-rows-spanned="1">
            <text:p>ACTIVE RESERV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CANCEL REQUEST</text:p>
          </table:table-cell>
          <table:covered-table-cell table:number-columns-repeated="2"/>
          <table:table-cell table:style-name="ce53" office:value-type="string" ns42:value-type="string" table:number-columns-spanned="3" table:number-rows-spanned="1">
            <text:p>RELEASE ELIGIBILITY</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IF(UPPER(TRIM([.M1088]))=&quot;EXECUTED&quot;;&quot;YES&quot;;&quot;NO&quot;)" office:value-type="string" office:string-value="NO" ns42:value-type="string" table:number-columns-spanned="3" table:number-rows-spanned="1">
            <text:p>NO</text:p>
          </table:table-cell>
          <table:covered-table-cell table:number-columns-repeated="2"/>
          <table:table-cell table:style-name="ce54" table:formula="of:=IF(VALUE([.P1088])&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092]))=&quot;YES&quot;;UPPER(TRIM([.D1092]))=&quot;YES&quot;;OR(UPPER(TRIM([.G1092]))=&quot;YES&quot;;UPPER(TRIM([.J1092]))=&quot;YES&quot;));&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M1092]))=&quot;ELIGIBLE&quot;;&quot;CONTROLLED RELEASE&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OR CANCELLATION CANNOT MUTATE INVENTORY WITHOUT AN EXECUTED ACTIVE RESERVATION AND EXPLICIT CONTROL REQUEST</text:p>
          </table:table-cell>
          <table:covered-table-cell table:number-columns-repeated="17"/>
        </table:table-row>
        <table:table-row table:style-name="ro5">
          <table:table-cell table:style-name="ce52" office:value-type="string" ns42:value-type="string" table:number-columns-spanned="18" table:number-rows-spanned="1">
            <text:p>🏁 CONTROLLED AVAILABLE INVENTORY TRUTH GATE · BUILD 1200</text:p>
          </table:table-cell>
          <table:covered-table-cell table:number-columns-repeated="17"/>
        </table:table-row>
        <table:table-row table:style-name="ro5">
          <table:table-cell table:style-name="ce53" office:value-type="string" ns42:value-type="string" table:number-columns-spanned="3" table:number-rows-spanned="1">
            <text:p>ADJUSTMENT TRUTH</text:p>
          </table:table-cell>
          <table:covered-table-cell table:number-columns-repeated="2"/>
          <table:table-cell table:style-name="ce53" office:value-type="string" ns42:value-type="string" table:number-columns-spanned="3" table:number-rows-spanned="1">
            <text:p>AVAILABILITY</text:p>
          </table:table-cell>
          <table:covered-table-cell table:number-columns-repeated="2"/>
          <table:table-cell table:style-name="ce53" office:value-type="string" ns42:value-type="string" table:number-columns-spanned="3" table:number-rows-spanned="1">
            <text:p>SELLABLE AUTHORITY</text:p>
          </table:table-cell>
          <table:covered-table-cell table:number-columns-repeated="2"/>
          <table:table-cell table:style-name="ce53" office:value-type="string" ns42:value-type="string" table:number-columns-spanned="3" table:number-rows-spanned="1">
            <text:p>RESERVATION CONTROL</text:p>
          </table:table-cell>
          <table:covered-table-cell table:number-columns-repeated="2"/>
          <table:table-cell table:style-name="ce53" office:value-type="string" ns42:value-type="string" table:number-columns-spanned="3" table:number-rows-spanned="1">
            <text:p>RELEASE CONTROL</text:p>
          </table:table-cell>
          <table:covered-table-cell table:number-columns-repeated="2"/>
          <table:table-cell table:style-name="ce53" office:value-type="string" ns42:value-type="string" table:number-columns-spanned="3" table:number-rows-spanned="1">
            <text:p>AVAILABLE INVENTORY TRUTH</text:p>
          </table:table-cell>
          <table:covered-table-cell table:number-columns-repeated="2"/>
        </table:table-row>
        <table:table-row table:style-name="ro21">
          <table:table-cell table:style-name="ce54" table:formula="of:=[.P1072]" office:value-type="string" office:string-value="VERIFIED" ns42:value-type="string" table:number-columns-spanned="3" table:number-rows-spanned="1">
            <text:p>VERIFIED</text:p>
          </table:table-cell>
          <table:covered-table-cell table:number-columns-repeated="2"/>
          <table:table-cell table:style-name="ce54" table:formula="of:=[.P1076]" office:value-type="string" office:string-value="VERIFIED" ns42:value-type="string" table:number-columns-spanned="3" table:number-rows-spanned="1">
            <text:p>VERIFIED</text:p>
          </table:table-cell>
          <table:covered-table-cell table:number-columns-repeated="2"/>
          <table:table-cell table:style-name="ce54" table:formula="of:=[.P1080]" office:value-type="string" office:string-value="DENIED" ns42:value-type="string" table:number-columns-spanned="3" table:number-rows-spanned="1">
            <text:p>DENI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096]))=&quot;VERIFIED&quot;;UPPER(TRIM([.D1096]))=&quot;VERIFIED&quot;;UPPER(TRIM([.G1096]))=&quot;DENIED&quot;;UPPER(TRIM([.J1096]))=&quot;NO WRITE&quot;;UPPER(TRIM([.M1096]))=&quot;NO ACTION&quot;;VALUE([.G1076])=0);&quot;VERIFIED ZERO AVAILABLE&quot;;&quot;FAILED&quot;)" office:value-type="string" office:string-value="VERIFIED ZERO AVAILABLE" ns42:value-type="string" table:number-columns-spanned="3" table:number-rows-spanned="1">
            <text:p>VERIFIED ZERO AVAILABLE</text:p>
          </table:table-cell>
          <table:covered-table-cell table:number-columns-repeated="2"/>
        </table:table-row>
        <table:table-row table:style-name="ro5">
          <table:table-cell table:style-name="ce54" office:value-type="string" ns42:value-type="string" table:number-columns-spanned="18" table:number-rows-spanned="1">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OVERSELL PREVENTION · BUILDS 1201–1600</text:p>
          </table:table-cell>
          <table:covered-table-cell table:number-columns-repeated="17"/>
        </table:table-row>
        <table:table-row table:style-name="ro5">
          <table:table-cell table:style-name="ce53" office:value-type="string" ns42:value-type="string" table:number-columns-spanned="3" table:number-rows-spanned="1">
            <text:p>AVAILABLE TRUTH</text:p>
          </table:table-cell>
          <table:covered-table-cell table:number-columns-repeated="2"/>
          <table:table-cell table:style-name="ce53" office:value-type="string" ns42:value-type="string" table:number-columns-spanned="3" table:number-rows-spanned="1">
            <text:p>REQUESTED QTY</text:p>
          </table:table-cell>
          <table:covered-table-cell table:number-columns-repeated="2"/>
          <table:table-cell table:style-name="ce53" office:value-type="string" ns42:value-type="string" table:number-columns-spanned="3" table:number-rows-spanned="1">
            <text:p>CAPACITY CHECK</text:p>
          </table:table-cell>
          <table:covered-table-cell table:number-columns-repeated="2"/>
          <table:table-cell table:style-name="ce53" office:value-type="string" ns42:value-type="string" table:number-columns-spanned="3" table:number-rows-spanned="1">
            <text:p>OVERSOLD</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row>
        <table:table-row table:style-name="ro21">
          <table:table-cell table:style-name="ce54" table:formula="of:=[.P1096]" office:value-type="string" office:string-value="VERIFIED ZERO AVAILABLE" ns42:value-type="string" table:number-columns-spanned="3" table:number-rows-spanned="1">
            <text:p>VERIFIED ZERO AVAILABLE</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IF(VALUE([.D1100])&lt;=VALUE([.G1076]);&quot;PASS&quot;;&quot;FAIL&quot;)" office:value-type="string" office:string-value="FAIL" ns42:value-type="string" table:number-columns-spanned="3" table:number-rows-spanned="1">
            <text:p>FAIL</text:p>
          </table:table-cell>
          <table:covered-table-cell table:number-columns-repeated="2"/>
          <table:table-cell table:style-name="ce54" table:formula="of:=IF(UPPER(TRIM([.G1100]))=&quot;PASS&quot;;&quot;NO&quot;;&quot;NO&quot;)" office:value-type="string" office:string-value="NO" ns42:value-type="string" table:number-columns-spanned="3" table:number-rows-spanned="1">
            <text:p>NO</text:p>
          </table:table-cell>
          <table:covered-table-cell table:number-columns-repeated="2"/>
          <table:table-cell table:style-name="ce54" table:formula="of:=IF(UPPER(TRIM([.G1100]))=&quot;PASS&quot;;&quot;YES&quot;;&quot;NO&quot;)" office:value-type="string" office:string-value="NO" ns42:value-type="string" table:number-columns-spanned="3" table:number-rows-spanned="1">
            <text:p>NO</text:p>
          </table:table-cell>
          <table:covered-table-cell table:number-columns-repeated="2"/>
          <table:table-cell table:style-name="ce54" table:formula="of:=IF(UPPER(TRIM([.M1100]))=&quot;YES&quot;;&quot;AUTHORIZ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ZERO AVAILABLE INVENTORY MUST BLOCK POSITIVE QUANTITY REQUESTS BEFORE ANY CONTROLLED WRITE</text:p>
          </table:table-cell>
          <table:covered-table-cell table:number-columns-repeated="17"/>
        </table:table-row>
        <table:table-row table:style-name="ro5">
          <table:table-cell table:style-name="ce52" office:value-type="string" ns42:value-type="string" table:number-columns-spanned="18" table:number-rows-spanned="1">
            <text:p>📦 MULTI-UNIT INVENTORY TRUTH · BUILDS 1601–2000</text:p>
          </table:table-cell>
          <table:covered-table-cell table:number-columns-repeated="17"/>
        </table:table-row>
        <table:table-row table:style-name="ro5">
          <table:table-cell table:style-name="ce53" office:value-type="string" ns42:value-type="string" table:number-columns-spanned="3" table:number-rows-spanned="1">
            <text:p>UNIT COST BASIS</text:p>
          </table:table-cell>
          <table:covered-table-cell table:number-columns-repeated="2"/>
          <table:table-cell table:style-name="ce53" office:value-type="string" ns42:value-type="string" table:number-columns-spanned="3" table:number-rows-spanned="1">
            <text:p>ORIGINAL QTY</text:p>
          </table:table-cell>
          <table:covered-table-cell table:number-columns-repeated="2"/>
          <table:table-cell table:style-name="ce53" office:value-type="string" ns42:value-type="string" table:number-columns-spanned="3" table:number-rows-spanned="1">
            <text:p>SOLD QTY</text:p>
          </table:table-cell>
          <table:covered-table-cell table:number-columns-repeated="2"/>
          <table:table-cell table:style-name="ce53" office:value-type="string" ns42:value-type="string" table:number-columns-spanned="3" table:number-rows-spanned="1">
            <text:p>REMAINING QTY</text:p>
          </table:table-cell>
          <table:covered-table-cell table:number-columns-repeated="2"/>
          <table:table-cell table:style-name="ce53" office:value-type="string" ns42:value-type="string" table:number-columns-spanned="3" table:number-rows-spanned="1">
            <text:p>QUANTITY VALID</text:p>
          </table:table-cell>
          <table:covered-table-cell table:number-columns-repeated="2"/>
          <table:table-cell table:style-name="ce53" office:value-type="string" ns42:value-type="string" table:number-columns-spanned="3" table:number-rows-spanned="1">
            <text:p>TRUTH RESULT</text:p>
          </table:table-cell>
          <table:covered-table-cell table:number-columns-repeated="2"/>
        </table:table-row>
        <table:table-row table:style-name="ro21">
          <table:table-cell table:style-name="ce54" table:formula="of:=[.G932]" office:value-type="string" office:string-value="50.00" ns42:value-type="string" table:number-columns-spanned="3" table:number-rows-spanned="1">
            <text:p>50.00</text:p>
          </table:table-cell>
          <table:covered-table-cell table:number-columns-repeated="2"/>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D1104])-VALUE([.G1104])" office:value-type="string" office:string-value="0" ns42:value-type="string" table:number-columns-spanned="3" table:number-rows-spanned="1">
            <text:p>0</text:p>
          </table:table-cell>
          <table:covered-table-cell table:number-columns-repeated="2"/>
          <table:table-cell table:style-name="ce54" table:formula="of:=IF(AND(VALUE([.J1104])&gt;=0;VALUE([.J1104])&lt;=VALUE([.D1104]));&quot;YES&quot;;&quot;NO&quot;)" office:value-type="string" office:string-value="YES" ns42:value-type="string" table:number-columns-spanned="3" table:number-rows-spanned="1">
            <text:p>YES</text:p>
          </table:table-cell>
          <table:covered-table-cell table:number-columns-repeated="2"/>
          <table:table-cell table:style-name="ce54" table:formula="of:=IF(UPPER(TRIM([.M1104]))=&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MULTI-UNIT TRUTH DERIVES REMAINING QUANTITY FROM ORIGINAL QUANTITY LESS SOLD QUANTITY AND FAILS CLOSED ON INVALID COUNTS</text:p>
          </table:table-cell>
          <table:covered-table-cell table:number-columns-repeated="17"/>
        </table:table-row>
        <table:table-row table:style-name="ro5">
          <table:table-cell table:style-name="ce52" office:value-type="string" ns42:value-type="string" table:number-columns-spanned="18" table:number-rows-spanned="1">
            <text:p>🔐 CONCURRENT RESERVATION AUTHORITY · BUILDS 2001–2400</text:p>
          </table:table-cell>
          <table:covered-table-cell table:number-columns-repeated="17"/>
        </table:table-row>
        <table:table-row table:style-name="ro5">
          <table:table-cell table:style-name="ce53" office:value-type="string" ns42:value-type="string" table:number-columns-spanned="3" table:number-rows-spanned="1">
            <text:p>RESERVATION A</text:p>
          </table:table-cell>
          <table:covered-table-cell table:number-columns-repeated="2"/>
          <table:table-cell table:style-name="ce53" office:value-type="string" ns42:value-type="string" table:number-columns-spanned="3" table:number-rows-spanned="1">
            <text:p>RESERVATION B</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ce53" office:value-type="string" ns42:value-type="string" table:number-columns-spanned="3" table:number-rows-spanned="1">
            <text:p>TOTAL REQUESTED</text:p>
          </table:table-cell>
          <table:covered-table-cell table:number-columns-repeated="2"/>
          <table:table-cell table:style-name="ce53" office:value-type="string" ns42:value-type="string" table:number-columns-spanned="3" table:number-rows-spanned="1">
            <text:p>CONFLICT</text:p>
          </table:table-cell>
          <table:covered-table-cell table:number-columns-repeated="2"/>
          <table:table-cell table:style-name="ce53" office:value-type="string" ns42:value-type="string" table:number-columns-spanned="3" table:number-rows-spanned="1">
            <text:p>AUTHORITY RESULT</text:p>
          </table:table-cell>
          <table:covered-table-cell table:number-columns-repeated="2"/>
        </table:table-row>
        <table:table-row table:style-name="ro21">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A1108])+VALUE([.D1108])" office:value-type="string" office:string-value="2" ns42:value-type="string" table:number-columns-spanned="3" table:number-rows-spanned="1">
            <text:p>2</text:p>
          </table:table-cell>
          <table:covered-table-cell table:number-columns-repeated="2"/>
          <table:table-cell table:style-name="ce54" table:formula="of:=IF(VALUE([.J1108])&gt;VALUE([.G1108]);&quot;YES&quot;;&quot;NO&quot;)" office:value-type="string" office:string-value="YES" ns42:value-type="string" table:number-columns-spanned="3" table:number-rows-spanned="1">
            <text:p>YES</text:p>
          </table:table-cell>
          <table:covered-table-cell table:number-columns-repeated="2"/>
          <table:table-cell table:style-name="ce54" table:formula="of:=IF(UPPER(TRIM([.M1108]))=&quot;YES&quot;;&quot;DENIED&quot;;&quot;GRANTED&quot;)" office:value-type="string" office:string-value="DENIED" ns42:value-type="string" table:number-columns-spanned="3" table:number-rows-spanned="1">
            <text:p>DENIED</text:p>
          </table:table-cell>
          <table:covered-table-cell table:number-columns-repeated="2"/>
        </table:table-row>
        <table:table-row table:style-name="ro5">
          <table:table-cell table:style-name="ce54" office:value-type="string" ns42:value-type="string" table:number-columns-spanned="18" table:number-rows-spanned="1">
            <text:p>CONCURRENT REQUESTS ARE EVALUATED AGAINST ONE AUTHORITATIVE AVAILABILITY VALUE; OVER-ALLOCATION CONFLICT DENIES AUTHORITY</text:p>
          </table:table-cell>
          <table:covered-table-cell table:number-columns-repeated="17"/>
        </table:table-row>
        <table:table-row table:style-name="ro5">
          <table:table-cell table:style-name="ce52" office:value-type="string" ns42:value-type="string" table:number-columns-spanned="18" table:number-rows-spanned="1">
            <text:p>🧮 ALLOCATION + DEPLETION INTEGRITY · BUILDS 2401–2800</text:p>
          </table:table-cell>
          <table:covered-table-cell table:number-columns-repeated="17"/>
        </table:table-row>
        <table:table-row table:style-name="ro5">
          <table:table-cell table:style-name="ce53" office:value-type="string" ns42:value-type="string" table:number-columns-spanned="3" table:number-rows-spanned="1">
            <text:p>AUTHORITY</text:p>
          </table:table-cell>
          <table:covered-table-cell table:number-columns-repeated="2"/>
          <table:table-cell table:style-name="ce53" office:value-type="string" ns42:value-type="string" table:number-columns-spanned="3" table:number-rows-spanned="1">
            <text:p>ALLOCATED QTY</text:p>
          </table:table-cell>
          <table:covered-table-cell table:number-columns-repeated="2"/>
          <table:table-cell table:style-name="ce53" office:value-type="string" ns42:value-type="string" table:number-columns-spanned="3" table:number-rows-spanned="1">
            <text:p>PRE-WRITE QTY</text:p>
          </table:table-cell>
          <table:covered-table-cell table:number-columns-repeated="2"/>
          <table:table-cell table:style-name="ce53" office:value-type="string" ns42:value-type="string" table:number-columns-spanned="3" table:number-rows-spanned="1">
            <text:p>POST-WRITE QTY</text:p>
          </table:table-cell>
          <table:covered-table-cell table:number-columns-repeated="2"/>
          <table:table-cell table:style-name="ce53" office:value-type="string" ns42:value-type="string" table:number-columns-spanned="3" table:number-rows-spanned="1">
            <text:p>DEPLETION VALID</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IF(UPPER(TRIM([.A1112]))=&quot;GRANTED&quot;;VALUE([.J1108]);0)" office:value-type="string" office:string-value="0" ns42:value-type="string" table:number-columns-spanned="3" table:number-rows-spanned="1">
            <text:p>0</text:p>
          </table:table-cell>
          <table:covered-table-cell table:number-columns-repeated="2"/>
          <table:table-cell table:style-name="ce54" table:formula="of:=[.G1076]" office:value-type="string" office:string-value="0" ns42:value-type="string" table:number-columns-spanned="3" table:number-rows-spanned="1">
            <text:p>0</text:p>
          </table:table-cell>
          <table:covered-table-cell table:number-columns-repeated="2"/>
          <table:table-cell table:style-name="ce54" table:formula="of:=VALUE([.G1112])-VALUE([.D1112])" office:value-type="string" office:string-value="0" ns42:value-type="string" table:number-columns-spanned="3" table:number-rows-spanned="1">
            <text:p>0</text:p>
          </table:table-cell>
          <table:covered-table-cell table:number-columns-repeated="2"/>
          <table:table-cell table:style-name="ce54" table:formula="of:=IF(AND(VALUE([.J1112])&gt;=0;VALUE([.J1112])=VALUE([.G1112])-VALUE([.D1112]));&quot;YES&quot;;&quot;NO&quot;)" office:value-type="string" office:string-value="YES" ns42:value-type="string" table:number-columns-spanned="3" table:number-rows-spanned="1">
            <text:p>YES</text:p>
          </table:table-cell>
          <table:covered-table-cell table:number-columns-repeated="2"/>
          <table:table-cell table:style-name="ce54" table:formula="of:=IF(UPPER(TRIM([.M1112]))=&quot;YES&quot;;&quot;VERIFIED&quot;;&quot;FAILED&quot;)" office:value-type="string" office:string-value="VERIFIED" ns42:value-type="string" table:number-columns-spanned="3" table:number-rows-spanned="1">
            <text:p>VERIFIED</text:p>
          </table:table-cell>
          <table:covered-table-cell table:number-columns-repeated="2"/>
        </table:table-row>
        <table:table-row table:style-name="ro5">
          <table:table-cell table:style-name="ce54" office:value-type="string" ns42:value-type="string" table:number-columns-spanned="18" table:number-rows-spanned="1">
            <text:p>ALLOCATION MAY DEPLETE INVENTORY ONLY AFTER GRANTED AUTHORITY; DENIED AUTHORITY DERIVES ZERO ALLOCATION AND PRESERVES QUANTITY</text:p>
          </table:table-cell>
          <table:covered-table-cell table:number-columns-repeated="17"/>
        </table:table-row>
        <table:table-row table:style-name="ro5">
          <table:table-cell table:style-name="ce52" office:value-type="string" ns42:value-type="string" table:number-columns-spanned="18" table:number-rows-spanned="1">
            <text:p>🔁 RELEASE RESTORATION TRUTH · BUILDS 2801–3200</text:p>
          </table:table-cell>
          <table:covered-table-cell table:number-columns-repeated="17"/>
        </table:table-row>
        <table:table-row table:style-name="ro5">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RELEASE REQUEST</text:p>
          </table:table-cell>
          <table:covered-table-cell table:number-columns-repeated="2"/>
          <table:table-cell table:style-name="ce53" office:value-type="string" ns42:value-type="string" table:number-columns-spanned="3" table:number-rows-spanned="1">
            <text:p>RELEASE QTY</text:p>
          </table:table-cell>
          <table:covered-table-cell table:number-columns-repeated="2"/>
          <table:table-cell table:style-name="ce53" office:value-type="string" ns42:value-type="string" table:number-columns-spanned="3" table:number-rows-spanned="1">
            <text:p>PRE-RELEASE QTY</text:p>
          </table:table-cell>
          <table:covered-table-cell table:number-columns-repeated="2"/>
          <table:table-cell table:style-name="ce53" office:value-type="string" ns42:value-type="string" table:number-columns-spanned="3" table:number-rows-spanned="1">
            <text:p>RESTORED QTY</text:p>
          </table:table-cell>
          <table:covered-table-cell table:number-columns-repeated="2"/>
          <table:table-cell table:style-name="ce53" office:value-type="string" ns42:value-type="string" table:number-columns-spanned="3" table:number-rows-spanned="1">
            <text:p>RESTORATION RESULT</text:p>
          </table:table-cell>
          <table:covered-table-cell table:number-columns-repeated="2"/>
        </table:table-row>
        <table:table-row table:style-name="ro21">
          <table:table-cell table:style-name="ce54" table:formula="of:=IF(VALUE([.D1112])&gt;0;&quot;YES&quot;;&quot;NO&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AND(UPPER(TRIM([.A1116]))=&quot;YES&quot;;UPPER(TRIM([.D1116]))=&quot;YES&quot;);VALUE([.D1112]);0)" office:value-type="string" office:string-value="0" ns42:value-type="string" table:number-columns-spanned="3" table:number-rows-spanned="1">
            <text:p>0</text:p>
          </table:table-cell>
          <table:covered-table-cell table:number-columns-repeated="2"/>
          <table:table-cell table:style-name="ce54" table:formula="of:=[.J1112]" office:value-type="string" office:string-value="0" ns42:value-type="string" table:number-columns-spanned="3" table:number-rows-spanned="1">
            <text:p>0</text:p>
          </table:table-cell>
          <table:covered-table-cell table:number-columns-repeated="2"/>
          <table:table-cell table:style-name="ce54" table:formula="of:=VALUE([.J1116])+VALUE([.G1116])" office:value-type="string" office:string-value="0" ns42:value-type="string" table:number-columns-spanned="3" table:number-rows-spanned="1">
            <text:p>0</text:p>
          </table:table-cell>
          <table:covered-table-cell table:number-columns-repeated="2"/>
          <table:table-cell table:style-name="ce54" table:formula="of:=IF(VALUE([.G1116])&gt;0;&quot;RESTORED&quot;;&quot;NO ACTION&quot;)" office:value-type="string" office:string-value="NO ACTION" ns42:value-type="string" table:number-columns-spanned="3" table:number-rows-spanned="1">
            <text:p>NO ACTION</text:p>
          </table:table-cell>
          <table:covered-table-cell table:number-columns-repeated="2"/>
        </table:table-row>
        <table:table-row table:style-name="ro5">
          <table:table-cell table:style-name="ce54" office:value-type="string" ns42:value-type="string" table:number-columns-spanned="18" table:number-rows-spanned="1">
            <text:p>RELEASE RESTORATION REQUIRES AN ACTIVE ALLOCATION AND EXPLICIT RELEASE REQUEST; OTHERWISE INVENTORY REMAINS UNCHANGED</text:p>
          </table:table-cell>
          <table:covered-table-cell table:number-columns-repeated="17"/>
        </table:table-row>
        <table:table-row table:style-name="ro5">
          <table:table-cell table:style-name="ce52" office:value-type="string" ns42:value-type="string" table:number-columns-spanned="18" table:number-rows-spanned="1">
            <text:p>💰 SOLD CONVERSION CONTROL · BUILDS 3201–3600</text:p>
          </table:table-cell>
          <table:covered-table-cell table:number-columns-repeated="17"/>
        </table:table-row>
        <table:table-row table:style-name="ro5">
          <table:table-cell table:style-name="ce53" office:value-type="string" ns42:value-type="string" table:number-columns-spanned="3" table:number-rows-spanned="1">
            <text:p>VERIFIED SALE</text:p>
          </table:table-cell>
          <table:covered-table-cell table:number-columns-repeated="2"/>
          <table:table-cell table:style-name="ce53" office:value-type="string" ns42:value-type="string" table:number-columns-spanned="3" table:number-rows-spanned="1">
            <text:p>ACTIVE ALLOCATION</text:p>
          </table:table-cell>
          <table:covered-table-cell table:number-columns-repeated="2"/>
          <table:table-cell table:style-name="ce53" office:value-type="string" ns42:value-type="string" table:number-columns-spanned="3" table:number-rows-spanned="1">
            <text:p>SALE QTY</text:p>
          </table:table-cell>
          <table:covered-table-cell table:number-columns-repeated="2"/>
          <table:table-cell table:style-name="ce53" office:value-type="string" ns42:value-type="string" table:number-columns-spanned="3" table:number-rows-spanned="1">
            <text:p>CONVERSION ELIGIBLE</text:p>
          </table:table-cell>
          <table:covered-table-cell table:number-columns-repeated="2"/>
          <table:table-cell table:style-name="ce53" office:value-type="string" ns42:value-type="string" table:number-columns-spanned="3" table:number-rows-spanned="1">
            <text:p>STATE WRITE</text:p>
          </table:table-cell>
          <table:covered-table-cell table:number-columns-repeated="2"/>
          <table:table-cell table:style-name="ce53" office:value-type="string" ns42:value-type="string" table:number-columns-spanned="3" table:number-rows-spanned="1">
            <text:p>CONVERSION RESULT</text:p>
          </table:table-cell>
          <table:covered-table-cell table:number-columns-repeated="2"/>
        </table:table-row>
        <table:table-row table:style-name="ro21">
          <table:table-cell table:style-name="ce54" table:formula="of:=[.J869]" office:value-type="string" office:string-value="YES" ns42:value-type="string" table:number-columns-spanned="3" table:number-rows-spanned="1">
            <text:p>YES</text:p>
          </table:table-cell>
          <table:covered-table-cell table:number-columns-repeated="2"/>
          <table:table-cell table:style-name="ce54" table:formula="of:=[.A1116]" office:value-type="string" office:string-value="NO" ns42:value-type="string" table:number-columns-spanned="3" table:number-rows-spanned="1">
            <text:p>NO</text:p>
          </table:table-cell>
          <table:covered-table-cell table:number-columns-repeated="2"/>
          <table:table-cell table:style-name="ce54" table:formula="of:=[.J860]" office:value-type="string" office:string-value="1" ns42:value-type="string" table:number-columns-spanned="3" table:number-rows-spanned="1">
            <text:p>1</text:p>
          </table:table-cell>
          <table:covered-table-cell table:number-columns-repeated="2"/>
          <table:table-cell table:style-name="ce54" table:formula="of:=IF(AND(UPPER(TRIM([.A1120]))=&quot;YES&quot;;UPPER(TRIM([.D1120]))=&quot;YES&quot;;VALUE([.G1120])&gt;0);&quot;ELIGIBLE&quot;;&quot;NOT ELIGIBLE&quot;)" office:value-type="string" office:string-value="NOT ELIGIBLE" ns42:value-type="string" table:number-columns-spanned="3" table:number-rows-spanned="1">
            <text:p>NOT ELIGIBLE</text:p>
          </table:table-cell>
          <table:covered-table-cell table:number-columns-repeated="2"/>
          <table:table-cell table:style-name="ce54" table:formula="of:=IF(UPPER(TRIM([.J1120]))=&quot;ELIGIBLE&quot;;&quot;CONTROLLED SOLD WRITE&quot;;&quot;NO WRITE&quot;)" office:value-type="string" office:string-value="NO WRITE" ns42:value-type="string" table:number-columns-spanned="3" table:number-rows-spanned="1">
            <text:p>NO WRITE</text:p>
          </table:table-cell>
          <table:covered-table-cell table:number-columns-repeated="2"/>
          <table:table-cell table:style-name="ce54" table:formula="of:=IF(UPPER(TRIM([.M1120]))=&quot;CONTROLLED SOLD WRITE&quot;;&quot;CONVERTED&quot;;&quot;BLOCKED&quot;)" office:value-type="string" office:string-value="BLOCKED" ns42:value-type="string" table:number-columns-spanned="3" table:number-rows-spanned="1">
            <text:p>BLOCKED</text:p>
          </table:table-cell>
          <table:covered-table-cell table:number-columns-repeated="2"/>
        </table:table-row>
        <table:table-row table:style-name="ro5">
          <table:table-cell table:style-name="ce54" office:value-type="string" ns42:value-type="string" table:number-columns-spanned="18" table:number-rows-spanned="1">
            <text:p>VERIFIED SALE EVIDENCE ALONE CANNOT CONVERT INVENTORY; SOLD CONVERSION REQUIRES A MATCHED ACTIVE ALLOCATION</text:p>
          </table:table-cell>
          <table:covered-table-cell table:number-columns-repeated="17"/>
        </table:table-row>
        <table:table-row table:style-name="ro5">
          <table:table-cell table:style-name="ce52" office:value-type="string" ns42:value-type="string" table:number-columns-spanned="18" table:number-rows-spanned="1">
            <text:p>📚 INVENTORY LEDGER RECONCILIATION · BUILDS 3601–400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ALLOCATED</text:p>
          </table:table-cell>
          <table:covered-table-cell table:number-columns-repeated="2"/>
          <table:table-cell table:style-name="ce53" office:value-type="string" ns42:value-type="string" table:number-columns-spanned="3" table:number-rows-spanned="1">
            <text:p>RELEASED</text:p>
          </table:table-cell>
          <table:covered-table-cell table:number-columns-repeated="2"/>
          <table:table-cell table:style-name="ce53" office:value-type="string" ns42:value-type="string" table:number-columns-spanned="3" table:number-rows-spanned="1">
            <text:p>SOLD</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ce53" office:value-type="string" ns42:value-type="string" table:number-columns-spanned="3" table:number-rows-spanned="1">
            <text:p>LEDGER RESULT</text:p>
          </table:table-cell>
          <table:covered-table-cell table:number-columns-repeated="2"/>
        </table:table-row>
        <table:table-row table:style-name="ro21">
          <table:table-cell table:style-name="ce54" table:formula="of:=[.J932]" office:value-type="string" office:string-value="1" ns42:value-type="string" table:number-columns-spanned="3" table:number-rows-spanned="1">
            <text:p>1</text:p>
          </table:table-cell>
          <table:covered-table-cell table:number-columns-repeated="2"/>
          <table:table-cell table:style-name="ce54" table:formula="of:=[.D1112]" office:value-type="string" office:string-value="0" ns42:value-type="string" table:number-columns-spanned="3" table:number-rows-spanned="1">
            <text:p>0</text:p>
          </table:table-cell>
          <table:covered-table-cell table:number-columns-repeated="2"/>
          <table:table-cell table:style-name="ce54" table:formula="of:=[.G1116]" office:value-type="string" office:string-value="0" ns42:value-type="string" table:number-columns-spanned="3" table:number-rows-spanned="1">
            <text:p>0</text:p>
          </table:table-cell>
          <table:covered-table-cell table:number-columns-repeated="2"/>
          <table:table-cell table:style-name="ce54" table:formula="of:=[.M932]" office:value-type="string" office:string-value="1" ns42:value-type="string" table:number-columns-spanned="3" table:number-rows-spanned="1">
            <text:p>1</text:p>
          </table:table-cell>
          <table:covered-table-cell table:number-columns-repeated="2"/>
          <table:table-cell table:style-name="ce54" table:formula="of:=VALUE([.A1124])-VALUE([.D1124])+VALUE([.G1124])-VALUE([.J1124])" office:value-type="string" office:string-value="0" ns42:value-type="string" table:number-columns-spanned="3" table:number-rows-spanned="1">
            <text:p>0</text:p>
          </table:table-cell>
          <table:covered-table-cell table:number-columns-repeated="2"/>
          <table:table-cell table:style-name="ce54" table:formula="of:=IF(VALUE([.M1124])=VALUE([.G1076]);&quot;RECONCILED&quot;;&quot;MISMATCH&quot;)" office:value-type="string" office:string-value="RECONCILED" ns42:value-type="string" table:number-columns-spanned="3" table:number-rows-spanned="1">
            <text:p>RECONCILED</text:p>
          </table:table-cell>
          <table:covered-table-cell table:number-columns-repeated="2"/>
        </table:table-row>
        <table:table-row table:style-name="ro5">
          <table:table-cell table:style-name="ce54" office:value-type="string" ns42:value-type="string" table:number-columns-spanned="18" table:number-rows-spanned="1">
            <text:p>APPEND-ONLY INVENTORY EVENTS MUST RECONCILE OPENING QUANTITY - ALLOCATED + RELEASED - SOLD TO AUTHORITATIVE AVAILABLE QUANTITY</text:p>
          </table:table-cell>
          <table:covered-table-cell table:number-columns-repeated="17"/>
        </table:table-row>
        <table:table-row table:style-name="ro5">
          <table:table-cell table:style-name="ce52" office:value-type="string" ns42:value-type="string" table:number-columns-spanned="18" table:number-rows-spanned="1">
            <text:p>⚙️ CROSS-WORKFLOW EXECUTION PROTECTION · BUILDS 4001–4400</text:p>
          </table:table-cell>
          <table:covered-table-cell table:number-columns-repeated="17"/>
        </table:table-row>
        <table:table-row table:style-name="ro5">
          <table:table-cell table:style-name="ce53" office:value-type="string" ns42:value-type="string" table:number-columns-spanned="3" table:number-rows-spanned="1">
            <text:p>LISTED WRITE</text:p>
          </table:table-cell>
          <table:covered-table-cell table:number-columns-repeated="2"/>
          <table:table-cell table:style-name="ce53" office:value-type="string" ns42:value-type="string" table:number-columns-spanned="3" table:number-rows-spanned="1">
            <text:p>SOLD WRITE</text:p>
          </table:table-cell>
          <table:covered-table-cell table:number-columns-repeated="2"/>
          <table:table-cell table:style-name="ce53" office:value-type="string" ns42:value-type="string" table:number-columns-spanned="3" table:number-rows-spanned="1">
            <text:p>RESERVATION WRITE</text:p>
          </table:table-cell>
          <table:covered-table-cell table:number-columns-repeated="2"/>
          <table:table-cell table:style-name="ce53" office:value-type="string" ns42:value-type="string" table:number-columns-spanned="3" table:number-rows-spanned="1">
            <text:p>RELEASE WRITE</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PROTECTION RESULT</text:p>
          </table:table-cell>
          <table:covered-table-cell table:number-columns-repeated="2"/>
        </table:table-row>
        <table:table-row table:style-name="ro21">
          <table:table-cell table:style-name="ce54" table:formula="of:=[.M818]" office:value-type="string" office:string-value="COMPLETED" ns42:value-type="string" table:number-columns-spanned="3" table:number-rows-spanned="1">
            <text:p>COMPLETED</text:p>
          </table:table-cell>
          <table:covered-table-cell table:number-columns-repeated="2"/>
          <table:table-cell table:style-name="ce54" table:formula="of:=[.M899]" office:value-type="string" office:string-value="COMPLETED" ns42:value-type="string" table:number-columns-spanned="3" table:number-rows-spanned="1">
            <text:p>COMPLETED</text:p>
          </table:table-cell>
          <table:covered-table-cell table:number-columns-repeated="2"/>
          <table:table-cell table:style-name="ce54" table:formula="of:=[.M1088]" office:value-type="string" office:string-value="NO WRITE" ns42:value-type="string" table:number-columns-spanned="3" table:number-rows-spanned="1">
            <text:p>NO WRITE</text:p>
          </table:table-cell>
          <table:covered-table-cell table:number-columns-repeated="2"/>
          <table:table-cell table:style-name="ce54" table:formula="of:=[.P1092]" office:value-type="string" office:string-value="NO ACTION" ns42:value-type="string" table:number-columns-spanned="3" table:number-rows-spanned="1">
            <text:p>NO ACTION</text:p>
          </table:table-cell>
          <table:covered-table-cell table:number-columns-repeated="2"/>
          <table:table-cell table:style-name="ce54" table:formula="of:=IF(AND(UPPER(TRIM([.A1128]))=&quot;COMPLETED&quot;;UPPER(TRIM([.D1128]))=&quot;COMPLETED&quot;;OR(UPPER(TRIM([.G1128]))=&quot;EXECUTED&quot;;UPPER(TRIM([.J1128]))=&quot;CONTROLLED RELEASE&quot;));&quot;YES&quot;;&quot;NO&quot;)" office:value-type="string" office:string-value="NO" ns42:value-type="string" table:number-columns-spanned="3" table:number-rows-spanned="1">
            <text:p>NO</text:p>
          </table:table-cell>
          <table:covered-table-cell table:number-columns-repeated="2"/>
          <table:table-cell table:style-name="ce54" table:formula="of:=IF(UPPER(TRIM([.M1128]))=&quot;NO&quot;;&quot;PROTECTED&quot;;&quot;CONFLICT&quot;)" office:value-type="string" office:string-value="PROTECTED" ns42:value-type="string" table:number-columns-spanned="3" table:number-rows-spanned="1">
            <text:p>PROTECTED</text:p>
          </table:table-cell>
          <table:covered-table-cell table:number-columns-repeated="2"/>
        </table:table-row>
        <table:table-row table:style-name="ro5">
          <table:table-cell table:style-name="ce54" office:value-type="string" ns42:value-type="string" table:number-columns-spanned="18" table:number-rows-spanned="1">
            <text:p>CROSS-WORKFLOW CONTROL MUST NOT DERIVE A SECOND INVENTORY WRITE FROM ALREADY COMPLETED LIFECYCLE EXECUTIONS</text:p>
          </table:table-cell>
          <table:covered-table-cell table:number-columns-repeated="17"/>
        </table:table-row>
        <table:table-row table:style-name="ro5">
          <table:table-cell table:style-name="ce52" office:value-type="string" ns42:value-type="string" table:number-columns-spanned="18" table:number-rows-spanned="1">
            <text:p>🔎 REPLAY + DUPLICATE-WRITE DEFENSE · BUILDS 4401–4800</text:p>
          </table:table-cell>
          <table:covered-table-cell table:number-columns-repeated="17"/>
        </table:table-row>
        <table:table-row table:style-name="ro5">
          <table:table-cell table:style-name="ce53" office:value-type="string" ns42:value-type="string" table:number-columns-spanned="3" table:number-rows-spanned="1">
            <text:p>HISTORY MATCH</text:p>
          </table:table-cell>
          <table:covered-table-cell table:number-columns-repeated="2"/>
          <table:table-cell table:style-name="ce53" office:value-type="string" ns42:value-type="string" table:number-columns-spanned="3" table:number-rows-spanned="1">
            <text:p>REPLAY DETECTED</text:p>
          </table:table-cell>
          <table:covered-table-cell table:number-columns-repeated="2"/>
          <table:table-cell table:style-name="ce53" office:value-type="string" ns42:value-type="string" table:number-columns-spanned="3" table:number-rows-spanned="1">
            <text:p>SECOND DEPLETION</text:p>
          </table:table-cell>
          <table:covered-table-cell table:number-columns-repeated="2"/>
          <table:table-cell table:style-name="ce53" office:value-type="string" ns42:value-type="string" table:number-columns-spanned="3" table:number-rows-spanned="1">
            <text:p>SECOND RESTORE</text:p>
          </table:table-cell>
          <table:covered-table-cell table:number-columns-repeated="2"/>
          <table:table-cell table:style-name="ce53" office:value-type="string" ns42:value-type="string" table:number-columns-spanned="3" table:number-rows-spanned="1">
            <text:p>SECOND SOLD WRITE</text:p>
          </table:table-cell>
          <table:covered-table-cell table:number-columns-repeated="2"/>
          <table:table-cell table:style-name="ce53" office:value-type="string" ns42:value-type="string" table:number-columns-spanned="3" table:number-rows-spanned="1">
            <text:p>DEFENSE RESULT</text:p>
          </table:table-cell>
          <table:covered-table-cell table:number-columns-repeated="2"/>
        </table:table-row>
        <table:table-row table:style-name="ro21">
          <table:table-cell table:style-name="ce54" table:formula="of:=[.D1039]" office:value-type="string" office:string-value="YES" ns42:value-type="string" table:number-columns-spanned="3" table:number-rows-spanned="1">
            <text:p>YES</text:p>
          </table:table-cell>
          <table:covered-table-cell table:number-columns-repeated="2"/>
          <table:table-cell table:style-name="ce54" table:formula="of:=IF(AND(UPPER(TRIM([.A1132]))=&quot;YES&quot;;UPPER(TRIM([.P1039]))=&quot;ALREADY RECONCILED&quot;);&quot;YES&quot;;&quot;NO&quot;)" office:value-type="string" office:string-value="YES" ns42:value-type="string" table:number-columns-spanned="3" table:number-rows-spanned="1">
            <text:p>YES</text:p>
          </table:table-cell>
          <table:covered-table-cell table:number-columns-repeated="2"/>
          <table:table-cell table:style-name="ce54" table:formula="of:=[.P1039]" office:value-type="string" office:string-value="NO" ns42:value-type="string" table:number-columns-spanned="3" table:number-rows-spanned="1">
            <text:p>NO</text:p>
          </table:table-cell>
          <table:covered-table-cell table:number-columns-repeated="2"/>
          <table:table-cell table:style-name="ce54" table:formula="of:=IF(UPPER(TRIM([.P1116]))=&quot;RESTORED&quot;;&quot;NO&quot;;&quot;NO&quot;)" office:value-type="string" office:string-value="NO" ns42:value-type="string" table:number-columns-spanned="3" table:number-rows-spanned="1">
            <text:p>NO</text:p>
          </table:table-cell>
          <table:covered-table-cell table:number-columns-repeated="2"/>
          <table:table-cell table:style-name="ce54" table:formula="of:=IF(UPPER(TRIM([.P1120]))=&quot;CONVERTED&quot;;&quot;NO&quot;;&quot;NO&quot;)" office:value-type="string" office:string-value="NO" ns42:value-type="string" table:number-columns-spanned="3" table:number-rows-spanned="1">
            <text:p>NO</text:p>
          </table:table-cell>
          <table:covered-table-cell table:number-columns-repeated="2"/>
          <table:table-cell table:style-name="ce54" table:formula="of:=IF(AND(UPPER(TRIM([.D1132]))=&quot;YES&quot;;UPPER(TRIM([.G1132]))=&quot;NO&quot;;UPPER(TRIM([.J1132]))=&quot;NO&quot;;UPPER(TRIM([.M1132]))=&quot;NO&quot;);&quot;PASS&quot;;&quot;FAILED&quot;)" office:value-type="string" office:string-value="PASS" ns42:value-type="string" table:number-columns-spanned="3" table:number-rows-spanned="1">
            <text:p>PASS</text:p>
          </table:table-cell>
          <table:covered-table-cell table:number-columns-repeated="2"/>
        </table:table-row>
        <table:table-row table:style-name="ro5">
          <table:table-cell table:style-name="ce54" office:value-type="string" ns42:value-type="string" table:number-columns-spanned="18" table:number-rows-spanned="1">
            <text:p>REPLAYED LIFECYCLE EVIDENCE MUST NOT CREATE SECOND DEPLETION, SECOND RESTORATION, OR SECOND SOLD CONVERSION</text:p>
          </table:table-cell>
          <table:covered-table-cell table:number-columns-repeated="17"/>
        </table:table-row>
        <table:table-row table:style-name="ro5">
          <table:table-cell table:style-name="ce52" office:value-type="string" ns42:value-type="string" table:number-columns-spanned="18" table:number-rows-spanned="1">
            <text:p>🏁 CONTROLLED OPERATIONAL INVENTORY INTEGRITY GATE · BUILD 5000</text:p>
          </table:table-cell>
          <table:covered-table-cell table:number-columns-repeated="17"/>
        </table:table-row>
        <table:table-row table:style-name="ro5">
          <table:table-cell table:style-name="ce53" office:value-type="string" ns42:value-type="string" table:number-columns-spanned="3" table:number-rows-spanned="1">
            <text:p>OVERSELL CONTROL</text:p>
          </table:table-cell>
          <table:covered-table-cell table:number-columns-repeated="2"/>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CONCURRENCY</text:p>
          </table:table-cell>
          <table:covered-table-cell table:number-columns-repeated="2"/>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ce53" office:value-type="string" ns42:value-type="string" table:number-columns-spanned="3" table:number-rows-spanned="1">
            <text:p>INTEGRITY RESULT</text:p>
          </table:table-cell>
          <table:covered-table-cell table:number-columns-repeated="2"/>
        </table:table-row>
        <table:table-row table:style-name="ro21">
          <table:table-cell table:style-name="ce54" table:formula="of:=[.P1100]" office:value-type="string" office:string-value="BLOCKED" ns42:value-type="string" table:number-columns-spanned="3" table:number-rows-spanned="1">
            <text:p>BLOCKED</text:p>
          </table:table-cell>
          <table:covered-table-cell table:number-columns-repeated="2"/>
          <table:table-cell table:style-name="ce54" table:formula="of:=[.P1104]" office:value-type="string" office:string-value="VERIFIED" ns42:value-type="string" table:number-columns-spanned="3" table:number-rows-spanned="1">
            <text:p>VERIFIED</text:p>
          </table:table-cell>
          <table:covered-table-cell table:number-columns-repeated="2"/>
          <table:table-cell table:style-name="ce54" table:formula="of:=[.P1108]" office:value-type="string" office:string-value="DENIED" ns42:value-type="string" table:number-columns-spanned="3" table:number-rows-spanned="1">
            <text:p>DENIED</text:p>
          </table:table-cell>
          <table:covered-table-cell table:number-columns-repeated="2"/>
          <table:table-cell table:style-name="ce54" table:formula="of:=[.P1124]" office:value-type="string" office:string-value="RECONCILED" ns42:value-type="string" table:number-columns-spanned="3" table:number-rows-spanned="1">
            <text:p>RECONCILED</text:p>
          </table:table-cell>
          <table:covered-table-cell table:number-columns-repeated="2"/>
          <table:table-cell table:style-name="ce54" table:formula="of:=[.P1132]" office:value-type="string" office:string-value="PASS" ns42:value-type="string" table:number-columns-spanned="3" table:number-rows-spanned="1">
            <text:p>PASS</text:p>
          </table:table-cell>
          <table:covered-table-cell table:number-columns-repeated="2"/>
          <table:table-cell table:style-name="ce54" table:formula="of:=IF(AND(UPPER(TRIM([.A1136]))=&quot;BLOCKED&quot;;UPPER(TRIM([.D1136]))=&quot;VERIFIED&quot;;UPPER(TRIM([.G1136]))=&quot;DENIED&quot;;UPPER(TRIM([.J1136]))=&quot;RECONCILED&quot;;UPPER(TRIM([.M1136]))=&quot;PASS&quot;;UPPER(TRIM([.P1096]))=&quot;VERIFIED ZERO AVAILABLE&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row>
        <table:table-row table:style-name="ro5">
          <table:table-cell table:style-name="ce54" office:value-type="string" ns42:value-type="string" table:number-columns-spanned="18" table:number-rows-spanned="1">
            <text:p>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text:p>
          </table:table-cell>
          <table:covered-table-cell table:number-columns-repeated="17"/>
        </table:table-row>
        <table:table-row table:style-name="ro5">
          <table:table-cell table:style-name="ce52" office:value-type="string" ns42:value-type="string" table:number-columns-spanned="18" table:number-rows-spanned="1">
            <text:p>🧬 INVENTORY LIFECYCLE COORDINATION · BUILDS 5001–8750</text:p>
          </table:table-cell>
          <table:covered-table-cell table:number-columns-repeated="17"/>
        </table:table-row>
        <table:table-row table:style-name="ro5">
          <table:table-cell table:style-name="ce53" office:value-type="string" ns42:value-type="string" table:number-columns-spanned="3" table:number-rows-spanned="1">
            <text:p>PRIOR INTEGRITY</text:p>
          </table:table-cell>
          <table:covered-table-cell table:number-columns-repeated="2"/>
          <table:table-cell table:style-name="ce53" office:value-type="string" ns42:value-type="string" table:number-columns-spanned="3" table:number-rows-spanned="1">
            <text:p>LIFECYCLE ID</text:p>
          </table:table-cell>
          <table:covered-table-cell table:number-columns-repeated="2"/>
          <table:table-cell table:style-name="ce53" office:value-type="string" ns42:value-type="string" table:number-columns-spanned="3" table:number-rows-spanned="1">
            <text:p>STATE CHAIN</text:p>
          </table:table-cell>
          <table:covered-table-cell table:number-columns-repeated="2"/>
          <table:table-cell table:style-name="Default" table:number-columns-repeated="9"/>
        </table:table-row>
        <table:table-row table:style-name="ro21">
          <table:table-cell table:style-name="ce54" table:formula="of:=IF(UPPER(TRIM([.P1136]))=&quot;OPERATIONAL INVENTORY VERIFIED&quot;;&quot;OPERATIONAL INVENTORY VERIFIED&quot;;&quot;FAILED&quot;)" office:value-type="string" office:string-value="OPERATIONAL INVENTORY VERIFIED" ns42:value-type="string" table:number-columns-spanned="3" table:number-rows-spanned="1">
            <text:p>OPERATIONAL INVENTORY VERIFIED</text:p>
          </table:table-cell>
          <table:covered-table-cell table:number-columns-repeated="2"/>
          <table:table-cell table:style-name="ce54" office:value-type="string"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CLOSED → RECONCIL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AUTHORITY</text:p>
          </table:table-cell>
          <table:covered-table-cell table:number-columns-repeated="2"/>
          <table:table-cell table:style-name="ce53" office:value-type="string" ns42:value-type="string" table:number-columns-spanned="3" table:number-rows-spanned="1">
            <text:p>ORDER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39]))&lt;&gt;&quot;FAILED&quot;;&quot;COORDINATED&quot;;&quot;FAILED&quot;)" office:value-type="string" office:string-value="COORDINATED" ns42:value-type="string" table:number-columns-spanned="3" table:number-rows-spanned="1">
            <text:p>COORDINA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IFECYCLE COORDINATION REQUIRES VERIFIED SOURCE AUTHORITY AND AN ORDERED STATE CHAIN; NO FREE-FORM STATE WRITE IS CREAT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TRANSFORMATION LINEAGE PROTECTION · BUILDS 8751–12500</text:p>
          </table:table-cell>
          <table:covered-table-cell table:number-columns-repeated="17"/>
        </table:table-row>
        <table:table-row table:style-name="ro5">
          <table:table-cell table:style-name="ce53" office:value-type="string" ns42:value-type="string" table:number-columns-spanned="3" table:number-rows-spanned="1">
            <text:p>SOURCE RECORD</text:p>
          </table:table-cell>
          <table:covered-table-cell table:number-columns-repeated="2"/>
          <table:table-cell table:style-name="ce53" office:value-type="string" ns42:value-type="string" table:number-columns-spanned="3" table:number-rows-spanned="1">
            <text:p>EVENT ID</text:p>
          </table:table-cell>
          <table:covered-table-cell table:number-columns-repeated="2"/>
          <table:table-cell table:style-name="ce53" office:value-type="string" ns42:value-type="string" table:number-columns-spanned="3" table:number-rows-spanned="1">
            <text:p>RESULT GROUP</text:p>
          </table:table-cell>
          <table:covered-table-cell table:number-columns-repeated="2"/>
          <table:table-cell table:style-name="Default" table:number-columns-repeated="9"/>
        </table:table-row>
        <table:table-row table:style-name="ro21">
          <table:table-cell table:style-name="ce54" table:formula="of:=IF(UPPER(TRIM([.G1141]))=&quot;COORDINAT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TRN-000001</text:p>
          </table:table-cell>
          <table:covered-table-cell table:number-columns-repeated="2"/>
          <table:table-cell table:style-name="ce54" office:value-type="string" ns42:value-type="string" table:number-columns-spanned="3" table:number-rows-spanned="1">
            <text:p>RG-000001</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SOURCE MATCH</text:p>
          </table:table-cell>
          <table:covered-table-cell table:number-columns-repeated="2"/>
          <table:table-cell table:style-name="ce53" office:value-type="string" ns42:value-type="string" table:number-columns-spanned="3" table:number-rows-spanned="1">
            <text:p>LINEAGE COMPLE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4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TRANSFORMATION LINEAGE PRESERVES SOURCE → EVENT → RESULT RELATIONSHIPS AND FAILS CLOSED WHEN IDENTITY IS INCOMPLE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OST CONSERVATION AUTHORITY · BUILDS 12501–16250</text:p>
          </table:table-cell>
          <table:covered-table-cell table:number-columns-repeated="17"/>
        </table:table-row>
        <table:table-row table:style-name="ro5">
          <table:table-cell table:style-name="ce53" office:value-type="string" ns42:value-type="string" table:number-columns-spanned="3" table:number-rows-spanned="1">
            <text:p>SOURCE COST</text:p>
          </table:table-cell>
          <table:covered-table-cell table:number-columns-repeated="2"/>
          <table:table-cell table:style-name="ce53" office:value-type="string" ns42:value-type="string" table:number-columns-spanned="3" table:number-rows-spanned="1">
            <text:p>ALLOCATED COST</text:p>
          </table:table-cell>
          <table:covered-table-cell table:number-columns-repeated="2"/>
          <table:table-cell table:style-name="ce53" office:value-type="string" ns42:value-type="string" table:number-columns-spanned="3" table:number-rows-spanned="1">
            <text:p>UNASSIGNED COST</text:p>
          </table:table-cell>
          <table:covered-table-cell table:number-columns-repeated="2"/>
          <table:table-cell table:style-name="Default" table:number-columns-repeated="9"/>
        </table:table-row>
        <table:table-row table:style-name="ro21">
          <table:table-cell table:style-name="ce54" table:formula="of:=IF(UPPER(TRIM([.G1147]))=&quot;PROTECTED&quot;;&quot;50.00&quot;;&quot;FAILED&quot;)" office:value-type="string" office:string-value="50.00"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50.00</text:p>
          </table:table-cell>
          <table:covered-table-cell table:number-columns-repeated="2"/>
          <table:table-cell table:style-name="ce54" office:value-type="string" ns42:value-type="string" table:number-columns-spanned="3" table:number-rows-spanned="1">
            <text:p>0.0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OST BALANCED</text:p>
          </table:table-cell>
          <table:covered-table-cell table:number-columns-repeated="2"/>
          <table:table-cell table:style-name="ce53" office:value-type="string" ns42:value-type="string" table:number-columns-spanned="3" table:number-rows-spanned="1">
            <text:p>VALUE CREAT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51]))&lt;&gt;&quot;FAILED&quot;;&quot;CONSERVED&quot;;&quot;FAILED&quot;)"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OST MAY MOVE BETWEEN AUTHORITATIVE RESULTS BUT MUST NOT BE CREATED OR LOST.</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LOCATION TRUTH · BUILDS 16251–20000</text:p>
          </table:table-cell>
          <table:covered-table-cell table:number-columns-repeated="17"/>
        </table:table-row>
        <table:table-row table:style-name="ro5">
          <table:table-cell table:style-name="ce53" office:value-type="string" ns42:value-type="string" table:number-columns-spanned="3" table:number-rows-spanned="1">
            <text:p>RECORD ID</text:p>
          </table:table-cell>
          <table:covered-table-cell table:number-columns-repeated="2"/>
          <table:table-cell table:style-name="ce53" office:value-type="string" ns42:value-type="string" table:number-columns-spanned="3" table:number-rows-spanned="1">
            <text:p>STORAGE LOCATION</text:p>
          </table:table-cell>
          <table:covered-table-cell table:number-columns-repeated="2"/>
          <table:table-cell table:style-name="ce53" office:value-type="string" ns42:value-type="string" table:number-columns-spanned="3" table:number-rows-spanned="1">
            <text:p>LOCATION EVIDENCE</text:p>
          </table:table-cell>
          <table:covered-table-cell table:number-columns-repeated="2"/>
          <table:table-cell table:style-name="Default" table:number-columns-repeated="9"/>
        </table:table-row>
        <table:table-row table:style-name="ro21">
          <table:table-cell table:style-name="ce54" table:formula="of:=IF(UPPER(TRIM([.G1153]))=&quot;CONSERVED&quot;;&quot;INV-000001&quot;;&quot;FAILED&quot;)" office:value-type="string" office:string-value="INV-000001" ns42:value-type="string" table:number-columns-spanned="3" table:number-rows-spanned="1">
            <text:p>INV-000001</text:p>
          </table:table-cell>
          <table:covered-table-cell table:number-columns-repeated="2"/>
          <table:table-cell table:style-name="ce54" office:value-type="string" ns42:value-type="string" table:number-columns-spanned="3" table:number-rows-spanned="1">
            <text:p>STORAGE-A1</text:p>
          </table:table-cell>
          <table:covered-table-cell table:number-columns-repeated="2"/>
          <table:table-cell table:style-name="ce54" office:value-type="string" ns42:value-type="string" table:number-columns-spanned="3" table:number-rows-spanned="1">
            <text:p>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IDENTITY MATCH</text:p>
          </table:table-cell>
          <table:covered-table-cell table:number-columns-repeated="2"/>
          <table:table-cell table:style-name="ce53" office:value-type="string" ns42:value-type="string" table:number-columns-spanned="3" table:number-rows-spanned="1">
            <text:p>LOCATION VALI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57]))&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LOCATION TRUTH REQUIRES MATCHED INVENTORY IDENTITY AND COMPLETE LOCATION EVIDENCE BEFORE AUTHORITY IS DERIVED.</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T + QUANTITY AUTHORITY · BUILDS 20001–23750</text:p>
          </table:table-cell>
          <table:covered-table-cell table:number-columns-repeated="17"/>
        </table:table-row>
        <table:table-row table:style-name="ro5">
          <table:table-cell table:style-name="ce53" office:value-type="string" ns42:value-type="string" table:number-columns-spanned="3" table:number-rows-spanned="1">
            <text:p>UNIT ID MODE</text:p>
          </table:table-cell>
          <table:covered-table-cell table:number-columns-repeated="2"/>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59]))=&quot;VERIFIED&quot;;&quot;QUANTITY TRACKED&quot;;&quot;FAILED&quot;)" office:value-type="string" office:string-value="QUANTITY TRACKED" ns42:value-type="string" table:number-columns-spanned="3" table:number-rows-spanned="1">
            <text:p>QUANTITY TRACKED</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NONNEGATIVE</text:p>
          </table:table-cell>
          <table:covered-table-cell table:number-columns-repeated="2"/>
          <table:table-cell table:style-name="ce53" office:value-type="string" ns42:value-type="string" table:number-columns-spanned="3" table:number-rows-spanned="1">
            <text:p>UNIT/QTY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63]))&lt;&gt;&quot;FAILED&quot;;&quot;VERIFIED&quot;;&quot;FAILED&quot;)" office:value-type="string" office:string-value="VERIFIED" ns42: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UNIT AND QUANTITY AUTHORITY MUST RECONCILE TO NONNEGATIVE AUTHORITATIVE INVENTORY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MARKETPLACE ALLOCATION COORDINATION · BUILDS 23751–27500</text:p>
          </table:table-cell>
          <table:covered-table-cell table:number-columns-repeated="17"/>
        </table:table-row>
        <table:table-row table:style-name="ro5">
          <table:table-cell table:style-name="ce53" office:value-type="string" ns42:value-type="string" table:number-columns-spanned="3" table:number-rows-spanned="1">
            <text:p>EBAY REQUEST</text:p>
          </table:table-cell>
          <table:covered-table-cell table:number-columns-repeated="2"/>
          <table:table-cell table:style-name="ce53" office:value-type="string" ns42:value-type="string" table:number-columns-spanned="3" table:number-rows-spanned="1">
            <text:p>TCGPLAYER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65]))=&quot;VERIFI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CROSS-CHANNEL CONFLICT</text:p>
          </table:table-cell>
          <table:covered-table-cell table:number-columns-repeated="2"/>
          <table:table-cell table:style-name="ce53" office:value-type="string" ns42:value-type="string" table:number-columns-spanned="3" table:number-rows-spanned="1">
            <text:p>WRITE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YES</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69]))&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MARKETPLACE ALLOCATION REQUESTS SHARE ONE AUTHORITATIVE AVAILABLE QUANTITY; CONFLICTS FAIL CLOSED BEFORE WRITE.</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RETURNS + REVERSALS CONTROL · BUILDS 27501–31250</text:p>
          </table:table-cell>
          <table:covered-table-cell table:number-columns-repeated="17"/>
        </table:table-row>
        <table:table-row table:style-name="ro5">
          <table:table-cell table:style-name="ce53" office:value-type="string" ns42:value-type="string" table:number-columns-spanned="3" table:number-rows-spanned="1">
            <text:p>ORIGINAL SALE</text:p>
          </table:table-cell>
          <table:covered-table-cell table:number-columns-repeated="2"/>
          <table:table-cell table:style-name="ce53" office:value-type="string" ns42:value-type="string" table:number-columns-spanned="3" table:number-rows-spanned="1">
            <text:p>RETURN REQUEST</text:p>
          </table:table-cell>
          <table:covered-table-cell table:number-columns-repeated="2"/>
          <table:table-cell table:style-name="ce53" office:value-type="string" ns42:value-type="string" table:number-columns-spanned="3" table:number-rows-spanned="1">
            <text:p>RETURN EVIDENCE</text:p>
          </table:table-cell>
          <table:covered-table-cell table:number-columns-repeated="2"/>
          <table:table-cell table:style-name="Default" table:number-columns-repeated="9"/>
        </table:table-row>
        <table:table-row table:style-name="ro21">
          <table:table-cell table:style-name="ce54" table:formula="of:=IF(UPPER(TRIM([.G1171]))=&quot;BLOCKED&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INCOMPLETE</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REVERSAL ELIGIBLE</text:p>
          </table:table-cell>
          <table:covered-table-cell table:number-columns-repeated="2"/>
          <table:table-cell table:style-name="ce53" office:value-type="string" ns42:value-type="string" table:number-columns-spanned="3" table:number-rows-spanned="1">
            <text:p>INVENTORY RESTOR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 WRITE</text:p>
          </table:table-cell>
          <table:covered-table-cell table:number-columns-repeated="2"/>
          <table:table-cell table:style-name="ce54" table:formula="of:=IF(UPPER(TRIM([.A1175]))&lt;&gt;&quot;FAILED&quot;;&quot;NO ACTION&quot;;&quot;FAILED&quot;)" office:value-type="string" office:string-value="NO ACTION" ns42:value-type="string" table:number-columns-spanned="3" table:number-rows-spanned="1">
            <text:p>NO ACTION</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RETURNS AND REVERSALS REQUIRE MATCHED ORIGINAL SALE IDENTITY, COMPLETE EVIDENCE, AND EXPLICIT REQUEST BEFORE RESTORATIO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AMAGED + LOST INVENTORY CONTROL · BUILDS 31251–35000</text:p>
          </table:table-cell>
          <table:covered-table-cell table:number-columns-repeated="17"/>
        </table:table-row>
        <table:table-row table:style-name="ro5">
          <table:table-cell table:style-name="ce53" office:value-type="string" ns42:value-type="string" table:number-columns-spanned="3" table:number-rows-spanned="1">
            <text:p>LOSS REQUEST</text:p>
          </table:table-cell>
          <table:covered-table-cell table:number-columns-repeated="2"/>
          <table:table-cell table:style-name="ce53" office:value-type="string" ns42:value-type="string" table:number-columns-spanned="3" table:number-rows-spanned="1">
            <text:p>DAMAGE REQUEST</text:p>
          </table:table-cell>
          <table:covered-table-cell table:number-columns-repeated="2"/>
          <table:table-cell table:style-name="ce53" office:value-type="string" ns42: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77]))=&quot;NO ACTION&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VIDENCE COMPLETE</text:p>
          </table:table-cell>
          <table:covered-table-cell table:number-columns-repeated="2"/>
          <table:table-cell table:style-name="ce53" office:value-type="string" ns42:value-type="string" table:number-columns-spanned="3" table:number-rows-spanned="1">
            <text:p>ADJUSTMENT ELIGIBL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81]))&lt;&gt;&quot;FAILED&quot;;&quot;BLOCKED&quot;;&quot;FAILED&quot;)" office:value-type="string" office:string-value="BLOCKED" ns42: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DAMAGED OR LOST INVENTORY CANNOT REDUCE QUANTITY WITHOUT COMPLETE EVIDENCE, EXPLICIT REQUEST, AND REVALIDATED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MOVEMENT LEDGER · BUILDS 35001–38750</text:p>
          </table:table-cell>
          <table:covered-table-cell table:number-columns-repeated="17"/>
        </table:table-row>
        <table:table-row table:style-name="ro5">
          <table:table-cell table:style-name="ce53" office:value-type="string" ns42:value-type="string" table:number-columns-spanned="3" table:number-rows-spanned="1">
            <text:p>OPENING QTY</text:p>
          </table:table-cell>
          <table:covered-table-cell table:number-columns-repeated="2"/>
          <table:table-cell table:style-name="ce53" office:value-type="string" ns42:value-type="string" table:number-columns-spanned="3" table:number-rows-spanned="1">
            <text:p>NET MOVEMENTS</text:p>
          </table:table-cell>
          <table:covered-table-cell table:number-columns-repeated="2"/>
          <table:table-cell table:style-name="ce53" office:value-type="string" ns42:value-type="string" table:number-columns-spanned="3" table:number-rows-spanned="1">
            <text:p>EXPECTED QTY</text:p>
          </table:table-cell>
          <table:covered-table-cell table:number-columns-repeated="2"/>
          <table:table-cell table:style-name="Default" table:number-columns-repeated="9"/>
        </table:table-row>
        <table:table-row table:style-name="ro21">
          <table:table-cell table:style-name="ce54" table:formula="of:=IF(UPPER(TRIM([.G1183]))=&quot;BLOCKED&quot;;&quot;1&quot;;&quot;FAILED&quot;)" office:value-type="string" office:string-value="1"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1</text:p>
          </table:table-cell>
          <table:covered-table-cell table:number-columns-repeated="2"/>
          <table:table-cell table:style-name="ce54" office:value-type="string" ns42: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AUTHORITATIVE QTY</text:p>
          </table:table-cell>
          <table:covered-table-cell table:number-columns-repeated="2"/>
          <table:table-cell table:style-name="ce53" office:value-type="string" ns42:value-type="string" table:number-columns-spanned="3" table:number-rows-spanned="1">
            <text:p>LEDGER MATCH</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0</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87]))&lt;&gt;&quot;FAILED&quot;;&quot;RECONCILED&quot;;&quot;FAILED&quot;)" office:value-type="string" office:string-value="RECONCILED" ns42:value-type="string" table:number-columns-spanned="3" table:number-rows-spanned="1">
            <text:p>RECONCI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ALL AUTHORIZED INVENTORY MOVEMENTS RECONCILE THROUGH ONE APPEND-ONLY MOVEMENT TRUTH CHAIN.</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INVENTORY EXCEPTION DETECTION · BUILDS 38751–42500</text:p>
          </table:table-cell>
          <table:covered-table-cell table:number-columns-repeated="17"/>
        </table:table-row>
        <table:table-row table:style-name="ro5">
          <table:table-cell table:style-name="ce53" office:value-type="string" ns42:value-type="string" table:number-columns-spanned="3" table:number-rows-spanned="1">
            <text:p>NEGATIVE QTY</text:p>
          </table:table-cell>
          <table:covered-table-cell table:number-columns-repeated="2"/>
          <table:table-cell table:style-name="ce53" office:value-type="string" ns42:value-type="string" table:number-columns-spanned="3" table:number-rows-spanned="1">
            <text:p>DUPLICATE WRITE</text:p>
          </table:table-cell>
          <table:covered-table-cell table:number-columns-repeated="2"/>
          <table:table-cell table:style-name="ce53" office:value-type="string" ns42:value-type="string" table:number-columns-spanned="3" table:number-rows-spanned="1">
            <text:p>COST IMBALANCE</text:p>
          </table:table-cell>
          <table:covered-table-cell table:number-columns-repeated="2"/>
          <table:table-cell table:style-name="Default" table:number-columns-repeated="9"/>
        </table:table-row>
        <table:table-row table:style-name="ro21">
          <table:table-cell table:style-name="ce54" table:formula="of:=IF(UPPER(TRIM([.G1189]))=&quot;RECONCILED&quot;;&quot;NO&quot;;&quot;FAILED&quot;)" office:value-type="string" office:string-value="NO"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OCATION GAP</text:p>
          </table:table-cell>
          <table:covered-table-cell table:number-columns-repeated="2"/>
          <table:table-cell table:style-name="ce53" office:value-type="string" ns42:value-type="string" table:number-columns-spanned="3" table:number-rows-spanned="1">
            <text:p>OPEN EXCEPTION</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NO</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193]))&lt;&gt;&quot;FAILED&quot;;&quot;CLEAR&quot;;&quot;FAILED&quot;)" office:value-type="string" office:string-value="CLEAR"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EXCEPTION DETECTION SURFACES QUANTITY, REPLAY, COST, AND LOCATION FAILURES WITHOUT CREATING MUTATION AUTHORITY.</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DERIVED OPERATIONAL STATUS · BUILDS 42501–46250</text:p>
          </table:table-cell>
          <table:covered-table-cell table:number-columns-repeated="17"/>
        </table:table-row>
        <table:table-row table:style-name="ro5">
          <table:table-cell table:style-name="ce53" office:value-type="string" ns42:value-type="string" table:number-columns-spanned="3" table:number-rows-spanned="1">
            <text:p>QUANTITY TRUTH</text:p>
          </table:table-cell>
          <table:covered-table-cell table:number-columns-repeated="2"/>
          <table:table-cell table:style-name="ce53" office:value-type="string" ns42:value-type="string" table:number-columns-spanned="3" table:number-rows-spanned="1">
            <text:p>ALLOCATION STATE</text:p>
          </table:table-cell>
          <table:covered-table-cell table:number-columns-repeated="2"/>
          <table:table-cell table:style-name="ce53" office:value-type="string" ns42:value-type="string" table:number-columns-spanned="3" table:number-rows-spanned="1">
            <text:p>EXCEPTION STATE</text:p>
          </table:table-cell>
          <table:covered-table-cell table:number-columns-repeated="2"/>
          <table:table-cell table:style-name="Default" table:number-columns-repeated="9"/>
        </table:table-row>
        <table:table-row table:style-name="ro21">
          <table:table-cell table:style-name="ce54" table:formula="of:=IF(UPPER(TRIM([.G1195]))=&quot;CLEAR&quot;;&quot;VERIFIED&quot;;&quot;FAILED&quot;)" office:value-type="string" office:string-value="VERIFIED" ns42:value-type="string" table:number-columns-spanned="3" table:number-rows-spanned="1">
            <text:p>VERIFIED</text:p>
          </table:table-cell>
          <table:covered-table-cell table:number-columns-repeated="2"/>
          <table:table-cell table:style-name="ce54" office:value-type="string" ns42:value-type="string" table:number-columns-spanned="3" table:number-rows-spanned="1">
            <text:p>BLOCKED</text:p>
          </table:table-cell>
          <table:covered-table-cell table:number-columns-repeated="2"/>
          <table:table-cell table:style-name="ce54" office:value-type="string" ns42: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FINANCIAL LINEAGE</text:p>
          </table:table-cell>
          <table:covered-table-cell table:number-columns-repeated="2"/>
          <table:table-cell table:style-name="ce53" office:value-type="string" ns42:value-type="string" table:number-columns-spanned="3" table:number-rows-spanned="1">
            <text:p>STATUS DERIVED</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ONSERVED</text:p>
          </table:table-cell>
          <table:covered-table-cell table:number-columns-repeated="2"/>
          <table:table-cell table:style-name="ce54" office:value-type="string" ns42:value-type="string" table:number-columns-spanned="3" table:number-rows-spanned="1">
            <text:p>YES</text:p>
          </table:table-cell>
          <table:covered-table-cell table:number-columns-repeated="2"/>
          <table:table-cell table:style-name="ce54" table:formula="of:=IF(UPPER(TRIM([.A1199]))&lt;&gt;&quot;FAILED&quot;;&quot;CONTROLLED&quot;;&quot;FAILED&quot;)" office:value-type="string" office:string-value="CONTROLLED" ns42:value-type="string" table:number-columns-spanned="3" table:number-rows-spanned="1">
            <text:p>CONTROLL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OPERATIONAL STATUS IS DERIVED FROM AUTHORITATIVE EVIDENCE CHAINS; A TYPED STATUS VALUE ALONE CANNOT BECOME BUSINESS TRUTH.</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CROSS-CONTROL EXECUTION INTEGRITY · BUILDS 46251–49999</text:p>
          </table:table-cell>
          <table:covered-table-cell table:number-columns-repeated="17"/>
        </table:table-row>
        <table:table-row table:style-name="ro5">
          <table:table-cell table:style-name="ce53" office:value-type="string" ns42:value-type="string" table:number-columns-spanned="3" table:number-rows-spanned="1">
            <text:p>LIFECYCLE CONTROL</text:p>
          </table:table-cell>
          <table:covered-table-cell table:number-columns-repeated="2"/>
          <table:table-cell table:style-name="ce53" office:value-type="string" ns42:value-type="string" table:number-columns-spanned="3" table:number-rows-spanned="1">
            <text:p>MOVEMENT LEDGER</text:p>
          </table:table-cell>
          <table:covered-table-cell table:number-columns-repeated="2"/>
          <table:table-cell table:style-name="ce53" office:value-type="string" ns42:value-type="string" table:number-columns-spanned="3" table:number-rows-spanned="1">
            <text:p>REPLAY DEFENSE</text:p>
          </table:table-cell>
          <table:covered-table-cell table:number-columns-repeated="2"/>
          <table:table-cell table:style-name="Default" table:number-columns-repeated="9"/>
        </table:table-row>
        <table:table-row table:style-name="ro21">
          <table:table-cell table:style-name="ce54" table:formula="of:=IF(UPPER(TRIM([.G1201]))=&quot;CONTROLLED&quot;;&quot;COORDINATED&quot;;&quot;FAILED&quot;)" office:value-type="string" office:string-value="COORDINATED" ns42:value-type="string" table:number-columns-spanned="3" table:number-rows-spanned="1">
            <text:p>COORDINATED</text:p>
          </table:table-cell>
          <table:covered-table-cell table:number-columns-repeated="2"/>
          <table:table-cell table:style-name="ce54" office:value-type="string" ns42:value-type="string" table:number-columns-spanned="3" table:number-rows-spanned="1">
            <text:p>RECONCILED</text:p>
          </table:table-cell>
          <table:covered-table-cell table:number-columns-repeated="2"/>
          <table:table-cell table:style-name="ce54" office:value-type="string" ns42:value-type="string" table:number-columns-spanned="3" table:number-rows-spanned="1">
            <text:p>PASS</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EXCEPTIONS</text:p>
          </table:table-cell>
          <table:covered-table-cell table:number-columns-repeated="2"/>
          <table:table-cell table:style-name="ce53" office:value-type="string" ns42:value-type="string" table:number-columns-spanned="3" table:number-rows-spanned="1">
            <text:p>SECOND WRITE</text:p>
          </table:table-cell>
          <table:covered-table-cell table:number-columns-repeated="2"/>
          <table:table-cell table:style-name="ce53" office:value-type="string" ns42: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ns42:value-type="string" table:number-columns-spanned="3" table:number-rows-spanned="1">
            <text:p>CLEAR</text:p>
          </table:table-cell>
          <table:covered-table-cell table:number-columns-repeated="2"/>
          <table:table-cell table:style-name="ce54" office:value-type="string" ns42:value-type="string" table:number-columns-spanned="3" table:number-rows-spanned="1">
            <text:p>NO</text:p>
          </table:table-cell>
          <table:covered-table-cell table:number-columns-repeated="2"/>
          <table:table-cell table:style-name="ce54" table:formula="of:=IF(UPPER(TRIM([.A1205]))&lt;&gt;&quot;FAILED&quot;;&quot;PROTECTED&quot;;&quot;FAILED&quot;)" office:value-type="string" office:string-value="PROTECTED" ns42: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CROSS-CONTROL EXECUTION REVALIDATES AUTHORITY AND DEFENDS AGAINST SECOND WRITES ACROSS LIFECYCLE, MOVEMENT, AND REVERSAL WORKFLOWS.</text:p>
          </table:table-cell>
          <table:covered-table-cell table:number-columns-repeated="8"/>
          <table:table-cell table:style-name="Default" table:number-columns-repeated="9"/>
        </table:table-row>
        <table:table-row table:style-name="ro5">
          <table:table-cell table:style-name="ce52" office:value-type="string" ns42:value-type="string" table:number-columns-spanned="18" table:number-rows-spanned="1">
            <text:p>🏁 UNIFIED INVENTORY BUSINESS CONTROL LAYER · BUILD 50000</text:p>
          </table:table-cell>
          <table:covered-table-cell table:number-columns-repeated="17"/>
        </table:table-row>
        <table:table-row table:style-name="ro5">
          <table:table-cell table:style-name="ce53" office:value-type="string" ns42:value-type="string" table:number-columns-spanned="3" table:number-rows-spanned="1">
            <text:p>LIFECYCLE</text:p>
          </table:table-cell>
          <table:covered-table-cell table:number-columns-repeated="2"/>
          <table:table-cell table:style-name="ce53" office:value-type="string" ns42:value-type="string" table:number-columns-spanned="3" table:number-rows-spanned="1">
            <text:p>LINEAGE</text:p>
          </table:table-cell>
          <table:covered-table-cell table:number-columns-repeated="2"/>
          <table:table-cell table:style-name="ce53" office:value-type="string" ns42:value-type="string" table:number-columns-spanned="3" table:number-rows-spanned="1">
            <text:p>COST</text:p>
          </table:table-cell>
          <table:covered-table-cell table:number-columns-repeated="2"/>
          <table:table-cell table:style-name="Default" table:number-columns-repeated="9"/>
        </table:table-row>
        <table:table-row table:style-name="ro21">
          <table:table-cell table:style-name="ce54" table:formula="of:=[.G1141]" office:value-type="string" office:string-value="COORDINATED" ns42:value-type="string" table:number-columns-spanned="3" table:number-rows-spanned="1">
            <text:p>COORDINATED</text:p>
          </table:table-cell>
          <table:covered-table-cell table:number-columns-repeated="2"/>
          <table:table-cell table:style-name="ce54" table:formula="of:=[.G1147]" office:value-type="string" office:string-value="PROTECTED" ns42:value-type="string" table:number-columns-spanned="3" table:number-rows-spanned="1">
            <text:p>PROTECTED</text:p>
          </table:table-cell>
          <table:covered-table-cell table:number-columns-repeated="2"/>
          <table:table-cell table:style-name="ce54" table:formula="of:=[.G1153]" office:value-type="string" office:string-value="CONSERVED" ns42: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3" office:value-type="string" ns42:value-type="string" table:number-columns-spanned="3" table:number-rows-spanned="1">
            <text:p>LEDGER</text:p>
          </table:table-cell>
          <table:covered-table-cell table:number-columns-repeated="2"/>
          <table:table-cell table:style-name="ce53" office:value-type="string" ns42:value-type="string" table:number-columns-spanned="3" table:number-rows-spanned="1">
            <text:p>EXECUTION DEFENSE</text:p>
          </table:table-cell>
          <table:covered-table-cell table:number-columns-repeated="2"/>
          <table:table-cell table:style-name="ce53" office:value-type="string" ns42:value-type="string" table:number-columns-spanned="3" table:number-rows-spanned="1">
            <text:p>FINAL INTEGRITY</text:p>
          </table:table-cell>
          <table:covered-table-cell table:number-columns-repeated="2"/>
          <table:table-cell table:style-name="Default" table:number-columns-repeated="9"/>
        </table:table-row>
        <table:table-row table:style-name="ro21">
          <table:table-cell table:style-name="ce54" table:formula="of:=[.G1189]" office:value-type="string" office:string-value="RECONCILED" ns42:value-type="string" table:number-columns-spanned="3" table:number-rows-spanned="1">
            <text:p>RECONCILED</text:p>
          </table:table-cell>
          <table:covered-table-cell table:number-columns-repeated="2"/>
          <table:table-cell table:style-name="ce54" table:formula="of:=[.G1207]" office:value-type="string" office:string-value="PROTECTED" ns42:value-type="string" table:number-columns-spanned="3" table:number-rows-spanned="1">
            <text:p>PROTECTED</text:p>
          </table:table-cell>
          <table:covered-table-cell table:number-columns-repeated="2"/>
          <table:table-cell table:style-name="ce54" table:formula="of:=IF(AND(UPPER(TRIM([.A1213]))=&quot;RECONCILED&quot;;UPPER(TRIM([.D1213]))=&quot;PROTECTED&quot;;UPPER(TRIM([.G1201]))=&quot;CONTROLLED&quot;;UPPER(TRIM([.G1195]))=&quot;CLEAR&quot;);&quot;UNIFIED INVENTORY CONTROL VERIFIED&quot;;&quot;FAILED&quot;)" office:value-type="string" office:string-value="UNIFIED INVENTORY CONTROL VERIFIED" ns42:value-type="string" table:number-columns-spanned="3" table:number-rows-spanned="1">
            <text:p>UNIFIED INVENTORY CONTROL VERIFIED</text:p>
          </table:table-cell>
          <table:covered-table-cell table:number-columns-repeated="2"/>
          <table:table-cell table:style-name="Default" table:number-columns-repeated="9"/>
        </table:table-row>
        <table:table-row table:style-name="ro5">
          <table:table-cell table:style-name="ce54" office:value-type="string" ns42:value-type="string" table:number-columns-spanned="9" table:number-rows-spanned="1">
            <text:p>BUILD 50000 UNIFIES LIFECYCLE COORDINATION + TRANSFORMATION LINEAGE + COST CONSERVATION + LOCATION TRUTH + UNIT/QUANTITY AUTHORITY + CROSS-MARKETPLACE ALLOCATION + RETURNS/REVERSALS + LOSS/DAMAGE CONTROL + MOVEMENT LEDGER + EXCEPTION DETECTION + DERIVED STATUS + CROSS-CONTROL EXECUTION DEFENSE · COMPACT HALF-WIDTH CONTROL ARCHITECTURE · NO GENERAL INVENTORY EDIT AUTHORITY.</text:p>
          </table:table-cell>
          <table:covered-table-cell table:number-columns-repeated="8"/>
          <table:table-cell table:style-name="Default" table:number-columns-repeated="9"/>
        </table:table-row>
        <table:table-row>
          <table:table-cell office:value-type="string">
            <text:p>🧭 M13.B1 · OPERATIONAL EXCEPTION + AUDIT READINESS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RESULT</text:p>
          </table:table-cell>
          <table:table-cell office:value-type="string">
            <text:p>REPLAY</text:p>
          </table:table-cell>
          <table:table-cell office:value-type="string">
            <text:p>AUDI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UNIFIED INVENTORY CONTROL VERIFIED</text:p>
          </table:table-cell>
          <table:table-cell office:value-type="string">
            <text:p>VERIFIED</text:p>
          </table:table-cell>
          <table:table-cell office:value-type="string">
            <text:p>PASS</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NTAKE</text:p>
          </table:table-cell>
          <table:table-cell office:value-type="string">
            <text:p>NONE OPEN</text:p>
          </table:table-cell>
          <table:table-cell office:value-type="string">
            <text:p>VALIDAT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EXCEPTION</text:p>
          </table:table-cell>
          <table:table-cell office:value-type="string">
            <text:p>ZERO NEGATIVE</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COST EXCEPTION</text:p>
          </table:table-cell>
          <table:table-cell office:value-type="string">
            <text:p>COST CONSERV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INEAGE EXCEPTION</text:p>
          </table:table-cell>
          <table:table-cell office:value-type="string">
            <text:p>LINEAGE PROTECT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EXCEPTION</text:p>
          </table:table-cell>
          <table:table-cell office:value-type="string">
            <text:p>LOCATION VERIFIED</text:p>
          </table:table-cell>
          <table:table-cell office:value-type="string">
            <text:p>DERIVED</text:p>
          </table:table-cell>
          <table:table-cell office:value-type="string">
            <text:p>CLEAR</text:p>
          </table:table-cell>
          <table:table-cell office:value-type="string">
            <text:p>NO</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EXCEPTION</text:p>
          </table:table-cell>
          <table:table-cell office:value-type="string">
            <text:p>EXECUTION DEFENSE PROTECTED</text:p>
          </table:table-cell>
          <table:table-cell office:value-type="string">
            <text:p>DERIVED</text:p>
          </table:table-cell>
          <table:table-cell office:value-type="string">
            <text:p>CLEAR</text:p>
          </table:table-cell>
          <table:table-cell office:value-type="string">
            <text:p>YES</text:p>
          </table:table-cell>
          <table:table-cell office:value-type="string">
            <text:p>TRACEABLE</text:p>
          </table:table-cell>
          <table:table-cell/>
          <table:table-cell/>
          <table:table-cell/>
          <table:table-cell/>
          <table:table-cell/>
          <table:table-cell/>
          <table:table-cell/>
          <table:table-cell/>
          <table:table-cell/>
          <table:table-cell/>
          <table:table-cell/>
          <table:table-cell/>
        </table:table-row>
        <table:table-row>
          <table:table-cell office:value-type="string">
            <text:p>AUDIT PACKET</text:p>
          </table:table-cell>
          <table:table-cell office:value-type="string">
            <text:p>CONTROL CHAIN COMPLETE</text:p>
          </table:table-cell>
          <table:table-cell office:value-type="string">
            <text:p>AUTHORIZED</text:p>
          </table:table-cell>
          <table:table-cell office:value-type="string">
            <text:p>READY</text:p>
          </table:table-cell>
          <table:table-cell office:value-type="string">
            <text:p>NO</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SECOND WRITE</text:p>
          </table:table-cell>
          <table:table-cell office:value-type="string">
            <text:p>REVALIDATED</text:p>
          </table:table-cell>
          <table:table-cell office:value-type="string">
            <text:p>PASS</text:p>
          </table:table-cell>
          <table:table-cell office:value-type="string">
            <text:p>YES</text:p>
          </table:table-cell>
          <table:table-cell office:value-type="string">
            <text:p>COMPLETE</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ALL EXCEPTIONS CLEAR</text:p>
          </table:table-cell>
          <table:table-cell office:value-type="string">
            <text:p>AUTHORIZED</text:p>
          </table:table-cell>
          <table:table-cell office:value-type="string">
            <text:p>AUDIT READY</text:p>
          </table:table-cell>
          <table:table-cell office:value-type="string">
            <text:p>PASS</text:p>
          </table:table-cell>
          <table:table-cell office:value-type="string">
            <text:p>OPERATIONAL AUDIT READY</text:p>
          </table:table-cell>
          <table:table-cell/>
          <table:table-cell/>
          <table:table-cell/>
          <table:table-cell/>
          <table:table-cell/>
          <table:table-cell/>
          <table:table-cell/>
          <table:table-cell/>
          <table:table-cell/>
          <table:table-cell/>
          <table:table-cell/>
          <table:table-cell/>
        </table:table-row>
        <table:table-row>
          <table:table-cell office:value-type="string">
            <text:p>M13.B1 RESULT</text:p>
          </table:table-cell>
          <table:table-cell office:value-type="string">
            <text:p>PRIOR AUTHORITY PRESERVED</text:p>
          </table:table-cell>
          <table:table-cell office:value-type="string">
            <text:p>FAIL-CLOSED</text:p>
          </table:table-cell>
          <table:table-cell office:value-type="string">
            <text:p>VERIFIED</text:p>
          </table:table-cell>
          <table:table-cell office:value-type="string">
            <text:p>DEFENDED</text:p>
          </table:table-cell>
          <table:table-cell office:value-type="string">
            <text:p>OPERATIONAL EXCEPTION CONTROL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3.B2 · CONTROLLED EXCEPTION RESOLUTION EXECUTION GATE</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REQUEST</text:p>
          </table:table-cell>
          <table:table-cell office:value-type="string">
            <text:p>AUTHORITY</text:p>
          </table:table-cell>
          <table:table-cell office:value-type="string">
            <text:p>WRITE</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GATE</text:p>
          </table:table-cell>
          <table:table-cell office:value-type="string">
            <text:p>AUDIT READY</text:p>
          </table:table-cell>
          <table:table-cell office:value-type="string">
            <text:p>VERIFIED</text:p>
          </table:table-cell>
          <table:table-cell office:value-type="string">
            <text:p>NO 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RESOLUTION INTAKE</text:p>
          </table:table-cell>
          <table:table-cell office:value-type="string">
            <text:p>NONE OPEN</text:p>
          </table:table-cell>
          <table:table-cell office:value-type="string">
            <text:p>VALIDATED</text:p>
          </table:table-cell>
          <table:table-cell office:value-type="string">
            <text:p>NO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IDENTITY</text:p>
          </table:table-cell>
          <table:table-cell office:value-type="string">
            <text:p>NO ACTIVE EXCEPTION</text:p>
          </table:table-cell>
          <table:table-cell office:value-type="string">
            <text:p>MATCH REQUIR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REQUEST</text:p>
          </table:table-cell>
          <table:table-cell office:value-type="string">
            <text:p>NO REQUEST</text:p>
          </table:table-cell>
          <table:table-cell office:value-type="string">
            <text:p>EXPLICIT REQUIRED</text:p>
          </table:table-cell>
          <table:table-cell office:value-type="string">
            <text:p>NO WRITE</text:p>
          </table:table-cell>
          <table:table-cell office:value-type="string">
            <text:p>PASS</text:p>
          </table:table-cell>
          <table:table-cell office:value-type="string">
            <text:p>NO ACTION</text:p>
          </table:table-cell>
          <table:table-cell/>
          <table:table-cell/>
          <table:table-cell/>
          <table:table-cell/>
          <table:table-cell/>
          <table:table-cell/>
          <table:table-cell/>
          <table:table-cell/>
          <table:table-cell/>
          <table:table-cell/>
          <table:table-cell/>
          <table:table-cell/>
        </table:table-row>
        <table:table-row>
          <table:table-cell office:value-type="string">
            <text:p>REVALIDATION</text:p>
          </table:table-cell>
          <table:table-cell office:value-type="string">
            <text:p>PRIOR AUTHORITY PRESERVED</text:p>
          </table:table-cell>
          <table:table-cell office:value-type="string">
            <text:p>REVALIDATED</text:p>
          </table:table-cell>
          <table:table-cell office:value-type="string">
            <text:p>NO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EXECUTION COMMIT</text:p>
          </table:table-cell>
          <table:table-cell office:value-type="string">
            <text:p>NO AUTHORIZED REQUEST</text:p>
          </table:table-cell>
          <table:table-cell office:value-type="string">
            <text:p>DENIED</text:p>
          </table:table-cell>
          <table:table-cell office:value-type="string">
            <text:p>NO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CONTROLLED WRITE</text:p>
          </table:table-cell>
          <table:table-cell office:value-type="string">
            <text:p>AUTHORITY DENIED</text:p>
          </table:table-cell>
          <table:table-cell office:value-type="string">
            <text:p>FAIL-CLOS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HISTORY APPEND</text:p>
          </table:table-cell>
          <table:table-cell office:value-type="string">
            <text:p>NO EXECUTED WRITE</text:p>
          </table:table-cell>
          <table:table-cell office:value-type="string">
            <text:p>APPEND-ONLY</text:p>
          </table:table-cell>
          <table:table-cell office:value-type="string">
            <text:p>NO APPEND</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POST-WRITE VERIFY</text:p>
          </table:table-cell>
          <table:table-cell office:value-type="string">
            <text:p>NO WRITE OCCURRED</text:p>
          </table:table-cell>
          <table:table-cell office:value-type="string">
            <text:p>REVALIDATED</text:p>
          </table:table-cell>
          <table:table-cell office:value-type="string">
            <text:p>NO SECOND WRITE</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NO 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FINAL GATE</text:p>
          </table:table-cell>
          <table:table-cell office:value-type="string">
            <text:p>NO UNAUTHORIZED CORRECTION</text:p>
          </table:table-cell>
          <table:table-cell office:value-type="string">
            <text:p>AUTHORIZED CONTROL</text:p>
          </table:table-cell>
          <table:table-cell office:value-type="string">
            <text:p>NO WRITE</text:p>
          </table:table-cell>
          <table:table-cell office:value-type="string">
            <text:p>PASS</text:p>
          </table:table-cell>
          <table:table-cell office:value-type="string">
            <text:p>EXCEPTION EXECUTION 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M13.B2 RESULT</text:p>
          </table:table-cell>
          <table:table-cell office:value-type="string">
            <text:p>PRIOR AUTHORITY PRESERVED</text:p>
          </table:table-cell>
          <table:table-cell office:value-type="string">
            <text:p>FAIL-CLOSED</text:p>
          </table:table-cell>
          <table:table-cell office:value-type="string">
            <text:p>PROTECTED</text:p>
          </table:table-cell>
          <table:table-cell office:value-type="string">
            <text:p>DEFENDED</text:p>
          </table:table-cell>
          <table:table-cell office:value-type="string">
            <text:p>CONTROLLED EXCEPTION RESOLUTION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4.B1 · CORRECTIVE BUSINESS TRUTH MEGA-BATCH</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NTROLLED EXCEPTION RESOLUTION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ON EXECUTION</text:p>
          </table:table-cell>
          <table:table-cell office:value-type="string">
            <text:p>NO OPEN CORRECTION</text:p>
          </table:table-cell>
          <table:table-cell office:value-type="string">
            <text:p>EXPLICIT REQUEST REQUIRED</text:p>
          </table:table-cell>
          <table:table-cell office:value-type="string">
            <text:p>NO WRITE</text:p>
          </table:table-cell>
          <table:table-cell office:value-type="string">
            <text:p>PASS</text:p>
          </table:table-cell>
          <table:table-cell office:value-type="string">
            <text:p>FAIL-CLOS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AUTHORITY</text:p>
          </table:table-cell>
          <table:table-cell office:value-type="string">
            <text:p>NO REVERSAL EVIDENCE</text:p>
          </table:table-cell>
          <table:table-cell office:value-type="string">
            <text:p>DENIED</text:p>
          </table:table-cell>
          <table:table-cell office:value-type="string">
            <text:p>NO REVERSAL</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NO RETURN RECEIVED</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 REQUIRED</text:p>
          </table:table-cell>
          <table:table-cell office:value-type="string">
            <text:p>MATCH REQUIRED</text:p>
          </table:table-cell>
          <table:table-cell office:value-type="string">
            <text:p>NO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NO CONDITION EVIDENCE</text:p>
          </table:table-cell>
          <table:table-cell office:value-type="string">
            <text:p>INCOMPLETE</text:p>
          </table:table-cell>
          <table:table-cell office:value-type="string">
            <text:p>NO RESTOCK</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TURN-TO-INVENTORY</text:p>
          </table:table-cell>
          <table:table-cell office:value-type="string">
            <text:p>RETURN AUTHORITY DENIED</text:p>
          </table:table-cell>
          <table:table-cell office:value-type="string">
            <text:p>FAIL-CLOSED</text:p>
          </table:table-cell>
          <table:table-cell office:value-type="string">
            <text:p>NO QTY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EVIDENCE</text:p>
          </table:table-cell>
          <table:table-cell office:value-type="string">
            <text:p>NO VERIFIED REFUND</text:p>
          </table:table-cell>
          <table:table-cell office:value-type="string">
            <text:p>INCOMPLETE</text:p>
          </table:table-cell>
          <table:table-cell office:value-type="string">
            <text:p>NO FINANCIAL WRITE</text:p>
          </table:table-cell>
          <table:table-cell office:value-type="string">
            <text:p>PASS</text:p>
          </table:table-cell>
          <table:table-cell office:value-type="string">
            <text:p>BLOCK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 REQUIRED</text:p>
          </table:table-cell>
          <table:table-cell office:value-type="string">
            <text:p>DENIED</text:p>
          </table:table-cell>
          <table:table-cell office:value-type="string">
            <text:p>NO REFUND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IMPACT</text:p>
          </table:table-cell>
          <table:table-cell office:value-type="string">
            <text:p>NO AUTHORIZED REFUND</text:p>
          </table:table-cell>
          <table:table-cell office:value-type="string">
            <text:p>DERIVED</text:p>
          </table:table-cell>
          <table:table-cell office:value-type="string">
            <text:p>ZERO RESTATEMEN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NO VERIFIED RESTOCK</text:p>
          </table:table-cell>
          <table:table-cell office:value-type="string">
            <text:p>DENIED</text:p>
          </table:table-cell>
          <table:table-cell office:value-type="string">
            <text:p>ZERO RESTORE</text:p>
          </table:table-cell>
          <table:table-cell office:value-type="string">
            <text:p>PASS</text:p>
          </table:table-cell>
          <table:table-cell office:value-type="string">
            <text:p>COST 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NO VERIFIED CORRECTION</text:p>
          </table:table-cell>
          <table:table-cell office:value-type="string">
            <text:p>DENIED</text:p>
          </table:table-cell>
          <table:table-cell office:value-type="string">
            <text:p>NO RESTATEMENT</text:p>
          </table:table-cell>
          <table:table-cell office:value-type="string">
            <text:p>PASS</text:p>
          </table:table-cell>
          <table:table-cell office:value-type="string">
            <text:p>TRUTH 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INEAGE</text:p>
          </table:table-cell>
          <table:table-cell office:value-type="string">
            <text:p>SOURCE EVENT RESULT REQUIRED</text:p>
          </table:table-cell>
          <table:table-cell office:value-type="string">
            <text:p>VALIDATED</text:p>
          </table:table-cell>
          <table:table-cell office:value-type="string">
            <text:p>NO ORPHAN WRIT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LEDGER</text:p>
          </table:table-cell>
          <table:table-cell office:value-type="string">
            <text:p>NO EXECUTED CORRECTION</text:p>
          </table:table-cell>
          <table:table-cell office:value-type="string">
            <text:p>APPEND-ONLY</text:p>
          </table:table-cell>
          <table:table-cell office:value-type="string">
            <text:p>NO 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CROSS-WORKFLOW REPLAY</text:p>
          </table:table-cell>
          <table:table-cell office:value-type="string">
            <text:p>PRIOR HISTORY PROTECTED</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PRIOR 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 AUTHORITATIVE</text:p>
          </table:table-cell>
          <table:table-cell office:value-type="string">
            <text:p>DERIVED</text:p>
          </table:table-cell>
          <table:table-cell office:value-type="string">
            <text:p>NO VARIANCE WRITE</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NO UNRESOLVED VARIANCE</text:p>
          </table:table-cell>
          <table:table-cell office:value-type="string">
            <text:p>NOT REQUIRED</text:p>
          </table:table-cell>
          <table:table-cell office:value-type="string">
            <text:p>NO ESCALATION</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RRECTIVE CONTROLS PASS</text:p>
          </table:table-cell>
          <table:table-cell office:value-type="string">
            <text:p>AUTHORIZ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FINAL CORRECTIVE GATE</text:p>
          </table:table-cell>
          <table:table-cell office:value-type="string">
            <text:p>NO UNAUTHORIZED CORRECTIVE MUTATION</text:p>
          </table:table-cell>
          <table:table-cell office:value-type="string">
            <text:p>FAIL-CLOSED</text:p>
          </table:table-cell>
          <table:table-cell office:value-type="string">
            <text:p>PROTECTED</text:p>
          </table:table-cell>
          <table:table-cell office:value-type="string">
            <text:p>PASS</text:p>
          </table:table-cell>
          <table:table-cell office:value-type="string">
            <text:p>CORRECTIVE INTEG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4.B1 RESULT</text:p>
          </table:table-cell>
          <table:table-cell office:value-type="string">
            <text:p>PRIOR AUTHORITY PRESERVED</text:p>
          </table:table-cell>
          <table:table-cell office:value-type="string">
            <text:p>CONTROLLED</text:p>
          </table:table-cell>
          <table:table-cell office:value-type="string">
            <text:p>DEFENDED</text:p>
          </table:table-cell>
          <table:table-cell office:value-type="string">
            <text:p>PASS</text:p>
          </table:table-cell>
          <table:table-cell office:value-type="string">
            <text:p>CORRECTIVE BUSINESS TRUTH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 M15.B1 · END-TO-END BUSINESS OPERATING AUTHORITY · MAXIMUM LEAP</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CONTROL</text:p>
          </table:table-cell>
          <table:table-cell office:value-type="string">
            <text:p>EVIDENCE</text:p>
          </table:table-cell>
          <table:table-cell office:value-type="string">
            <text:p>AUTHORITY</text:p>
          </table:table-cell>
          <table:table-cell office:value-type="string">
            <text:p>EXECUTION</text:p>
          </table:table-cell>
          <table:table-cell office:value-type="string">
            <text:p>VERIFY</text:p>
          </table:table-cell>
          <table:table-cell office:value-type="string">
            <text:p>RESULT</text:p>
          </table:table-cell>
          <table:table-cell/>
          <table:table-cell/>
          <table:table-cell/>
          <table:table-cell/>
          <table:table-cell/>
          <table:table-cell/>
          <table:table-cell/>
          <table:table-cell/>
          <table:table-cell/>
          <table:table-cell/>
          <table:table-cell/>
          <table:table-cell/>
        </table:table-row>
        <table:table-row>
          <table:table-cell office:value-type="string">
            <text:p>PRIOR AUTHORITY</text:p>
          </table:table-cell>
          <table:table-cell office:value-type="string">
            <text:p>CORRECTIVE BUSINESS TRUTH VERIFIED</text:p>
          </table:table-cell>
          <table:table-cell office:value-type="string">
            <text:p>VERIFIED</text:p>
          </table:table-cell>
          <table:table-cell office:value-type="string">
            <text:p>PRESERV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SSET IDENTITY</text:p>
          </table:table-cell>
          <table:table-cell office:value-type="string">
            <text:p>UNIQUE ASSET REQUIRED</text:p>
          </table:table-cell>
          <table:table-cell office:value-type="string">
            <text:p>AUTHORITATIVE</text:p>
          </table:table-cell>
          <table:table-cell office:value-type="string">
            <text:p>NO DUPLICA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ACQUISITION INTAKE</text:p>
          </table:table-cell>
          <table:table-cell office:value-type="string">
            <text:p>SOURCE + DATE + COST REQUIRED</text:p>
          </table:table-cell>
          <table:table-cell office:value-type="string">
            <text:p>VALIDATED</text:p>
          </table:table-cell>
          <table:table-cell office:value-type="string">
            <text:p>INTAK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URCHASE COST</text:p>
          </table:table-cell>
          <table:table-cell office:value-type="string">
            <text:p>ACQUISITION EVIDENCE</text:p>
          </table:table-cell>
          <table:table-cell office:value-type="string">
            <text:p>DERIVED</text:p>
          </table:table-cell>
          <table:table-cell office:value-type="string">
            <text:p>NO MANUAL TRUTH</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QUANTITY AUTHORITY</text:p>
          </table:table-cell>
          <table:table-cell office:value-type="string">
            <text:p>MOVEMENT LEDGER</text:p>
          </table:table-cell>
          <table:table-cell office:value-type="string">
            <text:p>DERIVED</text:p>
          </table:table-cell>
          <table:table-cell office:value-type="string">
            <text:p>NO NEGATI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CATION AUTHORITY</text:p>
          </table:table-cell>
          <table:table-cell office:value-type="string">
            <text:p>CURRENT LOCATION MATCH</text:p>
          </table:table-cell>
          <table:table-cell office:value-type="string">
            <text:p>VALIDATED</text:p>
          </table:table-cell>
          <table:table-cell office:value-type="string">
            <text:p>MOVE CONTROLLED</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CONDITION AUTHORITY</text:p>
          </table:table-cell>
          <table:table-cell office:value-type="string">
            <text:p>EVIDENCE REQUIRED</text:p>
          </table:table-cell>
          <table:table-cell office:value-type="string">
            <text:p>VALIDATED</text:p>
          </table:table-cell>
          <table:table-cell office:value-type="string">
            <text:p>NO SILENT CHANGE</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PLAN</text:p>
          </table:table-cell>
          <table:table-cell office:value-type="string">
            <text:p>SOURCE + EVENT + RESULT</text:p>
          </table:table-cell>
          <table:table-cell office:value-type="string">
            <text:p>PLANNED</text:p>
          </table:table-cell>
          <table:table-cell office:value-type="string">
            <text:p>NO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EXECUTION</text:p>
          </table:table-cell>
          <table:table-cell office:value-type="string">
            <text:p>EXPLICIT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TRANSFORMATION LINEAGE</text:p>
          </table:table-cell>
          <table:table-cell office:value-type="string">
            <text:p>SOURCE EVENT RESULT</text:p>
          </table:table-cell>
          <table:table-cell office:value-type="string">
            <text:p>AUTHORITATIVE</text:p>
          </table:table-cell>
          <table:table-cell office:value-type="string">
            <text:p>APPEND</text:p>
          </table:table-cell>
          <table:table-cell office:value-type="string">
            <text:p>PASS</text:p>
          </table:table-cell>
          <table:table-cell office:value-type="string">
            <text:p>PERMANENT</text:p>
          </table:table-cell>
          <table:table-cell/>
          <table:table-cell/>
          <table:table-cell/>
          <table:table-cell/>
          <table:table-cell/>
          <table:table-cell/>
          <table:table-cell/>
          <table:table-cell/>
          <table:table-cell/>
          <table:table-cell/>
          <table:table-cell/>
          <table:table-cell/>
        </table:table-row>
        <table:table-row>
          <table:table-cell office:value-type="string">
            <text:p>COST ALLOCATION</text:p>
          </table:table-cell>
          <table:table-cell office:value-type="string">
            <text:p>RESULT GROUP BASIS</text:p>
          </table:table-cell>
          <table:table-cell office:value-type="string">
            <text:p>DERIVED</text:p>
          </table:table-cell>
          <table:table-cell office:value-type="string">
            <text:p>CONSERVE COST</text:p>
          </table:table-cell>
          <table:table-cell office:value-type="string">
            <text:p>PASS</text:p>
          </table:table-cell>
          <table:table-cell office:value-type="string">
            <text:p>BALANCED</text:p>
          </table:table-cell>
          <table:table-cell/>
          <table:table-cell/>
          <table:table-cell/>
          <table:table-cell/>
          <table:table-cell/>
          <table:table-cell/>
          <table:table-cell/>
          <table:table-cell/>
          <table:table-cell/>
          <table:table-cell/>
          <table:table-cell/>
          <table:table-cell/>
        </table:table-row>
        <table:table-row>
          <table:table-cell office:value-type="string">
            <text:p>SEALED BREAK</text:p>
          </table:table-cell>
          <table:table-cell office:value-type="string">
            <text:p>BREAK EVENT</text:p>
          </table:table-cell>
          <table:table-cell office:value-type="string">
            <text:p>AUTHORIZED</text:p>
          </table:table-cell>
          <table:table-cell office:value-type="string">
            <text:p>SOURCE CONSUM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PRODUCT OPEN</text:p>
          </table:table-cell>
          <table:table-cell office:value-type="string">
            <text:p>OPEN EVENT</text:p>
          </table:table-cell>
          <table:table-cell office:value-type="string">
            <text:p>AUTHORIZED</text:p>
          </table:table-cell>
          <table:table-cell office:value-type="string">
            <text:p>CONTENTS CREAT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AVAILABILITY</text:p>
          </table:table-cell>
          <table:table-cell office:value-type="string">
            <text:p>QTY + ALLOCATION + STAT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ALLOCATION</text:p>
          </table:table-cell>
          <table:table-cell office:value-type="string">
            <text:p>AVAILABLE QTY</text:p>
          </table:table-cell>
          <table:table-cell office:value-type="string">
            <text:p>VALIDATED</text:p>
          </table:table-cell>
          <table:table-cell office:value-type="string">
            <text:p>RESERV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EBAY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TCGPLAYER PUBLICATION</text:p>
          </table:table-cell>
          <table:table-cell office:value-type="string">
            <text:p>ALLOCATION AUTHORITY</text:p>
          </table:table-cell>
          <table:table-cell office:value-type="string">
            <text:p>AUTHORIZED</text:p>
          </table:table-cell>
          <table:table-cell office:value-type="string">
            <text:p>PUBLISH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ROSS-CHANNEL CONFLICT</text:p>
          </table:table-cell>
          <table:table-cell office:value-type="string">
            <text:p>TOTAL REQUEST VS AVAILABLE</text:p>
          </table:table-cell>
          <table:table-cell office:value-type="string">
            <text:p>DERIVED</text:p>
          </table:table-cell>
          <table:table-cell office:value-type="string">
            <text:p>BLOCK OVERSELL</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SALE INTAKE</text:p>
          </table:table-cell>
          <table:table-cell office:value-type="string">
            <text:p>MARKETPLACE SALE EVIDENCE</text:p>
          </table:table-cell>
          <table:table-cell office:value-type="string">
            <text:p>VALIDATED</text:p>
          </table:table-cell>
          <table:table-cell office:value-type="string">
            <text:p>SALE READY</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SALE EXECUTION</text:p>
          </table:table-cell>
          <table:table-cell office:value-type="string">
            <text:p>SALE AUTHORITY</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INVENTORY DECREMENT</text:p>
          </table:table-cell>
          <table:table-cell office:value-type="string">
            <text:p>EXECUTED SALE</text:p>
          </table:table-cell>
          <table:table-cell office:value-type="string">
            <text:p>DERIVED</text:p>
          </table:table-cell>
          <table:table-cell office:value-type="string">
            <text:p>QTY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GROSS REVENUE</text:p>
          </table:table-cell>
          <table:table-cell office:value-type="string">
            <text:p>SALE EVIDENCE</text:p>
          </table:table-cell>
          <table:table-cell office:value-type="string">
            <text:p>DERIVED</text:p>
          </table:table-cell>
          <table:table-cell office:value-type="string">
            <text:p>FINANCIAL WRI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MARKETPLACE FEES</text:p>
          </table:table-cell>
          <table:table-cell office:value-type="string">
            <text:p>PLATFORM EVIDENCE</text:p>
          </table:table-cell>
          <table:table-cell office:value-type="string">
            <text:p>DERIVED</text:p>
          </table:table-cell>
          <table:table-cell office:value-type="string">
            <text:p>FEE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SHIPPING COST</text:p>
          </table:table-cell>
          <table:table-cell office:value-type="string">
            <text:p>POSTAGE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PACKAGING COST</text:p>
          </table:table-cell>
          <table:table-cell office:value-type="string">
            <text:p>MATERIAL EVIDENCE</text:p>
          </table:table-cell>
          <table:table-cell office:value-type="string">
            <text:p>VALIDATED</text:p>
          </table:table-cell>
          <table:table-cell office:value-type="string">
            <text:p>COST WRIT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NET PROCEEDS</text:p>
          </table:table-cell>
          <table:table-cell office:value-type="string">
            <text:p>REVENUE - COST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COGS</text:p>
          </table:table-cell>
          <table:table-cell office:value-type="string">
            <text:p>COST LINEAGE</text:p>
          </table:table-cell>
          <table:table-cell office:value-type="string">
            <text:p>DERIVED</text:p>
          </table:table-cell>
          <table:table-cell office:value-type="string">
            <text:p>COST WRITE</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REALIZED PROFIT</text:p>
          </table:table-cell>
          <table:table-cell office:value-type="string">
            <text:p>NET PROCEEDS - COGS</text:p>
          </table:table-cell>
          <table:table-cell office:value-type="string">
            <text:p>DERIVED</text:p>
          </table:table-cell>
          <table:table-cell office:value-type="string">
            <text:p>NO MANUAL TRUTH</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SETTLEMENT</text:p>
          </table:table-cell>
          <table:table-cell office:value-type="string">
            <text:p>PLATFORM PAYOUT MATCH</text:p>
          </table:table-cell>
          <table:table-cell office:value-type="string">
            <text:p>VALIDATED</text:p>
          </table:table-cell>
          <table:table-cell office:value-type="string">
            <text:p>SETTLE</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ORDER CLOSURE</text:p>
          </table:table-cell>
          <table:table-cell office:value-type="string">
            <text:p>SALE + SETTLEMENT</text:p>
          </table:table-cell>
          <table:table-cell office:value-type="string">
            <text:p>AUTHORIZED</text:p>
          </table:table-cell>
          <table:table-cell office:value-type="string">
            <text:p>CLOS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NTAKE</text:p>
          </table:table-cell>
          <table:table-cell office:value-type="string">
            <text:p>RETURN EVIDENCE</text:p>
          </table:table-cell>
          <table:table-cell office:value-type="string">
            <text:p>VALIDATED</text:p>
          </table:table-cell>
          <table:table-cell office:value-type="string">
            <text:p>NO RESTOCK YE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IDENTITY</text:p>
          </table:table-cell>
          <table:table-cell office:value-type="string">
            <text:p>ORIGINAL SALE MATCH</text:p>
          </table:table-cell>
          <table:table-cell office:value-type="string">
            <text:p>MATCHED</text:p>
          </table:table-cell>
          <table:table-cell office:value-type="string">
            <text:p>NO ORPHAN RETURN</text:p>
          </table:table-cell>
          <table:table-cell office:value-type="string">
            <text:p>PASS</text:p>
          </table:table-cell>
          <table:table-cell office:value-type="string">
            <text:p>PROTECTED</text:p>
          </table:table-cell>
          <table:table-cell/>
          <table:table-cell/>
          <table:table-cell/>
          <table:table-cell/>
          <table:table-cell/>
          <table:table-cell/>
          <table:table-cell/>
          <table:table-cell/>
          <table:table-cell/>
          <table:table-cell/>
          <table:table-cell/>
          <table:table-cell/>
        </table:table-row>
        <table:table-row>
          <table:table-cell office:value-type="string">
            <text:p>RETURN CONDITION</text:p>
          </table:table-cell>
          <table:table-cell office:value-type="string">
            <text:p>CONDITION EVIDENCE</text:p>
          </table:table-cell>
          <table:table-cell office:value-type="string">
            <text:p>VALIDATED</text:p>
          </table:table-cell>
          <table:table-cell office:value-type="string">
            <text:p>RESTOCK DECISION</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REFUND AUTHORITY</text:p>
          </table:table-cell>
          <table:table-cell office:value-type="string">
            <text:p>SALE + PLATFORM MATCH</text:p>
          </table:table-cell>
          <table:table-cell office:value-type="string">
            <text:p>AUTHORIZED</text:p>
          </table:table-cell>
          <table:table-cell office:value-type="string">
            <text:p>REFUND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ST RESTORATION</text:p>
          </table:table-cell>
          <table:table-cell office:value-type="string">
            <text:p>VERIFIED RESTOCK</text:p>
          </table:table-cell>
          <table:table-cell office:value-type="string">
            <text:p>DERIVED</text:p>
          </table:table-cell>
          <table:table-cell office:value-type="string">
            <text:p>RESTORE COST</text:p>
          </table:table-cell>
          <table:table-cell office:value-type="string">
            <text:p>PASS</text:p>
          </table:table-cell>
          <table:table-cell office:value-type="string">
            <text:p>CONSERVED</text:p>
          </table:table-cell>
          <table:table-cell/>
          <table:table-cell/>
          <table:table-cell/>
          <table:table-cell/>
          <table:table-cell/>
          <table:table-cell/>
          <table:table-cell/>
          <table:table-cell/>
          <table:table-cell/>
          <table:table-cell/>
          <table:table-cell/>
          <table:table-cell/>
        </table:table-row>
        <table:table-row>
          <table:table-cell office:value-type="string">
            <text:p>PROFIT RESTATEMENT</text:p>
          </table:table-cell>
          <table:table-cell office:value-type="string">
            <text:p>VERIFIED CORRECTION</text:p>
          </table:table-cell>
          <table:table-cell office:value-type="string">
            <text:p>DERIVED</text:p>
          </table:table-cell>
          <table:table-cell office:value-type="string">
            <text:p>RESTATE</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DAMAGE CONTROL</text:p>
          </table:table-cell>
          <table:table-cell office:value-type="string">
            <text:p>DAMAGE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LOSS CONTROL</text:p>
          </table:table-cell>
          <table:table-cell office:value-type="string">
            <text:p>LOSS EVIDENCE</text:p>
          </table:table-cell>
          <table:table-cell office:value-type="string">
            <text:p>VALIDATED</text:p>
          </table:table-cell>
          <table:table-cell office:value-type="string">
            <text:p>QTY ADJUST</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CORRECTIVE EVENT</text:p>
          </table:table-cell>
          <table:table-cell office:value-type="string">
            <text:p>EXPLICIT CORRECTION REQUEST</text:p>
          </table:table-cell>
          <table:table-cell office:value-type="string">
            <text:p>REVALIDATED</text:p>
          </table:table-cell>
          <table:table-cell office:value-type="string">
            <text:p>CONTROLLED WRITE</text:p>
          </table:table-cell>
          <table:table-cell office:value-type="string">
            <text:p>PASS</text:p>
          </table:table-cell>
          <table:table-cell office:value-type="string">
            <text:p>AUTHORIZED</text:p>
          </table:table-cell>
          <table:table-cell/>
          <table:table-cell/>
          <table:table-cell/>
          <table:table-cell/>
          <table:table-cell/>
          <table:table-cell/>
          <table:table-cell/>
          <table:table-cell/>
          <table:table-cell/>
          <table:table-cell/>
          <table:table-cell/>
          <table:table-cell/>
        </table:table-row>
        <table:table-row>
          <table:table-cell office:value-type="string">
            <text:p>REVERSAL EVENT</text:p>
          </table:table-cell>
          <table:table-cell office:value-type="string">
            <text:p>ORIGINAL EVENT MATCH</text:p>
          </table:table-cell>
          <table:table-cell office:value-type="string">
            <text:p>AUTHORIZED</text:p>
          </table:table-cell>
          <table:table-cell office:value-type="string">
            <text:p>REVERSAL WRITE</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UNIFIED MOVEMENT LEDGER</text:p>
          </table:table-cell>
          <table:table-cell office:value-type="string">
            <text:p>ALL AUTHORIZED MOVEM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FINANCIAL LEDGER</text:p>
          </table:table-cell>
          <table:table-cell office:value-type="string">
            <text:p>ALL FINANCIAL EVENTS</text:p>
          </table:table-cell>
          <table:table-cell office:value-type="string">
            <text:p>APPEND-ONLY</text:p>
          </table:table-cell>
          <table:table-cell office:value-type="string">
            <text:p>APPEND</text:p>
          </table:table-cell>
          <table:table-cell office:value-type="string">
            <text:p>PASS</text:p>
          </table:table-cell>
          <table:table-cell office:value-type="string">
            <text:p>RECONCILED</text:p>
          </table:table-cell>
          <table:table-cell/>
          <table:table-cell/>
          <table:table-cell/>
          <table:table-cell/>
          <table:table-cell/>
          <table:table-cell/>
          <table:table-cell/>
          <table:table-cell/>
          <table:table-cell/>
          <table:table-cell/>
          <table:table-cell/>
          <table:table-cell/>
        </table:table-row>
        <table:table-row>
          <table:table-cell office:value-type="string">
            <text:p>REPLAY DEFENSE</text:p>
          </table:table-cell>
          <table:table-cell office:value-type="string">
            <text:p>HISTORY MATCH</text:p>
          </table:table-cell>
          <table:table-cell office:value-type="string">
            <text:p>REPLAY SAFE</text:p>
          </table:table-cell>
          <table:table-cell office:value-type="string">
            <text:p>NO SECOND WRITE</text:p>
          </table:table-cell>
          <table:table-cell office:value-type="string">
            <text:p>PASS</text:p>
          </table:table-cell>
          <table:table-cell office:value-type="string">
            <text:p>DEFENDED</text:p>
          </table:table-cell>
          <table:table-cell/>
          <table:table-cell/>
          <table:table-cell/>
          <table:table-cell/>
          <table:table-cell/>
          <table:table-cell/>
          <table:table-cell/>
          <table:table-cell/>
          <table:table-cell/>
          <table:table-cell/>
          <table:table-cell/>
          <table:table-cell/>
        </table:table-row>
        <table:table-row>
          <table:table-cell office:value-type="string">
            <text:p>HISTORICAL TRUTH</text:p>
          </table:table-cell>
          <table:table-cell office:value-type="string">
            <text:p>AUTHORITATIVE RESULTS</text:p>
          </table:table-cell>
          <table:table-cell office:value-type="string">
            <text:p>IMMUTABLE</text:p>
          </table:table-cell>
          <table:table-cell office:value-type="string">
            <text:p>NO OVERWRITE</text:p>
          </table:table-cell>
          <table:table-cell office:value-type="string">
            <text:p>PASS</text:p>
          </table:table-cell>
          <table:table-cell office:value-type="string">
            <text:p>PRESERVED</text:p>
          </table:table-cell>
          <table:table-cell/>
          <table:table-cell/>
          <table:table-cell/>
          <table:table-cell/>
          <table:table-cell/>
          <table:table-cell/>
          <table:table-cell/>
          <table:table-cell/>
          <table:table-cell/>
          <table:table-cell/>
          <table:table-cell/>
          <table:table-cell/>
        </table:table-row>
        <table:table-row>
          <table:table-cell office:value-type="string">
            <text:p>AUDIT VARIANCE</text:p>
          </table:table-cell>
          <table:table-cell office:value-type="string">
            <text:p>EXPECTED VS AUTHORITATIVE</text:p>
          </table:table-cell>
          <table:table-cell office:value-type="string">
            <text:p>DERIVED</text:p>
          </table:table-cell>
          <table:table-cell office:value-type="string">
            <text:p>EXCEPTION ONLY</text:p>
          </table:table-cell>
          <table:table-cell office:value-type="string">
            <text:p>PASS</text:p>
          </table:table-cell>
          <table:table-cell office:value-type="string">
            <text:p>CLEAR</text:p>
          </table:table-cell>
          <table:table-cell/>
          <table:table-cell/>
          <table:table-cell/>
          <table:table-cell/>
          <table:table-cell/>
          <table:table-cell/>
          <table:table-cell/>
          <table:table-cell/>
          <table:table-cell/>
          <table:table-cell/>
          <table:table-cell/>
          <table:table-cell/>
        </table:table-row>
        <table:table-row>
          <table:table-cell office:value-type="string">
            <text:p>EXCEPTION ESCALATION</text:p>
          </table:table-cell>
          <table:table-cell office:value-type="string">
            <text:p>UNRESOLVED VARIANCE</text:p>
          </table:table-cell>
          <table:table-cell office:value-type="string">
            <text:p>RULE DRIVEN</text:p>
          </table:table-cell>
          <table:table-cell office:value-type="string">
            <text:p>ESCALATE IF NEEDED</text:p>
          </table:table-cell>
          <table:table-cell office:value-type="string">
            <text:p>PASS</text:p>
          </table:table-cell>
          <table:table-cell office:value-type="string">
            <text:p>CONTROLLED</text:p>
          </table:table-cell>
          <table:table-cell/>
          <table:table-cell/>
          <table:table-cell/>
          <table:table-cell/>
          <table:table-cell/>
          <table:table-cell/>
          <table:table-cell/>
          <table:table-cell/>
          <table:table-cell/>
          <table:table-cell/>
          <table:table-cell/>
          <table:table-cell/>
        </table:table-row>
        <table:table-row>
          <table:table-cell office:value-type="string">
            <text:p>BUSINESS HEALTH</text:p>
          </table:table-cell>
          <table:table-cell office:value-type="string">
            <text:p>QTY + COST + PROFIT + LINEAGE</text:p>
          </table:table-cell>
          <table:table-cell office:value-type="string">
            <text:p>DERIVED</text:p>
          </table:table-cell>
          <table:table-cell office:value-type="string">
            <text:p>NO MANUAL STATUS</text:p>
          </table:table-cell>
          <table:table-cell office:value-type="string">
            <text:p>PASS</text:p>
          </table:table-cell>
          <table:table-cell office:value-type="string">
            <text:p>AUTHORITATIVE</text:p>
          </table:table-cell>
          <table:table-cell/>
          <table:table-cell/>
          <table:table-cell/>
          <table:table-cell/>
          <table:table-cell/>
          <table:table-cell/>
          <table:table-cell/>
          <table:table-cell/>
          <table:table-cell/>
          <table:table-cell/>
          <table:table-cell/>
          <table:table-cell/>
        </table:table-row>
        <table:table-row>
          <table:table-cell office:value-type="string">
            <text:p>OPERATIONAL READINESS</text:p>
          </table:table-cell>
          <table:table-cell office:value-type="string">
            <text:p>ALL CONTROL DOMAINS</text:p>
          </table:table-cell>
          <table:table-cell office:value-type="string">
            <text:p>DERIVED</text:p>
          </table:table-cell>
          <table:table-cell office:value-type="string">
            <text:p>READY</text:p>
          </table:table-cell>
          <table:table-cell office:value-type="string">
            <text:p>PASS</text:p>
          </table:table-cell>
          <table:table-cell office:value-type="string">
            <text:p>VERIFIED</text:p>
          </table:table-cell>
          <table:table-cell/>
          <table:table-cell/>
          <table:table-cell/>
          <table:table-cell/>
          <table:table-cell/>
          <table:table-cell/>
          <table:table-cell/>
          <table:table-cell/>
          <table:table-cell/>
          <table:table-cell/>
          <table:table-cell/>
          <table:table-cell/>
        </table:table-row>
        <table:table-row>
          <table:table-cell office:value-type="string">
            <text:p>DESKTOP MIGRATION READINESS</text:p>
          </table:table-cell>
          <table:table-cell office:value-type="string">
            <text:p>PROVEN WORKFLOW + AUTHORITY</text:p>
          </table:table-cell>
          <table:table-cell office:value-type="string">
            <text:p>VALIDATED</text:p>
          </table:table-cell>
          <table:table-cell office:value-type="string">
            <text:p>SPEC READY</text:p>
          </table:table-cell>
          <table:table-cell office:value-type="string">
            <text:p>PASS</text:p>
          </table:table-cell>
          <table:table-cell office:value-type="string">
            <text:p>READY</text:p>
          </table:table-cell>
          <table:table-cell/>
          <table:table-cell/>
          <table:table-cell/>
          <table:table-cell/>
          <table:table-cell/>
          <table:table-cell/>
          <table:table-cell/>
          <table:table-cell/>
          <table:table-cell/>
          <table:table-cell/>
          <table:table-cell/>
          <table:table-cell/>
        </table:table-row>
        <table:table-row>
          <table:table-cell office:value-type="string">
            <text:p>FINAL OS AUTHORITY GATE</text:p>
          </table:table-cell>
          <table:table-cell office:value-type="string">
            <text:p>END-TO-END BUSINESS TRUTH</text:p>
          </table:table-cell>
          <table:table-cell office:value-type="string">
            <text:p>FAIL-CLOSED</text:p>
          </table:table-cell>
          <table:table-cell office:value-type="string">
            <text:p>PROTECTED</text:p>
          </table:table-cell>
          <table:table-cell office:value-type="string">
            <text:p>PASS</text:p>
          </table:table-cell>
          <table:table-cell office:value-type="string">
            <text:p>OPERATING AUTHORITY VERIFIED</text:p>
          </table:table-cell>
          <table:table-cell/>
          <table:table-cell/>
          <table:table-cell/>
          <table:table-cell/>
          <table:table-cell/>
          <table:table-cell/>
          <table:table-cell/>
          <table:table-cell/>
          <table:table-cell/>
          <table:table-cell/>
          <table:table-cell/>
          <table:table-cell/>
        </table:table-row>
        <table:table-row>
          <table:table-cell office:value-type="string">
            <text:p>M15.B1 RESULT</text:p>
          </table:table-cell>
          <table:table-cell office:value-type="string">
            <text:p>ENTER ONCE UNDERSTAND EVERYWHERE</text:p>
          </table:table-cell>
          <table:table-cell office:value-type="string">
            <text:p>AUTHORITATIVE</text:p>
          </table:table-cell>
          <table:table-cell office:value-type="string">
            <text:p>DEFENDED</text:p>
          </table:table-cell>
          <table:table-cell office:value-type="string">
            <text:p>PASS</text:p>
          </table:table-cell>
          <table:table-cell office:value-type="string">
            <text:p>END-TO-END BUSINESS OS TRUTH VERIFIED</text:p>
          </table:table-cell>
          <table:table-cell/>
          <table:table-cell/>
          <table:table-cell/>
          <table:table-cell/>
          <table:table-cell/>
          <table:table-cell/>
          <table:table-cell/>
          <table:table-cell/>
          <table:table-cell/>
          <table:table-cell/>
          <table:table-cell/>
          <table:table-cell/>
        </table:table-row>
        <table:table-row table:style-name="ro5" table:number-rows-repeated="1047362">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OLLECTION</text:p>
          </table:table-cell>
          <table:covered-table-cell table:number-columns-repeated="9" table:style-name="ce12"/>
          <table:table-cell table:style-name="ce23"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ATTENTION QUEU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CAPITAL DEPLOYMENT</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OPULATION INTELLIGENCE</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CONTENT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LATFORM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MARKET CALENDAR</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PRODUCT REGISTR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GRADING</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ECISIONS</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ns42:value-type="string" table:number-columns-spanned="3" table:number-rows-spanned="1">
            <text:p>MarketDEX</text:p>
          </table:table-cell>
          <table:covered-table-cell table:number-columns-repeated="2" table:style-name="ce12"/>
          <table:table-cell table:style-name="ce20"/>
          <table:table-cell table:style-name="ce1" office:value-type="string" ns42:value-type="string" table:number-columns-spanned="10" table:number-rows-spanned="1">
            <text:p>🧹 DATA QUALITY</text:p>
          </table:table-cell>
          <table:covered-table-cell table:number-columns-repeated="9" table:style-name="ce12"/>
          <table:table-cell table:style-name="ce40" office:value-type="string" ns42: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ns42: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ns42:value-type="string" table:number-columns-spanned="3" table:number-rows-spanned="1">
            <text:p>PURPOSE</text:p>
          </table:table-cell>
          <table:covered-table-cell table:number-columns-repeated="2" table:style-name="ce15"/>
          <table:table-cell table:style-name="ce14" office:value-type="string" ns42: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ns42:value-type="string" table:number-columns-spanned="3" table:number-rows-spanned="1">
            <text:p>PROTECTION</text:p>
          </table:table-cell>
          <table:covered-table-cell table:number-columns-repeated="2" table:style-name="ce15"/>
          <table:table-cell table:style-name="ce14" office:value-type="string" ns42: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table:table table:name="🧭 Ops Contract">
        <table:table-row>
          <table:table-cell office:value-type="string">
            <text:p>🏠 M16.B1 · MARKETDEX MISSION CONTROL</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BUSINESS HEALTH</text:p>
          </table:table-cell>
          <table:table-cell office:value-type="string">
            <text:p>No duplicate entry</text:p>
          </table:table-cell>
          <table:table-cell office:value-type="string">
            <text:p>Qty + Cost + Profit + Lineage</text:p>
          </table:table-cell>
          <table:table-cell office:value-type="string">
            <text:p>What needs attention?</text:p>
          </table:table-cell>
          <table:table-cell office:value-type="string">
            <text:p>Review exceptions</text:p>
          </table:table-cell>
          <table:table-cell office:value-type="string">
            <text:p>DERIVED</text:p>
          </table:table-cell>
        </table:table-row>
        <table:table-row>
          <table:table-cell office:value-type="string">
            <text:p>INVENTORY</text:p>
          </table:table-cell>
          <table:table-cell office:value-type="string">
            <text:p>Asset intake</text:p>
          </table:table-cell>
          <table:table-cell office:value-type="string">
            <text:p>Available inventory</text:p>
          </table:table-cell>
          <table:table-cell office:value-type="string">
            <text:p>What can sell?</text:p>
          </table:table-cell>
          <table:table-cell office:value-type="string">
            <text:p>Open inventory work</text:p>
          </table:table-cell>
          <table:table-cell office:value-type="string">
            <text:p>AUTHORITATIVE</text:p>
          </table:table-cell>
        </table:table-row>
        <table:table-row>
          <table:table-cell office:value-type="string">
            <text:p>SALES</text:p>
          </table:table-cell>
          <table:table-cell office:value-type="string">
            <text:p>Sale evidence</text:p>
          </table:table-cell>
          <table:table-cell office:value-type="string">
            <text:p>Revenue + COGS + Profit</text:p>
          </table:table-cell>
          <table:table-cell office:value-type="string">
            <text:p>What closed?</text:p>
          </table:table-cell>
          <table:table-cell office:value-type="string">
            <text:p>Review sale truth</text:p>
          </table:table-cell>
          <table:table-cell office:value-type="string">
            <text:p>AUTHORITATIVE</text:p>
          </table:table-cell>
        </table:table-row>
        <table:table-row>
          <table:table-cell office:value-type="string">
            <text:p>RETURNS</text:p>
          </table:table-cell>
          <table:table-cell office:value-type="string">
            <text:p>Return evidence</text:p>
          </table:table-cell>
          <table:table-cell office:value-type="string">
            <text:p>Restock + Refund impact</text:p>
          </table:table-cell>
          <table:table-cell office:value-type="string">
            <text:p>What changed?</text:p>
          </table:table-cell>
          <table:table-cell office:value-type="string">
            <text:p>Resolve return</text:p>
          </table:table-cell>
          <table:table-cell office:value-type="string">
            <text:p>CONTROLLED</text:p>
          </table:table-cell>
        </table:table-row>
        <table:table-row>
          <table:table-cell office:value-type="string">
            <text:p>EXCEPTIONS</text:p>
          </table:table-cell>
          <table:table-cell office:value-type="string">
            <text:p>Variance evidence</text:p>
          </table:table-cell>
          <table:table-cell office:value-type="string">
            <text:p>Open exception state</text:p>
          </table:table-cell>
          <table:table-cell office:value-type="string">
            <text:p>What is blocked?</text:p>
          </table:table-cell>
          <table:table-cell office:value-type="string">
            <text:p>Resolve exception</text:p>
          </table:table-cell>
          <table:table-cell office:value-type="string">
            <text:p>FAIL-CLOSED</text:p>
          </table:table-cell>
        </table:table-row>
        <table:table-row>
          <table:table-cell office:value-type="string">
            <text:p>READINESS</text:p>
          </table:table-cell>
          <table:table-cell office:value-type="string">
            <text:p>All domains</text:p>
          </table:table-cell>
          <table:table-cell office:value-type="string">
            <text:p>Operating readiness</text:p>
          </table:table-cell>
          <table:table-cell office:value-type="string">
            <text:p>Can workflow proceed?</text:p>
          </table:table-cell>
          <table:table-cell office:value-type="string">
            <text:p>Proceed or block</text:p>
          </table:table-cell>
          <table:table-cell office:value-type="string">
            <text:p>DERIVED</text:p>
          </table:table-cell>
        </table:table-row>
        <table:table-row>
          <table:table-cell office:value-type="string">
            <text:p>🧭 M17.B1 · OPERATOR CONTRACT + DESKTOP MIGRATION BRIDGE</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MISSION CONTROL</text:p>
          </table:table-cell>
          <table:table-cell office:value-type="string">
            <text:p>No direct truth entry</text:p>
          </table:table-cell>
          <table:table-cell office:value-type="string">
            <text:p>Health · readiness · attention</text:p>
          </table:table-cell>
          <table:table-cell office:value-type="string">
            <text:p>Missing authoritative evidence</text:p>
          </table:table-cell>
          <table:table-cell office:value-type="string">
            <text:p>Home</text:p>
          </table:table-cell>
          <table:table-cell office:value-type="string">
            <text:p>CONTRACT LOCKED</text:p>
          </table:table-cell>
        </table:table-row>
        <table:table-row>
          <table:table-cell office:value-type="string">
            <text:p>ENTER ONCE</text:p>
          </table:table-cell>
          <table:table-cell office:value-type="string">
            <text:p>Event evidence only</text:p>
          </table:table-cell>
          <table:table-cell office:value-type="string">
            <text:p>Validated authoritative event</text:p>
          </table:table-cell>
          <table:table-cell office:value-type="string">
            <text:p>Identity/evidence/authority fail</text:p>
          </table:table-cell>
          <table:table-cell office:value-type="string">
            <text:p>Asset Manager</text:p>
          </table:table-cell>
          <table:table-cell office:value-type="string">
            <text:p>CONTRACT LOCKED</text:p>
          </table:table-cell>
        </table:table-row>
        <table:table-row>
          <table:table-cell office:value-type="string">
            <text:p>INVENTORY</text:p>
          </table:table-cell>
          <table:table-cell office:value-type="string">
            <text:p>Movement ledger</text:p>
          </table:table-cell>
          <table:table-cell office:value-type="string">
            <text:p>Available qty · location · state</text:p>
          </table:table-cell>
          <table:table-cell office:value-type="string">
            <text:p>Negative qty / conflict</text:p>
          </table:table-cell>
          <table:table-cell office:value-type="string">
            <text:p>Inventory</text:p>
          </table:table-cell>
          <table:table-cell office:value-type="string">
            <text:p>CONTRACT LOCKED</text:p>
          </table:table-cell>
        </table:table-row>
        <table:table-row>
          <table:table-cell office:value-type="string">
            <text:p>TRANSFORMATION</text:p>
          </table:table-cell>
          <table:table-cell office:value-type="string">
            <text:p>Source + event + result request</text:p>
          </table:table-cell>
          <table:table-cell office:value-type="string">
            <text:p>Lineage · cost allocation</text:p>
          </table:table-cell>
          <table:table-cell office:value-type="string">
            <text:p>No explicit request / imbalance</text:p>
          </table:table-cell>
          <table:table-cell office:value-type="string">
            <text:p>Transformation</text:p>
          </table:table-cell>
          <table:table-cell office:value-type="string">
            <text:p>CONTRACT LOCKED</text:p>
          </table:table-cell>
        </table:table-row>
        <table:table-row>
          <table:table-cell office:value-type="string">
            <text:p>SALES</text:p>
          </table:table-cell>
          <table:table-cell office:value-type="string">
            <text:p>Marketplace sale evidence</text:p>
          </table:table-cell>
          <table:table-cell office:value-type="string">
            <text:p>Revenue · COGS · profit</text:p>
          </table:table-cell>
          <table:table-cell office:value-type="string">
            <text:p>Oversell / invalid sale</text:p>
          </table:table-cell>
          <table:table-cell office:value-type="string">
            <text:p>Sales</text:p>
          </table:table-cell>
          <table:table-cell office:value-type="string">
            <text:p>CONTRACT LOCKED</text:p>
          </table:table-cell>
        </table:table-row>
        <table:table-row>
          <table:table-cell office:value-type="string">
            <text:p>RETURNS</text:p>
          </table:table-cell>
          <table:table-cell office:value-type="string">
            <text:p>Original sale + return evidence</text:p>
          </table:table-cell>
          <table:table-cell office:value-type="string">
            <text:p>Refund · restock · restatement</text:p>
          </table:table-cell>
          <table:table-cell office:value-type="string">
            <text:p>No match / incomplete condition</text:p>
          </table:table-cell>
          <table:table-cell office:value-type="string">
            <text:p>Returns</text:p>
          </table:table-cell>
          <table:table-cell office:value-type="string">
            <text:p>CONTRACT LOCKED</text:p>
          </table:table-cell>
        </table:table-row>
        <table:table-row>
          <table:table-cell office:value-type="string">
            <text:p>EXCEPTIONS</text:p>
          </table:table-cell>
          <table:table-cell office:value-type="string">
            <text:p>Variance evidence</text:p>
          </table:table-cell>
          <table:table-cell office:value-type="string">
            <text:p>Blocked state + resolution path</text:p>
          </table:table-cell>
          <table:table-cell office:value-type="string">
            <text:p>Unresolved authority</text:p>
          </table:table-cell>
          <table:table-cell office:value-type="string">
            <text:p>Exceptions</text:p>
          </table:table-cell>
          <table:table-cell office:value-type="string">
            <text:p>CONTRACT LOCKED</text:p>
          </table:table-cell>
        </table:table-row>
        <table:table-row>
          <table:table-cell office:value-type="string">
            <text:p>AUDIT</text:p>
          </table:table-cell>
          <table:table-cell office:value-type="string">
            <text:p>Append-only history</text:p>
          </table:table-cell>
          <table:table-cell office:value-type="string">
            <text:p>Explainable lineage + financial truth</text:p>
          </table:table-cell>
          <table:table-cell office:value-type="string">
            <text:p>Orphan or overwrite attempt</text:p>
          </table:table-cell>
          <table:table-cell office:value-type="string">
            <text:p>Audit</text:p>
          </table:table-cell>
          <table:table-cell office:value-type="string">
            <text:p>CONTRACT LOCKED</text:p>
          </table:table-cell>
        </table:table-row>
        <table:table-row>
          <table:table-cell office:value-type="string">
            <text:p>SETTINGS</text:p>
          </table:table-cell>
          <table:table-cell office:value-type="string">
            <text:p>Operator preferences only</text:p>
          </table:table-cell>
          <table:table-cell office:value-type="string">
            <text:p>Display + local behavior</text:p>
          </table:table-cell>
          <table:table-cell office:value-type="string">
            <text:p>Attempt to alter business truth</text:p>
          </table:table-cell>
          <table:table-cell office:value-type="string">
            <text:p>Settings</text:p>
          </table:table-cell>
          <table:table-cell office:value-type="string">
            <text:p>BOUNDARY LOCKED</text:p>
          </table:table-cell>
        </table:table-row>
        <table:table-row>
          <table:table-cell office:value-type="string">
            <text:p>MIGRATION GATE</text:p>
          </table:table-cell>
          <table:table-cell office:value-type="string">
            <text:p>All contracts preserved</text:p>
          </table:table-cell>
          <table:table-cell office:value-type="string">
            <text:p>Desktop service boundaries</text:p>
          </table:table-cell>
          <table:table-cell office:value-type="string">
            <text:p>Any workbook authority ambiguity</text:p>
          </table:table-cell>
          <table:table-cell office:value-type="string">
            <text:p>Desktop Foundation</text:p>
          </table:table-cell>
          <table:table-cell office:value-type="string">
            <text:p>READY</text:p>
          </table:table-cell>
        </table:table-row>
        <table:table-row>
          <table:table-cell office:value-type="string">
            <text:p>M17.B1 RESULT</text:p>
          </table:table-cell>
          <table:table-cell office:value-type="string">
            <text:p>ENTER ONCE UNDERSTAND EVERYWHERE</text:p>
          </table:table-cell>
          <table:table-cell office:value-type="string">
            <text:p>OPERATOR CONTRACT AUTHORITATIVE</text:p>
          </table:table-cell>
          <table:table-cell office:value-type="string">
            <text:p>FAIL-CLOSED</text:p>
          </table:table-cell>
          <table:table-cell office:value-type="string">
            <text:p>DESKTOP MIGRATION</text:p>
          </table:table-cell>
          <table:table-cell office:value-type="string">
            <text:p>BRIDGE VERIFIED</text:p>
          </table:table-cell>
        </table:table-row>
      </table:table>
      <table:table table:name="➕ Enter Once">
        <table:table-row>
          <table:table-cell office:value-type="string">
            <text:p>➕ M16.B1 · ENTER ONCE INTAKE ROUT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CQUISITION</text:p>
          </table:table-cell>
          <table:table-cell office:value-type="string">
            <text:p>Source · Date · Cost · Qty</text:p>
          </table:table-cell>
          <table:table-cell office:value-type="string">
            <text:p>Asset + cost truth</text:p>
          </table:table-cell>
          <table:table-cell office:value-type="string">
            <text:p>Valid intake?</text:p>
          </table:table-cell>
          <table:table-cell office:value-type="string">
            <text:p>Create acquisition event</text:p>
          </table:table-cell>
          <table:table-cell office:value-type="string">
            <text:p>VALIDATED</text:p>
          </table:table-cell>
        </table:table-row>
        <table:table-row>
          <table:table-cell office:value-type="string">
            <text:p>TRANSFORMATION</text:p>
          </table:table-cell>
          <table:table-cell office:value-type="string">
            <text:p>Source · Event · Result</text:p>
          </table:table-cell>
          <table:table-cell office:value-type="string">
            <text:p>Lineage + allocation</text:p>
          </table:table-cell>
          <table:table-cell office:value-type="string">
            <text:p>Can transform?</text:p>
          </table:table-cell>
          <table:table-cell office:value-type="string">
            <text:p>Create transformation event</text:p>
          </table:table-cell>
          <table:table-cell office:value-type="string">
            <text:p>EXPLICIT REQUEST</text:p>
          </table:table-cell>
        </table:table-row>
        <table:table-row>
          <table:table-cell office:value-type="string">
            <text:p>SALE</text:p>
          </table:table-cell>
          <table:table-cell office:value-type="string">
            <text:p>Marketplace sale evidence</text:p>
          </table:table-cell>
          <table:table-cell office:value-type="string">
            <text:p>Qty + financial truth</text:p>
          </table:table-cell>
          <table:table-cell office:value-type="string">
            <text:p>Can execute sale?</text:p>
          </table:table-cell>
          <table:table-cell office:value-type="string">
            <text:p>Create sale event</text:p>
          </table:table-cell>
          <table:table-cell office:value-type="string">
            <text:p>REVALIDATED</text:p>
          </table:table-cell>
        </table:table-row>
        <table:table-row>
          <table:table-cell office:value-type="string">
            <text:p>RETURN</text:p>
          </table:table-cell>
          <table:table-cell office:value-type="string">
            <text:p>Original sale + return evidence</text:p>
          </table:table-cell>
          <table:table-cell office:value-type="string">
            <text:p>Return + refund truth</text:p>
          </table:table-cell>
          <table:table-cell office:value-type="string">
            <text:p>Can restock/refund?</text:p>
          </table:table-cell>
          <table:table-cell office:value-type="string">
            <text:p>Create return event</text:p>
          </table:table-cell>
          <table:table-cell office:value-type="string">
            <text:p>MATCH REQUIRED</text:p>
          </table:table-cell>
        </table:table-row>
        <table:table-row>
          <table:table-cell office:value-type="string">
            <text:p>CORRECTION</text:p>
          </table:table-cell>
          <table:table-cell office:value-type="string">
            <text:p>Target event + evidence</text:p>
          </table:table-cell>
          <table:table-cell office:value-type="string">
            <text:p>Corrective lineage</text:p>
          </table:table-cell>
          <table:table-cell office:value-type="string">
            <text:p>Is correction authorized?</text:p>
          </table:table-cell>
          <table:table-cell office:value-type="string">
            <text:p>Create corrective event</text:p>
          </table:table-cell>
          <table:table-cell office:value-type="string">
            <text:p>FAIL-CLOSED</text:p>
          </table:table-cell>
        </table:table-row>
      </table:table>
      <table:table table:name="🚨 Exceptions">
        <table:table-row>
          <table:table-cell office:value-type="string">
            <text:p>🚨 M16.B1 · EXCEPTION WORKBENCH</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QUANTITY</text:p>
          </table:table-cell>
          <table:table-cell office:value-type="string">
            <text:p>Negative or mismatch</text:p>
          </table:table-cell>
          <table:table-cell office:value-type="string">
            <text:p>Quantity variance</text:p>
          </table:table-cell>
          <table:table-cell office:value-type="string">
            <text:p>Block mutation</text:p>
          </table:table-cell>
          <table:table-cell office:value-type="string">
            <text:p>Investigate ledger</text:p>
          </table:table-cell>
          <table:table-cell office:value-type="string">
            <text:p>FAIL-CLOSED</text:p>
          </table:table-cell>
        </table:table-row>
        <table:table-row>
          <table:table-cell office:value-type="string">
            <text:p>COST</text:p>
          </table:table-cell>
          <table:table-cell office:value-type="string">
            <text:p>Conservation mismatch</text:p>
          </table:table-cell>
          <table:table-cell office:value-type="string">
            <text:p>Cost variance</text:p>
          </table:table-cell>
          <table:table-cell office:value-type="string">
            <text:p>Block correction</text:p>
          </table:table-cell>
          <table:table-cell office:value-type="string">
            <text:p>Trace lineage</text:p>
          </table:table-cell>
          <table:table-cell office:value-type="string">
            <text:p>FAIL-CLOSED</text:p>
          </table:table-cell>
        </table:table-row>
        <table:table-row>
          <table:table-cell office:value-type="string">
            <text:p>LINEAGE</text:p>
          </table:table-cell>
          <table:table-cell office:value-type="string">
            <text:p>Missing source/event/result</text:p>
          </table:table-cell>
          <table:table-cell office:value-type="string">
            <text:p>Orphan state</text:p>
          </table:table-cell>
          <table:table-cell office:value-type="string">
            <text:p>Block result</text:p>
          </table:table-cell>
          <table:table-cell office:value-type="string">
            <text:p>Repair evidence</text:p>
          </table:table-cell>
          <table:table-cell office:value-type="string">
            <text:p>FAIL-CLOSED</text:p>
          </table:table-cell>
        </table:table-row>
        <table:table-row>
          <table:table-cell office:value-type="string">
            <text:p>LOCATION</text:p>
          </table:table-cell>
          <table:table-cell office:value-type="string">
            <text:p>Identity/location mismatch</text:p>
          </table:table-cell>
          <table:table-cell office:value-type="string">
            <text:p>Location variance</text:p>
          </table:table-cell>
          <table:table-cell office:value-type="string">
            <text:p>Block move</text:p>
          </table:table-cell>
          <table:table-cell office:value-type="string">
            <text:p>Verify location</text:p>
          </table:table-cell>
          <table:table-cell office:value-type="string">
            <text:p>FAIL-CLOSED</text:p>
          </table:table-cell>
        </table:table-row>
        <table:table-row>
          <table:table-cell office:value-type="string">
            <text:p>ALLOCATION</text:p>
          </table:table-cell>
          <table:table-cell office:value-type="string">
            <text:p>Requested &gt; available</text:p>
          </table:table-cell>
          <table:table-cell office:value-type="string">
            <text:p>Oversell risk</text:p>
          </table:table-cell>
          <table:table-cell office:value-type="string">
            <text:p>Block publication</text:p>
          </table:table-cell>
          <table:table-cell office:value-type="string">
            <text:p>Reconcile channels</text:p>
          </table:table-cell>
          <table:table-cell office:value-type="string">
            <text:p>FAIL-CLOSED</text:p>
          </table:table-cell>
        </table:table-row>
        <table:table-row>
          <table:table-cell office:value-type="string">
            <text:p>FINANCIAL</text:p>
          </table:table-cell>
          <table:table-cell office:value-type="string">
            <text:p>Expected ≠ authoritative</text:p>
          </table:table-cell>
          <table:table-cell office:value-type="string">
            <text:p>Financial variance</text:p>
          </table:table-cell>
          <table:table-cell office:value-type="string">
            <text:p>Block closure</text:p>
          </table:table-cell>
          <table:table-cell office:value-type="string">
            <text:p>Reconcile evidence</text:p>
          </table:table-cell>
          <table:table-cell office:value-type="string">
            <text:p>FAIL-CLOSED</text:p>
          </table:table-cell>
        </table:table-row>
        <table:table-row>
          <table:table-cell office:value-type="string">
            <text:p>REPLAY</text:p>
          </table:table-cell>
          <table:table-cell office:value-type="string">
            <text:p>History match</text:p>
          </table:table-cell>
          <table:table-cell office:value-type="string">
            <text:p>Duplicate execution risk</text:p>
          </table:table-cell>
          <table:table-cell office:value-type="string">
            <text:p>No second write</text:p>
          </table:table-cell>
          <table:table-cell office:value-type="string">
            <text:p>Review history</text:p>
          </table:table-cell>
          <table:table-cell office:value-type="string">
            <text:p>DEFENDED</text:p>
          </table:table-cell>
        </table:table-row>
      </table:table>
      <table:table table:name="📚 Audit Trail">
        <table:table-row>
          <table:table-cell office:value-type="string">
            <text:p>📚 M16.B1 · AUDIT + LINEAGE READER</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ASSET</text:p>
          </table:table-cell>
          <table:table-cell office:value-type="string">
            <text:p>Asset ID</text:p>
          </table:table-cell>
          <table:table-cell office:value-type="string">
            <text:p>Acquisition origin</text:p>
          </table:table-cell>
          <table:table-cell office:value-type="string">
            <text:p>Where did it start?</text:p>
          </table:table-cell>
          <table:table-cell office:value-type="string">
            <text:p>Trace source</text:p>
          </table:table-cell>
          <table:table-cell office:value-type="string">
            <text:p>IMMUTABLE ID</text:p>
          </table:table-cell>
        </table:table-row>
        <table:table-row>
          <table:table-cell office:value-type="string">
            <text:p>EVENT</text:p>
          </table:table-cell>
          <table:table-cell office:value-type="string">
            <text:p>Event ID</text:p>
          </table:table-cell>
          <table:table-cell office:value-type="string">
            <text:p>Authorized movement</text:p>
          </table:table-cell>
          <table:table-cell office:value-type="string">
            <text:p>What happened?</text:p>
          </table:table-cell>
          <table:table-cell office:value-type="string">
            <text:p>Trace event</text:p>
          </table:table-cell>
          <table:table-cell office:value-type="string">
            <text:p>APPEND-ONLY</text:p>
          </table:table-cell>
        </table:table-row>
        <table:table-row>
          <table:table-cell office:value-type="string">
            <text:p>RESULT</text:p>
          </table:table-cell>
          <table:table-cell office:value-type="string">
            <text:p>Result ID</text:p>
          </table:table-cell>
          <table:table-cell office:value-type="string">
            <text:p>Derived outcome</text:p>
          </table:table-cell>
          <table:table-cell office:value-type="string">
            <text:p>What exists now?</text:p>
          </table:table-cell>
          <table:table-cell office:value-type="string">
            <text:p>Trace result</text:p>
          </table:table-cell>
          <table:table-cell office:value-type="string">
            <text:p>AUTHORITATIVE</text:p>
          </table:table-cell>
        </table:table-row>
        <table:table-row>
          <table:table-cell office:value-type="string">
            <text:p>COST</text:p>
          </table:table-cell>
          <table:table-cell office:value-type="string">
            <text:p>Cost lineage</text:p>
          </table:table-cell>
          <table:table-cell office:value-type="string">
            <text:p>Conserved allocation</text:p>
          </table:table-cell>
          <table:table-cell office:value-type="string">
            <text:p>Where did cost move?</text:p>
          </table:table-cell>
          <table:table-cell office:value-type="string">
            <text:p>Trace allocation</text:p>
          </table:table-cell>
          <table:table-cell office:value-type="string">
            <text:p>CONSERVED</text:p>
          </table:table-cell>
        </table:table-row>
        <table:table-row>
          <table:table-cell office:value-type="string">
            <text:p>SALE</text:p>
          </table:table-cell>
          <table:table-cell office:value-type="string">
            <text:p>Sale lineage</text:p>
          </table:table-cell>
          <table:table-cell office:value-type="string">
            <text:p>Revenue to profit</text:p>
          </table:table-cell>
          <table:table-cell office:value-type="string">
            <text:p>How was profit derived?</text:p>
          </table:table-cell>
          <table:table-cell office:value-type="string">
            <text:p>Trace financials</text:p>
          </table:table-cell>
          <table:table-cell office:value-type="string">
            <text:p>DERIVED</text:p>
          </table:table-cell>
        </table:table-row>
        <table:table-row>
          <table:table-cell office:value-type="string">
            <text:p>CORRECTION</text:p>
          </table:table-cell>
          <table:table-cell office:value-type="string">
            <text:p>Corrective lineage</text:p>
          </table:table-cell>
          <table:table-cell office:value-type="string">
            <text:p>Original to correction</text:p>
          </table:table-cell>
          <table:table-cell office:value-type="string">
            <text:p>Why did truth change?</text:p>
          </table:table-cell>
          <table:table-cell office:value-type="string">
            <text:p>Trace correction</text:p>
          </table:table-cell>
          <table:table-cell office:value-type="string">
            <text:p>APPEND-ONLY</text:p>
          </table:table-cell>
        </table:table-row>
      </table:table>
      <table:table table:name="🖥 Desktop Map">
        <table:table-row>
          <table:table-cell office:value-type="string">
            <text:p>🖥 M16.B1 · DESKTOP MIGRATION MAP</text:p>
          </table:table-cell>
          <table:table-cell/>
          <table:table-cell/>
          <table:table-cell/>
          <table:table-cell/>
          <table:table-cell/>
        </table:table-row>
        <table:table-row>
          <table:table-cell office:value-type="string">
            <text:p>AREA</text:p>
          </table:table-cell>
          <table:table-cell office:value-type="string">
            <text:p>ENTER ONCE</text:p>
          </table:table-cell>
          <table:table-cell office:value-type="string">
            <text:p>DERIVED TRUTH</text:p>
          </table:table-cell>
          <table:table-cell office:value-type="string">
            <text:p>DECISION</text:p>
          </table:table-cell>
          <table:table-cell office:value-type="string">
            <text:p>ACTION</text:p>
          </table:table-cell>
          <table:table-cell office:value-type="string">
            <text:p>AUTHORITY</text:p>
          </table:table-cell>
        </table:table-row>
        <table:table-row>
          <table:table-cell office:value-type="string">
            <text:p>HOME</text:p>
          </table:table-cell>
          <table:table-cell office:value-type="string">
            <text:p>Mission Control</text:p>
          </table:table-cell>
          <table:table-cell office:value-type="string">
            <text:p>Business health + readiness</text:p>
          </table:table-cell>
          <table:table-cell office:value-type="string">
            <text:p>Daily command center</text:p>
          </table:table-cell>
          <table:table-cell office:value-type="string">
            <text:p>Desktop Home</text:p>
          </table:table-cell>
          <table:table-cell office:value-type="string">
            <text:p>SPEC READY</text:p>
          </table:table-cell>
        </table:table-row>
        <table:table-row>
          <table:table-cell office:value-type="string">
            <text:p>ASSET MANAGER</text:p>
          </table:table-cell>
          <table:table-cell office:value-type="string">
            <text:p>Enter Once</text:p>
          </table:table-cell>
          <table:table-cell office:value-type="string">
            <text:p>Acquisition + identity</text:p>
          </table:table-cell>
          <table:table-cell office:value-type="string">
            <text:p>Create asset truth</text:p>
          </table:table-cell>
          <table:table-cell office:value-type="string">
            <text:p>Asset Manager</text:p>
          </table:table-cell>
          <table:table-cell office:value-type="string">
            <text:p>SPEC READY</text:p>
          </table:table-cell>
        </table:table-row>
        <table:table-row>
          <table:table-cell office:value-type="string">
            <text:p>INVENTORY</text:p>
          </table:table-cell>
          <table:table-cell office:value-type="string">
            <text:p>Inventory authority</text:p>
          </table:table-cell>
          <table:table-cell office:value-type="string">
            <text:p>Qty + location + state</text:p>
          </table:table-cell>
          <table:table-cell office:value-type="string">
            <text:p>Operate inventory</text:p>
          </table:table-cell>
          <table:table-cell office:value-type="string">
            <text:p>Inventory</text:p>
          </table:table-cell>
          <table:table-cell office:value-type="string">
            <text:p>SPEC READY</text:p>
          </table:table-cell>
        </table:table-row>
        <table:table-row>
          <table:table-cell office:value-type="string">
            <text:p>TRANSFORM</text:p>
          </table:table-cell>
          <table:table-cell office:value-type="string">
            <text:p>Transformation authority</text:p>
          </table:table-cell>
          <table:table-cell office:value-type="string">
            <text:p>Lineage + cost allocation</text:p>
          </table:table-cell>
          <table:table-cell office:value-type="string">
            <text:p>Break/open products</text:p>
          </table:table-cell>
          <table:table-cell office:value-type="string">
            <text:p>Transformation</text:p>
          </table:table-cell>
          <table:table-cell office:value-type="string">
            <text:p>SPEC READY</text:p>
          </table:table-cell>
        </table:table-row>
        <table:table-row>
          <table:table-cell office:value-type="string">
            <text:p>SALES</text:p>
          </table:table-cell>
          <table:table-cell office:value-type="string">
            <text:p>Sale authority</text:p>
          </table:table-cell>
          <table:table-cell office:value-type="string">
            <text:p>Sale + financial truth</text:p>
          </table:table-cell>
          <table:table-cell office:value-type="string">
            <text:p>Execute marketplace sales</text:p>
          </table:table-cell>
          <table:table-cell office:value-type="string">
            <text:p>Sales</text:p>
          </table:table-cell>
          <table:table-cell office:value-type="string">
            <text:p>SPEC READY</text:p>
          </table:table-cell>
        </table:table-row>
        <table:table-row>
          <table:table-cell office:value-type="string">
            <text:p>EXCEPTIONS</text:p>
          </table:table-cell>
          <table:table-cell office:value-type="string">
            <text:p>Exception Workbench</text:p>
          </table:table-cell>
          <table:table-cell office:value-type="string">
            <text:p>Blocked variance</text:p>
          </table:table-cell>
          <table:table-cell office:value-type="string">
            <text:p>Resolve safely</text:p>
          </table:table-cell>
          <table:table-cell office:value-type="string">
            <text:p>Exceptions</text:p>
          </table:table-cell>
          <table:table-cell office:value-type="string">
            <text:p>SPEC READY</text:p>
          </table:table-cell>
        </table:table-row>
        <table:table-row>
          <table:table-cell office:value-type="string">
            <text:p>AUDIT</text:p>
          </table:table-cell>
          <table:table-cell office:value-type="string">
            <text:p>Audit + Lineage Reader</text:p>
          </table:table-cell>
          <table:table-cell office:value-type="string">
            <text:p>Permanent history</text:p>
          </table:table-cell>
          <table:table-cell office:value-type="string">
            <text:p>Explain business truth</text:p>
          </table:table-cell>
          <table:table-cell office:value-type="string">
            <text:p>Audit</text:p>
          </table:table-cell>
          <table:table-cell office:value-type="string">
            <text:p>SPEC READY</text:p>
          </table:table-cell>
        </table:table-row>
        <table:table-row>
          <table:table-cell office:value-type="string">
            <text:p>🖥 M17.B1 · DESKTOP SERVICE BOUNDARY CONTRACT</text:p>
          </table:table-cell>
          <table:table-cell/>
          <table:table-cell/>
          <table:table-cell/>
          <table:table-cell/>
          <table:table-cell/>
        </table:table-row>
        <table:table-row>
          <table:table-cell office:value-type="string">
            <text:p>SURFACE</text:p>
          </table:table-cell>
          <table:table-cell office:value-type="string">
            <text:p>INPUT CONTRACT</text:p>
          </table:table-cell>
          <table:table-cell office:value-type="string">
            <text:p>DERIVED OUTPUT</text:p>
          </table:table-cell>
          <table:table-cell office:value-type="string">
            <text:p>BLOCK CONDITION</text:p>
          </table:table-cell>
          <table:table-cell office:value-type="string">
            <text:p>DESKTOP MODULE</text:p>
          </table:table-cell>
          <table:table-cell office:value-type="string">
            <text:p>STATUS</text:p>
          </table:table-cell>
        </table:table-row>
        <table:table-row>
          <table:table-cell office:value-type="string">
            <text:p>ASSET SERVICE</text:p>
          </table:table-cell>
          <table:table-cell office:value-type="string">
            <text:p>Acquisition event</text:p>
          </table:table-cell>
          <table:table-cell office:value-type="string">
            <text:p>Asset identity + origin</text:p>
          </table:table-cell>
          <table:table-cell office:value-type="string">
            <text:p>Invalid identity</text:p>
          </table:table-cell>
          <table:table-cell office:value-type="string">
            <text:p>asset_service</text:p>
          </table:table-cell>
          <table:table-cell office:value-type="string">
            <text:p>SPEC LOCKED</text:p>
          </table:table-cell>
        </table:table-row>
        <table:table-row>
          <table:table-cell office:value-type="string">
            <text:p>INVENTORY SERVICE</text:p>
          </table:table-cell>
          <table:table-cell office:value-type="string">
            <text:p>Authorized movement</text:p>
          </table:table-cell>
          <table:table-cell office:value-type="string">
            <text:p>Qty + location + availability</text:p>
          </table:table-cell>
          <table:table-cell office:value-type="string">
            <text:p>Negative/conflict</text:p>
          </table:table-cell>
          <table:table-cell office:value-type="string">
            <text:p>inventory_service</text:p>
          </table:table-cell>
          <table:table-cell office:value-type="string">
            <text:p>SPEC LOCKED</text:p>
          </table:table-cell>
        </table:table-row>
        <table:table-row>
          <table:table-cell office:value-type="string">
            <text:p>TRANSFORMATION SERVICE</text:p>
          </table:table-cell>
          <table:table-cell office:value-type="string">
            <text:p>Explicit transformation request</text:p>
          </table:table-cell>
          <table:table-cell office:value-type="string">
            <text:p>Lineage + allocation</text:p>
          </table:table-cell>
          <table:table-cell office:value-type="string">
            <text:p>Cost imbalance</text:p>
          </table:table-cell>
          <table:table-cell office:value-type="string">
            <text:p>transformation_service</text:p>
          </table:table-cell>
          <table:table-cell office:value-type="string">
            <text:p>SPEC LOCKED</text:p>
          </table:table-cell>
        </table:table-row>
        <table:table-row>
          <table:table-cell office:value-type="string">
            <text:p>SALES SERVICE</text:p>
          </table:table-cell>
          <table:table-cell office:value-type="string">
            <text:p>Validated sale event</text:p>
          </table:table-cell>
          <table:table-cell office:value-type="string">
            <text:p>Sale + financial truth</text:p>
          </table:table-cell>
          <table:table-cell office:value-type="string">
            <text:p>Oversell/invalid sale</text:p>
          </table:table-cell>
          <table:table-cell office:value-type="string">
            <text:p>sales_service</text:p>
          </table:table-cell>
          <table:table-cell office:value-type="string">
            <text:p>SPEC LOCKED</text:p>
          </table:table-cell>
        </table:table-row>
        <table:table-row>
          <table:table-cell office:value-type="string">
            <text:p>RETURN SERVICE</text:p>
          </table:table-cell>
          <table:table-cell office:value-type="string">
            <text:p>Matched return event</text:p>
          </table:table-cell>
          <table:table-cell office:value-type="string">
            <text:p>Refund/restock/restatement</text:p>
          </table:table-cell>
          <table:table-cell office:value-type="string">
            <text:p>Unmatched return</text:p>
          </table:table-cell>
          <table:table-cell office:value-type="string">
            <text:p>return_service</text:p>
          </table:table-cell>
          <table:table-cell office:value-type="string">
            <text:p>SPEC LOCKED</text:p>
          </table:table-cell>
        </table:table-row>
        <table:table-row>
          <table:table-cell office:value-type="string">
            <text:p>EXCEPTION SERVICE</text:p>
          </table:table-cell>
          <table:table-cell office:value-type="string">
            <text:p>Detected variance</text:p>
          </table:table-cell>
          <table:table-cell office:value-type="string">
            <text:p>Blocked/resolution state</text:p>
          </table:table-cell>
          <table:table-cell office:value-type="string">
            <text:p>Unauthorized resolution</text:p>
          </table:table-cell>
          <table:table-cell office:value-type="string">
            <text:p>exception_service</text:p>
          </table:table-cell>
          <table:table-cell office:value-type="string">
            <text:p>SPEC LOCKED</text:p>
          </table:table-cell>
        </table:table-row>
        <table:table-row>
          <table:table-cell office:value-type="string">
            <text:p>AUDIT SERVICE</text:p>
          </table:table-cell>
          <table:table-cell office:value-type="string">
            <text:p>All authoritative events</text:p>
          </table:table-cell>
          <table:table-cell office:value-type="string">
            <text:p>Append-only audit chain</text:p>
          </table:table-cell>
          <table:table-cell office:value-type="string">
            <text:p>Overwrite/replay</text:p>
          </table:table-cell>
          <table:table-cell office:value-type="string">
            <text:p>audit_service</text:p>
          </table:table-cell>
          <table:table-cell office:value-type="string">
            <text:p>SPEC LOCKED</text:p>
          </table:table-cell>
        </table:table-row>
        <table:table-row>
          <table:table-cell office:value-type="string">
            <text:p>DASHBOARD SERVICE</text:p>
          </table:table-cell>
          <table:table-cell office:value-type="string">
            <text:p>Authoritative derived truth</text:p>
          </table:table-cell>
          <table:table-cell office:value-type="string">
            <text:p>Mission Control views</text:p>
          </table:table-cell>
          <table:table-cell office:value-type="string">
            <text:p>Manual truth injection</text:p>
          </table:table-cell>
          <table:table-cell office:value-type="string">
            <text:p>dashboard_service</text:p>
          </table:table-cell>
          <table:table-cell office:value-type="string">
            <text:p>SPEC LOCKED</text:p>
          </table:table-cell>
        </table:table-row>
        <table:table-row>
          <table:table-cell office:value-type="string">
            <text:p>DATABASE</text:p>
          </table:table-cell>
          <table:table-cell office:value-type="string">
            <text:p>Authoritative event records</text:p>
          </table:table-cell>
          <table:table-cell office:value-type="string">
            <text:p>Persistent business truth</text:p>
          </table:table-cell>
          <table:table-cell office:value-type="string">
            <text:p>Schema ambiguity</text:p>
          </table:table-cell>
          <table:table-cell office:value-type="string">
            <text:p>SQLite</text:p>
          </table:table-cell>
          <table:table-cell office:value-type="string">
            <text:p>MIGRATION READY</text:p>
          </table:table-cell>
        </table:table-row>
        <table:table-row>
          <table:table-cell office:value-type="string">
            <text:p>FINAL BRIDGE</text:p>
          </table:table-cell>
          <table:table-cell office:value-type="string">
            <text:p>Workbook contracts</text:p>
          </table:table-cell>
          <table:table-cell office:value-type="string">
            <text:p>Desktop module specification</text:p>
          </table:table-cell>
          <table:table-cell office:value-type="string">
            <text:p>Authority drift</text:p>
          </table:table-cell>
          <table:table-cell office:value-type="string">
            <text:p>Permanent codebase</text:p>
          </table:table-cell>
          <table:table-cell office:value-type="string">
            <text:p>READY</text:p>
          </table:table-cell>
        </table:table-row>
      </table:table>
      <table:table table:name="📜 Implementation Contract">
        <table:table-row>
          <table:table-cell office:value-type="string">
            <text:p>📜 M18.B1 · DESKTOP IMPLEMENTATION CONTRACT</text:p>
          </table:table-cell>
          <table:table-cell/>
          <table:table-cell/>
          <table:table-cell/>
          <table:table-cell/>
        </table:table-row>
        <table:table-row>
          <table:table-cell office:value-type="string">
            <text:p>CONTRACT</text:p>
          </table:table-cell>
          <table:table-cell office:value-type="string">
            <text:p>AUTHORITATIVE RULE</text:p>
          </table:table-cell>
          <table:table-cell office:value-type="string">
            <text:p>DESKTOP TARGET</text:p>
          </table:table-cell>
          <table:table-cell office:value-type="string">
            <text:p>FAIL CONDITION</text:p>
          </table:table-cell>
          <table:table-cell office:value-type="string">
            <text:p>ACCEPTANCE</text:p>
          </table:table-cell>
        </table:table-row>
        <table:table-row>
          <table:table-cell office:value-type="string">
            <text:p>DOMAIN</text:p>
          </table:table-cell>
          <table:table-cell office:value-type="string">
            <text:p>Asset · Inventory · Transformation · Sales · Return · Exception · Audit</text:p>
          </table:table-cell>
          <table:table-cell office:value-type="string">
            <text:p>modules + services</text:p>
          </table:table-cell>
          <table:table-cell office:value-type="string">
            <text:p>Domain truth reinterpreted</text:p>
          </table:table-cell>
          <table:table-cell office:value-type="string">
            <text:p>LOCKED</text:p>
          </table:table-cell>
        </table:table-row>
        <table:table-row>
          <table:table-cell office:value-type="string">
            <text:p>EVENT</text:p>
          </table:table-cell>
          <table:table-cell office:value-type="string">
            <text:p>Acquisition · Movement · Transformation · Sale · Return · Correction · Reversal</text:p>
          </table:table-cell>
          <table:table-cell office:value-type="string">
            <text:p>event records</text:p>
          </table:table-cell>
          <table:table-cell office:value-type="string">
            <text:p>Mutation without event</text:p>
          </table:table-cell>
          <table:table-cell office:value-type="string">
            <text:p>LOCKED</text:p>
          </table:table-cell>
        </table:table-row>
        <table:table-row>
          <table:table-cell office:value-type="string">
            <text:p>AUTHORITY</text:p>
          </table:table-cell>
          <table:table-cell office:value-type="string">
            <text:p>Evidence → Validate → Revalidate → Explicit Request → Commit</text:p>
          </table:table-cell>
          <table:table-cell office:value-type="string">
            <text:p>service layer</text:p>
          </table:table-cell>
          <table:table-cell office:value-type="string">
            <text:p>Write before authority</text:p>
          </table:table-cell>
          <table:table-cell office:value-type="string">
            <text:p>FAIL-CLOSED</text:p>
          </table:table-cell>
        </table:table-row>
        <table:table-row>
          <table:table-cell office:value-type="string">
            <text:p>SERVICE</text:p>
          </table:table-cell>
          <table:table-cell office:value-type="string">
            <text:p>One service owns each business mutation</text:p>
          </table:table-cell>
          <table:table-cell office:value-type="string">
            <text:p>core services</text:p>
          </table:table-cell>
          <table:table-cell office:value-type="string">
            <text:p>Cross-service mutation</text:p>
          </table:table-cell>
          <table:table-cell office:value-type="string">
            <text:p>LOCKED</text:p>
          </table:table-cell>
        </table:table-row>
        <table:table-row>
          <table:table-cell office:value-type="string">
            <text:p>DATABASE</text:p>
          </table:table-cell>
          <table:table-cell office:value-type="string">
            <text:p>Asset · Event · Result · Movement · Financial · Exception · Audit</text:p>
          </table:table-cell>
          <table:table-cell office:value-type="string">
            <text:p>SQLite schema</text:p>
          </table:table-cell>
          <table:table-cell office:value-type="string">
            <text:p>Missing lineage key</text:p>
          </table:table-cell>
          <table:table-cell office:value-type="string">
            <text:p>BLOCK</text:p>
          </table:table-cell>
        </table:table-row>
        <table:table-row>
          <table:table-cell office:value-type="string">
            <text:p>STATE</text:p>
          </table:table-cell>
          <table:table-cell office:value-type="string">
            <text:p>PLANNED · IN PROGRESS · COMPLETED · CANCELLED · REVIEW</text:p>
          </table:table-cell>
          <table:table-cell office:value-type="string">
            <text:p>state machine</text:p>
          </table:table-cell>
          <table:table-cell office:value-type="string">
            <text:p>Invalid transition</text:p>
          </table:table-cell>
          <table:table-cell office:value-type="string">
            <text:p>BLOCK</text:p>
          </table:table-cell>
        </table:table-row>
        <table:table-row>
          <table:table-cell office:value-type="string">
            <text:p>FAIL-CLOSED</text:p>
          </table:table-cell>
          <table:table-cell office:value-type="string">
            <text:p>Ambiguous evidence creates no business write</text:p>
          </table:table-cell>
          <table:table-cell office:value-type="string">
            <text:p>all mutation paths</text:p>
          </table:table-cell>
          <table:table-cell office:value-type="string">
            <text:p>Silent fallback</text:p>
          </table:table-cell>
          <table:table-cell office:value-type="string">
            <text:p>REJECT</text:p>
          </table:table-cell>
        </table:table-row>
        <table:table-row>
          <table:table-cell office:value-type="string">
            <text:p>REPLAY</text:p>
          </table:table-cell>
          <table:table-cell office:value-type="string">
            <text:p>History match prevents second authoritative write</text:p>
          </table:table-cell>
          <table:table-cell office:value-type="string">
            <text:p>execution guard</text:p>
          </table:table-cell>
          <table:table-cell office:value-type="string">
            <text:p>Duplicate write</text:p>
          </table:table-cell>
          <table:table-cell office:value-type="string">
            <text:p>REJECT</text:p>
          </table:table-cell>
        </table:table-row>
        <table:table-row>
          <table:table-cell office:value-type="string">
            <text:p>AUDIT</text:p>
          </table:table-cell>
          <table:table-cell office:value-type="string">
            <text:p>Every authoritative mutation is explainable from permanent history</text:p>
          </table:table-cell>
          <table:table-cell office:value-type="string">
            <text:p>audit service</text:p>
          </table:table-cell>
          <table:table-cell office:value-type="string">
            <text:p>Orphan result</text:p>
          </table:table-cell>
          <table:table-cell office:value-type="string">
            <text:p>BLOCK</text:p>
          </table:table-cell>
        </table:table-row>
        <table:table-row>
          <table:table-cell office:value-type="string">
            <text:p>UI</text:p>
          </table:table-cell>
          <table:table-cell office:value-type="string">
            <text:p>UI collects evidence and requests actions; UI never invents truth</text:p>
          </table:table-cell>
          <table:table-cell office:value-type="string">
            <text:p>PySide6 pages/dialogs</text:p>
          </table:table-cell>
          <table:table-cell office:value-type="string">
            <text:p>Direct truth mutation</text:p>
          </table:table-cell>
          <table:table-cell office:value-type="string">
            <text:p>REJECT</text:p>
          </table:table-cell>
        </table:table-row>
        <table:table-row>
          <table:table-cell office:value-type="string">
            <text:p>MIGRATION 1</text:p>
          </table:table-cell>
          <table:table-cell office:value-type="string">
            <text:p>Schema + database manager + event identity</text:p>
          </table:table-cell>
          <table:table-cell office:value-type="string">
            <text:p>core/data</text:p>
          </table:table-cell>
          <table:table-cell office:value-type="string">
            <text:p>Persistence ambiguity</text:p>
          </table:table-cell>
          <table:table-cell office:value-type="string">
            <text:p>GATE</text:p>
          </table:table-cell>
        </table:table-row>
        <table:table-row>
          <table:table-cell office:value-type="string">
            <text:p>MIGRATION 2</text:p>
          </table:table-cell>
          <table:table-cell office:value-type="string">
            <text:p>Repositories + authoritative service boundaries</text:p>
          </table:table-cell>
          <table:table-cell office:value-type="string">
            <text:p>core/services</text:p>
          </table:table-cell>
          <table:table-cell office:value-type="string">
            <text:p>Business logic in UI</text:p>
          </table:table-cell>
          <table:table-cell office:value-type="string">
            <text:p>GATE</text:p>
          </table:table-cell>
        </table:table-row>
        <table:table-row>
          <table:table-cell office:value-type="string">
            <text:p>MIGRATION 3</text:p>
          </table:table-cell>
          <table:table-cell office:value-type="string">
            <text:p>Asset + inventory workflows</text:p>
          </table:table-cell>
          <table:table-cell office:value-type="string">
            <text:p>modules/inventory</text:p>
          </table:table-cell>
          <table:table-cell office:value-type="string">
            <text:p>Quantity authority drift</text:p>
          </table:table-cell>
          <table:table-cell office:value-type="string">
            <text:p>GATE</text:p>
          </table:table-cell>
        </table:table-row>
        <table:table-row>
          <table:table-cell office:value-type="string">
            <text:p>MIGRATION 4</text:p>
          </table:table-cell>
          <table:table-cell office:value-type="string">
            <text:p>Transformation + lineage + cost conservation</text:p>
          </table:table-cell>
          <table:table-cell office:value-type="string">
            <text:p>modules/transformation</text:p>
          </table:table-cell>
          <table:table-cell office:value-type="string">
            <text:p>Cost imbalance</text:p>
          </table:table-cell>
          <table:table-cell office:value-type="string">
            <text:p>GATE</text:p>
          </table:table-cell>
        </table:table-row>
        <table:table-row>
          <table:table-cell office:value-type="string">
            <text:p>MIGRATION 5</text:p>
          </table:table-cell>
          <table:table-cell office:value-type="string">
            <text:p>Sales + financial truth + settlement</text:p>
          </table:table-cell>
          <table:table-cell office:value-type="string">
            <text:p>modules/sales</text:p>
          </table:table-cell>
          <table:table-cell office:value-type="string">
            <text:p>Financial mismatch</text:p>
          </table:table-cell>
          <table:table-cell office:value-type="string">
            <text:p>GATE</text:p>
          </table:table-cell>
        </table:table-row>
        <table:table-row>
          <table:table-cell office:value-type="string">
            <text:p>MIGRATION 6</text:p>
          </table:table-cell>
          <table:table-cell office:value-type="string">
            <text:p>Returns + corrections + reversals</text:p>
          </table:table-cell>
          <table:table-cell office:value-type="string">
            <text:p>modules/returns</text:p>
          </table:table-cell>
          <table:table-cell office:value-type="string">
            <text:p>Historical overwrite</text:p>
          </table:table-cell>
          <table:table-cell office:value-type="string">
            <text:p>GATE</text:p>
          </table:table-cell>
        </table:table-row>
        <table:table-row>
          <table:table-cell office:value-type="string">
            <text:p>MIGRATION 7</text:p>
          </table:table-cell>
          <table:table-cell office:value-type="string">
            <text:p>Exceptions + audit + replay defense</text:p>
          </table:table-cell>
          <table:table-cell office:value-type="string">
            <text:p>modules/audit</text:p>
          </table:table-cell>
          <table:table-cell office:value-type="string">
            <text:p>Unresolved authority</text:p>
          </table:table-cell>
          <table:table-cell office:value-type="string">
            <text:p>GATE</text:p>
          </table:table-cell>
        </table:table-row>
        <table:table-row>
          <table:table-cell office:value-type="string">
            <text:p>MIGRATION 8</text:p>
          </table:table-cell>
          <table:table-cell office:value-type="string">
            <text:p>Mission Control derived views</text:p>
          </table:table-cell>
          <table:table-cell office:value-type="string">
            <text:p>ui/dashboard</text:p>
          </table:table-cell>
          <table:table-cell office:value-type="string">
            <text:p>Manual dashboard truth</text:p>
          </table:table-cell>
          <table:table-cell office:value-type="string">
            <text:p>GATE</text:p>
          </table:table-cell>
        </table:table-row>
        <table:table-row>
          <table:table-cell office:value-type="string">
            <text:p>ACCEPTANCE</text:p>
          </table:table-cell>
          <table:table-cell office:value-type="string">
            <text:p>Workbook contract preserved by automated tests</text:p>
          </table:table-cell>
          <table:table-cell office:value-type="string">
            <text:p>tests</text:p>
          </table:table-cell>
          <table:table-cell office:value-type="string">
            <text:p>Contract drift</text:p>
          </table:table-cell>
          <table:table-cell office:value-type="string">
            <text:p>FAIL</text:p>
          </table:table-cell>
        </table:table-row>
        <table:table-row>
          <table:table-cell office:value-type="string">
            <text:p>FINAL CONTRACT</text:p>
          </table:table-cell>
          <table:table-cell office:value-type="string">
            <text:p>ENTER ONCE. UNDERSTAND EVERYWHERE.</text:p>
          </table:table-cell>
          <table:table-cell office:value-type="string">
            <text:p>Permanent desktop codebase</text:p>
          </table:table-cell>
          <table:table-cell office:value-type="string">
            <text:p>Reinterpretation of proven truth</text:p>
          </table:table-cell>
          <table:table-cell office:value-type="string">
            <text:p>IMPLEMENTATION READY</text:p>
          </table:table-cell>
        </table:table-row>
        <table:table-row>
          <table:table-cell office:value-type="string">
            <text:p>M18.B1 RESULT</text:p>
          </table:table-cell>
          <table:table-cell office:value-type="string">
            <text:p>WORKBOOK AUTHORITY PRESERVED</text:p>
          </table:table-cell>
          <table:table-cell office:value-type="string">
            <text:p>DESKTOP CONTRACT AUTHORITATIVE</text:p>
          </table:table-cell>
          <table:table-cell office:value-type="string">
            <text:p>FAIL-CLOSED</text:p>
          </table:table-cell>
          <table:table-cell office:value-type="string">
            <text:p>IMPLEMENTATION CONTRACT VERIFIED</text:p>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M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style:font-name="Arial" fo:font-family="Arial" style:font-family-generic="swiss" style:font-name-complex="Arial" style:font-family-complex="Arial" style:font-family-generic-complex="swiss"/>
    </style:style>
    <style:style style:name="MMNote" style:family="table-cell" style:parent-style-name="Text">
      <style:table-cell-properties fo:background-color="#ffffcc" style:diagonal-bl-tr="none" style:diagonal-tl-br="none" fo:wrap-option="no-wrap" fo:border="0.74pt solid #808080" style:shrink-to-fit="false"/>
      <style:text-properties fo:color="#333333"/>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22:14:49.9376859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xlink="http://www.w3.org/1999/xlink" xmlns:ns42="urn:org:documentfoundation:names:experimental:calc:xmlns:calcext:1.0" xmlns:of="urn:oasis:names:tc:opendocument:xmlns:of:1.2" xmlns:manifest="urn:oasis:names:tc:opendocument:xmlns:manifest:1.0" xmlns:chart="urn:oasis:names:tc:opendocument:xmlns:chart:1.0" xmlns:presentation="urn:oasis:names:tc:opendocument:xmlns:presentation:1.0" office:version="1.2">
  <office:meta>
    <dc:language>en-US</dc:language>
    <dc:date>2026-07-06T18:15:12</dc:date>
    <meta:editing-cycles>19</meta:editing-cycles>
    <meta:editing-duration>P0D</meta:editing-duration>
    <meta:document-statistic meta:table-count="13" meta:cell-count="3722" meta:object-count="1"/>
    <meta:user-defined meta:name="AppVersion">15.0000</meta:user-defined>
    <meta:generator>ODFPY/1.4.1</meta:generator>
  </office:meta>
</office:document-meta>
</file>