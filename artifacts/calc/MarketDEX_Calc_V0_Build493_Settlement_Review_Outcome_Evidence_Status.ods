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 table:name="Build491ReviewOutcomeValidation" table:condition="of:cell-content-is-in-list(&quot;REVIEWED — NO AUTHORITY&quot;;&quot;REVIEW DEFERRED&quot;;&quot;REVIEW BLOCKED&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cell table:style-name="Build481Header" office:value-type="string">
            <text:p>Settlement Evidence Review Guidance</text:p>
          </table:table-cell>
          <table:table-cell table:style-name="Build481Header" office:value-type="string">
            <text:p>Settlement Review Boundary Status</text:p>
          </table:table-cell>
          <table:table-cell table:style-name="Build481Header" office:value-type="string">
            <text:p>Settlement Review Boundary Guidance</text:p>
          </table:table-cell>
          <table:table-cell table:style-name="Build481Header" office:value-type="string">
            <text:p>Settlement Review Outcome Intake</text:p>
          </table:table-cell>
          <table:table-cell table:style-name="Build481Header" office:value-type="string">
            <text:p>Settlement Review Outcome Boundary Check</text:p>
          </table:table-cell>
          <table:table-cell table:style-name="Build481Header" office:value-type="string">
            <text:p>Settlement Review Outcome Guidance</text:p>
          </table:table-cell>
          <table:table-cell table:style-name="Build481Header" office:value-type="string">
            <text:p>Settlement Review Outcome Evidence Status</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cell office:value-type="string" table:formula="of:=IF([.U2]=&quot;UNKNOWN&quot;;&quot;COMPLETE OR ASSERT REQUIRED EVIDENCE BEFORE REVIEW&quot;;IF([.U2]=&quot;BLOCKED&quot;;&quot;RESOLVE CONTRADICTION BEFORE REVIEW — NO AUTHORITY CREATED&quot;;IF([.U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quot;READY FOR REVIEW&quot;;&quot;REVIEW ELIGIBLE — NO AUTHORITY&quot;;IF(OR([.U2]=&quot;UNKNOWN&quot;;[.U2]=&quot;BLOCKED&quot;);&quot;NOT REVIEW ELIGIBLE&quot;;&quot;NOT REVIEW ELIGIBLE&quot;))">
            <text:p>NOT REVIEW ELIGIBLE</text:p>
          </table:table-cell>
          <table:table-cell office:value-type="string" table:formula="of:=IF([.W2]=&quot;NOT REVIEW ELIGIBLE&quot;;&quot;DO NOT BEGIN SETTLEMENT REVIEW — RESOLVE READINESS OR CONTRADICTION CONDITIONS&quot;;IF([.W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quot;&quot;;&quot;UNKNOWN&quot;;IF([.W2]&lt;&gt;&quot;REVIEW ELIGIBLE — NO AUTHORITY&quot;;&quot;BLOCKED — OUTCOME ASSERTED WITHOUT REVIEW ELIGIBILITY&quot;;IF(OR([.Y2]=&quot;REVIEWED — NO AUTHORITY&quot;;[.Y2]=&quot;REVIEW DEFERRED&quot;;[.Y2]=&quot;REVIEW BLOCKED&quot;);&quot;ACCEPTED INTAKE — NO AUTHORITY&quot;;&quot;BLOCKED — NONCANONICAL OUTCOME&quot;)))">
            <text:p>UNKNOWN</text:p>
          </table:table-cell>
          <table:table-cell office:value-type="string" table:formula="of:=IF([.Z2]=&quot;UNKNOWN&quot;;&quot;NO REVIEW OUTCOME ASSERTED — REMAINS UNKNOWN&quot;;IF([.Z2]=&quot;BLOCKED — OUTCOME ASSERTED WITHOUT REVIEW ELIGIBILITY&quot;;&quot;REMOVE OR CORRECT OUTCOME ASSERTION — REVIEW ELIGIBILITY REQUIRED FIRST&quot;;IF([.Z2]=&quot;BLOCKED — NONCANONICAL OUTCOME&quot;;&quot;CORRECT OUTCOME TO CANONICAL CONTROLLED VOCABULARY&quot;;IF([.Z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quot;UNKNOWN&quot;;&quot;UNKNOWN&quot;;IF(OR([.Z2]=&quot;BLOCKED — OUTCOME ASSERTED WITHOUT REVIEW ELIGIBILITY&quot;;[.Z2]=&quot;BLOCKED — NONCANONICAL OUTCOME&quot;);&quot;BLOCKED&quot;;IF([.Z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cell office:value-type="string" table:formula="of:=IF([.U3]=&quot;UNKNOWN&quot;;&quot;COMPLETE OR ASSERT REQUIRED EVIDENCE BEFORE REVIEW&quot;;IF([.U3]=&quot;BLOCKED&quot;;&quot;RESOLVE CONTRADICTION BEFORE REVIEW — NO AUTHORITY CREATED&quot;;IF([.U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quot;READY FOR REVIEW&quot;;&quot;REVIEW ELIGIBLE — NO AUTHORITY&quot;;IF(OR([.U3]=&quot;UNKNOWN&quot;;[.U3]=&quot;BLOCKED&quot;);&quot;NOT REVIEW ELIGIBLE&quot;;&quot;NOT REVIEW ELIGIBLE&quot;))">
            <text:p>NOT REVIEW ELIGIBLE</text:p>
          </table:table-cell>
          <table:table-cell office:value-type="string" table:formula="of:=IF([.W3]=&quot;NOT REVIEW ELIGIBLE&quot;;&quot;DO NOT BEGIN SETTLEMENT REVIEW — RESOLVE READINESS OR CONTRADICTION CONDITIONS&quot;;IF([.W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quot;&quot;;&quot;UNKNOWN&quot;;IF([.W3]&lt;&gt;&quot;REVIEW ELIGIBLE — NO AUTHORITY&quot;;&quot;BLOCKED — OUTCOME ASSERTED WITHOUT REVIEW ELIGIBILITY&quot;;IF(OR([.Y3]=&quot;REVIEWED — NO AUTHORITY&quot;;[.Y3]=&quot;REVIEW DEFERRED&quot;;[.Y3]=&quot;REVIEW BLOCKED&quot;);&quot;ACCEPTED INTAKE — NO AUTHORITY&quot;;&quot;BLOCKED — NONCANONICAL OUTCOME&quot;)))">
            <text:p>UNKNOWN</text:p>
          </table:table-cell>
          <table:table-cell office:value-type="string" table:formula="of:=IF([.Z3]=&quot;UNKNOWN&quot;;&quot;NO REVIEW OUTCOME ASSERTED — REMAINS UNKNOWN&quot;;IF([.Z3]=&quot;BLOCKED — OUTCOME ASSERTED WITHOUT REVIEW ELIGIBILITY&quot;;&quot;REMOVE OR CORRECT OUTCOME ASSERTION — REVIEW ELIGIBILITY REQUIRED FIRST&quot;;IF([.Z3]=&quot;BLOCKED — NONCANONICAL OUTCOME&quot;;&quot;CORRECT OUTCOME TO CANONICAL CONTROLLED VOCABULARY&quot;;IF([.Z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quot;UNKNOWN&quot;;&quot;UNKNOWN&quot;;IF(OR([.Z3]=&quot;BLOCKED — OUTCOME ASSERTED WITHOUT REVIEW ELIGIBILITY&quot;;[.Z3]=&quot;BLOCKED — NONCANONICAL OUTCOME&quot;);&quot;BLOCKED&quot;;IF([.Z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cell office:value-type="string" table:formula="of:=IF([.U4]=&quot;UNKNOWN&quot;;&quot;COMPLETE OR ASSERT REQUIRED EVIDENCE BEFORE REVIEW&quot;;IF([.U4]=&quot;BLOCKED&quot;;&quot;RESOLVE CONTRADICTION BEFORE REVIEW — NO AUTHORITY CREATED&quot;;IF([.U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quot;READY FOR REVIEW&quot;;&quot;REVIEW ELIGIBLE — NO AUTHORITY&quot;;IF(OR([.U4]=&quot;UNKNOWN&quot;;[.U4]=&quot;BLOCKED&quot;);&quot;NOT REVIEW ELIGIBLE&quot;;&quot;NOT REVIEW ELIGIBLE&quot;))">
            <text:p>NOT REVIEW ELIGIBLE</text:p>
          </table:table-cell>
          <table:table-cell office:value-type="string" table:formula="of:=IF([.W4]=&quot;NOT REVIEW ELIGIBLE&quot;;&quot;DO NOT BEGIN SETTLEMENT REVIEW — RESOLVE READINESS OR CONTRADICTION CONDITIONS&quot;;IF([.W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quot;&quot;;&quot;UNKNOWN&quot;;IF([.W4]&lt;&gt;&quot;REVIEW ELIGIBLE — NO AUTHORITY&quot;;&quot;BLOCKED — OUTCOME ASSERTED WITHOUT REVIEW ELIGIBILITY&quot;;IF(OR([.Y4]=&quot;REVIEWED — NO AUTHORITY&quot;;[.Y4]=&quot;REVIEW DEFERRED&quot;;[.Y4]=&quot;REVIEW BLOCKED&quot;);&quot;ACCEPTED INTAKE — NO AUTHORITY&quot;;&quot;BLOCKED — NONCANONICAL OUTCOME&quot;)))">
            <text:p>UNKNOWN</text:p>
          </table:table-cell>
          <table:table-cell office:value-type="string" table:formula="of:=IF([.Z4]=&quot;UNKNOWN&quot;;&quot;NO REVIEW OUTCOME ASSERTED — REMAINS UNKNOWN&quot;;IF([.Z4]=&quot;BLOCKED — OUTCOME ASSERTED WITHOUT REVIEW ELIGIBILITY&quot;;&quot;REMOVE OR CORRECT OUTCOME ASSERTION — REVIEW ELIGIBILITY REQUIRED FIRST&quot;;IF([.Z4]=&quot;BLOCKED — NONCANONICAL OUTCOME&quot;;&quot;CORRECT OUTCOME TO CANONICAL CONTROLLED VOCABULARY&quot;;IF([.Z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quot;UNKNOWN&quot;;&quot;UNKNOWN&quot;;IF(OR([.Z4]=&quot;BLOCKED — OUTCOME ASSERTED WITHOUT REVIEW ELIGIBILITY&quot;;[.Z4]=&quot;BLOCKED — NONCANONICAL OUTCOME&quot;);&quot;BLOCKED&quot;;IF([.Z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cell office:value-type="string" table:formula="of:=IF([.U5]=&quot;UNKNOWN&quot;;&quot;COMPLETE OR ASSERT REQUIRED EVIDENCE BEFORE REVIEW&quot;;IF([.U5]=&quot;BLOCKED&quot;;&quot;RESOLVE CONTRADICTION BEFORE REVIEW — NO AUTHORITY CREATED&quot;;IF([.U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quot;READY FOR REVIEW&quot;;&quot;REVIEW ELIGIBLE — NO AUTHORITY&quot;;IF(OR([.U5]=&quot;UNKNOWN&quot;;[.U5]=&quot;BLOCKED&quot;);&quot;NOT REVIEW ELIGIBLE&quot;;&quot;NOT REVIEW ELIGIBLE&quot;))">
            <text:p>NOT REVIEW ELIGIBLE</text:p>
          </table:table-cell>
          <table:table-cell office:value-type="string" table:formula="of:=IF([.W5]=&quot;NOT REVIEW ELIGIBLE&quot;;&quot;DO NOT BEGIN SETTLEMENT REVIEW — RESOLVE READINESS OR CONTRADICTION CONDITIONS&quot;;IF([.W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quot;&quot;;&quot;UNKNOWN&quot;;IF([.W5]&lt;&gt;&quot;REVIEW ELIGIBLE — NO AUTHORITY&quot;;&quot;BLOCKED — OUTCOME ASSERTED WITHOUT REVIEW ELIGIBILITY&quot;;IF(OR([.Y5]=&quot;REVIEWED — NO AUTHORITY&quot;;[.Y5]=&quot;REVIEW DEFERRED&quot;;[.Y5]=&quot;REVIEW BLOCKED&quot;);&quot;ACCEPTED INTAKE — NO AUTHORITY&quot;;&quot;BLOCKED — NONCANONICAL OUTCOME&quot;)))">
            <text:p>UNKNOWN</text:p>
          </table:table-cell>
          <table:table-cell office:value-type="string" table:formula="of:=IF([.Z5]=&quot;UNKNOWN&quot;;&quot;NO REVIEW OUTCOME ASSERTED — REMAINS UNKNOWN&quot;;IF([.Z5]=&quot;BLOCKED — OUTCOME ASSERTED WITHOUT REVIEW ELIGIBILITY&quot;;&quot;REMOVE OR CORRECT OUTCOME ASSERTION — REVIEW ELIGIBILITY REQUIRED FIRST&quot;;IF([.Z5]=&quot;BLOCKED — NONCANONICAL OUTCOME&quot;;&quot;CORRECT OUTCOME TO CANONICAL CONTROLLED VOCABULARY&quot;;IF([.Z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quot;UNKNOWN&quot;;&quot;UNKNOWN&quot;;IF(OR([.Z5]=&quot;BLOCKED — OUTCOME ASSERTED WITHOUT REVIEW ELIGIBILITY&quot;;[.Z5]=&quot;BLOCKED — NONCANONICAL OUTCOME&quot;);&quot;BLOCKED&quot;;IF([.Z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cell office:value-type="string" table:formula="of:=IF([.U6]=&quot;UNKNOWN&quot;;&quot;COMPLETE OR ASSERT REQUIRED EVIDENCE BEFORE REVIEW&quot;;IF([.U6]=&quot;BLOCKED&quot;;&quot;RESOLVE CONTRADICTION BEFORE REVIEW — NO AUTHORITY CREATED&quot;;IF([.U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quot;READY FOR REVIEW&quot;;&quot;REVIEW ELIGIBLE — NO AUTHORITY&quot;;IF(OR([.U6]=&quot;UNKNOWN&quot;;[.U6]=&quot;BLOCKED&quot;);&quot;NOT REVIEW ELIGIBLE&quot;;&quot;NOT REVIEW ELIGIBLE&quot;))">
            <text:p>NOT REVIEW ELIGIBLE</text:p>
          </table:table-cell>
          <table:table-cell office:value-type="string" table:formula="of:=IF([.W6]=&quot;NOT REVIEW ELIGIBLE&quot;;&quot;DO NOT BEGIN SETTLEMENT REVIEW — RESOLVE READINESS OR CONTRADICTION CONDITIONS&quot;;IF([.W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quot;&quot;;&quot;UNKNOWN&quot;;IF([.W6]&lt;&gt;&quot;REVIEW ELIGIBLE — NO AUTHORITY&quot;;&quot;BLOCKED — OUTCOME ASSERTED WITHOUT REVIEW ELIGIBILITY&quot;;IF(OR([.Y6]=&quot;REVIEWED — NO AUTHORITY&quot;;[.Y6]=&quot;REVIEW DEFERRED&quot;;[.Y6]=&quot;REVIEW BLOCKED&quot;);&quot;ACCEPTED INTAKE — NO AUTHORITY&quot;;&quot;BLOCKED — NONCANONICAL OUTCOME&quot;)))">
            <text:p>UNKNOWN</text:p>
          </table:table-cell>
          <table:table-cell office:value-type="string" table:formula="of:=IF([.Z6]=&quot;UNKNOWN&quot;;&quot;NO REVIEW OUTCOME ASSERTED — REMAINS UNKNOWN&quot;;IF([.Z6]=&quot;BLOCKED — OUTCOME ASSERTED WITHOUT REVIEW ELIGIBILITY&quot;;&quot;REMOVE OR CORRECT OUTCOME ASSERTION — REVIEW ELIGIBILITY REQUIRED FIRST&quot;;IF([.Z6]=&quot;BLOCKED — NONCANONICAL OUTCOME&quot;;&quot;CORRECT OUTCOME TO CANONICAL CONTROLLED VOCABULARY&quot;;IF([.Z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quot;UNKNOWN&quot;;&quot;UNKNOWN&quot;;IF(OR([.Z6]=&quot;BLOCKED — OUTCOME ASSERTED WITHOUT REVIEW ELIGIBILITY&quot;;[.Z6]=&quot;BLOCKED — NONCANONICAL OUTCOME&quot;);&quot;BLOCKED&quot;;IF([.Z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cell office:value-type="string" table:formula="of:=IF([.U7]=&quot;UNKNOWN&quot;;&quot;COMPLETE OR ASSERT REQUIRED EVIDENCE BEFORE REVIEW&quot;;IF([.U7]=&quot;BLOCKED&quot;;&quot;RESOLVE CONTRADICTION BEFORE REVIEW — NO AUTHORITY CREATED&quot;;IF([.U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quot;READY FOR REVIEW&quot;;&quot;REVIEW ELIGIBLE — NO AUTHORITY&quot;;IF(OR([.U7]=&quot;UNKNOWN&quot;;[.U7]=&quot;BLOCKED&quot;);&quot;NOT REVIEW ELIGIBLE&quot;;&quot;NOT REVIEW ELIGIBLE&quot;))">
            <text:p>NOT REVIEW ELIGIBLE</text:p>
          </table:table-cell>
          <table:table-cell office:value-type="string" table:formula="of:=IF([.W7]=&quot;NOT REVIEW ELIGIBLE&quot;;&quot;DO NOT BEGIN SETTLEMENT REVIEW — RESOLVE READINESS OR CONTRADICTION CONDITIONS&quot;;IF([.W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quot;&quot;;&quot;UNKNOWN&quot;;IF([.W7]&lt;&gt;&quot;REVIEW ELIGIBLE — NO AUTHORITY&quot;;&quot;BLOCKED — OUTCOME ASSERTED WITHOUT REVIEW ELIGIBILITY&quot;;IF(OR([.Y7]=&quot;REVIEWED — NO AUTHORITY&quot;;[.Y7]=&quot;REVIEW DEFERRED&quot;;[.Y7]=&quot;REVIEW BLOCKED&quot;);&quot;ACCEPTED INTAKE — NO AUTHORITY&quot;;&quot;BLOCKED — NONCANONICAL OUTCOME&quot;)))">
            <text:p>UNKNOWN</text:p>
          </table:table-cell>
          <table:table-cell office:value-type="string" table:formula="of:=IF([.Z7]=&quot;UNKNOWN&quot;;&quot;NO REVIEW OUTCOME ASSERTED — REMAINS UNKNOWN&quot;;IF([.Z7]=&quot;BLOCKED — OUTCOME ASSERTED WITHOUT REVIEW ELIGIBILITY&quot;;&quot;REMOVE OR CORRECT OUTCOME ASSERTION — REVIEW ELIGIBILITY REQUIRED FIRST&quot;;IF([.Z7]=&quot;BLOCKED — NONCANONICAL OUTCOME&quot;;&quot;CORRECT OUTCOME TO CANONICAL CONTROLLED VOCABULARY&quot;;IF([.Z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quot;UNKNOWN&quot;;&quot;UNKNOWN&quot;;IF(OR([.Z7]=&quot;BLOCKED — OUTCOME ASSERTED WITHOUT REVIEW ELIGIBILITY&quot;;[.Z7]=&quot;BLOCKED — NONCANONICAL OUTCOME&quot;);&quot;BLOCKED&quot;;IF([.Z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cell office:value-type="string" table:formula="of:=IF([.U8]=&quot;UNKNOWN&quot;;&quot;COMPLETE OR ASSERT REQUIRED EVIDENCE BEFORE REVIEW&quot;;IF([.U8]=&quot;BLOCKED&quot;;&quot;RESOLVE CONTRADICTION BEFORE REVIEW — NO AUTHORITY CREATED&quot;;IF([.U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quot;READY FOR REVIEW&quot;;&quot;REVIEW ELIGIBLE — NO AUTHORITY&quot;;IF(OR([.U8]=&quot;UNKNOWN&quot;;[.U8]=&quot;BLOCKED&quot;);&quot;NOT REVIEW ELIGIBLE&quot;;&quot;NOT REVIEW ELIGIBLE&quot;))">
            <text:p>NOT REVIEW ELIGIBLE</text:p>
          </table:table-cell>
          <table:table-cell office:value-type="string" table:formula="of:=IF([.W8]=&quot;NOT REVIEW ELIGIBLE&quot;;&quot;DO NOT BEGIN SETTLEMENT REVIEW — RESOLVE READINESS OR CONTRADICTION CONDITIONS&quot;;IF([.W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quot;&quot;;&quot;UNKNOWN&quot;;IF([.W8]&lt;&gt;&quot;REVIEW ELIGIBLE — NO AUTHORITY&quot;;&quot;BLOCKED — OUTCOME ASSERTED WITHOUT REVIEW ELIGIBILITY&quot;;IF(OR([.Y8]=&quot;REVIEWED — NO AUTHORITY&quot;;[.Y8]=&quot;REVIEW DEFERRED&quot;;[.Y8]=&quot;REVIEW BLOCKED&quot;);&quot;ACCEPTED INTAKE — NO AUTHORITY&quot;;&quot;BLOCKED — NONCANONICAL OUTCOME&quot;)))">
            <text:p>UNKNOWN</text:p>
          </table:table-cell>
          <table:table-cell office:value-type="string" table:formula="of:=IF([.Z8]=&quot;UNKNOWN&quot;;&quot;NO REVIEW OUTCOME ASSERTED — REMAINS UNKNOWN&quot;;IF([.Z8]=&quot;BLOCKED — OUTCOME ASSERTED WITHOUT REVIEW ELIGIBILITY&quot;;&quot;REMOVE OR CORRECT OUTCOME ASSERTION — REVIEW ELIGIBILITY REQUIRED FIRST&quot;;IF([.Z8]=&quot;BLOCKED — NONCANONICAL OUTCOME&quot;;&quot;CORRECT OUTCOME TO CANONICAL CONTROLLED VOCABULARY&quot;;IF([.Z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quot;UNKNOWN&quot;;&quot;UNKNOWN&quot;;IF(OR([.Z8]=&quot;BLOCKED — OUTCOME ASSERTED WITHOUT REVIEW ELIGIBILITY&quot;;[.Z8]=&quot;BLOCKED — NONCANONICAL OUTCOME&quot;);&quot;BLOCKED&quot;;IF([.Z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cell office:value-type="string" table:formula="of:=IF([.U9]=&quot;UNKNOWN&quot;;&quot;COMPLETE OR ASSERT REQUIRED EVIDENCE BEFORE REVIEW&quot;;IF([.U9]=&quot;BLOCKED&quot;;&quot;RESOLVE CONTRADICTION BEFORE REVIEW — NO AUTHORITY CREATED&quot;;IF([.U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quot;READY FOR REVIEW&quot;;&quot;REVIEW ELIGIBLE — NO AUTHORITY&quot;;IF(OR([.U9]=&quot;UNKNOWN&quot;;[.U9]=&quot;BLOCKED&quot;);&quot;NOT REVIEW ELIGIBLE&quot;;&quot;NOT REVIEW ELIGIBLE&quot;))">
            <text:p>NOT REVIEW ELIGIBLE</text:p>
          </table:table-cell>
          <table:table-cell office:value-type="string" table:formula="of:=IF([.W9]=&quot;NOT REVIEW ELIGIBLE&quot;;&quot;DO NOT BEGIN SETTLEMENT REVIEW — RESOLVE READINESS OR CONTRADICTION CONDITIONS&quot;;IF([.W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quot;&quot;;&quot;UNKNOWN&quot;;IF([.W9]&lt;&gt;&quot;REVIEW ELIGIBLE — NO AUTHORITY&quot;;&quot;BLOCKED — OUTCOME ASSERTED WITHOUT REVIEW ELIGIBILITY&quot;;IF(OR([.Y9]=&quot;REVIEWED — NO AUTHORITY&quot;;[.Y9]=&quot;REVIEW DEFERRED&quot;;[.Y9]=&quot;REVIEW BLOCKED&quot;);&quot;ACCEPTED INTAKE — NO AUTHORITY&quot;;&quot;BLOCKED — NONCANONICAL OUTCOME&quot;)))">
            <text:p>UNKNOWN</text:p>
          </table:table-cell>
          <table:table-cell office:value-type="string" table:formula="of:=IF([.Z9]=&quot;UNKNOWN&quot;;&quot;NO REVIEW OUTCOME ASSERTED — REMAINS UNKNOWN&quot;;IF([.Z9]=&quot;BLOCKED — OUTCOME ASSERTED WITHOUT REVIEW ELIGIBILITY&quot;;&quot;REMOVE OR CORRECT OUTCOME ASSERTION — REVIEW ELIGIBILITY REQUIRED FIRST&quot;;IF([.Z9]=&quot;BLOCKED — NONCANONICAL OUTCOME&quot;;&quot;CORRECT OUTCOME TO CANONICAL CONTROLLED VOCABULARY&quot;;IF([.Z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quot;UNKNOWN&quot;;&quot;UNKNOWN&quot;;IF(OR([.Z9]=&quot;BLOCKED — OUTCOME ASSERTED WITHOUT REVIEW ELIGIBILITY&quot;;[.Z9]=&quot;BLOCKED — NONCANONICAL OUTCOME&quot;);&quot;BLOCKED&quot;;IF([.Z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cell office:value-type="string" table:formula="of:=IF([.U10]=&quot;UNKNOWN&quot;;&quot;COMPLETE OR ASSERT REQUIRED EVIDENCE BEFORE REVIEW&quot;;IF([.U10]=&quot;BLOCKED&quot;;&quot;RESOLVE CONTRADICTION BEFORE REVIEW — NO AUTHORITY CREATED&quot;;IF([.U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quot;READY FOR REVIEW&quot;;&quot;REVIEW ELIGIBLE — NO AUTHORITY&quot;;IF(OR([.U10]=&quot;UNKNOWN&quot;;[.U10]=&quot;BLOCKED&quot;);&quot;NOT REVIEW ELIGIBLE&quot;;&quot;NOT REVIEW ELIGIBLE&quot;))">
            <text:p>NOT REVIEW ELIGIBLE</text:p>
          </table:table-cell>
          <table:table-cell office:value-type="string" table:formula="of:=IF([.W10]=&quot;NOT REVIEW ELIGIBLE&quot;;&quot;DO NOT BEGIN SETTLEMENT REVIEW — RESOLVE READINESS OR CONTRADICTION CONDITIONS&quot;;IF([.W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quot;&quot;;&quot;UNKNOWN&quot;;IF([.W10]&lt;&gt;&quot;REVIEW ELIGIBLE — NO AUTHORITY&quot;;&quot;BLOCKED — OUTCOME ASSERTED WITHOUT REVIEW ELIGIBILITY&quot;;IF(OR([.Y10]=&quot;REVIEWED — NO AUTHORITY&quot;;[.Y10]=&quot;REVIEW DEFERRED&quot;;[.Y10]=&quot;REVIEW BLOCKED&quot;);&quot;ACCEPTED INTAKE — NO AUTHORITY&quot;;&quot;BLOCKED — NONCANONICAL OUTCOME&quot;)))">
            <text:p>UNKNOWN</text:p>
          </table:table-cell>
          <table:table-cell office:value-type="string" table:formula="of:=IF([.Z10]=&quot;UNKNOWN&quot;;&quot;NO REVIEW OUTCOME ASSERTED — REMAINS UNKNOWN&quot;;IF([.Z10]=&quot;BLOCKED — OUTCOME ASSERTED WITHOUT REVIEW ELIGIBILITY&quot;;&quot;REMOVE OR CORRECT OUTCOME ASSERTION — REVIEW ELIGIBILITY REQUIRED FIRST&quot;;IF([.Z10]=&quot;BLOCKED — NONCANONICAL OUTCOME&quot;;&quot;CORRECT OUTCOME TO CANONICAL CONTROLLED VOCABULARY&quot;;IF([.Z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quot;UNKNOWN&quot;;&quot;UNKNOWN&quot;;IF(OR([.Z10]=&quot;BLOCKED — OUTCOME ASSERTED WITHOUT REVIEW ELIGIBILITY&quot;;[.Z10]=&quot;BLOCKED — NONCANONICAL OUTCOME&quot;);&quot;BLOCKED&quot;;IF([.Z1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cell office:value-type="string" table:formula="of:=IF([.U11]=&quot;UNKNOWN&quot;;&quot;COMPLETE OR ASSERT REQUIRED EVIDENCE BEFORE REVIEW&quot;;IF([.U11]=&quot;BLOCKED&quot;;&quot;RESOLVE CONTRADICTION BEFORE REVIEW — NO AUTHORITY CREATED&quot;;IF([.U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quot;READY FOR REVIEW&quot;;&quot;REVIEW ELIGIBLE — NO AUTHORITY&quot;;IF(OR([.U11]=&quot;UNKNOWN&quot;;[.U11]=&quot;BLOCKED&quot;);&quot;NOT REVIEW ELIGIBLE&quot;;&quot;NOT REVIEW ELIGIBLE&quot;))">
            <text:p>NOT REVIEW ELIGIBLE</text:p>
          </table:table-cell>
          <table:table-cell office:value-type="string" table:formula="of:=IF([.W11]=&quot;NOT REVIEW ELIGIBLE&quot;;&quot;DO NOT BEGIN SETTLEMENT REVIEW — RESOLVE READINESS OR CONTRADICTION CONDITIONS&quot;;IF([.W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quot;&quot;;&quot;UNKNOWN&quot;;IF([.W11]&lt;&gt;&quot;REVIEW ELIGIBLE — NO AUTHORITY&quot;;&quot;BLOCKED — OUTCOME ASSERTED WITHOUT REVIEW ELIGIBILITY&quot;;IF(OR([.Y11]=&quot;REVIEWED — NO AUTHORITY&quot;;[.Y11]=&quot;REVIEW DEFERRED&quot;;[.Y11]=&quot;REVIEW BLOCKED&quot;);&quot;ACCEPTED INTAKE — NO AUTHORITY&quot;;&quot;BLOCKED — NONCANONICAL OUTCOME&quot;)))">
            <text:p>UNKNOWN</text:p>
          </table:table-cell>
          <table:table-cell office:value-type="string" table:formula="of:=IF([.Z11]=&quot;UNKNOWN&quot;;&quot;NO REVIEW OUTCOME ASSERTED — REMAINS UNKNOWN&quot;;IF([.Z11]=&quot;BLOCKED — OUTCOME ASSERTED WITHOUT REVIEW ELIGIBILITY&quot;;&quot;REMOVE OR CORRECT OUTCOME ASSERTION — REVIEW ELIGIBILITY REQUIRED FIRST&quot;;IF([.Z11]=&quot;BLOCKED — NONCANONICAL OUTCOME&quot;;&quot;CORRECT OUTCOME TO CANONICAL CONTROLLED VOCABULARY&quot;;IF([.Z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quot;UNKNOWN&quot;;&quot;UNKNOWN&quot;;IF(OR([.Z11]=&quot;BLOCKED — OUTCOME ASSERTED WITHOUT REVIEW ELIGIBILITY&quot;;[.Z11]=&quot;BLOCKED — NONCANONICAL OUTCOME&quot;);&quot;BLOCKED&quot;;IF([.Z1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cell office:value-type="string" table:formula="of:=IF([.U12]=&quot;UNKNOWN&quot;;&quot;COMPLETE OR ASSERT REQUIRED EVIDENCE BEFORE REVIEW&quot;;IF([.U12]=&quot;BLOCKED&quot;;&quot;RESOLVE CONTRADICTION BEFORE REVIEW — NO AUTHORITY CREATED&quot;;IF([.U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quot;READY FOR REVIEW&quot;;&quot;REVIEW ELIGIBLE — NO AUTHORITY&quot;;IF(OR([.U12]=&quot;UNKNOWN&quot;;[.U12]=&quot;BLOCKED&quot;);&quot;NOT REVIEW ELIGIBLE&quot;;&quot;NOT REVIEW ELIGIBLE&quot;))">
            <text:p>NOT REVIEW ELIGIBLE</text:p>
          </table:table-cell>
          <table:table-cell office:value-type="string" table:formula="of:=IF([.W12]=&quot;NOT REVIEW ELIGIBLE&quot;;&quot;DO NOT BEGIN SETTLEMENT REVIEW — RESOLVE READINESS OR CONTRADICTION CONDITIONS&quot;;IF([.W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quot;&quot;;&quot;UNKNOWN&quot;;IF([.W12]&lt;&gt;&quot;REVIEW ELIGIBLE — NO AUTHORITY&quot;;&quot;BLOCKED — OUTCOME ASSERTED WITHOUT REVIEW ELIGIBILITY&quot;;IF(OR([.Y12]=&quot;REVIEWED — NO AUTHORITY&quot;;[.Y12]=&quot;REVIEW DEFERRED&quot;;[.Y12]=&quot;REVIEW BLOCKED&quot;);&quot;ACCEPTED INTAKE — NO AUTHORITY&quot;;&quot;BLOCKED — NONCANONICAL OUTCOME&quot;)))">
            <text:p>UNKNOWN</text:p>
          </table:table-cell>
          <table:table-cell office:value-type="string" table:formula="of:=IF([.Z12]=&quot;UNKNOWN&quot;;&quot;NO REVIEW OUTCOME ASSERTED — REMAINS UNKNOWN&quot;;IF([.Z12]=&quot;BLOCKED — OUTCOME ASSERTED WITHOUT REVIEW ELIGIBILITY&quot;;&quot;REMOVE OR CORRECT OUTCOME ASSERTION — REVIEW ELIGIBILITY REQUIRED FIRST&quot;;IF([.Z12]=&quot;BLOCKED — NONCANONICAL OUTCOME&quot;;&quot;CORRECT OUTCOME TO CANONICAL CONTROLLED VOCABULARY&quot;;IF([.Z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quot;UNKNOWN&quot;;&quot;UNKNOWN&quot;;IF(OR([.Z12]=&quot;BLOCKED — OUTCOME ASSERTED WITHOUT REVIEW ELIGIBILITY&quot;;[.Z12]=&quot;BLOCKED — NONCANONICAL OUTCOME&quot;);&quot;BLOCKED&quot;;IF([.Z1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cell office:value-type="string" table:formula="of:=IF([.U13]=&quot;UNKNOWN&quot;;&quot;COMPLETE OR ASSERT REQUIRED EVIDENCE BEFORE REVIEW&quot;;IF([.U13]=&quot;BLOCKED&quot;;&quot;RESOLVE CONTRADICTION BEFORE REVIEW — NO AUTHORITY CREATED&quot;;IF([.U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quot;READY FOR REVIEW&quot;;&quot;REVIEW ELIGIBLE — NO AUTHORITY&quot;;IF(OR([.U13]=&quot;UNKNOWN&quot;;[.U13]=&quot;BLOCKED&quot;);&quot;NOT REVIEW ELIGIBLE&quot;;&quot;NOT REVIEW ELIGIBLE&quot;))">
            <text:p>NOT REVIEW ELIGIBLE</text:p>
          </table:table-cell>
          <table:table-cell office:value-type="string" table:formula="of:=IF([.W13]=&quot;NOT REVIEW ELIGIBLE&quot;;&quot;DO NOT BEGIN SETTLEMENT REVIEW — RESOLVE READINESS OR CONTRADICTION CONDITIONS&quot;;IF([.W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quot;&quot;;&quot;UNKNOWN&quot;;IF([.W13]&lt;&gt;&quot;REVIEW ELIGIBLE — NO AUTHORITY&quot;;&quot;BLOCKED — OUTCOME ASSERTED WITHOUT REVIEW ELIGIBILITY&quot;;IF(OR([.Y13]=&quot;REVIEWED — NO AUTHORITY&quot;;[.Y13]=&quot;REVIEW DEFERRED&quot;;[.Y13]=&quot;REVIEW BLOCKED&quot;);&quot;ACCEPTED INTAKE — NO AUTHORITY&quot;;&quot;BLOCKED — NONCANONICAL OUTCOME&quot;)))">
            <text:p>UNKNOWN</text:p>
          </table:table-cell>
          <table:table-cell office:value-type="string" table:formula="of:=IF([.Z13]=&quot;UNKNOWN&quot;;&quot;NO REVIEW OUTCOME ASSERTED — REMAINS UNKNOWN&quot;;IF([.Z13]=&quot;BLOCKED — OUTCOME ASSERTED WITHOUT REVIEW ELIGIBILITY&quot;;&quot;REMOVE OR CORRECT OUTCOME ASSERTION — REVIEW ELIGIBILITY REQUIRED FIRST&quot;;IF([.Z13]=&quot;BLOCKED — NONCANONICAL OUTCOME&quot;;&quot;CORRECT OUTCOME TO CANONICAL CONTROLLED VOCABULARY&quot;;IF([.Z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quot;UNKNOWN&quot;;&quot;UNKNOWN&quot;;IF(OR([.Z13]=&quot;BLOCKED — OUTCOME ASSERTED WITHOUT REVIEW ELIGIBILITY&quot;;[.Z13]=&quot;BLOCKED — NONCANONICAL OUTCOME&quot;);&quot;BLOCKED&quot;;IF([.Z1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cell office:value-type="string" table:formula="of:=IF([.U14]=&quot;UNKNOWN&quot;;&quot;COMPLETE OR ASSERT REQUIRED EVIDENCE BEFORE REVIEW&quot;;IF([.U14]=&quot;BLOCKED&quot;;&quot;RESOLVE CONTRADICTION BEFORE REVIEW — NO AUTHORITY CREATED&quot;;IF([.U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quot;READY FOR REVIEW&quot;;&quot;REVIEW ELIGIBLE — NO AUTHORITY&quot;;IF(OR([.U14]=&quot;UNKNOWN&quot;;[.U14]=&quot;BLOCKED&quot;);&quot;NOT REVIEW ELIGIBLE&quot;;&quot;NOT REVIEW ELIGIBLE&quot;))">
            <text:p>NOT REVIEW ELIGIBLE</text:p>
          </table:table-cell>
          <table:table-cell office:value-type="string" table:formula="of:=IF([.W14]=&quot;NOT REVIEW ELIGIBLE&quot;;&quot;DO NOT BEGIN SETTLEMENT REVIEW — RESOLVE READINESS OR CONTRADICTION CONDITIONS&quot;;IF([.W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quot;&quot;;&quot;UNKNOWN&quot;;IF([.W14]&lt;&gt;&quot;REVIEW ELIGIBLE — NO AUTHORITY&quot;;&quot;BLOCKED — OUTCOME ASSERTED WITHOUT REVIEW ELIGIBILITY&quot;;IF(OR([.Y14]=&quot;REVIEWED — NO AUTHORITY&quot;;[.Y14]=&quot;REVIEW DEFERRED&quot;;[.Y14]=&quot;REVIEW BLOCKED&quot;);&quot;ACCEPTED INTAKE — NO AUTHORITY&quot;;&quot;BLOCKED — NONCANONICAL OUTCOME&quot;)))">
            <text:p>UNKNOWN</text:p>
          </table:table-cell>
          <table:table-cell office:value-type="string" table:formula="of:=IF([.Z14]=&quot;UNKNOWN&quot;;&quot;NO REVIEW OUTCOME ASSERTED — REMAINS UNKNOWN&quot;;IF([.Z14]=&quot;BLOCKED — OUTCOME ASSERTED WITHOUT REVIEW ELIGIBILITY&quot;;&quot;REMOVE OR CORRECT OUTCOME ASSERTION — REVIEW ELIGIBILITY REQUIRED FIRST&quot;;IF([.Z14]=&quot;BLOCKED — NONCANONICAL OUTCOME&quot;;&quot;CORRECT OUTCOME TO CANONICAL CONTROLLED VOCABULARY&quot;;IF([.Z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quot;UNKNOWN&quot;;&quot;UNKNOWN&quot;;IF(OR([.Z14]=&quot;BLOCKED — OUTCOME ASSERTED WITHOUT REVIEW ELIGIBILITY&quot;;[.Z14]=&quot;BLOCKED — NONCANONICAL OUTCOME&quot;);&quot;BLOCKED&quot;;IF([.Z1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cell office:value-type="string" table:formula="of:=IF([.U15]=&quot;UNKNOWN&quot;;&quot;COMPLETE OR ASSERT REQUIRED EVIDENCE BEFORE REVIEW&quot;;IF([.U15]=&quot;BLOCKED&quot;;&quot;RESOLVE CONTRADICTION BEFORE REVIEW — NO AUTHORITY CREATED&quot;;IF([.U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quot;READY FOR REVIEW&quot;;&quot;REVIEW ELIGIBLE — NO AUTHORITY&quot;;IF(OR([.U15]=&quot;UNKNOWN&quot;;[.U15]=&quot;BLOCKED&quot;);&quot;NOT REVIEW ELIGIBLE&quot;;&quot;NOT REVIEW ELIGIBLE&quot;))">
            <text:p>NOT REVIEW ELIGIBLE</text:p>
          </table:table-cell>
          <table:table-cell office:value-type="string" table:formula="of:=IF([.W15]=&quot;NOT REVIEW ELIGIBLE&quot;;&quot;DO NOT BEGIN SETTLEMENT REVIEW — RESOLVE READINESS OR CONTRADICTION CONDITIONS&quot;;IF([.W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quot;&quot;;&quot;UNKNOWN&quot;;IF([.W15]&lt;&gt;&quot;REVIEW ELIGIBLE — NO AUTHORITY&quot;;&quot;BLOCKED — OUTCOME ASSERTED WITHOUT REVIEW ELIGIBILITY&quot;;IF(OR([.Y15]=&quot;REVIEWED — NO AUTHORITY&quot;;[.Y15]=&quot;REVIEW DEFERRED&quot;;[.Y15]=&quot;REVIEW BLOCKED&quot;);&quot;ACCEPTED INTAKE — NO AUTHORITY&quot;;&quot;BLOCKED — NONCANONICAL OUTCOME&quot;)))">
            <text:p>UNKNOWN</text:p>
          </table:table-cell>
          <table:table-cell office:value-type="string" table:formula="of:=IF([.Z15]=&quot;UNKNOWN&quot;;&quot;NO REVIEW OUTCOME ASSERTED — REMAINS UNKNOWN&quot;;IF([.Z15]=&quot;BLOCKED — OUTCOME ASSERTED WITHOUT REVIEW ELIGIBILITY&quot;;&quot;REMOVE OR CORRECT OUTCOME ASSERTION — REVIEW ELIGIBILITY REQUIRED FIRST&quot;;IF([.Z15]=&quot;BLOCKED — NONCANONICAL OUTCOME&quot;;&quot;CORRECT OUTCOME TO CANONICAL CONTROLLED VOCABULARY&quot;;IF([.Z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quot;UNKNOWN&quot;;&quot;UNKNOWN&quot;;IF(OR([.Z15]=&quot;BLOCKED — OUTCOME ASSERTED WITHOUT REVIEW ELIGIBILITY&quot;;[.Z15]=&quot;BLOCKED — NONCANONICAL OUTCOME&quot;);&quot;BLOCKED&quot;;IF([.Z1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cell office:value-type="string" table:formula="of:=IF([.U16]=&quot;UNKNOWN&quot;;&quot;COMPLETE OR ASSERT REQUIRED EVIDENCE BEFORE REVIEW&quot;;IF([.U16]=&quot;BLOCKED&quot;;&quot;RESOLVE CONTRADICTION BEFORE REVIEW — NO AUTHORITY CREATED&quot;;IF([.U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quot;READY FOR REVIEW&quot;;&quot;REVIEW ELIGIBLE — NO AUTHORITY&quot;;IF(OR([.U16]=&quot;UNKNOWN&quot;;[.U16]=&quot;BLOCKED&quot;);&quot;NOT REVIEW ELIGIBLE&quot;;&quot;NOT REVIEW ELIGIBLE&quot;))">
            <text:p>NOT REVIEW ELIGIBLE</text:p>
          </table:table-cell>
          <table:table-cell office:value-type="string" table:formula="of:=IF([.W16]=&quot;NOT REVIEW ELIGIBLE&quot;;&quot;DO NOT BEGIN SETTLEMENT REVIEW — RESOLVE READINESS OR CONTRADICTION CONDITIONS&quot;;IF([.W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quot;&quot;;&quot;UNKNOWN&quot;;IF([.W16]&lt;&gt;&quot;REVIEW ELIGIBLE — NO AUTHORITY&quot;;&quot;BLOCKED — OUTCOME ASSERTED WITHOUT REVIEW ELIGIBILITY&quot;;IF(OR([.Y16]=&quot;REVIEWED — NO AUTHORITY&quot;;[.Y16]=&quot;REVIEW DEFERRED&quot;;[.Y16]=&quot;REVIEW BLOCKED&quot;);&quot;ACCEPTED INTAKE — NO AUTHORITY&quot;;&quot;BLOCKED — NONCANONICAL OUTCOME&quot;)))">
            <text:p>UNKNOWN</text:p>
          </table:table-cell>
          <table:table-cell office:value-type="string" table:formula="of:=IF([.Z16]=&quot;UNKNOWN&quot;;&quot;NO REVIEW OUTCOME ASSERTED — REMAINS UNKNOWN&quot;;IF([.Z16]=&quot;BLOCKED — OUTCOME ASSERTED WITHOUT REVIEW ELIGIBILITY&quot;;&quot;REMOVE OR CORRECT OUTCOME ASSERTION — REVIEW ELIGIBILITY REQUIRED FIRST&quot;;IF([.Z16]=&quot;BLOCKED — NONCANONICAL OUTCOME&quot;;&quot;CORRECT OUTCOME TO CANONICAL CONTROLLED VOCABULARY&quot;;IF([.Z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quot;UNKNOWN&quot;;&quot;UNKNOWN&quot;;IF(OR([.Z16]=&quot;BLOCKED — OUTCOME ASSERTED WITHOUT REVIEW ELIGIBILITY&quot;;[.Z16]=&quot;BLOCKED — NONCANONICAL OUTCOME&quot;);&quot;BLOCKED&quot;;IF([.Z1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cell office:value-type="string" table:formula="of:=IF([.U17]=&quot;UNKNOWN&quot;;&quot;COMPLETE OR ASSERT REQUIRED EVIDENCE BEFORE REVIEW&quot;;IF([.U17]=&quot;BLOCKED&quot;;&quot;RESOLVE CONTRADICTION BEFORE REVIEW — NO AUTHORITY CREATED&quot;;IF([.U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quot;READY FOR REVIEW&quot;;&quot;REVIEW ELIGIBLE — NO AUTHORITY&quot;;IF(OR([.U17]=&quot;UNKNOWN&quot;;[.U17]=&quot;BLOCKED&quot;);&quot;NOT REVIEW ELIGIBLE&quot;;&quot;NOT REVIEW ELIGIBLE&quot;))">
            <text:p>NOT REVIEW ELIGIBLE</text:p>
          </table:table-cell>
          <table:table-cell office:value-type="string" table:formula="of:=IF([.W17]=&quot;NOT REVIEW ELIGIBLE&quot;;&quot;DO NOT BEGIN SETTLEMENT REVIEW — RESOLVE READINESS OR CONTRADICTION CONDITIONS&quot;;IF([.W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quot;&quot;;&quot;UNKNOWN&quot;;IF([.W17]&lt;&gt;&quot;REVIEW ELIGIBLE — NO AUTHORITY&quot;;&quot;BLOCKED — OUTCOME ASSERTED WITHOUT REVIEW ELIGIBILITY&quot;;IF(OR([.Y17]=&quot;REVIEWED — NO AUTHORITY&quot;;[.Y17]=&quot;REVIEW DEFERRED&quot;;[.Y17]=&quot;REVIEW BLOCKED&quot;);&quot;ACCEPTED INTAKE — NO AUTHORITY&quot;;&quot;BLOCKED — NONCANONICAL OUTCOME&quot;)))">
            <text:p>UNKNOWN</text:p>
          </table:table-cell>
          <table:table-cell office:value-type="string" table:formula="of:=IF([.Z17]=&quot;UNKNOWN&quot;;&quot;NO REVIEW OUTCOME ASSERTED — REMAINS UNKNOWN&quot;;IF([.Z17]=&quot;BLOCKED — OUTCOME ASSERTED WITHOUT REVIEW ELIGIBILITY&quot;;&quot;REMOVE OR CORRECT OUTCOME ASSERTION — REVIEW ELIGIBILITY REQUIRED FIRST&quot;;IF([.Z17]=&quot;BLOCKED — NONCANONICAL OUTCOME&quot;;&quot;CORRECT OUTCOME TO CANONICAL CONTROLLED VOCABULARY&quot;;IF([.Z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quot;UNKNOWN&quot;;&quot;UNKNOWN&quot;;IF(OR([.Z17]=&quot;BLOCKED — OUTCOME ASSERTED WITHOUT REVIEW ELIGIBILITY&quot;;[.Z17]=&quot;BLOCKED — NONCANONICAL OUTCOME&quot;);&quot;BLOCKED&quot;;IF([.Z1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cell office:value-type="string" table:formula="of:=IF([.U18]=&quot;UNKNOWN&quot;;&quot;COMPLETE OR ASSERT REQUIRED EVIDENCE BEFORE REVIEW&quot;;IF([.U18]=&quot;BLOCKED&quot;;&quot;RESOLVE CONTRADICTION BEFORE REVIEW — NO AUTHORITY CREATED&quot;;IF([.U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quot;READY FOR REVIEW&quot;;&quot;REVIEW ELIGIBLE — NO AUTHORITY&quot;;IF(OR([.U18]=&quot;UNKNOWN&quot;;[.U18]=&quot;BLOCKED&quot;);&quot;NOT REVIEW ELIGIBLE&quot;;&quot;NOT REVIEW ELIGIBLE&quot;))">
            <text:p>NOT REVIEW ELIGIBLE</text:p>
          </table:table-cell>
          <table:table-cell office:value-type="string" table:formula="of:=IF([.W18]=&quot;NOT REVIEW ELIGIBLE&quot;;&quot;DO NOT BEGIN SETTLEMENT REVIEW — RESOLVE READINESS OR CONTRADICTION CONDITIONS&quot;;IF([.W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quot;&quot;;&quot;UNKNOWN&quot;;IF([.W18]&lt;&gt;&quot;REVIEW ELIGIBLE — NO AUTHORITY&quot;;&quot;BLOCKED — OUTCOME ASSERTED WITHOUT REVIEW ELIGIBILITY&quot;;IF(OR([.Y18]=&quot;REVIEWED — NO AUTHORITY&quot;;[.Y18]=&quot;REVIEW DEFERRED&quot;;[.Y18]=&quot;REVIEW BLOCKED&quot;);&quot;ACCEPTED INTAKE — NO AUTHORITY&quot;;&quot;BLOCKED — NONCANONICAL OUTCOME&quot;)))">
            <text:p>UNKNOWN</text:p>
          </table:table-cell>
          <table:table-cell office:value-type="string" table:formula="of:=IF([.Z18]=&quot;UNKNOWN&quot;;&quot;NO REVIEW OUTCOME ASSERTED — REMAINS UNKNOWN&quot;;IF([.Z18]=&quot;BLOCKED — OUTCOME ASSERTED WITHOUT REVIEW ELIGIBILITY&quot;;&quot;REMOVE OR CORRECT OUTCOME ASSERTION — REVIEW ELIGIBILITY REQUIRED FIRST&quot;;IF([.Z18]=&quot;BLOCKED — NONCANONICAL OUTCOME&quot;;&quot;CORRECT OUTCOME TO CANONICAL CONTROLLED VOCABULARY&quot;;IF([.Z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quot;UNKNOWN&quot;;&quot;UNKNOWN&quot;;IF(OR([.Z18]=&quot;BLOCKED — OUTCOME ASSERTED WITHOUT REVIEW ELIGIBILITY&quot;;[.Z18]=&quot;BLOCKED — NONCANONICAL OUTCOME&quot;);&quot;BLOCKED&quot;;IF([.Z1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cell office:value-type="string" table:formula="of:=IF([.U19]=&quot;UNKNOWN&quot;;&quot;COMPLETE OR ASSERT REQUIRED EVIDENCE BEFORE REVIEW&quot;;IF([.U19]=&quot;BLOCKED&quot;;&quot;RESOLVE CONTRADICTION BEFORE REVIEW — NO AUTHORITY CREATED&quot;;IF([.U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quot;READY FOR REVIEW&quot;;&quot;REVIEW ELIGIBLE — NO AUTHORITY&quot;;IF(OR([.U19]=&quot;UNKNOWN&quot;;[.U19]=&quot;BLOCKED&quot;);&quot;NOT REVIEW ELIGIBLE&quot;;&quot;NOT REVIEW ELIGIBLE&quot;))">
            <text:p>NOT REVIEW ELIGIBLE</text:p>
          </table:table-cell>
          <table:table-cell office:value-type="string" table:formula="of:=IF([.W19]=&quot;NOT REVIEW ELIGIBLE&quot;;&quot;DO NOT BEGIN SETTLEMENT REVIEW — RESOLVE READINESS OR CONTRADICTION CONDITIONS&quot;;IF([.W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quot;&quot;;&quot;UNKNOWN&quot;;IF([.W19]&lt;&gt;&quot;REVIEW ELIGIBLE — NO AUTHORITY&quot;;&quot;BLOCKED — OUTCOME ASSERTED WITHOUT REVIEW ELIGIBILITY&quot;;IF(OR([.Y19]=&quot;REVIEWED — NO AUTHORITY&quot;;[.Y19]=&quot;REVIEW DEFERRED&quot;;[.Y19]=&quot;REVIEW BLOCKED&quot;);&quot;ACCEPTED INTAKE — NO AUTHORITY&quot;;&quot;BLOCKED — NONCANONICAL OUTCOME&quot;)))">
            <text:p>UNKNOWN</text:p>
          </table:table-cell>
          <table:table-cell office:value-type="string" table:formula="of:=IF([.Z19]=&quot;UNKNOWN&quot;;&quot;NO REVIEW OUTCOME ASSERTED — REMAINS UNKNOWN&quot;;IF([.Z19]=&quot;BLOCKED — OUTCOME ASSERTED WITHOUT REVIEW ELIGIBILITY&quot;;&quot;REMOVE OR CORRECT OUTCOME ASSERTION — REVIEW ELIGIBILITY REQUIRED FIRST&quot;;IF([.Z19]=&quot;BLOCKED — NONCANONICAL OUTCOME&quot;;&quot;CORRECT OUTCOME TO CANONICAL CONTROLLED VOCABULARY&quot;;IF([.Z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quot;UNKNOWN&quot;;&quot;UNKNOWN&quot;;IF(OR([.Z19]=&quot;BLOCKED — OUTCOME ASSERTED WITHOUT REVIEW ELIGIBILITY&quot;;[.Z19]=&quot;BLOCKED — NONCANONICAL OUTCOME&quot;);&quot;BLOCKED&quot;;IF([.Z1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cell office:value-type="string" table:formula="of:=IF([.U20]=&quot;UNKNOWN&quot;;&quot;COMPLETE OR ASSERT REQUIRED EVIDENCE BEFORE REVIEW&quot;;IF([.U20]=&quot;BLOCKED&quot;;&quot;RESOLVE CONTRADICTION BEFORE REVIEW — NO AUTHORITY CREATED&quot;;IF([.U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quot;READY FOR REVIEW&quot;;&quot;REVIEW ELIGIBLE — NO AUTHORITY&quot;;IF(OR([.U20]=&quot;UNKNOWN&quot;;[.U20]=&quot;BLOCKED&quot;);&quot;NOT REVIEW ELIGIBLE&quot;;&quot;NOT REVIEW ELIGIBLE&quot;))">
            <text:p>NOT REVIEW ELIGIBLE</text:p>
          </table:table-cell>
          <table:table-cell office:value-type="string" table:formula="of:=IF([.W20]=&quot;NOT REVIEW ELIGIBLE&quot;;&quot;DO NOT BEGIN SETTLEMENT REVIEW — RESOLVE READINESS OR CONTRADICTION CONDITIONS&quot;;IF([.W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quot;&quot;;&quot;UNKNOWN&quot;;IF([.W20]&lt;&gt;&quot;REVIEW ELIGIBLE — NO AUTHORITY&quot;;&quot;BLOCKED — OUTCOME ASSERTED WITHOUT REVIEW ELIGIBILITY&quot;;IF(OR([.Y20]=&quot;REVIEWED — NO AUTHORITY&quot;;[.Y20]=&quot;REVIEW DEFERRED&quot;;[.Y20]=&quot;REVIEW BLOCKED&quot;);&quot;ACCEPTED INTAKE — NO AUTHORITY&quot;;&quot;BLOCKED — NONCANONICAL OUTCOME&quot;)))">
            <text:p>UNKNOWN</text:p>
          </table:table-cell>
          <table:table-cell office:value-type="string" table:formula="of:=IF([.Z20]=&quot;UNKNOWN&quot;;&quot;NO REVIEW OUTCOME ASSERTED — REMAINS UNKNOWN&quot;;IF([.Z20]=&quot;BLOCKED — OUTCOME ASSERTED WITHOUT REVIEW ELIGIBILITY&quot;;&quot;REMOVE OR CORRECT OUTCOME ASSERTION — REVIEW ELIGIBILITY REQUIRED FIRST&quot;;IF([.Z20]=&quot;BLOCKED — NONCANONICAL OUTCOME&quot;;&quot;CORRECT OUTCOME TO CANONICAL CONTROLLED VOCABULARY&quot;;IF([.Z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quot;UNKNOWN&quot;;&quot;UNKNOWN&quot;;IF(OR([.Z20]=&quot;BLOCKED — OUTCOME ASSERTED WITHOUT REVIEW ELIGIBILITY&quot;;[.Z20]=&quot;BLOCKED — NONCANONICAL OUTCOME&quot;);&quot;BLOCKED&quot;;IF([.Z2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cell office:value-type="string" table:formula="of:=IF([.U21]=&quot;UNKNOWN&quot;;&quot;COMPLETE OR ASSERT REQUIRED EVIDENCE BEFORE REVIEW&quot;;IF([.U21]=&quot;BLOCKED&quot;;&quot;RESOLVE CONTRADICTION BEFORE REVIEW — NO AUTHORITY CREATED&quot;;IF([.U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quot;READY FOR REVIEW&quot;;&quot;REVIEW ELIGIBLE — NO AUTHORITY&quot;;IF(OR([.U21]=&quot;UNKNOWN&quot;;[.U21]=&quot;BLOCKED&quot;);&quot;NOT REVIEW ELIGIBLE&quot;;&quot;NOT REVIEW ELIGIBLE&quot;))">
            <text:p>NOT REVIEW ELIGIBLE</text:p>
          </table:table-cell>
          <table:table-cell office:value-type="string" table:formula="of:=IF([.W21]=&quot;NOT REVIEW ELIGIBLE&quot;;&quot;DO NOT BEGIN SETTLEMENT REVIEW — RESOLVE READINESS OR CONTRADICTION CONDITIONS&quot;;IF([.W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quot;&quot;;&quot;UNKNOWN&quot;;IF([.W21]&lt;&gt;&quot;REVIEW ELIGIBLE — NO AUTHORITY&quot;;&quot;BLOCKED — OUTCOME ASSERTED WITHOUT REVIEW ELIGIBILITY&quot;;IF(OR([.Y21]=&quot;REVIEWED — NO AUTHORITY&quot;;[.Y21]=&quot;REVIEW DEFERRED&quot;;[.Y21]=&quot;REVIEW BLOCKED&quot;);&quot;ACCEPTED INTAKE — NO AUTHORITY&quot;;&quot;BLOCKED — NONCANONICAL OUTCOME&quot;)))">
            <text:p>UNKNOWN</text:p>
          </table:table-cell>
          <table:table-cell office:value-type="string" table:formula="of:=IF([.Z21]=&quot;UNKNOWN&quot;;&quot;NO REVIEW OUTCOME ASSERTED — REMAINS UNKNOWN&quot;;IF([.Z21]=&quot;BLOCKED — OUTCOME ASSERTED WITHOUT REVIEW ELIGIBILITY&quot;;&quot;REMOVE OR CORRECT OUTCOME ASSERTION — REVIEW ELIGIBILITY REQUIRED FIRST&quot;;IF([.Z21]=&quot;BLOCKED — NONCANONICAL OUTCOME&quot;;&quot;CORRECT OUTCOME TO CANONICAL CONTROLLED VOCABULARY&quot;;IF([.Z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quot;UNKNOWN&quot;;&quot;UNKNOWN&quot;;IF(OR([.Z21]=&quot;BLOCKED — OUTCOME ASSERTED WITHOUT REVIEW ELIGIBILITY&quot;;[.Z21]=&quot;BLOCKED — NONCANONICAL OUTCOME&quot;);&quot;BLOCKED&quot;;IF([.Z2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cell office:value-type="string" table:formula="of:=IF([.U22]=&quot;UNKNOWN&quot;;&quot;COMPLETE OR ASSERT REQUIRED EVIDENCE BEFORE REVIEW&quot;;IF([.U22]=&quot;BLOCKED&quot;;&quot;RESOLVE CONTRADICTION BEFORE REVIEW — NO AUTHORITY CREATED&quot;;IF([.U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quot;READY FOR REVIEW&quot;;&quot;REVIEW ELIGIBLE — NO AUTHORITY&quot;;IF(OR([.U22]=&quot;UNKNOWN&quot;;[.U22]=&quot;BLOCKED&quot;);&quot;NOT REVIEW ELIGIBLE&quot;;&quot;NOT REVIEW ELIGIBLE&quot;))">
            <text:p>NOT REVIEW ELIGIBLE</text:p>
          </table:table-cell>
          <table:table-cell office:value-type="string" table:formula="of:=IF([.W22]=&quot;NOT REVIEW ELIGIBLE&quot;;&quot;DO NOT BEGIN SETTLEMENT REVIEW — RESOLVE READINESS OR CONTRADICTION CONDITIONS&quot;;IF([.W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quot;&quot;;&quot;UNKNOWN&quot;;IF([.W22]&lt;&gt;&quot;REVIEW ELIGIBLE — NO AUTHORITY&quot;;&quot;BLOCKED — OUTCOME ASSERTED WITHOUT REVIEW ELIGIBILITY&quot;;IF(OR([.Y22]=&quot;REVIEWED — NO AUTHORITY&quot;;[.Y22]=&quot;REVIEW DEFERRED&quot;;[.Y22]=&quot;REVIEW BLOCKED&quot;);&quot;ACCEPTED INTAKE — NO AUTHORITY&quot;;&quot;BLOCKED — NONCANONICAL OUTCOME&quot;)))">
            <text:p>UNKNOWN</text:p>
          </table:table-cell>
          <table:table-cell office:value-type="string" table:formula="of:=IF([.Z22]=&quot;UNKNOWN&quot;;&quot;NO REVIEW OUTCOME ASSERTED — REMAINS UNKNOWN&quot;;IF([.Z22]=&quot;BLOCKED — OUTCOME ASSERTED WITHOUT REVIEW ELIGIBILITY&quot;;&quot;REMOVE OR CORRECT OUTCOME ASSERTION — REVIEW ELIGIBILITY REQUIRED FIRST&quot;;IF([.Z22]=&quot;BLOCKED — NONCANONICAL OUTCOME&quot;;&quot;CORRECT OUTCOME TO CANONICAL CONTROLLED VOCABULARY&quot;;IF([.Z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quot;UNKNOWN&quot;;&quot;UNKNOWN&quot;;IF(OR([.Z22]=&quot;BLOCKED — OUTCOME ASSERTED WITHOUT REVIEW ELIGIBILITY&quot;;[.Z22]=&quot;BLOCKED — NONCANONICAL OUTCOME&quot;);&quot;BLOCKED&quot;;IF([.Z2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cell office:value-type="string" table:formula="of:=IF([.U23]=&quot;UNKNOWN&quot;;&quot;COMPLETE OR ASSERT REQUIRED EVIDENCE BEFORE REVIEW&quot;;IF([.U23]=&quot;BLOCKED&quot;;&quot;RESOLVE CONTRADICTION BEFORE REVIEW — NO AUTHORITY CREATED&quot;;IF([.U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quot;READY FOR REVIEW&quot;;&quot;REVIEW ELIGIBLE — NO AUTHORITY&quot;;IF(OR([.U23]=&quot;UNKNOWN&quot;;[.U23]=&quot;BLOCKED&quot;);&quot;NOT REVIEW ELIGIBLE&quot;;&quot;NOT REVIEW ELIGIBLE&quot;))">
            <text:p>NOT REVIEW ELIGIBLE</text:p>
          </table:table-cell>
          <table:table-cell office:value-type="string" table:formula="of:=IF([.W23]=&quot;NOT REVIEW ELIGIBLE&quot;;&quot;DO NOT BEGIN SETTLEMENT REVIEW — RESOLVE READINESS OR CONTRADICTION CONDITIONS&quot;;IF([.W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quot;&quot;;&quot;UNKNOWN&quot;;IF([.W23]&lt;&gt;&quot;REVIEW ELIGIBLE — NO AUTHORITY&quot;;&quot;BLOCKED — OUTCOME ASSERTED WITHOUT REVIEW ELIGIBILITY&quot;;IF(OR([.Y23]=&quot;REVIEWED — NO AUTHORITY&quot;;[.Y23]=&quot;REVIEW DEFERRED&quot;;[.Y23]=&quot;REVIEW BLOCKED&quot;);&quot;ACCEPTED INTAKE — NO AUTHORITY&quot;;&quot;BLOCKED — NONCANONICAL OUTCOME&quot;)))">
            <text:p>UNKNOWN</text:p>
          </table:table-cell>
          <table:table-cell office:value-type="string" table:formula="of:=IF([.Z23]=&quot;UNKNOWN&quot;;&quot;NO REVIEW OUTCOME ASSERTED — REMAINS UNKNOWN&quot;;IF([.Z23]=&quot;BLOCKED — OUTCOME ASSERTED WITHOUT REVIEW ELIGIBILITY&quot;;&quot;REMOVE OR CORRECT OUTCOME ASSERTION — REVIEW ELIGIBILITY REQUIRED FIRST&quot;;IF([.Z23]=&quot;BLOCKED — NONCANONICAL OUTCOME&quot;;&quot;CORRECT OUTCOME TO CANONICAL CONTROLLED VOCABULARY&quot;;IF([.Z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quot;UNKNOWN&quot;;&quot;UNKNOWN&quot;;IF(OR([.Z23]=&quot;BLOCKED — OUTCOME ASSERTED WITHOUT REVIEW ELIGIBILITY&quot;;[.Z23]=&quot;BLOCKED — NONCANONICAL OUTCOME&quot;);&quot;BLOCKED&quot;;IF([.Z2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cell office:value-type="string" table:formula="of:=IF([.U24]=&quot;UNKNOWN&quot;;&quot;COMPLETE OR ASSERT REQUIRED EVIDENCE BEFORE REVIEW&quot;;IF([.U24]=&quot;BLOCKED&quot;;&quot;RESOLVE CONTRADICTION BEFORE REVIEW — NO AUTHORITY CREATED&quot;;IF([.U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quot;READY FOR REVIEW&quot;;&quot;REVIEW ELIGIBLE — NO AUTHORITY&quot;;IF(OR([.U24]=&quot;UNKNOWN&quot;;[.U24]=&quot;BLOCKED&quot;);&quot;NOT REVIEW ELIGIBLE&quot;;&quot;NOT REVIEW ELIGIBLE&quot;))">
            <text:p>NOT REVIEW ELIGIBLE</text:p>
          </table:table-cell>
          <table:table-cell office:value-type="string" table:formula="of:=IF([.W24]=&quot;NOT REVIEW ELIGIBLE&quot;;&quot;DO NOT BEGIN SETTLEMENT REVIEW — RESOLVE READINESS OR CONTRADICTION CONDITIONS&quot;;IF([.W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quot;&quot;;&quot;UNKNOWN&quot;;IF([.W24]&lt;&gt;&quot;REVIEW ELIGIBLE — NO AUTHORITY&quot;;&quot;BLOCKED — OUTCOME ASSERTED WITHOUT REVIEW ELIGIBILITY&quot;;IF(OR([.Y24]=&quot;REVIEWED — NO AUTHORITY&quot;;[.Y24]=&quot;REVIEW DEFERRED&quot;;[.Y24]=&quot;REVIEW BLOCKED&quot;);&quot;ACCEPTED INTAKE — NO AUTHORITY&quot;;&quot;BLOCKED — NONCANONICAL OUTCOME&quot;)))">
            <text:p>UNKNOWN</text:p>
          </table:table-cell>
          <table:table-cell office:value-type="string" table:formula="of:=IF([.Z24]=&quot;UNKNOWN&quot;;&quot;NO REVIEW OUTCOME ASSERTED — REMAINS UNKNOWN&quot;;IF([.Z24]=&quot;BLOCKED — OUTCOME ASSERTED WITHOUT REVIEW ELIGIBILITY&quot;;&quot;REMOVE OR CORRECT OUTCOME ASSERTION — REVIEW ELIGIBILITY REQUIRED FIRST&quot;;IF([.Z24]=&quot;BLOCKED — NONCANONICAL OUTCOME&quot;;&quot;CORRECT OUTCOME TO CANONICAL CONTROLLED VOCABULARY&quot;;IF([.Z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quot;UNKNOWN&quot;;&quot;UNKNOWN&quot;;IF(OR([.Z24]=&quot;BLOCKED — OUTCOME ASSERTED WITHOUT REVIEW ELIGIBILITY&quot;;[.Z24]=&quot;BLOCKED — NONCANONICAL OUTCOME&quot;);&quot;BLOCKED&quot;;IF([.Z2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cell office:value-type="string" table:formula="of:=IF([.U25]=&quot;UNKNOWN&quot;;&quot;COMPLETE OR ASSERT REQUIRED EVIDENCE BEFORE REVIEW&quot;;IF([.U25]=&quot;BLOCKED&quot;;&quot;RESOLVE CONTRADICTION BEFORE REVIEW — NO AUTHORITY CREATED&quot;;IF([.U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quot;READY FOR REVIEW&quot;;&quot;REVIEW ELIGIBLE — NO AUTHORITY&quot;;IF(OR([.U25]=&quot;UNKNOWN&quot;;[.U25]=&quot;BLOCKED&quot;);&quot;NOT REVIEW ELIGIBLE&quot;;&quot;NOT REVIEW ELIGIBLE&quot;))">
            <text:p>NOT REVIEW ELIGIBLE</text:p>
          </table:table-cell>
          <table:table-cell office:value-type="string" table:formula="of:=IF([.W25]=&quot;NOT REVIEW ELIGIBLE&quot;;&quot;DO NOT BEGIN SETTLEMENT REVIEW — RESOLVE READINESS OR CONTRADICTION CONDITIONS&quot;;IF([.W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quot;&quot;;&quot;UNKNOWN&quot;;IF([.W25]&lt;&gt;&quot;REVIEW ELIGIBLE — NO AUTHORITY&quot;;&quot;BLOCKED — OUTCOME ASSERTED WITHOUT REVIEW ELIGIBILITY&quot;;IF(OR([.Y25]=&quot;REVIEWED — NO AUTHORITY&quot;;[.Y25]=&quot;REVIEW DEFERRED&quot;;[.Y25]=&quot;REVIEW BLOCKED&quot;);&quot;ACCEPTED INTAKE — NO AUTHORITY&quot;;&quot;BLOCKED — NONCANONICAL OUTCOME&quot;)))">
            <text:p>UNKNOWN</text:p>
          </table:table-cell>
          <table:table-cell office:value-type="string" table:formula="of:=IF([.Z25]=&quot;UNKNOWN&quot;;&quot;NO REVIEW OUTCOME ASSERTED — REMAINS UNKNOWN&quot;;IF([.Z25]=&quot;BLOCKED — OUTCOME ASSERTED WITHOUT REVIEW ELIGIBILITY&quot;;&quot;REMOVE OR CORRECT OUTCOME ASSERTION — REVIEW ELIGIBILITY REQUIRED FIRST&quot;;IF([.Z25]=&quot;BLOCKED — NONCANONICAL OUTCOME&quot;;&quot;CORRECT OUTCOME TO CANONICAL CONTROLLED VOCABULARY&quot;;IF([.Z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5]=&quot;UNKNOWN&quot;;&quot;UNKNOWN&quot;;IF(OR([.Z25]=&quot;BLOCKED — OUTCOME ASSERTED WITHOUT REVIEW ELIGIBILITY&quot;;[.Z25]=&quot;BLOCKED — NONCANONICAL OUTCOME&quot;);&quot;BLOCKED&quot;;IF([.Z2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cell office:value-type="string" table:formula="of:=IF([.U26]=&quot;UNKNOWN&quot;;&quot;COMPLETE OR ASSERT REQUIRED EVIDENCE BEFORE REVIEW&quot;;IF([.U26]=&quot;BLOCKED&quot;;&quot;RESOLVE CONTRADICTION BEFORE REVIEW — NO AUTHORITY CREATED&quot;;IF([.U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6]=&quot;READY FOR REVIEW&quot;;&quot;REVIEW ELIGIBLE — NO AUTHORITY&quot;;IF(OR([.U26]=&quot;UNKNOWN&quot;;[.U26]=&quot;BLOCKED&quot;);&quot;NOT REVIEW ELIGIBLE&quot;;&quot;NOT REVIEW ELIGIBLE&quot;))">
            <text:p>NOT REVIEW ELIGIBLE</text:p>
          </table:table-cell>
          <table:table-cell office:value-type="string" table:formula="of:=IF([.W26]=&quot;NOT REVIEW ELIGIBLE&quot;;&quot;DO NOT BEGIN SETTLEMENT REVIEW — RESOLVE READINESS OR CONTRADICTION CONDITIONS&quot;;IF([.W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6]=&quot;&quot;;&quot;UNKNOWN&quot;;IF([.W26]&lt;&gt;&quot;REVIEW ELIGIBLE — NO AUTHORITY&quot;;&quot;BLOCKED — OUTCOME ASSERTED WITHOUT REVIEW ELIGIBILITY&quot;;IF(OR([.Y26]=&quot;REVIEWED — NO AUTHORITY&quot;;[.Y26]=&quot;REVIEW DEFERRED&quot;;[.Y26]=&quot;REVIEW BLOCKED&quot;);&quot;ACCEPTED INTAKE — NO AUTHORITY&quot;;&quot;BLOCKED — NONCANONICAL OUTCOME&quot;)))">
            <text:p>UNKNOWN</text:p>
          </table:table-cell>
          <table:table-cell office:value-type="string" table:formula="of:=IF([.Z26]=&quot;UNKNOWN&quot;;&quot;NO REVIEW OUTCOME ASSERTED — REMAINS UNKNOWN&quot;;IF([.Z26]=&quot;BLOCKED — OUTCOME ASSERTED WITHOUT REVIEW ELIGIBILITY&quot;;&quot;REMOVE OR CORRECT OUTCOME ASSERTION — REVIEW ELIGIBILITY REQUIRED FIRST&quot;;IF([.Z26]=&quot;BLOCKED — NONCANONICAL OUTCOME&quot;;&quot;CORRECT OUTCOME TO CANONICAL CONTROLLED VOCABULARY&quot;;IF([.Z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6]=&quot;UNKNOWN&quot;;&quot;UNKNOWN&quot;;IF(OR([.Z26]=&quot;BLOCKED — OUTCOME ASSERTED WITHOUT REVIEW ELIGIBILITY&quot;;[.Z26]=&quot;BLOCKED — NONCANONICAL OUTCOME&quot;);&quot;BLOCKED&quot;;IF([.Z2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cell office:value-type="string" table:formula="of:=IF([.U27]=&quot;UNKNOWN&quot;;&quot;COMPLETE OR ASSERT REQUIRED EVIDENCE BEFORE REVIEW&quot;;IF([.U27]=&quot;BLOCKED&quot;;&quot;RESOLVE CONTRADICTION BEFORE REVIEW — NO AUTHORITY CREATED&quot;;IF([.U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7]=&quot;READY FOR REVIEW&quot;;&quot;REVIEW ELIGIBLE — NO AUTHORITY&quot;;IF(OR([.U27]=&quot;UNKNOWN&quot;;[.U27]=&quot;BLOCKED&quot;);&quot;NOT REVIEW ELIGIBLE&quot;;&quot;NOT REVIEW ELIGIBLE&quot;))">
            <text:p>NOT REVIEW ELIGIBLE</text:p>
          </table:table-cell>
          <table:table-cell office:value-type="string" table:formula="of:=IF([.W27]=&quot;NOT REVIEW ELIGIBLE&quot;;&quot;DO NOT BEGIN SETTLEMENT REVIEW — RESOLVE READINESS OR CONTRADICTION CONDITIONS&quot;;IF([.W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7]=&quot;&quot;;&quot;UNKNOWN&quot;;IF([.W27]&lt;&gt;&quot;REVIEW ELIGIBLE — NO AUTHORITY&quot;;&quot;BLOCKED — OUTCOME ASSERTED WITHOUT REVIEW ELIGIBILITY&quot;;IF(OR([.Y27]=&quot;REVIEWED — NO AUTHORITY&quot;;[.Y27]=&quot;REVIEW DEFERRED&quot;;[.Y27]=&quot;REVIEW BLOCKED&quot;);&quot;ACCEPTED INTAKE — NO AUTHORITY&quot;;&quot;BLOCKED — NONCANONICAL OUTCOME&quot;)))">
            <text:p>UNKNOWN</text:p>
          </table:table-cell>
          <table:table-cell office:value-type="string" table:formula="of:=IF([.Z27]=&quot;UNKNOWN&quot;;&quot;NO REVIEW OUTCOME ASSERTED — REMAINS UNKNOWN&quot;;IF([.Z27]=&quot;BLOCKED — OUTCOME ASSERTED WITHOUT REVIEW ELIGIBILITY&quot;;&quot;REMOVE OR CORRECT OUTCOME ASSERTION — REVIEW ELIGIBILITY REQUIRED FIRST&quot;;IF([.Z27]=&quot;BLOCKED — NONCANONICAL OUTCOME&quot;;&quot;CORRECT OUTCOME TO CANONICAL CONTROLLED VOCABULARY&quot;;IF([.Z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7]=&quot;UNKNOWN&quot;;&quot;UNKNOWN&quot;;IF(OR([.Z27]=&quot;BLOCKED — OUTCOME ASSERTED WITHOUT REVIEW ELIGIBILITY&quot;;[.Z27]=&quot;BLOCKED — NONCANONICAL OUTCOME&quot;);&quot;BLOCKED&quot;;IF([.Z2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cell office:value-type="string" table:formula="of:=IF([.U28]=&quot;UNKNOWN&quot;;&quot;COMPLETE OR ASSERT REQUIRED EVIDENCE BEFORE REVIEW&quot;;IF([.U28]=&quot;BLOCKED&quot;;&quot;RESOLVE CONTRADICTION BEFORE REVIEW — NO AUTHORITY CREATED&quot;;IF([.U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8]=&quot;READY FOR REVIEW&quot;;&quot;REVIEW ELIGIBLE — NO AUTHORITY&quot;;IF(OR([.U28]=&quot;UNKNOWN&quot;;[.U28]=&quot;BLOCKED&quot;);&quot;NOT REVIEW ELIGIBLE&quot;;&quot;NOT REVIEW ELIGIBLE&quot;))">
            <text:p>NOT REVIEW ELIGIBLE</text:p>
          </table:table-cell>
          <table:table-cell office:value-type="string" table:formula="of:=IF([.W28]=&quot;NOT REVIEW ELIGIBLE&quot;;&quot;DO NOT BEGIN SETTLEMENT REVIEW — RESOLVE READINESS OR CONTRADICTION CONDITIONS&quot;;IF([.W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8]=&quot;&quot;;&quot;UNKNOWN&quot;;IF([.W28]&lt;&gt;&quot;REVIEW ELIGIBLE — NO AUTHORITY&quot;;&quot;BLOCKED — OUTCOME ASSERTED WITHOUT REVIEW ELIGIBILITY&quot;;IF(OR([.Y28]=&quot;REVIEWED — NO AUTHORITY&quot;;[.Y28]=&quot;REVIEW DEFERRED&quot;;[.Y28]=&quot;REVIEW BLOCKED&quot;);&quot;ACCEPTED INTAKE — NO AUTHORITY&quot;;&quot;BLOCKED — NONCANONICAL OUTCOME&quot;)))">
            <text:p>UNKNOWN</text:p>
          </table:table-cell>
          <table:table-cell office:value-type="string" table:formula="of:=IF([.Z28]=&quot;UNKNOWN&quot;;&quot;NO REVIEW OUTCOME ASSERTED — REMAINS UNKNOWN&quot;;IF([.Z28]=&quot;BLOCKED — OUTCOME ASSERTED WITHOUT REVIEW ELIGIBILITY&quot;;&quot;REMOVE OR CORRECT OUTCOME ASSERTION — REVIEW ELIGIBILITY REQUIRED FIRST&quot;;IF([.Z28]=&quot;BLOCKED — NONCANONICAL OUTCOME&quot;;&quot;CORRECT OUTCOME TO CANONICAL CONTROLLED VOCABULARY&quot;;IF([.Z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8]=&quot;UNKNOWN&quot;;&quot;UNKNOWN&quot;;IF(OR([.Z28]=&quot;BLOCKED — OUTCOME ASSERTED WITHOUT REVIEW ELIGIBILITY&quot;;[.Z28]=&quot;BLOCKED — NONCANONICAL OUTCOME&quot;);&quot;BLOCKED&quot;;IF([.Z2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cell office:value-type="string" table:formula="of:=IF([.U29]=&quot;UNKNOWN&quot;;&quot;COMPLETE OR ASSERT REQUIRED EVIDENCE BEFORE REVIEW&quot;;IF([.U29]=&quot;BLOCKED&quot;;&quot;RESOLVE CONTRADICTION BEFORE REVIEW — NO AUTHORITY CREATED&quot;;IF([.U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9]=&quot;READY FOR REVIEW&quot;;&quot;REVIEW ELIGIBLE — NO AUTHORITY&quot;;IF(OR([.U29]=&quot;UNKNOWN&quot;;[.U29]=&quot;BLOCKED&quot;);&quot;NOT REVIEW ELIGIBLE&quot;;&quot;NOT REVIEW ELIGIBLE&quot;))">
            <text:p>NOT REVIEW ELIGIBLE</text:p>
          </table:table-cell>
          <table:table-cell office:value-type="string" table:formula="of:=IF([.W29]=&quot;NOT REVIEW ELIGIBLE&quot;;&quot;DO NOT BEGIN SETTLEMENT REVIEW — RESOLVE READINESS OR CONTRADICTION CONDITIONS&quot;;IF([.W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9]=&quot;&quot;;&quot;UNKNOWN&quot;;IF([.W29]&lt;&gt;&quot;REVIEW ELIGIBLE — NO AUTHORITY&quot;;&quot;BLOCKED — OUTCOME ASSERTED WITHOUT REVIEW ELIGIBILITY&quot;;IF(OR([.Y29]=&quot;REVIEWED — NO AUTHORITY&quot;;[.Y29]=&quot;REVIEW DEFERRED&quot;;[.Y29]=&quot;REVIEW BLOCKED&quot;);&quot;ACCEPTED INTAKE — NO AUTHORITY&quot;;&quot;BLOCKED — NONCANONICAL OUTCOME&quot;)))">
            <text:p>UNKNOWN</text:p>
          </table:table-cell>
          <table:table-cell office:value-type="string" table:formula="of:=IF([.Z29]=&quot;UNKNOWN&quot;;&quot;NO REVIEW OUTCOME ASSERTED — REMAINS UNKNOWN&quot;;IF([.Z29]=&quot;BLOCKED — OUTCOME ASSERTED WITHOUT REVIEW ELIGIBILITY&quot;;&quot;REMOVE OR CORRECT OUTCOME ASSERTION — REVIEW ELIGIBILITY REQUIRED FIRST&quot;;IF([.Z29]=&quot;BLOCKED — NONCANONICAL OUTCOME&quot;;&quot;CORRECT OUTCOME TO CANONICAL CONTROLLED VOCABULARY&quot;;IF([.Z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9]=&quot;UNKNOWN&quot;;&quot;UNKNOWN&quot;;IF(OR([.Z29]=&quot;BLOCKED — OUTCOME ASSERTED WITHOUT REVIEW ELIGIBILITY&quot;;[.Z29]=&quot;BLOCKED — NONCANONICAL OUTCOME&quot;);&quot;BLOCKED&quot;;IF([.Z2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cell office:value-type="string" table:formula="of:=IF([.U30]=&quot;UNKNOWN&quot;;&quot;COMPLETE OR ASSERT REQUIRED EVIDENCE BEFORE REVIEW&quot;;IF([.U30]=&quot;BLOCKED&quot;;&quot;RESOLVE CONTRADICTION BEFORE REVIEW — NO AUTHORITY CREATED&quot;;IF([.U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0]=&quot;READY FOR REVIEW&quot;;&quot;REVIEW ELIGIBLE — NO AUTHORITY&quot;;IF(OR([.U30]=&quot;UNKNOWN&quot;;[.U30]=&quot;BLOCKED&quot;);&quot;NOT REVIEW ELIGIBLE&quot;;&quot;NOT REVIEW ELIGIBLE&quot;))">
            <text:p>NOT REVIEW ELIGIBLE</text:p>
          </table:table-cell>
          <table:table-cell office:value-type="string" table:formula="of:=IF([.W30]=&quot;NOT REVIEW ELIGIBLE&quot;;&quot;DO NOT BEGIN SETTLEMENT REVIEW — RESOLVE READINESS OR CONTRADICTION CONDITIONS&quot;;IF([.W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0]=&quot;&quot;;&quot;UNKNOWN&quot;;IF([.W30]&lt;&gt;&quot;REVIEW ELIGIBLE — NO AUTHORITY&quot;;&quot;BLOCKED — OUTCOME ASSERTED WITHOUT REVIEW ELIGIBILITY&quot;;IF(OR([.Y30]=&quot;REVIEWED — NO AUTHORITY&quot;;[.Y30]=&quot;REVIEW DEFERRED&quot;;[.Y30]=&quot;REVIEW BLOCKED&quot;);&quot;ACCEPTED INTAKE — NO AUTHORITY&quot;;&quot;BLOCKED — NONCANONICAL OUTCOME&quot;)))">
            <text:p>UNKNOWN</text:p>
          </table:table-cell>
          <table:table-cell office:value-type="string" table:formula="of:=IF([.Z30]=&quot;UNKNOWN&quot;;&quot;NO REVIEW OUTCOME ASSERTED — REMAINS UNKNOWN&quot;;IF([.Z30]=&quot;BLOCKED — OUTCOME ASSERTED WITHOUT REVIEW ELIGIBILITY&quot;;&quot;REMOVE OR CORRECT OUTCOME ASSERTION — REVIEW ELIGIBILITY REQUIRED FIRST&quot;;IF([.Z30]=&quot;BLOCKED — NONCANONICAL OUTCOME&quot;;&quot;CORRECT OUTCOME TO CANONICAL CONTROLLED VOCABULARY&quot;;IF([.Z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0]=&quot;UNKNOWN&quot;;&quot;UNKNOWN&quot;;IF(OR([.Z30]=&quot;BLOCKED — OUTCOME ASSERTED WITHOUT REVIEW ELIGIBILITY&quot;;[.Z30]=&quot;BLOCKED — NONCANONICAL OUTCOME&quot;);&quot;BLOCKED&quot;;IF([.Z3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cell office:value-type="string" table:formula="of:=IF([.U31]=&quot;UNKNOWN&quot;;&quot;COMPLETE OR ASSERT REQUIRED EVIDENCE BEFORE REVIEW&quot;;IF([.U31]=&quot;BLOCKED&quot;;&quot;RESOLVE CONTRADICTION BEFORE REVIEW — NO AUTHORITY CREATED&quot;;IF([.U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1]=&quot;READY FOR REVIEW&quot;;&quot;REVIEW ELIGIBLE — NO AUTHORITY&quot;;IF(OR([.U31]=&quot;UNKNOWN&quot;;[.U31]=&quot;BLOCKED&quot;);&quot;NOT REVIEW ELIGIBLE&quot;;&quot;NOT REVIEW ELIGIBLE&quot;))">
            <text:p>NOT REVIEW ELIGIBLE</text:p>
          </table:table-cell>
          <table:table-cell office:value-type="string" table:formula="of:=IF([.W31]=&quot;NOT REVIEW ELIGIBLE&quot;;&quot;DO NOT BEGIN SETTLEMENT REVIEW — RESOLVE READINESS OR CONTRADICTION CONDITIONS&quot;;IF([.W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1]=&quot;&quot;;&quot;UNKNOWN&quot;;IF([.W31]&lt;&gt;&quot;REVIEW ELIGIBLE — NO AUTHORITY&quot;;&quot;BLOCKED — OUTCOME ASSERTED WITHOUT REVIEW ELIGIBILITY&quot;;IF(OR([.Y31]=&quot;REVIEWED — NO AUTHORITY&quot;;[.Y31]=&quot;REVIEW DEFERRED&quot;;[.Y31]=&quot;REVIEW BLOCKED&quot;);&quot;ACCEPTED INTAKE — NO AUTHORITY&quot;;&quot;BLOCKED — NONCANONICAL OUTCOME&quot;)))">
            <text:p>UNKNOWN</text:p>
          </table:table-cell>
          <table:table-cell office:value-type="string" table:formula="of:=IF([.Z31]=&quot;UNKNOWN&quot;;&quot;NO REVIEW OUTCOME ASSERTED — REMAINS UNKNOWN&quot;;IF([.Z31]=&quot;BLOCKED — OUTCOME ASSERTED WITHOUT REVIEW ELIGIBILITY&quot;;&quot;REMOVE OR CORRECT OUTCOME ASSERTION — REVIEW ELIGIBILITY REQUIRED FIRST&quot;;IF([.Z31]=&quot;BLOCKED — NONCANONICAL OUTCOME&quot;;&quot;CORRECT OUTCOME TO CANONICAL CONTROLLED VOCABULARY&quot;;IF([.Z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1]=&quot;UNKNOWN&quot;;&quot;UNKNOWN&quot;;IF(OR([.Z31]=&quot;BLOCKED — OUTCOME ASSERTED WITHOUT REVIEW ELIGIBILITY&quot;;[.Z31]=&quot;BLOCKED — NONCANONICAL OUTCOME&quot;);&quot;BLOCKED&quot;;IF([.Z3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cell office:value-type="string" table:formula="of:=IF([.U32]=&quot;UNKNOWN&quot;;&quot;COMPLETE OR ASSERT REQUIRED EVIDENCE BEFORE REVIEW&quot;;IF([.U32]=&quot;BLOCKED&quot;;&quot;RESOLVE CONTRADICTION BEFORE REVIEW — NO AUTHORITY CREATED&quot;;IF([.U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2]=&quot;READY FOR REVIEW&quot;;&quot;REVIEW ELIGIBLE — NO AUTHORITY&quot;;IF(OR([.U32]=&quot;UNKNOWN&quot;;[.U32]=&quot;BLOCKED&quot;);&quot;NOT REVIEW ELIGIBLE&quot;;&quot;NOT REVIEW ELIGIBLE&quot;))">
            <text:p>NOT REVIEW ELIGIBLE</text:p>
          </table:table-cell>
          <table:table-cell office:value-type="string" table:formula="of:=IF([.W32]=&quot;NOT REVIEW ELIGIBLE&quot;;&quot;DO NOT BEGIN SETTLEMENT REVIEW — RESOLVE READINESS OR CONTRADICTION CONDITIONS&quot;;IF([.W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2]=&quot;&quot;;&quot;UNKNOWN&quot;;IF([.W32]&lt;&gt;&quot;REVIEW ELIGIBLE — NO AUTHORITY&quot;;&quot;BLOCKED — OUTCOME ASSERTED WITHOUT REVIEW ELIGIBILITY&quot;;IF(OR([.Y32]=&quot;REVIEWED — NO AUTHORITY&quot;;[.Y32]=&quot;REVIEW DEFERRED&quot;;[.Y32]=&quot;REVIEW BLOCKED&quot;);&quot;ACCEPTED INTAKE — NO AUTHORITY&quot;;&quot;BLOCKED — NONCANONICAL OUTCOME&quot;)))">
            <text:p>UNKNOWN</text:p>
          </table:table-cell>
          <table:table-cell office:value-type="string" table:formula="of:=IF([.Z32]=&quot;UNKNOWN&quot;;&quot;NO REVIEW OUTCOME ASSERTED — REMAINS UNKNOWN&quot;;IF([.Z32]=&quot;BLOCKED — OUTCOME ASSERTED WITHOUT REVIEW ELIGIBILITY&quot;;&quot;REMOVE OR CORRECT OUTCOME ASSERTION — REVIEW ELIGIBILITY REQUIRED FIRST&quot;;IF([.Z32]=&quot;BLOCKED — NONCANONICAL OUTCOME&quot;;&quot;CORRECT OUTCOME TO CANONICAL CONTROLLED VOCABULARY&quot;;IF([.Z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2]=&quot;UNKNOWN&quot;;&quot;UNKNOWN&quot;;IF(OR([.Z32]=&quot;BLOCKED — OUTCOME ASSERTED WITHOUT REVIEW ELIGIBILITY&quot;;[.Z32]=&quot;BLOCKED — NONCANONICAL OUTCOME&quot;);&quot;BLOCKED&quot;;IF([.Z3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cell office:value-type="string" table:formula="of:=IF([.U33]=&quot;UNKNOWN&quot;;&quot;COMPLETE OR ASSERT REQUIRED EVIDENCE BEFORE REVIEW&quot;;IF([.U33]=&quot;BLOCKED&quot;;&quot;RESOLVE CONTRADICTION BEFORE REVIEW — NO AUTHORITY CREATED&quot;;IF([.U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3]=&quot;READY FOR REVIEW&quot;;&quot;REVIEW ELIGIBLE — NO AUTHORITY&quot;;IF(OR([.U33]=&quot;UNKNOWN&quot;;[.U33]=&quot;BLOCKED&quot;);&quot;NOT REVIEW ELIGIBLE&quot;;&quot;NOT REVIEW ELIGIBLE&quot;))">
            <text:p>NOT REVIEW ELIGIBLE</text:p>
          </table:table-cell>
          <table:table-cell office:value-type="string" table:formula="of:=IF([.W33]=&quot;NOT REVIEW ELIGIBLE&quot;;&quot;DO NOT BEGIN SETTLEMENT REVIEW — RESOLVE READINESS OR CONTRADICTION CONDITIONS&quot;;IF([.W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3]=&quot;&quot;;&quot;UNKNOWN&quot;;IF([.W33]&lt;&gt;&quot;REVIEW ELIGIBLE — NO AUTHORITY&quot;;&quot;BLOCKED — OUTCOME ASSERTED WITHOUT REVIEW ELIGIBILITY&quot;;IF(OR([.Y33]=&quot;REVIEWED — NO AUTHORITY&quot;;[.Y33]=&quot;REVIEW DEFERRED&quot;;[.Y33]=&quot;REVIEW BLOCKED&quot;);&quot;ACCEPTED INTAKE — NO AUTHORITY&quot;;&quot;BLOCKED — NONCANONICAL OUTCOME&quot;)))">
            <text:p>UNKNOWN</text:p>
          </table:table-cell>
          <table:table-cell office:value-type="string" table:formula="of:=IF([.Z33]=&quot;UNKNOWN&quot;;&quot;NO REVIEW OUTCOME ASSERTED — REMAINS UNKNOWN&quot;;IF([.Z33]=&quot;BLOCKED — OUTCOME ASSERTED WITHOUT REVIEW ELIGIBILITY&quot;;&quot;REMOVE OR CORRECT OUTCOME ASSERTION — REVIEW ELIGIBILITY REQUIRED FIRST&quot;;IF([.Z33]=&quot;BLOCKED — NONCANONICAL OUTCOME&quot;;&quot;CORRECT OUTCOME TO CANONICAL CONTROLLED VOCABULARY&quot;;IF([.Z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3]=&quot;UNKNOWN&quot;;&quot;UNKNOWN&quot;;IF(OR([.Z33]=&quot;BLOCKED — OUTCOME ASSERTED WITHOUT REVIEW ELIGIBILITY&quot;;[.Z33]=&quot;BLOCKED — NONCANONICAL OUTCOME&quot;);&quot;BLOCKED&quot;;IF([.Z3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cell office:value-type="string" table:formula="of:=IF([.U34]=&quot;UNKNOWN&quot;;&quot;COMPLETE OR ASSERT REQUIRED EVIDENCE BEFORE REVIEW&quot;;IF([.U34]=&quot;BLOCKED&quot;;&quot;RESOLVE CONTRADICTION BEFORE REVIEW — NO AUTHORITY CREATED&quot;;IF([.U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4]=&quot;READY FOR REVIEW&quot;;&quot;REVIEW ELIGIBLE — NO AUTHORITY&quot;;IF(OR([.U34]=&quot;UNKNOWN&quot;;[.U34]=&quot;BLOCKED&quot;);&quot;NOT REVIEW ELIGIBLE&quot;;&quot;NOT REVIEW ELIGIBLE&quot;))">
            <text:p>NOT REVIEW ELIGIBLE</text:p>
          </table:table-cell>
          <table:table-cell office:value-type="string" table:formula="of:=IF([.W34]=&quot;NOT REVIEW ELIGIBLE&quot;;&quot;DO NOT BEGIN SETTLEMENT REVIEW — RESOLVE READINESS OR CONTRADICTION CONDITIONS&quot;;IF([.W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4]=&quot;&quot;;&quot;UNKNOWN&quot;;IF([.W34]&lt;&gt;&quot;REVIEW ELIGIBLE — NO AUTHORITY&quot;;&quot;BLOCKED — OUTCOME ASSERTED WITHOUT REVIEW ELIGIBILITY&quot;;IF(OR([.Y34]=&quot;REVIEWED — NO AUTHORITY&quot;;[.Y34]=&quot;REVIEW DEFERRED&quot;;[.Y34]=&quot;REVIEW BLOCKED&quot;);&quot;ACCEPTED INTAKE — NO AUTHORITY&quot;;&quot;BLOCKED — NONCANONICAL OUTCOME&quot;)))">
            <text:p>UNKNOWN</text:p>
          </table:table-cell>
          <table:table-cell office:value-type="string" table:formula="of:=IF([.Z34]=&quot;UNKNOWN&quot;;&quot;NO REVIEW OUTCOME ASSERTED — REMAINS UNKNOWN&quot;;IF([.Z34]=&quot;BLOCKED — OUTCOME ASSERTED WITHOUT REVIEW ELIGIBILITY&quot;;&quot;REMOVE OR CORRECT OUTCOME ASSERTION — REVIEW ELIGIBILITY REQUIRED FIRST&quot;;IF([.Z34]=&quot;BLOCKED — NONCANONICAL OUTCOME&quot;;&quot;CORRECT OUTCOME TO CANONICAL CONTROLLED VOCABULARY&quot;;IF([.Z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4]=&quot;UNKNOWN&quot;;&quot;UNKNOWN&quot;;IF(OR([.Z34]=&quot;BLOCKED — OUTCOME ASSERTED WITHOUT REVIEW ELIGIBILITY&quot;;[.Z34]=&quot;BLOCKED — NONCANONICAL OUTCOME&quot;);&quot;BLOCKED&quot;;IF([.Z3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cell office:value-type="string" table:formula="of:=IF([.U35]=&quot;UNKNOWN&quot;;&quot;COMPLETE OR ASSERT REQUIRED EVIDENCE BEFORE REVIEW&quot;;IF([.U35]=&quot;BLOCKED&quot;;&quot;RESOLVE CONTRADICTION BEFORE REVIEW — NO AUTHORITY CREATED&quot;;IF([.U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5]=&quot;READY FOR REVIEW&quot;;&quot;REVIEW ELIGIBLE — NO AUTHORITY&quot;;IF(OR([.U35]=&quot;UNKNOWN&quot;;[.U35]=&quot;BLOCKED&quot;);&quot;NOT REVIEW ELIGIBLE&quot;;&quot;NOT REVIEW ELIGIBLE&quot;))">
            <text:p>NOT REVIEW ELIGIBLE</text:p>
          </table:table-cell>
          <table:table-cell office:value-type="string" table:formula="of:=IF([.W35]=&quot;NOT REVIEW ELIGIBLE&quot;;&quot;DO NOT BEGIN SETTLEMENT REVIEW — RESOLVE READINESS OR CONTRADICTION CONDITIONS&quot;;IF([.W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5]=&quot;&quot;;&quot;UNKNOWN&quot;;IF([.W35]&lt;&gt;&quot;REVIEW ELIGIBLE — NO AUTHORITY&quot;;&quot;BLOCKED — OUTCOME ASSERTED WITHOUT REVIEW ELIGIBILITY&quot;;IF(OR([.Y35]=&quot;REVIEWED — NO AUTHORITY&quot;;[.Y35]=&quot;REVIEW DEFERRED&quot;;[.Y35]=&quot;REVIEW BLOCKED&quot;);&quot;ACCEPTED INTAKE — NO AUTHORITY&quot;;&quot;BLOCKED — NONCANONICAL OUTCOME&quot;)))">
            <text:p>UNKNOWN</text:p>
          </table:table-cell>
          <table:table-cell office:value-type="string" table:formula="of:=IF([.Z35]=&quot;UNKNOWN&quot;;&quot;NO REVIEW OUTCOME ASSERTED — REMAINS UNKNOWN&quot;;IF([.Z35]=&quot;BLOCKED — OUTCOME ASSERTED WITHOUT REVIEW ELIGIBILITY&quot;;&quot;REMOVE OR CORRECT OUTCOME ASSERTION — REVIEW ELIGIBILITY REQUIRED FIRST&quot;;IF([.Z35]=&quot;BLOCKED — NONCANONICAL OUTCOME&quot;;&quot;CORRECT OUTCOME TO CANONICAL CONTROLLED VOCABULARY&quot;;IF([.Z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5]=&quot;UNKNOWN&quot;;&quot;UNKNOWN&quot;;IF(OR([.Z35]=&quot;BLOCKED — OUTCOME ASSERTED WITHOUT REVIEW ELIGIBILITY&quot;;[.Z35]=&quot;BLOCKED — NONCANONICAL OUTCOME&quot;);&quot;BLOCKED&quot;;IF([.Z3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cell office:value-type="string" table:formula="of:=IF([.U36]=&quot;UNKNOWN&quot;;&quot;COMPLETE OR ASSERT REQUIRED EVIDENCE BEFORE REVIEW&quot;;IF([.U36]=&quot;BLOCKED&quot;;&quot;RESOLVE CONTRADICTION BEFORE REVIEW — NO AUTHORITY CREATED&quot;;IF([.U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6]=&quot;READY FOR REVIEW&quot;;&quot;REVIEW ELIGIBLE — NO AUTHORITY&quot;;IF(OR([.U36]=&quot;UNKNOWN&quot;;[.U36]=&quot;BLOCKED&quot;);&quot;NOT REVIEW ELIGIBLE&quot;;&quot;NOT REVIEW ELIGIBLE&quot;))">
            <text:p>NOT REVIEW ELIGIBLE</text:p>
          </table:table-cell>
          <table:table-cell office:value-type="string" table:formula="of:=IF([.W36]=&quot;NOT REVIEW ELIGIBLE&quot;;&quot;DO NOT BEGIN SETTLEMENT REVIEW — RESOLVE READINESS OR CONTRADICTION CONDITIONS&quot;;IF([.W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6]=&quot;&quot;;&quot;UNKNOWN&quot;;IF([.W36]&lt;&gt;&quot;REVIEW ELIGIBLE — NO AUTHORITY&quot;;&quot;BLOCKED — OUTCOME ASSERTED WITHOUT REVIEW ELIGIBILITY&quot;;IF(OR([.Y36]=&quot;REVIEWED — NO AUTHORITY&quot;;[.Y36]=&quot;REVIEW DEFERRED&quot;;[.Y36]=&quot;REVIEW BLOCKED&quot;);&quot;ACCEPTED INTAKE — NO AUTHORITY&quot;;&quot;BLOCKED — NONCANONICAL OUTCOME&quot;)))">
            <text:p>UNKNOWN</text:p>
          </table:table-cell>
          <table:table-cell office:value-type="string" table:formula="of:=IF([.Z36]=&quot;UNKNOWN&quot;;&quot;NO REVIEW OUTCOME ASSERTED — REMAINS UNKNOWN&quot;;IF([.Z36]=&quot;BLOCKED — OUTCOME ASSERTED WITHOUT REVIEW ELIGIBILITY&quot;;&quot;REMOVE OR CORRECT OUTCOME ASSERTION — REVIEW ELIGIBILITY REQUIRED FIRST&quot;;IF([.Z36]=&quot;BLOCKED — NONCANONICAL OUTCOME&quot;;&quot;CORRECT OUTCOME TO CANONICAL CONTROLLED VOCABULARY&quot;;IF([.Z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6]=&quot;UNKNOWN&quot;;&quot;UNKNOWN&quot;;IF(OR([.Z36]=&quot;BLOCKED — OUTCOME ASSERTED WITHOUT REVIEW ELIGIBILITY&quot;;[.Z36]=&quot;BLOCKED — NONCANONICAL OUTCOME&quot;);&quot;BLOCKED&quot;;IF([.Z3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cell office:value-type="string" table:formula="of:=IF([.U37]=&quot;UNKNOWN&quot;;&quot;COMPLETE OR ASSERT REQUIRED EVIDENCE BEFORE REVIEW&quot;;IF([.U37]=&quot;BLOCKED&quot;;&quot;RESOLVE CONTRADICTION BEFORE REVIEW — NO AUTHORITY CREATED&quot;;IF([.U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7]=&quot;READY FOR REVIEW&quot;;&quot;REVIEW ELIGIBLE — NO AUTHORITY&quot;;IF(OR([.U37]=&quot;UNKNOWN&quot;;[.U37]=&quot;BLOCKED&quot;);&quot;NOT REVIEW ELIGIBLE&quot;;&quot;NOT REVIEW ELIGIBLE&quot;))">
            <text:p>NOT REVIEW ELIGIBLE</text:p>
          </table:table-cell>
          <table:table-cell office:value-type="string" table:formula="of:=IF([.W37]=&quot;NOT REVIEW ELIGIBLE&quot;;&quot;DO NOT BEGIN SETTLEMENT REVIEW — RESOLVE READINESS OR CONTRADICTION CONDITIONS&quot;;IF([.W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7]=&quot;&quot;;&quot;UNKNOWN&quot;;IF([.W37]&lt;&gt;&quot;REVIEW ELIGIBLE — NO AUTHORITY&quot;;&quot;BLOCKED — OUTCOME ASSERTED WITHOUT REVIEW ELIGIBILITY&quot;;IF(OR([.Y37]=&quot;REVIEWED — NO AUTHORITY&quot;;[.Y37]=&quot;REVIEW DEFERRED&quot;;[.Y37]=&quot;REVIEW BLOCKED&quot;);&quot;ACCEPTED INTAKE — NO AUTHORITY&quot;;&quot;BLOCKED — NONCANONICAL OUTCOME&quot;)))">
            <text:p>UNKNOWN</text:p>
          </table:table-cell>
          <table:table-cell office:value-type="string" table:formula="of:=IF([.Z37]=&quot;UNKNOWN&quot;;&quot;NO REVIEW OUTCOME ASSERTED — REMAINS UNKNOWN&quot;;IF([.Z37]=&quot;BLOCKED — OUTCOME ASSERTED WITHOUT REVIEW ELIGIBILITY&quot;;&quot;REMOVE OR CORRECT OUTCOME ASSERTION — REVIEW ELIGIBILITY REQUIRED FIRST&quot;;IF([.Z37]=&quot;BLOCKED — NONCANONICAL OUTCOME&quot;;&quot;CORRECT OUTCOME TO CANONICAL CONTROLLED VOCABULARY&quot;;IF([.Z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7]=&quot;UNKNOWN&quot;;&quot;UNKNOWN&quot;;IF(OR([.Z37]=&quot;BLOCKED — OUTCOME ASSERTED WITHOUT REVIEW ELIGIBILITY&quot;;[.Z37]=&quot;BLOCKED — NONCANONICAL OUTCOME&quot;);&quot;BLOCKED&quot;;IF([.Z3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cell office:value-type="string" table:formula="of:=IF([.U38]=&quot;UNKNOWN&quot;;&quot;COMPLETE OR ASSERT REQUIRED EVIDENCE BEFORE REVIEW&quot;;IF([.U38]=&quot;BLOCKED&quot;;&quot;RESOLVE CONTRADICTION BEFORE REVIEW — NO AUTHORITY CREATED&quot;;IF([.U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8]=&quot;READY FOR REVIEW&quot;;&quot;REVIEW ELIGIBLE — NO AUTHORITY&quot;;IF(OR([.U38]=&quot;UNKNOWN&quot;;[.U38]=&quot;BLOCKED&quot;);&quot;NOT REVIEW ELIGIBLE&quot;;&quot;NOT REVIEW ELIGIBLE&quot;))">
            <text:p>NOT REVIEW ELIGIBLE</text:p>
          </table:table-cell>
          <table:table-cell office:value-type="string" table:formula="of:=IF([.W38]=&quot;NOT REVIEW ELIGIBLE&quot;;&quot;DO NOT BEGIN SETTLEMENT REVIEW — RESOLVE READINESS OR CONTRADICTION CONDITIONS&quot;;IF([.W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8]=&quot;&quot;;&quot;UNKNOWN&quot;;IF([.W38]&lt;&gt;&quot;REVIEW ELIGIBLE — NO AUTHORITY&quot;;&quot;BLOCKED — OUTCOME ASSERTED WITHOUT REVIEW ELIGIBILITY&quot;;IF(OR([.Y38]=&quot;REVIEWED — NO AUTHORITY&quot;;[.Y38]=&quot;REVIEW DEFERRED&quot;;[.Y38]=&quot;REVIEW BLOCKED&quot;);&quot;ACCEPTED INTAKE — NO AUTHORITY&quot;;&quot;BLOCKED — NONCANONICAL OUTCOME&quot;)))">
            <text:p>UNKNOWN</text:p>
          </table:table-cell>
          <table:table-cell office:value-type="string" table:formula="of:=IF([.Z38]=&quot;UNKNOWN&quot;;&quot;NO REVIEW OUTCOME ASSERTED — REMAINS UNKNOWN&quot;;IF([.Z38]=&quot;BLOCKED — OUTCOME ASSERTED WITHOUT REVIEW ELIGIBILITY&quot;;&quot;REMOVE OR CORRECT OUTCOME ASSERTION — REVIEW ELIGIBILITY REQUIRED FIRST&quot;;IF([.Z38]=&quot;BLOCKED — NONCANONICAL OUTCOME&quot;;&quot;CORRECT OUTCOME TO CANONICAL CONTROLLED VOCABULARY&quot;;IF([.Z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8]=&quot;UNKNOWN&quot;;&quot;UNKNOWN&quot;;IF(OR([.Z38]=&quot;BLOCKED — OUTCOME ASSERTED WITHOUT REVIEW ELIGIBILITY&quot;;[.Z38]=&quot;BLOCKED — NONCANONICAL OUTCOME&quot;);&quot;BLOCKED&quot;;IF([.Z3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cell office:value-type="string" table:formula="of:=IF([.U39]=&quot;UNKNOWN&quot;;&quot;COMPLETE OR ASSERT REQUIRED EVIDENCE BEFORE REVIEW&quot;;IF([.U39]=&quot;BLOCKED&quot;;&quot;RESOLVE CONTRADICTION BEFORE REVIEW — NO AUTHORITY CREATED&quot;;IF([.U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9]=&quot;READY FOR REVIEW&quot;;&quot;REVIEW ELIGIBLE — NO AUTHORITY&quot;;IF(OR([.U39]=&quot;UNKNOWN&quot;;[.U39]=&quot;BLOCKED&quot;);&quot;NOT REVIEW ELIGIBLE&quot;;&quot;NOT REVIEW ELIGIBLE&quot;))">
            <text:p>NOT REVIEW ELIGIBLE</text:p>
          </table:table-cell>
          <table:table-cell office:value-type="string" table:formula="of:=IF([.W39]=&quot;NOT REVIEW ELIGIBLE&quot;;&quot;DO NOT BEGIN SETTLEMENT REVIEW — RESOLVE READINESS OR CONTRADICTION CONDITIONS&quot;;IF([.W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9]=&quot;&quot;;&quot;UNKNOWN&quot;;IF([.W39]&lt;&gt;&quot;REVIEW ELIGIBLE — NO AUTHORITY&quot;;&quot;BLOCKED — OUTCOME ASSERTED WITHOUT REVIEW ELIGIBILITY&quot;;IF(OR([.Y39]=&quot;REVIEWED — NO AUTHORITY&quot;;[.Y39]=&quot;REVIEW DEFERRED&quot;;[.Y39]=&quot;REVIEW BLOCKED&quot;);&quot;ACCEPTED INTAKE — NO AUTHORITY&quot;;&quot;BLOCKED — NONCANONICAL OUTCOME&quot;)))">
            <text:p>UNKNOWN</text:p>
          </table:table-cell>
          <table:table-cell office:value-type="string" table:formula="of:=IF([.Z39]=&quot;UNKNOWN&quot;;&quot;NO REVIEW OUTCOME ASSERTED — REMAINS UNKNOWN&quot;;IF([.Z39]=&quot;BLOCKED — OUTCOME ASSERTED WITHOUT REVIEW ELIGIBILITY&quot;;&quot;REMOVE OR CORRECT OUTCOME ASSERTION — REVIEW ELIGIBILITY REQUIRED FIRST&quot;;IF([.Z39]=&quot;BLOCKED — NONCANONICAL OUTCOME&quot;;&quot;CORRECT OUTCOME TO CANONICAL CONTROLLED VOCABULARY&quot;;IF([.Z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39]=&quot;UNKNOWN&quot;;&quot;UNKNOWN&quot;;IF(OR([.Z39]=&quot;BLOCKED — OUTCOME ASSERTED WITHOUT REVIEW ELIGIBILITY&quot;;[.Z39]=&quot;BLOCKED — NONCANONICAL OUTCOME&quot;);&quot;BLOCKED&quot;;IF([.Z3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cell office:value-type="string" table:formula="of:=IF([.U40]=&quot;UNKNOWN&quot;;&quot;COMPLETE OR ASSERT REQUIRED EVIDENCE BEFORE REVIEW&quot;;IF([.U40]=&quot;BLOCKED&quot;;&quot;RESOLVE CONTRADICTION BEFORE REVIEW — NO AUTHORITY CREATED&quot;;IF([.U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0]=&quot;READY FOR REVIEW&quot;;&quot;REVIEW ELIGIBLE — NO AUTHORITY&quot;;IF(OR([.U40]=&quot;UNKNOWN&quot;;[.U40]=&quot;BLOCKED&quot;);&quot;NOT REVIEW ELIGIBLE&quot;;&quot;NOT REVIEW ELIGIBLE&quot;))">
            <text:p>NOT REVIEW ELIGIBLE</text:p>
          </table:table-cell>
          <table:table-cell office:value-type="string" table:formula="of:=IF([.W40]=&quot;NOT REVIEW ELIGIBLE&quot;;&quot;DO NOT BEGIN SETTLEMENT REVIEW — RESOLVE READINESS OR CONTRADICTION CONDITIONS&quot;;IF([.W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0]=&quot;&quot;;&quot;UNKNOWN&quot;;IF([.W40]&lt;&gt;&quot;REVIEW ELIGIBLE — NO AUTHORITY&quot;;&quot;BLOCKED — OUTCOME ASSERTED WITHOUT REVIEW ELIGIBILITY&quot;;IF(OR([.Y40]=&quot;REVIEWED — NO AUTHORITY&quot;;[.Y40]=&quot;REVIEW DEFERRED&quot;;[.Y40]=&quot;REVIEW BLOCKED&quot;);&quot;ACCEPTED INTAKE — NO AUTHORITY&quot;;&quot;BLOCKED — NONCANONICAL OUTCOME&quot;)))">
            <text:p>UNKNOWN</text:p>
          </table:table-cell>
          <table:table-cell office:value-type="string" table:formula="of:=IF([.Z40]=&quot;UNKNOWN&quot;;&quot;NO REVIEW OUTCOME ASSERTED — REMAINS UNKNOWN&quot;;IF([.Z40]=&quot;BLOCKED — OUTCOME ASSERTED WITHOUT REVIEW ELIGIBILITY&quot;;&quot;REMOVE OR CORRECT OUTCOME ASSERTION — REVIEW ELIGIBILITY REQUIRED FIRST&quot;;IF([.Z40]=&quot;BLOCKED — NONCANONICAL OUTCOME&quot;;&quot;CORRECT OUTCOME TO CANONICAL CONTROLLED VOCABULARY&quot;;IF([.Z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0]=&quot;UNKNOWN&quot;;&quot;UNKNOWN&quot;;IF(OR([.Z40]=&quot;BLOCKED — OUTCOME ASSERTED WITHOUT REVIEW ELIGIBILITY&quot;;[.Z40]=&quot;BLOCKED — NONCANONICAL OUTCOME&quot;);&quot;BLOCKED&quot;;IF([.Z4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cell office:value-type="string" table:formula="of:=IF([.U41]=&quot;UNKNOWN&quot;;&quot;COMPLETE OR ASSERT REQUIRED EVIDENCE BEFORE REVIEW&quot;;IF([.U41]=&quot;BLOCKED&quot;;&quot;RESOLVE CONTRADICTION BEFORE REVIEW — NO AUTHORITY CREATED&quot;;IF([.U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1]=&quot;READY FOR REVIEW&quot;;&quot;REVIEW ELIGIBLE — NO AUTHORITY&quot;;IF(OR([.U41]=&quot;UNKNOWN&quot;;[.U41]=&quot;BLOCKED&quot;);&quot;NOT REVIEW ELIGIBLE&quot;;&quot;NOT REVIEW ELIGIBLE&quot;))">
            <text:p>NOT REVIEW ELIGIBLE</text:p>
          </table:table-cell>
          <table:table-cell office:value-type="string" table:formula="of:=IF([.W41]=&quot;NOT REVIEW ELIGIBLE&quot;;&quot;DO NOT BEGIN SETTLEMENT REVIEW — RESOLVE READINESS OR CONTRADICTION CONDITIONS&quot;;IF([.W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1]=&quot;&quot;;&quot;UNKNOWN&quot;;IF([.W41]&lt;&gt;&quot;REVIEW ELIGIBLE — NO AUTHORITY&quot;;&quot;BLOCKED — OUTCOME ASSERTED WITHOUT REVIEW ELIGIBILITY&quot;;IF(OR([.Y41]=&quot;REVIEWED — NO AUTHORITY&quot;;[.Y41]=&quot;REVIEW DEFERRED&quot;;[.Y41]=&quot;REVIEW BLOCKED&quot;);&quot;ACCEPTED INTAKE — NO AUTHORITY&quot;;&quot;BLOCKED — NONCANONICAL OUTCOME&quot;)))">
            <text:p>UNKNOWN</text:p>
          </table:table-cell>
          <table:table-cell office:value-type="string" table:formula="of:=IF([.Z41]=&quot;UNKNOWN&quot;;&quot;NO REVIEW OUTCOME ASSERTED — REMAINS UNKNOWN&quot;;IF([.Z41]=&quot;BLOCKED — OUTCOME ASSERTED WITHOUT REVIEW ELIGIBILITY&quot;;&quot;REMOVE OR CORRECT OUTCOME ASSERTION — REVIEW ELIGIBILITY REQUIRED FIRST&quot;;IF([.Z41]=&quot;BLOCKED — NONCANONICAL OUTCOME&quot;;&quot;CORRECT OUTCOME TO CANONICAL CONTROLLED VOCABULARY&quot;;IF([.Z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1]=&quot;UNKNOWN&quot;;&quot;UNKNOWN&quot;;IF(OR([.Z41]=&quot;BLOCKED — OUTCOME ASSERTED WITHOUT REVIEW ELIGIBILITY&quot;;[.Z41]=&quot;BLOCKED — NONCANONICAL OUTCOME&quot;);&quot;BLOCKED&quot;;IF([.Z4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cell office:value-type="string" table:formula="of:=IF([.U42]=&quot;UNKNOWN&quot;;&quot;COMPLETE OR ASSERT REQUIRED EVIDENCE BEFORE REVIEW&quot;;IF([.U42]=&quot;BLOCKED&quot;;&quot;RESOLVE CONTRADICTION BEFORE REVIEW — NO AUTHORITY CREATED&quot;;IF([.U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2]=&quot;READY FOR REVIEW&quot;;&quot;REVIEW ELIGIBLE — NO AUTHORITY&quot;;IF(OR([.U42]=&quot;UNKNOWN&quot;;[.U42]=&quot;BLOCKED&quot;);&quot;NOT REVIEW ELIGIBLE&quot;;&quot;NOT REVIEW ELIGIBLE&quot;))">
            <text:p>NOT REVIEW ELIGIBLE</text:p>
          </table:table-cell>
          <table:table-cell office:value-type="string" table:formula="of:=IF([.W42]=&quot;NOT REVIEW ELIGIBLE&quot;;&quot;DO NOT BEGIN SETTLEMENT REVIEW — RESOLVE READINESS OR CONTRADICTION CONDITIONS&quot;;IF([.W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2]=&quot;&quot;;&quot;UNKNOWN&quot;;IF([.W42]&lt;&gt;&quot;REVIEW ELIGIBLE — NO AUTHORITY&quot;;&quot;BLOCKED — OUTCOME ASSERTED WITHOUT REVIEW ELIGIBILITY&quot;;IF(OR([.Y42]=&quot;REVIEWED — NO AUTHORITY&quot;;[.Y42]=&quot;REVIEW DEFERRED&quot;;[.Y42]=&quot;REVIEW BLOCKED&quot;);&quot;ACCEPTED INTAKE — NO AUTHORITY&quot;;&quot;BLOCKED — NONCANONICAL OUTCOME&quot;)))">
            <text:p>UNKNOWN</text:p>
          </table:table-cell>
          <table:table-cell office:value-type="string" table:formula="of:=IF([.Z42]=&quot;UNKNOWN&quot;;&quot;NO REVIEW OUTCOME ASSERTED — REMAINS UNKNOWN&quot;;IF([.Z42]=&quot;BLOCKED — OUTCOME ASSERTED WITHOUT REVIEW ELIGIBILITY&quot;;&quot;REMOVE OR CORRECT OUTCOME ASSERTION — REVIEW ELIGIBILITY REQUIRED FIRST&quot;;IF([.Z42]=&quot;BLOCKED — NONCANONICAL OUTCOME&quot;;&quot;CORRECT OUTCOME TO CANONICAL CONTROLLED VOCABULARY&quot;;IF([.Z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2]=&quot;UNKNOWN&quot;;&quot;UNKNOWN&quot;;IF(OR([.Z42]=&quot;BLOCKED — OUTCOME ASSERTED WITHOUT REVIEW ELIGIBILITY&quot;;[.Z42]=&quot;BLOCKED — NONCANONICAL OUTCOME&quot;);&quot;BLOCKED&quot;;IF([.Z4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cell office:value-type="string" table:formula="of:=IF([.U43]=&quot;UNKNOWN&quot;;&quot;COMPLETE OR ASSERT REQUIRED EVIDENCE BEFORE REVIEW&quot;;IF([.U43]=&quot;BLOCKED&quot;;&quot;RESOLVE CONTRADICTION BEFORE REVIEW — NO AUTHORITY CREATED&quot;;IF([.U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3]=&quot;READY FOR REVIEW&quot;;&quot;REVIEW ELIGIBLE — NO AUTHORITY&quot;;IF(OR([.U43]=&quot;UNKNOWN&quot;;[.U43]=&quot;BLOCKED&quot;);&quot;NOT REVIEW ELIGIBLE&quot;;&quot;NOT REVIEW ELIGIBLE&quot;))">
            <text:p>NOT REVIEW ELIGIBLE</text:p>
          </table:table-cell>
          <table:table-cell office:value-type="string" table:formula="of:=IF([.W43]=&quot;NOT REVIEW ELIGIBLE&quot;;&quot;DO NOT BEGIN SETTLEMENT REVIEW — RESOLVE READINESS OR CONTRADICTION CONDITIONS&quot;;IF([.W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3]=&quot;&quot;;&quot;UNKNOWN&quot;;IF([.W43]&lt;&gt;&quot;REVIEW ELIGIBLE — NO AUTHORITY&quot;;&quot;BLOCKED — OUTCOME ASSERTED WITHOUT REVIEW ELIGIBILITY&quot;;IF(OR([.Y43]=&quot;REVIEWED — NO AUTHORITY&quot;;[.Y43]=&quot;REVIEW DEFERRED&quot;;[.Y43]=&quot;REVIEW BLOCKED&quot;);&quot;ACCEPTED INTAKE — NO AUTHORITY&quot;;&quot;BLOCKED — NONCANONICAL OUTCOME&quot;)))">
            <text:p>UNKNOWN</text:p>
          </table:table-cell>
          <table:table-cell office:value-type="string" table:formula="of:=IF([.Z43]=&quot;UNKNOWN&quot;;&quot;NO REVIEW OUTCOME ASSERTED — REMAINS UNKNOWN&quot;;IF([.Z43]=&quot;BLOCKED — OUTCOME ASSERTED WITHOUT REVIEW ELIGIBILITY&quot;;&quot;REMOVE OR CORRECT OUTCOME ASSERTION — REVIEW ELIGIBILITY REQUIRED FIRST&quot;;IF([.Z43]=&quot;BLOCKED — NONCANONICAL OUTCOME&quot;;&quot;CORRECT OUTCOME TO CANONICAL CONTROLLED VOCABULARY&quot;;IF([.Z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3]=&quot;UNKNOWN&quot;;&quot;UNKNOWN&quot;;IF(OR([.Z43]=&quot;BLOCKED — OUTCOME ASSERTED WITHOUT REVIEW ELIGIBILITY&quot;;[.Z43]=&quot;BLOCKED — NONCANONICAL OUTCOME&quot;);&quot;BLOCKED&quot;;IF([.Z4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cell office:value-type="string" table:formula="of:=IF([.U44]=&quot;UNKNOWN&quot;;&quot;COMPLETE OR ASSERT REQUIRED EVIDENCE BEFORE REVIEW&quot;;IF([.U44]=&quot;BLOCKED&quot;;&quot;RESOLVE CONTRADICTION BEFORE REVIEW — NO AUTHORITY CREATED&quot;;IF([.U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4]=&quot;READY FOR REVIEW&quot;;&quot;REVIEW ELIGIBLE — NO AUTHORITY&quot;;IF(OR([.U44]=&quot;UNKNOWN&quot;;[.U44]=&quot;BLOCKED&quot;);&quot;NOT REVIEW ELIGIBLE&quot;;&quot;NOT REVIEW ELIGIBLE&quot;))">
            <text:p>NOT REVIEW ELIGIBLE</text:p>
          </table:table-cell>
          <table:table-cell office:value-type="string" table:formula="of:=IF([.W44]=&quot;NOT REVIEW ELIGIBLE&quot;;&quot;DO NOT BEGIN SETTLEMENT REVIEW — RESOLVE READINESS OR CONTRADICTION CONDITIONS&quot;;IF([.W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4]=&quot;&quot;;&quot;UNKNOWN&quot;;IF([.W44]&lt;&gt;&quot;REVIEW ELIGIBLE — NO AUTHORITY&quot;;&quot;BLOCKED — OUTCOME ASSERTED WITHOUT REVIEW ELIGIBILITY&quot;;IF(OR([.Y44]=&quot;REVIEWED — NO AUTHORITY&quot;;[.Y44]=&quot;REVIEW DEFERRED&quot;;[.Y44]=&quot;REVIEW BLOCKED&quot;);&quot;ACCEPTED INTAKE — NO AUTHORITY&quot;;&quot;BLOCKED — NONCANONICAL OUTCOME&quot;)))">
            <text:p>UNKNOWN</text:p>
          </table:table-cell>
          <table:table-cell office:value-type="string" table:formula="of:=IF([.Z44]=&quot;UNKNOWN&quot;;&quot;NO REVIEW OUTCOME ASSERTED — REMAINS UNKNOWN&quot;;IF([.Z44]=&quot;BLOCKED — OUTCOME ASSERTED WITHOUT REVIEW ELIGIBILITY&quot;;&quot;REMOVE OR CORRECT OUTCOME ASSERTION — REVIEW ELIGIBILITY REQUIRED FIRST&quot;;IF([.Z44]=&quot;BLOCKED — NONCANONICAL OUTCOME&quot;;&quot;CORRECT OUTCOME TO CANONICAL CONTROLLED VOCABULARY&quot;;IF([.Z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4]=&quot;UNKNOWN&quot;;&quot;UNKNOWN&quot;;IF(OR([.Z44]=&quot;BLOCKED — OUTCOME ASSERTED WITHOUT REVIEW ELIGIBILITY&quot;;[.Z44]=&quot;BLOCKED — NONCANONICAL OUTCOME&quot;);&quot;BLOCKED&quot;;IF([.Z4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cell office:value-type="string" table:formula="of:=IF([.U45]=&quot;UNKNOWN&quot;;&quot;COMPLETE OR ASSERT REQUIRED EVIDENCE BEFORE REVIEW&quot;;IF([.U45]=&quot;BLOCKED&quot;;&quot;RESOLVE CONTRADICTION BEFORE REVIEW — NO AUTHORITY CREATED&quot;;IF([.U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5]=&quot;READY FOR REVIEW&quot;;&quot;REVIEW ELIGIBLE — NO AUTHORITY&quot;;IF(OR([.U45]=&quot;UNKNOWN&quot;;[.U45]=&quot;BLOCKED&quot;);&quot;NOT REVIEW ELIGIBLE&quot;;&quot;NOT REVIEW ELIGIBLE&quot;))">
            <text:p>NOT REVIEW ELIGIBLE</text:p>
          </table:table-cell>
          <table:table-cell office:value-type="string" table:formula="of:=IF([.W45]=&quot;NOT REVIEW ELIGIBLE&quot;;&quot;DO NOT BEGIN SETTLEMENT REVIEW — RESOLVE READINESS OR CONTRADICTION CONDITIONS&quot;;IF([.W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5]=&quot;&quot;;&quot;UNKNOWN&quot;;IF([.W45]&lt;&gt;&quot;REVIEW ELIGIBLE — NO AUTHORITY&quot;;&quot;BLOCKED — OUTCOME ASSERTED WITHOUT REVIEW ELIGIBILITY&quot;;IF(OR([.Y45]=&quot;REVIEWED — NO AUTHORITY&quot;;[.Y45]=&quot;REVIEW DEFERRED&quot;;[.Y45]=&quot;REVIEW BLOCKED&quot;);&quot;ACCEPTED INTAKE — NO AUTHORITY&quot;;&quot;BLOCKED — NONCANONICAL OUTCOME&quot;)))">
            <text:p>UNKNOWN</text:p>
          </table:table-cell>
          <table:table-cell office:value-type="string" table:formula="of:=IF([.Z45]=&quot;UNKNOWN&quot;;&quot;NO REVIEW OUTCOME ASSERTED — REMAINS UNKNOWN&quot;;IF([.Z45]=&quot;BLOCKED — OUTCOME ASSERTED WITHOUT REVIEW ELIGIBILITY&quot;;&quot;REMOVE OR CORRECT OUTCOME ASSERTION — REVIEW ELIGIBILITY REQUIRED FIRST&quot;;IF([.Z45]=&quot;BLOCKED — NONCANONICAL OUTCOME&quot;;&quot;CORRECT OUTCOME TO CANONICAL CONTROLLED VOCABULARY&quot;;IF([.Z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5]=&quot;UNKNOWN&quot;;&quot;UNKNOWN&quot;;IF(OR([.Z45]=&quot;BLOCKED — OUTCOME ASSERTED WITHOUT REVIEW ELIGIBILITY&quot;;[.Z45]=&quot;BLOCKED — NONCANONICAL OUTCOME&quot;);&quot;BLOCKED&quot;;IF([.Z4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cell office:value-type="string" table:formula="of:=IF([.U46]=&quot;UNKNOWN&quot;;&quot;COMPLETE OR ASSERT REQUIRED EVIDENCE BEFORE REVIEW&quot;;IF([.U46]=&quot;BLOCKED&quot;;&quot;RESOLVE CONTRADICTION BEFORE REVIEW — NO AUTHORITY CREATED&quot;;IF([.U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6]=&quot;READY FOR REVIEW&quot;;&quot;REVIEW ELIGIBLE — NO AUTHORITY&quot;;IF(OR([.U46]=&quot;UNKNOWN&quot;;[.U46]=&quot;BLOCKED&quot;);&quot;NOT REVIEW ELIGIBLE&quot;;&quot;NOT REVIEW ELIGIBLE&quot;))">
            <text:p>NOT REVIEW ELIGIBLE</text:p>
          </table:table-cell>
          <table:table-cell office:value-type="string" table:formula="of:=IF([.W46]=&quot;NOT REVIEW ELIGIBLE&quot;;&quot;DO NOT BEGIN SETTLEMENT REVIEW — RESOLVE READINESS OR CONTRADICTION CONDITIONS&quot;;IF([.W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6]=&quot;&quot;;&quot;UNKNOWN&quot;;IF([.W46]&lt;&gt;&quot;REVIEW ELIGIBLE — NO AUTHORITY&quot;;&quot;BLOCKED — OUTCOME ASSERTED WITHOUT REVIEW ELIGIBILITY&quot;;IF(OR([.Y46]=&quot;REVIEWED — NO AUTHORITY&quot;;[.Y46]=&quot;REVIEW DEFERRED&quot;;[.Y46]=&quot;REVIEW BLOCKED&quot;);&quot;ACCEPTED INTAKE — NO AUTHORITY&quot;;&quot;BLOCKED — NONCANONICAL OUTCOME&quot;)))">
            <text:p>UNKNOWN</text:p>
          </table:table-cell>
          <table:table-cell office:value-type="string" table:formula="of:=IF([.Z46]=&quot;UNKNOWN&quot;;&quot;NO REVIEW OUTCOME ASSERTED — REMAINS UNKNOWN&quot;;IF([.Z46]=&quot;BLOCKED — OUTCOME ASSERTED WITHOUT REVIEW ELIGIBILITY&quot;;&quot;REMOVE OR CORRECT OUTCOME ASSERTION — REVIEW ELIGIBILITY REQUIRED FIRST&quot;;IF([.Z46]=&quot;BLOCKED — NONCANONICAL OUTCOME&quot;;&quot;CORRECT OUTCOME TO CANONICAL CONTROLLED VOCABULARY&quot;;IF([.Z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6]=&quot;UNKNOWN&quot;;&quot;UNKNOWN&quot;;IF(OR([.Z46]=&quot;BLOCKED — OUTCOME ASSERTED WITHOUT REVIEW ELIGIBILITY&quot;;[.Z46]=&quot;BLOCKED — NONCANONICAL OUTCOME&quot;);&quot;BLOCKED&quot;;IF([.Z4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cell office:value-type="string" table:formula="of:=IF([.U47]=&quot;UNKNOWN&quot;;&quot;COMPLETE OR ASSERT REQUIRED EVIDENCE BEFORE REVIEW&quot;;IF([.U47]=&quot;BLOCKED&quot;;&quot;RESOLVE CONTRADICTION BEFORE REVIEW — NO AUTHORITY CREATED&quot;;IF([.U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7]=&quot;READY FOR REVIEW&quot;;&quot;REVIEW ELIGIBLE — NO AUTHORITY&quot;;IF(OR([.U47]=&quot;UNKNOWN&quot;;[.U47]=&quot;BLOCKED&quot;);&quot;NOT REVIEW ELIGIBLE&quot;;&quot;NOT REVIEW ELIGIBLE&quot;))">
            <text:p>NOT REVIEW ELIGIBLE</text:p>
          </table:table-cell>
          <table:table-cell office:value-type="string" table:formula="of:=IF([.W47]=&quot;NOT REVIEW ELIGIBLE&quot;;&quot;DO NOT BEGIN SETTLEMENT REVIEW — RESOLVE READINESS OR CONTRADICTION CONDITIONS&quot;;IF([.W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7]=&quot;&quot;;&quot;UNKNOWN&quot;;IF([.W47]&lt;&gt;&quot;REVIEW ELIGIBLE — NO AUTHORITY&quot;;&quot;BLOCKED — OUTCOME ASSERTED WITHOUT REVIEW ELIGIBILITY&quot;;IF(OR([.Y47]=&quot;REVIEWED — NO AUTHORITY&quot;;[.Y47]=&quot;REVIEW DEFERRED&quot;;[.Y47]=&quot;REVIEW BLOCKED&quot;);&quot;ACCEPTED INTAKE — NO AUTHORITY&quot;;&quot;BLOCKED — NONCANONICAL OUTCOME&quot;)))">
            <text:p>UNKNOWN</text:p>
          </table:table-cell>
          <table:table-cell office:value-type="string" table:formula="of:=IF([.Z47]=&quot;UNKNOWN&quot;;&quot;NO REVIEW OUTCOME ASSERTED — REMAINS UNKNOWN&quot;;IF([.Z47]=&quot;BLOCKED — OUTCOME ASSERTED WITHOUT REVIEW ELIGIBILITY&quot;;&quot;REMOVE OR CORRECT OUTCOME ASSERTION — REVIEW ELIGIBILITY REQUIRED FIRST&quot;;IF([.Z47]=&quot;BLOCKED — NONCANONICAL OUTCOME&quot;;&quot;CORRECT OUTCOME TO CANONICAL CONTROLLED VOCABULARY&quot;;IF([.Z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7]=&quot;UNKNOWN&quot;;&quot;UNKNOWN&quot;;IF(OR([.Z47]=&quot;BLOCKED — OUTCOME ASSERTED WITHOUT REVIEW ELIGIBILITY&quot;;[.Z47]=&quot;BLOCKED — NONCANONICAL OUTCOME&quot;);&quot;BLOCKED&quot;;IF([.Z4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cell office:value-type="string" table:formula="of:=IF([.U48]=&quot;UNKNOWN&quot;;&quot;COMPLETE OR ASSERT REQUIRED EVIDENCE BEFORE REVIEW&quot;;IF([.U48]=&quot;BLOCKED&quot;;&quot;RESOLVE CONTRADICTION BEFORE REVIEW — NO AUTHORITY CREATED&quot;;IF([.U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8]=&quot;READY FOR REVIEW&quot;;&quot;REVIEW ELIGIBLE — NO AUTHORITY&quot;;IF(OR([.U48]=&quot;UNKNOWN&quot;;[.U48]=&quot;BLOCKED&quot;);&quot;NOT REVIEW ELIGIBLE&quot;;&quot;NOT REVIEW ELIGIBLE&quot;))">
            <text:p>NOT REVIEW ELIGIBLE</text:p>
          </table:table-cell>
          <table:table-cell office:value-type="string" table:formula="of:=IF([.W48]=&quot;NOT REVIEW ELIGIBLE&quot;;&quot;DO NOT BEGIN SETTLEMENT REVIEW — RESOLVE READINESS OR CONTRADICTION CONDITIONS&quot;;IF([.W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8]=&quot;&quot;;&quot;UNKNOWN&quot;;IF([.W48]&lt;&gt;&quot;REVIEW ELIGIBLE — NO AUTHORITY&quot;;&quot;BLOCKED — OUTCOME ASSERTED WITHOUT REVIEW ELIGIBILITY&quot;;IF(OR([.Y48]=&quot;REVIEWED — NO AUTHORITY&quot;;[.Y48]=&quot;REVIEW DEFERRED&quot;;[.Y48]=&quot;REVIEW BLOCKED&quot;);&quot;ACCEPTED INTAKE — NO AUTHORITY&quot;;&quot;BLOCKED — NONCANONICAL OUTCOME&quot;)))">
            <text:p>UNKNOWN</text:p>
          </table:table-cell>
          <table:table-cell office:value-type="string" table:formula="of:=IF([.Z48]=&quot;UNKNOWN&quot;;&quot;NO REVIEW OUTCOME ASSERTED — REMAINS UNKNOWN&quot;;IF([.Z48]=&quot;BLOCKED — OUTCOME ASSERTED WITHOUT REVIEW ELIGIBILITY&quot;;&quot;REMOVE OR CORRECT OUTCOME ASSERTION — REVIEW ELIGIBILITY REQUIRED FIRST&quot;;IF([.Z48]=&quot;BLOCKED — NONCANONICAL OUTCOME&quot;;&quot;CORRECT OUTCOME TO CANONICAL CONTROLLED VOCABULARY&quot;;IF([.Z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8]=&quot;UNKNOWN&quot;;&quot;UNKNOWN&quot;;IF(OR([.Z48]=&quot;BLOCKED — OUTCOME ASSERTED WITHOUT REVIEW ELIGIBILITY&quot;;[.Z48]=&quot;BLOCKED — NONCANONICAL OUTCOME&quot;);&quot;BLOCKED&quot;;IF([.Z4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cell office:value-type="string" table:formula="of:=IF([.U49]=&quot;UNKNOWN&quot;;&quot;COMPLETE OR ASSERT REQUIRED EVIDENCE BEFORE REVIEW&quot;;IF([.U49]=&quot;BLOCKED&quot;;&quot;RESOLVE CONTRADICTION BEFORE REVIEW — NO AUTHORITY CREATED&quot;;IF([.U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9]=&quot;READY FOR REVIEW&quot;;&quot;REVIEW ELIGIBLE — NO AUTHORITY&quot;;IF(OR([.U49]=&quot;UNKNOWN&quot;;[.U49]=&quot;BLOCKED&quot;);&quot;NOT REVIEW ELIGIBLE&quot;;&quot;NOT REVIEW ELIGIBLE&quot;))">
            <text:p>NOT REVIEW ELIGIBLE</text:p>
          </table:table-cell>
          <table:table-cell office:value-type="string" table:formula="of:=IF([.W49]=&quot;NOT REVIEW ELIGIBLE&quot;;&quot;DO NOT BEGIN SETTLEMENT REVIEW — RESOLVE READINESS OR CONTRADICTION CONDITIONS&quot;;IF([.W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9]=&quot;&quot;;&quot;UNKNOWN&quot;;IF([.W49]&lt;&gt;&quot;REVIEW ELIGIBLE — NO AUTHORITY&quot;;&quot;BLOCKED — OUTCOME ASSERTED WITHOUT REVIEW ELIGIBILITY&quot;;IF(OR([.Y49]=&quot;REVIEWED — NO AUTHORITY&quot;;[.Y49]=&quot;REVIEW DEFERRED&quot;;[.Y49]=&quot;REVIEW BLOCKED&quot;);&quot;ACCEPTED INTAKE — NO AUTHORITY&quot;;&quot;BLOCKED — NONCANONICAL OUTCOME&quot;)))">
            <text:p>UNKNOWN</text:p>
          </table:table-cell>
          <table:table-cell office:value-type="string" table:formula="of:=IF([.Z49]=&quot;UNKNOWN&quot;;&quot;NO REVIEW OUTCOME ASSERTED — REMAINS UNKNOWN&quot;;IF([.Z49]=&quot;BLOCKED — OUTCOME ASSERTED WITHOUT REVIEW ELIGIBILITY&quot;;&quot;REMOVE OR CORRECT OUTCOME ASSERTION — REVIEW ELIGIBILITY REQUIRED FIRST&quot;;IF([.Z49]=&quot;BLOCKED — NONCANONICAL OUTCOME&quot;;&quot;CORRECT OUTCOME TO CANONICAL CONTROLLED VOCABULARY&quot;;IF([.Z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49]=&quot;UNKNOWN&quot;;&quot;UNKNOWN&quot;;IF(OR([.Z49]=&quot;BLOCKED — OUTCOME ASSERTED WITHOUT REVIEW ELIGIBILITY&quot;;[.Z49]=&quot;BLOCKED — NONCANONICAL OUTCOME&quot;);&quot;BLOCKED&quot;;IF([.Z4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cell office:value-type="string" table:formula="of:=IF([.U50]=&quot;UNKNOWN&quot;;&quot;COMPLETE OR ASSERT REQUIRED EVIDENCE BEFORE REVIEW&quot;;IF([.U50]=&quot;BLOCKED&quot;;&quot;RESOLVE CONTRADICTION BEFORE REVIEW — NO AUTHORITY CREATED&quot;;IF([.U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0]=&quot;READY FOR REVIEW&quot;;&quot;REVIEW ELIGIBLE — NO AUTHORITY&quot;;IF(OR([.U50]=&quot;UNKNOWN&quot;;[.U50]=&quot;BLOCKED&quot;);&quot;NOT REVIEW ELIGIBLE&quot;;&quot;NOT REVIEW ELIGIBLE&quot;))">
            <text:p>NOT REVIEW ELIGIBLE</text:p>
          </table:table-cell>
          <table:table-cell office:value-type="string" table:formula="of:=IF([.W50]=&quot;NOT REVIEW ELIGIBLE&quot;;&quot;DO NOT BEGIN SETTLEMENT REVIEW — RESOLVE READINESS OR CONTRADICTION CONDITIONS&quot;;IF([.W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0]=&quot;&quot;;&quot;UNKNOWN&quot;;IF([.W50]&lt;&gt;&quot;REVIEW ELIGIBLE — NO AUTHORITY&quot;;&quot;BLOCKED — OUTCOME ASSERTED WITHOUT REVIEW ELIGIBILITY&quot;;IF(OR([.Y50]=&quot;REVIEWED — NO AUTHORITY&quot;;[.Y50]=&quot;REVIEW DEFERRED&quot;;[.Y50]=&quot;REVIEW BLOCKED&quot;);&quot;ACCEPTED INTAKE — NO AUTHORITY&quot;;&quot;BLOCKED — NONCANONICAL OUTCOME&quot;)))">
            <text:p>UNKNOWN</text:p>
          </table:table-cell>
          <table:table-cell office:value-type="string" table:formula="of:=IF([.Z50]=&quot;UNKNOWN&quot;;&quot;NO REVIEW OUTCOME ASSERTED — REMAINS UNKNOWN&quot;;IF([.Z50]=&quot;BLOCKED — OUTCOME ASSERTED WITHOUT REVIEW ELIGIBILITY&quot;;&quot;REMOVE OR CORRECT OUTCOME ASSERTION — REVIEW ELIGIBILITY REQUIRED FIRST&quot;;IF([.Z50]=&quot;BLOCKED — NONCANONICAL OUTCOME&quot;;&quot;CORRECT OUTCOME TO CANONICAL CONTROLLED VOCABULARY&quot;;IF([.Z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0]=&quot;UNKNOWN&quot;;&quot;UNKNOWN&quot;;IF(OR([.Z50]=&quot;BLOCKED — OUTCOME ASSERTED WITHOUT REVIEW ELIGIBILITY&quot;;[.Z50]=&quot;BLOCKED — NONCANONICAL OUTCOME&quot;);&quot;BLOCKED&quot;;IF([.Z5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cell office:value-type="string" table:formula="of:=IF([.U51]=&quot;UNKNOWN&quot;;&quot;COMPLETE OR ASSERT REQUIRED EVIDENCE BEFORE REVIEW&quot;;IF([.U51]=&quot;BLOCKED&quot;;&quot;RESOLVE CONTRADICTION BEFORE REVIEW — NO AUTHORITY CREATED&quot;;IF([.U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1]=&quot;READY FOR REVIEW&quot;;&quot;REVIEW ELIGIBLE — NO AUTHORITY&quot;;IF(OR([.U51]=&quot;UNKNOWN&quot;;[.U51]=&quot;BLOCKED&quot;);&quot;NOT REVIEW ELIGIBLE&quot;;&quot;NOT REVIEW ELIGIBLE&quot;))">
            <text:p>NOT REVIEW ELIGIBLE</text:p>
          </table:table-cell>
          <table:table-cell office:value-type="string" table:formula="of:=IF([.W51]=&quot;NOT REVIEW ELIGIBLE&quot;;&quot;DO NOT BEGIN SETTLEMENT REVIEW — RESOLVE READINESS OR CONTRADICTION CONDITIONS&quot;;IF([.W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1]=&quot;&quot;;&quot;UNKNOWN&quot;;IF([.W51]&lt;&gt;&quot;REVIEW ELIGIBLE — NO AUTHORITY&quot;;&quot;BLOCKED — OUTCOME ASSERTED WITHOUT REVIEW ELIGIBILITY&quot;;IF(OR([.Y51]=&quot;REVIEWED — NO AUTHORITY&quot;;[.Y51]=&quot;REVIEW DEFERRED&quot;;[.Y51]=&quot;REVIEW BLOCKED&quot;);&quot;ACCEPTED INTAKE — NO AUTHORITY&quot;;&quot;BLOCKED — NONCANONICAL OUTCOME&quot;)))">
            <text:p>UNKNOWN</text:p>
          </table:table-cell>
          <table:table-cell office:value-type="string" table:formula="of:=IF([.Z51]=&quot;UNKNOWN&quot;;&quot;NO REVIEW OUTCOME ASSERTED — REMAINS UNKNOWN&quot;;IF([.Z51]=&quot;BLOCKED — OUTCOME ASSERTED WITHOUT REVIEW ELIGIBILITY&quot;;&quot;REMOVE OR CORRECT OUTCOME ASSERTION — REVIEW ELIGIBILITY REQUIRED FIRST&quot;;IF([.Z51]=&quot;BLOCKED — NONCANONICAL OUTCOME&quot;;&quot;CORRECT OUTCOME TO CANONICAL CONTROLLED VOCABULARY&quot;;IF([.Z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1]=&quot;UNKNOWN&quot;;&quot;UNKNOWN&quot;;IF(OR([.Z51]=&quot;BLOCKED — OUTCOME ASSERTED WITHOUT REVIEW ELIGIBILITY&quot;;[.Z51]=&quot;BLOCKED — NONCANONICAL OUTCOME&quot;);&quot;BLOCKED&quot;;IF([.Z5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cell office:value-type="string" table:formula="of:=IF([.U52]=&quot;UNKNOWN&quot;;&quot;COMPLETE OR ASSERT REQUIRED EVIDENCE BEFORE REVIEW&quot;;IF([.U52]=&quot;BLOCKED&quot;;&quot;RESOLVE CONTRADICTION BEFORE REVIEW — NO AUTHORITY CREATED&quot;;IF([.U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2]=&quot;READY FOR REVIEW&quot;;&quot;REVIEW ELIGIBLE — NO AUTHORITY&quot;;IF(OR([.U52]=&quot;UNKNOWN&quot;;[.U52]=&quot;BLOCKED&quot;);&quot;NOT REVIEW ELIGIBLE&quot;;&quot;NOT REVIEW ELIGIBLE&quot;))">
            <text:p>NOT REVIEW ELIGIBLE</text:p>
          </table:table-cell>
          <table:table-cell office:value-type="string" table:formula="of:=IF([.W52]=&quot;NOT REVIEW ELIGIBLE&quot;;&quot;DO NOT BEGIN SETTLEMENT REVIEW — RESOLVE READINESS OR CONTRADICTION CONDITIONS&quot;;IF([.W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2]=&quot;&quot;;&quot;UNKNOWN&quot;;IF([.W52]&lt;&gt;&quot;REVIEW ELIGIBLE — NO AUTHORITY&quot;;&quot;BLOCKED — OUTCOME ASSERTED WITHOUT REVIEW ELIGIBILITY&quot;;IF(OR([.Y52]=&quot;REVIEWED — NO AUTHORITY&quot;;[.Y52]=&quot;REVIEW DEFERRED&quot;;[.Y52]=&quot;REVIEW BLOCKED&quot;);&quot;ACCEPTED INTAKE — NO AUTHORITY&quot;;&quot;BLOCKED — NONCANONICAL OUTCOME&quot;)))">
            <text:p>UNKNOWN</text:p>
          </table:table-cell>
          <table:table-cell office:value-type="string" table:formula="of:=IF([.Z52]=&quot;UNKNOWN&quot;;&quot;NO REVIEW OUTCOME ASSERTED — REMAINS UNKNOWN&quot;;IF([.Z52]=&quot;BLOCKED — OUTCOME ASSERTED WITHOUT REVIEW ELIGIBILITY&quot;;&quot;REMOVE OR CORRECT OUTCOME ASSERTION — REVIEW ELIGIBILITY REQUIRED FIRST&quot;;IF([.Z52]=&quot;BLOCKED — NONCANONICAL OUTCOME&quot;;&quot;CORRECT OUTCOME TO CANONICAL CONTROLLED VOCABULARY&quot;;IF([.Z5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2]=&quot;UNKNOWN&quot;;&quot;UNKNOWN&quot;;IF(OR([.Z52]=&quot;BLOCKED — OUTCOME ASSERTED WITHOUT REVIEW ELIGIBILITY&quot;;[.Z52]=&quot;BLOCKED — NONCANONICAL OUTCOME&quot;);&quot;BLOCKED&quot;;IF([.Z5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cell office:value-type="string" table:formula="of:=IF([.U53]=&quot;UNKNOWN&quot;;&quot;COMPLETE OR ASSERT REQUIRED EVIDENCE BEFORE REVIEW&quot;;IF([.U53]=&quot;BLOCKED&quot;;&quot;RESOLVE CONTRADICTION BEFORE REVIEW — NO AUTHORITY CREATED&quot;;IF([.U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3]=&quot;READY FOR REVIEW&quot;;&quot;REVIEW ELIGIBLE — NO AUTHORITY&quot;;IF(OR([.U53]=&quot;UNKNOWN&quot;;[.U53]=&quot;BLOCKED&quot;);&quot;NOT REVIEW ELIGIBLE&quot;;&quot;NOT REVIEW ELIGIBLE&quot;))">
            <text:p>NOT REVIEW ELIGIBLE</text:p>
          </table:table-cell>
          <table:table-cell office:value-type="string" table:formula="of:=IF([.W53]=&quot;NOT REVIEW ELIGIBLE&quot;;&quot;DO NOT BEGIN SETTLEMENT REVIEW — RESOLVE READINESS OR CONTRADICTION CONDITIONS&quot;;IF([.W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3]=&quot;&quot;;&quot;UNKNOWN&quot;;IF([.W53]&lt;&gt;&quot;REVIEW ELIGIBLE — NO AUTHORITY&quot;;&quot;BLOCKED — OUTCOME ASSERTED WITHOUT REVIEW ELIGIBILITY&quot;;IF(OR([.Y53]=&quot;REVIEWED — NO AUTHORITY&quot;;[.Y53]=&quot;REVIEW DEFERRED&quot;;[.Y53]=&quot;REVIEW BLOCKED&quot;);&quot;ACCEPTED INTAKE — NO AUTHORITY&quot;;&quot;BLOCKED — NONCANONICAL OUTCOME&quot;)))">
            <text:p>UNKNOWN</text:p>
          </table:table-cell>
          <table:table-cell office:value-type="string" table:formula="of:=IF([.Z53]=&quot;UNKNOWN&quot;;&quot;NO REVIEW OUTCOME ASSERTED — REMAINS UNKNOWN&quot;;IF([.Z53]=&quot;BLOCKED — OUTCOME ASSERTED WITHOUT REVIEW ELIGIBILITY&quot;;&quot;REMOVE OR CORRECT OUTCOME ASSERTION — REVIEW ELIGIBILITY REQUIRED FIRST&quot;;IF([.Z53]=&quot;BLOCKED — NONCANONICAL OUTCOME&quot;;&quot;CORRECT OUTCOME TO CANONICAL CONTROLLED VOCABULARY&quot;;IF([.Z5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3]=&quot;UNKNOWN&quot;;&quot;UNKNOWN&quot;;IF(OR([.Z53]=&quot;BLOCKED — OUTCOME ASSERTED WITHOUT REVIEW ELIGIBILITY&quot;;[.Z53]=&quot;BLOCKED — NONCANONICAL OUTCOME&quot;);&quot;BLOCKED&quot;;IF([.Z5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cell office:value-type="string" table:formula="of:=IF([.U54]=&quot;UNKNOWN&quot;;&quot;COMPLETE OR ASSERT REQUIRED EVIDENCE BEFORE REVIEW&quot;;IF([.U54]=&quot;BLOCKED&quot;;&quot;RESOLVE CONTRADICTION BEFORE REVIEW — NO AUTHORITY CREATED&quot;;IF([.U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4]=&quot;READY FOR REVIEW&quot;;&quot;REVIEW ELIGIBLE — NO AUTHORITY&quot;;IF(OR([.U54]=&quot;UNKNOWN&quot;;[.U54]=&quot;BLOCKED&quot;);&quot;NOT REVIEW ELIGIBLE&quot;;&quot;NOT REVIEW ELIGIBLE&quot;))">
            <text:p>NOT REVIEW ELIGIBLE</text:p>
          </table:table-cell>
          <table:table-cell office:value-type="string" table:formula="of:=IF([.W54]=&quot;NOT REVIEW ELIGIBLE&quot;;&quot;DO NOT BEGIN SETTLEMENT REVIEW — RESOLVE READINESS OR CONTRADICTION CONDITIONS&quot;;IF([.W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4]=&quot;&quot;;&quot;UNKNOWN&quot;;IF([.W54]&lt;&gt;&quot;REVIEW ELIGIBLE — NO AUTHORITY&quot;;&quot;BLOCKED — OUTCOME ASSERTED WITHOUT REVIEW ELIGIBILITY&quot;;IF(OR([.Y54]=&quot;REVIEWED — NO AUTHORITY&quot;;[.Y54]=&quot;REVIEW DEFERRED&quot;;[.Y54]=&quot;REVIEW BLOCKED&quot;);&quot;ACCEPTED INTAKE — NO AUTHORITY&quot;;&quot;BLOCKED — NONCANONICAL OUTCOME&quot;)))">
            <text:p>UNKNOWN</text:p>
          </table:table-cell>
          <table:table-cell office:value-type="string" table:formula="of:=IF([.Z54]=&quot;UNKNOWN&quot;;&quot;NO REVIEW OUTCOME ASSERTED — REMAINS UNKNOWN&quot;;IF([.Z54]=&quot;BLOCKED — OUTCOME ASSERTED WITHOUT REVIEW ELIGIBILITY&quot;;&quot;REMOVE OR CORRECT OUTCOME ASSERTION — REVIEW ELIGIBILITY REQUIRED FIRST&quot;;IF([.Z54]=&quot;BLOCKED — NONCANONICAL OUTCOME&quot;;&quot;CORRECT OUTCOME TO CANONICAL CONTROLLED VOCABULARY&quot;;IF([.Z5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4]=&quot;UNKNOWN&quot;;&quot;UNKNOWN&quot;;IF(OR([.Z54]=&quot;BLOCKED — OUTCOME ASSERTED WITHOUT REVIEW ELIGIBILITY&quot;;[.Z54]=&quot;BLOCKED — NONCANONICAL OUTCOME&quot;);&quot;BLOCKED&quot;;IF([.Z5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cell office:value-type="string" table:formula="of:=IF([.U55]=&quot;UNKNOWN&quot;;&quot;COMPLETE OR ASSERT REQUIRED EVIDENCE BEFORE REVIEW&quot;;IF([.U55]=&quot;BLOCKED&quot;;&quot;RESOLVE CONTRADICTION BEFORE REVIEW — NO AUTHORITY CREATED&quot;;IF([.U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5]=&quot;READY FOR REVIEW&quot;;&quot;REVIEW ELIGIBLE — NO AUTHORITY&quot;;IF(OR([.U55]=&quot;UNKNOWN&quot;;[.U55]=&quot;BLOCKED&quot;);&quot;NOT REVIEW ELIGIBLE&quot;;&quot;NOT REVIEW ELIGIBLE&quot;))">
            <text:p>NOT REVIEW ELIGIBLE</text:p>
          </table:table-cell>
          <table:table-cell office:value-type="string" table:formula="of:=IF([.W55]=&quot;NOT REVIEW ELIGIBLE&quot;;&quot;DO NOT BEGIN SETTLEMENT REVIEW — RESOLVE READINESS OR CONTRADICTION CONDITIONS&quot;;IF([.W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5]=&quot;&quot;;&quot;UNKNOWN&quot;;IF([.W55]&lt;&gt;&quot;REVIEW ELIGIBLE — NO AUTHORITY&quot;;&quot;BLOCKED — OUTCOME ASSERTED WITHOUT REVIEW ELIGIBILITY&quot;;IF(OR([.Y55]=&quot;REVIEWED — NO AUTHORITY&quot;;[.Y55]=&quot;REVIEW DEFERRED&quot;;[.Y55]=&quot;REVIEW BLOCKED&quot;);&quot;ACCEPTED INTAKE — NO AUTHORITY&quot;;&quot;BLOCKED — NONCANONICAL OUTCOME&quot;)))">
            <text:p>UNKNOWN</text:p>
          </table:table-cell>
          <table:table-cell office:value-type="string" table:formula="of:=IF([.Z55]=&quot;UNKNOWN&quot;;&quot;NO REVIEW OUTCOME ASSERTED — REMAINS UNKNOWN&quot;;IF([.Z55]=&quot;BLOCKED — OUTCOME ASSERTED WITHOUT REVIEW ELIGIBILITY&quot;;&quot;REMOVE OR CORRECT OUTCOME ASSERTION — REVIEW ELIGIBILITY REQUIRED FIRST&quot;;IF([.Z55]=&quot;BLOCKED — NONCANONICAL OUTCOME&quot;;&quot;CORRECT OUTCOME TO CANONICAL CONTROLLED VOCABULARY&quot;;IF([.Z5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5]=&quot;UNKNOWN&quot;;&quot;UNKNOWN&quot;;IF(OR([.Z55]=&quot;BLOCKED — OUTCOME ASSERTED WITHOUT REVIEW ELIGIBILITY&quot;;[.Z55]=&quot;BLOCKED — NONCANONICAL OUTCOME&quot;);&quot;BLOCKED&quot;;IF([.Z5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cell office:value-type="string" table:formula="of:=IF([.U56]=&quot;UNKNOWN&quot;;&quot;COMPLETE OR ASSERT REQUIRED EVIDENCE BEFORE REVIEW&quot;;IF([.U56]=&quot;BLOCKED&quot;;&quot;RESOLVE CONTRADICTION BEFORE REVIEW — NO AUTHORITY CREATED&quot;;IF([.U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6]=&quot;READY FOR REVIEW&quot;;&quot;REVIEW ELIGIBLE — NO AUTHORITY&quot;;IF(OR([.U56]=&quot;UNKNOWN&quot;;[.U56]=&quot;BLOCKED&quot;);&quot;NOT REVIEW ELIGIBLE&quot;;&quot;NOT REVIEW ELIGIBLE&quot;))">
            <text:p>NOT REVIEW ELIGIBLE</text:p>
          </table:table-cell>
          <table:table-cell office:value-type="string" table:formula="of:=IF([.W56]=&quot;NOT REVIEW ELIGIBLE&quot;;&quot;DO NOT BEGIN SETTLEMENT REVIEW — RESOLVE READINESS OR CONTRADICTION CONDITIONS&quot;;IF([.W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6]=&quot;&quot;;&quot;UNKNOWN&quot;;IF([.W56]&lt;&gt;&quot;REVIEW ELIGIBLE — NO AUTHORITY&quot;;&quot;BLOCKED — OUTCOME ASSERTED WITHOUT REVIEW ELIGIBILITY&quot;;IF(OR([.Y56]=&quot;REVIEWED — NO AUTHORITY&quot;;[.Y56]=&quot;REVIEW DEFERRED&quot;;[.Y56]=&quot;REVIEW BLOCKED&quot;);&quot;ACCEPTED INTAKE — NO AUTHORITY&quot;;&quot;BLOCKED — NONCANONICAL OUTCOME&quot;)))">
            <text:p>UNKNOWN</text:p>
          </table:table-cell>
          <table:table-cell office:value-type="string" table:formula="of:=IF([.Z56]=&quot;UNKNOWN&quot;;&quot;NO REVIEW OUTCOME ASSERTED — REMAINS UNKNOWN&quot;;IF([.Z56]=&quot;BLOCKED — OUTCOME ASSERTED WITHOUT REVIEW ELIGIBILITY&quot;;&quot;REMOVE OR CORRECT OUTCOME ASSERTION — REVIEW ELIGIBILITY REQUIRED FIRST&quot;;IF([.Z56]=&quot;BLOCKED — NONCANONICAL OUTCOME&quot;;&quot;CORRECT OUTCOME TO CANONICAL CONTROLLED VOCABULARY&quot;;IF([.Z5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6]=&quot;UNKNOWN&quot;;&quot;UNKNOWN&quot;;IF(OR([.Z56]=&quot;BLOCKED — OUTCOME ASSERTED WITHOUT REVIEW ELIGIBILITY&quot;;[.Z56]=&quot;BLOCKED — NONCANONICAL OUTCOME&quot;);&quot;BLOCKED&quot;;IF([.Z5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cell office:value-type="string" table:formula="of:=IF([.U57]=&quot;UNKNOWN&quot;;&quot;COMPLETE OR ASSERT REQUIRED EVIDENCE BEFORE REVIEW&quot;;IF([.U57]=&quot;BLOCKED&quot;;&quot;RESOLVE CONTRADICTION BEFORE REVIEW — NO AUTHORITY CREATED&quot;;IF([.U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7]=&quot;READY FOR REVIEW&quot;;&quot;REVIEW ELIGIBLE — NO AUTHORITY&quot;;IF(OR([.U57]=&quot;UNKNOWN&quot;;[.U57]=&quot;BLOCKED&quot;);&quot;NOT REVIEW ELIGIBLE&quot;;&quot;NOT REVIEW ELIGIBLE&quot;))">
            <text:p>NOT REVIEW ELIGIBLE</text:p>
          </table:table-cell>
          <table:table-cell office:value-type="string" table:formula="of:=IF([.W57]=&quot;NOT REVIEW ELIGIBLE&quot;;&quot;DO NOT BEGIN SETTLEMENT REVIEW — RESOLVE READINESS OR CONTRADICTION CONDITIONS&quot;;IF([.W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7]=&quot;&quot;;&quot;UNKNOWN&quot;;IF([.W57]&lt;&gt;&quot;REVIEW ELIGIBLE — NO AUTHORITY&quot;;&quot;BLOCKED — OUTCOME ASSERTED WITHOUT REVIEW ELIGIBILITY&quot;;IF(OR([.Y57]=&quot;REVIEWED — NO AUTHORITY&quot;;[.Y57]=&quot;REVIEW DEFERRED&quot;;[.Y57]=&quot;REVIEW BLOCKED&quot;);&quot;ACCEPTED INTAKE — NO AUTHORITY&quot;;&quot;BLOCKED — NONCANONICAL OUTCOME&quot;)))">
            <text:p>UNKNOWN</text:p>
          </table:table-cell>
          <table:table-cell office:value-type="string" table:formula="of:=IF([.Z57]=&quot;UNKNOWN&quot;;&quot;NO REVIEW OUTCOME ASSERTED — REMAINS UNKNOWN&quot;;IF([.Z57]=&quot;BLOCKED — OUTCOME ASSERTED WITHOUT REVIEW ELIGIBILITY&quot;;&quot;REMOVE OR CORRECT OUTCOME ASSERTION — REVIEW ELIGIBILITY REQUIRED FIRST&quot;;IF([.Z57]=&quot;BLOCKED — NONCANONICAL OUTCOME&quot;;&quot;CORRECT OUTCOME TO CANONICAL CONTROLLED VOCABULARY&quot;;IF([.Z5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7]=&quot;UNKNOWN&quot;;&quot;UNKNOWN&quot;;IF(OR([.Z57]=&quot;BLOCKED — OUTCOME ASSERTED WITHOUT REVIEW ELIGIBILITY&quot;;[.Z57]=&quot;BLOCKED — NONCANONICAL OUTCOME&quot;);&quot;BLOCKED&quot;;IF([.Z5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cell office:value-type="string" table:formula="of:=IF([.U58]=&quot;UNKNOWN&quot;;&quot;COMPLETE OR ASSERT REQUIRED EVIDENCE BEFORE REVIEW&quot;;IF([.U58]=&quot;BLOCKED&quot;;&quot;RESOLVE CONTRADICTION BEFORE REVIEW — NO AUTHORITY CREATED&quot;;IF([.U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8]=&quot;READY FOR REVIEW&quot;;&quot;REVIEW ELIGIBLE — NO AUTHORITY&quot;;IF(OR([.U58]=&quot;UNKNOWN&quot;;[.U58]=&quot;BLOCKED&quot;);&quot;NOT REVIEW ELIGIBLE&quot;;&quot;NOT REVIEW ELIGIBLE&quot;))">
            <text:p>NOT REVIEW ELIGIBLE</text:p>
          </table:table-cell>
          <table:table-cell office:value-type="string" table:formula="of:=IF([.W58]=&quot;NOT REVIEW ELIGIBLE&quot;;&quot;DO NOT BEGIN SETTLEMENT REVIEW — RESOLVE READINESS OR CONTRADICTION CONDITIONS&quot;;IF([.W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8]=&quot;&quot;;&quot;UNKNOWN&quot;;IF([.W58]&lt;&gt;&quot;REVIEW ELIGIBLE — NO AUTHORITY&quot;;&quot;BLOCKED — OUTCOME ASSERTED WITHOUT REVIEW ELIGIBILITY&quot;;IF(OR([.Y58]=&quot;REVIEWED — NO AUTHORITY&quot;;[.Y58]=&quot;REVIEW DEFERRED&quot;;[.Y58]=&quot;REVIEW BLOCKED&quot;);&quot;ACCEPTED INTAKE — NO AUTHORITY&quot;;&quot;BLOCKED — NONCANONICAL OUTCOME&quot;)))">
            <text:p>UNKNOWN</text:p>
          </table:table-cell>
          <table:table-cell office:value-type="string" table:formula="of:=IF([.Z58]=&quot;UNKNOWN&quot;;&quot;NO REVIEW OUTCOME ASSERTED — REMAINS UNKNOWN&quot;;IF([.Z58]=&quot;BLOCKED — OUTCOME ASSERTED WITHOUT REVIEW ELIGIBILITY&quot;;&quot;REMOVE OR CORRECT OUTCOME ASSERTION — REVIEW ELIGIBILITY REQUIRED FIRST&quot;;IF([.Z58]=&quot;BLOCKED — NONCANONICAL OUTCOME&quot;;&quot;CORRECT OUTCOME TO CANONICAL CONTROLLED VOCABULARY&quot;;IF([.Z5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8]=&quot;UNKNOWN&quot;;&quot;UNKNOWN&quot;;IF(OR([.Z58]=&quot;BLOCKED — OUTCOME ASSERTED WITHOUT REVIEW ELIGIBILITY&quot;;[.Z58]=&quot;BLOCKED — NONCANONICAL OUTCOME&quot;);&quot;BLOCKED&quot;;IF([.Z5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cell office:value-type="string" table:formula="of:=IF([.U59]=&quot;UNKNOWN&quot;;&quot;COMPLETE OR ASSERT REQUIRED EVIDENCE BEFORE REVIEW&quot;;IF([.U59]=&quot;BLOCKED&quot;;&quot;RESOLVE CONTRADICTION BEFORE REVIEW — NO AUTHORITY CREATED&quot;;IF([.U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9]=&quot;READY FOR REVIEW&quot;;&quot;REVIEW ELIGIBLE — NO AUTHORITY&quot;;IF(OR([.U59]=&quot;UNKNOWN&quot;;[.U59]=&quot;BLOCKED&quot;);&quot;NOT REVIEW ELIGIBLE&quot;;&quot;NOT REVIEW ELIGIBLE&quot;))">
            <text:p>NOT REVIEW ELIGIBLE</text:p>
          </table:table-cell>
          <table:table-cell office:value-type="string" table:formula="of:=IF([.W59]=&quot;NOT REVIEW ELIGIBLE&quot;;&quot;DO NOT BEGIN SETTLEMENT REVIEW — RESOLVE READINESS OR CONTRADICTION CONDITIONS&quot;;IF([.W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9]=&quot;&quot;;&quot;UNKNOWN&quot;;IF([.W59]&lt;&gt;&quot;REVIEW ELIGIBLE — NO AUTHORITY&quot;;&quot;BLOCKED — OUTCOME ASSERTED WITHOUT REVIEW ELIGIBILITY&quot;;IF(OR([.Y59]=&quot;REVIEWED — NO AUTHORITY&quot;;[.Y59]=&quot;REVIEW DEFERRED&quot;;[.Y59]=&quot;REVIEW BLOCKED&quot;);&quot;ACCEPTED INTAKE — NO AUTHORITY&quot;;&quot;BLOCKED — NONCANONICAL OUTCOME&quot;)))">
            <text:p>UNKNOWN</text:p>
          </table:table-cell>
          <table:table-cell office:value-type="string" table:formula="of:=IF([.Z59]=&quot;UNKNOWN&quot;;&quot;NO REVIEW OUTCOME ASSERTED — REMAINS UNKNOWN&quot;;IF([.Z59]=&quot;BLOCKED — OUTCOME ASSERTED WITHOUT REVIEW ELIGIBILITY&quot;;&quot;REMOVE OR CORRECT OUTCOME ASSERTION — REVIEW ELIGIBILITY REQUIRED FIRST&quot;;IF([.Z59]=&quot;BLOCKED — NONCANONICAL OUTCOME&quot;;&quot;CORRECT OUTCOME TO CANONICAL CONTROLLED VOCABULARY&quot;;IF([.Z5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59]=&quot;UNKNOWN&quot;;&quot;UNKNOWN&quot;;IF(OR([.Z59]=&quot;BLOCKED — OUTCOME ASSERTED WITHOUT REVIEW ELIGIBILITY&quot;;[.Z59]=&quot;BLOCKED — NONCANONICAL OUTCOME&quot;);&quot;BLOCKED&quot;;IF([.Z5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cell office:value-type="string" table:formula="of:=IF([.U60]=&quot;UNKNOWN&quot;;&quot;COMPLETE OR ASSERT REQUIRED EVIDENCE BEFORE REVIEW&quot;;IF([.U60]=&quot;BLOCKED&quot;;&quot;RESOLVE CONTRADICTION BEFORE REVIEW — NO AUTHORITY CREATED&quot;;IF([.U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0]=&quot;READY FOR REVIEW&quot;;&quot;REVIEW ELIGIBLE — NO AUTHORITY&quot;;IF(OR([.U60]=&quot;UNKNOWN&quot;;[.U60]=&quot;BLOCKED&quot;);&quot;NOT REVIEW ELIGIBLE&quot;;&quot;NOT REVIEW ELIGIBLE&quot;))">
            <text:p>NOT REVIEW ELIGIBLE</text:p>
          </table:table-cell>
          <table:table-cell office:value-type="string" table:formula="of:=IF([.W60]=&quot;NOT REVIEW ELIGIBLE&quot;;&quot;DO NOT BEGIN SETTLEMENT REVIEW — RESOLVE READINESS OR CONTRADICTION CONDITIONS&quot;;IF([.W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0]=&quot;&quot;;&quot;UNKNOWN&quot;;IF([.W60]&lt;&gt;&quot;REVIEW ELIGIBLE — NO AUTHORITY&quot;;&quot;BLOCKED — OUTCOME ASSERTED WITHOUT REVIEW ELIGIBILITY&quot;;IF(OR([.Y60]=&quot;REVIEWED — NO AUTHORITY&quot;;[.Y60]=&quot;REVIEW DEFERRED&quot;;[.Y60]=&quot;REVIEW BLOCKED&quot;);&quot;ACCEPTED INTAKE — NO AUTHORITY&quot;;&quot;BLOCKED — NONCANONICAL OUTCOME&quot;)))">
            <text:p>UNKNOWN</text:p>
          </table:table-cell>
          <table:table-cell office:value-type="string" table:formula="of:=IF([.Z60]=&quot;UNKNOWN&quot;;&quot;NO REVIEW OUTCOME ASSERTED — REMAINS UNKNOWN&quot;;IF([.Z60]=&quot;BLOCKED — OUTCOME ASSERTED WITHOUT REVIEW ELIGIBILITY&quot;;&quot;REMOVE OR CORRECT OUTCOME ASSERTION — REVIEW ELIGIBILITY REQUIRED FIRST&quot;;IF([.Z60]=&quot;BLOCKED — NONCANONICAL OUTCOME&quot;;&quot;CORRECT OUTCOME TO CANONICAL CONTROLLED VOCABULARY&quot;;IF([.Z6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0]=&quot;UNKNOWN&quot;;&quot;UNKNOWN&quot;;IF(OR([.Z60]=&quot;BLOCKED — OUTCOME ASSERTED WITHOUT REVIEW ELIGIBILITY&quot;;[.Z60]=&quot;BLOCKED — NONCANONICAL OUTCOME&quot;);&quot;BLOCKED&quot;;IF([.Z6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cell office:value-type="string" table:formula="of:=IF([.U61]=&quot;UNKNOWN&quot;;&quot;COMPLETE OR ASSERT REQUIRED EVIDENCE BEFORE REVIEW&quot;;IF([.U61]=&quot;BLOCKED&quot;;&quot;RESOLVE CONTRADICTION BEFORE REVIEW — NO AUTHORITY CREATED&quot;;IF([.U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1]=&quot;READY FOR REVIEW&quot;;&quot;REVIEW ELIGIBLE — NO AUTHORITY&quot;;IF(OR([.U61]=&quot;UNKNOWN&quot;;[.U61]=&quot;BLOCKED&quot;);&quot;NOT REVIEW ELIGIBLE&quot;;&quot;NOT REVIEW ELIGIBLE&quot;))">
            <text:p>NOT REVIEW ELIGIBLE</text:p>
          </table:table-cell>
          <table:table-cell office:value-type="string" table:formula="of:=IF([.W61]=&quot;NOT REVIEW ELIGIBLE&quot;;&quot;DO NOT BEGIN SETTLEMENT REVIEW — RESOLVE READINESS OR CONTRADICTION CONDITIONS&quot;;IF([.W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1]=&quot;&quot;;&quot;UNKNOWN&quot;;IF([.W61]&lt;&gt;&quot;REVIEW ELIGIBLE — NO AUTHORITY&quot;;&quot;BLOCKED — OUTCOME ASSERTED WITHOUT REVIEW ELIGIBILITY&quot;;IF(OR([.Y61]=&quot;REVIEWED — NO AUTHORITY&quot;;[.Y61]=&quot;REVIEW DEFERRED&quot;;[.Y61]=&quot;REVIEW BLOCKED&quot;);&quot;ACCEPTED INTAKE — NO AUTHORITY&quot;;&quot;BLOCKED — NONCANONICAL OUTCOME&quot;)))">
            <text:p>UNKNOWN</text:p>
          </table:table-cell>
          <table:table-cell office:value-type="string" table:formula="of:=IF([.Z61]=&quot;UNKNOWN&quot;;&quot;NO REVIEW OUTCOME ASSERTED — REMAINS UNKNOWN&quot;;IF([.Z61]=&quot;BLOCKED — OUTCOME ASSERTED WITHOUT REVIEW ELIGIBILITY&quot;;&quot;REMOVE OR CORRECT OUTCOME ASSERTION — REVIEW ELIGIBILITY REQUIRED FIRST&quot;;IF([.Z61]=&quot;BLOCKED — NONCANONICAL OUTCOME&quot;;&quot;CORRECT OUTCOME TO CANONICAL CONTROLLED VOCABULARY&quot;;IF([.Z6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1]=&quot;UNKNOWN&quot;;&quot;UNKNOWN&quot;;IF(OR([.Z61]=&quot;BLOCKED — OUTCOME ASSERTED WITHOUT REVIEW ELIGIBILITY&quot;;[.Z61]=&quot;BLOCKED — NONCANONICAL OUTCOME&quot;);&quot;BLOCKED&quot;;IF([.Z6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cell office:value-type="string" table:formula="of:=IF([.U62]=&quot;UNKNOWN&quot;;&quot;COMPLETE OR ASSERT REQUIRED EVIDENCE BEFORE REVIEW&quot;;IF([.U62]=&quot;BLOCKED&quot;;&quot;RESOLVE CONTRADICTION BEFORE REVIEW — NO AUTHORITY CREATED&quot;;IF([.U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2]=&quot;READY FOR REVIEW&quot;;&quot;REVIEW ELIGIBLE — NO AUTHORITY&quot;;IF(OR([.U62]=&quot;UNKNOWN&quot;;[.U62]=&quot;BLOCKED&quot;);&quot;NOT REVIEW ELIGIBLE&quot;;&quot;NOT REVIEW ELIGIBLE&quot;))">
            <text:p>NOT REVIEW ELIGIBLE</text:p>
          </table:table-cell>
          <table:table-cell office:value-type="string" table:formula="of:=IF([.W62]=&quot;NOT REVIEW ELIGIBLE&quot;;&quot;DO NOT BEGIN SETTLEMENT REVIEW — RESOLVE READINESS OR CONTRADICTION CONDITIONS&quot;;IF([.W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2]=&quot;&quot;;&quot;UNKNOWN&quot;;IF([.W62]&lt;&gt;&quot;REVIEW ELIGIBLE — NO AUTHORITY&quot;;&quot;BLOCKED — OUTCOME ASSERTED WITHOUT REVIEW ELIGIBILITY&quot;;IF(OR([.Y62]=&quot;REVIEWED — NO AUTHORITY&quot;;[.Y62]=&quot;REVIEW DEFERRED&quot;;[.Y62]=&quot;REVIEW BLOCKED&quot;);&quot;ACCEPTED INTAKE — NO AUTHORITY&quot;;&quot;BLOCKED — NONCANONICAL OUTCOME&quot;)))">
            <text:p>UNKNOWN</text:p>
          </table:table-cell>
          <table:table-cell office:value-type="string" table:formula="of:=IF([.Z62]=&quot;UNKNOWN&quot;;&quot;NO REVIEW OUTCOME ASSERTED — REMAINS UNKNOWN&quot;;IF([.Z62]=&quot;BLOCKED — OUTCOME ASSERTED WITHOUT REVIEW ELIGIBILITY&quot;;&quot;REMOVE OR CORRECT OUTCOME ASSERTION — REVIEW ELIGIBILITY REQUIRED FIRST&quot;;IF([.Z62]=&quot;BLOCKED — NONCANONICAL OUTCOME&quot;;&quot;CORRECT OUTCOME TO CANONICAL CONTROLLED VOCABULARY&quot;;IF([.Z6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2]=&quot;UNKNOWN&quot;;&quot;UNKNOWN&quot;;IF(OR([.Z62]=&quot;BLOCKED — OUTCOME ASSERTED WITHOUT REVIEW ELIGIBILITY&quot;;[.Z62]=&quot;BLOCKED — NONCANONICAL OUTCOME&quot;);&quot;BLOCKED&quot;;IF([.Z6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cell office:value-type="string" table:formula="of:=IF([.U63]=&quot;UNKNOWN&quot;;&quot;COMPLETE OR ASSERT REQUIRED EVIDENCE BEFORE REVIEW&quot;;IF([.U63]=&quot;BLOCKED&quot;;&quot;RESOLVE CONTRADICTION BEFORE REVIEW — NO AUTHORITY CREATED&quot;;IF([.U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3]=&quot;READY FOR REVIEW&quot;;&quot;REVIEW ELIGIBLE — NO AUTHORITY&quot;;IF(OR([.U63]=&quot;UNKNOWN&quot;;[.U63]=&quot;BLOCKED&quot;);&quot;NOT REVIEW ELIGIBLE&quot;;&quot;NOT REVIEW ELIGIBLE&quot;))">
            <text:p>NOT REVIEW ELIGIBLE</text:p>
          </table:table-cell>
          <table:table-cell office:value-type="string" table:formula="of:=IF([.W63]=&quot;NOT REVIEW ELIGIBLE&quot;;&quot;DO NOT BEGIN SETTLEMENT REVIEW — RESOLVE READINESS OR CONTRADICTION CONDITIONS&quot;;IF([.W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3]=&quot;&quot;;&quot;UNKNOWN&quot;;IF([.W63]&lt;&gt;&quot;REVIEW ELIGIBLE — NO AUTHORITY&quot;;&quot;BLOCKED — OUTCOME ASSERTED WITHOUT REVIEW ELIGIBILITY&quot;;IF(OR([.Y63]=&quot;REVIEWED — NO AUTHORITY&quot;;[.Y63]=&quot;REVIEW DEFERRED&quot;;[.Y63]=&quot;REVIEW BLOCKED&quot;);&quot;ACCEPTED INTAKE — NO AUTHORITY&quot;;&quot;BLOCKED — NONCANONICAL OUTCOME&quot;)))">
            <text:p>UNKNOWN</text:p>
          </table:table-cell>
          <table:table-cell office:value-type="string" table:formula="of:=IF([.Z63]=&quot;UNKNOWN&quot;;&quot;NO REVIEW OUTCOME ASSERTED — REMAINS UNKNOWN&quot;;IF([.Z63]=&quot;BLOCKED — OUTCOME ASSERTED WITHOUT REVIEW ELIGIBILITY&quot;;&quot;REMOVE OR CORRECT OUTCOME ASSERTION — REVIEW ELIGIBILITY REQUIRED FIRST&quot;;IF([.Z63]=&quot;BLOCKED — NONCANONICAL OUTCOME&quot;;&quot;CORRECT OUTCOME TO CANONICAL CONTROLLED VOCABULARY&quot;;IF([.Z6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3]=&quot;UNKNOWN&quot;;&quot;UNKNOWN&quot;;IF(OR([.Z63]=&quot;BLOCKED — OUTCOME ASSERTED WITHOUT REVIEW ELIGIBILITY&quot;;[.Z63]=&quot;BLOCKED — NONCANONICAL OUTCOME&quot;);&quot;BLOCKED&quot;;IF([.Z6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cell office:value-type="string" table:formula="of:=IF([.U64]=&quot;UNKNOWN&quot;;&quot;COMPLETE OR ASSERT REQUIRED EVIDENCE BEFORE REVIEW&quot;;IF([.U64]=&quot;BLOCKED&quot;;&quot;RESOLVE CONTRADICTION BEFORE REVIEW — NO AUTHORITY CREATED&quot;;IF([.U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4]=&quot;READY FOR REVIEW&quot;;&quot;REVIEW ELIGIBLE — NO AUTHORITY&quot;;IF(OR([.U64]=&quot;UNKNOWN&quot;;[.U64]=&quot;BLOCKED&quot;);&quot;NOT REVIEW ELIGIBLE&quot;;&quot;NOT REVIEW ELIGIBLE&quot;))">
            <text:p>NOT REVIEW ELIGIBLE</text:p>
          </table:table-cell>
          <table:table-cell office:value-type="string" table:formula="of:=IF([.W64]=&quot;NOT REVIEW ELIGIBLE&quot;;&quot;DO NOT BEGIN SETTLEMENT REVIEW — RESOLVE READINESS OR CONTRADICTION CONDITIONS&quot;;IF([.W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4]=&quot;&quot;;&quot;UNKNOWN&quot;;IF([.W64]&lt;&gt;&quot;REVIEW ELIGIBLE — NO AUTHORITY&quot;;&quot;BLOCKED — OUTCOME ASSERTED WITHOUT REVIEW ELIGIBILITY&quot;;IF(OR([.Y64]=&quot;REVIEWED — NO AUTHORITY&quot;;[.Y64]=&quot;REVIEW DEFERRED&quot;;[.Y64]=&quot;REVIEW BLOCKED&quot;);&quot;ACCEPTED INTAKE — NO AUTHORITY&quot;;&quot;BLOCKED — NONCANONICAL OUTCOME&quot;)))">
            <text:p>UNKNOWN</text:p>
          </table:table-cell>
          <table:table-cell office:value-type="string" table:formula="of:=IF([.Z64]=&quot;UNKNOWN&quot;;&quot;NO REVIEW OUTCOME ASSERTED — REMAINS UNKNOWN&quot;;IF([.Z64]=&quot;BLOCKED — OUTCOME ASSERTED WITHOUT REVIEW ELIGIBILITY&quot;;&quot;REMOVE OR CORRECT OUTCOME ASSERTION — REVIEW ELIGIBILITY REQUIRED FIRST&quot;;IF([.Z64]=&quot;BLOCKED — NONCANONICAL OUTCOME&quot;;&quot;CORRECT OUTCOME TO CANONICAL CONTROLLED VOCABULARY&quot;;IF([.Z6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4]=&quot;UNKNOWN&quot;;&quot;UNKNOWN&quot;;IF(OR([.Z64]=&quot;BLOCKED — OUTCOME ASSERTED WITHOUT REVIEW ELIGIBILITY&quot;;[.Z64]=&quot;BLOCKED — NONCANONICAL OUTCOME&quot;);&quot;BLOCKED&quot;;IF([.Z6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cell office:value-type="string" table:formula="of:=IF([.U65]=&quot;UNKNOWN&quot;;&quot;COMPLETE OR ASSERT REQUIRED EVIDENCE BEFORE REVIEW&quot;;IF([.U65]=&quot;BLOCKED&quot;;&quot;RESOLVE CONTRADICTION BEFORE REVIEW — NO AUTHORITY CREATED&quot;;IF([.U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5]=&quot;READY FOR REVIEW&quot;;&quot;REVIEW ELIGIBLE — NO AUTHORITY&quot;;IF(OR([.U65]=&quot;UNKNOWN&quot;;[.U65]=&quot;BLOCKED&quot;);&quot;NOT REVIEW ELIGIBLE&quot;;&quot;NOT REVIEW ELIGIBLE&quot;))">
            <text:p>NOT REVIEW ELIGIBLE</text:p>
          </table:table-cell>
          <table:table-cell office:value-type="string" table:formula="of:=IF([.W65]=&quot;NOT REVIEW ELIGIBLE&quot;;&quot;DO NOT BEGIN SETTLEMENT REVIEW — RESOLVE READINESS OR CONTRADICTION CONDITIONS&quot;;IF([.W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5]=&quot;&quot;;&quot;UNKNOWN&quot;;IF([.W65]&lt;&gt;&quot;REVIEW ELIGIBLE — NO AUTHORITY&quot;;&quot;BLOCKED — OUTCOME ASSERTED WITHOUT REVIEW ELIGIBILITY&quot;;IF(OR([.Y65]=&quot;REVIEWED — NO AUTHORITY&quot;;[.Y65]=&quot;REVIEW DEFERRED&quot;;[.Y65]=&quot;REVIEW BLOCKED&quot;);&quot;ACCEPTED INTAKE — NO AUTHORITY&quot;;&quot;BLOCKED — NONCANONICAL OUTCOME&quot;)))">
            <text:p>UNKNOWN</text:p>
          </table:table-cell>
          <table:table-cell office:value-type="string" table:formula="of:=IF([.Z65]=&quot;UNKNOWN&quot;;&quot;NO REVIEW OUTCOME ASSERTED — REMAINS UNKNOWN&quot;;IF([.Z65]=&quot;BLOCKED — OUTCOME ASSERTED WITHOUT REVIEW ELIGIBILITY&quot;;&quot;REMOVE OR CORRECT OUTCOME ASSERTION — REVIEW ELIGIBILITY REQUIRED FIRST&quot;;IF([.Z65]=&quot;BLOCKED — NONCANONICAL OUTCOME&quot;;&quot;CORRECT OUTCOME TO CANONICAL CONTROLLED VOCABULARY&quot;;IF([.Z6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5]=&quot;UNKNOWN&quot;;&quot;UNKNOWN&quot;;IF(OR([.Z65]=&quot;BLOCKED — OUTCOME ASSERTED WITHOUT REVIEW ELIGIBILITY&quot;;[.Z65]=&quot;BLOCKED — NONCANONICAL OUTCOME&quot;);&quot;BLOCKED&quot;;IF([.Z6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cell office:value-type="string" table:formula="of:=IF([.U66]=&quot;UNKNOWN&quot;;&quot;COMPLETE OR ASSERT REQUIRED EVIDENCE BEFORE REVIEW&quot;;IF([.U66]=&quot;BLOCKED&quot;;&quot;RESOLVE CONTRADICTION BEFORE REVIEW — NO AUTHORITY CREATED&quot;;IF([.U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6]=&quot;READY FOR REVIEW&quot;;&quot;REVIEW ELIGIBLE — NO AUTHORITY&quot;;IF(OR([.U66]=&quot;UNKNOWN&quot;;[.U66]=&quot;BLOCKED&quot;);&quot;NOT REVIEW ELIGIBLE&quot;;&quot;NOT REVIEW ELIGIBLE&quot;))">
            <text:p>NOT REVIEW ELIGIBLE</text:p>
          </table:table-cell>
          <table:table-cell office:value-type="string" table:formula="of:=IF([.W66]=&quot;NOT REVIEW ELIGIBLE&quot;;&quot;DO NOT BEGIN SETTLEMENT REVIEW — RESOLVE READINESS OR CONTRADICTION CONDITIONS&quot;;IF([.W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6]=&quot;&quot;;&quot;UNKNOWN&quot;;IF([.W66]&lt;&gt;&quot;REVIEW ELIGIBLE — NO AUTHORITY&quot;;&quot;BLOCKED — OUTCOME ASSERTED WITHOUT REVIEW ELIGIBILITY&quot;;IF(OR([.Y66]=&quot;REVIEWED — NO AUTHORITY&quot;;[.Y66]=&quot;REVIEW DEFERRED&quot;;[.Y66]=&quot;REVIEW BLOCKED&quot;);&quot;ACCEPTED INTAKE — NO AUTHORITY&quot;;&quot;BLOCKED — NONCANONICAL OUTCOME&quot;)))">
            <text:p>UNKNOWN</text:p>
          </table:table-cell>
          <table:table-cell office:value-type="string" table:formula="of:=IF([.Z66]=&quot;UNKNOWN&quot;;&quot;NO REVIEW OUTCOME ASSERTED — REMAINS UNKNOWN&quot;;IF([.Z66]=&quot;BLOCKED — OUTCOME ASSERTED WITHOUT REVIEW ELIGIBILITY&quot;;&quot;REMOVE OR CORRECT OUTCOME ASSERTION — REVIEW ELIGIBILITY REQUIRED FIRST&quot;;IF([.Z66]=&quot;BLOCKED — NONCANONICAL OUTCOME&quot;;&quot;CORRECT OUTCOME TO CANONICAL CONTROLLED VOCABULARY&quot;;IF([.Z6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6]=&quot;UNKNOWN&quot;;&quot;UNKNOWN&quot;;IF(OR([.Z66]=&quot;BLOCKED — OUTCOME ASSERTED WITHOUT REVIEW ELIGIBILITY&quot;;[.Z66]=&quot;BLOCKED — NONCANONICAL OUTCOME&quot;);&quot;BLOCKED&quot;;IF([.Z6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cell office:value-type="string" table:formula="of:=IF([.U67]=&quot;UNKNOWN&quot;;&quot;COMPLETE OR ASSERT REQUIRED EVIDENCE BEFORE REVIEW&quot;;IF([.U67]=&quot;BLOCKED&quot;;&quot;RESOLVE CONTRADICTION BEFORE REVIEW — NO AUTHORITY CREATED&quot;;IF([.U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7]=&quot;READY FOR REVIEW&quot;;&quot;REVIEW ELIGIBLE — NO AUTHORITY&quot;;IF(OR([.U67]=&quot;UNKNOWN&quot;;[.U67]=&quot;BLOCKED&quot;);&quot;NOT REVIEW ELIGIBLE&quot;;&quot;NOT REVIEW ELIGIBLE&quot;))">
            <text:p>NOT REVIEW ELIGIBLE</text:p>
          </table:table-cell>
          <table:table-cell office:value-type="string" table:formula="of:=IF([.W67]=&quot;NOT REVIEW ELIGIBLE&quot;;&quot;DO NOT BEGIN SETTLEMENT REVIEW — RESOLVE READINESS OR CONTRADICTION CONDITIONS&quot;;IF([.W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7]=&quot;&quot;;&quot;UNKNOWN&quot;;IF([.W67]&lt;&gt;&quot;REVIEW ELIGIBLE — NO AUTHORITY&quot;;&quot;BLOCKED — OUTCOME ASSERTED WITHOUT REVIEW ELIGIBILITY&quot;;IF(OR([.Y67]=&quot;REVIEWED — NO AUTHORITY&quot;;[.Y67]=&quot;REVIEW DEFERRED&quot;;[.Y67]=&quot;REVIEW BLOCKED&quot;);&quot;ACCEPTED INTAKE — NO AUTHORITY&quot;;&quot;BLOCKED — NONCANONICAL OUTCOME&quot;)))">
            <text:p>UNKNOWN</text:p>
          </table:table-cell>
          <table:table-cell office:value-type="string" table:formula="of:=IF([.Z67]=&quot;UNKNOWN&quot;;&quot;NO REVIEW OUTCOME ASSERTED — REMAINS UNKNOWN&quot;;IF([.Z67]=&quot;BLOCKED — OUTCOME ASSERTED WITHOUT REVIEW ELIGIBILITY&quot;;&quot;REMOVE OR CORRECT OUTCOME ASSERTION — REVIEW ELIGIBILITY REQUIRED FIRST&quot;;IF([.Z67]=&quot;BLOCKED — NONCANONICAL OUTCOME&quot;;&quot;CORRECT OUTCOME TO CANONICAL CONTROLLED VOCABULARY&quot;;IF([.Z6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7]=&quot;UNKNOWN&quot;;&quot;UNKNOWN&quot;;IF(OR([.Z67]=&quot;BLOCKED — OUTCOME ASSERTED WITHOUT REVIEW ELIGIBILITY&quot;;[.Z67]=&quot;BLOCKED — NONCANONICAL OUTCOME&quot;);&quot;BLOCKED&quot;;IF([.Z6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cell office:value-type="string" table:formula="of:=IF([.U68]=&quot;UNKNOWN&quot;;&quot;COMPLETE OR ASSERT REQUIRED EVIDENCE BEFORE REVIEW&quot;;IF([.U68]=&quot;BLOCKED&quot;;&quot;RESOLVE CONTRADICTION BEFORE REVIEW — NO AUTHORITY CREATED&quot;;IF([.U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8]=&quot;READY FOR REVIEW&quot;;&quot;REVIEW ELIGIBLE — NO AUTHORITY&quot;;IF(OR([.U68]=&quot;UNKNOWN&quot;;[.U68]=&quot;BLOCKED&quot;);&quot;NOT REVIEW ELIGIBLE&quot;;&quot;NOT REVIEW ELIGIBLE&quot;))">
            <text:p>NOT REVIEW ELIGIBLE</text:p>
          </table:table-cell>
          <table:table-cell office:value-type="string" table:formula="of:=IF([.W68]=&quot;NOT REVIEW ELIGIBLE&quot;;&quot;DO NOT BEGIN SETTLEMENT REVIEW — RESOLVE READINESS OR CONTRADICTION CONDITIONS&quot;;IF([.W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8]=&quot;&quot;;&quot;UNKNOWN&quot;;IF([.W68]&lt;&gt;&quot;REVIEW ELIGIBLE — NO AUTHORITY&quot;;&quot;BLOCKED — OUTCOME ASSERTED WITHOUT REVIEW ELIGIBILITY&quot;;IF(OR([.Y68]=&quot;REVIEWED — NO AUTHORITY&quot;;[.Y68]=&quot;REVIEW DEFERRED&quot;;[.Y68]=&quot;REVIEW BLOCKED&quot;);&quot;ACCEPTED INTAKE — NO AUTHORITY&quot;;&quot;BLOCKED — NONCANONICAL OUTCOME&quot;)))">
            <text:p>UNKNOWN</text:p>
          </table:table-cell>
          <table:table-cell office:value-type="string" table:formula="of:=IF([.Z68]=&quot;UNKNOWN&quot;;&quot;NO REVIEW OUTCOME ASSERTED — REMAINS UNKNOWN&quot;;IF([.Z68]=&quot;BLOCKED — OUTCOME ASSERTED WITHOUT REVIEW ELIGIBILITY&quot;;&quot;REMOVE OR CORRECT OUTCOME ASSERTION — REVIEW ELIGIBILITY REQUIRED FIRST&quot;;IF([.Z68]=&quot;BLOCKED — NONCANONICAL OUTCOME&quot;;&quot;CORRECT OUTCOME TO CANONICAL CONTROLLED VOCABULARY&quot;;IF([.Z6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8]=&quot;UNKNOWN&quot;;&quot;UNKNOWN&quot;;IF(OR([.Z68]=&quot;BLOCKED — OUTCOME ASSERTED WITHOUT REVIEW ELIGIBILITY&quot;;[.Z68]=&quot;BLOCKED — NONCANONICAL OUTCOME&quot;);&quot;BLOCKED&quot;;IF([.Z6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cell office:value-type="string" table:formula="of:=IF([.U69]=&quot;UNKNOWN&quot;;&quot;COMPLETE OR ASSERT REQUIRED EVIDENCE BEFORE REVIEW&quot;;IF([.U69]=&quot;BLOCKED&quot;;&quot;RESOLVE CONTRADICTION BEFORE REVIEW — NO AUTHORITY CREATED&quot;;IF([.U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9]=&quot;READY FOR REVIEW&quot;;&quot;REVIEW ELIGIBLE — NO AUTHORITY&quot;;IF(OR([.U69]=&quot;UNKNOWN&quot;;[.U69]=&quot;BLOCKED&quot;);&quot;NOT REVIEW ELIGIBLE&quot;;&quot;NOT REVIEW ELIGIBLE&quot;))">
            <text:p>NOT REVIEW ELIGIBLE</text:p>
          </table:table-cell>
          <table:table-cell office:value-type="string" table:formula="of:=IF([.W69]=&quot;NOT REVIEW ELIGIBLE&quot;;&quot;DO NOT BEGIN SETTLEMENT REVIEW — RESOLVE READINESS OR CONTRADICTION CONDITIONS&quot;;IF([.W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9]=&quot;&quot;;&quot;UNKNOWN&quot;;IF([.W69]&lt;&gt;&quot;REVIEW ELIGIBLE — NO AUTHORITY&quot;;&quot;BLOCKED — OUTCOME ASSERTED WITHOUT REVIEW ELIGIBILITY&quot;;IF(OR([.Y69]=&quot;REVIEWED — NO AUTHORITY&quot;;[.Y69]=&quot;REVIEW DEFERRED&quot;;[.Y69]=&quot;REVIEW BLOCKED&quot;);&quot;ACCEPTED INTAKE — NO AUTHORITY&quot;;&quot;BLOCKED — NONCANONICAL OUTCOME&quot;)))">
            <text:p>UNKNOWN</text:p>
          </table:table-cell>
          <table:table-cell office:value-type="string" table:formula="of:=IF([.Z69]=&quot;UNKNOWN&quot;;&quot;NO REVIEW OUTCOME ASSERTED — REMAINS UNKNOWN&quot;;IF([.Z69]=&quot;BLOCKED — OUTCOME ASSERTED WITHOUT REVIEW ELIGIBILITY&quot;;&quot;REMOVE OR CORRECT OUTCOME ASSERTION — REVIEW ELIGIBILITY REQUIRED FIRST&quot;;IF([.Z69]=&quot;BLOCKED — NONCANONICAL OUTCOME&quot;;&quot;CORRECT OUTCOME TO CANONICAL CONTROLLED VOCABULARY&quot;;IF([.Z6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69]=&quot;UNKNOWN&quot;;&quot;UNKNOWN&quot;;IF(OR([.Z69]=&quot;BLOCKED — OUTCOME ASSERTED WITHOUT REVIEW ELIGIBILITY&quot;;[.Z69]=&quot;BLOCKED — NONCANONICAL OUTCOME&quot;);&quot;BLOCKED&quot;;IF([.Z6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cell office:value-type="string" table:formula="of:=IF([.U70]=&quot;UNKNOWN&quot;;&quot;COMPLETE OR ASSERT REQUIRED EVIDENCE BEFORE REVIEW&quot;;IF([.U70]=&quot;BLOCKED&quot;;&quot;RESOLVE CONTRADICTION BEFORE REVIEW — NO AUTHORITY CREATED&quot;;IF([.U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0]=&quot;READY FOR REVIEW&quot;;&quot;REVIEW ELIGIBLE — NO AUTHORITY&quot;;IF(OR([.U70]=&quot;UNKNOWN&quot;;[.U70]=&quot;BLOCKED&quot;);&quot;NOT REVIEW ELIGIBLE&quot;;&quot;NOT REVIEW ELIGIBLE&quot;))">
            <text:p>NOT REVIEW ELIGIBLE</text:p>
          </table:table-cell>
          <table:table-cell office:value-type="string" table:formula="of:=IF([.W70]=&quot;NOT REVIEW ELIGIBLE&quot;;&quot;DO NOT BEGIN SETTLEMENT REVIEW — RESOLVE READINESS OR CONTRADICTION CONDITIONS&quot;;IF([.W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0]=&quot;&quot;;&quot;UNKNOWN&quot;;IF([.W70]&lt;&gt;&quot;REVIEW ELIGIBLE — NO AUTHORITY&quot;;&quot;BLOCKED — OUTCOME ASSERTED WITHOUT REVIEW ELIGIBILITY&quot;;IF(OR([.Y70]=&quot;REVIEWED — NO AUTHORITY&quot;;[.Y70]=&quot;REVIEW DEFERRED&quot;;[.Y70]=&quot;REVIEW BLOCKED&quot;);&quot;ACCEPTED INTAKE — NO AUTHORITY&quot;;&quot;BLOCKED — NONCANONICAL OUTCOME&quot;)))">
            <text:p>UNKNOWN</text:p>
          </table:table-cell>
          <table:table-cell office:value-type="string" table:formula="of:=IF([.Z70]=&quot;UNKNOWN&quot;;&quot;NO REVIEW OUTCOME ASSERTED — REMAINS UNKNOWN&quot;;IF([.Z70]=&quot;BLOCKED — OUTCOME ASSERTED WITHOUT REVIEW ELIGIBILITY&quot;;&quot;REMOVE OR CORRECT OUTCOME ASSERTION — REVIEW ELIGIBILITY REQUIRED FIRST&quot;;IF([.Z70]=&quot;BLOCKED — NONCANONICAL OUTCOME&quot;;&quot;CORRECT OUTCOME TO CANONICAL CONTROLLED VOCABULARY&quot;;IF([.Z7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0]=&quot;UNKNOWN&quot;;&quot;UNKNOWN&quot;;IF(OR([.Z70]=&quot;BLOCKED — OUTCOME ASSERTED WITHOUT REVIEW ELIGIBILITY&quot;;[.Z70]=&quot;BLOCKED — NONCANONICAL OUTCOME&quot;);&quot;BLOCKED&quot;;IF([.Z7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cell office:value-type="string" table:formula="of:=IF([.U71]=&quot;UNKNOWN&quot;;&quot;COMPLETE OR ASSERT REQUIRED EVIDENCE BEFORE REVIEW&quot;;IF([.U71]=&quot;BLOCKED&quot;;&quot;RESOLVE CONTRADICTION BEFORE REVIEW — NO AUTHORITY CREATED&quot;;IF([.U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1]=&quot;READY FOR REVIEW&quot;;&quot;REVIEW ELIGIBLE — NO AUTHORITY&quot;;IF(OR([.U71]=&quot;UNKNOWN&quot;;[.U71]=&quot;BLOCKED&quot;);&quot;NOT REVIEW ELIGIBLE&quot;;&quot;NOT REVIEW ELIGIBLE&quot;))">
            <text:p>NOT REVIEW ELIGIBLE</text:p>
          </table:table-cell>
          <table:table-cell office:value-type="string" table:formula="of:=IF([.W71]=&quot;NOT REVIEW ELIGIBLE&quot;;&quot;DO NOT BEGIN SETTLEMENT REVIEW — RESOLVE READINESS OR CONTRADICTION CONDITIONS&quot;;IF([.W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1]=&quot;&quot;;&quot;UNKNOWN&quot;;IF([.W71]&lt;&gt;&quot;REVIEW ELIGIBLE — NO AUTHORITY&quot;;&quot;BLOCKED — OUTCOME ASSERTED WITHOUT REVIEW ELIGIBILITY&quot;;IF(OR([.Y71]=&quot;REVIEWED — NO AUTHORITY&quot;;[.Y71]=&quot;REVIEW DEFERRED&quot;;[.Y71]=&quot;REVIEW BLOCKED&quot;);&quot;ACCEPTED INTAKE — NO AUTHORITY&quot;;&quot;BLOCKED — NONCANONICAL OUTCOME&quot;)))">
            <text:p>UNKNOWN</text:p>
          </table:table-cell>
          <table:table-cell office:value-type="string" table:formula="of:=IF([.Z71]=&quot;UNKNOWN&quot;;&quot;NO REVIEW OUTCOME ASSERTED — REMAINS UNKNOWN&quot;;IF([.Z71]=&quot;BLOCKED — OUTCOME ASSERTED WITHOUT REVIEW ELIGIBILITY&quot;;&quot;REMOVE OR CORRECT OUTCOME ASSERTION — REVIEW ELIGIBILITY REQUIRED FIRST&quot;;IF([.Z71]=&quot;BLOCKED — NONCANONICAL OUTCOME&quot;;&quot;CORRECT OUTCOME TO CANONICAL CONTROLLED VOCABULARY&quot;;IF([.Z7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1]=&quot;UNKNOWN&quot;;&quot;UNKNOWN&quot;;IF(OR([.Z71]=&quot;BLOCKED — OUTCOME ASSERTED WITHOUT REVIEW ELIGIBILITY&quot;;[.Z71]=&quot;BLOCKED — NONCANONICAL OUTCOME&quot;);&quot;BLOCKED&quot;;IF([.Z7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cell office:value-type="string" table:formula="of:=IF([.U72]=&quot;UNKNOWN&quot;;&quot;COMPLETE OR ASSERT REQUIRED EVIDENCE BEFORE REVIEW&quot;;IF([.U72]=&quot;BLOCKED&quot;;&quot;RESOLVE CONTRADICTION BEFORE REVIEW — NO AUTHORITY CREATED&quot;;IF([.U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2]=&quot;READY FOR REVIEW&quot;;&quot;REVIEW ELIGIBLE — NO AUTHORITY&quot;;IF(OR([.U72]=&quot;UNKNOWN&quot;;[.U72]=&quot;BLOCKED&quot;);&quot;NOT REVIEW ELIGIBLE&quot;;&quot;NOT REVIEW ELIGIBLE&quot;))">
            <text:p>NOT REVIEW ELIGIBLE</text:p>
          </table:table-cell>
          <table:table-cell office:value-type="string" table:formula="of:=IF([.W72]=&quot;NOT REVIEW ELIGIBLE&quot;;&quot;DO NOT BEGIN SETTLEMENT REVIEW — RESOLVE READINESS OR CONTRADICTION CONDITIONS&quot;;IF([.W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2]=&quot;&quot;;&quot;UNKNOWN&quot;;IF([.W72]&lt;&gt;&quot;REVIEW ELIGIBLE — NO AUTHORITY&quot;;&quot;BLOCKED — OUTCOME ASSERTED WITHOUT REVIEW ELIGIBILITY&quot;;IF(OR([.Y72]=&quot;REVIEWED — NO AUTHORITY&quot;;[.Y72]=&quot;REVIEW DEFERRED&quot;;[.Y72]=&quot;REVIEW BLOCKED&quot;);&quot;ACCEPTED INTAKE — NO AUTHORITY&quot;;&quot;BLOCKED — NONCANONICAL OUTCOME&quot;)))">
            <text:p>UNKNOWN</text:p>
          </table:table-cell>
          <table:table-cell office:value-type="string" table:formula="of:=IF([.Z72]=&quot;UNKNOWN&quot;;&quot;NO REVIEW OUTCOME ASSERTED — REMAINS UNKNOWN&quot;;IF([.Z72]=&quot;BLOCKED — OUTCOME ASSERTED WITHOUT REVIEW ELIGIBILITY&quot;;&quot;REMOVE OR CORRECT OUTCOME ASSERTION — REVIEW ELIGIBILITY REQUIRED FIRST&quot;;IF([.Z72]=&quot;BLOCKED — NONCANONICAL OUTCOME&quot;;&quot;CORRECT OUTCOME TO CANONICAL CONTROLLED VOCABULARY&quot;;IF([.Z7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2]=&quot;UNKNOWN&quot;;&quot;UNKNOWN&quot;;IF(OR([.Z72]=&quot;BLOCKED — OUTCOME ASSERTED WITHOUT REVIEW ELIGIBILITY&quot;;[.Z72]=&quot;BLOCKED — NONCANONICAL OUTCOME&quot;);&quot;BLOCKED&quot;;IF([.Z7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cell office:value-type="string" table:formula="of:=IF([.U73]=&quot;UNKNOWN&quot;;&quot;COMPLETE OR ASSERT REQUIRED EVIDENCE BEFORE REVIEW&quot;;IF([.U73]=&quot;BLOCKED&quot;;&quot;RESOLVE CONTRADICTION BEFORE REVIEW — NO AUTHORITY CREATED&quot;;IF([.U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3]=&quot;READY FOR REVIEW&quot;;&quot;REVIEW ELIGIBLE — NO AUTHORITY&quot;;IF(OR([.U73]=&quot;UNKNOWN&quot;;[.U73]=&quot;BLOCKED&quot;);&quot;NOT REVIEW ELIGIBLE&quot;;&quot;NOT REVIEW ELIGIBLE&quot;))">
            <text:p>NOT REVIEW ELIGIBLE</text:p>
          </table:table-cell>
          <table:table-cell office:value-type="string" table:formula="of:=IF([.W73]=&quot;NOT REVIEW ELIGIBLE&quot;;&quot;DO NOT BEGIN SETTLEMENT REVIEW — RESOLVE READINESS OR CONTRADICTION CONDITIONS&quot;;IF([.W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3]=&quot;&quot;;&quot;UNKNOWN&quot;;IF([.W73]&lt;&gt;&quot;REVIEW ELIGIBLE — NO AUTHORITY&quot;;&quot;BLOCKED — OUTCOME ASSERTED WITHOUT REVIEW ELIGIBILITY&quot;;IF(OR([.Y73]=&quot;REVIEWED — NO AUTHORITY&quot;;[.Y73]=&quot;REVIEW DEFERRED&quot;;[.Y73]=&quot;REVIEW BLOCKED&quot;);&quot;ACCEPTED INTAKE — NO AUTHORITY&quot;;&quot;BLOCKED — NONCANONICAL OUTCOME&quot;)))">
            <text:p>UNKNOWN</text:p>
          </table:table-cell>
          <table:table-cell office:value-type="string" table:formula="of:=IF([.Z73]=&quot;UNKNOWN&quot;;&quot;NO REVIEW OUTCOME ASSERTED — REMAINS UNKNOWN&quot;;IF([.Z73]=&quot;BLOCKED — OUTCOME ASSERTED WITHOUT REVIEW ELIGIBILITY&quot;;&quot;REMOVE OR CORRECT OUTCOME ASSERTION — REVIEW ELIGIBILITY REQUIRED FIRST&quot;;IF([.Z73]=&quot;BLOCKED — NONCANONICAL OUTCOME&quot;;&quot;CORRECT OUTCOME TO CANONICAL CONTROLLED VOCABULARY&quot;;IF([.Z7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3]=&quot;UNKNOWN&quot;;&quot;UNKNOWN&quot;;IF(OR([.Z73]=&quot;BLOCKED — OUTCOME ASSERTED WITHOUT REVIEW ELIGIBILITY&quot;;[.Z73]=&quot;BLOCKED — NONCANONICAL OUTCOME&quot;);&quot;BLOCKED&quot;;IF([.Z7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cell office:value-type="string" table:formula="of:=IF([.U74]=&quot;UNKNOWN&quot;;&quot;COMPLETE OR ASSERT REQUIRED EVIDENCE BEFORE REVIEW&quot;;IF([.U74]=&quot;BLOCKED&quot;;&quot;RESOLVE CONTRADICTION BEFORE REVIEW — NO AUTHORITY CREATED&quot;;IF([.U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4]=&quot;READY FOR REVIEW&quot;;&quot;REVIEW ELIGIBLE — NO AUTHORITY&quot;;IF(OR([.U74]=&quot;UNKNOWN&quot;;[.U74]=&quot;BLOCKED&quot;);&quot;NOT REVIEW ELIGIBLE&quot;;&quot;NOT REVIEW ELIGIBLE&quot;))">
            <text:p>NOT REVIEW ELIGIBLE</text:p>
          </table:table-cell>
          <table:table-cell office:value-type="string" table:formula="of:=IF([.W74]=&quot;NOT REVIEW ELIGIBLE&quot;;&quot;DO NOT BEGIN SETTLEMENT REVIEW — RESOLVE READINESS OR CONTRADICTION CONDITIONS&quot;;IF([.W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4]=&quot;&quot;;&quot;UNKNOWN&quot;;IF([.W74]&lt;&gt;&quot;REVIEW ELIGIBLE — NO AUTHORITY&quot;;&quot;BLOCKED — OUTCOME ASSERTED WITHOUT REVIEW ELIGIBILITY&quot;;IF(OR([.Y74]=&quot;REVIEWED — NO AUTHORITY&quot;;[.Y74]=&quot;REVIEW DEFERRED&quot;;[.Y74]=&quot;REVIEW BLOCKED&quot;);&quot;ACCEPTED INTAKE — NO AUTHORITY&quot;;&quot;BLOCKED — NONCANONICAL OUTCOME&quot;)))">
            <text:p>UNKNOWN</text:p>
          </table:table-cell>
          <table:table-cell office:value-type="string" table:formula="of:=IF([.Z74]=&quot;UNKNOWN&quot;;&quot;NO REVIEW OUTCOME ASSERTED — REMAINS UNKNOWN&quot;;IF([.Z74]=&quot;BLOCKED — OUTCOME ASSERTED WITHOUT REVIEW ELIGIBILITY&quot;;&quot;REMOVE OR CORRECT OUTCOME ASSERTION — REVIEW ELIGIBILITY REQUIRED FIRST&quot;;IF([.Z74]=&quot;BLOCKED — NONCANONICAL OUTCOME&quot;;&quot;CORRECT OUTCOME TO CANONICAL CONTROLLED VOCABULARY&quot;;IF([.Z7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4]=&quot;UNKNOWN&quot;;&quot;UNKNOWN&quot;;IF(OR([.Z74]=&quot;BLOCKED — OUTCOME ASSERTED WITHOUT REVIEW ELIGIBILITY&quot;;[.Z74]=&quot;BLOCKED — NONCANONICAL OUTCOME&quot;);&quot;BLOCKED&quot;;IF([.Z7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cell office:value-type="string" table:formula="of:=IF([.U75]=&quot;UNKNOWN&quot;;&quot;COMPLETE OR ASSERT REQUIRED EVIDENCE BEFORE REVIEW&quot;;IF([.U75]=&quot;BLOCKED&quot;;&quot;RESOLVE CONTRADICTION BEFORE REVIEW — NO AUTHORITY CREATED&quot;;IF([.U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5]=&quot;READY FOR REVIEW&quot;;&quot;REVIEW ELIGIBLE — NO AUTHORITY&quot;;IF(OR([.U75]=&quot;UNKNOWN&quot;;[.U75]=&quot;BLOCKED&quot;);&quot;NOT REVIEW ELIGIBLE&quot;;&quot;NOT REVIEW ELIGIBLE&quot;))">
            <text:p>NOT REVIEW ELIGIBLE</text:p>
          </table:table-cell>
          <table:table-cell office:value-type="string" table:formula="of:=IF([.W75]=&quot;NOT REVIEW ELIGIBLE&quot;;&quot;DO NOT BEGIN SETTLEMENT REVIEW — RESOLVE READINESS OR CONTRADICTION CONDITIONS&quot;;IF([.W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5]=&quot;&quot;;&quot;UNKNOWN&quot;;IF([.W75]&lt;&gt;&quot;REVIEW ELIGIBLE — NO AUTHORITY&quot;;&quot;BLOCKED — OUTCOME ASSERTED WITHOUT REVIEW ELIGIBILITY&quot;;IF(OR([.Y75]=&quot;REVIEWED — NO AUTHORITY&quot;;[.Y75]=&quot;REVIEW DEFERRED&quot;;[.Y75]=&quot;REVIEW BLOCKED&quot;);&quot;ACCEPTED INTAKE — NO AUTHORITY&quot;;&quot;BLOCKED — NONCANONICAL OUTCOME&quot;)))">
            <text:p>UNKNOWN</text:p>
          </table:table-cell>
          <table:table-cell office:value-type="string" table:formula="of:=IF([.Z75]=&quot;UNKNOWN&quot;;&quot;NO REVIEW OUTCOME ASSERTED — REMAINS UNKNOWN&quot;;IF([.Z75]=&quot;BLOCKED — OUTCOME ASSERTED WITHOUT REVIEW ELIGIBILITY&quot;;&quot;REMOVE OR CORRECT OUTCOME ASSERTION — REVIEW ELIGIBILITY REQUIRED FIRST&quot;;IF([.Z75]=&quot;BLOCKED — NONCANONICAL OUTCOME&quot;;&quot;CORRECT OUTCOME TO CANONICAL CONTROLLED VOCABULARY&quot;;IF([.Z7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5]=&quot;UNKNOWN&quot;;&quot;UNKNOWN&quot;;IF(OR([.Z75]=&quot;BLOCKED — OUTCOME ASSERTED WITHOUT REVIEW ELIGIBILITY&quot;;[.Z75]=&quot;BLOCKED — NONCANONICAL OUTCOME&quot;);&quot;BLOCKED&quot;;IF([.Z7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cell office:value-type="string" table:formula="of:=IF([.U76]=&quot;UNKNOWN&quot;;&quot;COMPLETE OR ASSERT REQUIRED EVIDENCE BEFORE REVIEW&quot;;IF([.U76]=&quot;BLOCKED&quot;;&quot;RESOLVE CONTRADICTION BEFORE REVIEW — NO AUTHORITY CREATED&quot;;IF([.U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6]=&quot;READY FOR REVIEW&quot;;&quot;REVIEW ELIGIBLE — NO AUTHORITY&quot;;IF(OR([.U76]=&quot;UNKNOWN&quot;;[.U76]=&quot;BLOCKED&quot;);&quot;NOT REVIEW ELIGIBLE&quot;;&quot;NOT REVIEW ELIGIBLE&quot;))">
            <text:p>NOT REVIEW ELIGIBLE</text:p>
          </table:table-cell>
          <table:table-cell office:value-type="string" table:formula="of:=IF([.W76]=&quot;NOT REVIEW ELIGIBLE&quot;;&quot;DO NOT BEGIN SETTLEMENT REVIEW — RESOLVE READINESS OR CONTRADICTION CONDITIONS&quot;;IF([.W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6]=&quot;&quot;;&quot;UNKNOWN&quot;;IF([.W76]&lt;&gt;&quot;REVIEW ELIGIBLE — NO AUTHORITY&quot;;&quot;BLOCKED — OUTCOME ASSERTED WITHOUT REVIEW ELIGIBILITY&quot;;IF(OR([.Y76]=&quot;REVIEWED — NO AUTHORITY&quot;;[.Y76]=&quot;REVIEW DEFERRED&quot;;[.Y76]=&quot;REVIEW BLOCKED&quot;);&quot;ACCEPTED INTAKE — NO AUTHORITY&quot;;&quot;BLOCKED — NONCANONICAL OUTCOME&quot;)))">
            <text:p>UNKNOWN</text:p>
          </table:table-cell>
          <table:table-cell office:value-type="string" table:formula="of:=IF([.Z76]=&quot;UNKNOWN&quot;;&quot;NO REVIEW OUTCOME ASSERTED — REMAINS UNKNOWN&quot;;IF([.Z76]=&quot;BLOCKED — OUTCOME ASSERTED WITHOUT REVIEW ELIGIBILITY&quot;;&quot;REMOVE OR CORRECT OUTCOME ASSERTION — REVIEW ELIGIBILITY REQUIRED FIRST&quot;;IF([.Z76]=&quot;BLOCKED — NONCANONICAL OUTCOME&quot;;&quot;CORRECT OUTCOME TO CANONICAL CONTROLLED VOCABULARY&quot;;IF([.Z7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6]=&quot;UNKNOWN&quot;;&quot;UNKNOWN&quot;;IF(OR([.Z76]=&quot;BLOCKED — OUTCOME ASSERTED WITHOUT REVIEW ELIGIBILITY&quot;;[.Z76]=&quot;BLOCKED — NONCANONICAL OUTCOME&quot;);&quot;BLOCKED&quot;;IF([.Z7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cell office:value-type="string" table:formula="of:=IF([.U77]=&quot;UNKNOWN&quot;;&quot;COMPLETE OR ASSERT REQUIRED EVIDENCE BEFORE REVIEW&quot;;IF([.U77]=&quot;BLOCKED&quot;;&quot;RESOLVE CONTRADICTION BEFORE REVIEW — NO AUTHORITY CREATED&quot;;IF([.U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7]=&quot;READY FOR REVIEW&quot;;&quot;REVIEW ELIGIBLE — NO AUTHORITY&quot;;IF(OR([.U77]=&quot;UNKNOWN&quot;;[.U77]=&quot;BLOCKED&quot;);&quot;NOT REVIEW ELIGIBLE&quot;;&quot;NOT REVIEW ELIGIBLE&quot;))">
            <text:p>NOT REVIEW ELIGIBLE</text:p>
          </table:table-cell>
          <table:table-cell office:value-type="string" table:formula="of:=IF([.W77]=&quot;NOT REVIEW ELIGIBLE&quot;;&quot;DO NOT BEGIN SETTLEMENT REVIEW — RESOLVE READINESS OR CONTRADICTION CONDITIONS&quot;;IF([.W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7]=&quot;&quot;;&quot;UNKNOWN&quot;;IF([.W77]&lt;&gt;&quot;REVIEW ELIGIBLE — NO AUTHORITY&quot;;&quot;BLOCKED — OUTCOME ASSERTED WITHOUT REVIEW ELIGIBILITY&quot;;IF(OR([.Y77]=&quot;REVIEWED — NO AUTHORITY&quot;;[.Y77]=&quot;REVIEW DEFERRED&quot;;[.Y77]=&quot;REVIEW BLOCKED&quot;);&quot;ACCEPTED INTAKE — NO AUTHORITY&quot;;&quot;BLOCKED — NONCANONICAL OUTCOME&quot;)))">
            <text:p>UNKNOWN</text:p>
          </table:table-cell>
          <table:table-cell office:value-type="string" table:formula="of:=IF([.Z77]=&quot;UNKNOWN&quot;;&quot;NO REVIEW OUTCOME ASSERTED — REMAINS UNKNOWN&quot;;IF([.Z77]=&quot;BLOCKED — OUTCOME ASSERTED WITHOUT REVIEW ELIGIBILITY&quot;;&quot;REMOVE OR CORRECT OUTCOME ASSERTION — REVIEW ELIGIBILITY REQUIRED FIRST&quot;;IF([.Z77]=&quot;BLOCKED — NONCANONICAL OUTCOME&quot;;&quot;CORRECT OUTCOME TO CANONICAL CONTROLLED VOCABULARY&quot;;IF([.Z7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7]=&quot;UNKNOWN&quot;;&quot;UNKNOWN&quot;;IF(OR([.Z77]=&quot;BLOCKED — OUTCOME ASSERTED WITHOUT REVIEW ELIGIBILITY&quot;;[.Z77]=&quot;BLOCKED — NONCANONICAL OUTCOME&quot;);&quot;BLOCKED&quot;;IF([.Z7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cell office:value-type="string" table:formula="of:=IF([.U78]=&quot;UNKNOWN&quot;;&quot;COMPLETE OR ASSERT REQUIRED EVIDENCE BEFORE REVIEW&quot;;IF([.U78]=&quot;BLOCKED&quot;;&quot;RESOLVE CONTRADICTION BEFORE REVIEW — NO AUTHORITY CREATED&quot;;IF([.U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8]=&quot;READY FOR REVIEW&quot;;&quot;REVIEW ELIGIBLE — NO AUTHORITY&quot;;IF(OR([.U78]=&quot;UNKNOWN&quot;;[.U78]=&quot;BLOCKED&quot;);&quot;NOT REVIEW ELIGIBLE&quot;;&quot;NOT REVIEW ELIGIBLE&quot;))">
            <text:p>NOT REVIEW ELIGIBLE</text:p>
          </table:table-cell>
          <table:table-cell office:value-type="string" table:formula="of:=IF([.W78]=&quot;NOT REVIEW ELIGIBLE&quot;;&quot;DO NOT BEGIN SETTLEMENT REVIEW — RESOLVE READINESS OR CONTRADICTION CONDITIONS&quot;;IF([.W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8]=&quot;&quot;;&quot;UNKNOWN&quot;;IF([.W78]&lt;&gt;&quot;REVIEW ELIGIBLE — NO AUTHORITY&quot;;&quot;BLOCKED — OUTCOME ASSERTED WITHOUT REVIEW ELIGIBILITY&quot;;IF(OR([.Y78]=&quot;REVIEWED — NO AUTHORITY&quot;;[.Y78]=&quot;REVIEW DEFERRED&quot;;[.Y78]=&quot;REVIEW BLOCKED&quot;);&quot;ACCEPTED INTAKE — NO AUTHORITY&quot;;&quot;BLOCKED — NONCANONICAL OUTCOME&quot;)))">
            <text:p>UNKNOWN</text:p>
          </table:table-cell>
          <table:table-cell office:value-type="string" table:formula="of:=IF([.Z78]=&quot;UNKNOWN&quot;;&quot;NO REVIEW OUTCOME ASSERTED — REMAINS UNKNOWN&quot;;IF([.Z78]=&quot;BLOCKED — OUTCOME ASSERTED WITHOUT REVIEW ELIGIBILITY&quot;;&quot;REMOVE OR CORRECT OUTCOME ASSERTION — REVIEW ELIGIBILITY REQUIRED FIRST&quot;;IF([.Z78]=&quot;BLOCKED — NONCANONICAL OUTCOME&quot;;&quot;CORRECT OUTCOME TO CANONICAL CONTROLLED VOCABULARY&quot;;IF([.Z7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8]=&quot;UNKNOWN&quot;;&quot;UNKNOWN&quot;;IF(OR([.Z78]=&quot;BLOCKED — OUTCOME ASSERTED WITHOUT REVIEW ELIGIBILITY&quot;;[.Z78]=&quot;BLOCKED — NONCANONICAL OUTCOME&quot;);&quot;BLOCKED&quot;;IF([.Z7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cell office:value-type="string" table:formula="of:=IF([.U79]=&quot;UNKNOWN&quot;;&quot;COMPLETE OR ASSERT REQUIRED EVIDENCE BEFORE REVIEW&quot;;IF([.U79]=&quot;BLOCKED&quot;;&quot;RESOLVE CONTRADICTION BEFORE REVIEW — NO AUTHORITY CREATED&quot;;IF([.U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9]=&quot;READY FOR REVIEW&quot;;&quot;REVIEW ELIGIBLE — NO AUTHORITY&quot;;IF(OR([.U79]=&quot;UNKNOWN&quot;;[.U79]=&quot;BLOCKED&quot;);&quot;NOT REVIEW ELIGIBLE&quot;;&quot;NOT REVIEW ELIGIBLE&quot;))">
            <text:p>NOT REVIEW ELIGIBLE</text:p>
          </table:table-cell>
          <table:table-cell office:value-type="string" table:formula="of:=IF([.W79]=&quot;NOT REVIEW ELIGIBLE&quot;;&quot;DO NOT BEGIN SETTLEMENT REVIEW — RESOLVE READINESS OR CONTRADICTION CONDITIONS&quot;;IF([.W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9]=&quot;&quot;;&quot;UNKNOWN&quot;;IF([.W79]&lt;&gt;&quot;REVIEW ELIGIBLE — NO AUTHORITY&quot;;&quot;BLOCKED — OUTCOME ASSERTED WITHOUT REVIEW ELIGIBILITY&quot;;IF(OR([.Y79]=&quot;REVIEWED — NO AUTHORITY&quot;;[.Y79]=&quot;REVIEW DEFERRED&quot;;[.Y79]=&quot;REVIEW BLOCKED&quot;);&quot;ACCEPTED INTAKE — NO AUTHORITY&quot;;&quot;BLOCKED — NONCANONICAL OUTCOME&quot;)))">
            <text:p>UNKNOWN</text:p>
          </table:table-cell>
          <table:table-cell office:value-type="string" table:formula="of:=IF([.Z79]=&quot;UNKNOWN&quot;;&quot;NO REVIEW OUTCOME ASSERTED — REMAINS UNKNOWN&quot;;IF([.Z79]=&quot;BLOCKED — OUTCOME ASSERTED WITHOUT REVIEW ELIGIBILITY&quot;;&quot;REMOVE OR CORRECT OUTCOME ASSERTION — REVIEW ELIGIBILITY REQUIRED FIRST&quot;;IF([.Z79]=&quot;BLOCKED — NONCANONICAL OUTCOME&quot;;&quot;CORRECT OUTCOME TO CANONICAL CONTROLLED VOCABULARY&quot;;IF([.Z7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79]=&quot;UNKNOWN&quot;;&quot;UNKNOWN&quot;;IF(OR([.Z79]=&quot;BLOCKED — OUTCOME ASSERTED WITHOUT REVIEW ELIGIBILITY&quot;;[.Z79]=&quot;BLOCKED — NONCANONICAL OUTCOME&quot;);&quot;BLOCKED&quot;;IF([.Z7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cell office:value-type="string" table:formula="of:=IF([.U80]=&quot;UNKNOWN&quot;;&quot;COMPLETE OR ASSERT REQUIRED EVIDENCE BEFORE REVIEW&quot;;IF([.U80]=&quot;BLOCKED&quot;;&quot;RESOLVE CONTRADICTION BEFORE REVIEW — NO AUTHORITY CREATED&quot;;IF([.U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0]=&quot;READY FOR REVIEW&quot;;&quot;REVIEW ELIGIBLE — NO AUTHORITY&quot;;IF(OR([.U80]=&quot;UNKNOWN&quot;;[.U80]=&quot;BLOCKED&quot;);&quot;NOT REVIEW ELIGIBLE&quot;;&quot;NOT REVIEW ELIGIBLE&quot;))">
            <text:p>NOT REVIEW ELIGIBLE</text:p>
          </table:table-cell>
          <table:table-cell office:value-type="string" table:formula="of:=IF([.W80]=&quot;NOT REVIEW ELIGIBLE&quot;;&quot;DO NOT BEGIN SETTLEMENT REVIEW — RESOLVE READINESS OR CONTRADICTION CONDITIONS&quot;;IF([.W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0]=&quot;&quot;;&quot;UNKNOWN&quot;;IF([.W80]&lt;&gt;&quot;REVIEW ELIGIBLE — NO AUTHORITY&quot;;&quot;BLOCKED — OUTCOME ASSERTED WITHOUT REVIEW ELIGIBILITY&quot;;IF(OR([.Y80]=&quot;REVIEWED — NO AUTHORITY&quot;;[.Y80]=&quot;REVIEW DEFERRED&quot;;[.Y80]=&quot;REVIEW BLOCKED&quot;);&quot;ACCEPTED INTAKE — NO AUTHORITY&quot;;&quot;BLOCKED — NONCANONICAL OUTCOME&quot;)))">
            <text:p>UNKNOWN</text:p>
          </table:table-cell>
          <table:table-cell office:value-type="string" table:formula="of:=IF([.Z80]=&quot;UNKNOWN&quot;;&quot;NO REVIEW OUTCOME ASSERTED — REMAINS UNKNOWN&quot;;IF([.Z80]=&quot;BLOCKED — OUTCOME ASSERTED WITHOUT REVIEW ELIGIBILITY&quot;;&quot;REMOVE OR CORRECT OUTCOME ASSERTION — REVIEW ELIGIBILITY REQUIRED FIRST&quot;;IF([.Z80]=&quot;BLOCKED — NONCANONICAL OUTCOME&quot;;&quot;CORRECT OUTCOME TO CANONICAL CONTROLLED VOCABULARY&quot;;IF([.Z8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0]=&quot;UNKNOWN&quot;;&quot;UNKNOWN&quot;;IF(OR([.Z80]=&quot;BLOCKED — OUTCOME ASSERTED WITHOUT REVIEW ELIGIBILITY&quot;;[.Z80]=&quot;BLOCKED — NONCANONICAL OUTCOME&quot;);&quot;BLOCKED&quot;;IF([.Z8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cell office:value-type="string" table:formula="of:=IF([.U81]=&quot;UNKNOWN&quot;;&quot;COMPLETE OR ASSERT REQUIRED EVIDENCE BEFORE REVIEW&quot;;IF([.U81]=&quot;BLOCKED&quot;;&quot;RESOLVE CONTRADICTION BEFORE REVIEW — NO AUTHORITY CREATED&quot;;IF([.U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1]=&quot;READY FOR REVIEW&quot;;&quot;REVIEW ELIGIBLE — NO AUTHORITY&quot;;IF(OR([.U81]=&quot;UNKNOWN&quot;;[.U81]=&quot;BLOCKED&quot;);&quot;NOT REVIEW ELIGIBLE&quot;;&quot;NOT REVIEW ELIGIBLE&quot;))">
            <text:p>NOT REVIEW ELIGIBLE</text:p>
          </table:table-cell>
          <table:table-cell office:value-type="string" table:formula="of:=IF([.W81]=&quot;NOT REVIEW ELIGIBLE&quot;;&quot;DO NOT BEGIN SETTLEMENT REVIEW — RESOLVE READINESS OR CONTRADICTION CONDITIONS&quot;;IF([.W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1]=&quot;&quot;;&quot;UNKNOWN&quot;;IF([.W81]&lt;&gt;&quot;REVIEW ELIGIBLE — NO AUTHORITY&quot;;&quot;BLOCKED — OUTCOME ASSERTED WITHOUT REVIEW ELIGIBILITY&quot;;IF(OR([.Y81]=&quot;REVIEWED — NO AUTHORITY&quot;;[.Y81]=&quot;REVIEW DEFERRED&quot;;[.Y81]=&quot;REVIEW BLOCKED&quot;);&quot;ACCEPTED INTAKE — NO AUTHORITY&quot;;&quot;BLOCKED — NONCANONICAL OUTCOME&quot;)))">
            <text:p>UNKNOWN</text:p>
          </table:table-cell>
          <table:table-cell office:value-type="string" table:formula="of:=IF([.Z81]=&quot;UNKNOWN&quot;;&quot;NO REVIEW OUTCOME ASSERTED — REMAINS UNKNOWN&quot;;IF([.Z81]=&quot;BLOCKED — OUTCOME ASSERTED WITHOUT REVIEW ELIGIBILITY&quot;;&quot;REMOVE OR CORRECT OUTCOME ASSERTION — REVIEW ELIGIBILITY REQUIRED FIRST&quot;;IF([.Z81]=&quot;BLOCKED — NONCANONICAL OUTCOME&quot;;&quot;CORRECT OUTCOME TO CANONICAL CONTROLLED VOCABULARY&quot;;IF([.Z8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1]=&quot;UNKNOWN&quot;;&quot;UNKNOWN&quot;;IF(OR([.Z81]=&quot;BLOCKED — OUTCOME ASSERTED WITHOUT REVIEW ELIGIBILITY&quot;;[.Z81]=&quot;BLOCKED — NONCANONICAL OUTCOME&quot;);&quot;BLOCKED&quot;;IF([.Z8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cell office:value-type="string" table:formula="of:=IF([.U82]=&quot;UNKNOWN&quot;;&quot;COMPLETE OR ASSERT REQUIRED EVIDENCE BEFORE REVIEW&quot;;IF([.U82]=&quot;BLOCKED&quot;;&quot;RESOLVE CONTRADICTION BEFORE REVIEW — NO AUTHORITY CREATED&quot;;IF([.U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2]=&quot;READY FOR REVIEW&quot;;&quot;REVIEW ELIGIBLE — NO AUTHORITY&quot;;IF(OR([.U82]=&quot;UNKNOWN&quot;;[.U82]=&quot;BLOCKED&quot;);&quot;NOT REVIEW ELIGIBLE&quot;;&quot;NOT REVIEW ELIGIBLE&quot;))">
            <text:p>NOT REVIEW ELIGIBLE</text:p>
          </table:table-cell>
          <table:table-cell office:value-type="string" table:formula="of:=IF([.W82]=&quot;NOT REVIEW ELIGIBLE&quot;;&quot;DO NOT BEGIN SETTLEMENT REVIEW — RESOLVE READINESS OR CONTRADICTION CONDITIONS&quot;;IF([.W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2]=&quot;&quot;;&quot;UNKNOWN&quot;;IF([.W82]&lt;&gt;&quot;REVIEW ELIGIBLE — NO AUTHORITY&quot;;&quot;BLOCKED — OUTCOME ASSERTED WITHOUT REVIEW ELIGIBILITY&quot;;IF(OR([.Y82]=&quot;REVIEWED — NO AUTHORITY&quot;;[.Y82]=&quot;REVIEW DEFERRED&quot;;[.Y82]=&quot;REVIEW BLOCKED&quot;);&quot;ACCEPTED INTAKE — NO AUTHORITY&quot;;&quot;BLOCKED — NONCANONICAL OUTCOME&quot;)))">
            <text:p>UNKNOWN</text:p>
          </table:table-cell>
          <table:table-cell office:value-type="string" table:formula="of:=IF([.Z82]=&quot;UNKNOWN&quot;;&quot;NO REVIEW OUTCOME ASSERTED — REMAINS UNKNOWN&quot;;IF([.Z82]=&quot;BLOCKED — OUTCOME ASSERTED WITHOUT REVIEW ELIGIBILITY&quot;;&quot;REMOVE OR CORRECT OUTCOME ASSERTION — REVIEW ELIGIBILITY REQUIRED FIRST&quot;;IF([.Z82]=&quot;BLOCKED — NONCANONICAL OUTCOME&quot;;&quot;CORRECT OUTCOME TO CANONICAL CONTROLLED VOCABULARY&quot;;IF([.Z8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2]=&quot;UNKNOWN&quot;;&quot;UNKNOWN&quot;;IF(OR([.Z82]=&quot;BLOCKED — OUTCOME ASSERTED WITHOUT REVIEW ELIGIBILITY&quot;;[.Z82]=&quot;BLOCKED — NONCANONICAL OUTCOME&quot;);&quot;BLOCKED&quot;;IF([.Z8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cell office:value-type="string" table:formula="of:=IF([.U83]=&quot;UNKNOWN&quot;;&quot;COMPLETE OR ASSERT REQUIRED EVIDENCE BEFORE REVIEW&quot;;IF([.U83]=&quot;BLOCKED&quot;;&quot;RESOLVE CONTRADICTION BEFORE REVIEW — NO AUTHORITY CREATED&quot;;IF([.U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3]=&quot;READY FOR REVIEW&quot;;&quot;REVIEW ELIGIBLE — NO AUTHORITY&quot;;IF(OR([.U83]=&quot;UNKNOWN&quot;;[.U83]=&quot;BLOCKED&quot;);&quot;NOT REVIEW ELIGIBLE&quot;;&quot;NOT REVIEW ELIGIBLE&quot;))">
            <text:p>NOT REVIEW ELIGIBLE</text:p>
          </table:table-cell>
          <table:table-cell office:value-type="string" table:formula="of:=IF([.W83]=&quot;NOT REVIEW ELIGIBLE&quot;;&quot;DO NOT BEGIN SETTLEMENT REVIEW — RESOLVE READINESS OR CONTRADICTION CONDITIONS&quot;;IF([.W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3]=&quot;&quot;;&quot;UNKNOWN&quot;;IF([.W83]&lt;&gt;&quot;REVIEW ELIGIBLE — NO AUTHORITY&quot;;&quot;BLOCKED — OUTCOME ASSERTED WITHOUT REVIEW ELIGIBILITY&quot;;IF(OR([.Y83]=&quot;REVIEWED — NO AUTHORITY&quot;;[.Y83]=&quot;REVIEW DEFERRED&quot;;[.Y83]=&quot;REVIEW BLOCKED&quot;);&quot;ACCEPTED INTAKE — NO AUTHORITY&quot;;&quot;BLOCKED — NONCANONICAL OUTCOME&quot;)))">
            <text:p>UNKNOWN</text:p>
          </table:table-cell>
          <table:table-cell office:value-type="string" table:formula="of:=IF([.Z83]=&quot;UNKNOWN&quot;;&quot;NO REVIEW OUTCOME ASSERTED — REMAINS UNKNOWN&quot;;IF([.Z83]=&quot;BLOCKED — OUTCOME ASSERTED WITHOUT REVIEW ELIGIBILITY&quot;;&quot;REMOVE OR CORRECT OUTCOME ASSERTION — REVIEW ELIGIBILITY REQUIRED FIRST&quot;;IF([.Z83]=&quot;BLOCKED — NONCANONICAL OUTCOME&quot;;&quot;CORRECT OUTCOME TO CANONICAL CONTROLLED VOCABULARY&quot;;IF([.Z8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3]=&quot;UNKNOWN&quot;;&quot;UNKNOWN&quot;;IF(OR([.Z83]=&quot;BLOCKED — OUTCOME ASSERTED WITHOUT REVIEW ELIGIBILITY&quot;;[.Z83]=&quot;BLOCKED — NONCANONICAL OUTCOME&quot;);&quot;BLOCKED&quot;;IF([.Z8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cell office:value-type="string" table:formula="of:=IF([.U84]=&quot;UNKNOWN&quot;;&quot;COMPLETE OR ASSERT REQUIRED EVIDENCE BEFORE REVIEW&quot;;IF([.U84]=&quot;BLOCKED&quot;;&quot;RESOLVE CONTRADICTION BEFORE REVIEW — NO AUTHORITY CREATED&quot;;IF([.U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4]=&quot;READY FOR REVIEW&quot;;&quot;REVIEW ELIGIBLE — NO AUTHORITY&quot;;IF(OR([.U84]=&quot;UNKNOWN&quot;;[.U84]=&quot;BLOCKED&quot;);&quot;NOT REVIEW ELIGIBLE&quot;;&quot;NOT REVIEW ELIGIBLE&quot;))">
            <text:p>NOT REVIEW ELIGIBLE</text:p>
          </table:table-cell>
          <table:table-cell office:value-type="string" table:formula="of:=IF([.W84]=&quot;NOT REVIEW ELIGIBLE&quot;;&quot;DO NOT BEGIN SETTLEMENT REVIEW — RESOLVE READINESS OR CONTRADICTION CONDITIONS&quot;;IF([.W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4]=&quot;&quot;;&quot;UNKNOWN&quot;;IF([.W84]&lt;&gt;&quot;REVIEW ELIGIBLE — NO AUTHORITY&quot;;&quot;BLOCKED — OUTCOME ASSERTED WITHOUT REVIEW ELIGIBILITY&quot;;IF(OR([.Y84]=&quot;REVIEWED — NO AUTHORITY&quot;;[.Y84]=&quot;REVIEW DEFERRED&quot;;[.Y84]=&quot;REVIEW BLOCKED&quot;);&quot;ACCEPTED INTAKE — NO AUTHORITY&quot;;&quot;BLOCKED — NONCANONICAL OUTCOME&quot;)))">
            <text:p>UNKNOWN</text:p>
          </table:table-cell>
          <table:table-cell office:value-type="string" table:formula="of:=IF([.Z84]=&quot;UNKNOWN&quot;;&quot;NO REVIEW OUTCOME ASSERTED — REMAINS UNKNOWN&quot;;IF([.Z84]=&quot;BLOCKED — OUTCOME ASSERTED WITHOUT REVIEW ELIGIBILITY&quot;;&quot;REMOVE OR CORRECT OUTCOME ASSERTION — REVIEW ELIGIBILITY REQUIRED FIRST&quot;;IF([.Z84]=&quot;BLOCKED — NONCANONICAL OUTCOME&quot;;&quot;CORRECT OUTCOME TO CANONICAL CONTROLLED VOCABULARY&quot;;IF([.Z8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4]=&quot;UNKNOWN&quot;;&quot;UNKNOWN&quot;;IF(OR([.Z84]=&quot;BLOCKED — OUTCOME ASSERTED WITHOUT REVIEW ELIGIBILITY&quot;;[.Z84]=&quot;BLOCKED — NONCANONICAL OUTCOME&quot;);&quot;BLOCKED&quot;;IF([.Z8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cell office:value-type="string" table:formula="of:=IF([.U85]=&quot;UNKNOWN&quot;;&quot;COMPLETE OR ASSERT REQUIRED EVIDENCE BEFORE REVIEW&quot;;IF([.U85]=&quot;BLOCKED&quot;;&quot;RESOLVE CONTRADICTION BEFORE REVIEW — NO AUTHORITY CREATED&quot;;IF([.U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5]=&quot;READY FOR REVIEW&quot;;&quot;REVIEW ELIGIBLE — NO AUTHORITY&quot;;IF(OR([.U85]=&quot;UNKNOWN&quot;;[.U85]=&quot;BLOCKED&quot;);&quot;NOT REVIEW ELIGIBLE&quot;;&quot;NOT REVIEW ELIGIBLE&quot;))">
            <text:p>NOT REVIEW ELIGIBLE</text:p>
          </table:table-cell>
          <table:table-cell office:value-type="string" table:formula="of:=IF([.W85]=&quot;NOT REVIEW ELIGIBLE&quot;;&quot;DO NOT BEGIN SETTLEMENT REVIEW — RESOLVE READINESS OR CONTRADICTION CONDITIONS&quot;;IF([.W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5]=&quot;&quot;;&quot;UNKNOWN&quot;;IF([.W85]&lt;&gt;&quot;REVIEW ELIGIBLE — NO AUTHORITY&quot;;&quot;BLOCKED — OUTCOME ASSERTED WITHOUT REVIEW ELIGIBILITY&quot;;IF(OR([.Y85]=&quot;REVIEWED — NO AUTHORITY&quot;;[.Y85]=&quot;REVIEW DEFERRED&quot;;[.Y85]=&quot;REVIEW BLOCKED&quot;);&quot;ACCEPTED INTAKE — NO AUTHORITY&quot;;&quot;BLOCKED — NONCANONICAL OUTCOME&quot;)))">
            <text:p>UNKNOWN</text:p>
          </table:table-cell>
          <table:table-cell office:value-type="string" table:formula="of:=IF([.Z85]=&quot;UNKNOWN&quot;;&quot;NO REVIEW OUTCOME ASSERTED — REMAINS UNKNOWN&quot;;IF([.Z85]=&quot;BLOCKED — OUTCOME ASSERTED WITHOUT REVIEW ELIGIBILITY&quot;;&quot;REMOVE OR CORRECT OUTCOME ASSERTION — REVIEW ELIGIBILITY REQUIRED FIRST&quot;;IF([.Z85]=&quot;BLOCKED — NONCANONICAL OUTCOME&quot;;&quot;CORRECT OUTCOME TO CANONICAL CONTROLLED VOCABULARY&quot;;IF([.Z8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5]=&quot;UNKNOWN&quot;;&quot;UNKNOWN&quot;;IF(OR([.Z85]=&quot;BLOCKED — OUTCOME ASSERTED WITHOUT REVIEW ELIGIBILITY&quot;;[.Z85]=&quot;BLOCKED — NONCANONICAL OUTCOME&quot;);&quot;BLOCKED&quot;;IF([.Z8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cell office:value-type="string" table:formula="of:=IF([.U86]=&quot;UNKNOWN&quot;;&quot;COMPLETE OR ASSERT REQUIRED EVIDENCE BEFORE REVIEW&quot;;IF([.U86]=&quot;BLOCKED&quot;;&quot;RESOLVE CONTRADICTION BEFORE REVIEW — NO AUTHORITY CREATED&quot;;IF([.U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6]=&quot;READY FOR REVIEW&quot;;&quot;REVIEW ELIGIBLE — NO AUTHORITY&quot;;IF(OR([.U86]=&quot;UNKNOWN&quot;;[.U86]=&quot;BLOCKED&quot;);&quot;NOT REVIEW ELIGIBLE&quot;;&quot;NOT REVIEW ELIGIBLE&quot;))">
            <text:p>NOT REVIEW ELIGIBLE</text:p>
          </table:table-cell>
          <table:table-cell office:value-type="string" table:formula="of:=IF([.W86]=&quot;NOT REVIEW ELIGIBLE&quot;;&quot;DO NOT BEGIN SETTLEMENT REVIEW — RESOLVE READINESS OR CONTRADICTION CONDITIONS&quot;;IF([.W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6]=&quot;&quot;;&quot;UNKNOWN&quot;;IF([.W86]&lt;&gt;&quot;REVIEW ELIGIBLE — NO AUTHORITY&quot;;&quot;BLOCKED — OUTCOME ASSERTED WITHOUT REVIEW ELIGIBILITY&quot;;IF(OR([.Y86]=&quot;REVIEWED — NO AUTHORITY&quot;;[.Y86]=&quot;REVIEW DEFERRED&quot;;[.Y86]=&quot;REVIEW BLOCKED&quot;);&quot;ACCEPTED INTAKE — NO AUTHORITY&quot;;&quot;BLOCKED — NONCANONICAL OUTCOME&quot;)))">
            <text:p>UNKNOWN</text:p>
          </table:table-cell>
          <table:table-cell office:value-type="string" table:formula="of:=IF([.Z86]=&quot;UNKNOWN&quot;;&quot;NO REVIEW OUTCOME ASSERTED — REMAINS UNKNOWN&quot;;IF([.Z86]=&quot;BLOCKED — OUTCOME ASSERTED WITHOUT REVIEW ELIGIBILITY&quot;;&quot;REMOVE OR CORRECT OUTCOME ASSERTION — REVIEW ELIGIBILITY REQUIRED FIRST&quot;;IF([.Z86]=&quot;BLOCKED — NONCANONICAL OUTCOME&quot;;&quot;CORRECT OUTCOME TO CANONICAL CONTROLLED VOCABULARY&quot;;IF([.Z8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6]=&quot;UNKNOWN&quot;;&quot;UNKNOWN&quot;;IF(OR([.Z86]=&quot;BLOCKED — OUTCOME ASSERTED WITHOUT REVIEW ELIGIBILITY&quot;;[.Z86]=&quot;BLOCKED — NONCANONICAL OUTCOME&quot;);&quot;BLOCKED&quot;;IF([.Z8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cell office:value-type="string" table:formula="of:=IF([.U87]=&quot;UNKNOWN&quot;;&quot;COMPLETE OR ASSERT REQUIRED EVIDENCE BEFORE REVIEW&quot;;IF([.U87]=&quot;BLOCKED&quot;;&quot;RESOLVE CONTRADICTION BEFORE REVIEW — NO AUTHORITY CREATED&quot;;IF([.U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7]=&quot;READY FOR REVIEW&quot;;&quot;REVIEW ELIGIBLE — NO AUTHORITY&quot;;IF(OR([.U87]=&quot;UNKNOWN&quot;;[.U87]=&quot;BLOCKED&quot;);&quot;NOT REVIEW ELIGIBLE&quot;;&quot;NOT REVIEW ELIGIBLE&quot;))">
            <text:p>NOT REVIEW ELIGIBLE</text:p>
          </table:table-cell>
          <table:table-cell office:value-type="string" table:formula="of:=IF([.W87]=&quot;NOT REVIEW ELIGIBLE&quot;;&quot;DO NOT BEGIN SETTLEMENT REVIEW — RESOLVE READINESS OR CONTRADICTION CONDITIONS&quot;;IF([.W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7]=&quot;&quot;;&quot;UNKNOWN&quot;;IF([.W87]&lt;&gt;&quot;REVIEW ELIGIBLE — NO AUTHORITY&quot;;&quot;BLOCKED — OUTCOME ASSERTED WITHOUT REVIEW ELIGIBILITY&quot;;IF(OR([.Y87]=&quot;REVIEWED — NO AUTHORITY&quot;;[.Y87]=&quot;REVIEW DEFERRED&quot;;[.Y87]=&quot;REVIEW BLOCKED&quot;);&quot;ACCEPTED INTAKE — NO AUTHORITY&quot;;&quot;BLOCKED — NONCANONICAL OUTCOME&quot;)))">
            <text:p>UNKNOWN</text:p>
          </table:table-cell>
          <table:table-cell office:value-type="string" table:formula="of:=IF([.Z87]=&quot;UNKNOWN&quot;;&quot;NO REVIEW OUTCOME ASSERTED — REMAINS UNKNOWN&quot;;IF([.Z87]=&quot;BLOCKED — OUTCOME ASSERTED WITHOUT REVIEW ELIGIBILITY&quot;;&quot;REMOVE OR CORRECT OUTCOME ASSERTION — REVIEW ELIGIBILITY REQUIRED FIRST&quot;;IF([.Z87]=&quot;BLOCKED — NONCANONICAL OUTCOME&quot;;&quot;CORRECT OUTCOME TO CANONICAL CONTROLLED VOCABULARY&quot;;IF([.Z8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7]=&quot;UNKNOWN&quot;;&quot;UNKNOWN&quot;;IF(OR([.Z87]=&quot;BLOCKED — OUTCOME ASSERTED WITHOUT REVIEW ELIGIBILITY&quot;;[.Z87]=&quot;BLOCKED — NONCANONICAL OUTCOME&quot;);&quot;BLOCKED&quot;;IF([.Z8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cell office:value-type="string" table:formula="of:=IF([.U88]=&quot;UNKNOWN&quot;;&quot;COMPLETE OR ASSERT REQUIRED EVIDENCE BEFORE REVIEW&quot;;IF([.U88]=&quot;BLOCKED&quot;;&quot;RESOLVE CONTRADICTION BEFORE REVIEW — NO AUTHORITY CREATED&quot;;IF([.U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8]=&quot;READY FOR REVIEW&quot;;&quot;REVIEW ELIGIBLE — NO AUTHORITY&quot;;IF(OR([.U88]=&quot;UNKNOWN&quot;;[.U88]=&quot;BLOCKED&quot;);&quot;NOT REVIEW ELIGIBLE&quot;;&quot;NOT REVIEW ELIGIBLE&quot;))">
            <text:p>NOT REVIEW ELIGIBLE</text:p>
          </table:table-cell>
          <table:table-cell office:value-type="string" table:formula="of:=IF([.W88]=&quot;NOT REVIEW ELIGIBLE&quot;;&quot;DO NOT BEGIN SETTLEMENT REVIEW — RESOLVE READINESS OR CONTRADICTION CONDITIONS&quot;;IF([.W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8]=&quot;&quot;;&quot;UNKNOWN&quot;;IF([.W88]&lt;&gt;&quot;REVIEW ELIGIBLE — NO AUTHORITY&quot;;&quot;BLOCKED — OUTCOME ASSERTED WITHOUT REVIEW ELIGIBILITY&quot;;IF(OR([.Y88]=&quot;REVIEWED — NO AUTHORITY&quot;;[.Y88]=&quot;REVIEW DEFERRED&quot;;[.Y88]=&quot;REVIEW BLOCKED&quot;);&quot;ACCEPTED INTAKE — NO AUTHORITY&quot;;&quot;BLOCKED — NONCANONICAL OUTCOME&quot;)))">
            <text:p>UNKNOWN</text:p>
          </table:table-cell>
          <table:table-cell office:value-type="string" table:formula="of:=IF([.Z88]=&quot;UNKNOWN&quot;;&quot;NO REVIEW OUTCOME ASSERTED — REMAINS UNKNOWN&quot;;IF([.Z88]=&quot;BLOCKED — OUTCOME ASSERTED WITHOUT REVIEW ELIGIBILITY&quot;;&quot;REMOVE OR CORRECT OUTCOME ASSERTION — REVIEW ELIGIBILITY REQUIRED FIRST&quot;;IF([.Z88]=&quot;BLOCKED — NONCANONICAL OUTCOME&quot;;&quot;CORRECT OUTCOME TO CANONICAL CONTROLLED VOCABULARY&quot;;IF([.Z8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8]=&quot;UNKNOWN&quot;;&quot;UNKNOWN&quot;;IF(OR([.Z88]=&quot;BLOCKED — OUTCOME ASSERTED WITHOUT REVIEW ELIGIBILITY&quot;;[.Z88]=&quot;BLOCKED — NONCANONICAL OUTCOME&quot;);&quot;BLOCKED&quot;;IF([.Z8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cell office:value-type="string" table:formula="of:=IF([.U89]=&quot;UNKNOWN&quot;;&quot;COMPLETE OR ASSERT REQUIRED EVIDENCE BEFORE REVIEW&quot;;IF([.U89]=&quot;BLOCKED&quot;;&quot;RESOLVE CONTRADICTION BEFORE REVIEW — NO AUTHORITY CREATED&quot;;IF([.U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9]=&quot;READY FOR REVIEW&quot;;&quot;REVIEW ELIGIBLE — NO AUTHORITY&quot;;IF(OR([.U89]=&quot;UNKNOWN&quot;;[.U89]=&quot;BLOCKED&quot;);&quot;NOT REVIEW ELIGIBLE&quot;;&quot;NOT REVIEW ELIGIBLE&quot;))">
            <text:p>NOT REVIEW ELIGIBLE</text:p>
          </table:table-cell>
          <table:table-cell office:value-type="string" table:formula="of:=IF([.W89]=&quot;NOT REVIEW ELIGIBLE&quot;;&quot;DO NOT BEGIN SETTLEMENT REVIEW — RESOLVE READINESS OR CONTRADICTION CONDITIONS&quot;;IF([.W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9]=&quot;&quot;;&quot;UNKNOWN&quot;;IF([.W89]&lt;&gt;&quot;REVIEW ELIGIBLE — NO AUTHORITY&quot;;&quot;BLOCKED — OUTCOME ASSERTED WITHOUT REVIEW ELIGIBILITY&quot;;IF(OR([.Y89]=&quot;REVIEWED — NO AUTHORITY&quot;;[.Y89]=&quot;REVIEW DEFERRED&quot;;[.Y89]=&quot;REVIEW BLOCKED&quot;);&quot;ACCEPTED INTAKE — NO AUTHORITY&quot;;&quot;BLOCKED — NONCANONICAL OUTCOME&quot;)))">
            <text:p>UNKNOWN</text:p>
          </table:table-cell>
          <table:table-cell office:value-type="string" table:formula="of:=IF([.Z89]=&quot;UNKNOWN&quot;;&quot;NO REVIEW OUTCOME ASSERTED — REMAINS UNKNOWN&quot;;IF([.Z89]=&quot;BLOCKED — OUTCOME ASSERTED WITHOUT REVIEW ELIGIBILITY&quot;;&quot;REMOVE OR CORRECT OUTCOME ASSERTION — REVIEW ELIGIBILITY REQUIRED FIRST&quot;;IF([.Z89]=&quot;BLOCKED — NONCANONICAL OUTCOME&quot;;&quot;CORRECT OUTCOME TO CANONICAL CONTROLLED VOCABULARY&quot;;IF([.Z8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89]=&quot;UNKNOWN&quot;;&quot;UNKNOWN&quot;;IF(OR([.Z89]=&quot;BLOCKED — OUTCOME ASSERTED WITHOUT REVIEW ELIGIBILITY&quot;;[.Z89]=&quot;BLOCKED — NONCANONICAL OUTCOME&quot;);&quot;BLOCKED&quot;;IF([.Z8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cell office:value-type="string" table:formula="of:=IF([.U90]=&quot;UNKNOWN&quot;;&quot;COMPLETE OR ASSERT REQUIRED EVIDENCE BEFORE REVIEW&quot;;IF([.U90]=&quot;BLOCKED&quot;;&quot;RESOLVE CONTRADICTION BEFORE REVIEW — NO AUTHORITY CREATED&quot;;IF([.U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0]=&quot;READY FOR REVIEW&quot;;&quot;REVIEW ELIGIBLE — NO AUTHORITY&quot;;IF(OR([.U90]=&quot;UNKNOWN&quot;;[.U90]=&quot;BLOCKED&quot;);&quot;NOT REVIEW ELIGIBLE&quot;;&quot;NOT REVIEW ELIGIBLE&quot;))">
            <text:p>NOT REVIEW ELIGIBLE</text:p>
          </table:table-cell>
          <table:table-cell office:value-type="string" table:formula="of:=IF([.W90]=&quot;NOT REVIEW ELIGIBLE&quot;;&quot;DO NOT BEGIN SETTLEMENT REVIEW — RESOLVE READINESS OR CONTRADICTION CONDITIONS&quot;;IF([.W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0]=&quot;&quot;;&quot;UNKNOWN&quot;;IF([.W90]&lt;&gt;&quot;REVIEW ELIGIBLE — NO AUTHORITY&quot;;&quot;BLOCKED — OUTCOME ASSERTED WITHOUT REVIEW ELIGIBILITY&quot;;IF(OR([.Y90]=&quot;REVIEWED — NO AUTHORITY&quot;;[.Y90]=&quot;REVIEW DEFERRED&quot;;[.Y90]=&quot;REVIEW BLOCKED&quot;);&quot;ACCEPTED INTAKE — NO AUTHORITY&quot;;&quot;BLOCKED — NONCANONICAL OUTCOME&quot;)))">
            <text:p>UNKNOWN</text:p>
          </table:table-cell>
          <table:table-cell office:value-type="string" table:formula="of:=IF([.Z90]=&quot;UNKNOWN&quot;;&quot;NO REVIEW OUTCOME ASSERTED — REMAINS UNKNOWN&quot;;IF([.Z90]=&quot;BLOCKED — OUTCOME ASSERTED WITHOUT REVIEW ELIGIBILITY&quot;;&quot;REMOVE OR CORRECT OUTCOME ASSERTION — REVIEW ELIGIBILITY REQUIRED FIRST&quot;;IF([.Z90]=&quot;BLOCKED — NONCANONICAL OUTCOME&quot;;&quot;CORRECT OUTCOME TO CANONICAL CONTROLLED VOCABULARY&quot;;IF([.Z9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0]=&quot;UNKNOWN&quot;;&quot;UNKNOWN&quot;;IF(OR([.Z90]=&quot;BLOCKED — OUTCOME ASSERTED WITHOUT REVIEW ELIGIBILITY&quot;;[.Z90]=&quot;BLOCKED — NONCANONICAL OUTCOME&quot;);&quot;BLOCKED&quot;;IF([.Z9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cell office:value-type="string" table:formula="of:=IF([.U91]=&quot;UNKNOWN&quot;;&quot;COMPLETE OR ASSERT REQUIRED EVIDENCE BEFORE REVIEW&quot;;IF([.U91]=&quot;BLOCKED&quot;;&quot;RESOLVE CONTRADICTION BEFORE REVIEW — NO AUTHORITY CREATED&quot;;IF([.U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1]=&quot;READY FOR REVIEW&quot;;&quot;REVIEW ELIGIBLE — NO AUTHORITY&quot;;IF(OR([.U91]=&quot;UNKNOWN&quot;;[.U91]=&quot;BLOCKED&quot;);&quot;NOT REVIEW ELIGIBLE&quot;;&quot;NOT REVIEW ELIGIBLE&quot;))">
            <text:p>NOT REVIEW ELIGIBLE</text:p>
          </table:table-cell>
          <table:table-cell office:value-type="string" table:formula="of:=IF([.W91]=&quot;NOT REVIEW ELIGIBLE&quot;;&quot;DO NOT BEGIN SETTLEMENT REVIEW — RESOLVE READINESS OR CONTRADICTION CONDITIONS&quot;;IF([.W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1]=&quot;&quot;;&quot;UNKNOWN&quot;;IF([.W91]&lt;&gt;&quot;REVIEW ELIGIBLE — NO AUTHORITY&quot;;&quot;BLOCKED — OUTCOME ASSERTED WITHOUT REVIEW ELIGIBILITY&quot;;IF(OR([.Y91]=&quot;REVIEWED — NO AUTHORITY&quot;;[.Y91]=&quot;REVIEW DEFERRED&quot;;[.Y91]=&quot;REVIEW BLOCKED&quot;);&quot;ACCEPTED INTAKE — NO AUTHORITY&quot;;&quot;BLOCKED — NONCANONICAL OUTCOME&quot;)))">
            <text:p>UNKNOWN</text:p>
          </table:table-cell>
          <table:table-cell office:value-type="string" table:formula="of:=IF([.Z91]=&quot;UNKNOWN&quot;;&quot;NO REVIEW OUTCOME ASSERTED — REMAINS UNKNOWN&quot;;IF([.Z91]=&quot;BLOCKED — OUTCOME ASSERTED WITHOUT REVIEW ELIGIBILITY&quot;;&quot;REMOVE OR CORRECT OUTCOME ASSERTION — REVIEW ELIGIBILITY REQUIRED FIRST&quot;;IF([.Z91]=&quot;BLOCKED — NONCANONICAL OUTCOME&quot;;&quot;CORRECT OUTCOME TO CANONICAL CONTROLLED VOCABULARY&quot;;IF([.Z9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1]=&quot;UNKNOWN&quot;;&quot;UNKNOWN&quot;;IF(OR([.Z91]=&quot;BLOCKED — OUTCOME ASSERTED WITHOUT REVIEW ELIGIBILITY&quot;;[.Z91]=&quot;BLOCKED — NONCANONICAL OUTCOME&quot;);&quot;BLOCKED&quot;;IF([.Z9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cell office:value-type="string" table:formula="of:=IF([.U92]=&quot;UNKNOWN&quot;;&quot;COMPLETE OR ASSERT REQUIRED EVIDENCE BEFORE REVIEW&quot;;IF([.U92]=&quot;BLOCKED&quot;;&quot;RESOLVE CONTRADICTION BEFORE REVIEW — NO AUTHORITY CREATED&quot;;IF([.U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2]=&quot;READY FOR REVIEW&quot;;&quot;REVIEW ELIGIBLE — NO AUTHORITY&quot;;IF(OR([.U92]=&quot;UNKNOWN&quot;;[.U92]=&quot;BLOCKED&quot;);&quot;NOT REVIEW ELIGIBLE&quot;;&quot;NOT REVIEW ELIGIBLE&quot;))">
            <text:p>NOT REVIEW ELIGIBLE</text:p>
          </table:table-cell>
          <table:table-cell office:value-type="string" table:formula="of:=IF([.W92]=&quot;NOT REVIEW ELIGIBLE&quot;;&quot;DO NOT BEGIN SETTLEMENT REVIEW — RESOLVE READINESS OR CONTRADICTION CONDITIONS&quot;;IF([.W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2]=&quot;&quot;;&quot;UNKNOWN&quot;;IF([.W92]&lt;&gt;&quot;REVIEW ELIGIBLE — NO AUTHORITY&quot;;&quot;BLOCKED — OUTCOME ASSERTED WITHOUT REVIEW ELIGIBILITY&quot;;IF(OR([.Y92]=&quot;REVIEWED — NO AUTHORITY&quot;;[.Y92]=&quot;REVIEW DEFERRED&quot;;[.Y92]=&quot;REVIEW BLOCKED&quot;);&quot;ACCEPTED INTAKE — NO AUTHORITY&quot;;&quot;BLOCKED — NONCANONICAL OUTCOME&quot;)))">
            <text:p>UNKNOWN</text:p>
          </table:table-cell>
          <table:table-cell office:value-type="string" table:formula="of:=IF([.Z92]=&quot;UNKNOWN&quot;;&quot;NO REVIEW OUTCOME ASSERTED — REMAINS UNKNOWN&quot;;IF([.Z92]=&quot;BLOCKED — OUTCOME ASSERTED WITHOUT REVIEW ELIGIBILITY&quot;;&quot;REMOVE OR CORRECT OUTCOME ASSERTION — REVIEW ELIGIBILITY REQUIRED FIRST&quot;;IF([.Z92]=&quot;BLOCKED — NONCANONICAL OUTCOME&quot;;&quot;CORRECT OUTCOME TO CANONICAL CONTROLLED VOCABULARY&quot;;IF([.Z9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2]=&quot;UNKNOWN&quot;;&quot;UNKNOWN&quot;;IF(OR([.Z92]=&quot;BLOCKED — OUTCOME ASSERTED WITHOUT REVIEW ELIGIBILITY&quot;;[.Z92]=&quot;BLOCKED — NONCANONICAL OUTCOME&quot;);&quot;BLOCKED&quot;;IF([.Z9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cell office:value-type="string" table:formula="of:=IF([.U93]=&quot;UNKNOWN&quot;;&quot;COMPLETE OR ASSERT REQUIRED EVIDENCE BEFORE REVIEW&quot;;IF([.U93]=&quot;BLOCKED&quot;;&quot;RESOLVE CONTRADICTION BEFORE REVIEW — NO AUTHORITY CREATED&quot;;IF([.U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3]=&quot;READY FOR REVIEW&quot;;&quot;REVIEW ELIGIBLE — NO AUTHORITY&quot;;IF(OR([.U93]=&quot;UNKNOWN&quot;;[.U93]=&quot;BLOCKED&quot;);&quot;NOT REVIEW ELIGIBLE&quot;;&quot;NOT REVIEW ELIGIBLE&quot;))">
            <text:p>NOT REVIEW ELIGIBLE</text:p>
          </table:table-cell>
          <table:table-cell office:value-type="string" table:formula="of:=IF([.W93]=&quot;NOT REVIEW ELIGIBLE&quot;;&quot;DO NOT BEGIN SETTLEMENT REVIEW — RESOLVE READINESS OR CONTRADICTION CONDITIONS&quot;;IF([.W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3]=&quot;&quot;;&quot;UNKNOWN&quot;;IF([.W93]&lt;&gt;&quot;REVIEW ELIGIBLE — NO AUTHORITY&quot;;&quot;BLOCKED — OUTCOME ASSERTED WITHOUT REVIEW ELIGIBILITY&quot;;IF(OR([.Y93]=&quot;REVIEWED — NO AUTHORITY&quot;;[.Y93]=&quot;REVIEW DEFERRED&quot;;[.Y93]=&quot;REVIEW BLOCKED&quot;);&quot;ACCEPTED INTAKE — NO AUTHORITY&quot;;&quot;BLOCKED — NONCANONICAL OUTCOME&quot;)))">
            <text:p>UNKNOWN</text:p>
          </table:table-cell>
          <table:table-cell office:value-type="string" table:formula="of:=IF([.Z93]=&quot;UNKNOWN&quot;;&quot;NO REVIEW OUTCOME ASSERTED — REMAINS UNKNOWN&quot;;IF([.Z93]=&quot;BLOCKED — OUTCOME ASSERTED WITHOUT REVIEW ELIGIBILITY&quot;;&quot;REMOVE OR CORRECT OUTCOME ASSERTION — REVIEW ELIGIBILITY REQUIRED FIRST&quot;;IF([.Z93]=&quot;BLOCKED — NONCANONICAL OUTCOME&quot;;&quot;CORRECT OUTCOME TO CANONICAL CONTROLLED VOCABULARY&quot;;IF([.Z9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3]=&quot;UNKNOWN&quot;;&quot;UNKNOWN&quot;;IF(OR([.Z93]=&quot;BLOCKED — OUTCOME ASSERTED WITHOUT REVIEW ELIGIBILITY&quot;;[.Z93]=&quot;BLOCKED — NONCANONICAL OUTCOME&quot;);&quot;BLOCKED&quot;;IF([.Z9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cell office:value-type="string" table:formula="of:=IF([.U94]=&quot;UNKNOWN&quot;;&quot;COMPLETE OR ASSERT REQUIRED EVIDENCE BEFORE REVIEW&quot;;IF([.U94]=&quot;BLOCKED&quot;;&quot;RESOLVE CONTRADICTION BEFORE REVIEW — NO AUTHORITY CREATED&quot;;IF([.U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4]=&quot;READY FOR REVIEW&quot;;&quot;REVIEW ELIGIBLE — NO AUTHORITY&quot;;IF(OR([.U94]=&quot;UNKNOWN&quot;;[.U94]=&quot;BLOCKED&quot;);&quot;NOT REVIEW ELIGIBLE&quot;;&quot;NOT REVIEW ELIGIBLE&quot;))">
            <text:p>NOT REVIEW ELIGIBLE</text:p>
          </table:table-cell>
          <table:table-cell office:value-type="string" table:formula="of:=IF([.W94]=&quot;NOT REVIEW ELIGIBLE&quot;;&quot;DO NOT BEGIN SETTLEMENT REVIEW — RESOLVE READINESS OR CONTRADICTION CONDITIONS&quot;;IF([.W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4]=&quot;&quot;;&quot;UNKNOWN&quot;;IF([.W94]&lt;&gt;&quot;REVIEW ELIGIBLE — NO AUTHORITY&quot;;&quot;BLOCKED — OUTCOME ASSERTED WITHOUT REVIEW ELIGIBILITY&quot;;IF(OR([.Y94]=&quot;REVIEWED — NO AUTHORITY&quot;;[.Y94]=&quot;REVIEW DEFERRED&quot;;[.Y94]=&quot;REVIEW BLOCKED&quot;);&quot;ACCEPTED INTAKE — NO AUTHORITY&quot;;&quot;BLOCKED — NONCANONICAL OUTCOME&quot;)))">
            <text:p>UNKNOWN</text:p>
          </table:table-cell>
          <table:table-cell office:value-type="string" table:formula="of:=IF([.Z94]=&quot;UNKNOWN&quot;;&quot;NO REVIEW OUTCOME ASSERTED — REMAINS UNKNOWN&quot;;IF([.Z94]=&quot;BLOCKED — OUTCOME ASSERTED WITHOUT REVIEW ELIGIBILITY&quot;;&quot;REMOVE OR CORRECT OUTCOME ASSERTION — REVIEW ELIGIBILITY REQUIRED FIRST&quot;;IF([.Z94]=&quot;BLOCKED — NONCANONICAL OUTCOME&quot;;&quot;CORRECT OUTCOME TO CANONICAL CONTROLLED VOCABULARY&quot;;IF([.Z9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4]=&quot;UNKNOWN&quot;;&quot;UNKNOWN&quot;;IF(OR([.Z94]=&quot;BLOCKED — OUTCOME ASSERTED WITHOUT REVIEW ELIGIBILITY&quot;;[.Z94]=&quot;BLOCKED — NONCANONICAL OUTCOME&quot;);&quot;BLOCKED&quot;;IF([.Z9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cell office:value-type="string" table:formula="of:=IF([.U95]=&quot;UNKNOWN&quot;;&quot;COMPLETE OR ASSERT REQUIRED EVIDENCE BEFORE REVIEW&quot;;IF([.U95]=&quot;BLOCKED&quot;;&quot;RESOLVE CONTRADICTION BEFORE REVIEW — NO AUTHORITY CREATED&quot;;IF([.U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5]=&quot;READY FOR REVIEW&quot;;&quot;REVIEW ELIGIBLE — NO AUTHORITY&quot;;IF(OR([.U95]=&quot;UNKNOWN&quot;;[.U95]=&quot;BLOCKED&quot;);&quot;NOT REVIEW ELIGIBLE&quot;;&quot;NOT REVIEW ELIGIBLE&quot;))">
            <text:p>NOT REVIEW ELIGIBLE</text:p>
          </table:table-cell>
          <table:table-cell office:value-type="string" table:formula="of:=IF([.W95]=&quot;NOT REVIEW ELIGIBLE&quot;;&quot;DO NOT BEGIN SETTLEMENT REVIEW — RESOLVE READINESS OR CONTRADICTION CONDITIONS&quot;;IF([.W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5]=&quot;&quot;;&quot;UNKNOWN&quot;;IF([.W95]&lt;&gt;&quot;REVIEW ELIGIBLE — NO AUTHORITY&quot;;&quot;BLOCKED — OUTCOME ASSERTED WITHOUT REVIEW ELIGIBILITY&quot;;IF(OR([.Y95]=&quot;REVIEWED — NO AUTHORITY&quot;;[.Y95]=&quot;REVIEW DEFERRED&quot;;[.Y95]=&quot;REVIEW BLOCKED&quot;);&quot;ACCEPTED INTAKE — NO AUTHORITY&quot;;&quot;BLOCKED — NONCANONICAL OUTCOME&quot;)))">
            <text:p>UNKNOWN</text:p>
          </table:table-cell>
          <table:table-cell office:value-type="string" table:formula="of:=IF([.Z95]=&quot;UNKNOWN&quot;;&quot;NO REVIEW OUTCOME ASSERTED — REMAINS UNKNOWN&quot;;IF([.Z95]=&quot;BLOCKED — OUTCOME ASSERTED WITHOUT REVIEW ELIGIBILITY&quot;;&quot;REMOVE OR CORRECT OUTCOME ASSERTION — REVIEW ELIGIBILITY REQUIRED FIRST&quot;;IF([.Z95]=&quot;BLOCKED — NONCANONICAL OUTCOME&quot;;&quot;CORRECT OUTCOME TO CANONICAL CONTROLLED VOCABULARY&quot;;IF([.Z9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5]=&quot;UNKNOWN&quot;;&quot;UNKNOWN&quot;;IF(OR([.Z95]=&quot;BLOCKED — OUTCOME ASSERTED WITHOUT REVIEW ELIGIBILITY&quot;;[.Z95]=&quot;BLOCKED — NONCANONICAL OUTCOME&quot;);&quot;BLOCKED&quot;;IF([.Z9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cell office:value-type="string" table:formula="of:=IF([.U96]=&quot;UNKNOWN&quot;;&quot;COMPLETE OR ASSERT REQUIRED EVIDENCE BEFORE REVIEW&quot;;IF([.U96]=&quot;BLOCKED&quot;;&quot;RESOLVE CONTRADICTION BEFORE REVIEW — NO AUTHORITY CREATED&quot;;IF([.U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6]=&quot;READY FOR REVIEW&quot;;&quot;REVIEW ELIGIBLE — NO AUTHORITY&quot;;IF(OR([.U96]=&quot;UNKNOWN&quot;;[.U96]=&quot;BLOCKED&quot;);&quot;NOT REVIEW ELIGIBLE&quot;;&quot;NOT REVIEW ELIGIBLE&quot;))">
            <text:p>NOT REVIEW ELIGIBLE</text:p>
          </table:table-cell>
          <table:table-cell office:value-type="string" table:formula="of:=IF([.W96]=&quot;NOT REVIEW ELIGIBLE&quot;;&quot;DO NOT BEGIN SETTLEMENT REVIEW — RESOLVE READINESS OR CONTRADICTION CONDITIONS&quot;;IF([.W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6]=&quot;&quot;;&quot;UNKNOWN&quot;;IF([.W96]&lt;&gt;&quot;REVIEW ELIGIBLE — NO AUTHORITY&quot;;&quot;BLOCKED — OUTCOME ASSERTED WITHOUT REVIEW ELIGIBILITY&quot;;IF(OR([.Y96]=&quot;REVIEWED — NO AUTHORITY&quot;;[.Y96]=&quot;REVIEW DEFERRED&quot;;[.Y96]=&quot;REVIEW BLOCKED&quot;);&quot;ACCEPTED INTAKE — NO AUTHORITY&quot;;&quot;BLOCKED — NONCANONICAL OUTCOME&quot;)))">
            <text:p>UNKNOWN</text:p>
          </table:table-cell>
          <table:table-cell office:value-type="string" table:formula="of:=IF([.Z96]=&quot;UNKNOWN&quot;;&quot;NO REVIEW OUTCOME ASSERTED — REMAINS UNKNOWN&quot;;IF([.Z96]=&quot;BLOCKED — OUTCOME ASSERTED WITHOUT REVIEW ELIGIBILITY&quot;;&quot;REMOVE OR CORRECT OUTCOME ASSERTION — REVIEW ELIGIBILITY REQUIRED FIRST&quot;;IF([.Z96]=&quot;BLOCKED — NONCANONICAL OUTCOME&quot;;&quot;CORRECT OUTCOME TO CANONICAL CONTROLLED VOCABULARY&quot;;IF([.Z9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6]=&quot;UNKNOWN&quot;;&quot;UNKNOWN&quot;;IF(OR([.Z96]=&quot;BLOCKED — OUTCOME ASSERTED WITHOUT REVIEW ELIGIBILITY&quot;;[.Z96]=&quot;BLOCKED — NONCANONICAL OUTCOME&quot;);&quot;BLOCKED&quot;;IF([.Z9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cell office:value-type="string" table:formula="of:=IF([.U97]=&quot;UNKNOWN&quot;;&quot;COMPLETE OR ASSERT REQUIRED EVIDENCE BEFORE REVIEW&quot;;IF([.U97]=&quot;BLOCKED&quot;;&quot;RESOLVE CONTRADICTION BEFORE REVIEW — NO AUTHORITY CREATED&quot;;IF([.U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7]=&quot;READY FOR REVIEW&quot;;&quot;REVIEW ELIGIBLE — NO AUTHORITY&quot;;IF(OR([.U97]=&quot;UNKNOWN&quot;;[.U97]=&quot;BLOCKED&quot;);&quot;NOT REVIEW ELIGIBLE&quot;;&quot;NOT REVIEW ELIGIBLE&quot;))">
            <text:p>NOT REVIEW ELIGIBLE</text:p>
          </table:table-cell>
          <table:table-cell office:value-type="string" table:formula="of:=IF([.W97]=&quot;NOT REVIEW ELIGIBLE&quot;;&quot;DO NOT BEGIN SETTLEMENT REVIEW — RESOLVE READINESS OR CONTRADICTION CONDITIONS&quot;;IF([.W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7]=&quot;&quot;;&quot;UNKNOWN&quot;;IF([.W97]&lt;&gt;&quot;REVIEW ELIGIBLE — NO AUTHORITY&quot;;&quot;BLOCKED — OUTCOME ASSERTED WITHOUT REVIEW ELIGIBILITY&quot;;IF(OR([.Y97]=&quot;REVIEWED — NO AUTHORITY&quot;;[.Y97]=&quot;REVIEW DEFERRED&quot;;[.Y97]=&quot;REVIEW BLOCKED&quot;);&quot;ACCEPTED INTAKE — NO AUTHORITY&quot;;&quot;BLOCKED — NONCANONICAL OUTCOME&quot;)))">
            <text:p>UNKNOWN</text:p>
          </table:table-cell>
          <table:table-cell office:value-type="string" table:formula="of:=IF([.Z97]=&quot;UNKNOWN&quot;;&quot;NO REVIEW OUTCOME ASSERTED — REMAINS UNKNOWN&quot;;IF([.Z97]=&quot;BLOCKED — OUTCOME ASSERTED WITHOUT REVIEW ELIGIBILITY&quot;;&quot;REMOVE OR CORRECT OUTCOME ASSERTION — REVIEW ELIGIBILITY REQUIRED FIRST&quot;;IF([.Z97]=&quot;BLOCKED — NONCANONICAL OUTCOME&quot;;&quot;CORRECT OUTCOME TO CANONICAL CONTROLLED VOCABULARY&quot;;IF([.Z9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7]=&quot;UNKNOWN&quot;;&quot;UNKNOWN&quot;;IF(OR([.Z97]=&quot;BLOCKED — OUTCOME ASSERTED WITHOUT REVIEW ELIGIBILITY&quot;;[.Z97]=&quot;BLOCKED — NONCANONICAL OUTCOME&quot;);&quot;BLOCKED&quot;;IF([.Z9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cell office:value-type="string" table:formula="of:=IF([.U98]=&quot;UNKNOWN&quot;;&quot;COMPLETE OR ASSERT REQUIRED EVIDENCE BEFORE REVIEW&quot;;IF([.U98]=&quot;BLOCKED&quot;;&quot;RESOLVE CONTRADICTION BEFORE REVIEW — NO AUTHORITY CREATED&quot;;IF([.U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8]=&quot;READY FOR REVIEW&quot;;&quot;REVIEW ELIGIBLE — NO AUTHORITY&quot;;IF(OR([.U98]=&quot;UNKNOWN&quot;;[.U98]=&quot;BLOCKED&quot;);&quot;NOT REVIEW ELIGIBLE&quot;;&quot;NOT REVIEW ELIGIBLE&quot;))">
            <text:p>NOT REVIEW ELIGIBLE</text:p>
          </table:table-cell>
          <table:table-cell office:value-type="string" table:formula="of:=IF([.W98]=&quot;NOT REVIEW ELIGIBLE&quot;;&quot;DO NOT BEGIN SETTLEMENT REVIEW — RESOLVE READINESS OR CONTRADICTION CONDITIONS&quot;;IF([.W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8]=&quot;&quot;;&quot;UNKNOWN&quot;;IF([.W98]&lt;&gt;&quot;REVIEW ELIGIBLE — NO AUTHORITY&quot;;&quot;BLOCKED — OUTCOME ASSERTED WITHOUT REVIEW ELIGIBILITY&quot;;IF(OR([.Y98]=&quot;REVIEWED — NO AUTHORITY&quot;;[.Y98]=&quot;REVIEW DEFERRED&quot;;[.Y98]=&quot;REVIEW BLOCKED&quot;);&quot;ACCEPTED INTAKE — NO AUTHORITY&quot;;&quot;BLOCKED — NONCANONICAL OUTCOME&quot;)))">
            <text:p>UNKNOWN</text:p>
          </table:table-cell>
          <table:table-cell office:value-type="string" table:formula="of:=IF([.Z98]=&quot;UNKNOWN&quot;;&quot;NO REVIEW OUTCOME ASSERTED — REMAINS UNKNOWN&quot;;IF([.Z98]=&quot;BLOCKED — OUTCOME ASSERTED WITHOUT REVIEW ELIGIBILITY&quot;;&quot;REMOVE OR CORRECT OUTCOME ASSERTION — REVIEW ELIGIBILITY REQUIRED FIRST&quot;;IF([.Z98]=&quot;BLOCKED — NONCANONICAL OUTCOME&quot;;&quot;CORRECT OUTCOME TO CANONICAL CONTROLLED VOCABULARY&quot;;IF([.Z9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8]=&quot;UNKNOWN&quot;;&quot;UNKNOWN&quot;;IF(OR([.Z98]=&quot;BLOCKED — OUTCOME ASSERTED WITHOUT REVIEW ELIGIBILITY&quot;;[.Z98]=&quot;BLOCKED — NONCANONICAL OUTCOME&quot;);&quot;BLOCKED&quot;;IF([.Z9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cell office:value-type="string" table:formula="of:=IF([.U99]=&quot;UNKNOWN&quot;;&quot;COMPLETE OR ASSERT REQUIRED EVIDENCE BEFORE REVIEW&quot;;IF([.U99]=&quot;BLOCKED&quot;;&quot;RESOLVE CONTRADICTION BEFORE REVIEW — NO AUTHORITY CREATED&quot;;IF([.U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9]=&quot;READY FOR REVIEW&quot;;&quot;REVIEW ELIGIBLE — NO AUTHORITY&quot;;IF(OR([.U99]=&quot;UNKNOWN&quot;;[.U99]=&quot;BLOCKED&quot;);&quot;NOT REVIEW ELIGIBLE&quot;;&quot;NOT REVIEW ELIGIBLE&quot;))">
            <text:p>NOT REVIEW ELIGIBLE</text:p>
          </table:table-cell>
          <table:table-cell office:value-type="string" table:formula="of:=IF([.W99]=&quot;NOT REVIEW ELIGIBLE&quot;;&quot;DO NOT BEGIN SETTLEMENT REVIEW — RESOLVE READINESS OR CONTRADICTION CONDITIONS&quot;;IF([.W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9]=&quot;&quot;;&quot;UNKNOWN&quot;;IF([.W99]&lt;&gt;&quot;REVIEW ELIGIBLE — NO AUTHORITY&quot;;&quot;BLOCKED — OUTCOME ASSERTED WITHOUT REVIEW ELIGIBILITY&quot;;IF(OR([.Y99]=&quot;REVIEWED — NO AUTHORITY&quot;;[.Y99]=&quot;REVIEW DEFERRED&quot;;[.Y99]=&quot;REVIEW BLOCKED&quot;);&quot;ACCEPTED INTAKE — NO AUTHORITY&quot;;&quot;BLOCKED — NONCANONICAL OUTCOME&quot;)))">
            <text:p>UNKNOWN</text:p>
          </table:table-cell>
          <table:table-cell office:value-type="string" table:formula="of:=IF([.Z99]=&quot;UNKNOWN&quot;;&quot;NO REVIEW OUTCOME ASSERTED — REMAINS UNKNOWN&quot;;IF([.Z99]=&quot;BLOCKED — OUTCOME ASSERTED WITHOUT REVIEW ELIGIBILITY&quot;;&quot;REMOVE OR CORRECT OUTCOME ASSERTION — REVIEW ELIGIBILITY REQUIRED FIRST&quot;;IF([.Z99]=&quot;BLOCKED — NONCANONICAL OUTCOME&quot;;&quot;CORRECT OUTCOME TO CANONICAL CONTROLLED VOCABULARY&quot;;IF([.Z9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99]=&quot;UNKNOWN&quot;;&quot;UNKNOWN&quot;;IF(OR([.Z99]=&quot;BLOCKED — OUTCOME ASSERTED WITHOUT REVIEW ELIGIBILITY&quot;;[.Z99]=&quot;BLOCKED — NONCANONICAL OUTCOME&quot;);&quot;BLOCKED&quot;;IF([.Z9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cell office:value-type="string" table:formula="of:=IF([.U100]=&quot;UNKNOWN&quot;;&quot;COMPLETE OR ASSERT REQUIRED EVIDENCE BEFORE REVIEW&quot;;IF([.U100]=&quot;BLOCKED&quot;;&quot;RESOLVE CONTRADICTION BEFORE REVIEW — NO AUTHORITY CREATED&quot;;IF([.U1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0]=&quot;READY FOR REVIEW&quot;;&quot;REVIEW ELIGIBLE — NO AUTHORITY&quot;;IF(OR([.U100]=&quot;UNKNOWN&quot;;[.U100]=&quot;BLOCKED&quot;);&quot;NOT REVIEW ELIGIBLE&quot;;&quot;NOT REVIEW ELIGIBLE&quot;))">
            <text:p>NOT REVIEW ELIGIBLE</text:p>
          </table:table-cell>
          <table:table-cell office:value-type="string" table:formula="of:=IF([.W100]=&quot;NOT REVIEW ELIGIBLE&quot;;&quot;DO NOT BEGIN SETTLEMENT REVIEW — RESOLVE READINESS OR CONTRADICTION CONDITIONS&quot;;IF([.W1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0]=&quot;&quot;;&quot;UNKNOWN&quot;;IF([.W100]&lt;&gt;&quot;REVIEW ELIGIBLE — NO AUTHORITY&quot;;&quot;BLOCKED — OUTCOME ASSERTED WITHOUT REVIEW ELIGIBILITY&quot;;IF(OR([.Y100]=&quot;REVIEWED — NO AUTHORITY&quot;;[.Y100]=&quot;REVIEW DEFERRED&quot;;[.Y100]=&quot;REVIEW BLOCKED&quot;);&quot;ACCEPTED INTAKE — NO AUTHORITY&quot;;&quot;BLOCKED — NONCANONICAL OUTCOME&quot;)))">
            <text:p>UNKNOWN</text:p>
          </table:table-cell>
          <table:table-cell office:value-type="string" table:formula="of:=IF([.Z100]=&quot;UNKNOWN&quot;;&quot;NO REVIEW OUTCOME ASSERTED — REMAINS UNKNOWN&quot;;IF([.Z100]=&quot;BLOCKED — OUTCOME ASSERTED WITHOUT REVIEW ELIGIBILITY&quot;;&quot;REMOVE OR CORRECT OUTCOME ASSERTION — REVIEW ELIGIBILITY REQUIRED FIRST&quot;;IF([.Z100]=&quot;BLOCKED — NONCANONICAL OUTCOME&quot;;&quot;CORRECT OUTCOME TO CANONICAL CONTROLLED VOCABULARY&quot;;IF([.Z10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0]=&quot;UNKNOWN&quot;;&quot;UNKNOWN&quot;;IF(OR([.Z100]=&quot;BLOCKED — OUTCOME ASSERTED WITHOUT REVIEW ELIGIBILITY&quot;;[.Z100]=&quot;BLOCKED — NONCANONICAL OUTCOME&quot;);&quot;BLOCKED&quot;;IF([.Z10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cell office:value-type="string" table:formula="of:=IF([.U101]=&quot;UNKNOWN&quot;;&quot;COMPLETE OR ASSERT REQUIRED EVIDENCE BEFORE REVIEW&quot;;IF([.U101]=&quot;BLOCKED&quot;;&quot;RESOLVE CONTRADICTION BEFORE REVIEW — NO AUTHORITY CREATED&quot;;IF([.U1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1]=&quot;READY FOR REVIEW&quot;;&quot;REVIEW ELIGIBLE — NO AUTHORITY&quot;;IF(OR([.U101]=&quot;UNKNOWN&quot;;[.U101]=&quot;BLOCKED&quot;);&quot;NOT REVIEW ELIGIBLE&quot;;&quot;NOT REVIEW ELIGIBLE&quot;))">
            <text:p>NOT REVIEW ELIGIBLE</text:p>
          </table:table-cell>
          <table:table-cell office:value-type="string" table:formula="of:=IF([.W101]=&quot;NOT REVIEW ELIGIBLE&quot;;&quot;DO NOT BEGIN SETTLEMENT REVIEW — RESOLVE READINESS OR CONTRADICTION CONDITIONS&quot;;IF([.W1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1]=&quot;&quot;;&quot;UNKNOWN&quot;;IF([.W101]&lt;&gt;&quot;REVIEW ELIGIBLE — NO AUTHORITY&quot;;&quot;BLOCKED — OUTCOME ASSERTED WITHOUT REVIEW ELIGIBILITY&quot;;IF(OR([.Y101]=&quot;REVIEWED — NO AUTHORITY&quot;;[.Y101]=&quot;REVIEW DEFERRED&quot;;[.Y101]=&quot;REVIEW BLOCKED&quot;);&quot;ACCEPTED INTAKE — NO AUTHORITY&quot;;&quot;BLOCKED — NONCANONICAL OUTCOME&quot;)))">
            <text:p>UNKNOWN</text:p>
          </table:table-cell>
          <table:table-cell office:value-type="string" table:formula="of:=IF([.Z101]=&quot;UNKNOWN&quot;;&quot;NO REVIEW OUTCOME ASSERTED — REMAINS UNKNOWN&quot;;IF([.Z101]=&quot;BLOCKED — OUTCOME ASSERTED WITHOUT REVIEW ELIGIBILITY&quot;;&quot;REMOVE OR CORRECT OUTCOME ASSERTION — REVIEW ELIGIBILITY REQUIRED FIRST&quot;;IF([.Z101]=&quot;BLOCKED — NONCANONICAL OUTCOME&quot;;&quot;CORRECT OUTCOME TO CANONICAL CONTROLLED VOCABULARY&quot;;IF([.Z10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1]=&quot;UNKNOWN&quot;;&quot;UNKNOWN&quot;;IF(OR([.Z101]=&quot;BLOCKED — OUTCOME ASSERTED WITHOUT REVIEW ELIGIBILITY&quot;;[.Z101]=&quot;BLOCKED — NONCANONICAL OUTCOME&quot;);&quot;BLOCKED&quot;;IF([.Z10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cell office:value-type="string" table:formula="of:=IF([.U102]=&quot;UNKNOWN&quot;;&quot;COMPLETE OR ASSERT REQUIRED EVIDENCE BEFORE REVIEW&quot;;IF([.U102]=&quot;BLOCKED&quot;;&quot;RESOLVE CONTRADICTION BEFORE REVIEW — NO AUTHORITY CREATED&quot;;IF([.U1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2]=&quot;READY FOR REVIEW&quot;;&quot;REVIEW ELIGIBLE — NO AUTHORITY&quot;;IF(OR([.U102]=&quot;UNKNOWN&quot;;[.U102]=&quot;BLOCKED&quot;);&quot;NOT REVIEW ELIGIBLE&quot;;&quot;NOT REVIEW ELIGIBLE&quot;))">
            <text:p>NOT REVIEW ELIGIBLE</text:p>
          </table:table-cell>
          <table:table-cell office:value-type="string" table:formula="of:=IF([.W102]=&quot;NOT REVIEW ELIGIBLE&quot;;&quot;DO NOT BEGIN SETTLEMENT REVIEW — RESOLVE READINESS OR CONTRADICTION CONDITIONS&quot;;IF([.W1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2]=&quot;&quot;;&quot;UNKNOWN&quot;;IF([.W102]&lt;&gt;&quot;REVIEW ELIGIBLE — NO AUTHORITY&quot;;&quot;BLOCKED — OUTCOME ASSERTED WITHOUT REVIEW ELIGIBILITY&quot;;IF(OR([.Y102]=&quot;REVIEWED — NO AUTHORITY&quot;;[.Y102]=&quot;REVIEW DEFERRED&quot;;[.Y102]=&quot;REVIEW BLOCKED&quot;);&quot;ACCEPTED INTAKE — NO AUTHORITY&quot;;&quot;BLOCKED — NONCANONICAL OUTCOME&quot;)))">
            <text:p>UNKNOWN</text:p>
          </table:table-cell>
          <table:table-cell office:value-type="string" table:formula="of:=IF([.Z102]=&quot;UNKNOWN&quot;;&quot;NO REVIEW OUTCOME ASSERTED — REMAINS UNKNOWN&quot;;IF([.Z102]=&quot;BLOCKED — OUTCOME ASSERTED WITHOUT REVIEW ELIGIBILITY&quot;;&quot;REMOVE OR CORRECT OUTCOME ASSERTION — REVIEW ELIGIBILITY REQUIRED FIRST&quot;;IF([.Z102]=&quot;BLOCKED — NONCANONICAL OUTCOME&quot;;&quot;CORRECT OUTCOME TO CANONICAL CONTROLLED VOCABULARY&quot;;IF([.Z10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2]=&quot;UNKNOWN&quot;;&quot;UNKNOWN&quot;;IF(OR([.Z102]=&quot;BLOCKED — OUTCOME ASSERTED WITHOUT REVIEW ELIGIBILITY&quot;;[.Z102]=&quot;BLOCKED — NONCANONICAL OUTCOME&quot;);&quot;BLOCKED&quot;;IF([.Z10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cell office:value-type="string" table:formula="of:=IF([.U103]=&quot;UNKNOWN&quot;;&quot;COMPLETE OR ASSERT REQUIRED EVIDENCE BEFORE REVIEW&quot;;IF([.U103]=&quot;BLOCKED&quot;;&quot;RESOLVE CONTRADICTION BEFORE REVIEW — NO AUTHORITY CREATED&quot;;IF([.U1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3]=&quot;READY FOR REVIEW&quot;;&quot;REVIEW ELIGIBLE — NO AUTHORITY&quot;;IF(OR([.U103]=&quot;UNKNOWN&quot;;[.U103]=&quot;BLOCKED&quot;);&quot;NOT REVIEW ELIGIBLE&quot;;&quot;NOT REVIEW ELIGIBLE&quot;))">
            <text:p>NOT REVIEW ELIGIBLE</text:p>
          </table:table-cell>
          <table:table-cell office:value-type="string" table:formula="of:=IF([.W103]=&quot;NOT REVIEW ELIGIBLE&quot;;&quot;DO NOT BEGIN SETTLEMENT REVIEW — RESOLVE READINESS OR CONTRADICTION CONDITIONS&quot;;IF([.W1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3]=&quot;&quot;;&quot;UNKNOWN&quot;;IF([.W103]&lt;&gt;&quot;REVIEW ELIGIBLE — NO AUTHORITY&quot;;&quot;BLOCKED — OUTCOME ASSERTED WITHOUT REVIEW ELIGIBILITY&quot;;IF(OR([.Y103]=&quot;REVIEWED — NO AUTHORITY&quot;;[.Y103]=&quot;REVIEW DEFERRED&quot;;[.Y103]=&quot;REVIEW BLOCKED&quot;);&quot;ACCEPTED INTAKE — NO AUTHORITY&quot;;&quot;BLOCKED — NONCANONICAL OUTCOME&quot;)))">
            <text:p>UNKNOWN</text:p>
          </table:table-cell>
          <table:table-cell office:value-type="string" table:formula="of:=IF([.Z103]=&quot;UNKNOWN&quot;;&quot;NO REVIEW OUTCOME ASSERTED — REMAINS UNKNOWN&quot;;IF([.Z103]=&quot;BLOCKED — OUTCOME ASSERTED WITHOUT REVIEW ELIGIBILITY&quot;;&quot;REMOVE OR CORRECT OUTCOME ASSERTION — REVIEW ELIGIBILITY REQUIRED FIRST&quot;;IF([.Z103]=&quot;BLOCKED — NONCANONICAL OUTCOME&quot;;&quot;CORRECT OUTCOME TO CANONICAL CONTROLLED VOCABULARY&quot;;IF([.Z10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3]=&quot;UNKNOWN&quot;;&quot;UNKNOWN&quot;;IF(OR([.Z103]=&quot;BLOCKED — OUTCOME ASSERTED WITHOUT REVIEW ELIGIBILITY&quot;;[.Z103]=&quot;BLOCKED — NONCANONICAL OUTCOME&quot;);&quot;BLOCKED&quot;;IF([.Z10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cell office:value-type="string" table:formula="of:=IF([.U104]=&quot;UNKNOWN&quot;;&quot;COMPLETE OR ASSERT REQUIRED EVIDENCE BEFORE REVIEW&quot;;IF([.U104]=&quot;BLOCKED&quot;;&quot;RESOLVE CONTRADICTION BEFORE REVIEW — NO AUTHORITY CREATED&quot;;IF([.U1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4]=&quot;READY FOR REVIEW&quot;;&quot;REVIEW ELIGIBLE — NO AUTHORITY&quot;;IF(OR([.U104]=&quot;UNKNOWN&quot;;[.U104]=&quot;BLOCKED&quot;);&quot;NOT REVIEW ELIGIBLE&quot;;&quot;NOT REVIEW ELIGIBLE&quot;))">
            <text:p>NOT REVIEW ELIGIBLE</text:p>
          </table:table-cell>
          <table:table-cell office:value-type="string" table:formula="of:=IF([.W104]=&quot;NOT REVIEW ELIGIBLE&quot;;&quot;DO NOT BEGIN SETTLEMENT REVIEW — RESOLVE READINESS OR CONTRADICTION CONDITIONS&quot;;IF([.W1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4]=&quot;&quot;;&quot;UNKNOWN&quot;;IF([.W104]&lt;&gt;&quot;REVIEW ELIGIBLE — NO AUTHORITY&quot;;&quot;BLOCKED — OUTCOME ASSERTED WITHOUT REVIEW ELIGIBILITY&quot;;IF(OR([.Y104]=&quot;REVIEWED — NO AUTHORITY&quot;;[.Y104]=&quot;REVIEW DEFERRED&quot;;[.Y104]=&quot;REVIEW BLOCKED&quot;);&quot;ACCEPTED INTAKE — NO AUTHORITY&quot;;&quot;BLOCKED — NONCANONICAL OUTCOME&quot;)))">
            <text:p>UNKNOWN</text:p>
          </table:table-cell>
          <table:table-cell office:value-type="string" table:formula="of:=IF([.Z104]=&quot;UNKNOWN&quot;;&quot;NO REVIEW OUTCOME ASSERTED — REMAINS UNKNOWN&quot;;IF([.Z104]=&quot;BLOCKED — OUTCOME ASSERTED WITHOUT REVIEW ELIGIBILITY&quot;;&quot;REMOVE OR CORRECT OUTCOME ASSERTION — REVIEW ELIGIBILITY REQUIRED FIRST&quot;;IF([.Z104]=&quot;BLOCKED — NONCANONICAL OUTCOME&quot;;&quot;CORRECT OUTCOME TO CANONICAL CONTROLLED VOCABULARY&quot;;IF([.Z10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4]=&quot;UNKNOWN&quot;;&quot;UNKNOWN&quot;;IF(OR([.Z104]=&quot;BLOCKED — OUTCOME ASSERTED WITHOUT REVIEW ELIGIBILITY&quot;;[.Z104]=&quot;BLOCKED — NONCANONICAL OUTCOME&quot;);&quot;BLOCKED&quot;;IF([.Z10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cell office:value-type="string" table:formula="of:=IF([.U105]=&quot;UNKNOWN&quot;;&quot;COMPLETE OR ASSERT REQUIRED EVIDENCE BEFORE REVIEW&quot;;IF([.U105]=&quot;BLOCKED&quot;;&quot;RESOLVE CONTRADICTION BEFORE REVIEW — NO AUTHORITY CREATED&quot;;IF([.U1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5]=&quot;READY FOR REVIEW&quot;;&quot;REVIEW ELIGIBLE — NO AUTHORITY&quot;;IF(OR([.U105]=&quot;UNKNOWN&quot;;[.U105]=&quot;BLOCKED&quot;);&quot;NOT REVIEW ELIGIBLE&quot;;&quot;NOT REVIEW ELIGIBLE&quot;))">
            <text:p>NOT REVIEW ELIGIBLE</text:p>
          </table:table-cell>
          <table:table-cell office:value-type="string" table:formula="of:=IF([.W105]=&quot;NOT REVIEW ELIGIBLE&quot;;&quot;DO NOT BEGIN SETTLEMENT REVIEW — RESOLVE READINESS OR CONTRADICTION CONDITIONS&quot;;IF([.W1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5]=&quot;&quot;;&quot;UNKNOWN&quot;;IF([.W105]&lt;&gt;&quot;REVIEW ELIGIBLE — NO AUTHORITY&quot;;&quot;BLOCKED — OUTCOME ASSERTED WITHOUT REVIEW ELIGIBILITY&quot;;IF(OR([.Y105]=&quot;REVIEWED — NO AUTHORITY&quot;;[.Y105]=&quot;REVIEW DEFERRED&quot;;[.Y105]=&quot;REVIEW BLOCKED&quot;);&quot;ACCEPTED INTAKE — NO AUTHORITY&quot;;&quot;BLOCKED — NONCANONICAL OUTCOME&quot;)))">
            <text:p>UNKNOWN</text:p>
          </table:table-cell>
          <table:table-cell office:value-type="string" table:formula="of:=IF([.Z105]=&quot;UNKNOWN&quot;;&quot;NO REVIEW OUTCOME ASSERTED — REMAINS UNKNOWN&quot;;IF([.Z105]=&quot;BLOCKED — OUTCOME ASSERTED WITHOUT REVIEW ELIGIBILITY&quot;;&quot;REMOVE OR CORRECT OUTCOME ASSERTION — REVIEW ELIGIBILITY REQUIRED FIRST&quot;;IF([.Z105]=&quot;BLOCKED — NONCANONICAL OUTCOME&quot;;&quot;CORRECT OUTCOME TO CANONICAL CONTROLLED VOCABULARY&quot;;IF([.Z10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5]=&quot;UNKNOWN&quot;;&quot;UNKNOWN&quot;;IF(OR([.Z105]=&quot;BLOCKED — OUTCOME ASSERTED WITHOUT REVIEW ELIGIBILITY&quot;;[.Z105]=&quot;BLOCKED — NONCANONICAL OUTCOME&quot;);&quot;BLOCKED&quot;;IF([.Z10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cell office:value-type="string" table:formula="of:=IF([.U106]=&quot;UNKNOWN&quot;;&quot;COMPLETE OR ASSERT REQUIRED EVIDENCE BEFORE REVIEW&quot;;IF([.U106]=&quot;BLOCKED&quot;;&quot;RESOLVE CONTRADICTION BEFORE REVIEW — NO AUTHORITY CREATED&quot;;IF([.U1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6]=&quot;READY FOR REVIEW&quot;;&quot;REVIEW ELIGIBLE — NO AUTHORITY&quot;;IF(OR([.U106]=&quot;UNKNOWN&quot;;[.U106]=&quot;BLOCKED&quot;);&quot;NOT REVIEW ELIGIBLE&quot;;&quot;NOT REVIEW ELIGIBLE&quot;))">
            <text:p>NOT REVIEW ELIGIBLE</text:p>
          </table:table-cell>
          <table:table-cell office:value-type="string" table:formula="of:=IF([.W106]=&quot;NOT REVIEW ELIGIBLE&quot;;&quot;DO NOT BEGIN SETTLEMENT REVIEW — RESOLVE READINESS OR CONTRADICTION CONDITIONS&quot;;IF([.W1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6]=&quot;&quot;;&quot;UNKNOWN&quot;;IF([.W106]&lt;&gt;&quot;REVIEW ELIGIBLE — NO AUTHORITY&quot;;&quot;BLOCKED — OUTCOME ASSERTED WITHOUT REVIEW ELIGIBILITY&quot;;IF(OR([.Y106]=&quot;REVIEWED — NO AUTHORITY&quot;;[.Y106]=&quot;REVIEW DEFERRED&quot;;[.Y106]=&quot;REVIEW BLOCKED&quot;);&quot;ACCEPTED INTAKE — NO AUTHORITY&quot;;&quot;BLOCKED — NONCANONICAL OUTCOME&quot;)))">
            <text:p>UNKNOWN</text:p>
          </table:table-cell>
          <table:table-cell office:value-type="string" table:formula="of:=IF([.Z106]=&quot;UNKNOWN&quot;;&quot;NO REVIEW OUTCOME ASSERTED — REMAINS UNKNOWN&quot;;IF([.Z106]=&quot;BLOCKED — OUTCOME ASSERTED WITHOUT REVIEW ELIGIBILITY&quot;;&quot;REMOVE OR CORRECT OUTCOME ASSERTION — REVIEW ELIGIBILITY REQUIRED FIRST&quot;;IF([.Z106]=&quot;BLOCKED — NONCANONICAL OUTCOME&quot;;&quot;CORRECT OUTCOME TO CANONICAL CONTROLLED VOCABULARY&quot;;IF([.Z10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6]=&quot;UNKNOWN&quot;;&quot;UNKNOWN&quot;;IF(OR([.Z106]=&quot;BLOCKED — OUTCOME ASSERTED WITHOUT REVIEW ELIGIBILITY&quot;;[.Z106]=&quot;BLOCKED — NONCANONICAL OUTCOME&quot;);&quot;BLOCKED&quot;;IF([.Z10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cell office:value-type="string" table:formula="of:=IF([.U107]=&quot;UNKNOWN&quot;;&quot;COMPLETE OR ASSERT REQUIRED EVIDENCE BEFORE REVIEW&quot;;IF([.U107]=&quot;BLOCKED&quot;;&quot;RESOLVE CONTRADICTION BEFORE REVIEW — NO AUTHORITY CREATED&quot;;IF([.U1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7]=&quot;READY FOR REVIEW&quot;;&quot;REVIEW ELIGIBLE — NO AUTHORITY&quot;;IF(OR([.U107]=&quot;UNKNOWN&quot;;[.U107]=&quot;BLOCKED&quot;);&quot;NOT REVIEW ELIGIBLE&quot;;&quot;NOT REVIEW ELIGIBLE&quot;))">
            <text:p>NOT REVIEW ELIGIBLE</text:p>
          </table:table-cell>
          <table:table-cell office:value-type="string" table:formula="of:=IF([.W107]=&quot;NOT REVIEW ELIGIBLE&quot;;&quot;DO NOT BEGIN SETTLEMENT REVIEW — RESOLVE READINESS OR CONTRADICTION CONDITIONS&quot;;IF([.W1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7]=&quot;&quot;;&quot;UNKNOWN&quot;;IF([.W107]&lt;&gt;&quot;REVIEW ELIGIBLE — NO AUTHORITY&quot;;&quot;BLOCKED — OUTCOME ASSERTED WITHOUT REVIEW ELIGIBILITY&quot;;IF(OR([.Y107]=&quot;REVIEWED — NO AUTHORITY&quot;;[.Y107]=&quot;REVIEW DEFERRED&quot;;[.Y107]=&quot;REVIEW BLOCKED&quot;);&quot;ACCEPTED INTAKE — NO AUTHORITY&quot;;&quot;BLOCKED — NONCANONICAL OUTCOME&quot;)))">
            <text:p>UNKNOWN</text:p>
          </table:table-cell>
          <table:table-cell office:value-type="string" table:formula="of:=IF([.Z107]=&quot;UNKNOWN&quot;;&quot;NO REVIEW OUTCOME ASSERTED — REMAINS UNKNOWN&quot;;IF([.Z107]=&quot;BLOCKED — OUTCOME ASSERTED WITHOUT REVIEW ELIGIBILITY&quot;;&quot;REMOVE OR CORRECT OUTCOME ASSERTION — REVIEW ELIGIBILITY REQUIRED FIRST&quot;;IF([.Z107]=&quot;BLOCKED — NONCANONICAL OUTCOME&quot;;&quot;CORRECT OUTCOME TO CANONICAL CONTROLLED VOCABULARY&quot;;IF([.Z10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7]=&quot;UNKNOWN&quot;;&quot;UNKNOWN&quot;;IF(OR([.Z107]=&quot;BLOCKED — OUTCOME ASSERTED WITHOUT REVIEW ELIGIBILITY&quot;;[.Z107]=&quot;BLOCKED — NONCANONICAL OUTCOME&quot;);&quot;BLOCKED&quot;;IF([.Z10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cell office:value-type="string" table:formula="of:=IF([.U108]=&quot;UNKNOWN&quot;;&quot;COMPLETE OR ASSERT REQUIRED EVIDENCE BEFORE REVIEW&quot;;IF([.U108]=&quot;BLOCKED&quot;;&quot;RESOLVE CONTRADICTION BEFORE REVIEW — NO AUTHORITY CREATED&quot;;IF([.U1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8]=&quot;READY FOR REVIEW&quot;;&quot;REVIEW ELIGIBLE — NO AUTHORITY&quot;;IF(OR([.U108]=&quot;UNKNOWN&quot;;[.U108]=&quot;BLOCKED&quot;);&quot;NOT REVIEW ELIGIBLE&quot;;&quot;NOT REVIEW ELIGIBLE&quot;))">
            <text:p>NOT REVIEW ELIGIBLE</text:p>
          </table:table-cell>
          <table:table-cell office:value-type="string" table:formula="of:=IF([.W108]=&quot;NOT REVIEW ELIGIBLE&quot;;&quot;DO NOT BEGIN SETTLEMENT REVIEW — RESOLVE READINESS OR CONTRADICTION CONDITIONS&quot;;IF([.W1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8]=&quot;&quot;;&quot;UNKNOWN&quot;;IF([.W108]&lt;&gt;&quot;REVIEW ELIGIBLE — NO AUTHORITY&quot;;&quot;BLOCKED — OUTCOME ASSERTED WITHOUT REVIEW ELIGIBILITY&quot;;IF(OR([.Y108]=&quot;REVIEWED — NO AUTHORITY&quot;;[.Y108]=&quot;REVIEW DEFERRED&quot;;[.Y108]=&quot;REVIEW BLOCKED&quot;);&quot;ACCEPTED INTAKE — NO AUTHORITY&quot;;&quot;BLOCKED — NONCANONICAL OUTCOME&quot;)))">
            <text:p>UNKNOWN</text:p>
          </table:table-cell>
          <table:table-cell office:value-type="string" table:formula="of:=IF([.Z108]=&quot;UNKNOWN&quot;;&quot;NO REVIEW OUTCOME ASSERTED — REMAINS UNKNOWN&quot;;IF([.Z108]=&quot;BLOCKED — OUTCOME ASSERTED WITHOUT REVIEW ELIGIBILITY&quot;;&quot;REMOVE OR CORRECT OUTCOME ASSERTION — REVIEW ELIGIBILITY REQUIRED FIRST&quot;;IF([.Z108]=&quot;BLOCKED — NONCANONICAL OUTCOME&quot;;&quot;CORRECT OUTCOME TO CANONICAL CONTROLLED VOCABULARY&quot;;IF([.Z10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8]=&quot;UNKNOWN&quot;;&quot;UNKNOWN&quot;;IF(OR([.Z108]=&quot;BLOCKED — OUTCOME ASSERTED WITHOUT REVIEW ELIGIBILITY&quot;;[.Z108]=&quot;BLOCKED — NONCANONICAL OUTCOME&quot;);&quot;BLOCKED&quot;;IF([.Z10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cell office:value-type="string" table:formula="of:=IF([.U109]=&quot;UNKNOWN&quot;;&quot;COMPLETE OR ASSERT REQUIRED EVIDENCE BEFORE REVIEW&quot;;IF([.U109]=&quot;BLOCKED&quot;;&quot;RESOLVE CONTRADICTION BEFORE REVIEW — NO AUTHORITY CREATED&quot;;IF([.U1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9]=&quot;READY FOR REVIEW&quot;;&quot;REVIEW ELIGIBLE — NO AUTHORITY&quot;;IF(OR([.U109]=&quot;UNKNOWN&quot;;[.U109]=&quot;BLOCKED&quot;);&quot;NOT REVIEW ELIGIBLE&quot;;&quot;NOT REVIEW ELIGIBLE&quot;))">
            <text:p>NOT REVIEW ELIGIBLE</text:p>
          </table:table-cell>
          <table:table-cell office:value-type="string" table:formula="of:=IF([.W109]=&quot;NOT REVIEW ELIGIBLE&quot;;&quot;DO NOT BEGIN SETTLEMENT REVIEW — RESOLVE READINESS OR CONTRADICTION CONDITIONS&quot;;IF([.W1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9]=&quot;&quot;;&quot;UNKNOWN&quot;;IF([.W109]&lt;&gt;&quot;REVIEW ELIGIBLE — NO AUTHORITY&quot;;&quot;BLOCKED — OUTCOME ASSERTED WITHOUT REVIEW ELIGIBILITY&quot;;IF(OR([.Y109]=&quot;REVIEWED — NO AUTHORITY&quot;;[.Y109]=&quot;REVIEW DEFERRED&quot;;[.Y109]=&quot;REVIEW BLOCKED&quot;);&quot;ACCEPTED INTAKE — NO AUTHORITY&quot;;&quot;BLOCKED — NONCANONICAL OUTCOME&quot;)))">
            <text:p>UNKNOWN</text:p>
          </table:table-cell>
          <table:table-cell office:value-type="string" table:formula="of:=IF([.Z109]=&quot;UNKNOWN&quot;;&quot;NO REVIEW OUTCOME ASSERTED — REMAINS UNKNOWN&quot;;IF([.Z109]=&quot;BLOCKED — OUTCOME ASSERTED WITHOUT REVIEW ELIGIBILITY&quot;;&quot;REMOVE OR CORRECT OUTCOME ASSERTION — REVIEW ELIGIBILITY REQUIRED FIRST&quot;;IF([.Z109]=&quot;BLOCKED — NONCANONICAL OUTCOME&quot;;&quot;CORRECT OUTCOME TO CANONICAL CONTROLLED VOCABULARY&quot;;IF([.Z10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09]=&quot;UNKNOWN&quot;;&quot;UNKNOWN&quot;;IF(OR([.Z109]=&quot;BLOCKED — OUTCOME ASSERTED WITHOUT REVIEW ELIGIBILITY&quot;;[.Z109]=&quot;BLOCKED — NONCANONICAL OUTCOME&quot;);&quot;BLOCKED&quot;;IF([.Z10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cell office:value-type="string" table:formula="of:=IF([.U110]=&quot;UNKNOWN&quot;;&quot;COMPLETE OR ASSERT REQUIRED EVIDENCE BEFORE REVIEW&quot;;IF([.U110]=&quot;BLOCKED&quot;;&quot;RESOLVE CONTRADICTION BEFORE REVIEW — NO AUTHORITY CREATED&quot;;IF([.U1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0]=&quot;READY FOR REVIEW&quot;;&quot;REVIEW ELIGIBLE — NO AUTHORITY&quot;;IF(OR([.U110]=&quot;UNKNOWN&quot;;[.U110]=&quot;BLOCKED&quot;);&quot;NOT REVIEW ELIGIBLE&quot;;&quot;NOT REVIEW ELIGIBLE&quot;))">
            <text:p>NOT REVIEW ELIGIBLE</text:p>
          </table:table-cell>
          <table:table-cell office:value-type="string" table:formula="of:=IF([.W110]=&quot;NOT REVIEW ELIGIBLE&quot;;&quot;DO NOT BEGIN SETTLEMENT REVIEW — RESOLVE READINESS OR CONTRADICTION CONDITIONS&quot;;IF([.W1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0]=&quot;&quot;;&quot;UNKNOWN&quot;;IF([.W110]&lt;&gt;&quot;REVIEW ELIGIBLE — NO AUTHORITY&quot;;&quot;BLOCKED — OUTCOME ASSERTED WITHOUT REVIEW ELIGIBILITY&quot;;IF(OR([.Y110]=&quot;REVIEWED — NO AUTHORITY&quot;;[.Y110]=&quot;REVIEW DEFERRED&quot;;[.Y110]=&quot;REVIEW BLOCKED&quot;);&quot;ACCEPTED INTAKE — NO AUTHORITY&quot;;&quot;BLOCKED — NONCANONICAL OUTCOME&quot;)))">
            <text:p>UNKNOWN</text:p>
          </table:table-cell>
          <table:table-cell office:value-type="string" table:formula="of:=IF([.Z110]=&quot;UNKNOWN&quot;;&quot;NO REVIEW OUTCOME ASSERTED — REMAINS UNKNOWN&quot;;IF([.Z110]=&quot;BLOCKED — OUTCOME ASSERTED WITHOUT REVIEW ELIGIBILITY&quot;;&quot;REMOVE OR CORRECT OUTCOME ASSERTION — REVIEW ELIGIBILITY REQUIRED FIRST&quot;;IF([.Z110]=&quot;BLOCKED — NONCANONICAL OUTCOME&quot;;&quot;CORRECT OUTCOME TO CANONICAL CONTROLLED VOCABULARY&quot;;IF([.Z1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0]=&quot;UNKNOWN&quot;;&quot;UNKNOWN&quot;;IF(OR([.Z110]=&quot;BLOCKED — OUTCOME ASSERTED WITHOUT REVIEW ELIGIBILITY&quot;;[.Z110]=&quot;BLOCKED — NONCANONICAL OUTCOME&quot;);&quot;BLOCKED&quot;;IF([.Z11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cell office:value-type="string" table:formula="of:=IF([.U111]=&quot;UNKNOWN&quot;;&quot;COMPLETE OR ASSERT REQUIRED EVIDENCE BEFORE REVIEW&quot;;IF([.U111]=&quot;BLOCKED&quot;;&quot;RESOLVE CONTRADICTION BEFORE REVIEW — NO AUTHORITY CREATED&quot;;IF([.U1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1]=&quot;READY FOR REVIEW&quot;;&quot;REVIEW ELIGIBLE — NO AUTHORITY&quot;;IF(OR([.U111]=&quot;UNKNOWN&quot;;[.U111]=&quot;BLOCKED&quot;);&quot;NOT REVIEW ELIGIBLE&quot;;&quot;NOT REVIEW ELIGIBLE&quot;))">
            <text:p>NOT REVIEW ELIGIBLE</text:p>
          </table:table-cell>
          <table:table-cell office:value-type="string" table:formula="of:=IF([.W111]=&quot;NOT REVIEW ELIGIBLE&quot;;&quot;DO NOT BEGIN SETTLEMENT REVIEW — RESOLVE READINESS OR CONTRADICTION CONDITIONS&quot;;IF([.W1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1]=&quot;&quot;;&quot;UNKNOWN&quot;;IF([.W111]&lt;&gt;&quot;REVIEW ELIGIBLE — NO AUTHORITY&quot;;&quot;BLOCKED — OUTCOME ASSERTED WITHOUT REVIEW ELIGIBILITY&quot;;IF(OR([.Y111]=&quot;REVIEWED — NO AUTHORITY&quot;;[.Y111]=&quot;REVIEW DEFERRED&quot;;[.Y111]=&quot;REVIEW BLOCKED&quot;);&quot;ACCEPTED INTAKE — NO AUTHORITY&quot;;&quot;BLOCKED — NONCANONICAL OUTCOME&quot;)))">
            <text:p>UNKNOWN</text:p>
          </table:table-cell>
          <table:table-cell office:value-type="string" table:formula="of:=IF([.Z111]=&quot;UNKNOWN&quot;;&quot;NO REVIEW OUTCOME ASSERTED — REMAINS UNKNOWN&quot;;IF([.Z111]=&quot;BLOCKED — OUTCOME ASSERTED WITHOUT REVIEW ELIGIBILITY&quot;;&quot;REMOVE OR CORRECT OUTCOME ASSERTION — REVIEW ELIGIBILITY REQUIRED FIRST&quot;;IF([.Z111]=&quot;BLOCKED — NONCANONICAL OUTCOME&quot;;&quot;CORRECT OUTCOME TO CANONICAL CONTROLLED VOCABULARY&quot;;IF([.Z1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1]=&quot;UNKNOWN&quot;;&quot;UNKNOWN&quot;;IF(OR([.Z111]=&quot;BLOCKED — OUTCOME ASSERTED WITHOUT REVIEW ELIGIBILITY&quot;;[.Z111]=&quot;BLOCKED — NONCANONICAL OUTCOME&quot;);&quot;BLOCKED&quot;;IF([.Z11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cell office:value-type="string" table:formula="of:=IF([.U112]=&quot;UNKNOWN&quot;;&quot;COMPLETE OR ASSERT REQUIRED EVIDENCE BEFORE REVIEW&quot;;IF([.U112]=&quot;BLOCKED&quot;;&quot;RESOLVE CONTRADICTION BEFORE REVIEW — NO AUTHORITY CREATED&quot;;IF([.U1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2]=&quot;READY FOR REVIEW&quot;;&quot;REVIEW ELIGIBLE — NO AUTHORITY&quot;;IF(OR([.U112]=&quot;UNKNOWN&quot;;[.U112]=&quot;BLOCKED&quot;);&quot;NOT REVIEW ELIGIBLE&quot;;&quot;NOT REVIEW ELIGIBLE&quot;))">
            <text:p>NOT REVIEW ELIGIBLE</text:p>
          </table:table-cell>
          <table:table-cell office:value-type="string" table:formula="of:=IF([.W112]=&quot;NOT REVIEW ELIGIBLE&quot;;&quot;DO NOT BEGIN SETTLEMENT REVIEW — RESOLVE READINESS OR CONTRADICTION CONDITIONS&quot;;IF([.W1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2]=&quot;&quot;;&quot;UNKNOWN&quot;;IF([.W112]&lt;&gt;&quot;REVIEW ELIGIBLE — NO AUTHORITY&quot;;&quot;BLOCKED — OUTCOME ASSERTED WITHOUT REVIEW ELIGIBILITY&quot;;IF(OR([.Y112]=&quot;REVIEWED — NO AUTHORITY&quot;;[.Y112]=&quot;REVIEW DEFERRED&quot;;[.Y112]=&quot;REVIEW BLOCKED&quot;);&quot;ACCEPTED INTAKE — NO AUTHORITY&quot;;&quot;BLOCKED — NONCANONICAL OUTCOME&quot;)))">
            <text:p>UNKNOWN</text:p>
          </table:table-cell>
          <table:table-cell office:value-type="string" table:formula="of:=IF([.Z112]=&quot;UNKNOWN&quot;;&quot;NO REVIEW OUTCOME ASSERTED — REMAINS UNKNOWN&quot;;IF([.Z112]=&quot;BLOCKED — OUTCOME ASSERTED WITHOUT REVIEW ELIGIBILITY&quot;;&quot;REMOVE OR CORRECT OUTCOME ASSERTION — REVIEW ELIGIBILITY REQUIRED FIRST&quot;;IF([.Z112]=&quot;BLOCKED — NONCANONICAL OUTCOME&quot;;&quot;CORRECT OUTCOME TO CANONICAL CONTROLLED VOCABULARY&quot;;IF([.Z1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2]=&quot;UNKNOWN&quot;;&quot;UNKNOWN&quot;;IF(OR([.Z112]=&quot;BLOCKED — OUTCOME ASSERTED WITHOUT REVIEW ELIGIBILITY&quot;;[.Z112]=&quot;BLOCKED — NONCANONICAL OUTCOME&quot;);&quot;BLOCKED&quot;;IF([.Z11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cell office:value-type="string" table:formula="of:=IF([.U113]=&quot;UNKNOWN&quot;;&quot;COMPLETE OR ASSERT REQUIRED EVIDENCE BEFORE REVIEW&quot;;IF([.U113]=&quot;BLOCKED&quot;;&quot;RESOLVE CONTRADICTION BEFORE REVIEW — NO AUTHORITY CREATED&quot;;IF([.U1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3]=&quot;READY FOR REVIEW&quot;;&quot;REVIEW ELIGIBLE — NO AUTHORITY&quot;;IF(OR([.U113]=&quot;UNKNOWN&quot;;[.U113]=&quot;BLOCKED&quot;);&quot;NOT REVIEW ELIGIBLE&quot;;&quot;NOT REVIEW ELIGIBLE&quot;))">
            <text:p>NOT REVIEW ELIGIBLE</text:p>
          </table:table-cell>
          <table:table-cell office:value-type="string" table:formula="of:=IF([.W113]=&quot;NOT REVIEW ELIGIBLE&quot;;&quot;DO NOT BEGIN SETTLEMENT REVIEW — RESOLVE READINESS OR CONTRADICTION CONDITIONS&quot;;IF([.W1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3]=&quot;&quot;;&quot;UNKNOWN&quot;;IF([.W113]&lt;&gt;&quot;REVIEW ELIGIBLE — NO AUTHORITY&quot;;&quot;BLOCKED — OUTCOME ASSERTED WITHOUT REVIEW ELIGIBILITY&quot;;IF(OR([.Y113]=&quot;REVIEWED — NO AUTHORITY&quot;;[.Y113]=&quot;REVIEW DEFERRED&quot;;[.Y113]=&quot;REVIEW BLOCKED&quot;);&quot;ACCEPTED INTAKE — NO AUTHORITY&quot;;&quot;BLOCKED — NONCANONICAL OUTCOME&quot;)))">
            <text:p>UNKNOWN</text:p>
          </table:table-cell>
          <table:table-cell office:value-type="string" table:formula="of:=IF([.Z113]=&quot;UNKNOWN&quot;;&quot;NO REVIEW OUTCOME ASSERTED — REMAINS UNKNOWN&quot;;IF([.Z113]=&quot;BLOCKED — OUTCOME ASSERTED WITHOUT REVIEW ELIGIBILITY&quot;;&quot;REMOVE OR CORRECT OUTCOME ASSERTION — REVIEW ELIGIBILITY REQUIRED FIRST&quot;;IF([.Z113]=&quot;BLOCKED — NONCANONICAL OUTCOME&quot;;&quot;CORRECT OUTCOME TO CANONICAL CONTROLLED VOCABULARY&quot;;IF([.Z1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3]=&quot;UNKNOWN&quot;;&quot;UNKNOWN&quot;;IF(OR([.Z113]=&quot;BLOCKED — OUTCOME ASSERTED WITHOUT REVIEW ELIGIBILITY&quot;;[.Z113]=&quot;BLOCKED — NONCANONICAL OUTCOME&quot;);&quot;BLOCKED&quot;;IF([.Z11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cell office:value-type="string" table:formula="of:=IF([.U114]=&quot;UNKNOWN&quot;;&quot;COMPLETE OR ASSERT REQUIRED EVIDENCE BEFORE REVIEW&quot;;IF([.U114]=&quot;BLOCKED&quot;;&quot;RESOLVE CONTRADICTION BEFORE REVIEW — NO AUTHORITY CREATED&quot;;IF([.U1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4]=&quot;READY FOR REVIEW&quot;;&quot;REVIEW ELIGIBLE — NO AUTHORITY&quot;;IF(OR([.U114]=&quot;UNKNOWN&quot;;[.U114]=&quot;BLOCKED&quot;);&quot;NOT REVIEW ELIGIBLE&quot;;&quot;NOT REVIEW ELIGIBLE&quot;))">
            <text:p>NOT REVIEW ELIGIBLE</text:p>
          </table:table-cell>
          <table:table-cell office:value-type="string" table:formula="of:=IF([.W114]=&quot;NOT REVIEW ELIGIBLE&quot;;&quot;DO NOT BEGIN SETTLEMENT REVIEW — RESOLVE READINESS OR CONTRADICTION CONDITIONS&quot;;IF([.W1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4]=&quot;&quot;;&quot;UNKNOWN&quot;;IF([.W114]&lt;&gt;&quot;REVIEW ELIGIBLE — NO AUTHORITY&quot;;&quot;BLOCKED — OUTCOME ASSERTED WITHOUT REVIEW ELIGIBILITY&quot;;IF(OR([.Y114]=&quot;REVIEWED — NO AUTHORITY&quot;;[.Y114]=&quot;REVIEW DEFERRED&quot;;[.Y114]=&quot;REVIEW BLOCKED&quot;);&quot;ACCEPTED INTAKE — NO AUTHORITY&quot;;&quot;BLOCKED — NONCANONICAL OUTCOME&quot;)))">
            <text:p>UNKNOWN</text:p>
          </table:table-cell>
          <table:table-cell office:value-type="string" table:formula="of:=IF([.Z114]=&quot;UNKNOWN&quot;;&quot;NO REVIEW OUTCOME ASSERTED — REMAINS UNKNOWN&quot;;IF([.Z114]=&quot;BLOCKED — OUTCOME ASSERTED WITHOUT REVIEW ELIGIBILITY&quot;;&quot;REMOVE OR CORRECT OUTCOME ASSERTION — REVIEW ELIGIBILITY REQUIRED FIRST&quot;;IF([.Z114]=&quot;BLOCKED — NONCANONICAL OUTCOME&quot;;&quot;CORRECT OUTCOME TO CANONICAL CONTROLLED VOCABULARY&quot;;IF([.Z1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4]=&quot;UNKNOWN&quot;;&quot;UNKNOWN&quot;;IF(OR([.Z114]=&quot;BLOCKED — OUTCOME ASSERTED WITHOUT REVIEW ELIGIBILITY&quot;;[.Z114]=&quot;BLOCKED — NONCANONICAL OUTCOME&quot;);&quot;BLOCKED&quot;;IF([.Z11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cell office:value-type="string" table:formula="of:=IF([.U115]=&quot;UNKNOWN&quot;;&quot;COMPLETE OR ASSERT REQUIRED EVIDENCE BEFORE REVIEW&quot;;IF([.U115]=&quot;BLOCKED&quot;;&quot;RESOLVE CONTRADICTION BEFORE REVIEW — NO AUTHORITY CREATED&quot;;IF([.U1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5]=&quot;READY FOR REVIEW&quot;;&quot;REVIEW ELIGIBLE — NO AUTHORITY&quot;;IF(OR([.U115]=&quot;UNKNOWN&quot;;[.U115]=&quot;BLOCKED&quot;);&quot;NOT REVIEW ELIGIBLE&quot;;&quot;NOT REVIEW ELIGIBLE&quot;))">
            <text:p>NOT REVIEW ELIGIBLE</text:p>
          </table:table-cell>
          <table:table-cell office:value-type="string" table:formula="of:=IF([.W115]=&quot;NOT REVIEW ELIGIBLE&quot;;&quot;DO NOT BEGIN SETTLEMENT REVIEW — RESOLVE READINESS OR CONTRADICTION CONDITIONS&quot;;IF([.W1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5]=&quot;&quot;;&quot;UNKNOWN&quot;;IF([.W115]&lt;&gt;&quot;REVIEW ELIGIBLE — NO AUTHORITY&quot;;&quot;BLOCKED — OUTCOME ASSERTED WITHOUT REVIEW ELIGIBILITY&quot;;IF(OR([.Y115]=&quot;REVIEWED — NO AUTHORITY&quot;;[.Y115]=&quot;REVIEW DEFERRED&quot;;[.Y115]=&quot;REVIEW BLOCKED&quot;);&quot;ACCEPTED INTAKE — NO AUTHORITY&quot;;&quot;BLOCKED — NONCANONICAL OUTCOME&quot;)))">
            <text:p>UNKNOWN</text:p>
          </table:table-cell>
          <table:table-cell office:value-type="string" table:formula="of:=IF([.Z115]=&quot;UNKNOWN&quot;;&quot;NO REVIEW OUTCOME ASSERTED — REMAINS UNKNOWN&quot;;IF([.Z115]=&quot;BLOCKED — OUTCOME ASSERTED WITHOUT REVIEW ELIGIBILITY&quot;;&quot;REMOVE OR CORRECT OUTCOME ASSERTION — REVIEW ELIGIBILITY REQUIRED FIRST&quot;;IF([.Z115]=&quot;BLOCKED — NONCANONICAL OUTCOME&quot;;&quot;CORRECT OUTCOME TO CANONICAL CONTROLLED VOCABULARY&quot;;IF([.Z1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5]=&quot;UNKNOWN&quot;;&quot;UNKNOWN&quot;;IF(OR([.Z115]=&quot;BLOCKED — OUTCOME ASSERTED WITHOUT REVIEW ELIGIBILITY&quot;;[.Z115]=&quot;BLOCKED — NONCANONICAL OUTCOME&quot;);&quot;BLOCKED&quot;;IF([.Z11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cell office:value-type="string" table:formula="of:=IF([.U116]=&quot;UNKNOWN&quot;;&quot;COMPLETE OR ASSERT REQUIRED EVIDENCE BEFORE REVIEW&quot;;IF([.U116]=&quot;BLOCKED&quot;;&quot;RESOLVE CONTRADICTION BEFORE REVIEW — NO AUTHORITY CREATED&quot;;IF([.U1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6]=&quot;READY FOR REVIEW&quot;;&quot;REVIEW ELIGIBLE — NO AUTHORITY&quot;;IF(OR([.U116]=&quot;UNKNOWN&quot;;[.U116]=&quot;BLOCKED&quot;);&quot;NOT REVIEW ELIGIBLE&quot;;&quot;NOT REVIEW ELIGIBLE&quot;))">
            <text:p>NOT REVIEW ELIGIBLE</text:p>
          </table:table-cell>
          <table:table-cell office:value-type="string" table:formula="of:=IF([.W116]=&quot;NOT REVIEW ELIGIBLE&quot;;&quot;DO NOT BEGIN SETTLEMENT REVIEW — RESOLVE READINESS OR CONTRADICTION CONDITIONS&quot;;IF([.W1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6]=&quot;&quot;;&quot;UNKNOWN&quot;;IF([.W116]&lt;&gt;&quot;REVIEW ELIGIBLE — NO AUTHORITY&quot;;&quot;BLOCKED — OUTCOME ASSERTED WITHOUT REVIEW ELIGIBILITY&quot;;IF(OR([.Y116]=&quot;REVIEWED — NO AUTHORITY&quot;;[.Y116]=&quot;REVIEW DEFERRED&quot;;[.Y116]=&quot;REVIEW BLOCKED&quot;);&quot;ACCEPTED INTAKE — NO AUTHORITY&quot;;&quot;BLOCKED — NONCANONICAL OUTCOME&quot;)))">
            <text:p>UNKNOWN</text:p>
          </table:table-cell>
          <table:table-cell office:value-type="string" table:formula="of:=IF([.Z116]=&quot;UNKNOWN&quot;;&quot;NO REVIEW OUTCOME ASSERTED — REMAINS UNKNOWN&quot;;IF([.Z116]=&quot;BLOCKED — OUTCOME ASSERTED WITHOUT REVIEW ELIGIBILITY&quot;;&quot;REMOVE OR CORRECT OUTCOME ASSERTION — REVIEW ELIGIBILITY REQUIRED FIRST&quot;;IF([.Z116]=&quot;BLOCKED — NONCANONICAL OUTCOME&quot;;&quot;CORRECT OUTCOME TO CANONICAL CONTROLLED VOCABULARY&quot;;IF([.Z1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6]=&quot;UNKNOWN&quot;;&quot;UNKNOWN&quot;;IF(OR([.Z116]=&quot;BLOCKED — OUTCOME ASSERTED WITHOUT REVIEW ELIGIBILITY&quot;;[.Z116]=&quot;BLOCKED — NONCANONICAL OUTCOME&quot;);&quot;BLOCKED&quot;;IF([.Z11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cell office:value-type="string" table:formula="of:=IF([.U117]=&quot;UNKNOWN&quot;;&quot;COMPLETE OR ASSERT REQUIRED EVIDENCE BEFORE REVIEW&quot;;IF([.U117]=&quot;BLOCKED&quot;;&quot;RESOLVE CONTRADICTION BEFORE REVIEW — NO AUTHORITY CREATED&quot;;IF([.U1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7]=&quot;READY FOR REVIEW&quot;;&quot;REVIEW ELIGIBLE — NO AUTHORITY&quot;;IF(OR([.U117]=&quot;UNKNOWN&quot;;[.U117]=&quot;BLOCKED&quot;);&quot;NOT REVIEW ELIGIBLE&quot;;&quot;NOT REVIEW ELIGIBLE&quot;))">
            <text:p>NOT REVIEW ELIGIBLE</text:p>
          </table:table-cell>
          <table:table-cell office:value-type="string" table:formula="of:=IF([.W117]=&quot;NOT REVIEW ELIGIBLE&quot;;&quot;DO NOT BEGIN SETTLEMENT REVIEW — RESOLVE READINESS OR CONTRADICTION CONDITIONS&quot;;IF([.W1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7]=&quot;&quot;;&quot;UNKNOWN&quot;;IF([.W117]&lt;&gt;&quot;REVIEW ELIGIBLE — NO AUTHORITY&quot;;&quot;BLOCKED — OUTCOME ASSERTED WITHOUT REVIEW ELIGIBILITY&quot;;IF(OR([.Y117]=&quot;REVIEWED — NO AUTHORITY&quot;;[.Y117]=&quot;REVIEW DEFERRED&quot;;[.Y117]=&quot;REVIEW BLOCKED&quot;);&quot;ACCEPTED INTAKE — NO AUTHORITY&quot;;&quot;BLOCKED — NONCANONICAL OUTCOME&quot;)))">
            <text:p>UNKNOWN</text:p>
          </table:table-cell>
          <table:table-cell office:value-type="string" table:formula="of:=IF([.Z117]=&quot;UNKNOWN&quot;;&quot;NO REVIEW OUTCOME ASSERTED — REMAINS UNKNOWN&quot;;IF([.Z117]=&quot;BLOCKED — OUTCOME ASSERTED WITHOUT REVIEW ELIGIBILITY&quot;;&quot;REMOVE OR CORRECT OUTCOME ASSERTION — REVIEW ELIGIBILITY REQUIRED FIRST&quot;;IF([.Z117]=&quot;BLOCKED — NONCANONICAL OUTCOME&quot;;&quot;CORRECT OUTCOME TO CANONICAL CONTROLLED VOCABULARY&quot;;IF([.Z1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7]=&quot;UNKNOWN&quot;;&quot;UNKNOWN&quot;;IF(OR([.Z117]=&quot;BLOCKED — OUTCOME ASSERTED WITHOUT REVIEW ELIGIBILITY&quot;;[.Z117]=&quot;BLOCKED — NONCANONICAL OUTCOME&quot;);&quot;BLOCKED&quot;;IF([.Z11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cell office:value-type="string" table:formula="of:=IF([.U118]=&quot;UNKNOWN&quot;;&quot;COMPLETE OR ASSERT REQUIRED EVIDENCE BEFORE REVIEW&quot;;IF([.U118]=&quot;BLOCKED&quot;;&quot;RESOLVE CONTRADICTION BEFORE REVIEW — NO AUTHORITY CREATED&quot;;IF([.U1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8]=&quot;READY FOR REVIEW&quot;;&quot;REVIEW ELIGIBLE — NO AUTHORITY&quot;;IF(OR([.U118]=&quot;UNKNOWN&quot;;[.U118]=&quot;BLOCKED&quot;);&quot;NOT REVIEW ELIGIBLE&quot;;&quot;NOT REVIEW ELIGIBLE&quot;))">
            <text:p>NOT REVIEW ELIGIBLE</text:p>
          </table:table-cell>
          <table:table-cell office:value-type="string" table:formula="of:=IF([.W118]=&quot;NOT REVIEW ELIGIBLE&quot;;&quot;DO NOT BEGIN SETTLEMENT REVIEW — RESOLVE READINESS OR CONTRADICTION CONDITIONS&quot;;IF([.W1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8]=&quot;&quot;;&quot;UNKNOWN&quot;;IF([.W118]&lt;&gt;&quot;REVIEW ELIGIBLE — NO AUTHORITY&quot;;&quot;BLOCKED — OUTCOME ASSERTED WITHOUT REVIEW ELIGIBILITY&quot;;IF(OR([.Y118]=&quot;REVIEWED — NO AUTHORITY&quot;;[.Y118]=&quot;REVIEW DEFERRED&quot;;[.Y118]=&quot;REVIEW BLOCKED&quot;);&quot;ACCEPTED INTAKE — NO AUTHORITY&quot;;&quot;BLOCKED — NONCANONICAL OUTCOME&quot;)))">
            <text:p>UNKNOWN</text:p>
          </table:table-cell>
          <table:table-cell office:value-type="string" table:formula="of:=IF([.Z118]=&quot;UNKNOWN&quot;;&quot;NO REVIEW OUTCOME ASSERTED — REMAINS UNKNOWN&quot;;IF([.Z118]=&quot;BLOCKED — OUTCOME ASSERTED WITHOUT REVIEW ELIGIBILITY&quot;;&quot;REMOVE OR CORRECT OUTCOME ASSERTION — REVIEW ELIGIBILITY REQUIRED FIRST&quot;;IF([.Z118]=&quot;BLOCKED — NONCANONICAL OUTCOME&quot;;&quot;CORRECT OUTCOME TO CANONICAL CONTROLLED VOCABULARY&quot;;IF([.Z1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8]=&quot;UNKNOWN&quot;;&quot;UNKNOWN&quot;;IF(OR([.Z118]=&quot;BLOCKED — OUTCOME ASSERTED WITHOUT REVIEW ELIGIBILITY&quot;;[.Z118]=&quot;BLOCKED — NONCANONICAL OUTCOME&quot;);&quot;BLOCKED&quot;;IF([.Z11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cell office:value-type="string" table:formula="of:=IF([.U119]=&quot;UNKNOWN&quot;;&quot;COMPLETE OR ASSERT REQUIRED EVIDENCE BEFORE REVIEW&quot;;IF([.U119]=&quot;BLOCKED&quot;;&quot;RESOLVE CONTRADICTION BEFORE REVIEW — NO AUTHORITY CREATED&quot;;IF([.U1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9]=&quot;READY FOR REVIEW&quot;;&quot;REVIEW ELIGIBLE — NO AUTHORITY&quot;;IF(OR([.U119]=&quot;UNKNOWN&quot;;[.U119]=&quot;BLOCKED&quot;);&quot;NOT REVIEW ELIGIBLE&quot;;&quot;NOT REVIEW ELIGIBLE&quot;))">
            <text:p>NOT REVIEW ELIGIBLE</text:p>
          </table:table-cell>
          <table:table-cell office:value-type="string" table:formula="of:=IF([.W119]=&quot;NOT REVIEW ELIGIBLE&quot;;&quot;DO NOT BEGIN SETTLEMENT REVIEW — RESOLVE READINESS OR CONTRADICTION CONDITIONS&quot;;IF([.W1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9]=&quot;&quot;;&quot;UNKNOWN&quot;;IF([.W119]&lt;&gt;&quot;REVIEW ELIGIBLE — NO AUTHORITY&quot;;&quot;BLOCKED — OUTCOME ASSERTED WITHOUT REVIEW ELIGIBILITY&quot;;IF(OR([.Y119]=&quot;REVIEWED — NO AUTHORITY&quot;;[.Y119]=&quot;REVIEW DEFERRED&quot;;[.Y119]=&quot;REVIEW BLOCKED&quot;);&quot;ACCEPTED INTAKE — NO AUTHORITY&quot;;&quot;BLOCKED — NONCANONICAL OUTCOME&quot;)))">
            <text:p>UNKNOWN</text:p>
          </table:table-cell>
          <table:table-cell office:value-type="string" table:formula="of:=IF([.Z119]=&quot;UNKNOWN&quot;;&quot;NO REVIEW OUTCOME ASSERTED — REMAINS UNKNOWN&quot;;IF([.Z119]=&quot;BLOCKED — OUTCOME ASSERTED WITHOUT REVIEW ELIGIBILITY&quot;;&quot;REMOVE OR CORRECT OUTCOME ASSERTION — REVIEW ELIGIBILITY REQUIRED FIRST&quot;;IF([.Z119]=&quot;BLOCKED — NONCANONICAL OUTCOME&quot;;&quot;CORRECT OUTCOME TO CANONICAL CONTROLLED VOCABULARY&quot;;IF([.Z1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19]=&quot;UNKNOWN&quot;;&quot;UNKNOWN&quot;;IF(OR([.Z119]=&quot;BLOCKED — OUTCOME ASSERTED WITHOUT REVIEW ELIGIBILITY&quot;;[.Z119]=&quot;BLOCKED — NONCANONICAL OUTCOME&quot;);&quot;BLOCKED&quot;;IF([.Z11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cell office:value-type="string" table:formula="of:=IF([.U120]=&quot;UNKNOWN&quot;;&quot;COMPLETE OR ASSERT REQUIRED EVIDENCE BEFORE REVIEW&quot;;IF([.U120]=&quot;BLOCKED&quot;;&quot;RESOLVE CONTRADICTION BEFORE REVIEW — NO AUTHORITY CREATED&quot;;IF([.U1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0]=&quot;READY FOR REVIEW&quot;;&quot;REVIEW ELIGIBLE — NO AUTHORITY&quot;;IF(OR([.U120]=&quot;UNKNOWN&quot;;[.U120]=&quot;BLOCKED&quot;);&quot;NOT REVIEW ELIGIBLE&quot;;&quot;NOT REVIEW ELIGIBLE&quot;))">
            <text:p>NOT REVIEW ELIGIBLE</text:p>
          </table:table-cell>
          <table:table-cell office:value-type="string" table:formula="of:=IF([.W120]=&quot;NOT REVIEW ELIGIBLE&quot;;&quot;DO NOT BEGIN SETTLEMENT REVIEW — RESOLVE READINESS OR CONTRADICTION CONDITIONS&quot;;IF([.W1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0]=&quot;&quot;;&quot;UNKNOWN&quot;;IF([.W120]&lt;&gt;&quot;REVIEW ELIGIBLE — NO AUTHORITY&quot;;&quot;BLOCKED — OUTCOME ASSERTED WITHOUT REVIEW ELIGIBILITY&quot;;IF(OR([.Y120]=&quot;REVIEWED — NO AUTHORITY&quot;;[.Y120]=&quot;REVIEW DEFERRED&quot;;[.Y120]=&quot;REVIEW BLOCKED&quot;);&quot;ACCEPTED INTAKE — NO AUTHORITY&quot;;&quot;BLOCKED — NONCANONICAL OUTCOME&quot;)))">
            <text:p>UNKNOWN</text:p>
          </table:table-cell>
          <table:table-cell office:value-type="string" table:formula="of:=IF([.Z120]=&quot;UNKNOWN&quot;;&quot;NO REVIEW OUTCOME ASSERTED — REMAINS UNKNOWN&quot;;IF([.Z120]=&quot;BLOCKED — OUTCOME ASSERTED WITHOUT REVIEW ELIGIBILITY&quot;;&quot;REMOVE OR CORRECT OUTCOME ASSERTION — REVIEW ELIGIBILITY REQUIRED FIRST&quot;;IF([.Z120]=&quot;BLOCKED — NONCANONICAL OUTCOME&quot;;&quot;CORRECT OUTCOME TO CANONICAL CONTROLLED VOCABULARY&quot;;IF([.Z1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0]=&quot;UNKNOWN&quot;;&quot;UNKNOWN&quot;;IF(OR([.Z120]=&quot;BLOCKED — OUTCOME ASSERTED WITHOUT REVIEW ELIGIBILITY&quot;;[.Z120]=&quot;BLOCKED — NONCANONICAL OUTCOME&quot;);&quot;BLOCKED&quot;;IF([.Z12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cell office:value-type="string" table:formula="of:=IF([.U121]=&quot;UNKNOWN&quot;;&quot;COMPLETE OR ASSERT REQUIRED EVIDENCE BEFORE REVIEW&quot;;IF([.U121]=&quot;BLOCKED&quot;;&quot;RESOLVE CONTRADICTION BEFORE REVIEW — NO AUTHORITY CREATED&quot;;IF([.U1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1]=&quot;READY FOR REVIEW&quot;;&quot;REVIEW ELIGIBLE — NO AUTHORITY&quot;;IF(OR([.U121]=&quot;UNKNOWN&quot;;[.U121]=&quot;BLOCKED&quot;);&quot;NOT REVIEW ELIGIBLE&quot;;&quot;NOT REVIEW ELIGIBLE&quot;))">
            <text:p>NOT REVIEW ELIGIBLE</text:p>
          </table:table-cell>
          <table:table-cell office:value-type="string" table:formula="of:=IF([.W121]=&quot;NOT REVIEW ELIGIBLE&quot;;&quot;DO NOT BEGIN SETTLEMENT REVIEW — RESOLVE READINESS OR CONTRADICTION CONDITIONS&quot;;IF([.W1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1]=&quot;&quot;;&quot;UNKNOWN&quot;;IF([.W121]&lt;&gt;&quot;REVIEW ELIGIBLE — NO AUTHORITY&quot;;&quot;BLOCKED — OUTCOME ASSERTED WITHOUT REVIEW ELIGIBILITY&quot;;IF(OR([.Y121]=&quot;REVIEWED — NO AUTHORITY&quot;;[.Y121]=&quot;REVIEW DEFERRED&quot;;[.Y121]=&quot;REVIEW BLOCKED&quot;);&quot;ACCEPTED INTAKE — NO AUTHORITY&quot;;&quot;BLOCKED — NONCANONICAL OUTCOME&quot;)))">
            <text:p>UNKNOWN</text:p>
          </table:table-cell>
          <table:table-cell office:value-type="string" table:formula="of:=IF([.Z121]=&quot;UNKNOWN&quot;;&quot;NO REVIEW OUTCOME ASSERTED — REMAINS UNKNOWN&quot;;IF([.Z121]=&quot;BLOCKED — OUTCOME ASSERTED WITHOUT REVIEW ELIGIBILITY&quot;;&quot;REMOVE OR CORRECT OUTCOME ASSERTION — REVIEW ELIGIBILITY REQUIRED FIRST&quot;;IF([.Z121]=&quot;BLOCKED — NONCANONICAL OUTCOME&quot;;&quot;CORRECT OUTCOME TO CANONICAL CONTROLLED VOCABULARY&quot;;IF([.Z1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1]=&quot;UNKNOWN&quot;;&quot;UNKNOWN&quot;;IF(OR([.Z121]=&quot;BLOCKED — OUTCOME ASSERTED WITHOUT REVIEW ELIGIBILITY&quot;;[.Z121]=&quot;BLOCKED — NONCANONICAL OUTCOME&quot;);&quot;BLOCKED&quot;;IF([.Z12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cell office:value-type="string" table:formula="of:=IF([.U122]=&quot;UNKNOWN&quot;;&quot;COMPLETE OR ASSERT REQUIRED EVIDENCE BEFORE REVIEW&quot;;IF([.U122]=&quot;BLOCKED&quot;;&quot;RESOLVE CONTRADICTION BEFORE REVIEW — NO AUTHORITY CREATED&quot;;IF([.U1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2]=&quot;READY FOR REVIEW&quot;;&quot;REVIEW ELIGIBLE — NO AUTHORITY&quot;;IF(OR([.U122]=&quot;UNKNOWN&quot;;[.U122]=&quot;BLOCKED&quot;);&quot;NOT REVIEW ELIGIBLE&quot;;&quot;NOT REVIEW ELIGIBLE&quot;))">
            <text:p>NOT REVIEW ELIGIBLE</text:p>
          </table:table-cell>
          <table:table-cell office:value-type="string" table:formula="of:=IF([.W122]=&quot;NOT REVIEW ELIGIBLE&quot;;&quot;DO NOT BEGIN SETTLEMENT REVIEW — RESOLVE READINESS OR CONTRADICTION CONDITIONS&quot;;IF([.W1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2]=&quot;&quot;;&quot;UNKNOWN&quot;;IF([.W122]&lt;&gt;&quot;REVIEW ELIGIBLE — NO AUTHORITY&quot;;&quot;BLOCKED — OUTCOME ASSERTED WITHOUT REVIEW ELIGIBILITY&quot;;IF(OR([.Y122]=&quot;REVIEWED — NO AUTHORITY&quot;;[.Y122]=&quot;REVIEW DEFERRED&quot;;[.Y122]=&quot;REVIEW BLOCKED&quot;);&quot;ACCEPTED INTAKE — NO AUTHORITY&quot;;&quot;BLOCKED — NONCANONICAL OUTCOME&quot;)))">
            <text:p>UNKNOWN</text:p>
          </table:table-cell>
          <table:table-cell office:value-type="string" table:formula="of:=IF([.Z122]=&quot;UNKNOWN&quot;;&quot;NO REVIEW OUTCOME ASSERTED — REMAINS UNKNOWN&quot;;IF([.Z122]=&quot;BLOCKED — OUTCOME ASSERTED WITHOUT REVIEW ELIGIBILITY&quot;;&quot;REMOVE OR CORRECT OUTCOME ASSERTION — REVIEW ELIGIBILITY REQUIRED FIRST&quot;;IF([.Z122]=&quot;BLOCKED — NONCANONICAL OUTCOME&quot;;&quot;CORRECT OUTCOME TO CANONICAL CONTROLLED VOCABULARY&quot;;IF([.Z1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2]=&quot;UNKNOWN&quot;;&quot;UNKNOWN&quot;;IF(OR([.Z122]=&quot;BLOCKED — OUTCOME ASSERTED WITHOUT REVIEW ELIGIBILITY&quot;;[.Z122]=&quot;BLOCKED — NONCANONICAL OUTCOME&quot;);&quot;BLOCKED&quot;;IF([.Z12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cell office:value-type="string" table:formula="of:=IF([.U123]=&quot;UNKNOWN&quot;;&quot;COMPLETE OR ASSERT REQUIRED EVIDENCE BEFORE REVIEW&quot;;IF([.U123]=&quot;BLOCKED&quot;;&quot;RESOLVE CONTRADICTION BEFORE REVIEW — NO AUTHORITY CREATED&quot;;IF([.U1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3]=&quot;READY FOR REVIEW&quot;;&quot;REVIEW ELIGIBLE — NO AUTHORITY&quot;;IF(OR([.U123]=&quot;UNKNOWN&quot;;[.U123]=&quot;BLOCKED&quot;);&quot;NOT REVIEW ELIGIBLE&quot;;&quot;NOT REVIEW ELIGIBLE&quot;))">
            <text:p>NOT REVIEW ELIGIBLE</text:p>
          </table:table-cell>
          <table:table-cell office:value-type="string" table:formula="of:=IF([.W123]=&quot;NOT REVIEW ELIGIBLE&quot;;&quot;DO NOT BEGIN SETTLEMENT REVIEW — RESOLVE READINESS OR CONTRADICTION CONDITIONS&quot;;IF([.W1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3]=&quot;&quot;;&quot;UNKNOWN&quot;;IF([.W123]&lt;&gt;&quot;REVIEW ELIGIBLE — NO AUTHORITY&quot;;&quot;BLOCKED — OUTCOME ASSERTED WITHOUT REVIEW ELIGIBILITY&quot;;IF(OR([.Y123]=&quot;REVIEWED — NO AUTHORITY&quot;;[.Y123]=&quot;REVIEW DEFERRED&quot;;[.Y123]=&quot;REVIEW BLOCKED&quot;);&quot;ACCEPTED INTAKE — NO AUTHORITY&quot;;&quot;BLOCKED — NONCANONICAL OUTCOME&quot;)))">
            <text:p>UNKNOWN</text:p>
          </table:table-cell>
          <table:table-cell office:value-type="string" table:formula="of:=IF([.Z123]=&quot;UNKNOWN&quot;;&quot;NO REVIEW OUTCOME ASSERTED — REMAINS UNKNOWN&quot;;IF([.Z123]=&quot;BLOCKED — OUTCOME ASSERTED WITHOUT REVIEW ELIGIBILITY&quot;;&quot;REMOVE OR CORRECT OUTCOME ASSERTION — REVIEW ELIGIBILITY REQUIRED FIRST&quot;;IF([.Z123]=&quot;BLOCKED — NONCANONICAL OUTCOME&quot;;&quot;CORRECT OUTCOME TO CANONICAL CONTROLLED VOCABULARY&quot;;IF([.Z1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3]=&quot;UNKNOWN&quot;;&quot;UNKNOWN&quot;;IF(OR([.Z123]=&quot;BLOCKED — OUTCOME ASSERTED WITHOUT REVIEW ELIGIBILITY&quot;;[.Z123]=&quot;BLOCKED — NONCANONICAL OUTCOME&quot;);&quot;BLOCKED&quot;;IF([.Z12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cell office:value-type="string" table:formula="of:=IF([.U124]=&quot;UNKNOWN&quot;;&quot;COMPLETE OR ASSERT REQUIRED EVIDENCE BEFORE REVIEW&quot;;IF([.U124]=&quot;BLOCKED&quot;;&quot;RESOLVE CONTRADICTION BEFORE REVIEW — NO AUTHORITY CREATED&quot;;IF([.U1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4]=&quot;READY FOR REVIEW&quot;;&quot;REVIEW ELIGIBLE — NO AUTHORITY&quot;;IF(OR([.U124]=&quot;UNKNOWN&quot;;[.U124]=&quot;BLOCKED&quot;);&quot;NOT REVIEW ELIGIBLE&quot;;&quot;NOT REVIEW ELIGIBLE&quot;))">
            <text:p>NOT REVIEW ELIGIBLE</text:p>
          </table:table-cell>
          <table:table-cell office:value-type="string" table:formula="of:=IF([.W124]=&quot;NOT REVIEW ELIGIBLE&quot;;&quot;DO NOT BEGIN SETTLEMENT REVIEW — RESOLVE READINESS OR CONTRADICTION CONDITIONS&quot;;IF([.W1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4]=&quot;&quot;;&quot;UNKNOWN&quot;;IF([.W124]&lt;&gt;&quot;REVIEW ELIGIBLE — NO AUTHORITY&quot;;&quot;BLOCKED — OUTCOME ASSERTED WITHOUT REVIEW ELIGIBILITY&quot;;IF(OR([.Y124]=&quot;REVIEWED — NO AUTHORITY&quot;;[.Y124]=&quot;REVIEW DEFERRED&quot;;[.Y124]=&quot;REVIEW BLOCKED&quot;);&quot;ACCEPTED INTAKE — NO AUTHORITY&quot;;&quot;BLOCKED — NONCANONICAL OUTCOME&quot;)))">
            <text:p>UNKNOWN</text:p>
          </table:table-cell>
          <table:table-cell office:value-type="string" table:formula="of:=IF([.Z124]=&quot;UNKNOWN&quot;;&quot;NO REVIEW OUTCOME ASSERTED — REMAINS UNKNOWN&quot;;IF([.Z124]=&quot;BLOCKED — OUTCOME ASSERTED WITHOUT REVIEW ELIGIBILITY&quot;;&quot;REMOVE OR CORRECT OUTCOME ASSERTION — REVIEW ELIGIBILITY REQUIRED FIRST&quot;;IF([.Z124]=&quot;BLOCKED — NONCANONICAL OUTCOME&quot;;&quot;CORRECT OUTCOME TO CANONICAL CONTROLLED VOCABULARY&quot;;IF([.Z1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4]=&quot;UNKNOWN&quot;;&quot;UNKNOWN&quot;;IF(OR([.Z124]=&quot;BLOCKED — OUTCOME ASSERTED WITHOUT REVIEW ELIGIBILITY&quot;;[.Z124]=&quot;BLOCKED — NONCANONICAL OUTCOME&quot;);&quot;BLOCKED&quot;;IF([.Z12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cell office:value-type="string" table:formula="of:=IF([.U125]=&quot;UNKNOWN&quot;;&quot;COMPLETE OR ASSERT REQUIRED EVIDENCE BEFORE REVIEW&quot;;IF([.U125]=&quot;BLOCKED&quot;;&quot;RESOLVE CONTRADICTION BEFORE REVIEW — NO AUTHORITY CREATED&quot;;IF([.U1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5]=&quot;READY FOR REVIEW&quot;;&quot;REVIEW ELIGIBLE — NO AUTHORITY&quot;;IF(OR([.U125]=&quot;UNKNOWN&quot;;[.U125]=&quot;BLOCKED&quot;);&quot;NOT REVIEW ELIGIBLE&quot;;&quot;NOT REVIEW ELIGIBLE&quot;))">
            <text:p>NOT REVIEW ELIGIBLE</text:p>
          </table:table-cell>
          <table:table-cell office:value-type="string" table:formula="of:=IF([.W125]=&quot;NOT REVIEW ELIGIBLE&quot;;&quot;DO NOT BEGIN SETTLEMENT REVIEW — RESOLVE READINESS OR CONTRADICTION CONDITIONS&quot;;IF([.W1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5]=&quot;&quot;;&quot;UNKNOWN&quot;;IF([.W125]&lt;&gt;&quot;REVIEW ELIGIBLE — NO AUTHORITY&quot;;&quot;BLOCKED — OUTCOME ASSERTED WITHOUT REVIEW ELIGIBILITY&quot;;IF(OR([.Y125]=&quot;REVIEWED — NO AUTHORITY&quot;;[.Y125]=&quot;REVIEW DEFERRED&quot;;[.Y125]=&quot;REVIEW BLOCKED&quot;);&quot;ACCEPTED INTAKE — NO AUTHORITY&quot;;&quot;BLOCKED — NONCANONICAL OUTCOME&quot;)))">
            <text:p>UNKNOWN</text:p>
          </table:table-cell>
          <table:table-cell office:value-type="string" table:formula="of:=IF([.Z125]=&quot;UNKNOWN&quot;;&quot;NO REVIEW OUTCOME ASSERTED — REMAINS UNKNOWN&quot;;IF([.Z125]=&quot;BLOCKED — OUTCOME ASSERTED WITHOUT REVIEW ELIGIBILITY&quot;;&quot;REMOVE OR CORRECT OUTCOME ASSERTION — REVIEW ELIGIBILITY REQUIRED FIRST&quot;;IF([.Z125]=&quot;BLOCKED — NONCANONICAL OUTCOME&quot;;&quot;CORRECT OUTCOME TO CANONICAL CONTROLLED VOCABULARY&quot;;IF([.Z1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5]=&quot;UNKNOWN&quot;;&quot;UNKNOWN&quot;;IF(OR([.Z125]=&quot;BLOCKED — OUTCOME ASSERTED WITHOUT REVIEW ELIGIBILITY&quot;;[.Z125]=&quot;BLOCKED — NONCANONICAL OUTCOME&quot;);&quot;BLOCKED&quot;;IF([.Z12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cell office:value-type="string" table:formula="of:=IF([.U126]=&quot;UNKNOWN&quot;;&quot;COMPLETE OR ASSERT REQUIRED EVIDENCE BEFORE REVIEW&quot;;IF([.U126]=&quot;BLOCKED&quot;;&quot;RESOLVE CONTRADICTION BEFORE REVIEW — NO AUTHORITY CREATED&quot;;IF([.U1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6]=&quot;READY FOR REVIEW&quot;;&quot;REVIEW ELIGIBLE — NO AUTHORITY&quot;;IF(OR([.U126]=&quot;UNKNOWN&quot;;[.U126]=&quot;BLOCKED&quot;);&quot;NOT REVIEW ELIGIBLE&quot;;&quot;NOT REVIEW ELIGIBLE&quot;))">
            <text:p>NOT REVIEW ELIGIBLE</text:p>
          </table:table-cell>
          <table:table-cell office:value-type="string" table:formula="of:=IF([.W126]=&quot;NOT REVIEW ELIGIBLE&quot;;&quot;DO NOT BEGIN SETTLEMENT REVIEW — RESOLVE READINESS OR CONTRADICTION CONDITIONS&quot;;IF([.W1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6]=&quot;&quot;;&quot;UNKNOWN&quot;;IF([.W126]&lt;&gt;&quot;REVIEW ELIGIBLE — NO AUTHORITY&quot;;&quot;BLOCKED — OUTCOME ASSERTED WITHOUT REVIEW ELIGIBILITY&quot;;IF(OR([.Y126]=&quot;REVIEWED — NO AUTHORITY&quot;;[.Y126]=&quot;REVIEW DEFERRED&quot;;[.Y126]=&quot;REVIEW BLOCKED&quot;);&quot;ACCEPTED INTAKE — NO AUTHORITY&quot;;&quot;BLOCKED — NONCANONICAL OUTCOME&quot;)))">
            <text:p>UNKNOWN</text:p>
          </table:table-cell>
          <table:table-cell office:value-type="string" table:formula="of:=IF([.Z126]=&quot;UNKNOWN&quot;;&quot;NO REVIEW OUTCOME ASSERTED — REMAINS UNKNOWN&quot;;IF([.Z126]=&quot;BLOCKED — OUTCOME ASSERTED WITHOUT REVIEW ELIGIBILITY&quot;;&quot;REMOVE OR CORRECT OUTCOME ASSERTION — REVIEW ELIGIBILITY REQUIRED FIRST&quot;;IF([.Z126]=&quot;BLOCKED — NONCANONICAL OUTCOME&quot;;&quot;CORRECT OUTCOME TO CANONICAL CONTROLLED VOCABULARY&quot;;IF([.Z1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6]=&quot;UNKNOWN&quot;;&quot;UNKNOWN&quot;;IF(OR([.Z126]=&quot;BLOCKED — OUTCOME ASSERTED WITHOUT REVIEW ELIGIBILITY&quot;;[.Z126]=&quot;BLOCKED — NONCANONICAL OUTCOME&quot;);&quot;BLOCKED&quot;;IF([.Z12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cell office:value-type="string" table:formula="of:=IF([.U127]=&quot;UNKNOWN&quot;;&quot;COMPLETE OR ASSERT REQUIRED EVIDENCE BEFORE REVIEW&quot;;IF([.U127]=&quot;BLOCKED&quot;;&quot;RESOLVE CONTRADICTION BEFORE REVIEW — NO AUTHORITY CREATED&quot;;IF([.U1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7]=&quot;READY FOR REVIEW&quot;;&quot;REVIEW ELIGIBLE — NO AUTHORITY&quot;;IF(OR([.U127]=&quot;UNKNOWN&quot;;[.U127]=&quot;BLOCKED&quot;);&quot;NOT REVIEW ELIGIBLE&quot;;&quot;NOT REVIEW ELIGIBLE&quot;))">
            <text:p>NOT REVIEW ELIGIBLE</text:p>
          </table:table-cell>
          <table:table-cell office:value-type="string" table:formula="of:=IF([.W127]=&quot;NOT REVIEW ELIGIBLE&quot;;&quot;DO NOT BEGIN SETTLEMENT REVIEW — RESOLVE READINESS OR CONTRADICTION CONDITIONS&quot;;IF([.W1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7]=&quot;&quot;;&quot;UNKNOWN&quot;;IF([.W127]&lt;&gt;&quot;REVIEW ELIGIBLE — NO AUTHORITY&quot;;&quot;BLOCKED — OUTCOME ASSERTED WITHOUT REVIEW ELIGIBILITY&quot;;IF(OR([.Y127]=&quot;REVIEWED — NO AUTHORITY&quot;;[.Y127]=&quot;REVIEW DEFERRED&quot;;[.Y127]=&quot;REVIEW BLOCKED&quot;);&quot;ACCEPTED INTAKE — NO AUTHORITY&quot;;&quot;BLOCKED — NONCANONICAL OUTCOME&quot;)))">
            <text:p>UNKNOWN</text:p>
          </table:table-cell>
          <table:table-cell office:value-type="string" table:formula="of:=IF([.Z127]=&quot;UNKNOWN&quot;;&quot;NO REVIEW OUTCOME ASSERTED — REMAINS UNKNOWN&quot;;IF([.Z127]=&quot;BLOCKED — OUTCOME ASSERTED WITHOUT REVIEW ELIGIBILITY&quot;;&quot;REMOVE OR CORRECT OUTCOME ASSERTION — REVIEW ELIGIBILITY REQUIRED FIRST&quot;;IF([.Z127]=&quot;BLOCKED — NONCANONICAL OUTCOME&quot;;&quot;CORRECT OUTCOME TO CANONICAL CONTROLLED VOCABULARY&quot;;IF([.Z1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7]=&quot;UNKNOWN&quot;;&quot;UNKNOWN&quot;;IF(OR([.Z127]=&quot;BLOCKED — OUTCOME ASSERTED WITHOUT REVIEW ELIGIBILITY&quot;;[.Z127]=&quot;BLOCKED — NONCANONICAL OUTCOME&quot;);&quot;BLOCKED&quot;;IF([.Z12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cell office:value-type="string" table:formula="of:=IF([.U128]=&quot;UNKNOWN&quot;;&quot;COMPLETE OR ASSERT REQUIRED EVIDENCE BEFORE REVIEW&quot;;IF([.U128]=&quot;BLOCKED&quot;;&quot;RESOLVE CONTRADICTION BEFORE REVIEW — NO AUTHORITY CREATED&quot;;IF([.U1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8]=&quot;READY FOR REVIEW&quot;;&quot;REVIEW ELIGIBLE — NO AUTHORITY&quot;;IF(OR([.U128]=&quot;UNKNOWN&quot;;[.U128]=&quot;BLOCKED&quot;);&quot;NOT REVIEW ELIGIBLE&quot;;&quot;NOT REVIEW ELIGIBLE&quot;))">
            <text:p>NOT REVIEW ELIGIBLE</text:p>
          </table:table-cell>
          <table:table-cell office:value-type="string" table:formula="of:=IF([.W128]=&quot;NOT REVIEW ELIGIBLE&quot;;&quot;DO NOT BEGIN SETTLEMENT REVIEW — RESOLVE READINESS OR CONTRADICTION CONDITIONS&quot;;IF([.W1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8]=&quot;&quot;;&quot;UNKNOWN&quot;;IF([.W128]&lt;&gt;&quot;REVIEW ELIGIBLE — NO AUTHORITY&quot;;&quot;BLOCKED — OUTCOME ASSERTED WITHOUT REVIEW ELIGIBILITY&quot;;IF(OR([.Y128]=&quot;REVIEWED — NO AUTHORITY&quot;;[.Y128]=&quot;REVIEW DEFERRED&quot;;[.Y128]=&quot;REVIEW BLOCKED&quot;);&quot;ACCEPTED INTAKE — NO AUTHORITY&quot;;&quot;BLOCKED — NONCANONICAL OUTCOME&quot;)))">
            <text:p>UNKNOWN</text:p>
          </table:table-cell>
          <table:table-cell office:value-type="string" table:formula="of:=IF([.Z128]=&quot;UNKNOWN&quot;;&quot;NO REVIEW OUTCOME ASSERTED — REMAINS UNKNOWN&quot;;IF([.Z128]=&quot;BLOCKED — OUTCOME ASSERTED WITHOUT REVIEW ELIGIBILITY&quot;;&quot;REMOVE OR CORRECT OUTCOME ASSERTION — REVIEW ELIGIBILITY REQUIRED FIRST&quot;;IF([.Z128]=&quot;BLOCKED — NONCANONICAL OUTCOME&quot;;&quot;CORRECT OUTCOME TO CANONICAL CONTROLLED VOCABULARY&quot;;IF([.Z1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8]=&quot;UNKNOWN&quot;;&quot;UNKNOWN&quot;;IF(OR([.Z128]=&quot;BLOCKED — OUTCOME ASSERTED WITHOUT REVIEW ELIGIBILITY&quot;;[.Z128]=&quot;BLOCKED — NONCANONICAL OUTCOME&quot;);&quot;BLOCKED&quot;;IF([.Z12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cell office:value-type="string" table:formula="of:=IF([.U129]=&quot;UNKNOWN&quot;;&quot;COMPLETE OR ASSERT REQUIRED EVIDENCE BEFORE REVIEW&quot;;IF([.U129]=&quot;BLOCKED&quot;;&quot;RESOLVE CONTRADICTION BEFORE REVIEW — NO AUTHORITY CREATED&quot;;IF([.U1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9]=&quot;READY FOR REVIEW&quot;;&quot;REVIEW ELIGIBLE — NO AUTHORITY&quot;;IF(OR([.U129]=&quot;UNKNOWN&quot;;[.U129]=&quot;BLOCKED&quot;);&quot;NOT REVIEW ELIGIBLE&quot;;&quot;NOT REVIEW ELIGIBLE&quot;))">
            <text:p>NOT REVIEW ELIGIBLE</text:p>
          </table:table-cell>
          <table:table-cell office:value-type="string" table:formula="of:=IF([.W129]=&quot;NOT REVIEW ELIGIBLE&quot;;&quot;DO NOT BEGIN SETTLEMENT REVIEW — RESOLVE READINESS OR CONTRADICTION CONDITIONS&quot;;IF([.W1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9]=&quot;&quot;;&quot;UNKNOWN&quot;;IF([.W129]&lt;&gt;&quot;REVIEW ELIGIBLE — NO AUTHORITY&quot;;&quot;BLOCKED — OUTCOME ASSERTED WITHOUT REVIEW ELIGIBILITY&quot;;IF(OR([.Y129]=&quot;REVIEWED — NO AUTHORITY&quot;;[.Y129]=&quot;REVIEW DEFERRED&quot;;[.Y129]=&quot;REVIEW BLOCKED&quot;);&quot;ACCEPTED INTAKE — NO AUTHORITY&quot;;&quot;BLOCKED — NONCANONICAL OUTCOME&quot;)))">
            <text:p>UNKNOWN</text:p>
          </table:table-cell>
          <table:table-cell office:value-type="string" table:formula="of:=IF([.Z129]=&quot;UNKNOWN&quot;;&quot;NO REVIEW OUTCOME ASSERTED — REMAINS UNKNOWN&quot;;IF([.Z129]=&quot;BLOCKED — OUTCOME ASSERTED WITHOUT REVIEW ELIGIBILITY&quot;;&quot;REMOVE OR CORRECT OUTCOME ASSERTION — REVIEW ELIGIBILITY REQUIRED FIRST&quot;;IF([.Z129]=&quot;BLOCKED — NONCANONICAL OUTCOME&quot;;&quot;CORRECT OUTCOME TO CANONICAL CONTROLLED VOCABULARY&quot;;IF([.Z1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29]=&quot;UNKNOWN&quot;;&quot;UNKNOWN&quot;;IF(OR([.Z129]=&quot;BLOCKED — OUTCOME ASSERTED WITHOUT REVIEW ELIGIBILITY&quot;;[.Z129]=&quot;BLOCKED — NONCANONICAL OUTCOME&quot;);&quot;BLOCKED&quot;;IF([.Z12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cell office:value-type="string" table:formula="of:=IF([.U130]=&quot;UNKNOWN&quot;;&quot;COMPLETE OR ASSERT REQUIRED EVIDENCE BEFORE REVIEW&quot;;IF([.U130]=&quot;BLOCKED&quot;;&quot;RESOLVE CONTRADICTION BEFORE REVIEW — NO AUTHORITY CREATED&quot;;IF([.U1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0]=&quot;READY FOR REVIEW&quot;;&quot;REVIEW ELIGIBLE — NO AUTHORITY&quot;;IF(OR([.U130]=&quot;UNKNOWN&quot;;[.U130]=&quot;BLOCKED&quot;);&quot;NOT REVIEW ELIGIBLE&quot;;&quot;NOT REVIEW ELIGIBLE&quot;))">
            <text:p>NOT REVIEW ELIGIBLE</text:p>
          </table:table-cell>
          <table:table-cell office:value-type="string" table:formula="of:=IF([.W130]=&quot;NOT REVIEW ELIGIBLE&quot;;&quot;DO NOT BEGIN SETTLEMENT REVIEW — RESOLVE READINESS OR CONTRADICTION CONDITIONS&quot;;IF([.W1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0]=&quot;&quot;;&quot;UNKNOWN&quot;;IF([.W130]&lt;&gt;&quot;REVIEW ELIGIBLE — NO AUTHORITY&quot;;&quot;BLOCKED — OUTCOME ASSERTED WITHOUT REVIEW ELIGIBILITY&quot;;IF(OR([.Y130]=&quot;REVIEWED — NO AUTHORITY&quot;;[.Y130]=&quot;REVIEW DEFERRED&quot;;[.Y130]=&quot;REVIEW BLOCKED&quot;);&quot;ACCEPTED INTAKE — NO AUTHORITY&quot;;&quot;BLOCKED — NONCANONICAL OUTCOME&quot;)))">
            <text:p>UNKNOWN</text:p>
          </table:table-cell>
          <table:table-cell office:value-type="string" table:formula="of:=IF([.Z130]=&quot;UNKNOWN&quot;;&quot;NO REVIEW OUTCOME ASSERTED — REMAINS UNKNOWN&quot;;IF([.Z130]=&quot;BLOCKED — OUTCOME ASSERTED WITHOUT REVIEW ELIGIBILITY&quot;;&quot;REMOVE OR CORRECT OUTCOME ASSERTION — REVIEW ELIGIBILITY REQUIRED FIRST&quot;;IF([.Z130]=&quot;BLOCKED — NONCANONICAL OUTCOME&quot;;&quot;CORRECT OUTCOME TO CANONICAL CONTROLLED VOCABULARY&quot;;IF([.Z1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0]=&quot;UNKNOWN&quot;;&quot;UNKNOWN&quot;;IF(OR([.Z130]=&quot;BLOCKED — OUTCOME ASSERTED WITHOUT REVIEW ELIGIBILITY&quot;;[.Z130]=&quot;BLOCKED — NONCANONICAL OUTCOME&quot;);&quot;BLOCKED&quot;;IF([.Z13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cell office:value-type="string" table:formula="of:=IF([.U131]=&quot;UNKNOWN&quot;;&quot;COMPLETE OR ASSERT REQUIRED EVIDENCE BEFORE REVIEW&quot;;IF([.U131]=&quot;BLOCKED&quot;;&quot;RESOLVE CONTRADICTION BEFORE REVIEW — NO AUTHORITY CREATED&quot;;IF([.U1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1]=&quot;READY FOR REVIEW&quot;;&quot;REVIEW ELIGIBLE — NO AUTHORITY&quot;;IF(OR([.U131]=&quot;UNKNOWN&quot;;[.U131]=&quot;BLOCKED&quot;);&quot;NOT REVIEW ELIGIBLE&quot;;&quot;NOT REVIEW ELIGIBLE&quot;))">
            <text:p>NOT REVIEW ELIGIBLE</text:p>
          </table:table-cell>
          <table:table-cell office:value-type="string" table:formula="of:=IF([.W131]=&quot;NOT REVIEW ELIGIBLE&quot;;&quot;DO NOT BEGIN SETTLEMENT REVIEW — RESOLVE READINESS OR CONTRADICTION CONDITIONS&quot;;IF([.W1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1]=&quot;&quot;;&quot;UNKNOWN&quot;;IF([.W131]&lt;&gt;&quot;REVIEW ELIGIBLE — NO AUTHORITY&quot;;&quot;BLOCKED — OUTCOME ASSERTED WITHOUT REVIEW ELIGIBILITY&quot;;IF(OR([.Y131]=&quot;REVIEWED — NO AUTHORITY&quot;;[.Y131]=&quot;REVIEW DEFERRED&quot;;[.Y131]=&quot;REVIEW BLOCKED&quot;);&quot;ACCEPTED INTAKE — NO AUTHORITY&quot;;&quot;BLOCKED — NONCANONICAL OUTCOME&quot;)))">
            <text:p>UNKNOWN</text:p>
          </table:table-cell>
          <table:table-cell office:value-type="string" table:formula="of:=IF([.Z131]=&quot;UNKNOWN&quot;;&quot;NO REVIEW OUTCOME ASSERTED — REMAINS UNKNOWN&quot;;IF([.Z131]=&quot;BLOCKED — OUTCOME ASSERTED WITHOUT REVIEW ELIGIBILITY&quot;;&quot;REMOVE OR CORRECT OUTCOME ASSERTION — REVIEW ELIGIBILITY REQUIRED FIRST&quot;;IF([.Z131]=&quot;BLOCKED — NONCANONICAL OUTCOME&quot;;&quot;CORRECT OUTCOME TO CANONICAL CONTROLLED VOCABULARY&quot;;IF([.Z1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1]=&quot;UNKNOWN&quot;;&quot;UNKNOWN&quot;;IF(OR([.Z131]=&quot;BLOCKED — OUTCOME ASSERTED WITHOUT REVIEW ELIGIBILITY&quot;;[.Z131]=&quot;BLOCKED — NONCANONICAL OUTCOME&quot;);&quot;BLOCKED&quot;;IF([.Z13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cell office:value-type="string" table:formula="of:=IF([.U132]=&quot;UNKNOWN&quot;;&quot;COMPLETE OR ASSERT REQUIRED EVIDENCE BEFORE REVIEW&quot;;IF([.U132]=&quot;BLOCKED&quot;;&quot;RESOLVE CONTRADICTION BEFORE REVIEW — NO AUTHORITY CREATED&quot;;IF([.U1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2]=&quot;READY FOR REVIEW&quot;;&quot;REVIEW ELIGIBLE — NO AUTHORITY&quot;;IF(OR([.U132]=&quot;UNKNOWN&quot;;[.U132]=&quot;BLOCKED&quot;);&quot;NOT REVIEW ELIGIBLE&quot;;&quot;NOT REVIEW ELIGIBLE&quot;))">
            <text:p>NOT REVIEW ELIGIBLE</text:p>
          </table:table-cell>
          <table:table-cell office:value-type="string" table:formula="of:=IF([.W132]=&quot;NOT REVIEW ELIGIBLE&quot;;&quot;DO NOT BEGIN SETTLEMENT REVIEW — RESOLVE READINESS OR CONTRADICTION CONDITIONS&quot;;IF([.W1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2]=&quot;&quot;;&quot;UNKNOWN&quot;;IF([.W132]&lt;&gt;&quot;REVIEW ELIGIBLE — NO AUTHORITY&quot;;&quot;BLOCKED — OUTCOME ASSERTED WITHOUT REVIEW ELIGIBILITY&quot;;IF(OR([.Y132]=&quot;REVIEWED — NO AUTHORITY&quot;;[.Y132]=&quot;REVIEW DEFERRED&quot;;[.Y132]=&quot;REVIEW BLOCKED&quot;);&quot;ACCEPTED INTAKE — NO AUTHORITY&quot;;&quot;BLOCKED — NONCANONICAL OUTCOME&quot;)))">
            <text:p>UNKNOWN</text:p>
          </table:table-cell>
          <table:table-cell office:value-type="string" table:formula="of:=IF([.Z132]=&quot;UNKNOWN&quot;;&quot;NO REVIEW OUTCOME ASSERTED — REMAINS UNKNOWN&quot;;IF([.Z132]=&quot;BLOCKED — OUTCOME ASSERTED WITHOUT REVIEW ELIGIBILITY&quot;;&quot;REMOVE OR CORRECT OUTCOME ASSERTION — REVIEW ELIGIBILITY REQUIRED FIRST&quot;;IF([.Z132]=&quot;BLOCKED — NONCANONICAL OUTCOME&quot;;&quot;CORRECT OUTCOME TO CANONICAL CONTROLLED VOCABULARY&quot;;IF([.Z1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2]=&quot;UNKNOWN&quot;;&quot;UNKNOWN&quot;;IF(OR([.Z132]=&quot;BLOCKED — OUTCOME ASSERTED WITHOUT REVIEW ELIGIBILITY&quot;;[.Z132]=&quot;BLOCKED — NONCANONICAL OUTCOME&quot;);&quot;BLOCKED&quot;;IF([.Z13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cell office:value-type="string" table:formula="of:=IF([.U133]=&quot;UNKNOWN&quot;;&quot;COMPLETE OR ASSERT REQUIRED EVIDENCE BEFORE REVIEW&quot;;IF([.U133]=&quot;BLOCKED&quot;;&quot;RESOLVE CONTRADICTION BEFORE REVIEW — NO AUTHORITY CREATED&quot;;IF([.U1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3]=&quot;READY FOR REVIEW&quot;;&quot;REVIEW ELIGIBLE — NO AUTHORITY&quot;;IF(OR([.U133]=&quot;UNKNOWN&quot;;[.U133]=&quot;BLOCKED&quot;);&quot;NOT REVIEW ELIGIBLE&quot;;&quot;NOT REVIEW ELIGIBLE&quot;))">
            <text:p>NOT REVIEW ELIGIBLE</text:p>
          </table:table-cell>
          <table:table-cell office:value-type="string" table:formula="of:=IF([.W133]=&quot;NOT REVIEW ELIGIBLE&quot;;&quot;DO NOT BEGIN SETTLEMENT REVIEW — RESOLVE READINESS OR CONTRADICTION CONDITIONS&quot;;IF([.W1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3]=&quot;&quot;;&quot;UNKNOWN&quot;;IF([.W133]&lt;&gt;&quot;REVIEW ELIGIBLE — NO AUTHORITY&quot;;&quot;BLOCKED — OUTCOME ASSERTED WITHOUT REVIEW ELIGIBILITY&quot;;IF(OR([.Y133]=&quot;REVIEWED — NO AUTHORITY&quot;;[.Y133]=&quot;REVIEW DEFERRED&quot;;[.Y133]=&quot;REVIEW BLOCKED&quot;);&quot;ACCEPTED INTAKE — NO AUTHORITY&quot;;&quot;BLOCKED — NONCANONICAL OUTCOME&quot;)))">
            <text:p>UNKNOWN</text:p>
          </table:table-cell>
          <table:table-cell office:value-type="string" table:formula="of:=IF([.Z133]=&quot;UNKNOWN&quot;;&quot;NO REVIEW OUTCOME ASSERTED — REMAINS UNKNOWN&quot;;IF([.Z133]=&quot;BLOCKED — OUTCOME ASSERTED WITHOUT REVIEW ELIGIBILITY&quot;;&quot;REMOVE OR CORRECT OUTCOME ASSERTION — REVIEW ELIGIBILITY REQUIRED FIRST&quot;;IF([.Z133]=&quot;BLOCKED — NONCANONICAL OUTCOME&quot;;&quot;CORRECT OUTCOME TO CANONICAL CONTROLLED VOCABULARY&quot;;IF([.Z1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3]=&quot;UNKNOWN&quot;;&quot;UNKNOWN&quot;;IF(OR([.Z133]=&quot;BLOCKED — OUTCOME ASSERTED WITHOUT REVIEW ELIGIBILITY&quot;;[.Z133]=&quot;BLOCKED — NONCANONICAL OUTCOME&quot;);&quot;BLOCKED&quot;;IF([.Z13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cell office:value-type="string" table:formula="of:=IF([.U134]=&quot;UNKNOWN&quot;;&quot;COMPLETE OR ASSERT REQUIRED EVIDENCE BEFORE REVIEW&quot;;IF([.U134]=&quot;BLOCKED&quot;;&quot;RESOLVE CONTRADICTION BEFORE REVIEW — NO AUTHORITY CREATED&quot;;IF([.U1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4]=&quot;READY FOR REVIEW&quot;;&quot;REVIEW ELIGIBLE — NO AUTHORITY&quot;;IF(OR([.U134]=&quot;UNKNOWN&quot;;[.U134]=&quot;BLOCKED&quot;);&quot;NOT REVIEW ELIGIBLE&quot;;&quot;NOT REVIEW ELIGIBLE&quot;))">
            <text:p>NOT REVIEW ELIGIBLE</text:p>
          </table:table-cell>
          <table:table-cell office:value-type="string" table:formula="of:=IF([.W134]=&quot;NOT REVIEW ELIGIBLE&quot;;&quot;DO NOT BEGIN SETTLEMENT REVIEW — RESOLVE READINESS OR CONTRADICTION CONDITIONS&quot;;IF([.W1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4]=&quot;&quot;;&quot;UNKNOWN&quot;;IF([.W134]&lt;&gt;&quot;REVIEW ELIGIBLE — NO AUTHORITY&quot;;&quot;BLOCKED — OUTCOME ASSERTED WITHOUT REVIEW ELIGIBILITY&quot;;IF(OR([.Y134]=&quot;REVIEWED — NO AUTHORITY&quot;;[.Y134]=&quot;REVIEW DEFERRED&quot;;[.Y134]=&quot;REVIEW BLOCKED&quot;);&quot;ACCEPTED INTAKE — NO AUTHORITY&quot;;&quot;BLOCKED — NONCANONICAL OUTCOME&quot;)))">
            <text:p>UNKNOWN</text:p>
          </table:table-cell>
          <table:table-cell office:value-type="string" table:formula="of:=IF([.Z134]=&quot;UNKNOWN&quot;;&quot;NO REVIEW OUTCOME ASSERTED — REMAINS UNKNOWN&quot;;IF([.Z134]=&quot;BLOCKED — OUTCOME ASSERTED WITHOUT REVIEW ELIGIBILITY&quot;;&quot;REMOVE OR CORRECT OUTCOME ASSERTION — REVIEW ELIGIBILITY REQUIRED FIRST&quot;;IF([.Z134]=&quot;BLOCKED — NONCANONICAL OUTCOME&quot;;&quot;CORRECT OUTCOME TO CANONICAL CONTROLLED VOCABULARY&quot;;IF([.Z1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4]=&quot;UNKNOWN&quot;;&quot;UNKNOWN&quot;;IF(OR([.Z134]=&quot;BLOCKED — OUTCOME ASSERTED WITHOUT REVIEW ELIGIBILITY&quot;;[.Z134]=&quot;BLOCKED — NONCANONICAL OUTCOME&quot;);&quot;BLOCKED&quot;;IF([.Z13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cell office:value-type="string" table:formula="of:=IF([.U135]=&quot;UNKNOWN&quot;;&quot;COMPLETE OR ASSERT REQUIRED EVIDENCE BEFORE REVIEW&quot;;IF([.U135]=&quot;BLOCKED&quot;;&quot;RESOLVE CONTRADICTION BEFORE REVIEW — NO AUTHORITY CREATED&quot;;IF([.U1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5]=&quot;READY FOR REVIEW&quot;;&quot;REVIEW ELIGIBLE — NO AUTHORITY&quot;;IF(OR([.U135]=&quot;UNKNOWN&quot;;[.U135]=&quot;BLOCKED&quot;);&quot;NOT REVIEW ELIGIBLE&quot;;&quot;NOT REVIEW ELIGIBLE&quot;))">
            <text:p>NOT REVIEW ELIGIBLE</text:p>
          </table:table-cell>
          <table:table-cell office:value-type="string" table:formula="of:=IF([.W135]=&quot;NOT REVIEW ELIGIBLE&quot;;&quot;DO NOT BEGIN SETTLEMENT REVIEW — RESOLVE READINESS OR CONTRADICTION CONDITIONS&quot;;IF([.W1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5]=&quot;&quot;;&quot;UNKNOWN&quot;;IF([.W135]&lt;&gt;&quot;REVIEW ELIGIBLE — NO AUTHORITY&quot;;&quot;BLOCKED — OUTCOME ASSERTED WITHOUT REVIEW ELIGIBILITY&quot;;IF(OR([.Y135]=&quot;REVIEWED — NO AUTHORITY&quot;;[.Y135]=&quot;REVIEW DEFERRED&quot;;[.Y135]=&quot;REVIEW BLOCKED&quot;);&quot;ACCEPTED INTAKE — NO AUTHORITY&quot;;&quot;BLOCKED — NONCANONICAL OUTCOME&quot;)))">
            <text:p>UNKNOWN</text:p>
          </table:table-cell>
          <table:table-cell office:value-type="string" table:formula="of:=IF([.Z135]=&quot;UNKNOWN&quot;;&quot;NO REVIEW OUTCOME ASSERTED — REMAINS UNKNOWN&quot;;IF([.Z135]=&quot;BLOCKED — OUTCOME ASSERTED WITHOUT REVIEW ELIGIBILITY&quot;;&quot;REMOVE OR CORRECT OUTCOME ASSERTION — REVIEW ELIGIBILITY REQUIRED FIRST&quot;;IF([.Z135]=&quot;BLOCKED — NONCANONICAL OUTCOME&quot;;&quot;CORRECT OUTCOME TO CANONICAL CONTROLLED VOCABULARY&quot;;IF([.Z1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5]=&quot;UNKNOWN&quot;;&quot;UNKNOWN&quot;;IF(OR([.Z135]=&quot;BLOCKED — OUTCOME ASSERTED WITHOUT REVIEW ELIGIBILITY&quot;;[.Z135]=&quot;BLOCKED — NONCANONICAL OUTCOME&quot;);&quot;BLOCKED&quot;;IF([.Z13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cell office:value-type="string" table:formula="of:=IF([.U136]=&quot;UNKNOWN&quot;;&quot;COMPLETE OR ASSERT REQUIRED EVIDENCE BEFORE REVIEW&quot;;IF([.U136]=&quot;BLOCKED&quot;;&quot;RESOLVE CONTRADICTION BEFORE REVIEW — NO AUTHORITY CREATED&quot;;IF([.U1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6]=&quot;READY FOR REVIEW&quot;;&quot;REVIEW ELIGIBLE — NO AUTHORITY&quot;;IF(OR([.U136]=&quot;UNKNOWN&quot;;[.U136]=&quot;BLOCKED&quot;);&quot;NOT REVIEW ELIGIBLE&quot;;&quot;NOT REVIEW ELIGIBLE&quot;))">
            <text:p>NOT REVIEW ELIGIBLE</text:p>
          </table:table-cell>
          <table:table-cell office:value-type="string" table:formula="of:=IF([.W136]=&quot;NOT REVIEW ELIGIBLE&quot;;&quot;DO NOT BEGIN SETTLEMENT REVIEW — RESOLVE READINESS OR CONTRADICTION CONDITIONS&quot;;IF([.W1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6]=&quot;&quot;;&quot;UNKNOWN&quot;;IF([.W136]&lt;&gt;&quot;REVIEW ELIGIBLE — NO AUTHORITY&quot;;&quot;BLOCKED — OUTCOME ASSERTED WITHOUT REVIEW ELIGIBILITY&quot;;IF(OR([.Y136]=&quot;REVIEWED — NO AUTHORITY&quot;;[.Y136]=&quot;REVIEW DEFERRED&quot;;[.Y136]=&quot;REVIEW BLOCKED&quot;);&quot;ACCEPTED INTAKE — NO AUTHORITY&quot;;&quot;BLOCKED — NONCANONICAL OUTCOME&quot;)))">
            <text:p>UNKNOWN</text:p>
          </table:table-cell>
          <table:table-cell office:value-type="string" table:formula="of:=IF([.Z136]=&quot;UNKNOWN&quot;;&quot;NO REVIEW OUTCOME ASSERTED — REMAINS UNKNOWN&quot;;IF([.Z136]=&quot;BLOCKED — OUTCOME ASSERTED WITHOUT REVIEW ELIGIBILITY&quot;;&quot;REMOVE OR CORRECT OUTCOME ASSERTION — REVIEW ELIGIBILITY REQUIRED FIRST&quot;;IF([.Z136]=&quot;BLOCKED — NONCANONICAL OUTCOME&quot;;&quot;CORRECT OUTCOME TO CANONICAL CONTROLLED VOCABULARY&quot;;IF([.Z1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6]=&quot;UNKNOWN&quot;;&quot;UNKNOWN&quot;;IF(OR([.Z136]=&quot;BLOCKED — OUTCOME ASSERTED WITHOUT REVIEW ELIGIBILITY&quot;;[.Z136]=&quot;BLOCKED — NONCANONICAL OUTCOME&quot;);&quot;BLOCKED&quot;;IF([.Z13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cell office:value-type="string" table:formula="of:=IF([.U137]=&quot;UNKNOWN&quot;;&quot;COMPLETE OR ASSERT REQUIRED EVIDENCE BEFORE REVIEW&quot;;IF([.U137]=&quot;BLOCKED&quot;;&quot;RESOLVE CONTRADICTION BEFORE REVIEW — NO AUTHORITY CREATED&quot;;IF([.U1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7]=&quot;READY FOR REVIEW&quot;;&quot;REVIEW ELIGIBLE — NO AUTHORITY&quot;;IF(OR([.U137]=&quot;UNKNOWN&quot;;[.U137]=&quot;BLOCKED&quot;);&quot;NOT REVIEW ELIGIBLE&quot;;&quot;NOT REVIEW ELIGIBLE&quot;))">
            <text:p>NOT REVIEW ELIGIBLE</text:p>
          </table:table-cell>
          <table:table-cell office:value-type="string" table:formula="of:=IF([.W137]=&quot;NOT REVIEW ELIGIBLE&quot;;&quot;DO NOT BEGIN SETTLEMENT REVIEW — RESOLVE READINESS OR CONTRADICTION CONDITIONS&quot;;IF([.W1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7]=&quot;&quot;;&quot;UNKNOWN&quot;;IF([.W137]&lt;&gt;&quot;REVIEW ELIGIBLE — NO AUTHORITY&quot;;&quot;BLOCKED — OUTCOME ASSERTED WITHOUT REVIEW ELIGIBILITY&quot;;IF(OR([.Y137]=&quot;REVIEWED — NO AUTHORITY&quot;;[.Y137]=&quot;REVIEW DEFERRED&quot;;[.Y137]=&quot;REVIEW BLOCKED&quot;);&quot;ACCEPTED INTAKE — NO AUTHORITY&quot;;&quot;BLOCKED — NONCANONICAL OUTCOME&quot;)))">
            <text:p>UNKNOWN</text:p>
          </table:table-cell>
          <table:table-cell office:value-type="string" table:formula="of:=IF([.Z137]=&quot;UNKNOWN&quot;;&quot;NO REVIEW OUTCOME ASSERTED — REMAINS UNKNOWN&quot;;IF([.Z137]=&quot;BLOCKED — OUTCOME ASSERTED WITHOUT REVIEW ELIGIBILITY&quot;;&quot;REMOVE OR CORRECT OUTCOME ASSERTION — REVIEW ELIGIBILITY REQUIRED FIRST&quot;;IF([.Z137]=&quot;BLOCKED — NONCANONICAL OUTCOME&quot;;&quot;CORRECT OUTCOME TO CANONICAL CONTROLLED VOCABULARY&quot;;IF([.Z1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7]=&quot;UNKNOWN&quot;;&quot;UNKNOWN&quot;;IF(OR([.Z137]=&quot;BLOCKED — OUTCOME ASSERTED WITHOUT REVIEW ELIGIBILITY&quot;;[.Z137]=&quot;BLOCKED — NONCANONICAL OUTCOME&quot;);&quot;BLOCKED&quot;;IF([.Z13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cell office:value-type="string" table:formula="of:=IF([.U138]=&quot;UNKNOWN&quot;;&quot;COMPLETE OR ASSERT REQUIRED EVIDENCE BEFORE REVIEW&quot;;IF([.U138]=&quot;BLOCKED&quot;;&quot;RESOLVE CONTRADICTION BEFORE REVIEW — NO AUTHORITY CREATED&quot;;IF([.U1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8]=&quot;READY FOR REVIEW&quot;;&quot;REVIEW ELIGIBLE — NO AUTHORITY&quot;;IF(OR([.U138]=&quot;UNKNOWN&quot;;[.U138]=&quot;BLOCKED&quot;);&quot;NOT REVIEW ELIGIBLE&quot;;&quot;NOT REVIEW ELIGIBLE&quot;))">
            <text:p>NOT REVIEW ELIGIBLE</text:p>
          </table:table-cell>
          <table:table-cell office:value-type="string" table:formula="of:=IF([.W138]=&quot;NOT REVIEW ELIGIBLE&quot;;&quot;DO NOT BEGIN SETTLEMENT REVIEW — RESOLVE READINESS OR CONTRADICTION CONDITIONS&quot;;IF([.W1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8]=&quot;&quot;;&quot;UNKNOWN&quot;;IF([.W138]&lt;&gt;&quot;REVIEW ELIGIBLE — NO AUTHORITY&quot;;&quot;BLOCKED — OUTCOME ASSERTED WITHOUT REVIEW ELIGIBILITY&quot;;IF(OR([.Y138]=&quot;REVIEWED — NO AUTHORITY&quot;;[.Y138]=&quot;REVIEW DEFERRED&quot;;[.Y138]=&quot;REVIEW BLOCKED&quot;);&quot;ACCEPTED INTAKE — NO AUTHORITY&quot;;&quot;BLOCKED — NONCANONICAL OUTCOME&quot;)))">
            <text:p>UNKNOWN</text:p>
          </table:table-cell>
          <table:table-cell office:value-type="string" table:formula="of:=IF([.Z138]=&quot;UNKNOWN&quot;;&quot;NO REVIEW OUTCOME ASSERTED — REMAINS UNKNOWN&quot;;IF([.Z138]=&quot;BLOCKED — OUTCOME ASSERTED WITHOUT REVIEW ELIGIBILITY&quot;;&quot;REMOVE OR CORRECT OUTCOME ASSERTION — REVIEW ELIGIBILITY REQUIRED FIRST&quot;;IF([.Z138]=&quot;BLOCKED — NONCANONICAL OUTCOME&quot;;&quot;CORRECT OUTCOME TO CANONICAL CONTROLLED VOCABULARY&quot;;IF([.Z1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8]=&quot;UNKNOWN&quot;;&quot;UNKNOWN&quot;;IF(OR([.Z138]=&quot;BLOCKED — OUTCOME ASSERTED WITHOUT REVIEW ELIGIBILITY&quot;;[.Z138]=&quot;BLOCKED — NONCANONICAL OUTCOME&quot;);&quot;BLOCKED&quot;;IF([.Z13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cell office:value-type="string" table:formula="of:=IF([.U139]=&quot;UNKNOWN&quot;;&quot;COMPLETE OR ASSERT REQUIRED EVIDENCE BEFORE REVIEW&quot;;IF([.U139]=&quot;BLOCKED&quot;;&quot;RESOLVE CONTRADICTION BEFORE REVIEW — NO AUTHORITY CREATED&quot;;IF([.U1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9]=&quot;READY FOR REVIEW&quot;;&quot;REVIEW ELIGIBLE — NO AUTHORITY&quot;;IF(OR([.U139]=&quot;UNKNOWN&quot;;[.U139]=&quot;BLOCKED&quot;);&quot;NOT REVIEW ELIGIBLE&quot;;&quot;NOT REVIEW ELIGIBLE&quot;))">
            <text:p>NOT REVIEW ELIGIBLE</text:p>
          </table:table-cell>
          <table:table-cell office:value-type="string" table:formula="of:=IF([.W139]=&quot;NOT REVIEW ELIGIBLE&quot;;&quot;DO NOT BEGIN SETTLEMENT REVIEW — RESOLVE READINESS OR CONTRADICTION CONDITIONS&quot;;IF([.W1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9]=&quot;&quot;;&quot;UNKNOWN&quot;;IF([.W139]&lt;&gt;&quot;REVIEW ELIGIBLE — NO AUTHORITY&quot;;&quot;BLOCKED — OUTCOME ASSERTED WITHOUT REVIEW ELIGIBILITY&quot;;IF(OR([.Y139]=&quot;REVIEWED — NO AUTHORITY&quot;;[.Y139]=&quot;REVIEW DEFERRED&quot;;[.Y139]=&quot;REVIEW BLOCKED&quot;);&quot;ACCEPTED INTAKE — NO AUTHORITY&quot;;&quot;BLOCKED — NONCANONICAL OUTCOME&quot;)))">
            <text:p>UNKNOWN</text:p>
          </table:table-cell>
          <table:table-cell office:value-type="string" table:formula="of:=IF([.Z139]=&quot;UNKNOWN&quot;;&quot;NO REVIEW OUTCOME ASSERTED — REMAINS UNKNOWN&quot;;IF([.Z139]=&quot;BLOCKED — OUTCOME ASSERTED WITHOUT REVIEW ELIGIBILITY&quot;;&quot;REMOVE OR CORRECT OUTCOME ASSERTION — REVIEW ELIGIBILITY REQUIRED FIRST&quot;;IF([.Z139]=&quot;BLOCKED — NONCANONICAL OUTCOME&quot;;&quot;CORRECT OUTCOME TO CANONICAL CONTROLLED VOCABULARY&quot;;IF([.Z1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39]=&quot;UNKNOWN&quot;;&quot;UNKNOWN&quot;;IF(OR([.Z139]=&quot;BLOCKED — OUTCOME ASSERTED WITHOUT REVIEW ELIGIBILITY&quot;;[.Z139]=&quot;BLOCKED — NONCANONICAL OUTCOME&quot;);&quot;BLOCKED&quot;;IF([.Z13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cell office:value-type="string" table:formula="of:=IF([.U140]=&quot;UNKNOWN&quot;;&quot;COMPLETE OR ASSERT REQUIRED EVIDENCE BEFORE REVIEW&quot;;IF([.U140]=&quot;BLOCKED&quot;;&quot;RESOLVE CONTRADICTION BEFORE REVIEW — NO AUTHORITY CREATED&quot;;IF([.U1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0]=&quot;READY FOR REVIEW&quot;;&quot;REVIEW ELIGIBLE — NO AUTHORITY&quot;;IF(OR([.U140]=&quot;UNKNOWN&quot;;[.U140]=&quot;BLOCKED&quot;);&quot;NOT REVIEW ELIGIBLE&quot;;&quot;NOT REVIEW ELIGIBLE&quot;))">
            <text:p>NOT REVIEW ELIGIBLE</text:p>
          </table:table-cell>
          <table:table-cell office:value-type="string" table:formula="of:=IF([.W140]=&quot;NOT REVIEW ELIGIBLE&quot;;&quot;DO NOT BEGIN SETTLEMENT REVIEW — RESOLVE READINESS OR CONTRADICTION CONDITIONS&quot;;IF([.W1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0]=&quot;&quot;;&quot;UNKNOWN&quot;;IF([.W140]&lt;&gt;&quot;REVIEW ELIGIBLE — NO AUTHORITY&quot;;&quot;BLOCKED — OUTCOME ASSERTED WITHOUT REVIEW ELIGIBILITY&quot;;IF(OR([.Y140]=&quot;REVIEWED — NO AUTHORITY&quot;;[.Y140]=&quot;REVIEW DEFERRED&quot;;[.Y140]=&quot;REVIEW BLOCKED&quot;);&quot;ACCEPTED INTAKE — NO AUTHORITY&quot;;&quot;BLOCKED — NONCANONICAL OUTCOME&quot;)))">
            <text:p>UNKNOWN</text:p>
          </table:table-cell>
          <table:table-cell office:value-type="string" table:formula="of:=IF([.Z140]=&quot;UNKNOWN&quot;;&quot;NO REVIEW OUTCOME ASSERTED — REMAINS UNKNOWN&quot;;IF([.Z140]=&quot;BLOCKED — OUTCOME ASSERTED WITHOUT REVIEW ELIGIBILITY&quot;;&quot;REMOVE OR CORRECT OUTCOME ASSERTION — REVIEW ELIGIBILITY REQUIRED FIRST&quot;;IF([.Z140]=&quot;BLOCKED — NONCANONICAL OUTCOME&quot;;&quot;CORRECT OUTCOME TO CANONICAL CONTROLLED VOCABULARY&quot;;IF([.Z1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0]=&quot;UNKNOWN&quot;;&quot;UNKNOWN&quot;;IF(OR([.Z140]=&quot;BLOCKED — OUTCOME ASSERTED WITHOUT REVIEW ELIGIBILITY&quot;;[.Z140]=&quot;BLOCKED — NONCANONICAL OUTCOME&quot;);&quot;BLOCKED&quot;;IF([.Z14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cell office:value-type="string" table:formula="of:=IF([.U141]=&quot;UNKNOWN&quot;;&quot;COMPLETE OR ASSERT REQUIRED EVIDENCE BEFORE REVIEW&quot;;IF([.U141]=&quot;BLOCKED&quot;;&quot;RESOLVE CONTRADICTION BEFORE REVIEW — NO AUTHORITY CREATED&quot;;IF([.U1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1]=&quot;READY FOR REVIEW&quot;;&quot;REVIEW ELIGIBLE — NO AUTHORITY&quot;;IF(OR([.U141]=&quot;UNKNOWN&quot;;[.U141]=&quot;BLOCKED&quot;);&quot;NOT REVIEW ELIGIBLE&quot;;&quot;NOT REVIEW ELIGIBLE&quot;))">
            <text:p>NOT REVIEW ELIGIBLE</text:p>
          </table:table-cell>
          <table:table-cell office:value-type="string" table:formula="of:=IF([.W141]=&quot;NOT REVIEW ELIGIBLE&quot;;&quot;DO NOT BEGIN SETTLEMENT REVIEW — RESOLVE READINESS OR CONTRADICTION CONDITIONS&quot;;IF([.W1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1]=&quot;&quot;;&quot;UNKNOWN&quot;;IF([.W141]&lt;&gt;&quot;REVIEW ELIGIBLE — NO AUTHORITY&quot;;&quot;BLOCKED — OUTCOME ASSERTED WITHOUT REVIEW ELIGIBILITY&quot;;IF(OR([.Y141]=&quot;REVIEWED — NO AUTHORITY&quot;;[.Y141]=&quot;REVIEW DEFERRED&quot;;[.Y141]=&quot;REVIEW BLOCKED&quot;);&quot;ACCEPTED INTAKE — NO AUTHORITY&quot;;&quot;BLOCKED — NONCANONICAL OUTCOME&quot;)))">
            <text:p>UNKNOWN</text:p>
          </table:table-cell>
          <table:table-cell office:value-type="string" table:formula="of:=IF([.Z141]=&quot;UNKNOWN&quot;;&quot;NO REVIEW OUTCOME ASSERTED — REMAINS UNKNOWN&quot;;IF([.Z141]=&quot;BLOCKED — OUTCOME ASSERTED WITHOUT REVIEW ELIGIBILITY&quot;;&quot;REMOVE OR CORRECT OUTCOME ASSERTION — REVIEW ELIGIBILITY REQUIRED FIRST&quot;;IF([.Z141]=&quot;BLOCKED — NONCANONICAL OUTCOME&quot;;&quot;CORRECT OUTCOME TO CANONICAL CONTROLLED VOCABULARY&quot;;IF([.Z1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1]=&quot;UNKNOWN&quot;;&quot;UNKNOWN&quot;;IF(OR([.Z141]=&quot;BLOCKED — OUTCOME ASSERTED WITHOUT REVIEW ELIGIBILITY&quot;;[.Z141]=&quot;BLOCKED — NONCANONICAL OUTCOME&quot;);&quot;BLOCKED&quot;;IF([.Z14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cell office:value-type="string" table:formula="of:=IF([.U142]=&quot;UNKNOWN&quot;;&quot;COMPLETE OR ASSERT REQUIRED EVIDENCE BEFORE REVIEW&quot;;IF([.U142]=&quot;BLOCKED&quot;;&quot;RESOLVE CONTRADICTION BEFORE REVIEW — NO AUTHORITY CREATED&quot;;IF([.U1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2]=&quot;READY FOR REVIEW&quot;;&quot;REVIEW ELIGIBLE — NO AUTHORITY&quot;;IF(OR([.U142]=&quot;UNKNOWN&quot;;[.U142]=&quot;BLOCKED&quot;);&quot;NOT REVIEW ELIGIBLE&quot;;&quot;NOT REVIEW ELIGIBLE&quot;))">
            <text:p>NOT REVIEW ELIGIBLE</text:p>
          </table:table-cell>
          <table:table-cell office:value-type="string" table:formula="of:=IF([.W142]=&quot;NOT REVIEW ELIGIBLE&quot;;&quot;DO NOT BEGIN SETTLEMENT REVIEW — RESOLVE READINESS OR CONTRADICTION CONDITIONS&quot;;IF([.W1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2]=&quot;&quot;;&quot;UNKNOWN&quot;;IF([.W142]&lt;&gt;&quot;REVIEW ELIGIBLE — NO AUTHORITY&quot;;&quot;BLOCKED — OUTCOME ASSERTED WITHOUT REVIEW ELIGIBILITY&quot;;IF(OR([.Y142]=&quot;REVIEWED — NO AUTHORITY&quot;;[.Y142]=&quot;REVIEW DEFERRED&quot;;[.Y142]=&quot;REVIEW BLOCKED&quot;);&quot;ACCEPTED INTAKE — NO AUTHORITY&quot;;&quot;BLOCKED — NONCANONICAL OUTCOME&quot;)))">
            <text:p>UNKNOWN</text:p>
          </table:table-cell>
          <table:table-cell office:value-type="string" table:formula="of:=IF([.Z142]=&quot;UNKNOWN&quot;;&quot;NO REVIEW OUTCOME ASSERTED — REMAINS UNKNOWN&quot;;IF([.Z142]=&quot;BLOCKED — OUTCOME ASSERTED WITHOUT REVIEW ELIGIBILITY&quot;;&quot;REMOVE OR CORRECT OUTCOME ASSERTION — REVIEW ELIGIBILITY REQUIRED FIRST&quot;;IF([.Z142]=&quot;BLOCKED — NONCANONICAL OUTCOME&quot;;&quot;CORRECT OUTCOME TO CANONICAL CONTROLLED VOCABULARY&quot;;IF([.Z1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2]=&quot;UNKNOWN&quot;;&quot;UNKNOWN&quot;;IF(OR([.Z142]=&quot;BLOCKED — OUTCOME ASSERTED WITHOUT REVIEW ELIGIBILITY&quot;;[.Z142]=&quot;BLOCKED — NONCANONICAL OUTCOME&quot;);&quot;BLOCKED&quot;;IF([.Z14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cell office:value-type="string" table:formula="of:=IF([.U143]=&quot;UNKNOWN&quot;;&quot;COMPLETE OR ASSERT REQUIRED EVIDENCE BEFORE REVIEW&quot;;IF([.U143]=&quot;BLOCKED&quot;;&quot;RESOLVE CONTRADICTION BEFORE REVIEW — NO AUTHORITY CREATED&quot;;IF([.U1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3]=&quot;READY FOR REVIEW&quot;;&quot;REVIEW ELIGIBLE — NO AUTHORITY&quot;;IF(OR([.U143]=&quot;UNKNOWN&quot;;[.U143]=&quot;BLOCKED&quot;);&quot;NOT REVIEW ELIGIBLE&quot;;&quot;NOT REVIEW ELIGIBLE&quot;))">
            <text:p>NOT REVIEW ELIGIBLE</text:p>
          </table:table-cell>
          <table:table-cell office:value-type="string" table:formula="of:=IF([.W143]=&quot;NOT REVIEW ELIGIBLE&quot;;&quot;DO NOT BEGIN SETTLEMENT REVIEW — RESOLVE READINESS OR CONTRADICTION CONDITIONS&quot;;IF([.W1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3]=&quot;&quot;;&quot;UNKNOWN&quot;;IF([.W143]&lt;&gt;&quot;REVIEW ELIGIBLE — NO AUTHORITY&quot;;&quot;BLOCKED — OUTCOME ASSERTED WITHOUT REVIEW ELIGIBILITY&quot;;IF(OR([.Y143]=&quot;REVIEWED — NO AUTHORITY&quot;;[.Y143]=&quot;REVIEW DEFERRED&quot;;[.Y143]=&quot;REVIEW BLOCKED&quot;);&quot;ACCEPTED INTAKE — NO AUTHORITY&quot;;&quot;BLOCKED — NONCANONICAL OUTCOME&quot;)))">
            <text:p>UNKNOWN</text:p>
          </table:table-cell>
          <table:table-cell office:value-type="string" table:formula="of:=IF([.Z143]=&quot;UNKNOWN&quot;;&quot;NO REVIEW OUTCOME ASSERTED — REMAINS UNKNOWN&quot;;IF([.Z143]=&quot;BLOCKED — OUTCOME ASSERTED WITHOUT REVIEW ELIGIBILITY&quot;;&quot;REMOVE OR CORRECT OUTCOME ASSERTION — REVIEW ELIGIBILITY REQUIRED FIRST&quot;;IF([.Z143]=&quot;BLOCKED — NONCANONICAL OUTCOME&quot;;&quot;CORRECT OUTCOME TO CANONICAL CONTROLLED VOCABULARY&quot;;IF([.Z1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3]=&quot;UNKNOWN&quot;;&quot;UNKNOWN&quot;;IF(OR([.Z143]=&quot;BLOCKED — OUTCOME ASSERTED WITHOUT REVIEW ELIGIBILITY&quot;;[.Z143]=&quot;BLOCKED — NONCANONICAL OUTCOME&quot;);&quot;BLOCKED&quot;;IF([.Z14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cell office:value-type="string" table:formula="of:=IF([.U144]=&quot;UNKNOWN&quot;;&quot;COMPLETE OR ASSERT REQUIRED EVIDENCE BEFORE REVIEW&quot;;IF([.U144]=&quot;BLOCKED&quot;;&quot;RESOLVE CONTRADICTION BEFORE REVIEW — NO AUTHORITY CREATED&quot;;IF([.U1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4]=&quot;READY FOR REVIEW&quot;;&quot;REVIEW ELIGIBLE — NO AUTHORITY&quot;;IF(OR([.U144]=&quot;UNKNOWN&quot;;[.U144]=&quot;BLOCKED&quot;);&quot;NOT REVIEW ELIGIBLE&quot;;&quot;NOT REVIEW ELIGIBLE&quot;))">
            <text:p>NOT REVIEW ELIGIBLE</text:p>
          </table:table-cell>
          <table:table-cell office:value-type="string" table:formula="of:=IF([.W144]=&quot;NOT REVIEW ELIGIBLE&quot;;&quot;DO NOT BEGIN SETTLEMENT REVIEW — RESOLVE READINESS OR CONTRADICTION CONDITIONS&quot;;IF([.W1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4]=&quot;&quot;;&quot;UNKNOWN&quot;;IF([.W144]&lt;&gt;&quot;REVIEW ELIGIBLE — NO AUTHORITY&quot;;&quot;BLOCKED — OUTCOME ASSERTED WITHOUT REVIEW ELIGIBILITY&quot;;IF(OR([.Y144]=&quot;REVIEWED — NO AUTHORITY&quot;;[.Y144]=&quot;REVIEW DEFERRED&quot;;[.Y144]=&quot;REVIEW BLOCKED&quot;);&quot;ACCEPTED INTAKE — NO AUTHORITY&quot;;&quot;BLOCKED — NONCANONICAL OUTCOME&quot;)))">
            <text:p>UNKNOWN</text:p>
          </table:table-cell>
          <table:table-cell office:value-type="string" table:formula="of:=IF([.Z144]=&quot;UNKNOWN&quot;;&quot;NO REVIEW OUTCOME ASSERTED — REMAINS UNKNOWN&quot;;IF([.Z144]=&quot;BLOCKED — OUTCOME ASSERTED WITHOUT REVIEW ELIGIBILITY&quot;;&quot;REMOVE OR CORRECT OUTCOME ASSERTION — REVIEW ELIGIBILITY REQUIRED FIRST&quot;;IF([.Z144]=&quot;BLOCKED — NONCANONICAL OUTCOME&quot;;&quot;CORRECT OUTCOME TO CANONICAL CONTROLLED VOCABULARY&quot;;IF([.Z1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4]=&quot;UNKNOWN&quot;;&quot;UNKNOWN&quot;;IF(OR([.Z144]=&quot;BLOCKED — OUTCOME ASSERTED WITHOUT REVIEW ELIGIBILITY&quot;;[.Z144]=&quot;BLOCKED — NONCANONICAL OUTCOME&quot;);&quot;BLOCKED&quot;;IF([.Z14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cell office:value-type="string" table:formula="of:=IF([.U145]=&quot;UNKNOWN&quot;;&quot;COMPLETE OR ASSERT REQUIRED EVIDENCE BEFORE REVIEW&quot;;IF([.U145]=&quot;BLOCKED&quot;;&quot;RESOLVE CONTRADICTION BEFORE REVIEW — NO AUTHORITY CREATED&quot;;IF([.U1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5]=&quot;READY FOR REVIEW&quot;;&quot;REVIEW ELIGIBLE — NO AUTHORITY&quot;;IF(OR([.U145]=&quot;UNKNOWN&quot;;[.U145]=&quot;BLOCKED&quot;);&quot;NOT REVIEW ELIGIBLE&quot;;&quot;NOT REVIEW ELIGIBLE&quot;))">
            <text:p>NOT REVIEW ELIGIBLE</text:p>
          </table:table-cell>
          <table:table-cell office:value-type="string" table:formula="of:=IF([.W145]=&quot;NOT REVIEW ELIGIBLE&quot;;&quot;DO NOT BEGIN SETTLEMENT REVIEW — RESOLVE READINESS OR CONTRADICTION CONDITIONS&quot;;IF([.W1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5]=&quot;&quot;;&quot;UNKNOWN&quot;;IF([.W145]&lt;&gt;&quot;REVIEW ELIGIBLE — NO AUTHORITY&quot;;&quot;BLOCKED — OUTCOME ASSERTED WITHOUT REVIEW ELIGIBILITY&quot;;IF(OR([.Y145]=&quot;REVIEWED — NO AUTHORITY&quot;;[.Y145]=&quot;REVIEW DEFERRED&quot;;[.Y145]=&quot;REVIEW BLOCKED&quot;);&quot;ACCEPTED INTAKE — NO AUTHORITY&quot;;&quot;BLOCKED — NONCANONICAL OUTCOME&quot;)))">
            <text:p>UNKNOWN</text:p>
          </table:table-cell>
          <table:table-cell office:value-type="string" table:formula="of:=IF([.Z145]=&quot;UNKNOWN&quot;;&quot;NO REVIEW OUTCOME ASSERTED — REMAINS UNKNOWN&quot;;IF([.Z145]=&quot;BLOCKED — OUTCOME ASSERTED WITHOUT REVIEW ELIGIBILITY&quot;;&quot;REMOVE OR CORRECT OUTCOME ASSERTION — REVIEW ELIGIBILITY REQUIRED FIRST&quot;;IF([.Z145]=&quot;BLOCKED — NONCANONICAL OUTCOME&quot;;&quot;CORRECT OUTCOME TO CANONICAL CONTROLLED VOCABULARY&quot;;IF([.Z1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5]=&quot;UNKNOWN&quot;;&quot;UNKNOWN&quot;;IF(OR([.Z145]=&quot;BLOCKED — OUTCOME ASSERTED WITHOUT REVIEW ELIGIBILITY&quot;;[.Z145]=&quot;BLOCKED — NONCANONICAL OUTCOME&quot;);&quot;BLOCKED&quot;;IF([.Z14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cell office:value-type="string" table:formula="of:=IF([.U146]=&quot;UNKNOWN&quot;;&quot;COMPLETE OR ASSERT REQUIRED EVIDENCE BEFORE REVIEW&quot;;IF([.U146]=&quot;BLOCKED&quot;;&quot;RESOLVE CONTRADICTION BEFORE REVIEW — NO AUTHORITY CREATED&quot;;IF([.U1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6]=&quot;READY FOR REVIEW&quot;;&quot;REVIEW ELIGIBLE — NO AUTHORITY&quot;;IF(OR([.U146]=&quot;UNKNOWN&quot;;[.U146]=&quot;BLOCKED&quot;);&quot;NOT REVIEW ELIGIBLE&quot;;&quot;NOT REVIEW ELIGIBLE&quot;))">
            <text:p>NOT REVIEW ELIGIBLE</text:p>
          </table:table-cell>
          <table:table-cell office:value-type="string" table:formula="of:=IF([.W146]=&quot;NOT REVIEW ELIGIBLE&quot;;&quot;DO NOT BEGIN SETTLEMENT REVIEW — RESOLVE READINESS OR CONTRADICTION CONDITIONS&quot;;IF([.W1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6]=&quot;&quot;;&quot;UNKNOWN&quot;;IF([.W146]&lt;&gt;&quot;REVIEW ELIGIBLE — NO AUTHORITY&quot;;&quot;BLOCKED — OUTCOME ASSERTED WITHOUT REVIEW ELIGIBILITY&quot;;IF(OR([.Y146]=&quot;REVIEWED — NO AUTHORITY&quot;;[.Y146]=&quot;REVIEW DEFERRED&quot;;[.Y146]=&quot;REVIEW BLOCKED&quot;);&quot;ACCEPTED INTAKE — NO AUTHORITY&quot;;&quot;BLOCKED — NONCANONICAL OUTCOME&quot;)))">
            <text:p>UNKNOWN</text:p>
          </table:table-cell>
          <table:table-cell office:value-type="string" table:formula="of:=IF([.Z146]=&quot;UNKNOWN&quot;;&quot;NO REVIEW OUTCOME ASSERTED — REMAINS UNKNOWN&quot;;IF([.Z146]=&quot;BLOCKED — OUTCOME ASSERTED WITHOUT REVIEW ELIGIBILITY&quot;;&quot;REMOVE OR CORRECT OUTCOME ASSERTION — REVIEW ELIGIBILITY REQUIRED FIRST&quot;;IF([.Z146]=&quot;BLOCKED — NONCANONICAL OUTCOME&quot;;&quot;CORRECT OUTCOME TO CANONICAL CONTROLLED VOCABULARY&quot;;IF([.Z1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6]=&quot;UNKNOWN&quot;;&quot;UNKNOWN&quot;;IF(OR([.Z146]=&quot;BLOCKED — OUTCOME ASSERTED WITHOUT REVIEW ELIGIBILITY&quot;;[.Z146]=&quot;BLOCKED — NONCANONICAL OUTCOME&quot;);&quot;BLOCKED&quot;;IF([.Z14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cell office:value-type="string" table:formula="of:=IF([.U147]=&quot;UNKNOWN&quot;;&quot;COMPLETE OR ASSERT REQUIRED EVIDENCE BEFORE REVIEW&quot;;IF([.U147]=&quot;BLOCKED&quot;;&quot;RESOLVE CONTRADICTION BEFORE REVIEW — NO AUTHORITY CREATED&quot;;IF([.U1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7]=&quot;READY FOR REVIEW&quot;;&quot;REVIEW ELIGIBLE — NO AUTHORITY&quot;;IF(OR([.U147]=&quot;UNKNOWN&quot;;[.U147]=&quot;BLOCKED&quot;);&quot;NOT REVIEW ELIGIBLE&quot;;&quot;NOT REVIEW ELIGIBLE&quot;))">
            <text:p>NOT REVIEW ELIGIBLE</text:p>
          </table:table-cell>
          <table:table-cell office:value-type="string" table:formula="of:=IF([.W147]=&quot;NOT REVIEW ELIGIBLE&quot;;&quot;DO NOT BEGIN SETTLEMENT REVIEW — RESOLVE READINESS OR CONTRADICTION CONDITIONS&quot;;IF([.W1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7]=&quot;&quot;;&quot;UNKNOWN&quot;;IF([.W147]&lt;&gt;&quot;REVIEW ELIGIBLE — NO AUTHORITY&quot;;&quot;BLOCKED — OUTCOME ASSERTED WITHOUT REVIEW ELIGIBILITY&quot;;IF(OR([.Y147]=&quot;REVIEWED — NO AUTHORITY&quot;;[.Y147]=&quot;REVIEW DEFERRED&quot;;[.Y147]=&quot;REVIEW BLOCKED&quot;);&quot;ACCEPTED INTAKE — NO AUTHORITY&quot;;&quot;BLOCKED — NONCANONICAL OUTCOME&quot;)))">
            <text:p>UNKNOWN</text:p>
          </table:table-cell>
          <table:table-cell office:value-type="string" table:formula="of:=IF([.Z147]=&quot;UNKNOWN&quot;;&quot;NO REVIEW OUTCOME ASSERTED — REMAINS UNKNOWN&quot;;IF([.Z147]=&quot;BLOCKED — OUTCOME ASSERTED WITHOUT REVIEW ELIGIBILITY&quot;;&quot;REMOVE OR CORRECT OUTCOME ASSERTION — REVIEW ELIGIBILITY REQUIRED FIRST&quot;;IF([.Z147]=&quot;BLOCKED — NONCANONICAL OUTCOME&quot;;&quot;CORRECT OUTCOME TO CANONICAL CONTROLLED VOCABULARY&quot;;IF([.Z1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7]=&quot;UNKNOWN&quot;;&quot;UNKNOWN&quot;;IF(OR([.Z147]=&quot;BLOCKED — OUTCOME ASSERTED WITHOUT REVIEW ELIGIBILITY&quot;;[.Z147]=&quot;BLOCKED — NONCANONICAL OUTCOME&quot;);&quot;BLOCKED&quot;;IF([.Z14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cell office:value-type="string" table:formula="of:=IF([.U148]=&quot;UNKNOWN&quot;;&quot;COMPLETE OR ASSERT REQUIRED EVIDENCE BEFORE REVIEW&quot;;IF([.U148]=&quot;BLOCKED&quot;;&quot;RESOLVE CONTRADICTION BEFORE REVIEW — NO AUTHORITY CREATED&quot;;IF([.U1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8]=&quot;READY FOR REVIEW&quot;;&quot;REVIEW ELIGIBLE — NO AUTHORITY&quot;;IF(OR([.U148]=&quot;UNKNOWN&quot;;[.U148]=&quot;BLOCKED&quot;);&quot;NOT REVIEW ELIGIBLE&quot;;&quot;NOT REVIEW ELIGIBLE&quot;))">
            <text:p>NOT REVIEW ELIGIBLE</text:p>
          </table:table-cell>
          <table:table-cell office:value-type="string" table:formula="of:=IF([.W148]=&quot;NOT REVIEW ELIGIBLE&quot;;&quot;DO NOT BEGIN SETTLEMENT REVIEW — RESOLVE READINESS OR CONTRADICTION CONDITIONS&quot;;IF([.W1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8]=&quot;&quot;;&quot;UNKNOWN&quot;;IF([.W148]&lt;&gt;&quot;REVIEW ELIGIBLE — NO AUTHORITY&quot;;&quot;BLOCKED — OUTCOME ASSERTED WITHOUT REVIEW ELIGIBILITY&quot;;IF(OR([.Y148]=&quot;REVIEWED — NO AUTHORITY&quot;;[.Y148]=&quot;REVIEW DEFERRED&quot;;[.Y148]=&quot;REVIEW BLOCKED&quot;);&quot;ACCEPTED INTAKE — NO AUTHORITY&quot;;&quot;BLOCKED — NONCANONICAL OUTCOME&quot;)))">
            <text:p>UNKNOWN</text:p>
          </table:table-cell>
          <table:table-cell office:value-type="string" table:formula="of:=IF([.Z148]=&quot;UNKNOWN&quot;;&quot;NO REVIEW OUTCOME ASSERTED — REMAINS UNKNOWN&quot;;IF([.Z148]=&quot;BLOCKED — OUTCOME ASSERTED WITHOUT REVIEW ELIGIBILITY&quot;;&quot;REMOVE OR CORRECT OUTCOME ASSERTION — REVIEW ELIGIBILITY REQUIRED FIRST&quot;;IF([.Z148]=&quot;BLOCKED — NONCANONICAL OUTCOME&quot;;&quot;CORRECT OUTCOME TO CANONICAL CONTROLLED VOCABULARY&quot;;IF([.Z1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8]=&quot;UNKNOWN&quot;;&quot;UNKNOWN&quot;;IF(OR([.Z148]=&quot;BLOCKED — OUTCOME ASSERTED WITHOUT REVIEW ELIGIBILITY&quot;;[.Z148]=&quot;BLOCKED — NONCANONICAL OUTCOME&quot;);&quot;BLOCKED&quot;;IF([.Z14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cell office:value-type="string" table:formula="of:=IF([.U149]=&quot;UNKNOWN&quot;;&quot;COMPLETE OR ASSERT REQUIRED EVIDENCE BEFORE REVIEW&quot;;IF([.U149]=&quot;BLOCKED&quot;;&quot;RESOLVE CONTRADICTION BEFORE REVIEW — NO AUTHORITY CREATED&quot;;IF([.U1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9]=&quot;READY FOR REVIEW&quot;;&quot;REVIEW ELIGIBLE — NO AUTHORITY&quot;;IF(OR([.U149]=&quot;UNKNOWN&quot;;[.U149]=&quot;BLOCKED&quot;);&quot;NOT REVIEW ELIGIBLE&quot;;&quot;NOT REVIEW ELIGIBLE&quot;))">
            <text:p>NOT REVIEW ELIGIBLE</text:p>
          </table:table-cell>
          <table:table-cell office:value-type="string" table:formula="of:=IF([.W149]=&quot;NOT REVIEW ELIGIBLE&quot;;&quot;DO NOT BEGIN SETTLEMENT REVIEW — RESOLVE READINESS OR CONTRADICTION CONDITIONS&quot;;IF([.W1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9]=&quot;&quot;;&quot;UNKNOWN&quot;;IF([.W149]&lt;&gt;&quot;REVIEW ELIGIBLE — NO AUTHORITY&quot;;&quot;BLOCKED — OUTCOME ASSERTED WITHOUT REVIEW ELIGIBILITY&quot;;IF(OR([.Y149]=&quot;REVIEWED — NO AUTHORITY&quot;;[.Y149]=&quot;REVIEW DEFERRED&quot;;[.Y149]=&quot;REVIEW BLOCKED&quot;);&quot;ACCEPTED INTAKE — NO AUTHORITY&quot;;&quot;BLOCKED — NONCANONICAL OUTCOME&quot;)))">
            <text:p>UNKNOWN</text:p>
          </table:table-cell>
          <table:table-cell office:value-type="string" table:formula="of:=IF([.Z149]=&quot;UNKNOWN&quot;;&quot;NO REVIEW OUTCOME ASSERTED — REMAINS UNKNOWN&quot;;IF([.Z149]=&quot;BLOCKED — OUTCOME ASSERTED WITHOUT REVIEW ELIGIBILITY&quot;;&quot;REMOVE OR CORRECT OUTCOME ASSERTION — REVIEW ELIGIBILITY REQUIRED FIRST&quot;;IF([.Z149]=&quot;BLOCKED — NONCANONICAL OUTCOME&quot;;&quot;CORRECT OUTCOME TO CANONICAL CONTROLLED VOCABULARY&quot;;IF([.Z1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49]=&quot;UNKNOWN&quot;;&quot;UNKNOWN&quot;;IF(OR([.Z149]=&quot;BLOCKED — OUTCOME ASSERTED WITHOUT REVIEW ELIGIBILITY&quot;;[.Z149]=&quot;BLOCKED — NONCANONICAL OUTCOME&quot;);&quot;BLOCKED&quot;;IF([.Z14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cell office:value-type="string" table:formula="of:=IF([.U150]=&quot;UNKNOWN&quot;;&quot;COMPLETE OR ASSERT REQUIRED EVIDENCE BEFORE REVIEW&quot;;IF([.U150]=&quot;BLOCKED&quot;;&quot;RESOLVE CONTRADICTION BEFORE REVIEW — NO AUTHORITY CREATED&quot;;IF([.U1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0]=&quot;READY FOR REVIEW&quot;;&quot;REVIEW ELIGIBLE — NO AUTHORITY&quot;;IF(OR([.U150]=&quot;UNKNOWN&quot;;[.U150]=&quot;BLOCKED&quot;);&quot;NOT REVIEW ELIGIBLE&quot;;&quot;NOT REVIEW ELIGIBLE&quot;))">
            <text:p>NOT REVIEW ELIGIBLE</text:p>
          </table:table-cell>
          <table:table-cell office:value-type="string" table:formula="of:=IF([.W150]=&quot;NOT REVIEW ELIGIBLE&quot;;&quot;DO NOT BEGIN SETTLEMENT REVIEW — RESOLVE READINESS OR CONTRADICTION CONDITIONS&quot;;IF([.W1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0]=&quot;&quot;;&quot;UNKNOWN&quot;;IF([.W150]&lt;&gt;&quot;REVIEW ELIGIBLE — NO AUTHORITY&quot;;&quot;BLOCKED — OUTCOME ASSERTED WITHOUT REVIEW ELIGIBILITY&quot;;IF(OR([.Y150]=&quot;REVIEWED — NO AUTHORITY&quot;;[.Y150]=&quot;REVIEW DEFERRED&quot;;[.Y150]=&quot;REVIEW BLOCKED&quot;);&quot;ACCEPTED INTAKE — NO AUTHORITY&quot;;&quot;BLOCKED — NONCANONICAL OUTCOME&quot;)))">
            <text:p>UNKNOWN</text:p>
          </table:table-cell>
          <table:table-cell office:value-type="string" table:formula="of:=IF([.Z150]=&quot;UNKNOWN&quot;;&quot;NO REVIEW OUTCOME ASSERTED — REMAINS UNKNOWN&quot;;IF([.Z150]=&quot;BLOCKED — OUTCOME ASSERTED WITHOUT REVIEW ELIGIBILITY&quot;;&quot;REMOVE OR CORRECT OUTCOME ASSERTION — REVIEW ELIGIBILITY REQUIRED FIRST&quot;;IF([.Z150]=&quot;BLOCKED — NONCANONICAL OUTCOME&quot;;&quot;CORRECT OUTCOME TO CANONICAL CONTROLLED VOCABULARY&quot;;IF([.Z1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0]=&quot;UNKNOWN&quot;;&quot;UNKNOWN&quot;;IF(OR([.Z150]=&quot;BLOCKED — OUTCOME ASSERTED WITHOUT REVIEW ELIGIBILITY&quot;;[.Z150]=&quot;BLOCKED — NONCANONICAL OUTCOME&quot;);&quot;BLOCKED&quot;;IF([.Z15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cell office:value-type="string" table:formula="of:=IF([.U151]=&quot;UNKNOWN&quot;;&quot;COMPLETE OR ASSERT REQUIRED EVIDENCE BEFORE REVIEW&quot;;IF([.U151]=&quot;BLOCKED&quot;;&quot;RESOLVE CONTRADICTION BEFORE REVIEW — NO AUTHORITY CREATED&quot;;IF([.U1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1]=&quot;READY FOR REVIEW&quot;;&quot;REVIEW ELIGIBLE — NO AUTHORITY&quot;;IF(OR([.U151]=&quot;UNKNOWN&quot;;[.U151]=&quot;BLOCKED&quot;);&quot;NOT REVIEW ELIGIBLE&quot;;&quot;NOT REVIEW ELIGIBLE&quot;))">
            <text:p>NOT REVIEW ELIGIBLE</text:p>
          </table:table-cell>
          <table:table-cell office:value-type="string" table:formula="of:=IF([.W151]=&quot;NOT REVIEW ELIGIBLE&quot;;&quot;DO NOT BEGIN SETTLEMENT REVIEW — RESOLVE READINESS OR CONTRADICTION CONDITIONS&quot;;IF([.W1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1]=&quot;&quot;;&quot;UNKNOWN&quot;;IF([.W151]&lt;&gt;&quot;REVIEW ELIGIBLE — NO AUTHORITY&quot;;&quot;BLOCKED — OUTCOME ASSERTED WITHOUT REVIEW ELIGIBILITY&quot;;IF(OR([.Y151]=&quot;REVIEWED — NO AUTHORITY&quot;;[.Y151]=&quot;REVIEW DEFERRED&quot;;[.Y151]=&quot;REVIEW BLOCKED&quot;);&quot;ACCEPTED INTAKE — NO AUTHORITY&quot;;&quot;BLOCKED — NONCANONICAL OUTCOME&quot;)))">
            <text:p>UNKNOWN</text:p>
          </table:table-cell>
          <table:table-cell office:value-type="string" table:formula="of:=IF([.Z151]=&quot;UNKNOWN&quot;;&quot;NO REVIEW OUTCOME ASSERTED — REMAINS UNKNOWN&quot;;IF([.Z151]=&quot;BLOCKED — OUTCOME ASSERTED WITHOUT REVIEW ELIGIBILITY&quot;;&quot;REMOVE OR CORRECT OUTCOME ASSERTION — REVIEW ELIGIBILITY REQUIRED FIRST&quot;;IF([.Z151]=&quot;BLOCKED — NONCANONICAL OUTCOME&quot;;&quot;CORRECT OUTCOME TO CANONICAL CONTROLLED VOCABULARY&quot;;IF([.Z1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1]=&quot;UNKNOWN&quot;;&quot;UNKNOWN&quot;;IF(OR([.Z151]=&quot;BLOCKED — OUTCOME ASSERTED WITHOUT REVIEW ELIGIBILITY&quot;;[.Z151]=&quot;BLOCKED — NONCANONICAL OUTCOME&quot;);&quot;BLOCKED&quot;;IF([.Z15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cell office:value-type="string" table:formula="of:=IF([.U152]=&quot;UNKNOWN&quot;;&quot;COMPLETE OR ASSERT REQUIRED EVIDENCE BEFORE REVIEW&quot;;IF([.U152]=&quot;BLOCKED&quot;;&quot;RESOLVE CONTRADICTION BEFORE REVIEW — NO AUTHORITY CREATED&quot;;IF([.U1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2]=&quot;READY FOR REVIEW&quot;;&quot;REVIEW ELIGIBLE — NO AUTHORITY&quot;;IF(OR([.U152]=&quot;UNKNOWN&quot;;[.U152]=&quot;BLOCKED&quot;);&quot;NOT REVIEW ELIGIBLE&quot;;&quot;NOT REVIEW ELIGIBLE&quot;))">
            <text:p>NOT REVIEW ELIGIBLE</text:p>
          </table:table-cell>
          <table:table-cell office:value-type="string" table:formula="of:=IF([.W152]=&quot;NOT REVIEW ELIGIBLE&quot;;&quot;DO NOT BEGIN SETTLEMENT REVIEW — RESOLVE READINESS OR CONTRADICTION CONDITIONS&quot;;IF([.W1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2]=&quot;&quot;;&quot;UNKNOWN&quot;;IF([.W152]&lt;&gt;&quot;REVIEW ELIGIBLE — NO AUTHORITY&quot;;&quot;BLOCKED — OUTCOME ASSERTED WITHOUT REVIEW ELIGIBILITY&quot;;IF(OR([.Y152]=&quot;REVIEWED — NO AUTHORITY&quot;;[.Y152]=&quot;REVIEW DEFERRED&quot;;[.Y152]=&quot;REVIEW BLOCKED&quot;);&quot;ACCEPTED INTAKE — NO AUTHORITY&quot;;&quot;BLOCKED — NONCANONICAL OUTCOME&quot;)))">
            <text:p>UNKNOWN</text:p>
          </table:table-cell>
          <table:table-cell office:value-type="string" table:formula="of:=IF([.Z152]=&quot;UNKNOWN&quot;;&quot;NO REVIEW OUTCOME ASSERTED — REMAINS UNKNOWN&quot;;IF([.Z152]=&quot;BLOCKED — OUTCOME ASSERTED WITHOUT REVIEW ELIGIBILITY&quot;;&quot;REMOVE OR CORRECT OUTCOME ASSERTION — REVIEW ELIGIBILITY REQUIRED FIRST&quot;;IF([.Z152]=&quot;BLOCKED — NONCANONICAL OUTCOME&quot;;&quot;CORRECT OUTCOME TO CANONICAL CONTROLLED VOCABULARY&quot;;IF([.Z15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2]=&quot;UNKNOWN&quot;;&quot;UNKNOWN&quot;;IF(OR([.Z152]=&quot;BLOCKED — OUTCOME ASSERTED WITHOUT REVIEW ELIGIBILITY&quot;;[.Z152]=&quot;BLOCKED — NONCANONICAL OUTCOME&quot;);&quot;BLOCKED&quot;;IF([.Z15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cell office:value-type="string" table:formula="of:=IF([.U153]=&quot;UNKNOWN&quot;;&quot;COMPLETE OR ASSERT REQUIRED EVIDENCE BEFORE REVIEW&quot;;IF([.U153]=&quot;BLOCKED&quot;;&quot;RESOLVE CONTRADICTION BEFORE REVIEW — NO AUTHORITY CREATED&quot;;IF([.U1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3]=&quot;READY FOR REVIEW&quot;;&quot;REVIEW ELIGIBLE — NO AUTHORITY&quot;;IF(OR([.U153]=&quot;UNKNOWN&quot;;[.U153]=&quot;BLOCKED&quot;);&quot;NOT REVIEW ELIGIBLE&quot;;&quot;NOT REVIEW ELIGIBLE&quot;))">
            <text:p>NOT REVIEW ELIGIBLE</text:p>
          </table:table-cell>
          <table:table-cell office:value-type="string" table:formula="of:=IF([.W153]=&quot;NOT REVIEW ELIGIBLE&quot;;&quot;DO NOT BEGIN SETTLEMENT REVIEW — RESOLVE READINESS OR CONTRADICTION CONDITIONS&quot;;IF([.W1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3]=&quot;&quot;;&quot;UNKNOWN&quot;;IF([.W153]&lt;&gt;&quot;REVIEW ELIGIBLE — NO AUTHORITY&quot;;&quot;BLOCKED — OUTCOME ASSERTED WITHOUT REVIEW ELIGIBILITY&quot;;IF(OR([.Y153]=&quot;REVIEWED — NO AUTHORITY&quot;;[.Y153]=&quot;REVIEW DEFERRED&quot;;[.Y153]=&quot;REVIEW BLOCKED&quot;);&quot;ACCEPTED INTAKE — NO AUTHORITY&quot;;&quot;BLOCKED — NONCANONICAL OUTCOME&quot;)))">
            <text:p>UNKNOWN</text:p>
          </table:table-cell>
          <table:table-cell office:value-type="string" table:formula="of:=IF([.Z153]=&quot;UNKNOWN&quot;;&quot;NO REVIEW OUTCOME ASSERTED — REMAINS UNKNOWN&quot;;IF([.Z153]=&quot;BLOCKED — OUTCOME ASSERTED WITHOUT REVIEW ELIGIBILITY&quot;;&quot;REMOVE OR CORRECT OUTCOME ASSERTION — REVIEW ELIGIBILITY REQUIRED FIRST&quot;;IF([.Z153]=&quot;BLOCKED — NONCANONICAL OUTCOME&quot;;&quot;CORRECT OUTCOME TO CANONICAL CONTROLLED VOCABULARY&quot;;IF([.Z15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3]=&quot;UNKNOWN&quot;;&quot;UNKNOWN&quot;;IF(OR([.Z153]=&quot;BLOCKED — OUTCOME ASSERTED WITHOUT REVIEW ELIGIBILITY&quot;;[.Z153]=&quot;BLOCKED — NONCANONICAL OUTCOME&quot;);&quot;BLOCKED&quot;;IF([.Z15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cell office:value-type="string" table:formula="of:=IF([.U154]=&quot;UNKNOWN&quot;;&quot;COMPLETE OR ASSERT REQUIRED EVIDENCE BEFORE REVIEW&quot;;IF([.U154]=&quot;BLOCKED&quot;;&quot;RESOLVE CONTRADICTION BEFORE REVIEW — NO AUTHORITY CREATED&quot;;IF([.U1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4]=&quot;READY FOR REVIEW&quot;;&quot;REVIEW ELIGIBLE — NO AUTHORITY&quot;;IF(OR([.U154]=&quot;UNKNOWN&quot;;[.U154]=&quot;BLOCKED&quot;);&quot;NOT REVIEW ELIGIBLE&quot;;&quot;NOT REVIEW ELIGIBLE&quot;))">
            <text:p>NOT REVIEW ELIGIBLE</text:p>
          </table:table-cell>
          <table:table-cell office:value-type="string" table:formula="of:=IF([.W154]=&quot;NOT REVIEW ELIGIBLE&quot;;&quot;DO NOT BEGIN SETTLEMENT REVIEW — RESOLVE READINESS OR CONTRADICTION CONDITIONS&quot;;IF([.W1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4]=&quot;&quot;;&quot;UNKNOWN&quot;;IF([.W154]&lt;&gt;&quot;REVIEW ELIGIBLE — NO AUTHORITY&quot;;&quot;BLOCKED — OUTCOME ASSERTED WITHOUT REVIEW ELIGIBILITY&quot;;IF(OR([.Y154]=&quot;REVIEWED — NO AUTHORITY&quot;;[.Y154]=&quot;REVIEW DEFERRED&quot;;[.Y154]=&quot;REVIEW BLOCKED&quot;);&quot;ACCEPTED INTAKE — NO AUTHORITY&quot;;&quot;BLOCKED — NONCANONICAL OUTCOME&quot;)))">
            <text:p>UNKNOWN</text:p>
          </table:table-cell>
          <table:table-cell office:value-type="string" table:formula="of:=IF([.Z154]=&quot;UNKNOWN&quot;;&quot;NO REVIEW OUTCOME ASSERTED — REMAINS UNKNOWN&quot;;IF([.Z154]=&quot;BLOCKED — OUTCOME ASSERTED WITHOUT REVIEW ELIGIBILITY&quot;;&quot;REMOVE OR CORRECT OUTCOME ASSERTION — REVIEW ELIGIBILITY REQUIRED FIRST&quot;;IF([.Z154]=&quot;BLOCKED — NONCANONICAL OUTCOME&quot;;&quot;CORRECT OUTCOME TO CANONICAL CONTROLLED VOCABULARY&quot;;IF([.Z15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4]=&quot;UNKNOWN&quot;;&quot;UNKNOWN&quot;;IF(OR([.Z154]=&quot;BLOCKED — OUTCOME ASSERTED WITHOUT REVIEW ELIGIBILITY&quot;;[.Z154]=&quot;BLOCKED — NONCANONICAL OUTCOME&quot;);&quot;BLOCKED&quot;;IF([.Z15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cell office:value-type="string" table:formula="of:=IF([.U155]=&quot;UNKNOWN&quot;;&quot;COMPLETE OR ASSERT REQUIRED EVIDENCE BEFORE REVIEW&quot;;IF([.U155]=&quot;BLOCKED&quot;;&quot;RESOLVE CONTRADICTION BEFORE REVIEW — NO AUTHORITY CREATED&quot;;IF([.U1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5]=&quot;READY FOR REVIEW&quot;;&quot;REVIEW ELIGIBLE — NO AUTHORITY&quot;;IF(OR([.U155]=&quot;UNKNOWN&quot;;[.U155]=&quot;BLOCKED&quot;);&quot;NOT REVIEW ELIGIBLE&quot;;&quot;NOT REVIEW ELIGIBLE&quot;))">
            <text:p>NOT REVIEW ELIGIBLE</text:p>
          </table:table-cell>
          <table:table-cell office:value-type="string" table:formula="of:=IF([.W155]=&quot;NOT REVIEW ELIGIBLE&quot;;&quot;DO NOT BEGIN SETTLEMENT REVIEW — RESOLVE READINESS OR CONTRADICTION CONDITIONS&quot;;IF([.W1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5]=&quot;&quot;;&quot;UNKNOWN&quot;;IF([.W155]&lt;&gt;&quot;REVIEW ELIGIBLE — NO AUTHORITY&quot;;&quot;BLOCKED — OUTCOME ASSERTED WITHOUT REVIEW ELIGIBILITY&quot;;IF(OR([.Y155]=&quot;REVIEWED — NO AUTHORITY&quot;;[.Y155]=&quot;REVIEW DEFERRED&quot;;[.Y155]=&quot;REVIEW BLOCKED&quot;);&quot;ACCEPTED INTAKE — NO AUTHORITY&quot;;&quot;BLOCKED — NONCANONICAL OUTCOME&quot;)))">
            <text:p>UNKNOWN</text:p>
          </table:table-cell>
          <table:table-cell office:value-type="string" table:formula="of:=IF([.Z155]=&quot;UNKNOWN&quot;;&quot;NO REVIEW OUTCOME ASSERTED — REMAINS UNKNOWN&quot;;IF([.Z155]=&quot;BLOCKED — OUTCOME ASSERTED WITHOUT REVIEW ELIGIBILITY&quot;;&quot;REMOVE OR CORRECT OUTCOME ASSERTION — REVIEW ELIGIBILITY REQUIRED FIRST&quot;;IF([.Z155]=&quot;BLOCKED — NONCANONICAL OUTCOME&quot;;&quot;CORRECT OUTCOME TO CANONICAL CONTROLLED VOCABULARY&quot;;IF([.Z15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5]=&quot;UNKNOWN&quot;;&quot;UNKNOWN&quot;;IF(OR([.Z155]=&quot;BLOCKED — OUTCOME ASSERTED WITHOUT REVIEW ELIGIBILITY&quot;;[.Z155]=&quot;BLOCKED — NONCANONICAL OUTCOME&quot;);&quot;BLOCKED&quot;;IF([.Z15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cell office:value-type="string" table:formula="of:=IF([.U156]=&quot;UNKNOWN&quot;;&quot;COMPLETE OR ASSERT REQUIRED EVIDENCE BEFORE REVIEW&quot;;IF([.U156]=&quot;BLOCKED&quot;;&quot;RESOLVE CONTRADICTION BEFORE REVIEW — NO AUTHORITY CREATED&quot;;IF([.U1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6]=&quot;READY FOR REVIEW&quot;;&quot;REVIEW ELIGIBLE — NO AUTHORITY&quot;;IF(OR([.U156]=&quot;UNKNOWN&quot;;[.U156]=&quot;BLOCKED&quot;);&quot;NOT REVIEW ELIGIBLE&quot;;&quot;NOT REVIEW ELIGIBLE&quot;))">
            <text:p>NOT REVIEW ELIGIBLE</text:p>
          </table:table-cell>
          <table:table-cell office:value-type="string" table:formula="of:=IF([.W156]=&quot;NOT REVIEW ELIGIBLE&quot;;&quot;DO NOT BEGIN SETTLEMENT REVIEW — RESOLVE READINESS OR CONTRADICTION CONDITIONS&quot;;IF([.W1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6]=&quot;&quot;;&quot;UNKNOWN&quot;;IF([.W156]&lt;&gt;&quot;REVIEW ELIGIBLE — NO AUTHORITY&quot;;&quot;BLOCKED — OUTCOME ASSERTED WITHOUT REVIEW ELIGIBILITY&quot;;IF(OR([.Y156]=&quot;REVIEWED — NO AUTHORITY&quot;;[.Y156]=&quot;REVIEW DEFERRED&quot;;[.Y156]=&quot;REVIEW BLOCKED&quot;);&quot;ACCEPTED INTAKE — NO AUTHORITY&quot;;&quot;BLOCKED — NONCANONICAL OUTCOME&quot;)))">
            <text:p>UNKNOWN</text:p>
          </table:table-cell>
          <table:table-cell office:value-type="string" table:formula="of:=IF([.Z156]=&quot;UNKNOWN&quot;;&quot;NO REVIEW OUTCOME ASSERTED — REMAINS UNKNOWN&quot;;IF([.Z156]=&quot;BLOCKED — OUTCOME ASSERTED WITHOUT REVIEW ELIGIBILITY&quot;;&quot;REMOVE OR CORRECT OUTCOME ASSERTION — REVIEW ELIGIBILITY REQUIRED FIRST&quot;;IF([.Z156]=&quot;BLOCKED — NONCANONICAL OUTCOME&quot;;&quot;CORRECT OUTCOME TO CANONICAL CONTROLLED VOCABULARY&quot;;IF([.Z15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6]=&quot;UNKNOWN&quot;;&quot;UNKNOWN&quot;;IF(OR([.Z156]=&quot;BLOCKED — OUTCOME ASSERTED WITHOUT REVIEW ELIGIBILITY&quot;;[.Z156]=&quot;BLOCKED — NONCANONICAL OUTCOME&quot;);&quot;BLOCKED&quot;;IF([.Z15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cell office:value-type="string" table:formula="of:=IF([.U157]=&quot;UNKNOWN&quot;;&quot;COMPLETE OR ASSERT REQUIRED EVIDENCE BEFORE REVIEW&quot;;IF([.U157]=&quot;BLOCKED&quot;;&quot;RESOLVE CONTRADICTION BEFORE REVIEW — NO AUTHORITY CREATED&quot;;IF([.U1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7]=&quot;READY FOR REVIEW&quot;;&quot;REVIEW ELIGIBLE — NO AUTHORITY&quot;;IF(OR([.U157]=&quot;UNKNOWN&quot;;[.U157]=&quot;BLOCKED&quot;);&quot;NOT REVIEW ELIGIBLE&quot;;&quot;NOT REVIEW ELIGIBLE&quot;))">
            <text:p>NOT REVIEW ELIGIBLE</text:p>
          </table:table-cell>
          <table:table-cell office:value-type="string" table:formula="of:=IF([.W157]=&quot;NOT REVIEW ELIGIBLE&quot;;&quot;DO NOT BEGIN SETTLEMENT REVIEW — RESOLVE READINESS OR CONTRADICTION CONDITIONS&quot;;IF([.W1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7]=&quot;&quot;;&quot;UNKNOWN&quot;;IF([.W157]&lt;&gt;&quot;REVIEW ELIGIBLE — NO AUTHORITY&quot;;&quot;BLOCKED — OUTCOME ASSERTED WITHOUT REVIEW ELIGIBILITY&quot;;IF(OR([.Y157]=&quot;REVIEWED — NO AUTHORITY&quot;;[.Y157]=&quot;REVIEW DEFERRED&quot;;[.Y157]=&quot;REVIEW BLOCKED&quot;);&quot;ACCEPTED INTAKE — NO AUTHORITY&quot;;&quot;BLOCKED — NONCANONICAL OUTCOME&quot;)))">
            <text:p>UNKNOWN</text:p>
          </table:table-cell>
          <table:table-cell office:value-type="string" table:formula="of:=IF([.Z157]=&quot;UNKNOWN&quot;;&quot;NO REVIEW OUTCOME ASSERTED — REMAINS UNKNOWN&quot;;IF([.Z157]=&quot;BLOCKED — OUTCOME ASSERTED WITHOUT REVIEW ELIGIBILITY&quot;;&quot;REMOVE OR CORRECT OUTCOME ASSERTION — REVIEW ELIGIBILITY REQUIRED FIRST&quot;;IF([.Z157]=&quot;BLOCKED — NONCANONICAL OUTCOME&quot;;&quot;CORRECT OUTCOME TO CANONICAL CONTROLLED VOCABULARY&quot;;IF([.Z15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7]=&quot;UNKNOWN&quot;;&quot;UNKNOWN&quot;;IF(OR([.Z157]=&quot;BLOCKED — OUTCOME ASSERTED WITHOUT REVIEW ELIGIBILITY&quot;;[.Z157]=&quot;BLOCKED — NONCANONICAL OUTCOME&quot;);&quot;BLOCKED&quot;;IF([.Z15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cell office:value-type="string" table:formula="of:=IF([.U158]=&quot;UNKNOWN&quot;;&quot;COMPLETE OR ASSERT REQUIRED EVIDENCE BEFORE REVIEW&quot;;IF([.U158]=&quot;BLOCKED&quot;;&quot;RESOLVE CONTRADICTION BEFORE REVIEW — NO AUTHORITY CREATED&quot;;IF([.U1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8]=&quot;READY FOR REVIEW&quot;;&quot;REVIEW ELIGIBLE — NO AUTHORITY&quot;;IF(OR([.U158]=&quot;UNKNOWN&quot;;[.U158]=&quot;BLOCKED&quot;);&quot;NOT REVIEW ELIGIBLE&quot;;&quot;NOT REVIEW ELIGIBLE&quot;))">
            <text:p>NOT REVIEW ELIGIBLE</text:p>
          </table:table-cell>
          <table:table-cell office:value-type="string" table:formula="of:=IF([.W158]=&quot;NOT REVIEW ELIGIBLE&quot;;&quot;DO NOT BEGIN SETTLEMENT REVIEW — RESOLVE READINESS OR CONTRADICTION CONDITIONS&quot;;IF([.W1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8]=&quot;&quot;;&quot;UNKNOWN&quot;;IF([.W158]&lt;&gt;&quot;REVIEW ELIGIBLE — NO AUTHORITY&quot;;&quot;BLOCKED — OUTCOME ASSERTED WITHOUT REVIEW ELIGIBILITY&quot;;IF(OR([.Y158]=&quot;REVIEWED — NO AUTHORITY&quot;;[.Y158]=&quot;REVIEW DEFERRED&quot;;[.Y158]=&quot;REVIEW BLOCKED&quot;);&quot;ACCEPTED INTAKE — NO AUTHORITY&quot;;&quot;BLOCKED — NONCANONICAL OUTCOME&quot;)))">
            <text:p>UNKNOWN</text:p>
          </table:table-cell>
          <table:table-cell office:value-type="string" table:formula="of:=IF([.Z158]=&quot;UNKNOWN&quot;;&quot;NO REVIEW OUTCOME ASSERTED — REMAINS UNKNOWN&quot;;IF([.Z158]=&quot;BLOCKED — OUTCOME ASSERTED WITHOUT REVIEW ELIGIBILITY&quot;;&quot;REMOVE OR CORRECT OUTCOME ASSERTION — REVIEW ELIGIBILITY REQUIRED FIRST&quot;;IF([.Z158]=&quot;BLOCKED — NONCANONICAL OUTCOME&quot;;&quot;CORRECT OUTCOME TO CANONICAL CONTROLLED VOCABULARY&quot;;IF([.Z15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8]=&quot;UNKNOWN&quot;;&quot;UNKNOWN&quot;;IF(OR([.Z158]=&quot;BLOCKED — OUTCOME ASSERTED WITHOUT REVIEW ELIGIBILITY&quot;;[.Z158]=&quot;BLOCKED — NONCANONICAL OUTCOME&quot;);&quot;BLOCKED&quot;;IF([.Z15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cell office:value-type="string" table:formula="of:=IF([.U159]=&quot;UNKNOWN&quot;;&quot;COMPLETE OR ASSERT REQUIRED EVIDENCE BEFORE REVIEW&quot;;IF([.U159]=&quot;BLOCKED&quot;;&quot;RESOLVE CONTRADICTION BEFORE REVIEW — NO AUTHORITY CREATED&quot;;IF([.U1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9]=&quot;READY FOR REVIEW&quot;;&quot;REVIEW ELIGIBLE — NO AUTHORITY&quot;;IF(OR([.U159]=&quot;UNKNOWN&quot;;[.U159]=&quot;BLOCKED&quot;);&quot;NOT REVIEW ELIGIBLE&quot;;&quot;NOT REVIEW ELIGIBLE&quot;))">
            <text:p>NOT REVIEW ELIGIBLE</text:p>
          </table:table-cell>
          <table:table-cell office:value-type="string" table:formula="of:=IF([.W159]=&quot;NOT REVIEW ELIGIBLE&quot;;&quot;DO NOT BEGIN SETTLEMENT REVIEW — RESOLVE READINESS OR CONTRADICTION CONDITIONS&quot;;IF([.W1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9]=&quot;&quot;;&quot;UNKNOWN&quot;;IF([.W159]&lt;&gt;&quot;REVIEW ELIGIBLE — NO AUTHORITY&quot;;&quot;BLOCKED — OUTCOME ASSERTED WITHOUT REVIEW ELIGIBILITY&quot;;IF(OR([.Y159]=&quot;REVIEWED — NO AUTHORITY&quot;;[.Y159]=&quot;REVIEW DEFERRED&quot;;[.Y159]=&quot;REVIEW BLOCKED&quot;);&quot;ACCEPTED INTAKE — NO AUTHORITY&quot;;&quot;BLOCKED — NONCANONICAL OUTCOME&quot;)))">
            <text:p>UNKNOWN</text:p>
          </table:table-cell>
          <table:table-cell office:value-type="string" table:formula="of:=IF([.Z159]=&quot;UNKNOWN&quot;;&quot;NO REVIEW OUTCOME ASSERTED — REMAINS UNKNOWN&quot;;IF([.Z159]=&quot;BLOCKED — OUTCOME ASSERTED WITHOUT REVIEW ELIGIBILITY&quot;;&quot;REMOVE OR CORRECT OUTCOME ASSERTION — REVIEW ELIGIBILITY REQUIRED FIRST&quot;;IF([.Z159]=&quot;BLOCKED — NONCANONICAL OUTCOME&quot;;&quot;CORRECT OUTCOME TO CANONICAL CONTROLLED VOCABULARY&quot;;IF([.Z15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59]=&quot;UNKNOWN&quot;;&quot;UNKNOWN&quot;;IF(OR([.Z159]=&quot;BLOCKED — OUTCOME ASSERTED WITHOUT REVIEW ELIGIBILITY&quot;;[.Z159]=&quot;BLOCKED — NONCANONICAL OUTCOME&quot;);&quot;BLOCKED&quot;;IF([.Z15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cell office:value-type="string" table:formula="of:=IF([.U160]=&quot;UNKNOWN&quot;;&quot;COMPLETE OR ASSERT REQUIRED EVIDENCE BEFORE REVIEW&quot;;IF([.U160]=&quot;BLOCKED&quot;;&quot;RESOLVE CONTRADICTION BEFORE REVIEW — NO AUTHORITY CREATED&quot;;IF([.U1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0]=&quot;READY FOR REVIEW&quot;;&quot;REVIEW ELIGIBLE — NO AUTHORITY&quot;;IF(OR([.U160]=&quot;UNKNOWN&quot;;[.U160]=&quot;BLOCKED&quot;);&quot;NOT REVIEW ELIGIBLE&quot;;&quot;NOT REVIEW ELIGIBLE&quot;))">
            <text:p>NOT REVIEW ELIGIBLE</text:p>
          </table:table-cell>
          <table:table-cell office:value-type="string" table:formula="of:=IF([.W160]=&quot;NOT REVIEW ELIGIBLE&quot;;&quot;DO NOT BEGIN SETTLEMENT REVIEW — RESOLVE READINESS OR CONTRADICTION CONDITIONS&quot;;IF([.W1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0]=&quot;&quot;;&quot;UNKNOWN&quot;;IF([.W160]&lt;&gt;&quot;REVIEW ELIGIBLE — NO AUTHORITY&quot;;&quot;BLOCKED — OUTCOME ASSERTED WITHOUT REVIEW ELIGIBILITY&quot;;IF(OR([.Y160]=&quot;REVIEWED — NO AUTHORITY&quot;;[.Y160]=&quot;REVIEW DEFERRED&quot;;[.Y160]=&quot;REVIEW BLOCKED&quot;);&quot;ACCEPTED INTAKE — NO AUTHORITY&quot;;&quot;BLOCKED — NONCANONICAL OUTCOME&quot;)))">
            <text:p>UNKNOWN</text:p>
          </table:table-cell>
          <table:table-cell office:value-type="string" table:formula="of:=IF([.Z160]=&quot;UNKNOWN&quot;;&quot;NO REVIEW OUTCOME ASSERTED — REMAINS UNKNOWN&quot;;IF([.Z160]=&quot;BLOCKED — OUTCOME ASSERTED WITHOUT REVIEW ELIGIBILITY&quot;;&quot;REMOVE OR CORRECT OUTCOME ASSERTION — REVIEW ELIGIBILITY REQUIRED FIRST&quot;;IF([.Z160]=&quot;BLOCKED — NONCANONICAL OUTCOME&quot;;&quot;CORRECT OUTCOME TO CANONICAL CONTROLLED VOCABULARY&quot;;IF([.Z16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0]=&quot;UNKNOWN&quot;;&quot;UNKNOWN&quot;;IF(OR([.Z160]=&quot;BLOCKED — OUTCOME ASSERTED WITHOUT REVIEW ELIGIBILITY&quot;;[.Z160]=&quot;BLOCKED — NONCANONICAL OUTCOME&quot;);&quot;BLOCKED&quot;;IF([.Z16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cell office:value-type="string" table:formula="of:=IF([.U161]=&quot;UNKNOWN&quot;;&quot;COMPLETE OR ASSERT REQUIRED EVIDENCE BEFORE REVIEW&quot;;IF([.U161]=&quot;BLOCKED&quot;;&quot;RESOLVE CONTRADICTION BEFORE REVIEW — NO AUTHORITY CREATED&quot;;IF([.U1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1]=&quot;READY FOR REVIEW&quot;;&quot;REVIEW ELIGIBLE — NO AUTHORITY&quot;;IF(OR([.U161]=&quot;UNKNOWN&quot;;[.U161]=&quot;BLOCKED&quot;);&quot;NOT REVIEW ELIGIBLE&quot;;&quot;NOT REVIEW ELIGIBLE&quot;))">
            <text:p>NOT REVIEW ELIGIBLE</text:p>
          </table:table-cell>
          <table:table-cell office:value-type="string" table:formula="of:=IF([.W161]=&quot;NOT REVIEW ELIGIBLE&quot;;&quot;DO NOT BEGIN SETTLEMENT REVIEW — RESOLVE READINESS OR CONTRADICTION CONDITIONS&quot;;IF([.W1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1]=&quot;&quot;;&quot;UNKNOWN&quot;;IF([.W161]&lt;&gt;&quot;REVIEW ELIGIBLE — NO AUTHORITY&quot;;&quot;BLOCKED — OUTCOME ASSERTED WITHOUT REVIEW ELIGIBILITY&quot;;IF(OR([.Y161]=&quot;REVIEWED — NO AUTHORITY&quot;;[.Y161]=&quot;REVIEW DEFERRED&quot;;[.Y161]=&quot;REVIEW BLOCKED&quot;);&quot;ACCEPTED INTAKE — NO AUTHORITY&quot;;&quot;BLOCKED — NONCANONICAL OUTCOME&quot;)))">
            <text:p>UNKNOWN</text:p>
          </table:table-cell>
          <table:table-cell office:value-type="string" table:formula="of:=IF([.Z161]=&quot;UNKNOWN&quot;;&quot;NO REVIEW OUTCOME ASSERTED — REMAINS UNKNOWN&quot;;IF([.Z161]=&quot;BLOCKED — OUTCOME ASSERTED WITHOUT REVIEW ELIGIBILITY&quot;;&quot;REMOVE OR CORRECT OUTCOME ASSERTION — REVIEW ELIGIBILITY REQUIRED FIRST&quot;;IF([.Z161]=&quot;BLOCKED — NONCANONICAL OUTCOME&quot;;&quot;CORRECT OUTCOME TO CANONICAL CONTROLLED VOCABULARY&quot;;IF([.Z16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1]=&quot;UNKNOWN&quot;;&quot;UNKNOWN&quot;;IF(OR([.Z161]=&quot;BLOCKED — OUTCOME ASSERTED WITHOUT REVIEW ELIGIBILITY&quot;;[.Z161]=&quot;BLOCKED — NONCANONICAL OUTCOME&quot;);&quot;BLOCKED&quot;;IF([.Z16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cell office:value-type="string" table:formula="of:=IF([.U162]=&quot;UNKNOWN&quot;;&quot;COMPLETE OR ASSERT REQUIRED EVIDENCE BEFORE REVIEW&quot;;IF([.U162]=&quot;BLOCKED&quot;;&quot;RESOLVE CONTRADICTION BEFORE REVIEW — NO AUTHORITY CREATED&quot;;IF([.U1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2]=&quot;READY FOR REVIEW&quot;;&quot;REVIEW ELIGIBLE — NO AUTHORITY&quot;;IF(OR([.U162]=&quot;UNKNOWN&quot;;[.U162]=&quot;BLOCKED&quot;);&quot;NOT REVIEW ELIGIBLE&quot;;&quot;NOT REVIEW ELIGIBLE&quot;))">
            <text:p>NOT REVIEW ELIGIBLE</text:p>
          </table:table-cell>
          <table:table-cell office:value-type="string" table:formula="of:=IF([.W162]=&quot;NOT REVIEW ELIGIBLE&quot;;&quot;DO NOT BEGIN SETTLEMENT REVIEW — RESOLVE READINESS OR CONTRADICTION CONDITIONS&quot;;IF([.W1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2]=&quot;&quot;;&quot;UNKNOWN&quot;;IF([.W162]&lt;&gt;&quot;REVIEW ELIGIBLE — NO AUTHORITY&quot;;&quot;BLOCKED — OUTCOME ASSERTED WITHOUT REVIEW ELIGIBILITY&quot;;IF(OR([.Y162]=&quot;REVIEWED — NO AUTHORITY&quot;;[.Y162]=&quot;REVIEW DEFERRED&quot;;[.Y162]=&quot;REVIEW BLOCKED&quot;);&quot;ACCEPTED INTAKE — NO AUTHORITY&quot;;&quot;BLOCKED — NONCANONICAL OUTCOME&quot;)))">
            <text:p>UNKNOWN</text:p>
          </table:table-cell>
          <table:table-cell office:value-type="string" table:formula="of:=IF([.Z162]=&quot;UNKNOWN&quot;;&quot;NO REVIEW OUTCOME ASSERTED — REMAINS UNKNOWN&quot;;IF([.Z162]=&quot;BLOCKED — OUTCOME ASSERTED WITHOUT REVIEW ELIGIBILITY&quot;;&quot;REMOVE OR CORRECT OUTCOME ASSERTION — REVIEW ELIGIBILITY REQUIRED FIRST&quot;;IF([.Z162]=&quot;BLOCKED — NONCANONICAL OUTCOME&quot;;&quot;CORRECT OUTCOME TO CANONICAL CONTROLLED VOCABULARY&quot;;IF([.Z16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2]=&quot;UNKNOWN&quot;;&quot;UNKNOWN&quot;;IF(OR([.Z162]=&quot;BLOCKED — OUTCOME ASSERTED WITHOUT REVIEW ELIGIBILITY&quot;;[.Z162]=&quot;BLOCKED — NONCANONICAL OUTCOME&quot;);&quot;BLOCKED&quot;;IF([.Z16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cell office:value-type="string" table:formula="of:=IF([.U163]=&quot;UNKNOWN&quot;;&quot;COMPLETE OR ASSERT REQUIRED EVIDENCE BEFORE REVIEW&quot;;IF([.U163]=&quot;BLOCKED&quot;;&quot;RESOLVE CONTRADICTION BEFORE REVIEW — NO AUTHORITY CREATED&quot;;IF([.U1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3]=&quot;READY FOR REVIEW&quot;;&quot;REVIEW ELIGIBLE — NO AUTHORITY&quot;;IF(OR([.U163]=&quot;UNKNOWN&quot;;[.U163]=&quot;BLOCKED&quot;);&quot;NOT REVIEW ELIGIBLE&quot;;&quot;NOT REVIEW ELIGIBLE&quot;))">
            <text:p>NOT REVIEW ELIGIBLE</text:p>
          </table:table-cell>
          <table:table-cell office:value-type="string" table:formula="of:=IF([.W163]=&quot;NOT REVIEW ELIGIBLE&quot;;&quot;DO NOT BEGIN SETTLEMENT REVIEW — RESOLVE READINESS OR CONTRADICTION CONDITIONS&quot;;IF([.W1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3]=&quot;&quot;;&quot;UNKNOWN&quot;;IF([.W163]&lt;&gt;&quot;REVIEW ELIGIBLE — NO AUTHORITY&quot;;&quot;BLOCKED — OUTCOME ASSERTED WITHOUT REVIEW ELIGIBILITY&quot;;IF(OR([.Y163]=&quot;REVIEWED — NO AUTHORITY&quot;;[.Y163]=&quot;REVIEW DEFERRED&quot;;[.Y163]=&quot;REVIEW BLOCKED&quot;);&quot;ACCEPTED INTAKE — NO AUTHORITY&quot;;&quot;BLOCKED — NONCANONICAL OUTCOME&quot;)))">
            <text:p>UNKNOWN</text:p>
          </table:table-cell>
          <table:table-cell office:value-type="string" table:formula="of:=IF([.Z163]=&quot;UNKNOWN&quot;;&quot;NO REVIEW OUTCOME ASSERTED — REMAINS UNKNOWN&quot;;IF([.Z163]=&quot;BLOCKED — OUTCOME ASSERTED WITHOUT REVIEW ELIGIBILITY&quot;;&quot;REMOVE OR CORRECT OUTCOME ASSERTION — REVIEW ELIGIBILITY REQUIRED FIRST&quot;;IF([.Z163]=&quot;BLOCKED — NONCANONICAL OUTCOME&quot;;&quot;CORRECT OUTCOME TO CANONICAL CONTROLLED VOCABULARY&quot;;IF([.Z16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3]=&quot;UNKNOWN&quot;;&quot;UNKNOWN&quot;;IF(OR([.Z163]=&quot;BLOCKED — OUTCOME ASSERTED WITHOUT REVIEW ELIGIBILITY&quot;;[.Z163]=&quot;BLOCKED — NONCANONICAL OUTCOME&quot;);&quot;BLOCKED&quot;;IF([.Z16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cell office:value-type="string" table:formula="of:=IF([.U164]=&quot;UNKNOWN&quot;;&quot;COMPLETE OR ASSERT REQUIRED EVIDENCE BEFORE REVIEW&quot;;IF([.U164]=&quot;BLOCKED&quot;;&quot;RESOLVE CONTRADICTION BEFORE REVIEW — NO AUTHORITY CREATED&quot;;IF([.U1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4]=&quot;READY FOR REVIEW&quot;;&quot;REVIEW ELIGIBLE — NO AUTHORITY&quot;;IF(OR([.U164]=&quot;UNKNOWN&quot;;[.U164]=&quot;BLOCKED&quot;);&quot;NOT REVIEW ELIGIBLE&quot;;&quot;NOT REVIEW ELIGIBLE&quot;))">
            <text:p>NOT REVIEW ELIGIBLE</text:p>
          </table:table-cell>
          <table:table-cell office:value-type="string" table:formula="of:=IF([.W164]=&quot;NOT REVIEW ELIGIBLE&quot;;&quot;DO NOT BEGIN SETTLEMENT REVIEW — RESOLVE READINESS OR CONTRADICTION CONDITIONS&quot;;IF([.W1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4]=&quot;&quot;;&quot;UNKNOWN&quot;;IF([.W164]&lt;&gt;&quot;REVIEW ELIGIBLE — NO AUTHORITY&quot;;&quot;BLOCKED — OUTCOME ASSERTED WITHOUT REVIEW ELIGIBILITY&quot;;IF(OR([.Y164]=&quot;REVIEWED — NO AUTHORITY&quot;;[.Y164]=&quot;REVIEW DEFERRED&quot;;[.Y164]=&quot;REVIEW BLOCKED&quot;);&quot;ACCEPTED INTAKE — NO AUTHORITY&quot;;&quot;BLOCKED — NONCANONICAL OUTCOME&quot;)))">
            <text:p>UNKNOWN</text:p>
          </table:table-cell>
          <table:table-cell office:value-type="string" table:formula="of:=IF([.Z164]=&quot;UNKNOWN&quot;;&quot;NO REVIEW OUTCOME ASSERTED — REMAINS UNKNOWN&quot;;IF([.Z164]=&quot;BLOCKED — OUTCOME ASSERTED WITHOUT REVIEW ELIGIBILITY&quot;;&quot;REMOVE OR CORRECT OUTCOME ASSERTION — REVIEW ELIGIBILITY REQUIRED FIRST&quot;;IF([.Z164]=&quot;BLOCKED — NONCANONICAL OUTCOME&quot;;&quot;CORRECT OUTCOME TO CANONICAL CONTROLLED VOCABULARY&quot;;IF([.Z16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4]=&quot;UNKNOWN&quot;;&quot;UNKNOWN&quot;;IF(OR([.Z164]=&quot;BLOCKED — OUTCOME ASSERTED WITHOUT REVIEW ELIGIBILITY&quot;;[.Z164]=&quot;BLOCKED — NONCANONICAL OUTCOME&quot;);&quot;BLOCKED&quot;;IF([.Z16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cell office:value-type="string" table:formula="of:=IF([.U165]=&quot;UNKNOWN&quot;;&quot;COMPLETE OR ASSERT REQUIRED EVIDENCE BEFORE REVIEW&quot;;IF([.U165]=&quot;BLOCKED&quot;;&quot;RESOLVE CONTRADICTION BEFORE REVIEW — NO AUTHORITY CREATED&quot;;IF([.U1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5]=&quot;READY FOR REVIEW&quot;;&quot;REVIEW ELIGIBLE — NO AUTHORITY&quot;;IF(OR([.U165]=&quot;UNKNOWN&quot;;[.U165]=&quot;BLOCKED&quot;);&quot;NOT REVIEW ELIGIBLE&quot;;&quot;NOT REVIEW ELIGIBLE&quot;))">
            <text:p>NOT REVIEW ELIGIBLE</text:p>
          </table:table-cell>
          <table:table-cell office:value-type="string" table:formula="of:=IF([.W165]=&quot;NOT REVIEW ELIGIBLE&quot;;&quot;DO NOT BEGIN SETTLEMENT REVIEW — RESOLVE READINESS OR CONTRADICTION CONDITIONS&quot;;IF([.W1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5]=&quot;&quot;;&quot;UNKNOWN&quot;;IF([.W165]&lt;&gt;&quot;REVIEW ELIGIBLE — NO AUTHORITY&quot;;&quot;BLOCKED — OUTCOME ASSERTED WITHOUT REVIEW ELIGIBILITY&quot;;IF(OR([.Y165]=&quot;REVIEWED — NO AUTHORITY&quot;;[.Y165]=&quot;REVIEW DEFERRED&quot;;[.Y165]=&quot;REVIEW BLOCKED&quot;);&quot;ACCEPTED INTAKE — NO AUTHORITY&quot;;&quot;BLOCKED — NONCANONICAL OUTCOME&quot;)))">
            <text:p>UNKNOWN</text:p>
          </table:table-cell>
          <table:table-cell office:value-type="string" table:formula="of:=IF([.Z165]=&quot;UNKNOWN&quot;;&quot;NO REVIEW OUTCOME ASSERTED — REMAINS UNKNOWN&quot;;IF([.Z165]=&quot;BLOCKED — OUTCOME ASSERTED WITHOUT REVIEW ELIGIBILITY&quot;;&quot;REMOVE OR CORRECT OUTCOME ASSERTION — REVIEW ELIGIBILITY REQUIRED FIRST&quot;;IF([.Z165]=&quot;BLOCKED — NONCANONICAL OUTCOME&quot;;&quot;CORRECT OUTCOME TO CANONICAL CONTROLLED VOCABULARY&quot;;IF([.Z16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5]=&quot;UNKNOWN&quot;;&quot;UNKNOWN&quot;;IF(OR([.Z165]=&quot;BLOCKED — OUTCOME ASSERTED WITHOUT REVIEW ELIGIBILITY&quot;;[.Z165]=&quot;BLOCKED — NONCANONICAL OUTCOME&quot;);&quot;BLOCKED&quot;;IF([.Z16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cell office:value-type="string" table:formula="of:=IF([.U166]=&quot;UNKNOWN&quot;;&quot;COMPLETE OR ASSERT REQUIRED EVIDENCE BEFORE REVIEW&quot;;IF([.U166]=&quot;BLOCKED&quot;;&quot;RESOLVE CONTRADICTION BEFORE REVIEW — NO AUTHORITY CREATED&quot;;IF([.U1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6]=&quot;READY FOR REVIEW&quot;;&quot;REVIEW ELIGIBLE — NO AUTHORITY&quot;;IF(OR([.U166]=&quot;UNKNOWN&quot;;[.U166]=&quot;BLOCKED&quot;);&quot;NOT REVIEW ELIGIBLE&quot;;&quot;NOT REVIEW ELIGIBLE&quot;))">
            <text:p>NOT REVIEW ELIGIBLE</text:p>
          </table:table-cell>
          <table:table-cell office:value-type="string" table:formula="of:=IF([.W166]=&quot;NOT REVIEW ELIGIBLE&quot;;&quot;DO NOT BEGIN SETTLEMENT REVIEW — RESOLVE READINESS OR CONTRADICTION CONDITIONS&quot;;IF([.W1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6]=&quot;&quot;;&quot;UNKNOWN&quot;;IF([.W166]&lt;&gt;&quot;REVIEW ELIGIBLE — NO AUTHORITY&quot;;&quot;BLOCKED — OUTCOME ASSERTED WITHOUT REVIEW ELIGIBILITY&quot;;IF(OR([.Y166]=&quot;REVIEWED — NO AUTHORITY&quot;;[.Y166]=&quot;REVIEW DEFERRED&quot;;[.Y166]=&quot;REVIEW BLOCKED&quot;);&quot;ACCEPTED INTAKE — NO AUTHORITY&quot;;&quot;BLOCKED — NONCANONICAL OUTCOME&quot;)))">
            <text:p>UNKNOWN</text:p>
          </table:table-cell>
          <table:table-cell office:value-type="string" table:formula="of:=IF([.Z166]=&quot;UNKNOWN&quot;;&quot;NO REVIEW OUTCOME ASSERTED — REMAINS UNKNOWN&quot;;IF([.Z166]=&quot;BLOCKED — OUTCOME ASSERTED WITHOUT REVIEW ELIGIBILITY&quot;;&quot;REMOVE OR CORRECT OUTCOME ASSERTION — REVIEW ELIGIBILITY REQUIRED FIRST&quot;;IF([.Z166]=&quot;BLOCKED — NONCANONICAL OUTCOME&quot;;&quot;CORRECT OUTCOME TO CANONICAL CONTROLLED VOCABULARY&quot;;IF([.Z16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6]=&quot;UNKNOWN&quot;;&quot;UNKNOWN&quot;;IF(OR([.Z166]=&quot;BLOCKED — OUTCOME ASSERTED WITHOUT REVIEW ELIGIBILITY&quot;;[.Z166]=&quot;BLOCKED — NONCANONICAL OUTCOME&quot;);&quot;BLOCKED&quot;;IF([.Z16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cell office:value-type="string" table:formula="of:=IF([.U167]=&quot;UNKNOWN&quot;;&quot;COMPLETE OR ASSERT REQUIRED EVIDENCE BEFORE REVIEW&quot;;IF([.U167]=&quot;BLOCKED&quot;;&quot;RESOLVE CONTRADICTION BEFORE REVIEW — NO AUTHORITY CREATED&quot;;IF([.U1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7]=&quot;READY FOR REVIEW&quot;;&quot;REVIEW ELIGIBLE — NO AUTHORITY&quot;;IF(OR([.U167]=&quot;UNKNOWN&quot;;[.U167]=&quot;BLOCKED&quot;);&quot;NOT REVIEW ELIGIBLE&quot;;&quot;NOT REVIEW ELIGIBLE&quot;))">
            <text:p>NOT REVIEW ELIGIBLE</text:p>
          </table:table-cell>
          <table:table-cell office:value-type="string" table:formula="of:=IF([.W167]=&quot;NOT REVIEW ELIGIBLE&quot;;&quot;DO NOT BEGIN SETTLEMENT REVIEW — RESOLVE READINESS OR CONTRADICTION CONDITIONS&quot;;IF([.W1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7]=&quot;&quot;;&quot;UNKNOWN&quot;;IF([.W167]&lt;&gt;&quot;REVIEW ELIGIBLE — NO AUTHORITY&quot;;&quot;BLOCKED — OUTCOME ASSERTED WITHOUT REVIEW ELIGIBILITY&quot;;IF(OR([.Y167]=&quot;REVIEWED — NO AUTHORITY&quot;;[.Y167]=&quot;REVIEW DEFERRED&quot;;[.Y167]=&quot;REVIEW BLOCKED&quot;);&quot;ACCEPTED INTAKE — NO AUTHORITY&quot;;&quot;BLOCKED — NONCANONICAL OUTCOME&quot;)))">
            <text:p>UNKNOWN</text:p>
          </table:table-cell>
          <table:table-cell office:value-type="string" table:formula="of:=IF([.Z167]=&quot;UNKNOWN&quot;;&quot;NO REVIEW OUTCOME ASSERTED — REMAINS UNKNOWN&quot;;IF([.Z167]=&quot;BLOCKED — OUTCOME ASSERTED WITHOUT REVIEW ELIGIBILITY&quot;;&quot;REMOVE OR CORRECT OUTCOME ASSERTION — REVIEW ELIGIBILITY REQUIRED FIRST&quot;;IF([.Z167]=&quot;BLOCKED — NONCANONICAL OUTCOME&quot;;&quot;CORRECT OUTCOME TO CANONICAL CONTROLLED VOCABULARY&quot;;IF([.Z16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7]=&quot;UNKNOWN&quot;;&quot;UNKNOWN&quot;;IF(OR([.Z167]=&quot;BLOCKED — OUTCOME ASSERTED WITHOUT REVIEW ELIGIBILITY&quot;;[.Z167]=&quot;BLOCKED — NONCANONICAL OUTCOME&quot;);&quot;BLOCKED&quot;;IF([.Z16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cell office:value-type="string" table:formula="of:=IF([.U168]=&quot;UNKNOWN&quot;;&quot;COMPLETE OR ASSERT REQUIRED EVIDENCE BEFORE REVIEW&quot;;IF([.U168]=&quot;BLOCKED&quot;;&quot;RESOLVE CONTRADICTION BEFORE REVIEW — NO AUTHORITY CREATED&quot;;IF([.U1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8]=&quot;READY FOR REVIEW&quot;;&quot;REVIEW ELIGIBLE — NO AUTHORITY&quot;;IF(OR([.U168]=&quot;UNKNOWN&quot;;[.U168]=&quot;BLOCKED&quot;);&quot;NOT REVIEW ELIGIBLE&quot;;&quot;NOT REVIEW ELIGIBLE&quot;))">
            <text:p>NOT REVIEW ELIGIBLE</text:p>
          </table:table-cell>
          <table:table-cell office:value-type="string" table:formula="of:=IF([.W168]=&quot;NOT REVIEW ELIGIBLE&quot;;&quot;DO NOT BEGIN SETTLEMENT REVIEW — RESOLVE READINESS OR CONTRADICTION CONDITIONS&quot;;IF([.W1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8]=&quot;&quot;;&quot;UNKNOWN&quot;;IF([.W168]&lt;&gt;&quot;REVIEW ELIGIBLE — NO AUTHORITY&quot;;&quot;BLOCKED — OUTCOME ASSERTED WITHOUT REVIEW ELIGIBILITY&quot;;IF(OR([.Y168]=&quot;REVIEWED — NO AUTHORITY&quot;;[.Y168]=&quot;REVIEW DEFERRED&quot;;[.Y168]=&quot;REVIEW BLOCKED&quot;);&quot;ACCEPTED INTAKE — NO AUTHORITY&quot;;&quot;BLOCKED — NONCANONICAL OUTCOME&quot;)))">
            <text:p>UNKNOWN</text:p>
          </table:table-cell>
          <table:table-cell office:value-type="string" table:formula="of:=IF([.Z168]=&quot;UNKNOWN&quot;;&quot;NO REVIEW OUTCOME ASSERTED — REMAINS UNKNOWN&quot;;IF([.Z168]=&quot;BLOCKED — OUTCOME ASSERTED WITHOUT REVIEW ELIGIBILITY&quot;;&quot;REMOVE OR CORRECT OUTCOME ASSERTION — REVIEW ELIGIBILITY REQUIRED FIRST&quot;;IF([.Z168]=&quot;BLOCKED — NONCANONICAL OUTCOME&quot;;&quot;CORRECT OUTCOME TO CANONICAL CONTROLLED VOCABULARY&quot;;IF([.Z16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8]=&quot;UNKNOWN&quot;;&quot;UNKNOWN&quot;;IF(OR([.Z168]=&quot;BLOCKED — OUTCOME ASSERTED WITHOUT REVIEW ELIGIBILITY&quot;;[.Z168]=&quot;BLOCKED — NONCANONICAL OUTCOME&quot;);&quot;BLOCKED&quot;;IF([.Z16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cell office:value-type="string" table:formula="of:=IF([.U169]=&quot;UNKNOWN&quot;;&quot;COMPLETE OR ASSERT REQUIRED EVIDENCE BEFORE REVIEW&quot;;IF([.U169]=&quot;BLOCKED&quot;;&quot;RESOLVE CONTRADICTION BEFORE REVIEW — NO AUTHORITY CREATED&quot;;IF([.U1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9]=&quot;READY FOR REVIEW&quot;;&quot;REVIEW ELIGIBLE — NO AUTHORITY&quot;;IF(OR([.U169]=&quot;UNKNOWN&quot;;[.U169]=&quot;BLOCKED&quot;);&quot;NOT REVIEW ELIGIBLE&quot;;&quot;NOT REVIEW ELIGIBLE&quot;))">
            <text:p>NOT REVIEW ELIGIBLE</text:p>
          </table:table-cell>
          <table:table-cell office:value-type="string" table:formula="of:=IF([.W169]=&quot;NOT REVIEW ELIGIBLE&quot;;&quot;DO NOT BEGIN SETTLEMENT REVIEW — RESOLVE READINESS OR CONTRADICTION CONDITIONS&quot;;IF([.W1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9]=&quot;&quot;;&quot;UNKNOWN&quot;;IF([.W169]&lt;&gt;&quot;REVIEW ELIGIBLE — NO AUTHORITY&quot;;&quot;BLOCKED — OUTCOME ASSERTED WITHOUT REVIEW ELIGIBILITY&quot;;IF(OR([.Y169]=&quot;REVIEWED — NO AUTHORITY&quot;;[.Y169]=&quot;REVIEW DEFERRED&quot;;[.Y169]=&quot;REVIEW BLOCKED&quot;);&quot;ACCEPTED INTAKE — NO AUTHORITY&quot;;&quot;BLOCKED — NONCANONICAL OUTCOME&quot;)))">
            <text:p>UNKNOWN</text:p>
          </table:table-cell>
          <table:table-cell office:value-type="string" table:formula="of:=IF([.Z169]=&quot;UNKNOWN&quot;;&quot;NO REVIEW OUTCOME ASSERTED — REMAINS UNKNOWN&quot;;IF([.Z169]=&quot;BLOCKED — OUTCOME ASSERTED WITHOUT REVIEW ELIGIBILITY&quot;;&quot;REMOVE OR CORRECT OUTCOME ASSERTION — REVIEW ELIGIBILITY REQUIRED FIRST&quot;;IF([.Z169]=&quot;BLOCKED — NONCANONICAL OUTCOME&quot;;&quot;CORRECT OUTCOME TO CANONICAL CONTROLLED VOCABULARY&quot;;IF([.Z16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69]=&quot;UNKNOWN&quot;;&quot;UNKNOWN&quot;;IF(OR([.Z169]=&quot;BLOCKED — OUTCOME ASSERTED WITHOUT REVIEW ELIGIBILITY&quot;;[.Z169]=&quot;BLOCKED — NONCANONICAL OUTCOME&quot;);&quot;BLOCKED&quot;;IF([.Z16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cell office:value-type="string" table:formula="of:=IF([.U170]=&quot;UNKNOWN&quot;;&quot;COMPLETE OR ASSERT REQUIRED EVIDENCE BEFORE REVIEW&quot;;IF([.U170]=&quot;BLOCKED&quot;;&quot;RESOLVE CONTRADICTION BEFORE REVIEW — NO AUTHORITY CREATED&quot;;IF([.U1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0]=&quot;READY FOR REVIEW&quot;;&quot;REVIEW ELIGIBLE — NO AUTHORITY&quot;;IF(OR([.U170]=&quot;UNKNOWN&quot;;[.U170]=&quot;BLOCKED&quot;);&quot;NOT REVIEW ELIGIBLE&quot;;&quot;NOT REVIEW ELIGIBLE&quot;))">
            <text:p>NOT REVIEW ELIGIBLE</text:p>
          </table:table-cell>
          <table:table-cell office:value-type="string" table:formula="of:=IF([.W170]=&quot;NOT REVIEW ELIGIBLE&quot;;&quot;DO NOT BEGIN SETTLEMENT REVIEW — RESOLVE READINESS OR CONTRADICTION CONDITIONS&quot;;IF([.W1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0]=&quot;&quot;;&quot;UNKNOWN&quot;;IF([.W170]&lt;&gt;&quot;REVIEW ELIGIBLE — NO AUTHORITY&quot;;&quot;BLOCKED — OUTCOME ASSERTED WITHOUT REVIEW ELIGIBILITY&quot;;IF(OR([.Y170]=&quot;REVIEWED — NO AUTHORITY&quot;;[.Y170]=&quot;REVIEW DEFERRED&quot;;[.Y170]=&quot;REVIEW BLOCKED&quot;);&quot;ACCEPTED INTAKE — NO AUTHORITY&quot;;&quot;BLOCKED — NONCANONICAL OUTCOME&quot;)))">
            <text:p>UNKNOWN</text:p>
          </table:table-cell>
          <table:table-cell office:value-type="string" table:formula="of:=IF([.Z170]=&quot;UNKNOWN&quot;;&quot;NO REVIEW OUTCOME ASSERTED — REMAINS UNKNOWN&quot;;IF([.Z170]=&quot;BLOCKED — OUTCOME ASSERTED WITHOUT REVIEW ELIGIBILITY&quot;;&quot;REMOVE OR CORRECT OUTCOME ASSERTION — REVIEW ELIGIBILITY REQUIRED FIRST&quot;;IF([.Z170]=&quot;BLOCKED — NONCANONICAL OUTCOME&quot;;&quot;CORRECT OUTCOME TO CANONICAL CONTROLLED VOCABULARY&quot;;IF([.Z17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0]=&quot;UNKNOWN&quot;;&quot;UNKNOWN&quot;;IF(OR([.Z170]=&quot;BLOCKED — OUTCOME ASSERTED WITHOUT REVIEW ELIGIBILITY&quot;;[.Z170]=&quot;BLOCKED — NONCANONICAL OUTCOME&quot;);&quot;BLOCKED&quot;;IF([.Z17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cell office:value-type="string" table:formula="of:=IF([.U171]=&quot;UNKNOWN&quot;;&quot;COMPLETE OR ASSERT REQUIRED EVIDENCE BEFORE REVIEW&quot;;IF([.U171]=&quot;BLOCKED&quot;;&quot;RESOLVE CONTRADICTION BEFORE REVIEW — NO AUTHORITY CREATED&quot;;IF([.U1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1]=&quot;READY FOR REVIEW&quot;;&quot;REVIEW ELIGIBLE — NO AUTHORITY&quot;;IF(OR([.U171]=&quot;UNKNOWN&quot;;[.U171]=&quot;BLOCKED&quot;);&quot;NOT REVIEW ELIGIBLE&quot;;&quot;NOT REVIEW ELIGIBLE&quot;))">
            <text:p>NOT REVIEW ELIGIBLE</text:p>
          </table:table-cell>
          <table:table-cell office:value-type="string" table:formula="of:=IF([.W171]=&quot;NOT REVIEW ELIGIBLE&quot;;&quot;DO NOT BEGIN SETTLEMENT REVIEW — RESOLVE READINESS OR CONTRADICTION CONDITIONS&quot;;IF([.W1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1]=&quot;&quot;;&quot;UNKNOWN&quot;;IF([.W171]&lt;&gt;&quot;REVIEW ELIGIBLE — NO AUTHORITY&quot;;&quot;BLOCKED — OUTCOME ASSERTED WITHOUT REVIEW ELIGIBILITY&quot;;IF(OR([.Y171]=&quot;REVIEWED — NO AUTHORITY&quot;;[.Y171]=&quot;REVIEW DEFERRED&quot;;[.Y171]=&quot;REVIEW BLOCKED&quot;);&quot;ACCEPTED INTAKE — NO AUTHORITY&quot;;&quot;BLOCKED — NONCANONICAL OUTCOME&quot;)))">
            <text:p>UNKNOWN</text:p>
          </table:table-cell>
          <table:table-cell office:value-type="string" table:formula="of:=IF([.Z171]=&quot;UNKNOWN&quot;;&quot;NO REVIEW OUTCOME ASSERTED — REMAINS UNKNOWN&quot;;IF([.Z171]=&quot;BLOCKED — OUTCOME ASSERTED WITHOUT REVIEW ELIGIBILITY&quot;;&quot;REMOVE OR CORRECT OUTCOME ASSERTION — REVIEW ELIGIBILITY REQUIRED FIRST&quot;;IF([.Z171]=&quot;BLOCKED — NONCANONICAL OUTCOME&quot;;&quot;CORRECT OUTCOME TO CANONICAL CONTROLLED VOCABULARY&quot;;IF([.Z17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1]=&quot;UNKNOWN&quot;;&quot;UNKNOWN&quot;;IF(OR([.Z171]=&quot;BLOCKED — OUTCOME ASSERTED WITHOUT REVIEW ELIGIBILITY&quot;;[.Z171]=&quot;BLOCKED — NONCANONICAL OUTCOME&quot;);&quot;BLOCKED&quot;;IF([.Z17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cell office:value-type="string" table:formula="of:=IF([.U172]=&quot;UNKNOWN&quot;;&quot;COMPLETE OR ASSERT REQUIRED EVIDENCE BEFORE REVIEW&quot;;IF([.U172]=&quot;BLOCKED&quot;;&quot;RESOLVE CONTRADICTION BEFORE REVIEW — NO AUTHORITY CREATED&quot;;IF([.U1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2]=&quot;READY FOR REVIEW&quot;;&quot;REVIEW ELIGIBLE — NO AUTHORITY&quot;;IF(OR([.U172]=&quot;UNKNOWN&quot;;[.U172]=&quot;BLOCKED&quot;);&quot;NOT REVIEW ELIGIBLE&quot;;&quot;NOT REVIEW ELIGIBLE&quot;))">
            <text:p>NOT REVIEW ELIGIBLE</text:p>
          </table:table-cell>
          <table:table-cell office:value-type="string" table:formula="of:=IF([.W172]=&quot;NOT REVIEW ELIGIBLE&quot;;&quot;DO NOT BEGIN SETTLEMENT REVIEW — RESOLVE READINESS OR CONTRADICTION CONDITIONS&quot;;IF([.W1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2]=&quot;&quot;;&quot;UNKNOWN&quot;;IF([.W172]&lt;&gt;&quot;REVIEW ELIGIBLE — NO AUTHORITY&quot;;&quot;BLOCKED — OUTCOME ASSERTED WITHOUT REVIEW ELIGIBILITY&quot;;IF(OR([.Y172]=&quot;REVIEWED — NO AUTHORITY&quot;;[.Y172]=&quot;REVIEW DEFERRED&quot;;[.Y172]=&quot;REVIEW BLOCKED&quot;);&quot;ACCEPTED INTAKE — NO AUTHORITY&quot;;&quot;BLOCKED — NONCANONICAL OUTCOME&quot;)))">
            <text:p>UNKNOWN</text:p>
          </table:table-cell>
          <table:table-cell office:value-type="string" table:formula="of:=IF([.Z172]=&quot;UNKNOWN&quot;;&quot;NO REVIEW OUTCOME ASSERTED — REMAINS UNKNOWN&quot;;IF([.Z172]=&quot;BLOCKED — OUTCOME ASSERTED WITHOUT REVIEW ELIGIBILITY&quot;;&quot;REMOVE OR CORRECT OUTCOME ASSERTION — REVIEW ELIGIBILITY REQUIRED FIRST&quot;;IF([.Z172]=&quot;BLOCKED — NONCANONICAL OUTCOME&quot;;&quot;CORRECT OUTCOME TO CANONICAL CONTROLLED VOCABULARY&quot;;IF([.Z17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2]=&quot;UNKNOWN&quot;;&quot;UNKNOWN&quot;;IF(OR([.Z172]=&quot;BLOCKED — OUTCOME ASSERTED WITHOUT REVIEW ELIGIBILITY&quot;;[.Z172]=&quot;BLOCKED — NONCANONICAL OUTCOME&quot;);&quot;BLOCKED&quot;;IF([.Z17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cell office:value-type="string" table:formula="of:=IF([.U173]=&quot;UNKNOWN&quot;;&quot;COMPLETE OR ASSERT REQUIRED EVIDENCE BEFORE REVIEW&quot;;IF([.U173]=&quot;BLOCKED&quot;;&quot;RESOLVE CONTRADICTION BEFORE REVIEW — NO AUTHORITY CREATED&quot;;IF([.U1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3]=&quot;READY FOR REVIEW&quot;;&quot;REVIEW ELIGIBLE — NO AUTHORITY&quot;;IF(OR([.U173]=&quot;UNKNOWN&quot;;[.U173]=&quot;BLOCKED&quot;);&quot;NOT REVIEW ELIGIBLE&quot;;&quot;NOT REVIEW ELIGIBLE&quot;))">
            <text:p>NOT REVIEW ELIGIBLE</text:p>
          </table:table-cell>
          <table:table-cell office:value-type="string" table:formula="of:=IF([.W173]=&quot;NOT REVIEW ELIGIBLE&quot;;&quot;DO NOT BEGIN SETTLEMENT REVIEW — RESOLVE READINESS OR CONTRADICTION CONDITIONS&quot;;IF([.W1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3]=&quot;&quot;;&quot;UNKNOWN&quot;;IF([.W173]&lt;&gt;&quot;REVIEW ELIGIBLE — NO AUTHORITY&quot;;&quot;BLOCKED — OUTCOME ASSERTED WITHOUT REVIEW ELIGIBILITY&quot;;IF(OR([.Y173]=&quot;REVIEWED — NO AUTHORITY&quot;;[.Y173]=&quot;REVIEW DEFERRED&quot;;[.Y173]=&quot;REVIEW BLOCKED&quot;);&quot;ACCEPTED INTAKE — NO AUTHORITY&quot;;&quot;BLOCKED — NONCANONICAL OUTCOME&quot;)))">
            <text:p>UNKNOWN</text:p>
          </table:table-cell>
          <table:table-cell office:value-type="string" table:formula="of:=IF([.Z173]=&quot;UNKNOWN&quot;;&quot;NO REVIEW OUTCOME ASSERTED — REMAINS UNKNOWN&quot;;IF([.Z173]=&quot;BLOCKED — OUTCOME ASSERTED WITHOUT REVIEW ELIGIBILITY&quot;;&quot;REMOVE OR CORRECT OUTCOME ASSERTION — REVIEW ELIGIBILITY REQUIRED FIRST&quot;;IF([.Z173]=&quot;BLOCKED — NONCANONICAL OUTCOME&quot;;&quot;CORRECT OUTCOME TO CANONICAL CONTROLLED VOCABULARY&quot;;IF([.Z17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3]=&quot;UNKNOWN&quot;;&quot;UNKNOWN&quot;;IF(OR([.Z173]=&quot;BLOCKED — OUTCOME ASSERTED WITHOUT REVIEW ELIGIBILITY&quot;;[.Z173]=&quot;BLOCKED — NONCANONICAL OUTCOME&quot;);&quot;BLOCKED&quot;;IF([.Z17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cell office:value-type="string" table:formula="of:=IF([.U174]=&quot;UNKNOWN&quot;;&quot;COMPLETE OR ASSERT REQUIRED EVIDENCE BEFORE REVIEW&quot;;IF([.U174]=&quot;BLOCKED&quot;;&quot;RESOLVE CONTRADICTION BEFORE REVIEW — NO AUTHORITY CREATED&quot;;IF([.U1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4]=&quot;READY FOR REVIEW&quot;;&quot;REVIEW ELIGIBLE — NO AUTHORITY&quot;;IF(OR([.U174]=&quot;UNKNOWN&quot;;[.U174]=&quot;BLOCKED&quot;);&quot;NOT REVIEW ELIGIBLE&quot;;&quot;NOT REVIEW ELIGIBLE&quot;))">
            <text:p>NOT REVIEW ELIGIBLE</text:p>
          </table:table-cell>
          <table:table-cell office:value-type="string" table:formula="of:=IF([.W174]=&quot;NOT REVIEW ELIGIBLE&quot;;&quot;DO NOT BEGIN SETTLEMENT REVIEW — RESOLVE READINESS OR CONTRADICTION CONDITIONS&quot;;IF([.W1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4]=&quot;&quot;;&quot;UNKNOWN&quot;;IF([.W174]&lt;&gt;&quot;REVIEW ELIGIBLE — NO AUTHORITY&quot;;&quot;BLOCKED — OUTCOME ASSERTED WITHOUT REVIEW ELIGIBILITY&quot;;IF(OR([.Y174]=&quot;REVIEWED — NO AUTHORITY&quot;;[.Y174]=&quot;REVIEW DEFERRED&quot;;[.Y174]=&quot;REVIEW BLOCKED&quot;);&quot;ACCEPTED INTAKE — NO AUTHORITY&quot;;&quot;BLOCKED — NONCANONICAL OUTCOME&quot;)))">
            <text:p>UNKNOWN</text:p>
          </table:table-cell>
          <table:table-cell office:value-type="string" table:formula="of:=IF([.Z174]=&quot;UNKNOWN&quot;;&quot;NO REVIEW OUTCOME ASSERTED — REMAINS UNKNOWN&quot;;IF([.Z174]=&quot;BLOCKED — OUTCOME ASSERTED WITHOUT REVIEW ELIGIBILITY&quot;;&quot;REMOVE OR CORRECT OUTCOME ASSERTION — REVIEW ELIGIBILITY REQUIRED FIRST&quot;;IF([.Z174]=&quot;BLOCKED — NONCANONICAL OUTCOME&quot;;&quot;CORRECT OUTCOME TO CANONICAL CONTROLLED VOCABULARY&quot;;IF([.Z17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4]=&quot;UNKNOWN&quot;;&quot;UNKNOWN&quot;;IF(OR([.Z174]=&quot;BLOCKED — OUTCOME ASSERTED WITHOUT REVIEW ELIGIBILITY&quot;;[.Z174]=&quot;BLOCKED — NONCANONICAL OUTCOME&quot;);&quot;BLOCKED&quot;;IF([.Z17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cell office:value-type="string" table:formula="of:=IF([.U175]=&quot;UNKNOWN&quot;;&quot;COMPLETE OR ASSERT REQUIRED EVIDENCE BEFORE REVIEW&quot;;IF([.U175]=&quot;BLOCKED&quot;;&quot;RESOLVE CONTRADICTION BEFORE REVIEW — NO AUTHORITY CREATED&quot;;IF([.U1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5]=&quot;READY FOR REVIEW&quot;;&quot;REVIEW ELIGIBLE — NO AUTHORITY&quot;;IF(OR([.U175]=&quot;UNKNOWN&quot;;[.U175]=&quot;BLOCKED&quot;);&quot;NOT REVIEW ELIGIBLE&quot;;&quot;NOT REVIEW ELIGIBLE&quot;))">
            <text:p>NOT REVIEW ELIGIBLE</text:p>
          </table:table-cell>
          <table:table-cell office:value-type="string" table:formula="of:=IF([.W175]=&quot;NOT REVIEW ELIGIBLE&quot;;&quot;DO NOT BEGIN SETTLEMENT REVIEW — RESOLVE READINESS OR CONTRADICTION CONDITIONS&quot;;IF([.W1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5]=&quot;&quot;;&quot;UNKNOWN&quot;;IF([.W175]&lt;&gt;&quot;REVIEW ELIGIBLE — NO AUTHORITY&quot;;&quot;BLOCKED — OUTCOME ASSERTED WITHOUT REVIEW ELIGIBILITY&quot;;IF(OR([.Y175]=&quot;REVIEWED — NO AUTHORITY&quot;;[.Y175]=&quot;REVIEW DEFERRED&quot;;[.Y175]=&quot;REVIEW BLOCKED&quot;);&quot;ACCEPTED INTAKE — NO AUTHORITY&quot;;&quot;BLOCKED — NONCANONICAL OUTCOME&quot;)))">
            <text:p>UNKNOWN</text:p>
          </table:table-cell>
          <table:table-cell office:value-type="string" table:formula="of:=IF([.Z175]=&quot;UNKNOWN&quot;;&quot;NO REVIEW OUTCOME ASSERTED — REMAINS UNKNOWN&quot;;IF([.Z175]=&quot;BLOCKED — OUTCOME ASSERTED WITHOUT REVIEW ELIGIBILITY&quot;;&quot;REMOVE OR CORRECT OUTCOME ASSERTION — REVIEW ELIGIBILITY REQUIRED FIRST&quot;;IF([.Z175]=&quot;BLOCKED — NONCANONICAL OUTCOME&quot;;&quot;CORRECT OUTCOME TO CANONICAL CONTROLLED VOCABULARY&quot;;IF([.Z17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5]=&quot;UNKNOWN&quot;;&quot;UNKNOWN&quot;;IF(OR([.Z175]=&quot;BLOCKED — OUTCOME ASSERTED WITHOUT REVIEW ELIGIBILITY&quot;;[.Z175]=&quot;BLOCKED — NONCANONICAL OUTCOME&quot;);&quot;BLOCKED&quot;;IF([.Z17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cell office:value-type="string" table:formula="of:=IF([.U176]=&quot;UNKNOWN&quot;;&quot;COMPLETE OR ASSERT REQUIRED EVIDENCE BEFORE REVIEW&quot;;IF([.U176]=&quot;BLOCKED&quot;;&quot;RESOLVE CONTRADICTION BEFORE REVIEW — NO AUTHORITY CREATED&quot;;IF([.U1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6]=&quot;READY FOR REVIEW&quot;;&quot;REVIEW ELIGIBLE — NO AUTHORITY&quot;;IF(OR([.U176]=&quot;UNKNOWN&quot;;[.U176]=&quot;BLOCKED&quot;);&quot;NOT REVIEW ELIGIBLE&quot;;&quot;NOT REVIEW ELIGIBLE&quot;))">
            <text:p>NOT REVIEW ELIGIBLE</text:p>
          </table:table-cell>
          <table:table-cell office:value-type="string" table:formula="of:=IF([.W176]=&quot;NOT REVIEW ELIGIBLE&quot;;&quot;DO NOT BEGIN SETTLEMENT REVIEW — RESOLVE READINESS OR CONTRADICTION CONDITIONS&quot;;IF([.W1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6]=&quot;&quot;;&quot;UNKNOWN&quot;;IF([.W176]&lt;&gt;&quot;REVIEW ELIGIBLE — NO AUTHORITY&quot;;&quot;BLOCKED — OUTCOME ASSERTED WITHOUT REVIEW ELIGIBILITY&quot;;IF(OR([.Y176]=&quot;REVIEWED — NO AUTHORITY&quot;;[.Y176]=&quot;REVIEW DEFERRED&quot;;[.Y176]=&quot;REVIEW BLOCKED&quot;);&quot;ACCEPTED INTAKE — NO AUTHORITY&quot;;&quot;BLOCKED — NONCANONICAL OUTCOME&quot;)))">
            <text:p>UNKNOWN</text:p>
          </table:table-cell>
          <table:table-cell office:value-type="string" table:formula="of:=IF([.Z176]=&quot;UNKNOWN&quot;;&quot;NO REVIEW OUTCOME ASSERTED — REMAINS UNKNOWN&quot;;IF([.Z176]=&quot;BLOCKED — OUTCOME ASSERTED WITHOUT REVIEW ELIGIBILITY&quot;;&quot;REMOVE OR CORRECT OUTCOME ASSERTION — REVIEW ELIGIBILITY REQUIRED FIRST&quot;;IF([.Z176]=&quot;BLOCKED — NONCANONICAL OUTCOME&quot;;&quot;CORRECT OUTCOME TO CANONICAL CONTROLLED VOCABULARY&quot;;IF([.Z17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6]=&quot;UNKNOWN&quot;;&quot;UNKNOWN&quot;;IF(OR([.Z176]=&quot;BLOCKED — OUTCOME ASSERTED WITHOUT REVIEW ELIGIBILITY&quot;;[.Z176]=&quot;BLOCKED — NONCANONICAL OUTCOME&quot;);&quot;BLOCKED&quot;;IF([.Z17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cell office:value-type="string" table:formula="of:=IF([.U177]=&quot;UNKNOWN&quot;;&quot;COMPLETE OR ASSERT REQUIRED EVIDENCE BEFORE REVIEW&quot;;IF([.U177]=&quot;BLOCKED&quot;;&quot;RESOLVE CONTRADICTION BEFORE REVIEW — NO AUTHORITY CREATED&quot;;IF([.U1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7]=&quot;READY FOR REVIEW&quot;;&quot;REVIEW ELIGIBLE — NO AUTHORITY&quot;;IF(OR([.U177]=&quot;UNKNOWN&quot;;[.U177]=&quot;BLOCKED&quot;);&quot;NOT REVIEW ELIGIBLE&quot;;&quot;NOT REVIEW ELIGIBLE&quot;))">
            <text:p>NOT REVIEW ELIGIBLE</text:p>
          </table:table-cell>
          <table:table-cell office:value-type="string" table:formula="of:=IF([.W177]=&quot;NOT REVIEW ELIGIBLE&quot;;&quot;DO NOT BEGIN SETTLEMENT REVIEW — RESOLVE READINESS OR CONTRADICTION CONDITIONS&quot;;IF([.W1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7]=&quot;&quot;;&quot;UNKNOWN&quot;;IF([.W177]&lt;&gt;&quot;REVIEW ELIGIBLE — NO AUTHORITY&quot;;&quot;BLOCKED — OUTCOME ASSERTED WITHOUT REVIEW ELIGIBILITY&quot;;IF(OR([.Y177]=&quot;REVIEWED — NO AUTHORITY&quot;;[.Y177]=&quot;REVIEW DEFERRED&quot;;[.Y177]=&quot;REVIEW BLOCKED&quot;);&quot;ACCEPTED INTAKE — NO AUTHORITY&quot;;&quot;BLOCKED — NONCANONICAL OUTCOME&quot;)))">
            <text:p>UNKNOWN</text:p>
          </table:table-cell>
          <table:table-cell office:value-type="string" table:formula="of:=IF([.Z177]=&quot;UNKNOWN&quot;;&quot;NO REVIEW OUTCOME ASSERTED — REMAINS UNKNOWN&quot;;IF([.Z177]=&quot;BLOCKED — OUTCOME ASSERTED WITHOUT REVIEW ELIGIBILITY&quot;;&quot;REMOVE OR CORRECT OUTCOME ASSERTION — REVIEW ELIGIBILITY REQUIRED FIRST&quot;;IF([.Z177]=&quot;BLOCKED — NONCANONICAL OUTCOME&quot;;&quot;CORRECT OUTCOME TO CANONICAL CONTROLLED VOCABULARY&quot;;IF([.Z17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7]=&quot;UNKNOWN&quot;;&quot;UNKNOWN&quot;;IF(OR([.Z177]=&quot;BLOCKED — OUTCOME ASSERTED WITHOUT REVIEW ELIGIBILITY&quot;;[.Z177]=&quot;BLOCKED — NONCANONICAL OUTCOME&quot;);&quot;BLOCKED&quot;;IF([.Z17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cell office:value-type="string" table:formula="of:=IF([.U178]=&quot;UNKNOWN&quot;;&quot;COMPLETE OR ASSERT REQUIRED EVIDENCE BEFORE REVIEW&quot;;IF([.U178]=&quot;BLOCKED&quot;;&quot;RESOLVE CONTRADICTION BEFORE REVIEW — NO AUTHORITY CREATED&quot;;IF([.U1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8]=&quot;READY FOR REVIEW&quot;;&quot;REVIEW ELIGIBLE — NO AUTHORITY&quot;;IF(OR([.U178]=&quot;UNKNOWN&quot;;[.U178]=&quot;BLOCKED&quot;);&quot;NOT REVIEW ELIGIBLE&quot;;&quot;NOT REVIEW ELIGIBLE&quot;))">
            <text:p>NOT REVIEW ELIGIBLE</text:p>
          </table:table-cell>
          <table:table-cell office:value-type="string" table:formula="of:=IF([.W178]=&quot;NOT REVIEW ELIGIBLE&quot;;&quot;DO NOT BEGIN SETTLEMENT REVIEW — RESOLVE READINESS OR CONTRADICTION CONDITIONS&quot;;IF([.W1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8]=&quot;&quot;;&quot;UNKNOWN&quot;;IF([.W178]&lt;&gt;&quot;REVIEW ELIGIBLE — NO AUTHORITY&quot;;&quot;BLOCKED — OUTCOME ASSERTED WITHOUT REVIEW ELIGIBILITY&quot;;IF(OR([.Y178]=&quot;REVIEWED — NO AUTHORITY&quot;;[.Y178]=&quot;REVIEW DEFERRED&quot;;[.Y178]=&quot;REVIEW BLOCKED&quot;);&quot;ACCEPTED INTAKE — NO AUTHORITY&quot;;&quot;BLOCKED — NONCANONICAL OUTCOME&quot;)))">
            <text:p>UNKNOWN</text:p>
          </table:table-cell>
          <table:table-cell office:value-type="string" table:formula="of:=IF([.Z178]=&quot;UNKNOWN&quot;;&quot;NO REVIEW OUTCOME ASSERTED — REMAINS UNKNOWN&quot;;IF([.Z178]=&quot;BLOCKED — OUTCOME ASSERTED WITHOUT REVIEW ELIGIBILITY&quot;;&quot;REMOVE OR CORRECT OUTCOME ASSERTION — REVIEW ELIGIBILITY REQUIRED FIRST&quot;;IF([.Z178]=&quot;BLOCKED — NONCANONICAL OUTCOME&quot;;&quot;CORRECT OUTCOME TO CANONICAL CONTROLLED VOCABULARY&quot;;IF([.Z17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8]=&quot;UNKNOWN&quot;;&quot;UNKNOWN&quot;;IF(OR([.Z178]=&quot;BLOCKED — OUTCOME ASSERTED WITHOUT REVIEW ELIGIBILITY&quot;;[.Z178]=&quot;BLOCKED — NONCANONICAL OUTCOME&quot;);&quot;BLOCKED&quot;;IF([.Z17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cell office:value-type="string" table:formula="of:=IF([.U179]=&quot;UNKNOWN&quot;;&quot;COMPLETE OR ASSERT REQUIRED EVIDENCE BEFORE REVIEW&quot;;IF([.U179]=&quot;BLOCKED&quot;;&quot;RESOLVE CONTRADICTION BEFORE REVIEW — NO AUTHORITY CREATED&quot;;IF([.U1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9]=&quot;READY FOR REVIEW&quot;;&quot;REVIEW ELIGIBLE — NO AUTHORITY&quot;;IF(OR([.U179]=&quot;UNKNOWN&quot;;[.U179]=&quot;BLOCKED&quot;);&quot;NOT REVIEW ELIGIBLE&quot;;&quot;NOT REVIEW ELIGIBLE&quot;))">
            <text:p>NOT REVIEW ELIGIBLE</text:p>
          </table:table-cell>
          <table:table-cell office:value-type="string" table:formula="of:=IF([.W179]=&quot;NOT REVIEW ELIGIBLE&quot;;&quot;DO NOT BEGIN SETTLEMENT REVIEW — RESOLVE READINESS OR CONTRADICTION CONDITIONS&quot;;IF([.W1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9]=&quot;&quot;;&quot;UNKNOWN&quot;;IF([.W179]&lt;&gt;&quot;REVIEW ELIGIBLE — NO AUTHORITY&quot;;&quot;BLOCKED — OUTCOME ASSERTED WITHOUT REVIEW ELIGIBILITY&quot;;IF(OR([.Y179]=&quot;REVIEWED — NO AUTHORITY&quot;;[.Y179]=&quot;REVIEW DEFERRED&quot;;[.Y179]=&quot;REVIEW BLOCKED&quot;);&quot;ACCEPTED INTAKE — NO AUTHORITY&quot;;&quot;BLOCKED — NONCANONICAL OUTCOME&quot;)))">
            <text:p>UNKNOWN</text:p>
          </table:table-cell>
          <table:table-cell office:value-type="string" table:formula="of:=IF([.Z179]=&quot;UNKNOWN&quot;;&quot;NO REVIEW OUTCOME ASSERTED — REMAINS UNKNOWN&quot;;IF([.Z179]=&quot;BLOCKED — OUTCOME ASSERTED WITHOUT REVIEW ELIGIBILITY&quot;;&quot;REMOVE OR CORRECT OUTCOME ASSERTION — REVIEW ELIGIBILITY REQUIRED FIRST&quot;;IF([.Z179]=&quot;BLOCKED — NONCANONICAL OUTCOME&quot;;&quot;CORRECT OUTCOME TO CANONICAL CONTROLLED VOCABULARY&quot;;IF([.Z17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79]=&quot;UNKNOWN&quot;;&quot;UNKNOWN&quot;;IF(OR([.Z179]=&quot;BLOCKED — OUTCOME ASSERTED WITHOUT REVIEW ELIGIBILITY&quot;;[.Z179]=&quot;BLOCKED — NONCANONICAL OUTCOME&quot;);&quot;BLOCKED&quot;;IF([.Z17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cell office:value-type="string" table:formula="of:=IF([.U180]=&quot;UNKNOWN&quot;;&quot;COMPLETE OR ASSERT REQUIRED EVIDENCE BEFORE REVIEW&quot;;IF([.U180]=&quot;BLOCKED&quot;;&quot;RESOLVE CONTRADICTION BEFORE REVIEW — NO AUTHORITY CREATED&quot;;IF([.U1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0]=&quot;READY FOR REVIEW&quot;;&quot;REVIEW ELIGIBLE — NO AUTHORITY&quot;;IF(OR([.U180]=&quot;UNKNOWN&quot;;[.U180]=&quot;BLOCKED&quot;);&quot;NOT REVIEW ELIGIBLE&quot;;&quot;NOT REVIEW ELIGIBLE&quot;))">
            <text:p>NOT REVIEW ELIGIBLE</text:p>
          </table:table-cell>
          <table:table-cell office:value-type="string" table:formula="of:=IF([.W180]=&quot;NOT REVIEW ELIGIBLE&quot;;&quot;DO NOT BEGIN SETTLEMENT REVIEW — RESOLVE READINESS OR CONTRADICTION CONDITIONS&quot;;IF([.W1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0]=&quot;&quot;;&quot;UNKNOWN&quot;;IF([.W180]&lt;&gt;&quot;REVIEW ELIGIBLE — NO AUTHORITY&quot;;&quot;BLOCKED — OUTCOME ASSERTED WITHOUT REVIEW ELIGIBILITY&quot;;IF(OR([.Y180]=&quot;REVIEWED — NO AUTHORITY&quot;;[.Y180]=&quot;REVIEW DEFERRED&quot;;[.Y180]=&quot;REVIEW BLOCKED&quot;);&quot;ACCEPTED INTAKE — NO AUTHORITY&quot;;&quot;BLOCKED — NONCANONICAL OUTCOME&quot;)))">
            <text:p>UNKNOWN</text:p>
          </table:table-cell>
          <table:table-cell office:value-type="string" table:formula="of:=IF([.Z180]=&quot;UNKNOWN&quot;;&quot;NO REVIEW OUTCOME ASSERTED — REMAINS UNKNOWN&quot;;IF([.Z180]=&quot;BLOCKED — OUTCOME ASSERTED WITHOUT REVIEW ELIGIBILITY&quot;;&quot;REMOVE OR CORRECT OUTCOME ASSERTION — REVIEW ELIGIBILITY REQUIRED FIRST&quot;;IF([.Z180]=&quot;BLOCKED — NONCANONICAL OUTCOME&quot;;&quot;CORRECT OUTCOME TO CANONICAL CONTROLLED VOCABULARY&quot;;IF([.Z18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0]=&quot;UNKNOWN&quot;;&quot;UNKNOWN&quot;;IF(OR([.Z180]=&quot;BLOCKED — OUTCOME ASSERTED WITHOUT REVIEW ELIGIBILITY&quot;;[.Z180]=&quot;BLOCKED — NONCANONICAL OUTCOME&quot;);&quot;BLOCKED&quot;;IF([.Z18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cell office:value-type="string" table:formula="of:=IF([.U181]=&quot;UNKNOWN&quot;;&quot;COMPLETE OR ASSERT REQUIRED EVIDENCE BEFORE REVIEW&quot;;IF([.U181]=&quot;BLOCKED&quot;;&quot;RESOLVE CONTRADICTION BEFORE REVIEW — NO AUTHORITY CREATED&quot;;IF([.U1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1]=&quot;READY FOR REVIEW&quot;;&quot;REVIEW ELIGIBLE — NO AUTHORITY&quot;;IF(OR([.U181]=&quot;UNKNOWN&quot;;[.U181]=&quot;BLOCKED&quot;);&quot;NOT REVIEW ELIGIBLE&quot;;&quot;NOT REVIEW ELIGIBLE&quot;))">
            <text:p>NOT REVIEW ELIGIBLE</text:p>
          </table:table-cell>
          <table:table-cell office:value-type="string" table:formula="of:=IF([.W181]=&quot;NOT REVIEW ELIGIBLE&quot;;&quot;DO NOT BEGIN SETTLEMENT REVIEW — RESOLVE READINESS OR CONTRADICTION CONDITIONS&quot;;IF([.W1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1]=&quot;&quot;;&quot;UNKNOWN&quot;;IF([.W181]&lt;&gt;&quot;REVIEW ELIGIBLE — NO AUTHORITY&quot;;&quot;BLOCKED — OUTCOME ASSERTED WITHOUT REVIEW ELIGIBILITY&quot;;IF(OR([.Y181]=&quot;REVIEWED — NO AUTHORITY&quot;;[.Y181]=&quot;REVIEW DEFERRED&quot;;[.Y181]=&quot;REVIEW BLOCKED&quot;);&quot;ACCEPTED INTAKE — NO AUTHORITY&quot;;&quot;BLOCKED — NONCANONICAL OUTCOME&quot;)))">
            <text:p>UNKNOWN</text:p>
          </table:table-cell>
          <table:table-cell office:value-type="string" table:formula="of:=IF([.Z181]=&quot;UNKNOWN&quot;;&quot;NO REVIEW OUTCOME ASSERTED — REMAINS UNKNOWN&quot;;IF([.Z181]=&quot;BLOCKED — OUTCOME ASSERTED WITHOUT REVIEW ELIGIBILITY&quot;;&quot;REMOVE OR CORRECT OUTCOME ASSERTION — REVIEW ELIGIBILITY REQUIRED FIRST&quot;;IF([.Z181]=&quot;BLOCKED — NONCANONICAL OUTCOME&quot;;&quot;CORRECT OUTCOME TO CANONICAL CONTROLLED VOCABULARY&quot;;IF([.Z18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1]=&quot;UNKNOWN&quot;;&quot;UNKNOWN&quot;;IF(OR([.Z181]=&quot;BLOCKED — OUTCOME ASSERTED WITHOUT REVIEW ELIGIBILITY&quot;;[.Z181]=&quot;BLOCKED — NONCANONICAL OUTCOME&quot;);&quot;BLOCKED&quot;;IF([.Z18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cell office:value-type="string" table:formula="of:=IF([.U182]=&quot;UNKNOWN&quot;;&quot;COMPLETE OR ASSERT REQUIRED EVIDENCE BEFORE REVIEW&quot;;IF([.U182]=&quot;BLOCKED&quot;;&quot;RESOLVE CONTRADICTION BEFORE REVIEW — NO AUTHORITY CREATED&quot;;IF([.U1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2]=&quot;READY FOR REVIEW&quot;;&quot;REVIEW ELIGIBLE — NO AUTHORITY&quot;;IF(OR([.U182]=&quot;UNKNOWN&quot;;[.U182]=&quot;BLOCKED&quot;);&quot;NOT REVIEW ELIGIBLE&quot;;&quot;NOT REVIEW ELIGIBLE&quot;))">
            <text:p>NOT REVIEW ELIGIBLE</text:p>
          </table:table-cell>
          <table:table-cell office:value-type="string" table:formula="of:=IF([.W182]=&quot;NOT REVIEW ELIGIBLE&quot;;&quot;DO NOT BEGIN SETTLEMENT REVIEW — RESOLVE READINESS OR CONTRADICTION CONDITIONS&quot;;IF([.W1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2]=&quot;&quot;;&quot;UNKNOWN&quot;;IF([.W182]&lt;&gt;&quot;REVIEW ELIGIBLE — NO AUTHORITY&quot;;&quot;BLOCKED — OUTCOME ASSERTED WITHOUT REVIEW ELIGIBILITY&quot;;IF(OR([.Y182]=&quot;REVIEWED — NO AUTHORITY&quot;;[.Y182]=&quot;REVIEW DEFERRED&quot;;[.Y182]=&quot;REVIEW BLOCKED&quot;);&quot;ACCEPTED INTAKE — NO AUTHORITY&quot;;&quot;BLOCKED — NONCANONICAL OUTCOME&quot;)))">
            <text:p>UNKNOWN</text:p>
          </table:table-cell>
          <table:table-cell office:value-type="string" table:formula="of:=IF([.Z182]=&quot;UNKNOWN&quot;;&quot;NO REVIEW OUTCOME ASSERTED — REMAINS UNKNOWN&quot;;IF([.Z182]=&quot;BLOCKED — OUTCOME ASSERTED WITHOUT REVIEW ELIGIBILITY&quot;;&quot;REMOVE OR CORRECT OUTCOME ASSERTION — REVIEW ELIGIBILITY REQUIRED FIRST&quot;;IF([.Z182]=&quot;BLOCKED — NONCANONICAL OUTCOME&quot;;&quot;CORRECT OUTCOME TO CANONICAL CONTROLLED VOCABULARY&quot;;IF([.Z18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2]=&quot;UNKNOWN&quot;;&quot;UNKNOWN&quot;;IF(OR([.Z182]=&quot;BLOCKED — OUTCOME ASSERTED WITHOUT REVIEW ELIGIBILITY&quot;;[.Z182]=&quot;BLOCKED — NONCANONICAL OUTCOME&quot;);&quot;BLOCKED&quot;;IF([.Z18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cell office:value-type="string" table:formula="of:=IF([.U183]=&quot;UNKNOWN&quot;;&quot;COMPLETE OR ASSERT REQUIRED EVIDENCE BEFORE REVIEW&quot;;IF([.U183]=&quot;BLOCKED&quot;;&quot;RESOLVE CONTRADICTION BEFORE REVIEW — NO AUTHORITY CREATED&quot;;IF([.U1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3]=&quot;READY FOR REVIEW&quot;;&quot;REVIEW ELIGIBLE — NO AUTHORITY&quot;;IF(OR([.U183]=&quot;UNKNOWN&quot;;[.U183]=&quot;BLOCKED&quot;);&quot;NOT REVIEW ELIGIBLE&quot;;&quot;NOT REVIEW ELIGIBLE&quot;))">
            <text:p>NOT REVIEW ELIGIBLE</text:p>
          </table:table-cell>
          <table:table-cell office:value-type="string" table:formula="of:=IF([.W183]=&quot;NOT REVIEW ELIGIBLE&quot;;&quot;DO NOT BEGIN SETTLEMENT REVIEW — RESOLVE READINESS OR CONTRADICTION CONDITIONS&quot;;IF([.W1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3]=&quot;&quot;;&quot;UNKNOWN&quot;;IF([.W183]&lt;&gt;&quot;REVIEW ELIGIBLE — NO AUTHORITY&quot;;&quot;BLOCKED — OUTCOME ASSERTED WITHOUT REVIEW ELIGIBILITY&quot;;IF(OR([.Y183]=&quot;REVIEWED — NO AUTHORITY&quot;;[.Y183]=&quot;REVIEW DEFERRED&quot;;[.Y183]=&quot;REVIEW BLOCKED&quot;);&quot;ACCEPTED INTAKE — NO AUTHORITY&quot;;&quot;BLOCKED — NONCANONICAL OUTCOME&quot;)))">
            <text:p>UNKNOWN</text:p>
          </table:table-cell>
          <table:table-cell office:value-type="string" table:formula="of:=IF([.Z183]=&quot;UNKNOWN&quot;;&quot;NO REVIEW OUTCOME ASSERTED — REMAINS UNKNOWN&quot;;IF([.Z183]=&quot;BLOCKED — OUTCOME ASSERTED WITHOUT REVIEW ELIGIBILITY&quot;;&quot;REMOVE OR CORRECT OUTCOME ASSERTION — REVIEW ELIGIBILITY REQUIRED FIRST&quot;;IF([.Z183]=&quot;BLOCKED — NONCANONICAL OUTCOME&quot;;&quot;CORRECT OUTCOME TO CANONICAL CONTROLLED VOCABULARY&quot;;IF([.Z18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3]=&quot;UNKNOWN&quot;;&quot;UNKNOWN&quot;;IF(OR([.Z183]=&quot;BLOCKED — OUTCOME ASSERTED WITHOUT REVIEW ELIGIBILITY&quot;;[.Z183]=&quot;BLOCKED — NONCANONICAL OUTCOME&quot;);&quot;BLOCKED&quot;;IF([.Z18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cell office:value-type="string" table:formula="of:=IF([.U184]=&quot;UNKNOWN&quot;;&quot;COMPLETE OR ASSERT REQUIRED EVIDENCE BEFORE REVIEW&quot;;IF([.U184]=&quot;BLOCKED&quot;;&quot;RESOLVE CONTRADICTION BEFORE REVIEW — NO AUTHORITY CREATED&quot;;IF([.U1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4]=&quot;READY FOR REVIEW&quot;;&quot;REVIEW ELIGIBLE — NO AUTHORITY&quot;;IF(OR([.U184]=&quot;UNKNOWN&quot;;[.U184]=&quot;BLOCKED&quot;);&quot;NOT REVIEW ELIGIBLE&quot;;&quot;NOT REVIEW ELIGIBLE&quot;))">
            <text:p>NOT REVIEW ELIGIBLE</text:p>
          </table:table-cell>
          <table:table-cell office:value-type="string" table:formula="of:=IF([.W184]=&quot;NOT REVIEW ELIGIBLE&quot;;&quot;DO NOT BEGIN SETTLEMENT REVIEW — RESOLVE READINESS OR CONTRADICTION CONDITIONS&quot;;IF([.W1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4]=&quot;&quot;;&quot;UNKNOWN&quot;;IF([.W184]&lt;&gt;&quot;REVIEW ELIGIBLE — NO AUTHORITY&quot;;&quot;BLOCKED — OUTCOME ASSERTED WITHOUT REVIEW ELIGIBILITY&quot;;IF(OR([.Y184]=&quot;REVIEWED — NO AUTHORITY&quot;;[.Y184]=&quot;REVIEW DEFERRED&quot;;[.Y184]=&quot;REVIEW BLOCKED&quot;);&quot;ACCEPTED INTAKE — NO AUTHORITY&quot;;&quot;BLOCKED — NONCANONICAL OUTCOME&quot;)))">
            <text:p>UNKNOWN</text:p>
          </table:table-cell>
          <table:table-cell office:value-type="string" table:formula="of:=IF([.Z184]=&quot;UNKNOWN&quot;;&quot;NO REVIEW OUTCOME ASSERTED — REMAINS UNKNOWN&quot;;IF([.Z184]=&quot;BLOCKED — OUTCOME ASSERTED WITHOUT REVIEW ELIGIBILITY&quot;;&quot;REMOVE OR CORRECT OUTCOME ASSERTION — REVIEW ELIGIBILITY REQUIRED FIRST&quot;;IF([.Z184]=&quot;BLOCKED — NONCANONICAL OUTCOME&quot;;&quot;CORRECT OUTCOME TO CANONICAL CONTROLLED VOCABULARY&quot;;IF([.Z18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4]=&quot;UNKNOWN&quot;;&quot;UNKNOWN&quot;;IF(OR([.Z184]=&quot;BLOCKED — OUTCOME ASSERTED WITHOUT REVIEW ELIGIBILITY&quot;;[.Z184]=&quot;BLOCKED — NONCANONICAL OUTCOME&quot;);&quot;BLOCKED&quot;;IF([.Z18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cell office:value-type="string" table:formula="of:=IF([.U185]=&quot;UNKNOWN&quot;;&quot;COMPLETE OR ASSERT REQUIRED EVIDENCE BEFORE REVIEW&quot;;IF([.U185]=&quot;BLOCKED&quot;;&quot;RESOLVE CONTRADICTION BEFORE REVIEW — NO AUTHORITY CREATED&quot;;IF([.U1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5]=&quot;READY FOR REVIEW&quot;;&quot;REVIEW ELIGIBLE — NO AUTHORITY&quot;;IF(OR([.U185]=&quot;UNKNOWN&quot;;[.U185]=&quot;BLOCKED&quot;);&quot;NOT REVIEW ELIGIBLE&quot;;&quot;NOT REVIEW ELIGIBLE&quot;))">
            <text:p>NOT REVIEW ELIGIBLE</text:p>
          </table:table-cell>
          <table:table-cell office:value-type="string" table:formula="of:=IF([.W185]=&quot;NOT REVIEW ELIGIBLE&quot;;&quot;DO NOT BEGIN SETTLEMENT REVIEW — RESOLVE READINESS OR CONTRADICTION CONDITIONS&quot;;IF([.W1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5]=&quot;&quot;;&quot;UNKNOWN&quot;;IF([.W185]&lt;&gt;&quot;REVIEW ELIGIBLE — NO AUTHORITY&quot;;&quot;BLOCKED — OUTCOME ASSERTED WITHOUT REVIEW ELIGIBILITY&quot;;IF(OR([.Y185]=&quot;REVIEWED — NO AUTHORITY&quot;;[.Y185]=&quot;REVIEW DEFERRED&quot;;[.Y185]=&quot;REVIEW BLOCKED&quot;);&quot;ACCEPTED INTAKE — NO AUTHORITY&quot;;&quot;BLOCKED — NONCANONICAL OUTCOME&quot;)))">
            <text:p>UNKNOWN</text:p>
          </table:table-cell>
          <table:table-cell office:value-type="string" table:formula="of:=IF([.Z185]=&quot;UNKNOWN&quot;;&quot;NO REVIEW OUTCOME ASSERTED — REMAINS UNKNOWN&quot;;IF([.Z185]=&quot;BLOCKED — OUTCOME ASSERTED WITHOUT REVIEW ELIGIBILITY&quot;;&quot;REMOVE OR CORRECT OUTCOME ASSERTION — REVIEW ELIGIBILITY REQUIRED FIRST&quot;;IF([.Z185]=&quot;BLOCKED — NONCANONICAL OUTCOME&quot;;&quot;CORRECT OUTCOME TO CANONICAL CONTROLLED VOCABULARY&quot;;IF([.Z18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5]=&quot;UNKNOWN&quot;;&quot;UNKNOWN&quot;;IF(OR([.Z185]=&quot;BLOCKED — OUTCOME ASSERTED WITHOUT REVIEW ELIGIBILITY&quot;;[.Z185]=&quot;BLOCKED — NONCANONICAL OUTCOME&quot;);&quot;BLOCKED&quot;;IF([.Z18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cell office:value-type="string" table:formula="of:=IF([.U186]=&quot;UNKNOWN&quot;;&quot;COMPLETE OR ASSERT REQUIRED EVIDENCE BEFORE REVIEW&quot;;IF([.U186]=&quot;BLOCKED&quot;;&quot;RESOLVE CONTRADICTION BEFORE REVIEW — NO AUTHORITY CREATED&quot;;IF([.U1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6]=&quot;READY FOR REVIEW&quot;;&quot;REVIEW ELIGIBLE — NO AUTHORITY&quot;;IF(OR([.U186]=&quot;UNKNOWN&quot;;[.U186]=&quot;BLOCKED&quot;);&quot;NOT REVIEW ELIGIBLE&quot;;&quot;NOT REVIEW ELIGIBLE&quot;))">
            <text:p>NOT REVIEW ELIGIBLE</text:p>
          </table:table-cell>
          <table:table-cell office:value-type="string" table:formula="of:=IF([.W186]=&quot;NOT REVIEW ELIGIBLE&quot;;&quot;DO NOT BEGIN SETTLEMENT REVIEW — RESOLVE READINESS OR CONTRADICTION CONDITIONS&quot;;IF([.W1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6]=&quot;&quot;;&quot;UNKNOWN&quot;;IF([.W186]&lt;&gt;&quot;REVIEW ELIGIBLE — NO AUTHORITY&quot;;&quot;BLOCKED — OUTCOME ASSERTED WITHOUT REVIEW ELIGIBILITY&quot;;IF(OR([.Y186]=&quot;REVIEWED — NO AUTHORITY&quot;;[.Y186]=&quot;REVIEW DEFERRED&quot;;[.Y186]=&quot;REVIEW BLOCKED&quot;);&quot;ACCEPTED INTAKE — NO AUTHORITY&quot;;&quot;BLOCKED — NONCANONICAL OUTCOME&quot;)))">
            <text:p>UNKNOWN</text:p>
          </table:table-cell>
          <table:table-cell office:value-type="string" table:formula="of:=IF([.Z186]=&quot;UNKNOWN&quot;;&quot;NO REVIEW OUTCOME ASSERTED — REMAINS UNKNOWN&quot;;IF([.Z186]=&quot;BLOCKED — OUTCOME ASSERTED WITHOUT REVIEW ELIGIBILITY&quot;;&quot;REMOVE OR CORRECT OUTCOME ASSERTION — REVIEW ELIGIBILITY REQUIRED FIRST&quot;;IF([.Z186]=&quot;BLOCKED — NONCANONICAL OUTCOME&quot;;&quot;CORRECT OUTCOME TO CANONICAL CONTROLLED VOCABULARY&quot;;IF([.Z18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6]=&quot;UNKNOWN&quot;;&quot;UNKNOWN&quot;;IF(OR([.Z186]=&quot;BLOCKED — OUTCOME ASSERTED WITHOUT REVIEW ELIGIBILITY&quot;;[.Z186]=&quot;BLOCKED — NONCANONICAL OUTCOME&quot;);&quot;BLOCKED&quot;;IF([.Z18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cell office:value-type="string" table:formula="of:=IF([.U187]=&quot;UNKNOWN&quot;;&quot;COMPLETE OR ASSERT REQUIRED EVIDENCE BEFORE REVIEW&quot;;IF([.U187]=&quot;BLOCKED&quot;;&quot;RESOLVE CONTRADICTION BEFORE REVIEW — NO AUTHORITY CREATED&quot;;IF([.U1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7]=&quot;READY FOR REVIEW&quot;;&quot;REVIEW ELIGIBLE — NO AUTHORITY&quot;;IF(OR([.U187]=&quot;UNKNOWN&quot;;[.U187]=&quot;BLOCKED&quot;);&quot;NOT REVIEW ELIGIBLE&quot;;&quot;NOT REVIEW ELIGIBLE&quot;))">
            <text:p>NOT REVIEW ELIGIBLE</text:p>
          </table:table-cell>
          <table:table-cell office:value-type="string" table:formula="of:=IF([.W187]=&quot;NOT REVIEW ELIGIBLE&quot;;&quot;DO NOT BEGIN SETTLEMENT REVIEW — RESOLVE READINESS OR CONTRADICTION CONDITIONS&quot;;IF([.W1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7]=&quot;&quot;;&quot;UNKNOWN&quot;;IF([.W187]&lt;&gt;&quot;REVIEW ELIGIBLE — NO AUTHORITY&quot;;&quot;BLOCKED — OUTCOME ASSERTED WITHOUT REVIEW ELIGIBILITY&quot;;IF(OR([.Y187]=&quot;REVIEWED — NO AUTHORITY&quot;;[.Y187]=&quot;REVIEW DEFERRED&quot;;[.Y187]=&quot;REVIEW BLOCKED&quot;);&quot;ACCEPTED INTAKE — NO AUTHORITY&quot;;&quot;BLOCKED — NONCANONICAL OUTCOME&quot;)))">
            <text:p>UNKNOWN</text:p>
          </table:table-cell>
          <table:table-cell office:value-type="string" table:formula="of:=IF([.Z187]=&quot;UNKNOWN&quot;;&quot;NO REVIEW OUTCOME ASSERTED — REMAINS UNKNOWN&quot;;IF([.Z187]=&quot;BLOCKED — OUTCOME ASSERTED WITHOUT REVIEW ELIGIBILITY&quot;;&quot;REMOVE OR CORRECT OUTCOME ASSERTION — REVIEW ELIGIBILITY REQUIRED FIRST&quot;;IF([.Z187]=&quot;BLOCKED — NONCANONICAL OUTCOME&quot;;&quot;CORRECT OUTCOME TO CANONICAL CONTROLLED VOCABULARY&quot;;IF([.Z18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7]=&quot;UNKNOWN&quot;;&quot;UNKNOWN&quot;;IF(OR([.Z187]=&quot;BLOCKED — OUTCOME ASSERTED WITHOUT REVIEW ELIGIBILITY&quot;;[.Z187]=&quot;BLOCKED — NONCANONICAL OUTCOME&quot;);&quot;BLOCKED&quot;;IF([.Z18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cell office:value-type="string" table:formula="of:=IF([.U188]=&quot;UNKNOWN&quot;;&quot;COMPLETE OR ASSERT REQUIRED EVIDENCE BEFORE REVIEW&quot;;IF([.U188]=&quot;BLOCKED&quot;;&quot;RESOLVE CONTRADICTION BEFORE REVIEW — NO AUTHORITY CREATED&quot;;IF([.U1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8]=&quot;READY FOR REVIEW&quot;;&quot;REVIEW ELIGIBLE — NO AUTHORITY&quot;;IF(OR([.U188]=&quot;UNKNOWN&quot;;[.U188]=&quot;BLOCKED&quot;);&quot;NOT REVIEW ELIGIBLE&quot;;&quot;NOT REVIEW ELIGIBLE&quot;))">
            <text:p>NOT REVIEW ELIGIBLE</text:p>
          </table:table-cell>
          <table:table-cell office:value-type="string" table:formula="of:=IF([.W188]=&quot;NOT REVIEW ELIGIBLE&quot;;&quot;DO NOT BEGIN SETTLEMENT REVIEW — RESOLVE READINESS OR CONTRADICTION CONDITIONS&quot;;IF([.W1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8]=&quot;&quot;;&quot;UNKNOWN&quot;;IF([.W188]&lt;&gt;&quot;REVIEW ELIGIBLE — NO AUTHORITY&quot;;&quot;BLOCKED — OUTCOME ASSERTED WITHOUT REVIEW ELIGIBILITY&quot;;IF(OR([.Y188]=&quot;REVIEWED — NO AUTHORITY&quot;;[.Y188]=&quot;REVIEW DEFERRED&quot;;[.Y188]=&quot;REVIEW BLOCKED&quot;);&quot;ACCEPTED INTAKE — NO AUTHORITY&quot;;&quot;BLOCKED — NONCANONICAL OUTCOME&quot;)))">
            <text:p>UNKNOWN</text:p>
          </table:table-cell>
          <table:table-cell office:value-type="string" table:formula="of:=IF([.Z188]=&quot;UNKNOWN&quot;;&quot;NO REVIEW OUTCOME ASSERTED — REMAINS UNKNOWN&quot;;IF([.Z188]=&quot;BLOCKED — OUTCOME ASSERTED WITHOUT REVIEW ELIGIBILITY&quot;;&quot;REMOVE OR CORRECT OUTCOME ASSERTION — REVIEW ELIGIBILITY REQUIRED FIRST&quot;;IF([.Z188]=&quot;BLOCKED — NONCANONICAL OUTCOME&quot;;&quot;CORRECT OUTCOME TO CANONICAL CONTROLLED VOCABULARY&quot;;IF([.Z18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8]=&quot;UNKNOWN&quot;;&quot;UNKNOWN&quot;;IF(OR([.Z188]=&quot;BLOCKED — OUTCOME ASSERTED WITHOUT REVIEW ELIGIBILITY&quot;;[.Z188]=&quot;BLOCKED — NONCANONICAL OUTCOME&quot;);&quot;BLOCKED&quot;;IF([.Z18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cell office:value-type="string" table:formula="of:=IF([.U189]=&quot;UNKNOWN&quot;;&quot;COMPLETE OR ASSERT REQUIRED EVIDENCE BEFORE REVIEW&quot;;IF([.U189]=&quot;BLOCKED&quot;;&quot;RESOLVE CONTRADICTION BEFORE REVIEW — NO AUTHORITY CREATED&quot;;IF([.U1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9]=&quot;READY FOR REVIEW&quot;;&quot;REVIEW ELIGIBLE — NO AUTHORITY&quot;;IF(OR([.U189]=&quot;UNKNOWN&quot;;[.U189]=&quot;BLOCKED&quot;);&quot;NOT REVIEW ELIGIBLE&quot;;&quot;NOT REVIEW ELIGIBLE&quot;))">
            <text:p>NOT REVIEW ELIGIBLE</text:p>
          </table:table-cell>
          <table:table-cell office:value-type="string" table:formula="of:=IF([.W189]=&quot;NOT REVIEW ELIGIBLE&quot;;&quot;DO NOT BEGIN SETTLEMENT REVIEW — RESOLVE READINESS OR CONTRADICTION CONDITIONS&quot;;IF([.W1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9]=&quot;&quot;;&quot;UNKNOWN&quot;;IF([.W189]&lt;&gt;&quot;REVIEW ELIGIBLE — NO AUTHORITY&quot;;&quot;BLOCKED — OUTCOME ASSERTED WITHOUT REVIEW ELIGIBILITY&quot;;IF(OR([.Y189]=&quot;REVIEWED — NO AUTHORITY&quot;;[.Y189]=&quot;REVIEW DEFERRED&quot;;[.Y189]=&quot;REVIEW BLOCKED&quot;);&quot;ACCEPTED INTAKE — NO AUTHORITY&quot;;&quot;BLOCKED — NONCANONICAL OUTCOME&quot;)))">
            <text:p>UNKNOWN</text:p>
          </table:table-cell>
          <table:table-cell office:value-type="string" table:formula="of:=IF([.Z189]=&quot;UNKNOWN&quot;;&quot;NO REVIEW OUTCOME ASSERTED — REMAINS UNKNOWN&quot;;IF([.Z189]=&quot;BLOCKED — OUTCOME ASSERTED WITHOUT REVIEW ELIGIBILITY&quot;;&quot;REMOVE OR CORRECT OUTCOME ASSERTION — REVIEW ELIGIBILITY REQUIRED FIRST&quot;;IF([.Z189]=&quot;BLOCKED — NONCANONICAL OUTCOME&quot;;&quot;CORRECT OUTCOME TO CANONICAL CONTROLLED VOCABULARY&quot;;IF([.Z18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89]=&quot;UNKNOWN&quot;;&quot;UNKNOWN&quot;;IF(OR([.Z189]=&quot;BLOCKED — OUTCOME ASSERTED WITHOUT REVIEW ELIGIBILITY&quot;;[.Z189]=&quot;BLOCKED — NONCANONICAL OUTCOME&quot;);&quot;BLOCKED&quot;;IF([.Z18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cell office:value-type="string" table:formula="of:=IF([.U190]=&quot;UNKNOWN&quot;;&quot;COMPLETE OR ASSERT REQUIRED EVIDENCE BEFORE REVIEW&quot;;IF([.U190]=&quot;BLOCKED&quot;;&quot;RESOLVE CONTRADICTION BEFORE REVIEW — NO AUTHORITY CREATED&quot;;IF([.U1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0]=&quot;READY FOR REVIEW&quot;;&quot;REVIEW ELIGIBLE — NO AUTHORITY&quot;;IF(OR([.U190]=&quot;UNKNOWN&quot;;[.U190]=&quot;BLOCKED&quot;);&quot;NOT REVIEW ELIGIBLE&quot;;&quot;NOT REVIEW ELIGIBLE&quot;))">
            <text:p>NOT REVIEW ELIGIBLE</text:p>
          </table:table-cell>
          <table:table-cell office:value-type="string" table:formula="of:=IF([.W190]=&quot;NOT REVIEW ELIGIBLE&quot;;&quot;DO NOT BEGIN SETTLEMENT REVIEW — RESOLVE READINESS OR CONTRADICTION CONDITIONS&quot;;IF([.W1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0]=&quot;&quot;;&quot;UNKNOWN&quot;;IF([.W190]&lt;&gt;&quot;REVIEW ELIGIBLE — NO AUTHORITY&quot;;&quot;BLOCKED — OUTCOME ASSERTED WITHOUT REVIEW ELIGIBILITY&quot;;IF(OR([.Y190]=&quot;REVIEWED — NO AUTHORITY&quot;;[.Y190]=&quot;REVIEW DEFERRED&quot;;[.Y190]=&quot;REVIEW BLOCKED&quot;);&quot;ACCEPTED INTAKE — NO AUTHORITY&quot;;&quot;BLOCKED — NONCANONICAL OUTCOME&quot;)))">
            <text:p>UNKNOWN</text:p>
          </table:table-cell>
          <table:table-cell office:value-type="string" table:formula="of:=IF([.Z190]=&quot;UNKNOWN&quot;;&quot;NO REVIEW OUTCOME ASSERTED — REMAINS UNKNOWN&quot;;IF([.Z190]=&quot;BLOCKED — OUTCOME ASSERTED WITHOUT REVIEW ELIGIBILITY&quot;;&quot;REMOVE OR CORRECT OUTCOME ASSERTION — REVIEW ELIGIBILITY REQUIRED FIRST&quot;;IF([.Z190]=&quot;BLOCKED — NONCANONICAL OUTCOME&quot;;&quot;CORRECT OUTCOME TO CANONICAL CONTROLLED VOCABULARY&quot;;IF([.Z19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0]=&quot;UNKNOWN&quot;;&quot;UNKNOWN&quot;;IF(OR([.Z190]=&quot;BLOCKED — OUTCOME ASSERTED WITHOUT REVIEW ELIGIBILITY&quot;;[.Z190]=&quot;BLOCKED — NONCANONICAL OUTCOME&quot;);&quot;BLOCKED&quot;;IF([.Z19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cell office:value-type="string" table:formula="of:=IF([.U191]=&quot;UNKNOWN&quot;;&quot;COMPLETE OR ASSERT REQUIRED EVIDENCE BEFORE REVIEW&quot;;IF([.U191]=&quot;BLOCKED&quot;;&quot;RESOLVE CONTRADICTION BEFORE REVIEW — NO AUTHORITY CREATED&quot;;IF([.U1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1]=&quot;READY FOR REVIEW&quot;;&quot;REVIEW ELIGIBLE — NO AUTHORITY&quot;;IF(OR([.U191]=&quot;UNKNOWN&quot;;[.U191]=&quot;BLOCKED&quot;);&quot;NOT REVIEW ELIGIBLE&quot;;&quot;NOT REVIEW ELIGIBLE&quot;))">
            <text:p>NOT REVIEW ELIGIBLE</text:p>
          </table:table-cell>
          <table:table-cell office:value-type="string" table:formula="of:=IF([.W191]=&quot;NOT REVIEW ELIGIBLE&quot;;&quot;DO NOT BEGIN SETTLEMENT REVIEW — RESOLVE READINESS OR CONTRADICTION CONDITIONS&quot;;IF([.W1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1]=&quot;&quot;;&quot;UNKNOWN&quot;;IF([.W191]&lt;&gt;&quot;REVIEW ELIGIBLE — NO AUTHORITY&quot;;&quot;BLOCKED — OUTCOME ASSERTED WITHOUT REVIEW ELIGIBILITY&quot;;IF(OR([.Y191]=&quot;REVIEWED — NO AUTHORITY&quot;;[.Y191]=&quot;REVIEW DEFERRED&quot;;[.Y191]=&quot;REVIEW BLOCKED&quot;);&quot;ACCEPTED INTAKE — NO AUTHORITY&quot;;&quot;BLOCKED — NONCANONICAL OUTCOME&quot;)))">
            <text:p>UNKNOWN</text:p>
          </table:table-cell>
          <table:table-cell office:value-type="string" table:formula="of:=IF([.Z191]=&quot;UNKNOWN&quot;;&quot;NO REVIEW OUTCOME ASSERTED — REMAINS UNKNOWN&quot;;IF([.Z191]=&quot;BLOCKED — OUTCOME ASSERTED WITHOUT REVIEW ELIGIBILITY&quot;;&quot;REMOVE OR CORRECT OUTCOME ASSERTION — REVIEW ELIGIBILITY REQUIRED FIRST&quot;;IF([.Z191]=&quot;BLOCKED — NONCANONICAL OUTCOME&quot;;&quot;CORRECT OUTCOME TO CANONICAL CONTROLLED VOCABULARY&quot;;IF([.Z19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1]=&quot;UNKNOWN&quot;;&quot;UNKNOWN&quot;;IF(OR([.Z191]=&quot;BLOCKED — OUTCOME ASSERTED WITHOUT REVIEW ELIGIBILITY&quot;;[.Z191]=&quot;BLOCKED — NONCANONICAL OUTCOME&quot;);&quot;BLOCKED&quot;;IF([.Z19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cell office:value-type="string" table:formula="of:=IF([.U192]=&quot;UNKNOWN&quot;;&quot;COMPLETE OR ASSERT REQUIRED EVIDENCE BEFORE REVIEW&quot;;IF([.U192]=&quot;BLOCKED&quot;;&quot;RESOLVE CONTRADICTION BEFORE REVIEW — NO AUTHORITY CREATED&quot;;IF([.U1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2]=&quot;READY FOR REVIEW&quot;;&quot;REVIEW ELIGIBLE — NO AUTHORITY&quot;;IF(OR([.U192]=&quot;UNKNOWN&quot;;[.U192]=&quot;BLOCKED&quot;);&quot;NOT REVIEW ELIGIBLE&quot;;&quot;NOT REVIEW ELIGIBLE&quot;))">
            <text:p>NOT REVIEW ELIGIBLE</text:p>
          </table:table-cell>
          <table:table-cell office:value-type="string" table:formula="of:=IF([.W192]=&quot;NOT REVIEW ELIGIBLE&quot;;&quot;DO NOT BEGIN SETTLEMENT REVIEW — RESOLVE READINESS OR CONTRADICTION CONDITIONS&quot;;IF([.W1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2]=&quot;&quot;;&quot;UNKNOWN&quot;;IF([.W192]&lt;&gt;&quot;REVIEW ELIGIBLE — NO AUTHORITY&quot;;&quot;BLOCKED — OUTCOME ASSERTED WITHOUT REVIEW ELIGIBILITY&quot;;IF(OR([.Y192]=&quot;REVIEWED — NO AUTHORITY&quot;;[.Y192]=&quot;REVIEW DEFERRED&quot;;[.Y192]=&quot;REVIEW BLOCKED&quot;);&quot;ACCEPTED INTAKE — NO AUTHORITY&quot;;&quot;BLOCKED — NONCANONICAL OUTCOME&quot;)))">
            <text:p>UNKNOWN</text:p>
          </table:table-cell>
          <table:table-cell office:value-type="string" table:formula="of:=IF([.Z192]=&quot;UNKNOWN&quot;;&quot;NO REVIEW OUTCOME ASSERTED — REMAINS UNKNOWN&quot;;IF([.Z192]=&quot;BLOCKED — OUTCOME ASSERTED WITHOUT REVIEW ELIGIBILITY&quot;;&quot;REMOVE OR CORRECT OUTCOME ASSERTION — REVIEW ELIGIBILITY REQUIRED FIRST&quot;;IF([.Z192]=&quot;BLOCKED — NONCANONICAL OUTCOME&quot;;&quot;CORRECT OUTCOME TO CANONICAL CONTROLLED VOCABULARY&quot;;IF([.Z19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2]=&quot;UNKNOWN&quot;;&quot;UNKNOWN&quot;;IF(OR([.Z192]=&quot;BLOCKED — OUTCOME ASSERTED WITHOUT REVIEW ELIGIBILITY&quot;;[.Z192]=&quot;BLOCKED — NONCANONICAL OUTCOME&quot;);&quot;BLOCKED&quot;;IF([.Z19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cell office:value-type="string" table:formula="of:=IF([.U193]=&quot;UNKNOWN&quot;;&quot;COMPLETE OR ASSERT REQUIRED EVIDENCE BEFORE REVIEW&quot;;IF([.U193]=&quot;BLOCKED&quot;;&quot;RESOLVE CONTRADICTION BEFORE REVIEW — NO AUTHORITY CREATED&quot;;IF([.U1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3]=&quot;READY FOR REVIEW&quot;;&quot;REVIEW ELIGIBLE — NO AUTHORITY&quot;;IF(OR([.U193]=&quot;UNKNOWN&quot;;[.U193]=&quot;BLOCKED&quot;);&quot;NOT REVIEW ELIGIBLE&quot;;&quot;NOT REVIEW ELIGIBLE&quot;))">
            <text:p>NOT REVIEW ELIGIBLE</text:p>
          </table:table-cell>
          <table:table-cell office:value-type="string" table:formula="of:=IF([.W193]=&quot;NOT REVIEW ELIGIBLE&quot;;&quot;DO NOT BEGIN SETTLEMENT REVIEW — RESOLVE READINESS OR CONTRADICTION CONDITIONS&quot;;IF([.W1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3]=&quot;&quot;;&quot;UNKNOWN&quot;;IF([.W193]&lt;&gt;&quot;REVIEW ELIGIBLE — NO AUTHORITY&quot;;&quot;BLOCKED — OUTCOME ASSERTED WITHOUT REVIEW ELIGIBILITY&quot;;IF(OR([.Y193]=&quot;REVIEWED — NO AUTHORITY&quot;;[.Y193]=&quot;REVIEW DEFERRED&quot;;[.Y193]=&quot;REVIEW BLOCKED&quot;);&quot;ACCEPTED INTAKE — NO AUTHORITY&quot;;&quot;BLOCKED — NONCANONICAL OUTCOME&quot;)))">
            <text:p>UNKNOWN</text:p>
          </table:table-cell>
          <table:table-cell office:value-type="string" table:formula="of:=IF([.Z193]=&quot;UNKNOWN&quot;;&quot;NO REVIEW OUTCOME ASSERTED — REMAINS UNKNOWN&quot;;IF([.Z193]=&quot;BLOCKED — OUTCOME ASSERTED WITHOUT REVIEW ELIGIBILITY&quot;;&quot;REMOVE OR CORRECT OUTCOME ASSERTION — REVIEW ELIGIBILITY REQUIRED FIRST&quot;;IF([.Z193]=&quot;BLOCKED — NONCANONICAL OUTCOME&quot;;&quot;CORRECT OUTCOME TO CANONICAL CONTROLLED VOCABULARY&quot;;IF([.Z19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3]=&quot;UNKNOWN&quot;;&quot;UNKNOWN&quot;;IF(OR([.Z193]=&quot;BLOCKED — OUTCOME ASSERTED WITHOUT REVIEW ELIGIBILITY&quot;;[.Z193]=&quot;BLOCKED — NONCANONICAL OUTCOME&quot;);&quot;BLOCKED&quot;;IF([.Z19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cell office:value-type="string" table:formula="of:=IF([.U194]=&quot;UNKNOWN&quot;;&quot;COMPLETE OR ASSERT REQUIRED EVIDENCE BEFORE REVIEW&quot;;IF([.U194]=&quot;BLOCKED&quot;;&quot;RESOLVE CONTRADICTION BEFORE REVIEW — NO AUTHORITY CREATED&quot;;IF([.U1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4]=&quot;READY FOR REVIEW&quot;;&quot;REVIEW ELIGIBLE — NO AUTHORITY&quot;;IF(OR([.U194]=&quot;UNKNOWN&quot;;[.U194]=&quot;BLOCKED&quot;);&quot;NOT REVIEW ELIGIBLE&quot;;&quot;NOT REVIEW ELIGIBLE&quot;))">
            <text:p>NOT REVIEW ELIGIBLE</text:p>
          </table:table-cell>
          <table:table-cell office:value-type="string" table:formula="of:=IF([.W194]=&quot;NOT REVIEW ELIGIBLE&quot;;&quot;DO NOT BEGIN SETTLEMENT REVIEW — RESOLVE READINESS OR CONTRADICTION CONDITIONS&quot;;IF([.W1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4]=&quot;&quot;;&quot;UNKNOWN&quot;;IF([.W194]&lt;&gt;&quot;REVIEW ELIGIBLE — NO AUTHORITY&quot;;&quot;BLOCKED — OUTCOME ASSERTED WITHOUT REVIEW ELIGIBILITY&quot;;IF(OR([.Y194]=&quot;REVIEWED — NO AUTHORITY&quot;;[.Y194]=&quot;REVIEW DEFERRED&quot;;[.Y194]=&quot;REVIEW BLOCKED&quot;);&quot;ACCEPTED INTAKE — NO AUTHORITY&quot;;&quot;BLOCKED — NONCANONICAL OUTCOME&quot;)))">
            <text:p>UNKNOWN</text:p>
          </table:table-cell>
          <table:table-cell office:value-type="string" table:formula="of:=IF([.Z194]=&quot;UNKNOWN&quot;;&quot;NO REVIEW OUTCOME ASSERTED — REMAINS UNKNOWN&quot;;IF([.Z194]=&quot;BLOCKED — OUTCOME ASSERTED WITHOUT REVIEW ELIGIBILITY&quot;;&quot;REMOVE OR CORRECT OUTCOME ASSERTION — REVIEW ELIGIBILITY REQUIRED FIRST&quot;;IF([.Z194]=&quot;BLOCKED — NONCANONICAL OUTCOME&quot;;&quot;CORRECT OUTCOME TO CANONICAL CONTROLLED VOCABULARY&quot;;IF([.Z19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4]=&quot;UNKNOWN&quot;;&quot;UNKNOWN&quot;;IF(OR([.Z194]=&quot;BLOCKED — OUTCOME ASSERTED WITHOUT REVIEW ELIGIBILITY&quot;;[.Z194]=&quot;BLOCKED — NONCANONICAL OUTCOME&quot;);&quot;BLOCKED&quot;;IF([.Z19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cell office:value-type="string" table:formula="of:=IF([.U195]=&quot;UNKNOWN&quot;;&quot;COMPLETE OR ASSERT REQUIRED EVIDENCE BEFORE REVIEW&quot;;IF([.U195]=&quot;BLOCKED&quot;;&quot;RESOLVE CONTRADICTION BEFORE REVIEW — NO AUTHORITY CREATED&quot;;IF([.U1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5]=&quot;READY FOR REVIEW&quot;;&quot;REVIEW ELIGIBLE — NO AUTHORITY&quot;;IF(OR([.U195]=&quot;UNKNOWN&quot;;[.U195]=&quot;BLOCKED&quot;);&quot;NOT REVIEW ELIGIBLE&quot;;&quot;NOT REVIEW ELIGIBLE&quot;))">
            <text:p>NOT REVIEW ELIGIBLE</text:p>
          </table:table-cell>
          <table:table-cell office:value-type="string" table:formula="of:=IF([.W195]=&quot;NOT REVIEW ELIGIBLE&quot;;&quot;DO NOT BEGIN SETTLEMENT REVIEW — RESOLVE READINESS OR CONTRADICTION CONDITIONS&quot;;IF([.W1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5]=&quot;&quot;;&quot;UNKNOWN&quot;;IF([.W195]&lt;&gt;&quot;REVIEW ELIGIBLE — NO AUTHORITY&quot;;&quot;BLOCKED — OUTCOME ASSERTED WITHOUT REVIEW ELIGIBILITY&quot;;IF(OR([.Y195]=&quot;REVIEWED — NO AUTHORITY&quot;;[.Y195]=&quot;REVIEW DEFERRED&quot;;[.Y195]=&quot;REVIEW BLOCKED&quot;);&quot;ACCEPTED INTAKE — NO AUTHORITY&quot;;&quot;BLOCKED — NONCANONICAL OUTCOME&quot;)))">
            <text:p>UNKNOWN</text:p>
          </table:table-cell>
          <table:table-cell office:value-type="string" table:formula="of:=IF([.Z195]=&quot;UNKNOWN&quot;;&quot;NO REVIEW OUTCOME ASSERTED — REMAINS UNKNOWN&quot;;IF([.Z195]=&quot;BLOCKED — OUTCOME ASSERTED WITHOUT REVIEW ELIGIBILITY&quot;;&quot;REMOVE OR CORRECT OUTCOME ASSERTION — REVIEW ELIGIBILITY REQUIRED FIRST&quot;;IF([.Z195]=&quot;BLOCKED — NONCANONICAL OUTCOME&quot;;&quot;CORRECT OUTCOME TO CANONICAL CONTROLLED VOCABULARY&quot;;IF([.Z19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5]=&quot;UNKNOWN&quot;;&quot;UNKNOWN&quot;;IF(OR([.Z195]=&quot;BLOCKED — OUTCOME ASSERTED WITHOUT REVIEW ELIGIBILITY&quot;;[.Z195]=&quot;BLOCKED — NONCANONICAL OUTCOME&quot;);&quot;BLOCKED&quot;;IF([.Z19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cell office:value-type="string" table:formula="of:=IF([.U196]=&quot;UNKNOWN&quot;;&quot;COMPLETE OR ASSERT REQUIRED EVIDENCE BEFORE REVIEW&quot;;IF([.U196]=&quot;BLOCKED&quot;;&quot;RESOLVE CONTRADICTION BEFORE REVIEW — NO AUTHORITY CREATED&quot;;IF([.U1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6]=&quot;READY FOR REVIEW&quot;;&quot;REVIEW ELIGIBLE — NO AUTHORITY&quot;;IF(OR([.U196]=&quot;UNKNOWN&quot;;[.U196]=&quot;BLOCKED&quot;);&quot;NOT REVIEW ELIGIBLE&quot;;&quot;NOT REVIEW ELIGIBLE&quot;))">
            <text:p>NOT REVIEW ELIGIBLE</text:p>
          </table:table-cell>
          <table:table-cell office:value-type="string" table:formula="of:=IF([.W196]=&quot;NOT REVIEW ELIGIBLE&quot;;&quot;DO NOT BEGIN SETTLEMENT REVIEW — RESOLVE READINESS OR CONTRADICTION CONDITIONS&quot;;IF([.W1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6]=&quot;&quot;;&quot;UNKNOWN&quot;;IF([.W196]&lt;&gt;&quot;REVIEW ELIGIBLE — NO AUTHORITY&quot;;&quot;BLOCKED — OUTCOME ASSERTED WITHOUT REVIEW ELIGIBILITY&quot;;IF(OR([.Y196]=&quot;REVIEWED — NO AUTHORITY&quot;;[.Y196]=&quot;REVIEW DEFERRED&quot;;[.Y196]=&quot;REVIEW BLOCKED&quot;);&quot;ACCEPTED INTAKE — NO AUTHORITY&quot;;&quot;BLOCKED — NONCANONICAL OUTCOME&quot;)))">
            <text:p>UNKNOWN</text:p>
          </table:table-cell>
          <table:table-cell office:value-type="string" table:formula="of:=IF([.Z196]=&quot;UNKNOWN&quot;;&quot;NO REVIEW OUTCOME ASSERTED — REMAINS UNKNOWN&quot;;IF([.Z196]=&quot;BLOCKED — OUTCOME ASSERTED WITHOUT REVIEW ELIGIBILITY&quot;;&quot;REMOVE OR CORRECT OUTCOME ASSERTION — REVIEW ELIGIBILITY REQUIRED FIRST&quot;;IF([.Z196]=&quot;BLOCKED — NONCANONICAL OUTCOME&quot;;&quot;CORRECT OUTCOME TO CANONICAL CONTROLLED VOCABULARY&quot;;IF([.Z19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6]=&quot;UNKNOWN&quot;;&quot;UNKNOWN&quot;;IF(OR([.Z196]=&quot;BLOCKED — OUTCOME ASSERTED WITHOUT REVIEW ELIGIBILITY&quot;;[.Z196]=&quot;BLOCKED — NONCANONICAL OUTCOME&quot;);&quot;BLOCKED&quot;;IF([.Z19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cell office:value-type="string" table:formula="of:=IF([.U197]=&quot;UNKNOWN&quot;;&quot;COMPLETE OR ASSERT REQUIRED EVIDENCE BEFORE REVIEW&quot;;IF([.U197]=&quot;BLOCKED&quot;;&quot;RESOLVE CONTRADICTION BEFORE REVIEW — NO AUTHORITY CREATED&quot;;IF([.U1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7]=&quot;READY FOR REVIEW&quot;;&quot;REVIEW ELIGIBLE — NO AUTHORITY&quot;;IF(OR([.U197]=&quot;UNKNOWN&quot;;[.U197]=&quot;BLOCKED&quot;);&quot;NOT REVIEW ELIGIBLE&quot;;&quot;NOT REVIEW ELIGIBLE&quot;))">
            <text:p>NOT REVIEW ELIGIBLE</text:p>
          </table:table-cell>
          <table:table-cell office:value-type="string" table:formula="of:=IF([.W197]=&quot;NOT REVIEW ELIGIBLE&quot;;&quot;DO NOT BEGIN SETTLEMENT REVIEW — RESOLVE READINESS OR CONTRADICTION CONDITIONS&quot;;IF([.W1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7]=&quot;&quot;;&quot;UNKNOWN&quot;;IF([.W197]&lt;&gt;&quot;REVIEW ELIGIBLE — NO AUTHORITY&quot;;&quot;BLOCKED — OUTCOME ASSERTED WITHOUT REVIEW ELIGIBILITY&quot;;IF(OR([.Y197]=&quot;REVIEWED — NO AUTHORITY&quot;;[.Y197]=&quot;REVIEW DEFERRED&quot;;[.Y197]=&quot;REVIEW BLOCKED&quot;);&quot;ACCEPTED INTAKE — NO AUTHORITY&quot;;&quot;BLOCKED — NONCANONICAL OUTCOME&quot;)))">
            <text:p>UNKNOWN</text:p>
          </table:table-cell>
          <table:table-cell office:value-type="string" table:formula="of:=IF([.Z197]=&quot;UNKNOWN&quot;;&quot;NO REVIEW OUTCOME ASSERTED — REMAINS UNKNOWN&quot;;IF([.Z197]=&quot;BLOCKED — OUTCOME ASSERTED WITHOUT REVIEW ELIGIBILITY&quot;;&quot;REMOVE OR CORRECT OUTCOME ASSERTION — REVIEW ELIGIBILITY REQUIRED FIRST&quot;;IF([.Z197]=&quot;BLOCKED — NONCANONICAL OUTCOME&quot;;&quot;CORRECT OUTCOME TO CANONICAL CONTROLLED VOCABULARY&quot;;IF([.Z19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7]=&quot;UNKNOWN&quot;;&quot;UNKNOWN&quot;;IF(OR([.Z197]=&quot;BLOCKED — OUTCOME ASSERTED WITHOUT REVIEW ELIGIBILITY&quot;;[.Z197]=&quot;BLOCKED — NONCANONICAL OUTCOME&quot;);&quot;BLOCKED&quot;;IF([.Z19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cell office:value-type="string" table:formula="of:=IF([.U198]=&quot;UNKNOWN&quot;;&quot;COMPLETE OR ASSERT REQUIRED EVIDENCE BEFORE REVIEW&quot;;IF([.U198]=&quot;BLOCKED&quot;;&quot;RESOLVE CONTRADICTION BEFORE REVIEW — NO AUTHORITY CREATED&quot;;IF([.U1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8]=&quot;READY FOR REVIEW&quot;;&quot;REVIEW ELIGIBLE — NO AUTHORITY&quot;;IF(OR([.U198]=&quot;UNKNOWN&quot;;[.U198]=&quot;BLOCKED&quot;);&quot;NOT REVIEW ELIGIBLE&quot;;&quot;NOT REVIEW ELIGIBLE&quot;))">
            <text:p>NOT REVIEW ELIGIBLE</text:p>
          </table:table-cell>
          <table:table-cell office:value-type="string" table:formula="of:=IF([.W198]=&quot;NOT REVIEW ELIGIBLE&quot;;&quot;DO NOT BEGIN SETTLEMENT REVIEW — RESOLVE READINESS OR CONTRADICTION CONDITIONS&quot;;IF([.W1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8]=&quot;&quot;;&quot;UNKNOWN&quot;;IF([.W198]&lt;&gt;&quot;REVIEW ELIGIBLE — NO AUTHORITY&quot;;&quot;BLOCKED — OUTCOME ASSERTED WITHOUT REVIEW ELIGIBILITY&quot;;IF(OR([.Y198]=&quot;REVIEWED — NO AUTHORITY&quot;;[.Y198]=&quot;REVIEW DEFERRED&quot;;[.Y198]=&quot;REVIEW BLOCKED&quot;);&quot;ACCEPTED INTAKE — NO AUTHORITY&quot;;&quot;BLOCKED — NONCANONICAL OUTCOME&quot;)))">
            <text:p>UNKNOWN</text:p>
          </table:table-cell>
          <table:table-cell office:value-type="string" table:formula="of:=IF([.Z198]=&quot;UNKNOWN&quot;;&quot;NO REVIEW OUTCOME ASSERTED — REMAINS UNKNOWN&quot;;IF([.Z198]=&quot;BLOCKED — OUTCOME ASSERTED WITHOUT REVIEW ELIGIBILITY&quot;;&quot;REMOVE OR CORRECT OUTCOME ASSERTION — REVIEW ELIGIBILITY REQUIRED FIRST&quot;;IF([.Z198]=&quot;BLOCKED — NONCANONICAL OUTCOME&quot;;&quot;CORRECT OUTCOME TO CANONICAL CONTROLLED VOCABULARY&quot;;IF([.Z19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8]=&quot;UNKNOWN&quot;;&quot;UNKNOWN&quot;;IF(OR([.Z198]=&quot;BLOCKED — OUTCOME ASSERTED WITHOUT REVIEW ELIGIBILITY&quot;;[.Z198]=&quot;BLOCKED — NONCANONICAL OUTCOME&quot;);&quot;BLOCKED&quot;;IF([.Z19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cell office:value-type="string" table:formula="of:=IF([.U199]=&quot;UNKNOWN&quot;;&quot;COMPLETE OR ASSERT REQUIRED EVIDENCE BEFORE REVIEW&quot;;IF([.U199]=&quot;BLOCKED&quot;;&quot;RESOLVE CONTRADICTION BEFORE REVIEW — NO AUTHORITY CREATED&quot;;IF([.U1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9]=&quot;READY FOR REVIEW&quot;;&quot;REVIEW ELIGIBLE — NO AUTHORITY&quot;;IF(OR([.U199]=&quot;UNKNOWN&quot;;[.U199]=&quot;BLOCKED&quot;);&quot;NOT REVIEW ELIGIBLE&quot;;&quot;NOT REVIEW ELIGIBLE&quot;))">
            <text:p>NOT REVIEW ELIGIBLE</text:p>
          </table:table-cell>
          <table:table-cell office:value-type="string" table:formula="of:=IF([.W199]=&quot;NOT REVIEW ELIGIBLE&quot;;&quot;DO NOT BEGIN SETTLEMENT REVIEW — RESOLVE READINESS OR CONTRADICTION CONDITIONS&quot;;IF([.W1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9]=&quot;&quot;;&quot;UNKNOWN&quot;;IF([.W199]&lt;&gt;&quot;REVIEW ELIGIBLE — NO AUTHORITY&quot;;&quot;BLOCKED — OUTCOME ASSERTED WITHOUT REVIEW ELIGIBILITY&quot;;IF(OR([.Y199]=&quot;REVIEWED — NO AUTHORITY&quot;;[.Y199]=&quot;REVIEW DEFERRED&quot;;[.Y199]=&quot;REVIEW BLOCKED&quot;);&quot;ACCEPTED INTAKE — NO AUTHORITY&quot;;&quot;BLOCKED — NONCANONICAL OUTCOME&quot;)))">
            <text:p>UNKNOWN</text:p>
          </table:table-cell>
          <table:table-cell office:value-type="string" table:formula="of:=IF([.Z199]=&quot;UNKNOWN&quot;;&quot;NO REVIEW OUTCOME ASSERTED — REMAINS UNKNOWN&quot;;IF([.Z199]=&quot;BLOCKED — OUTCOME ASSERTED WITHOUT REVIEW ELIGIBILITY&quot;;&quot;REMOVE OR CORRECT OUTCOME ASSERTION — REVIEW ELIGIBILITY REQUIRED FIRST&quot;;IF([.Z199]=&quot;BLOCKED — NONCANONICAL OUTCOME&quot;;&quot;CORRECT OUTCOME TO CANONICAL CONTROLLED VOCABULARY&quot;;IF([.Z19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199]=&quot;UNKNOWN&quot;;&quot;UNKNOWN&quot;;IF(OR([.Z199]=&quot;BLOCKED — OUTCOME ASSERTED WITHOUT REVIEW ELIGIBILITY&quot;;[.Z199]=&quot;BLOCKED — NONCANONICAL OUTCOME&quot;);&quot;BLOCKED&quot;;IF([.Z19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cell office:value-type="string" table:formula="of:=IF([.U200]=&quot;UNKNOWN&quot;;&quot;COMPLETE OR ASSERT REQUIRED EVIDENCE BEFORE REVIEW&quot;;IF([.U200]=&quot;BLOCKED&quot;;&quot;RESOLVE CONTRADICTION BEFORE REVIEW — NO AUTHORITY CREATED&quot;;IF([.U2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0]=&quot;READY FOR REVIEW&quot;;&quot;REVIEW ELIGIBLE — NO AUTHORITY&quot;;IF(OR([.U200]=&quot;UNKNOWN&quot;;[.U200]=&quot;BLOCKED&quot;);&quot;NOT REVIEW ELIGIBLE&quot;;&quot;NOT REVIEW ELIGIBLE&quot;))">
            <text:p>NOT REVIEW ELIGIBLE</text:p>
          </table:table-cell>
          <table:table-cell office:value-type="string" table:formula="of:=IF([.W200]=&quot;NOT REVIEW ELIGIBLE&quot;;&quot;DO NOT BEGIN SETTLEMENT REVIEW — RESOLVE READINESS OR CONTRADICTION CONDITIONS&quot;;IF([.W2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0]=&quot;&quot;;&quot;UNKNOWN&quot;;IF([.W200]&lt;&gt;&quot;REVIEW ELIGIBLE — NO AUTHORITY&quot;;&quot;BLOCKED — OUTCOME ASSERTED WITHOUT REVIEW ELIGIBILITY&quot;;IF(OR([.Y200]=&quot;REVIEWED — NO AUTHORITY&quot;;[.Y200]=&quot;REVIEW DEFERRED&quot;;[.Y200]=&quot;REVIEW BLOCKED&quot;);&quot;ACCEPTED INTAKE — NO AUTHORITY&quot;;&quot;BLOCKED — NONCANONICAL OUTCOME&quot;)))">
            <text:p>UNKNOWN</text:p>
          </table:table-cell>
          <table:table-cell office:value-type="string" table:formula="of:=IF([.Z200]=&quot;UNKNOWN&quot;;&quot;NO REVIEW OUTCOME ASSERTED — REMAINS UNKNOWN&quot;;IF([.Z200]=&quot;BLOCKED — OUTCOME ASSERTED WITHOUT REVIEW ELIGIBILITY&quot;;&quot;REMOVE OR CORRECT OUTCOME ASSERTION — REVIEW ELIGIBILITY REQUIRED FIRST&quot;;IF([.Z200]=&quot;BLOCKED — NONCANONICAL OUTCOME&quot;;&quot;CORRECT OUTCOME TO CANONICAL CONTROLLED VOCABULARY&quot;;IF([.Z20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0]=&quot;UNKNOWN&quot;;&quot;UNKNOWN&quot;;IF(OR([.Z200]=&quot;BLOCKED — OUTCOME ASSERTED WITHOUT REVIEW ELIGIBILITY&quot;;[.Z200]=&quot;BLOCKED — NONCANONICAL OUTCOME&quot;);&quot;BLOCKED&quot;;IF([.Z20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cell office:value-type="string" table:formula="of:=IF([.U201]=&quot;UNKNOWN&quot;;&quot;COMPLETE OR ASSERT REQUIRED EVIDENCE BEFORE REVIEW&quot;;IF([.U201]=&quot;BLOCKED&quot;;&quot;RESOLVE CONTRADICTION BEFORE REVIEW — NO AUTHORITY CREATED&quot;;IF([.U2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1]=&quot;READY FOR REVIEW&quot;;&quot;REVIEW ELIGIBLE — NO AUTHORITY&quot;;IF(OR([.U201]=&quot;UNKNOWN&quot;;[.U201]=&quot;BLOCKED&quot;);&quot;NOT REVIEW ELIGIBLE&quot;;&quot;NOT REVIEW ELIGIBLE&quot;))">
            <text:p>NOT REVIEW ELIGIBLE</text:p>
          </table:table-cell>
          <table:table-cell office:value-type="string" table:formula="of:=IF([.W201]=&quot;NOT REVIEW ELIGIBLE&quot;;&quot;DO NOT BEGIN SETTLEMENT REVIEW — RESOLVE READINESS OR CONTRADICTION CONDITIONS&quot;;IF([.W2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1]=&quot;&quot;;&quot;UNKNOWN&quot;;IF([.W201]&lt;&gt;&quot;REVIEW ELIGIBLE — NO AUTHORITY&quot;;&quot;BLOCKED — OUTCOME ASSERTED WITHOUT REVIEW ELIGIBILITY&quot;;IF(OR([.Y201]=&quot;REVIEWED — NO AUTHORITY&quot;;[.Y201]=&quot;REVIEW DEFERRED&quot;;[.Y201]=&quot;REVIEW BLOCKED&quot;);&quot;ACCEPTED INTAKE — NO AUTHORITY&quot;;&quot;BLOCKED — NONCANONICAL OUTCOME&quot;)))">
            <text:p>UNKNOWN</text:p>
          </table:table-cell>
          <table:table-cell office:value-type="string" table:formula="of:=IF([.Z201]=&quot;UNKNOWN&quot;;&quot;NO REVIEW OUTCOME ASSERTED — REMAINS UNKNOWN&quot;;IF([.Z201]=&quot;BLOCKED — OUTCOME ASSERTED WITHOUT REVIEW ELIGIBILITY&quot;;&quot;REMOVE OR CORRECT OUTCOME ASSERTION — REVIEW ELIGIBILITY REQUIRED FIRST&quot;;IF([.Z201]=&quot;BLOCKED — NONCANONICAL OUTCOME&quot;;&quot;CORRECT OUTCOME TO CANONICAL CONTROLLED VOCABULARY&quot;;IF([.Z20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1]=&quot;UNKNOWN&quot;;&quot;UNKNOWN&quot;;IF(OR([.Z201]=&quot;BLOCKED — OUTCOME ASSERTED WITHOUT REVIEW ELIGIBILITY&quot;;[.Z201]=&quot;BLOCKED — NONCANONICAL OUTCOME&quot;);&quot;BLOCKED&quot;;IF([.Z20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cell office:value-type="string" table:formula="of:=IF([.U202]=&quot;UNKNOWN&quot;;&quot;COMPLETE OR ASSERT REQUIRED EVIDENCE BEFORE REVIEW&quot;;IF([.U202]=&quot;BLOCKED&quot;;&quot;RESOLVE CONTRADICTION BEFORE REVIEW — NO AUTHORITY CREATED&quot;;IF([.U2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2]=&quot;READY FOR REVIEW&quot;;&quot;REVIEW ELIGIBLE — NO AUTHORITY&quot;;IF(OR([.U202]=&quot;UNKNOWN&quot;;[.U202]=&quot;BLOCKED&quot;);&quot;NOT REVIEW ELIGIBLE&quot;;&quot;NOT REVIEW ELIGIBLE&quot;))">
            <text:p>NOT REVIEW ELIGIBLE</text:p>
          </table:table-cell>
          <table:table-cell office:value-type="string" table:formula="of:=IF([.W202]=&quot;NOT REVIEW ELIGIBLE&quot;;&quot;DO NOT BEGIN SETTLEMENT REVIEW — RESOLVE READINESS OR CONTRADICTION CONDITIONS&quot;;IF([.W2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2]=&quot;&quot;;&quot;UNKNOWN&quot;;IF([.W202]&lt;&gt;&quot;REVIEW ELIGIBLE — NO AUTHORITY&quot;;&quot;BLOCKED — OUTCOME ASSERTED WITHOUT REVIEW ELIGIBILITY&quot;;IF(OR([.Y202]=&quot;REVIEWED — NO AUTHORITY&quot;;[.Y202]=&quot;REVIEW DEFERRED&quot;;[.Y202]=&quot;REVIEW BLOCKED&quot;);&quot;ACCEPTED INTAKE — NO AUTHORITY&quot;;&quot;BLOCKED — NONCANONICAL OUTCOME&quot;)))">
            <text:p>UNKNOWN</text:p>
          </table:table-cell>
          <table:table-cell office:value-type="string" table:formula="of:=IF([.Z202]=&quot;UNKNOWN&quot;;&quot;NO REVIEW OUTCOME ASSERTED — REMAINS UNKNOWN&quot;;IF([.Z202]=&quot;BLOCKED — OUTCOME ASSERTED WITHOUT REVIEW ELIGIBILITY&quot;;&quot;REMOVE OR CORRECT OUTCOME ASSERTION — REVIEW ELIGIBILITY REQUIRED FIRST&quot;;IF([.Z202]=&quot;BLOCKED — NONCANONICAL OUTCOME&quot;;&quot;CORRECT OUTCOME TO CANONICAL CONTROLLED VOCABULARY&quot;;IF([.Z20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2]=&quot;UNKNOWN&quot;;&quot;UNKNOWN&quot;;IF(OR([.Z202]=&quot;BLOCKED — OUTCOME ASSERTED WITHOUT REVIEW ELIGIBILITY&quot;;[.Z202]=&quot;BLOCKED — NONCANONICAL OUTCOME&quot;);&quot;BLOCKED&quot;;IF([.Z20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cell office:value-type="string" table:formula="of:=IF([.U203]=&quot;UNKNOWN&quot;;&quot;COMPLETE OR ASSERT REQUIRED EVIDENCE BEFORE REVIEW&quot;;IF([.U203]=&quot;BLOCKED&quot;;&quot;RESOLVE CONTRADICTION BEFORE REVIEW — NO AUTHORITY CREATED&quot;;IF([.U2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3]=&quot;READY FOR REVIEW&quot;;&quot;REVIEW ELIGIBLE — NO AUTHORITY&quot;;IF(OR([.U203]=&quot;UNKNOWN&quot;;[.U203]=&quot;BLOCKED&quot;);&quot;NOT REVIEW ELIGIBLE&quot;;&quot;NOT REVIEW ELIGIBLE&quot;))">
            <text:p>NOT REVIEW ELIGIBLE</text:p>
          </table:table-cell>
          <table:table-cell office:value-type="string" table:formula="of:=IF([.W203]=&quot;NOT REVIEW ELIGIBLE&quot;;&quot;DO NOT BEGIN SETTLEMENT REVIEW — RESOLVE READINESS OR CONTRADICTION CONDITIONS&quot;;IF([.W2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3]=&quot;&quot;;&quot;UNKNOWN&quot;;IF([.W203]&lt;&gt;&quot;REVIEW ELIGIBLE — NO AUTHORITY&quot;;&quot;BLOCKED — OUTCOME ASSERTED WITHOUT REVIEW ELIGIBILITY&quot;;IF(OR([.Y203]=&quot;REVIEWED — NO AUTHORITY&quot;;[.Y203]=&quot;REVIEW DEFERRED&quot;;[.Y203]=&quot;REVIEW BLOCKED&quot;);&quot;ACCEPTED INTAKE — NO AUTHORITY&quot;;&quot;BLOCKED — NONCANONICAL OUTCOME&quot;)))">
            <text:p>UNKNOWN</text:p>
          </table:table-cell>
          <table:table-cell office:value-type="string" table:formula="of:=IF([.Z203]=&quot;UNKNOWN&quot;;&quot;NO REVIEW OUTCOME ASSERTED — REMAINS UNKNOWN&quot;;IF([.Z203]=&quot;BLOCKED — OUTCOME ASSERTED WITHOUT REVIEW ELIGIBILITY&quot;;&quot;REMOVE OR CORRECT OUTCOME ASSERTION — REVIEW ELIGIBILITY REQUIRED FIRST&quot;;IF([.Z203]=&quot;BLOCKED — NONCANONICAL OUTCOME&quot;;&quot;CORRECT OUTCOME TO CANONICAL CONTROLLED VOCABULARY&quot;;IF([.Z20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3]=&quot;UNKNOWN&quot;;&quot;UNKNOWN&quot;;IF(OR([.Z203]=&quot;BLOCKED — OUTCOME ASSERTED WITHOUT REVIEW ELIGIBILITY&quot;;[.Z203]=&quot;BLOCKED — NONCANONICAL OUTCOME&quot;);&quot;BLOCKED&quot;;IF([.Z20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cell office:value-type="string" table:formula="of:=IF([.U204]=&quot;UNKNOWN&quot;;&quot;COMPLETE OR ASSERT REQUIRED EVIDENCE BEFORE REVIEW&quot;;IF([.U204]=&quot;BLOCKED&quot;;&quot;RESOLVE CONTRADICTION BEFORE REVIEW — NO AUTHORITY CREATED&quot;;IF([.U2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4]=&quot;READY FOR REVIEW&quot;;&quot;REVIEW ELIGIBLE — NO AUTHORITY&quot;;IF(OR([.U204]=&quot;UNKNOWN&quot;;[.U204]=&quot;BLOCKED&quot;);&quot;NOT REVIEW ELIGIBLE&quot;;&quot;NOT REVIEW ELIGIBLE&quot;))">
            <text:p>NOT REVIEW ELIGIBLE</text:p>
          </table:table-cell>
          <table:table-cell office:value-type="string" table:formula="of:=IF([.W204]=&quot;NOT REVIEW ELIGIBLE&quot;;&quot;DO NOT BEGIN SETTLEMENT REVIEW — RESOLVE READINESS OR CONTRADICTION CONDITIONS&quot;;IF([.W2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4]=&quot;&quot;;&quot;UNKNOWN&quot;;IF([.W204]&lt;&gt;&quot;REVIEW ELIGIBLE — NO AUTHORITY&quot;;&quot;BLOCKED — OUTCOME ASSERTED WITHOUT REVIEW ELIGIBILITY&quot;;IF(OR([.Y204]=&quot;REVIEWED — NO AUTHORITY&quot;;[.Y204]=&quot;REVIEW DEFERRED&quot;;[.Y204]=&quot;REVIEW BLOCKED&quot;);&quot;ACCEPTED INTAKE — NO AUTHORITY&quot;;&quot;BLOCKED — NONCANONICAL OUTCOME&quot;)))">
            <text:p>UNKNOWN</text:p>
          </table:table-cell>
          <table:table-cell office:value-type="string" table:formula="of:=IF([.Z204]=&quot;UNKNOWN&quot;;&quot;NO REVIEW OUTCOME ASSERTED — REMAINS UNKNOWN&quot;;IF([.Z204]=&quot;BLOCKED — OUTCOME ASSERTED WITHOUT REVIEW ELIGIBILITY&quot;;&quot;REMOVE OR CORRECT OUTCOME ASSERTION — REVIEW ELIGIBILITY REQUIRED FIRST&quot;;IF([.Z204]=&quot;BLOCKED — NONCANONICAL OUTCOME&quot;;&quot;CORRECT OUTCOME TO CANONICAL CONTROLLED VOCABULARY&quot;;IF([.Z20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4]=&quot;UNKNOWN&quot;;&quot;UNKNOWN&quot;;IF(OR([.Z204]=&quot;BLOCKED — OUTCOME ASSERTED WITHOUT REVIEW ELIGIBILITY&quot;;[.Z204]=&quot;BLOCKED — NONCANONICAL OUTCOME&quot;);&quot;BLOCKED&quot;;IF([.Z20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cell office:value-type="string" table:formula="of:=IF([.U205]=&quot;UNKNOWN&quot;;&quot;COMPLETE OR ASSERT REQUIRED EVIDENCE BEFORE REVIEW&quot;;IF([.U205]=&quot;BLOCKED&quot;;&quot;RESOLVE CONTRADICTION BEFORE REVIEW — NO AUTHORITY CREATED&quot;;IF([.U2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5]=&quot;READY FOR REVIEW&quot;;&quot;REVIEW ELIGIBLE — NO AUTHORITY&quot;;IF(OR([.U205]=&quot;UNKNOWN&quot;;[.U205]=&quot;BLOCKED&quot;);&quot;NOT REVIEW ELIGIBLE&quot;;&quot;NOT REVIEW ELIGIBLE&quot;))">
            <text:p>NOT REVIEW ELIGIBLE</text:p>
          </table:table-cell>
          <table:table-cell office:value-type="string" table:formula="of:=IF([.W205]=&quot;NOT REVIEW ELIGIBLE&quot;;&quot;DO NOT BEGIN SETTLEMENT REVIEW — RESOLVE READINESS OR CONTRADICTION CONDITIONS&quot;;IF([.W2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5]=&quot;&quot;;&quot;UNKNOWN&quot;;IF([.W205]&lt;&gt;&quot;REVIEW ELIGIBLE — NO AUTHORITY&quot;;&quot;BLOCKED — OUTCOME ASSERTED WITHOUT REVIEW ELIGIBILITY&quot;;IF(OR([.Y205]=&quot;REVIEWED — NO AUTHORITY&quot;;[.Y205]=&quot;REVIEW DEFERRED&quot;;[.Y205]=&quot;REVIEW BLOCKED&quot;);&quot;ACCEPTED INTAKE — NO AUTHORITY&quot;;&quot;BLOCKED — NONCANONICAL OUTCOME&quot;)))">
            <text:p>UNKNOWN</text:p>
          </table:table-cell>
          <table:table-cell office:value-type="string" table:formula="of:=IF([.Z205]=&quot;UNKNOWN&quot;;&quot;NO REVIEW OUTCOME ASSERTED — REMAINS UNKNOWN&quot;;IF([.Z205]=&quot;BLOCKED — OUTCOME ASSERTED WITHOUT REVIEW ELIGIBILITY&quot;;&quot;REMOVE OR CORRECT OUTCOME ASSERTION — REVIEW ELIGIBILITY REQUIRED FIRST&quot;;IF([.Z205]=&quot;BLOCKED — NONCANONICAL OUTCOME&quot;;&quot;CORRECT OUTCOME TO CANONICAL CONTROLLED VOCABULARY&quot;;IF([.Z20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5]=&quot;UNKNOWN&quot;;&quot;UNKNOWN&quot;;IF(OR([.Z205]=&quot;BLOCKED — OUTCOME ASSERTED WITHOUT REVIEW ELIGIBILITY&quot;;[.Z205]=&quot;BLOCKED — NONCANONICAL OUTCOME&quot;);&quot;BLOCKED&quot;;IF([.Z20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cell office:value-type="string" table:formula="of:=IF([.U206]=&quot;UNKNOWN&quot;;&quot;COMPLETE OR ASSERT REQUIRED EVIDENCE BEFORE REVIEW&quot;;IF([.U206]=&quot;BLOCKED&quot;;&quot;RESOLVE CONTRADICTION BEFORE REVIEW — NO AUTHORITY CREATED&quot;;IF([.U2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6]=&quot;READY FOR REVIEW&quot;;&quot;REVIEW ELIGIBLE — NO AUTHORITY&quot;;IF(OR([.U206]=&quot;UNKNOWN&quot;;[.U206]=&quot;BLOCKED&quot;);&quot;NOT REVIEW ELIGIBLE&quot;;&quot;NOT REVIEW ELIGIBLE&quot;))">
            <text:p>NOT REVIEW ELIGIBLE</text:p>
          </table:table-cell>
          <table:table-cell office:value-type="string" table:formula="of:=IF([.W206]=&quot;NOT REVIEW ELIGIBLE&quot;;&quot;DO NOT BEGIN SETTLEMENT REVIEW — RESOLVE READINESS OR CONTRADICTION CONDITIONS&quot;;IF([.W2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6]=&quot;&quot;;&quot;UNKNOWN&quot;;IF([.W206]&lt;&gt;&quot;REVIEW ELIGIBLE — NO AUTHORITY&quot;;&quot;BLOCKED — OUTCOME ASSERTED WITHOUT REVIEW ELIGIBILITY&quot;;IF(OR([.Y206]=&quot;REVIEWED — NO AUTHORITY&quot;;[.Y206]=&quot;REVIEW DEFERRED&quot;;[.Y206]=&quot;REVIEW BLOCKED&quot;);&quot;ACCEPTED INTAKE — NO AUTHORITY&quot;;&quot;BLOCKED — NONCANONICAL OUTCOME&quot;)))">
            <text:p>UNKNOWN</text:p>
          </table:table-cell>
          <table:table-cell office:value-type="string" table:formula="of:=IF([.Z206]=&quot;UNKNOWN&quot;;&quot;NO REVIEW OUTCOME ASSERTED — REMAINS UNKNOWN&quot;;IF([.Z206]=&quot;BLOCKED — OUTCOME ASSERTED WITHOUT REVIEW ELIGIBILITY&quot;;&quot;REMOVE OR CORRECT OUTCOME ASSERTION — REVIEW ELIGIBILITY REQUIRED FIRST&quot;;IF([.Z206]=&quot;BLOCKED — NONCANONICAL OUTCOME&quot;;&quot;CORRECT OUTCOME TO CANONICAL CONTROLLED VOCABULARY&quot;;IF([.Z20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6]=&quot;UNKNOWN&quot;;&quot;UNKNOWN&quot;;IF(OR([.Z206]=&quot;BLOCKED — OUTCOME ASSERTED WITHOUT REVIEW ELIGIBILITY&quot;;[.Z206]=&quot;BLOCKED — NONCANONICAL OUTCOME&quot;);&quot;BLOCKED&quot;;IF([.Z20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cell office:value-type="string" table:formula="of:=IF([.U207]=&quot;UNKNOWN&quot;;&quot;COMPLETE OR ASSERT REQUIRED EVIDENCE BEFORE REVIEW&quot;;IF([.U207]=&quot;BLOCKED&quot;;&quot;RESOLVE CONTRADICTION BEFORE REVIEW — NO AUTHORITY CREATED&quot;;IF([.U2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7]=&quot;READY FOR REVIEW&quot;;&quot;REVIEW ELIGIBLE — NO AUTHORITY&quot;;IF(OR([.U207]=&quot;UNKNOWN&quot;;[.U207]=&quot;BLOCKED&quot;);&quot;NOT REVIEW ELIGIBLE&quot;;&quot;NOT REVIEW ELIGIBLE&quot;))">
            <text:p>NOT REVIEW ELIGIBLE</text:p>
          </table:table-cell>
          <table:table-cell office:value-type="string" table:formula="of:=IF([.W207]=&quot;NOT REVIEW ELIGIBLE&quot;;&quot;DO NOT BEGIN SETTLEMENT REVIEW — RESOLVE READINESS OR CONTRADICTION CONDITIONS&quot;;IF([.W2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7]=&quot;&quot;;&quot;UNKNOWN&quot;;IF([.W207]&lt;&gt;&quot;REVIEW ELIGIBLE — NO AUTHORITY&quot;;&quot;BLOCKED — OUTCOME ASSERTED WITHOUT REVIEW ELIGIBILITY&quot;;IF(OR([.Y207]=&quot;REVIEWED — NO AUTHORITY&quot;;[.Y207]=&quot;REVIEW DEFERRED&quot;;[.Y207]=&quot;REVIEW BLOCKED&quot;);&quot;ACCEPTED INTAKE — NO AUTHORITY&quot;;&quot;BLOCKED — NONCANONICAL OUTCOME&quot;)))">
            <text:p>UNKNOWN</text:p>
          </table:table-cell>
          <table:table-cell office:value-type="string" table:formula="of:=IF([.Z207]=&quot;UNKNOWN&quot;;&quot;NO REVIEW OUTCOME ASSERTED — REMAINS UNKNOWN&quot;;IF([.Z207]=&quot;BLOCKED — OUTCOME ASSERTED WITHOUT REVIEW ELIGIBILITY&quot;;&quot;REMOVE OR CORRECT OUTCOME ASSERTION — REVIEW ELIGIBILITY REQUIRED FIRST&quot;;IF([.Z207]=&quot;BLOCKED — NONCANONICAL OUTCOME&quot;;&quot;CORRECT OUTCOME TO CANONICAL CONTROLLED VOCABULARY&quot;;IF([.Z20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7]=&quot;UNKNOWN&quot;;&quot;UNKNOWN&quot;;IF(OR([.Z207]=&quot;BLOCKED — OUTCOME ASSERTED WITHOUT REVIEW ELIGIBILITY&quot;;[.Z207]=&quot;BLOCKED — NONCANONICAL OUTCOME&quot;);&quot;BLOCKED&quot;;IF([.Z20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cell office:value-type="string" table:formula="of:=IF([.U208]=&quot;UNKNOWN&quot;;&quot;COMPLETE OR ASSERT REQUIRED EVIDENCE BEFORE REVIEW&quot;;IF([.U208]=&quot;BLOCKED&quot;;&quot;RESOLVE CONTRADICTION BEFORE REVIEW — NO AUTHORITY CREATED&quot;;IF([.U2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8]=&quot;READY FOR REVIEW&quot;;&quot;REVIEW ELIGIBLE — NO AUTHORITY&quot;;IF(OR([.U208]=&quot;UNKNOWN&quot;;[.U208]=&quot;BLOCKED&quot;);&quot;NOT REVIEW ELIGIBLE&quot;;&quot;NOT REVIEW ELIGIBLE&quot;))">
            <text:p>NOT REVIEW ELIGIBLE</text:p>
          </table:table-cell>
          <table:table-cell office:value-type="string" table:formula="of:=IF([.W208]=&quot;NOT REVIEW ELIGIBLE&quot;;&quot;DO NOT BEGIN SETTLEMENT REVIEW — RESOLVE READINESS OR CONTRADICTION CONDITIONS&quot;;IF([.W2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8]=&quot;&quot;;&quot;UNKNOWN&quot;;IF([.W208]&lt;&gt;&quot;REVIEW ELIGIBLE — NO AUTHORITY&quot;;&quot;BLOCKED — OUTCOME ASSERTED WITHOUT REVIEW ELIGIBILITY&quot;;IF(OR([.Y208]=&quot;REVIEWED — NO AUTHORITY&quot;;[.Y208]=&quot;REVIEW DEFERRED&quot;;[.Y208]=&quot;REVIEW BLOCKED&quot;);&quot;ACCEPTED INTAKE — NO AUTHORITY&quot;;&quot;BLOCKED — NONCANONICAL OUTCOME&quot;)))">
            <text:p>UNKNOWN</text:p>
          </table:table-cell>
          <table:table-cell office:value-type="string" table:formula="of:=IF([.Z208]=&quot;UNKNOWN&quot;;&quot;NO REVIEW OUTCOME ASSERTED — REMAINS UNKNOWN&quot;;IF([.Z208]=&quot;BLOCKED — OUTCOME ASSERTED WITHOUT REVIEW ELIGIBILITY&quot;;&quot;REMOVE OR CORRECT OUTCOME ASSERTION — REVIEW ELIGIBILITY REQUIRED FIRST&quot;;IF([.Z208]=&quot;BLOCKED — NONCANONICAL OUTCOME&quot;;&quot;CORRECT OUTCOME TO CANONICAL CONTROLLED VOCABULARY&quot;;IF([.Z20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8]=&quot;UNKNOWN&quot;;&quot;UNKNOWN&quot;;IF(OR([.Z208]=&quot;BLOCKED — OUTCOME ASSERTED WITHOUT REVIEW ELIGIBILITY&quot;;[.Z208]=&quot;BLOCKED — NONCANONICAL OUTCOME&quot;);&quot;BLOCKED&quot;;IF([.Z20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cell office:value-type="string" table:formula="of:=IF([.U209]=&quot;UNKNOWN&quot;;&quot;COMPLETE OR ASSERT REQUIRED EVIDENCE BEFORE REVIEW&quot;;IF([.U209]=&quot;BLOCKED&quot;;&quot;RESOLVE CONTRADICTION BEFORE REVIEW — NO AUTHORITY CREATED&quot;;IF([.U2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9]=&quot;READY FOR REVIEW&quot;;&quot;REVIEW ELIGIBLE — NO AUTHORITY&quot;;IF(OR([.U209]=&quot;UNKNOWN&quot;;[.U209]=&quot;BLOCKED&quot;);&quot;NOT REVIEW ELIGIBLE&quot;;&quot;NOT REVIEW ELIGIBLE&quot;))">
            <text:p>NOT REVIEW ELIGIBLE</text:p>
          </table:table-cell>
          <table:table-cell office:value-type="string" table:formula="of:=IF([.W209]=&quot;NOT REVIEW ELIGIBLE&quot;;&quot;DO NOT BEGIN SETTLEMENT REVIEW — RESOLVE READINESS OR CONTRADICTION CONDITIONS&quot;;IF([.W2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9]=&quot;&quot;;&quot;UNKNOWN&quot;;IF([.W209]&lt;&gt;&quot;REVIEW ELIGIBLE — NO AUTHORITY&quot;;&quot;BLOCKED — OUTCOME ASSERTED WITHOUT REVIEW ELIGIBILITY&quot;;IF(OR([.Y209]=&quot;REVIEWED — NO AUTHORITY&quot;;[.Y209]=&quot;REVIEW DEFERRED&quot;;[.Y209]=&quot;REVIEW BLOCKED&quot;);&quot;ACCEPTED INTAKE — NO AUTHORITY&quot;;&quot;BLOCKED — NONCANONICAL OUTCOME&quot;)))">
            <text:p>UNKNOWN</text:p>
          </table:table-cell>
          <table:table-cell office:value-type="string" table:formula="of:=IF([.Z209]=&quot;UNKNOWN&quot;;&quot;NO REVIEW OUTCOME ASSERTED — REMAINS UNKNOWN&quot;;IF([.Z209]=&quot;BLOCKED — OUTCOME ASSERTED WITHOUT REVIEW ELIGIBILITY&quot;;&quot;REMOVE OR CORRECT OUTCOME ASSERTION — REVIEW ELIGIBILITY REQUIRED FIRST&quot;;IF([.Z209]=&quot;BLOCKED — NONCANONICAL OUTCOME&quot;;&quot;CORRECT OUTCOME TO CANONICAL CONTROLLED VOCABULARY&quot;;IF([.Z20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09]=&quot;UNKNOWN&quot;;&quot;UNKNOWN&quot;;IF(OR([.Z209]=&quot;BLOCKED — OUTCOME ASSERTED WITHOUT REVIEW ELIGIBILITY&quot;;[.Z209]=&quot;BLOCKED — NONCANONICAL OUTCOME&quot;);&quot;BLOCKED&quot;;IF([.Z20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cell office:value-type="string" table:formula="of:=IF([.U210]=&quot;UNKNOWN&quot;;&quot;COMPLETE OR ASSERT REQUIRED EVIDENCE BEFORE REVIEW&quot;;IF([.U210]=&quot;BLOCKED&quot;;&quot;RESOLVE CONTRADICTION BEFORE REVIEW — NO AUTHORITY CREATED&quot;;IF([.U2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0]=&quot;READY FOR REVIEW&quot;;&quot;REVIEW ELIGIBLE — NO AUTHORITY&quot;;IF(OR([.U210]=&quot;UNKNOWN&quot;;[.U210]=&quot;BLOCKED&quot;);&quot;NOT REVIEW ELIGIBLE&quot;;&quot;NOT REVIEW ELIGIBLE&quot;))">
            <text:p>NOT REVIEW ELIGIBLE</text:p>
          </table:table-cell>
          <table:table-cell office:value-type="string" table:formula="of:=IF([.W210]=&quot;NOT REVIEW ELIGIBLE&quot;;&quot;DO NOT BEGIN SETTLEMENT REVIEW — RESOLVE READINESS OR CONTRADICTION CONDITIONS&quot;;IF([.W2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0]=&quot;&quot;;&quot;UNKNOWN&quot;;IF([.W210]&lt;&gt;&quot;REVIEW ELIGIBLE — NO AUTHORITY&quot;;&quot;BLOCKED — OUTCOME ASSERTED WITHOUT REVIEW ELIGIBILITY&quot;;IF(OR([.Y210]=&quot;REVIEWED — NO AUTHORITY&quot;;[.Y210]=&quot;REVIEW DEFERRED&quot;;[.Y210]=&quot;REVIEW BLOCKED&quot;);&quot;ACCEPTED INTAKE — NO AUTHORITY&quot;;&quot;BLOCKED — NONCANONICAL OUTCOME&quot;)))">
            <text:p>UNKNOWN</text:p>
          </table:table-cell>
          <table:table-cell office:value-type="string" table:formula="of:=IF([.Z210]=&quot;UNKNOWN&quot;;&quot;NO REVIEW OUTCOME ASSERTED — REMAINS UNKNOWN&quot;;IF([.Z210]=&quot;BLOCKED — OUTCOME ASSERTED WITHOUT REVIEW ELIGIBILITY&quot;;&quot;REMOVE OR CORRECT OUTCOME ASSERTION — REVIEW ELIGIBILITY REQUIRED FIRST&quot;;IF([.Z210]=&quot;BLOCKED — NONCANONICAL OUTCOME&quot;;&quot;CORRECT OUTCOME TO CANONICAL CONTROLLED VOCABULARY&quot;;IF([.Z2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0]=&quot;UNKNOWN&quot;;&quot;UNKNOWN&quot;;IF(OR([.Z210]=&quot;BLOCKED — OUTCOME ASSERTED WITHOUT REVIEW ELIGIBILITY&quot;;[.Z210]=&quot;BLOCKED — NONCANONICAL OUTCOME&quot;);&quot;BLOCKED&quot;;IF([.Z21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cell office:value-type="string" table:formula="of:=IF([.U211]=&quot;UNKNOWN&quot;;&quot;COMPLETE OR ASSERT REQUIRED EVIDENCE BEFORE REVIEW&quot;;IF([.U211]=&quot;BLOCKED&quot;;&quot;RESOLVE CONTRADICTION BEFORE REVIEW — NO AUTHORITY CREATED&quot;;IF([.U2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1]=&quot;READY FOR REVIEW&quot;;&quot;REVIEW ELIGIBLE — NO AUTHORITY&quot;;IF(OR([.U211]=&quot;UNKNOWN&quot;;[.U211]=&quot;BLOCKED&quot;);&quot;NOT REVIEW ELIGIBLE&quot;;&quot;NOT REVIEW ELIGIBLE&quot;))">
            <text:p>NOT REVIEW ELIGIBLE</text:p>
          </table:table-cell>
          <table:table-cell office:value-type="string" table:formula="of:=IF([.W211]=&quot;NOT REVIEW ELIGIBLE&quot;;&quot;DO NOT BEGIN SETTLEMENT REVIEW — RESOLVE READINESS OR CONTRADICTION CONDITIONS&quot;;IF([.W2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1]=&quot;&quot;;&quot;UNKNOWN&quot;;IF([.W211]&lt;&gt;&quot;REVIEW ELIGIBLE — NO AUTHORITY&quot;;&quot;BLOCKED — OUTCOME ASSERTED WITHOUT REVIEW ELIGIBILITY&quot;;IF(OR([.Y211]=&quot;REVIEWED — NO AUTHORITY&quot;;[.Y211]=&quot;REVIEW DEFERRED&quot;;[.Y211]=&quot;REVIEW BLOCKED&quot;);&quot;ACCEPTED INTAKE — NO AUTHORITY&quot;;&quot;BLOCKED — NONCANONICAL OUTCOME&quot;)))">
            <text:p>UNKNOWN</text:p>
          </table:table-cell>
          <table:table-cell office:value-type="string" table:formula="of:=IF([.Z211]=&quot;UNKNOWN&quot;;&quot;NO REVIEW OUTCOME ASSERTED — REMAINS UNKNOWN&quot;;IF([.Z211]=&quot;BLOCKED — OUTCOME ASSERTED WITHOUT REVIEW ELIGIBILITY&quot;;&quot;REMOVE OR CORRECT OUTCOME ASSERTION — REVIEW ELIGIBILITY REQUIRED FIRST&quot;;IF([.Z211]=&quot;BLOCKED — NONCANONICAL OUTCOME&quot;;&quot;CORRECT OUTCOME TO CANONICAL CONTROLLED VOCABULARY&quot;;IF([.Z2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1]=&quot;UNKNOWN&quot;;&quot;UNKNOWN&quot;;IF(OR([.Z211]=&quot;BLOCKED — OUTCOME ASSERTED WITHOUT REVIEW ELIGIBILITY&quot;;[.Z211]=&quot;BLOCKED — NONCANONICAL OUTCOME&quot;);&quot;BLOCKED&quot;;IF([.Z21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cell office:value-type="string" table:formula="of:=IF([.U212]=&quot;UNKNOWN&quot;;&quot;COMPLETE OR ASSERT REQUIRED EVIDENCE BEFORE REVIEW&quot;;IF([.U212]=&quot;BLOCKED&quot;;&quot;RESOLVE CONTRADICTION BEFORE REVIEW — NO AUTHORITY CREATED&quot;;IF([.U2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2]=&quot;READY FOR REVIEW&quot;;&quot;REVIEW ELIGIBLE — NO AUTHORITY&quot;;IF(OR([.U212]=&quot;UNKNOWN&quot;;[.U212]=&quot;BLOCKED&quot;);&quot;NOT REVIEW ELIGIBLE&quot;;&quot;NOT REVIEW ELIGIBLE&quot;))">
            <text:p>NOT REVIEW ELIGIBLE</text:p>
          </table:table-cell>
          <table:table-cell office:value-type="string" table:formula="of:=IF([.W212]=&quot;NOT REVIEW ELIGIBLE&quot;;&quot;DO NOT BEGIN SETTLEMENT REVIEW — RESOLVE READINESS OR CONTRADICTION CONDITIONS&quot;;IF([.W2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2]=&quot;&quot;;&quot;UNKNOWN&quot;;IF([.W212]&lt;&gt;&quot;REVIEW ELIGIBLE — NO AUTHORITY&quot;;&quot;BLOCKED — OUTCOME ASSERTED WITHOUT REVIEW ELIGIBILITY&quot;;IF(OR([.Y212]=&quot;REVIEWED — NO AUTHORITY&quot;;[.Y212]=&quot;REVIEW DEFERRED&quot;;[.Y212]=&quot;REVIEW BLOCKED&quot;);&quot;ACCEPTED INTAKE — NO AUTHORITY&quot;;&quot;BLOCKED — NONCANONICAL OUTCOME&quot;)))">
            <text:p>UNKNOWN</text:p>
          </table:table-cell>
          <table:table-cell office:value-type="string" table:formula="of:=IF([.Z212]=&quot;UNKNOWN&quot;;&quot;NO REVIEW OUTCOME ASSERTED — REMAINS UNKNOWN&quot;;IF([.Z212]=&quot;BLOCKED — OUTCOME ASSERTED WITHOUT REVIEW ELIGIBILITY&quot;;&quot;REMOVE OR CORRECT OUTCOME ASSERTION — REVIEW ELIGIBILITY REQUIRED FIRST&quot;;IF([.Z212]=&quot;BLOCKED — NONCANONICAL OUTCOME&quot;;&quot;CORRECT OUTCOME TO CANONICAL CONTROLLED VOCABULARY&quot;;IF([.Z2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2]=&quot;UNKNOWN&quot;;&quot;UNKNOWN&quot;;IF(OR([.Z212]=&quot;BLOCKED — OUTCOME ASSERTED WITHOUT REVIEW ELIGIBILITY&quot;;[.Z212]=&quot;BLOCKED — NONCANONICAL OUTCOME&quot;);&quot;BLOCKED&quot;;IF([.Z21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cell office:value-type="string" table:formula="of:=IF([.U213]=&quot;UNKNOWN&quot;;&quot;COMPLETE OR ASSERT REQUIRED EVIDENCE BEFORE REVIEW&quot;;IF([.U213]=&quot;BLOCKED&quot;;&quot;RESOLVE CONTRADICTION BEFORE REVIEW — NO AUTHORITY CREATED&quot;;IF([.U2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3]=&quot;READY FOR REVIEW&quot;;&quot;REVIEW ELIGIBLE — NO AUTHORITY&quot;;IF(OR([.U213]=&quot;UNKNOWN&quot;;[.U213]=&quot;BLOCKED&quot;);&quot;NOT REVIEW ELIGIBLE&quot;;&quot;NOT REVIEW ELIGIBLE&quot;))">
            <text:p>NOT REVIEW ELIGIBLE</text:p>
          </table:table-cell>
          <table:table-cell office:value-type="string" table:formula="of:=IF([.W213]=&quot;NOT REVIEW ELIGIBLE&quot;;&quot;DO NOT BEGIN SETTLEMENT REVIEW — RESOLVE READINESS OR CONTRADICTION CONDITIONS&quot;;IF([.W2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3]=&quot;&quot;;&quot;UNKNOWN&quot;;IF([.W213]&lt;&gt;&quot;REVIEW ELIGIBLE — NO AUTHORITY&quot;;&quot;BLOCKED — OUTCOME ASSERTED WITHOUT REVIEW ELIGIBILITY&quot;;IF(OR([.Y213]=&quot;REVIEWED — NO AUTHORITY&quot;;[.Y213]=&quot;REVIEW DEFERRED&quot;;[.Y213]=&quot;REVIEW BLOCKED&quot;);&quot;ACCEPTED INTAKE — NO AUTHORITY&quot;;&quot;BLOCKED — NONCANONICAL OUTCOME&quot;)))">
            <text:p>UNKNOWN</text:p>
          </table:table-cell>
          <table:table-cell office:value-type="string" table:formula="of:=IF([.Z213]=&quot;UNKNOWN&quot;;&quot;NO REVIEW OUTCOME ASSERTED — REMAINS UNKNOWN&quot;;IF([.Z213]=&quot;BLOCKED — OUTCOME ASSERTED WITHOUT REVIEW ELIGIBILITY&quot;;&quot;REMOVE OR CORRECT OUTCOME ASSERTION — REVIEW ELIGIBILITY REQUIRED FIRST&quot;;IF([.Z213]=&quot;BLOCKED — NONCANONICAL OUTCOME&quot;;&quot;CORRECT OUTCOME TO CANONICAL CONTROLLED VOCABULARY&quot;;IF([.Z2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3]=&quot;UNKNOWN&quot;;&quot;UNKNOWN&quot;;IF(OR([.Z213]=&quot;BLOCKED — OUTCOME ASSERTED WITHOUT REVIEW ELIGIBILITY&quot;;[.Z213]=&quot;BLOCKED — NONCANONICAL OUTCOME&quot;);&quot;BLOCKED&quot;;IF([.Z21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cell office:value-type="string" table:formula="of:=IF([.U214]=&quot;UNKNOWN&quot;;&quot;COMPLETE OR ASSERT REQUIRED EVIDENCE BEFORE REVIEW&quot;;IF([.U214]=&quot;BLOCKED&quot;;&quot;RESOLVE CONTRADICTION BEFORE REVIEW — NO AUTHORITY CREATED&quot;;IF([.U2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4]=&quot;READY FOR REVIEW&quot;;&quot;REVIEW ELIGIBLE — NO AUTHORITY&quot;;IF(OR([.U214]=&quot;UNKNOWN&quot;;[.U214]=&quot;BLOCKED&quot;);&quot;NOT REVIEW ELIGIBLE&quot;;&quot;NOT REVIEW ELIGIBLE&quot;))">
            <text:p>NOT REVIEW ELIGIBLE</text:p>
          </table:table-cell>
          <table:table-cell office:value-type="string" table:formula="of:=IF([.W214]=&quot;NOT REVIEW ELIGIBLE&quot;;&quot;DO NOT BEGIN SETTLEMENT REVIEW — RESOLVE READINESS OR CONTRADICTION CONDITIONS&quot;;IF([.W2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4]=&quot;&quot;;&quot;UNKNOWN&quot;;IF([.W214]&lt;&gt;&quot;REVIEW ELIGIBLE — NO AUTHORITY&quot;;&quot;BLOCKED — OUTCOME ASSERTED WITHOUT REVIEW ELIGIBILITY&quot;;IF(OR([.Y214]=&quot;REVIEWED — NO AUTHORITY&quot;;[.Y214]=&quot;REVIEW DEFERRED&quot;;[.Y214]=&quot;REVIEW BLOCKED&quot;);&quot;ACCEPTED INTAKE — NO AUTHORITY&quot;;&quot;BLOCKED — NONCANONICAL OUTCOME&quot;)))">
            <text:p>UNKNOWN</text:p>
          </table:table-cell>
          <table:table-cell office:value-type="string" table:formula="of:=IF([.Z214]=&quot;UNKNOWN&quot;;&quot;NO REVIEW OUTCOME ASSERTED — REMAINS UNKNOWN&quot;;IF([.Z214]=&quot;BLOCKED — OUTCOME ASSERTED WITHOUT REVIEW ELIGIBILITY&quot;;&quot;REMOVE OR CORRECT OUTCOME ASSERTION — REVIEW ELIGIBILITY REQUIRED FIRST&quot;;IF([.Z214]=&quot;BLOCKED — NONCANONICAL OUTCOME&quot;;&quot;CORRECT OUTCOME TO CANONICAL CONTROLLED VOCABULARY&quot;;IF([.Z2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4]=&quot;UNKNOWN&quot;;&quot;UNKNOWN&quot;;IF(OR([.Z214]=&quot;BLOCKED — OUTCOME ASSERTED WITHOUT REVIEW ELIGIBILITY&quot;;[.Z214]=&quot;BLOCKED — NONCANONICAL OUTCOME&quot;);&quot;BLOCKED&quot;;IF([.Z21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cell office:value-type="string" table:formula="of:=IF([.U215]=&quot;UNKNOWN&quot;;&quot;COMPLETE OR ASSERT REQUIRED EVIDENCE BEFORE REVIEW&quot;;IF([.U215]=&quot;BLOCKED&quot;;&quot;RESOLVE CONTRADICTION BEFORE REVIEW — NO AUTHORITY CREATED&quot;;IF([.U2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5]=&quot;READY FOR REVIEW&quot;;&quot;REVIEW ELIGIBLE — NO AUTHORITY&quot;;IF(OR([.U215]=&quot;UNKNOWN&quot;;[.U215]=&quot;BLOCKED&quot;);&quot;NOT REVIEW ELIGIBLE&quot;;&quot;NOT REVIEW ELIGIBLE&quot;))">
            <text:p>NOT REVIEW ELIGIBLE</text:p>
          </table:table-cell>
          <table:table-cell office:value-type="string" table:formula="of:=IF([.W215]=&quot;NOT REVIEW ELIGIBLE&quot;;&quot;DO NOT BEGIN SETTLEMENT REVIEW — RESOLVE READINESS OR CONTRADICTION CONDITIONS&quot;;IF([.W2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5]=&quot;&quot;;&quot;UNKNOWN&quot;;IF([.W215]&lt;&gt;&quot;REVIEW ELIGIBLE — NO AUTHORITY&quot;;&quot;BLOCKED — OUTCOME ASSERTED WITHOUT REVIEW ELIGIBILITY&quot;;IF(OR([.Y215]=&quot;REVIEWED — NO AUTHORITY&quot;;[.Y215]=&quot;REVIEW DEFERRED&quot;;[.Y215]=&quot;REVIEW BLOCKED&quot;);&quot;ACCEPTED INTAKE — NO AUTHORITY&quot;;&quot;BLOCKED — NONCANONICAL OUTCOME&quot;)))">
            <text:p>UNKNOWN</text:p>
          </table:table-cell>
          <table:table-cell office:value-type="string" table:formula="of:=IF([.Z215]=&quot;UNKNOWN&quot;;&quot;NO REVIEW OUTCOME ASSERTED — REMAINS UNKNOWN&quot;;IF([.Z215]=&quot;BLOCKED — OUTCOME ASSERTED WITHOUT REVIEW ELIGIBILITY&quot;;&quot;REMOVE OR CORRECT OUTCOME ASSERTION — REVIEW ELIGIBILITY REQUIRED FIRST&quot;;IF([.Z215]=&quot;BLOCKED — NONCANONICAL OUTCOME&quot;;&quot;CORRECT OUTCOME TO CANONICAL CONTROLLED VOCABULARY&quot;;IF([.Z2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5]=&quot;UNKNOWN&quot;;&quot;UNKNOWN&quot;;IF(OR([.Z215]=&quot;BLOCKED — OUTCOME ASSERTED WITHOUT REVIEW ELIGIBILITY&quot;;[.Z215]=&quot;BLOCKED — NONCANONICAL OUTCOME&quot;);&quot;BLOCKED&quot;;IF([.Z21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cell office:value-type="string" table:formula="of:=IF([.U216]=&quot;UNKNOWN&quot;;&quot;COMPLETE OR ASSERT REQUIRED EVIDENCE BEFORE REVIEW&quot;;IF([.U216]=&quot;BLOCKED&quot;;&quot;RESOLVE CONTRADICTION BEFORE REVIEW — NO AUTHORITY CREATED&quot;;IF([.U2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6]=&quot;READY FOR REVIEW&quot;;&quot;REVIEW ELIGIBLE — NO AUTHORITY&quot;;IF(OR([.U216]=&quot;UNKNOWN&quot;;[.U216]=&quot;BLOCKED&quot;);&quot;NOT REVIEW ELIGIBLE&quot;;&quot;NOT REVIEW ELIGIBLE&quot;))">
            <text:p>NOT REVIEW ELIGIBLE</text:p>
          </table:table-cell>
          <table:table-cell office:value-type="string" table:formula="of:=IF([.W216]=&quot;NOT REVIEW ELIGIBLE&quot;;&quot;DO NOT BEGIN SETTLEMENT REVIEW — RESOLVE READINESS OR CONTRADICTION CONDITIONS&quot;;IF([.W2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6]=&quot;&quot;;&quot;UNKNOWN&quot;;IF([.W216]&lt;&gt;&quot;REVIEW ELIGIBLE — NO AUTHORITY&quot;;&quot;BLOCKED — OUTCOME ASSERTED WITHOUT REVIEW ELIGIBILITY&quot;;IF(OR([.Y216]=&quot;REVIEWED — NO AUTHORITY&quot;;[.Y216]=&quot;REVIEW DEFERRED&quot;;[.Y216]=&quot;REVIEW BLOCKED&quot;);&quot;ACCEPTED INTAKE — NO AUTHORITY&quot;;&quot;BLOCKED — NONCANONICAL OUTCOME&quot;)))">
            <text:p>UNKNOWN</text:p>
          </table:table-cell>
          <table:table-cell office:value-type="string" table:formula="of:=IF([.Z216]=&quot;UNKNOWN&quot;;&quot;NO REVIEW OUTCOME ASSERTED — REMAINS UNKNOWN&quot;;IF([.Z216]=&quot;BLOCKED — OUTCOME ASSERTED WITHOUT REVIEW ELIGIBILITY&quot;;&quot;REMOVE OR CORRECT OUTCOME ASSERTION — REVIEW ELIGIBILITY REQUIRED FIRST&quot;;IF([.Z216]=&quot;BLOCKED — NONCANONICAL OUTCOME&quot;;&quot;CORRECT OUTCOME TO CANONICAL CONTROLLED VOCABULARY&quot;;IF([.Z2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6]=&quot;UNKNOWN&quot;;&quot;UNKNOWN&quot;;IF(OR([.Z216]=&quot;BLOCKED — OUTCOME ASSERTED WITHOUT REVIEW ELIGIBILITY&quot;;[.Z216]=&quot;BLOCKED — NONCANONICAL OUTCOME&quot;);&quot;BLOCKED&quot;;IF([.Z21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cell office:value-type="string" table:formula="of:=IF([.U217]=&quot;UNKNOWN&quot;;&quot;COMPLETE OR ASSERT REQUIRED EVIDENCE BEFORE REVIEW&quot;;IF([.U217]=&quot;BLOCKED&quot;;&quot;RESOLVE CONTRADICTION BEFORE REVIEW — NO AUTHORITY CREATED&quot;;IF([.U2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7]=&quot;READY FOR REVIEW&quot;;&quot;REVIEW ELIGIBLE — NO AUTHORITY&quot;;IF(OR([.U217]=&quot;UNKNOWN&quot;;[.U217]=&quot;BLOCKED&quot;);&quot;NOT REVIEW ELIGIBLE&quot;;&quot;NOT REVIEW ELIGIBLE&quot;))">
            <text:p>NOT REVIEW ELIGIBLE</text:p>
          </table:table-cell>
          <table:table-cell office:value-type="string" table:formula="of:=IF([.W217]=&quot;NOT REVIEW ELIGIBLE&quot;;&quot;DO NOT BEGIN SETTLEMENT REVIEW — RESOLVE READINESS OR CONTRADICTION CONDITIONS&quot;;IF([.W2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7]=&quot;&quot;;&quot;UNKNOWN&quot;;IF([.W217]&lt;&gt;&quot;REVIEW ELIGIBLE — NO AUTHORITY&quot;;&quot;BLOCKED — OUTCOME ASSERTED WITHOUT REVIEW ELIGIBILITY&quot;;IF(OR([.Y217]=&quot;REVIEWED — NO AUTHORITY&quot;;[.Y217]=&quot;REVIEW DEFERRED&quot;;[.Y217]=&quot;REVIEW BLOCKED&quot;);&quot;ACCEPTED INTAKE — NO AUTHORITY&quot;;&quot;BLOCKED — NONCANONICAL OUTCOME&quot;)))">
            <text:p>UNKNOWN</text:p>
          </table:table-cell>
          <table:table-cell office:value-type="string" table:formula="of:=IF([.Z217]=&quot;UNKNOWN&quot;;&quot;NO REVIEW OUTCOME ASSERTED — REMAINS UNKNOWN&quot;;IF([.Z217]=&quot;BLOCKED — OUTCOME ASSERTED WITHOUT REVIEW ELIGIBILITY&quot;;&quot;REMOVE OR CORRECT OUTCOME ASSERTION — REVIEW ELIGIBILITY REQUIRED FIRST&quot;;IF([.Z217]=&quot;BLOCKED — NONCANONICAL OUTCOME&quot;;&quot;CORRECT OUTCOME TO CANONICAL CONTROLLED VOCABULARY&quot;;IF([.Z2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7]=&quot;UNKNOWN&quot;;&quot;UNKNOWN&quot;;IF(OR([.Z217]=&quot;BLOCKED — OUTCOME ASSERTED WITHOUT REVIEW ELIGIBILITY&quot;;[.Z217]=&quot;BLOCKED — NONCANONICAL OUTCOME&quot;);&quot;BLOCKED&quot;;IF([.Z21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cell office:value-type="string" table:formula="of:=IF([.U218]=&quot;UNKNOWN&quot;;&quot;COMPLETE OR ASSERT REQUIRED EVIDENCE BEFORE REVIEW&quot;;IF([.U218]=&quot;BLOCKED&quot;;&quot;RESOLVE CONTRADICTION BEFORE REVIEW — NO AUTHORITY CREATED&quot;;IF([.U2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8]=&quot;READY FOR REVIEW&quot;;&quot;REVIEW ELIGIBLE — NO AUTHORITY&quot;;IF(OR([.U218]=&quot;UNKNOWN&quot;;[.U218]=&quot;BLOCKED&quot;);&quot;NOT REVIEW ELIGIBLE&quot;;&quot;NOT REVIEW ELIGIBLE&quot;))">
            <text:p>NOT REVIEW ELIGIBLE</text:p>
          </table:table-cell>
          <table:table-cell office:value-type="string" table:formula="of:=IF([.W218]=&quot;NOT REVIEW ELIGIBLE&quot;;&quot;DO NOT BEGIN SETTLEMENT REVIEW — RESOLVE READINESS OR CONTRADICTION CONDITIONS&quot;;IF([.W2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8]=&quot;&quot;;&quot;UNKNOWN&quot;;IF([.W218]&lt;&gt;&quot;REVIEW ELIGIBLE — NO AUTHORITY&quot;;&quot;BLOCKED — OUTCOME ASSERTED WITHOUT REVIEW ELIGIBILITY&quot;;IF(OR([.Y218]=&quot;REVIEWED — NO AUTHORITY&quot;;[.Y218]=&quot;REVIEW DEFERRED&quot;;[.Y218]=&quot;REVIEW BLOCKED&quot;);&quot;ACCEPTED INTAKE — NO AUTHORITY&quot;;&quot;BLOCKED — NONCANONICAL OUTCOME&quot;)))">
            <text:p>UNKNOWN</text:p>
          </table:table-cell>
          <table:table-cell office:value-type="string" table:formula="of:=IF([.Z218]=&quot;UNKNOWN&quot;;&quot;NO REVIEW OUTCOME ASSERTED — REMAINS UNKNOWN&quot;;IF([.Z218]=&quot;BLOCKED — OUTCOME ASSERTED WITHOUT REVIEW ELIGIBILITY&quot;;&quot;REMOVE OR CORRECT OUTCOME ASSERTION — REVIEW ELIGIBILITY REQUIRED FIRST&quot;;IF([.Z218]=&quot;BLOCKED — NONCANONICAL OUTCOME&quot;;&quot;CORRECT OUTCOME TO CANONICAL CONTROLLED VOCABULARY&quot;;IF([.Z2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8]=&quot;UNKNOWN&quot;;&quot;UNKNOWN&quot;;IF(OR([.Z218]=&quot;BLOCKED — OUTCOME ASSERTED WITHOUT REVIEW ELIGIBILITY&quot;;[.Z218]=&quot;BLOCKED — NONCANONICAL OUTCOME&quot;);&quot;BLOCKED&quot;;IF([.Z21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cell office:value-type="string" table:formula="of:=IF([.U219]=&quot;UNKNOWN&quot;;&quot;COMPLETE OR ASSERT REQUIRED EVIDENCE BEFORE REVIEW&quot;;IF([.U219]=&quot;BLOCKED&quot;;&quot;RESOLVE CONTRADICTION BEFORE REVIEW — NO AUTHORITY CREATED&quot;;IF([.U2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9]=&quot;READY FOR REVIEW&quot;;&quot;REVIEW ELIGIBLE — NO AUTHORITY&quot;;IF(OR([.U219]=&quot;UNKNOWN&quot;;[.U219]=&quot;BLOCKED&quot;);&quot;NOT REVIEW ELIGIBLE&quot;;&quot;NOT REVIEW ELIGIBLE&quot;))">
            <text:p>NOT REVIEW ELIGIBLE</text:p>
          </table:table-cell>
          <table:table-cell office:value-type="string" table:formula="of:=IF([.W219]=&quot;NOT REVIEW ELIGIBLE&quot;;&quot;DO NOT BEGIN SETTLEMENT REVIEW — RESOLVE READINESS OR CONTRADICTION CONDITIONS&quot;;IF([.W2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9]=&quot;&quot;;&quot;UNKNOWN&quot;;IF([.W219]&lt;&gt;&quot;REVIEW ELIGIBLE — NO AUTHORITY&quot;;&quot;BLOCKED — OUTCOME ASSERTED WITHOUT REVIEW ELIGIBILITY&quot;;IF(OR([.Y219]=&quot;REVIEWED — NO AUTHORITY&quot;;[.Y219]=&quot;REVIEW DEFERRED&quot;;[.Y219]=&quot;REVIEW BLOCKED&quot;);&quot;ACCEPTED INTAKE — NO AUTHORITY&quot;;&quot;BLOCKED — NONCANONICAL OUTCOME&quot;)))">
            <text:p>UNKNOWN</text:p>
          </table:table-cell>
          <table:table-cell office:value-type="string" table:formula="of:=IF([.Z219]=&quot;UNKNOWN&quot;;&quot;NO REVIEW OUTCOME ASSERTED — REMAINS UNKNOWN&quot;;IF([.Z219]=&quot;BLOCKED — OUTCOME ASSERTED WITHOUT REVIEW ELIGIBILITY&quot;;&quot;REMOVE OR CORRECT OUTCOME ASSERTION — REVIEW ELIGIBILITY REQUIRED FIRST&quot;;IF([.Z219]=&quot;BLOCKED — NONCANONICAL OUTCOME&quot;;&quot;CORRECT OUTCOME TO CANONICAL CONTROLLED VOCABULARY&quot;;IF([.Z2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19]=&quot;UNKNOWN&quot;;&quot;UNKNOWN&quot;;IF(OR([.Z219]=&quot;BLOCKED — OUTCOME ASSERTED WITHOUT REVIEW ELIGIBILITY&quot;;[.Z219]=&quot;BLOCKED — NONCANONICAL OUTCOME&quot;);&quot;BLOCKED&quot;;IF([.Z21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cell office:value-type="string" table:formula="of:=IF([.U220]=&quot;UNKNOWN&quot;;&quot;COMPLETE OR ASSERT REQUIRED EVIDENCE BEFORE REVIEW&quot;;IF([.U220]=&quot;BLOCKED&quot;;&quot;RESOLVE CONTRADICTION BEFORE REVIEW — NO AUTHORITY CREATED&quot;;IF([.U2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0]=&quot;READY FOR REVIEW&quot;;&quot;REVIEW ELIGIBLE — NO AUTHORITY&quot;;IF(OR([.U220]=&quot;UNKNOWN&quot;;[.U220]=&quot;BLOCKED&quot;);&quot;NOT REVIEW ELIGIBLE&quot;;&quot;NOT REVIEW ELIGIBLE&quot;))">
            <text:p>NOT REVIEW ELIGIBLE</text:p>
          </table:table-cell>
          <table:table-cell office:value-type="string" table:formula="of:=IF([.W220]=&quot;NOT REVIEW ELIGIBLE&quot;;&quot;DO NOT BEGIN SETTLEMENT REVIEW — RESOLVE READINESS OR CONTRADICTION CONDITIONS&quot;;IF([.W2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0]=&quot;&quot;;&quot;UNKNOWN&quot;;IF([.W220]&lt;&gt;&quot;REVIEW ELIGIBLE — NO AUTHORITY&quot;;&quot;BLOCKED — OUTCOME ASSERTED WITHOUT REVIEW ELIGIBILITY&quot;;IF(OR([.Y220]=&quot;REVIEWED — NO AUTHORITY&quot;;[.Y220]=&quot;REVIEW DEFERRED&quot;;[.Y220]=&quot;REVIEW BLOCKED&quot;);&quot;ACCEPTED INTAKE — NO AUTHORITY&quot;;&quot;BLOCKED — NONCANONICAL OUTCOME&quot;)))">
            <text:p>UNKNOWN</text:p>
          </table:table-cell>
          <table:table-cell office:value-type="string" table:formula="of:=IF([.Z220]=&quot;UNKNOWN&quot;;&quot;NO REVIEW OUTCOME ASSERTED — REMAINS UNKNOWN&quot;;IF([.Z220]=&quot;BLOCKED — OUTCOME ASSERTED WITHOUT REVIEW ELIGIBILITY&quot;;&quot;REMOVE OR CORRECT OUTCOME ASSERTION — REVIEW ELIGIBILITY REQUIRED FIRST&quot;;IF([.Z220]=&quot;BLOCKED — NONCANONICAL OUTCOME&quot;;&quot;CORRECT OUTCOME TO CANONICAL CONTROLLED VOCABULARY&quot;;IF([.Z2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0]=&quot;UNKNOWN&quot;;&quot;UNKNOWN&quot;;IF(OR([.Z220]=&quot;BLOCKED — OUTCOME ASSERTED WITHOUT REVIEW ELIGIBILITY&quot;;[.Z220]=&quot;BLOCKED — NONCANONICAL OUTCOME&quot;);&quot;BLOCKED&quot;;IF([.Z22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cell office:value-type="string" table:formula="of:=IF([.U221]=&quot;UNKNOWN&quot;;&quot;COMPLETE OR ASSERT REQUIRED EVIDENCE BEFORE REVIEW&quot;;IF([.U221]=&quot;BLOCKED&quot;;&quot;RESOLVE CONTRADICTION BEFORE REVIEW — NO AUTHORITY CREATED&quot;;IF([.U2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1]=&quot;READY FOR REVIEW&quot;;&quot;REVIEW ELIGIBLE — NO AUTHORITY&quot;;IF(OR([.U221]=&quot;UNKNOWN&quot;;[.U221]=&quot;BLOCKED&quot;);&quot;NOT REVIEW ELIGIBLE&quot;;&quot;NOT REVIEW ELIGIBLE&quot;))">
            <text:p>NOT REVIEW ELIGIBLE</text:p>
          </table:table-cell>
          <table:table-cell office:value-type="string" table:formula="of:=IF([.W221]=&quot;NOT REVIEW ELIGIBLE&quot;;&quot;DO NOT BEGIN SETTLEMENT REVIEW — RESOLVE READINESS OR CONTRADICTION CONDITIONS&quot;;IF([.W2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1]=&quot;&quot;;&quot;UNKNOWN&quot;;IF([.W221]&lt;&gt;&quot;REVIEW ELIGIBLE — NO AUTHORITY&quot;;&quot;BLOCKED — OUTCOME ASSERTED WITHOUT REVIEW ELIGIBILITY&quot;;IF(OR([.Y221]=&quot;REVIEWED — NO AUTHORITY&quot;;[.Y221]=&quot;REVIEW DEFERRED&quot;;[.Y221]=&quot;REVIEW BLOCKED&quot;);&quot;ACCEPTED INTAKE — NO AUTHORITY&quot;;&quot;BLOCKED — NONCANONICAL OUTCOME&quot;)))">
            <text:p>UNKNOWN</text:p>
          </table:table-cell>
          <table:table-cell office:value-type="string" table:formula="of:=IF([.Z221]=&quot;UNKNOWN&quot;;&quot;NO REVIEW OUTCOME ASSERTED — REMAINS UNKNOWN&quot;;IF([.Z221]=&quot;BLOCKED — OUTCOME ASSERTED WITHOUT REVIEW ELIGIBILITY&quot;;&quot;REMOVE OR CORRECT OUTCOME ASSERTION — REVIEW ELIGIBILITY REQUIRED FIRST&quot;;IF([.Z221]=&quot;BLOCKED — NONCANONICAL OUTCOME&quot;;&quot;CORRECT OUTCOME TO CANONICAL CONTROLLED VOCABULARY&quot;;IF([.Z2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1]=&quot;UNKNOWN&quot;;&quot;UNKNOWN&quot;;IF(OR([.Z221]=&quot;BLOCKED — OUTCOME ASSERTED WITHOUT REVIEW ELIGIBILITY&quot;;[.Z221]=&quot;BLOCKED — NONCANONICAL OUTCOME&quot;);&quot;BLOCKED&quot;;IF([.Z22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cell office:value-type="string" table:formula="of:=IF([.U222]=&quot;UNKNOWN&quot;;&quot;COMPLETE OR ASSERT REQUIRED EVIDENCE BEFORE REVIEW&quot;;IF([.U222]=&quot;BLOCKED&quot;;&quot;RESOLVE CONTRADICTION BEFORE REVIEW — NO AUTHORITY CREATED&quot;;IF([.U2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2]=&quot;READY FOR REVIEW&quot;;&quot;REVIEW ELIGIBLE — NO AUTHORITY&quot;;IF(OR([.U222]=&quot;UNKNOWN&quot;;[.U222]=&quot;BLOCKED&quot;);&quot;NOT REVIEW ELIGIBLE&quot;;&quot;NOT REVIEW ELIGIBLE&quot;))">
            <text:p>NOT REVIEW ELIGIBLE</text:p>
          </table:table-cell>
          <table:table-cell office:value-type="string" table:formula="of:=IF([.W222]=&quot;NOT REVIEW ELIGIBLE&quot;;&quot;DO NOT BEGIN SETTLEMENT REVIEW — RESOLVE READINESS OR CONTRADICTION CONDITIONS&quot;;IF([.W2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2]=&quot;&quot;;&quot;UNKNOWN&quot;;IF([.W222]&lt;&gt;&quot;REVIEW ELIGIBLE — NO AUTHORITY&quot;;&quot;BLOCKED — OUTCOME ASSERTED WITHOUT REVIEW ELIGIBILITY&quot;;IF(OR([.Y222]=&quot;REVIEWED — NO AUTHORITY&quot;;[.Y222]=&quot;REVIEW DEFERRED&quot;;[.Y222]=&quot;REVIEW BLOCKED&quot;);&quot;ACCEPTED INTAKE — NO AUTHORITY&quot;;&quot;BLOCKED — NONCANONICAL OUTCOME&quot;)))">
            <text:p>UNKNOWN</text:p>
          </table:table-cell>
          <table:table-cell office:value-type="string" table:formula="of:=IF([.Z222]=&quot;UNKNOWN&quot;;&quot;NO REVIEW OUTCOME ASSERTED — REMAINS UNKNOWN&quot;;IF([.Z222]=&quot;BLOCKED — OUTCOME ASSERTED WITHOUT REVIEW ELIGIBILITY&quot;;&quot;REMOVE OR CORRECT OUTCOME ASSERTION — REVIEW ELIGIBILITY REQUIRED FIRST&quot;;IF([.Z222]=&quot;BLOCKED — NONCANONICAL OUTCOME&quot;;&quot;CORRECT OUTCOME TO CANONICAL CONTROLLED VOCABULARY&quot;;IF([.Z2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2]=&quot;UNKNOWN&quot;;&quot;UNKNOWN&quot;;IF(OR([.Z222]=&quot;BLOCKED — OUTCOME ASSERTED WITHOUT REVIEW ELIGIBILITY&quot;;[.Z222]=&quot;BLOCKED — NONCANONICAL OUTCOME&quot;);&quot;BLOCKED&quot;;IF([.Z22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cell office:value-type="string" table:formula="of:=IF([.U223]=&quot;UNKNOWN&quot;;&quot;COMPLETE OR ASSERT REQUIRED EVIDENCE BEFORE REVIEW&quot;;IF([.U223]=&quot;BLOCKED&quot;;&quot;RESOLVE CONTRADICTION BEFORE REVIEW — NO AUTHORITY CREATED&quot;;IF([.U2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3]=&quot;READY FOR REVIEW&quot;;&quot;REVIEW ELIGIBLE — NO AUTHORITY&quot;;IF(OR([.U223]=&quot;UNKNOWN&quot;;[.U223]=&quot;BLOCKED&quot;);&quot;NOT REVIEW ELIGIBLE&quot;;&quot;NOT REVIEW ELIGIBLE&quot;))">
            <text:p>NOT REVIEW ELIGIBLE</text:p>
          </table:table-cell>
          <table:table-cell office:value-type="string" table:formula="of:=IF([.W223]=&quot;NOT REVIEW ELIGIBLE&quot;;&quot;DO NOT BEGIN SETTLEMENT REVIEW — RESOLVE READINESS OR CONTRADICTION CONDITIONS&quot;;IF([.W2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3]=&quot;&quot;;&quot;UNKNOWN&quot;;IF([.W223]&lt;&gt;&quot;REVIEW ELIGIBLE — NO AUTHORITY&quot;;&quot;BLOCKED — OUTCOME ASSERTED WITHOUT REVIEW ELIGIBILITY&quot;;IF(OR([.Y223]=&quot;REVIEWED — NO AUTHORITY&quot;;[.Y223]=&quot;REVIEW DEFERRED&quot;;[.Y223]=&quot;REVIEW BLOCKED&quot;);&quot;ACCEPTED INTAKE — NO AUTHORITY&quot;;&quot;BLOCKED — NONCANONICAL OUTCOME&quot;)))">
            <text:p>UNKNOWN</text:p>
          </table:table-cell>
          <table:table-cell office:value-type="string" table:formula="of:=IF([.Z223]=&quot;UNKNOWN&quot;;&quot;NO REVIEW OUTCOME ASSERTED — REMAINS UNKNOWN&quot;;IF([.Z223]=&quot;BLOCKED — OUTCOME ASSERTED WITHOUT REVIEW ELIGIBILITY&quot;;&quot;REMOVE OR CORRECT OUTCOME ASSERTION — REVIEW ELIGIBILITY REQUIRED FIRST&quot;;IF([.Z223]=&quot;BLOCKED — NONCANONICAL OUTCOME&quot;;&quot;CORRECT OUTCOME TO CANONICAL CONTROLLED VOCABULARY&quot;;IF([.Z2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3]=&quot;UNKNOWN&quot;;&quot;UNKNOWN&quot;;IF(OR([.Z223]=&quot;BLOCKED — OUTCOME ASSERTED WITHOUT REVIEW ELIGIBILITY&quot;;[.Z223]=&quot;BLOCKED — NONCANONICAL OUTCOME&quot;);&quot;BLOCKED&quot;;IF([.Z22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cell office:value-type="string" table:formula="of:=IF([.U224]=&quot;UNKNOWN&quot;;&quot;COMPLETE OR ASSERT REQUIRED EVIDENCE BEFORE REVIEW&quot;;IF([.U224]=&quot;BLOCKED&quot;;&quot;RESOLVE CONTRADICTION BEFORE REVIEW — NO AUTHORITY CREATED&quot;;IF([.U2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4]=&quot;READY FOR REVIEW&quot;;&quot;REVIEW ELIGIBLE — NO AUTHORITY&quot;;IF(OR([.U224]=&quot;UNKNOWN&quot;;[.U224]=&quot;BLOCKED&quot;);&quot;NOT REVIEW ELIGIBLE&quot;;&quot;NOT REVIEW ELIGIBLE&quot;))">
            <text:p>NOT REVIEW ELIGIBLE</text:p>
          </table:table-cell>
          <table:table-cell office:value-type="string" table:formula="of:=IF([.W224]=&quot;NOT REVIEW ELIGIBLE&quot;;&quot;DO NOT BEGIN SETTLEMENT REVIEW — RESOLVE READINESS OR CONTRADICTION CONDITIONS&quot;;IF([.W2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4]=&quot;&quot;;&quot;UNKNOWN&quot;;IF([.W224]&lt;&gt;&quot;REVIEW ELIGIBLE — NO AUTHORITY&quot;;&quot;BLOCKED — OUTCOME ASSERTED WITHOUT REVIEW ELIGIBILITY&quot;;IF(OR([.Y224]=&quot;REVIEWED — NO AUTHORITY&quot;;[.Y224]=&quot;REVIEW DEFERRED&quot;;[.Y224]=&quot;REVIEW BLOCKED&quot;);&quot;ACCEPTED INTAKE — NO AUTHORITY&quot;;&quot;BLOCKED — NONCANONICAL OUTCOME&quot;)))">
            <text:p>UNKNOWN</text:p>
          </table:table-cell>
          <table:table-cell office:value-type="string" table:formula="of:=IF([.Z224]=&quot;UNKNOWN&quot;;&quot;NO REVIEW OUTCOME ASSERTED — REMAINS UNKNOWN&quot;;IF([.Z224]=&quot;BLOCKED — OUTCOME ASSERTED WITHOUT REVIEW ELIGIBILITY&quot;;&quot;REMOVE OR CORRECT OUTCOME ASSERTION — REVIEW ELIGIBILITY REQUIRED FIRST&quot;;IF([.Z224]=&quot;BLOCKED — NONCANONICAL OUTCOME&quot;;&quot;CORRECT OUTCOME TO CANONICAL CONTROLLED VOCABULARY&quot;;IF([.Z2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4]=&quot;UNKNOWN&quot;;&quot;UNKNOWN&quot;;IF(OR([.Z224]=&quot;BLOCKED — OUTCOME ASSERTED WITHOUT REVIEW ELIGIBILITY&quot;;[.Z224]=&quot;BLOCKED — NONCANONICAL OUTCOME&quot;);&quot;BLOCKED&quot;;IF([.Z22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cell office:value-type="string" table:formula="of:=IF([.U225]=&quot;UNKNOWN&quot;;&quot;COMPLETE OR ASSERT REQUIRED EVIDENCE BEFORE REVIEW&quot;;IF([.U225]=&quot;BLOCKED&quot;;&quot;RESOLVE CONTRADICTION BEFORE REVIEW — NO AUTHORITY CREATED&quot;;IF([.U2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5]=&quot;READY FOR REVIEW&quot;;&quot;REVIEW ELIGIBLE — NO AUTHORITY&quot;;IF(OR([.U225]=&quot;UNKNOWN&quot;;[.U225]=&quot;BLOCKED&quot;);&quot;NOT REVIEW ELIGIBLE&quot;;&quot;NOT REVIEW ELIGIBLE&quot;))">
            <text:p>NOT REVIEW ELIGIBLE</text:p>
          </table:table-cell>
          <table:table-cell office:value-type="string" table:formula="of:=IF([.W225]=&quot;NOT REVIEW ELIGIBLE&quot;;&quot;DO NOT BEGIN SETTLEMENT REVIEW — RESOLVE READINESS OR CONTRADICTION CONDITIONS&quot;;IF([.W2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5]=&quot;&quot;;&quot;UNKNOWN&quot;;IF([.W225]&lt;&gt;&quot;REVIEW ELIGIBLE — NO AUTHORITY&quot;;&quot;BLOCKED — OUTCOME ASSERTED WITHOUT REVIEW ELIGIBILITY&quot;;IF(OR([.Y225]=&quot;REVIEWED — NO AUTHORITY&quot;;[.Y225]=&quot;REVIEW DEFERRED&quot;;[.Y225]=&quot;REVIEW BLOCKED&quot;);&quot;ACCEPTED INTAKE — NO AUTHORITY&quot;;&quot;BLOCKED — NONCANONICAL OUTCOME&quot;)))">
            <text:p>UNKNOWN</text:p>
          </table:table-cell>
          <table:table-cell office:value-type="string" table:formula="of:=IF([.Z225]=&quot;UNKNOWN&quot;;&quot;NO REVIEW OUTCOME ASSERTED — REMAINS UNKNOWN&quot;;IF([.Z225]=&quot;BLOCKED — OUTCOME ASSERTED WITHOUT REVIEW ELIGIBILITY&quot;;&quot;REMOVE OR CORRECT OUTCOME ASSERTION — REVIEW ELIGIBILITY REQUIRED FIRST&quot;;IF([.Z225]=&quot;BLOCKED — NONCANONICAL OUTCOME&quot;;&quot;CORRECT OUTCOME TO CANONICAL CONTROLLED VOCABULARY&quot;;IF([.Z2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5]=&quot;UNKNOWN&quot;;&quot;UNKNOWN&quot;;IF(OR([.Z225]=&quot;BLOCKED — OUTCOME ASSERTED WITHOUT REVIEW ELIGIBILITY&quot;;[.Z225]=&quot;BLOCKED — NONCANONICAL OUTCOME&quot;);&quot;BLOCKED&quot;;IF([.Z22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cell office:value-type="string" table:formula="of:=IF([.U226]=&quot;UNKNOWN&quot;;&quot;COMPLETE OR ASSERT REQUIRED EVIDENCE BEFORE REVIEW&quot;;IF([.U226]=&quot;BLOCKED&quot;;&quot;RESOLVE CONTRADICTION BEFORE REVIEW — NO AUTHORITY CREATED&quot;;IF([.U2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6]=&quot;READY FOR REVIEW&quot;;&quot;REVIEW ELIGIBLE — NO AUTHORITY&quot;;IF(OR([.U226]=&quot;UNKNOWN&quot;;[.U226]=&quot;BLOCKED&quot;);&quot;NOT REVIEW ELIGIBLE&quot;;&quot;NOT REVIEW ELIGIBLE&quot;))">
            <text:p>NOT REVIEW ELIGIBLE</text:p>
          </table:table-cell>
          <table:table-cell office:value-type="string" table:formula="of:=IF([.W226]=&quot;NOT REVIEW ELIGIBLE&quot;;&quot;DO NOT BEGIN SETTLEMENT REVIEW — RESOLVE READINESS OR CONTRADICTION CONDITIONS&quot;;IF([.W2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6]=&quot;&quot;;&quot;UNKNOWN&quot;;IF([.W226]&lt;&gt;&quot;REVIEW ELIGIBLE — NO AUTHORITY&quot;;&quot;BLOCKED — OUTCOME ASSERTED WITHOUT REVIEW ELIGIBILITY&quot;;IF(OR([.Y226]=&quot;REVIEWED — NO AUTHORITY&quot;;[.Y226]=&quot;REVIEW DEFERRED&quot;;[.Y226]=&quot;REVIEW BLOCKED&quot;);&quot;ACCEPTED INTAKE — NO AUTHORITY&quot;;&quot;BLOCKED — NONCANONICAL OUTCOME&quot;)))">
            <text:p>UNKNOWN</text:p>
          </table:table-cell>
          <table:table-cell office:value-type="string" table:formula="of:=IF([.Z226]=&quot;UNKNOWN&quot;;&quot;NO REVIEW OUTCOME ASSERTED — REMAINS UNKNOWN&quot;;IF([.Z226]=&quot;BLOCKED — OUTCOME ASSERTED WITHOUT REVIEW ELIGIBILITY&quot;;&quot;REMOVE OR CORRECT OUTCOME ASSERTION — REVIEW ELIGIBILITY REQUIRED FIRST&quot;;IF([.Z226]=&quot;BLOCKED — NONCANONICAL OUTCOME&quot;;&quot;CORRECT OUTCOME TO CANONICAL CONTROLLED VOCABULARY&quot;;IF([.Z2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6]=&quot;UNKNOWN&quot;;&quot;UNKNOWN&quot;;IF(OR([.Z226]=&quot;BLOCKED — OUTCOME ASSERTED WITHOUT REVIEW ELIGIBILITY&quot;;[.Z226]=&quot;BLOCKED — NONCANONICAL OUTCOME&quot;);&quot;BLOCKED&quot;;IF([.Z22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cell office:value-type="string" table:formula="of:=IF([.U227]=&quot;UNKNOWN&quot;;&quot;COMPLETE OR ASSERT REQUIRED EVIDENCE BEFORE REVIEW&quot;;IF([.U227]=&quot;BLOCKED&quot;;&quot;RESOLVE CONTRADICTION BEFORE REVIEW — NO AUTHORITY CREATED&quot;;IF([.U2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7]=&quot;READY FOR REVIEW&quot;;&quot;REVIEW ELIGIBLE — NO AUTHORITY&quot;;IF(OR([.U227]=&quot;UNKNOWN&quot;;[.U227]=&quot;BLOCKED&quot;);&quot;NOT REVIEW ELIGIBLE&quot;;&quot;NOT REVIEW ELIGIBLE&quot;))">
            <text:p>NOT REVIEW ELIGIBLE</text:p>
          </table:table-cell>
          <table:table-cell office:value-type="string" table:formula="of:=IF([.W227]=&quot;NOT REVIEW ELIGIBLE&quot;;&quot;DO NOT BEGIN SETTLEMENT REVIEW — RESOLVE READINESS OR CONTRADICTION CONDITIONS&quot;;IF([.W2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7]=&quot;&quot;;&quot;UNKNOWN&quot;;IF([.W227]&lt;&gt;&quot;REVIEW ELIGIBLE — NO AUTHORITY&quot;;&quot;BLOCKED — OUTCOME ASSERTED WITHOUT REVIEW ELIGIBILITY&quot;;IF(OR([.Y227]=&quot;REVIEWED — NO AUTHORITY&quot;;[.Y227]=&quot;REVIEW DEFERRED&quot;;[.Y227]=&quot;REVIEW BLOCKED&quot;);&quot;ACCEPTED INTAKE — NO AUTHORITY&quot;;&quot;BLOCKED — NONCANONICAL OUTCOME&quot;)))">
            <text:p>UNKNOWN</text:p>
          </table:table-cell>
          <table:table-cell office:value-type="string" table:formula="of:=IF([.Z227]=&quot;UNKNOWN&quot;;&quot;NO REVIEW OUTCOME ASSERTED — REMAINS UNKNOWN&quot;;IF([.Z227]=&quot;BLOCKED — OUTCOME ASSERTED WITHOUT REVIEW ELIGIBILITY&quot;;&quot;REMOVE OR CORRECT OUTCOME ASSERTION — REVIEW ELIGIBILITY REQUIRED FIRST&quot;;IF([.Z227]=&quot;BLOCKED — NONCANONICAL OUTCOME&quot;;&quot;CORRECT OUTCOME TO CANONICAL CONTROLLED VOCABULARY&quot;;IF([.Z2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7]=&quot;UNKNOWN&quot;;&quot;UNKNOWN&quot;;IF(OR([.Z227]=&quot;BLOCKED — OUTCOME ASSERTED WITHOUT REVIEW ELIGIBILITY&quot;;[.Z227]=&quot;BLOCKED — NONCANONICAL OUTCOME&quot;);&quot;BLOCKED&quot;;IF([.Z22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cell office:value-type="string" table:formula="of:=IF([.U228]=&quot;UNKNOWN&quot;;&quot;COMPLETE OR ASSERT REQUIRED EVIDENCE BEFORE REVIEW&quot;;IF([.U228]=&quot;BLOCKED&quot;;&quot;RESOLVE CONTRADICTION BEFORE REVIEW — NO AUTHORITY CREATED&quot;;IF([.U2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8]=&quot;READY FOR REVIEW&quot;;&quot;REVIEW ELIGIBLE — NO AUTHORITY&quot;;IF(OR([.U228]=&quot;UNKNOWN&quot;;[.U228]=&quot;BLOCKED&quot;);&quot;NOT REVIEW ELIGIBLE&quot;;&quot;NOT REVIEW ELIGIBLE&quot;))">
            <text:p>NOT REVIEW ELIGIBLE</text:p>
          </table:table-cell>
          <table:table-cell office:value-type="string" table:formula="of:=IF([.W228]=&quot;NOT REVIEW ELIGIBLE&quot;;&quot;DO NOT BEGIN SETTLEMENT REVIEW — RESOLVE READINESS OR CONTRADICTION CONDITIONS&quot;;IF([.W2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8]=&quot;&quot;;&quot;UNKNOWN&quot;;IF([.W228]&lt;&gt;&quot;REVIEW ELIGIBLE — NO AUTHORITY&quot;;&quot;BLOCKED — OUTCOME ASSERTED WITHOUT REVIEW ELIGIBILITY&quot;;IF(OR([.Y228]=&quot;REVIEWED — NO AUTHORITY&quot;;[.Y228]=&quot;REVIEW DEFERRED&quot;;[.Y228]=&quot;REVIEW BLOCKED&quot;);&quot;ACCEPTED INTAKE — NO AUTHORITY&quot;;&quot;BLOCKED — NONCANONICAL OUTCOME&quot;)))">
            <text:p>UNKNOWN</text:p>
          </table:table-cell>
          <table:table-cell office:value-type="string" table:formula="of:=IF([.Z228]=&quot;UNKNOWN&quot;;&quot;NO REVIEW OUTCOME ASSERTED — REMAINS UNKNOWN&quot;;IF([.Z228]=&quot;BLOCKED — OUTCOME ASSERTED WITHOUT REVIEW ELIGIBILITY&quot;;&quot;REMOVE OR CORRECT OUTCOME ASSERTION — REVIEW ELIGIBILITY REQUIRED FIRST&quot;;IF([.Z228]=&quot;BLOCKED — NONCANONICAL OUTCOME&quot;;&quot;CORRECT OUTCOME TO CANONICAL CONTROLLED VOCABULARY&quot;;IF([.Z2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8]=&quot;UNKNOWN&quot;;&quot;UNKNOWN&quot;;IF(OR([.Z228]=&quot;BLOCKED — OUTCOME ASSERTED WITHOUT REVIEW ELIGIBILITY&quot;;[.Z228]=&quot;BLOCKED — NONCANONICAL OUTCOME&quot;);&quot;BLOCKED&quot;;IF([.Z22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cell office:value-type="string" table:formula="of:=IF([.U229]=&quot;UNKNOWN&quot;;&quot;COMPLETE OR ASSERT REQUIRED EVIDENCE BEFORE REVIEW&quot;;IF([.U229]=&quot;BLOCKED&quot;;&quot;RESOLVE CONTRADICTION BEFORE REVIEW — NO AUTHORITY CREATED&quot;;IF([.U2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9]=&quot;READY FOR REVIEW&quot;;&quot;REVIEW ELIGIBLE — NO AUTHORITY&quot;;IF(OR([.U229]=&quot;UNKNOWN&quot;;[.U229]=&quot;BLOCKED&quot;);&quot;NOT REVIEW ELIGIBLE&quot;;&quot;NOT REVIEW ELIGIBLE&quot;))">
            <text:p>NOT REVIEW ELIGIBLE</text:p>
          </table:table-cell>
          <table:table-cell office:value-type="string" table:formula="of:=IF([.W229]=&quot;NOT REVIEW ELIGIBLE&quot;;&quot;DO NOT BEGIN SETTLEMENT REVIEW — RESOLVE READINESS OR CONTRADICTION CONDITIONS&quot;;IF([.W2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9]=&quot;&quot;;&quot;UNKNOWN&quot;;IF([.W229]&lt;&gt;&quot;REVIEW ELIGIBLE — NO AUTHORITY&quot;;&quot;BLOCKED — OUTCOME ASSERTED WITHOUT REVIEW ELIGIBILITY&quot;;IF(OR([.Y229]=&quot;REVIEWED — NO AUTHORITY&quot;;[.Y229]=&quot;REVIEW DEFERRED&quot;;[.Y229]=&quot;REVIEW BLOCKED&quot;);&quot;ACCEPTED INTAKE — NO AUTHORITY&quot;;&quot;BLOCKED — NONCANONICAL OUTCOME&quot;)))">
            <text:p>UNKNOWN</text:p>
          </table:table-cell>
          <table:table-cell office:value-type="string" table:formula="of:=IF([.Z229]=&quot;UNKNOWN&quot;;&quot;NO REVIEW OUTCOME ASSERTED — REMAINS UNKNOWN&quot;;IF([.Z229]=&quot;BLOCKED — OUTCOME ASSERTED WITHOUT REVIEW ELIGIBILITY&quot;;&quot;REMOVE OR CORRECT OUTCOME ASSERTION — REVIEW ELIGIBILITY REQUIRED FIRST&quot;;IF([.Z229]=&quot;BLOCKED — NONCANONICAL OUTCOME&quot;;&quot;CORRECT OUTCOME TO CANONICAL CONTROLLED VOCABULARY&quot;;IF([.Z2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29]=&quot;UNKNOWN&quot;;&quot;UNKNOWN&quot;;IF(OR([.Z229]=&quot;BLOCKED — OUTCOME ASSERTED WITHOUT REVIEW ELIGIBILITY&quot;;[.Z229]=&quot;BLOCKED — NONCANONICAL OUTCOME&quot;);&quot;BLOCKED&quot;;IF([.Z22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cell office:value-type="string" table:formula="of:=IF([.U230]=&quot;UNKNOWN&quot;;&quot;COMPLETE OR ASSERT REQUIRED EVIDENCE BEFORE REVIEW&quot;;IF([.U230]=&quot;BLOCKED&quot;;&quot;RESOLVE CONTRADICTION BEFORE REVIEW — NO AUTHORITY CREATED&quot;;IF([.U2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0]=&quot;READY FOR REVIEW&quot;;&quot;REVIEW ELIGIBLE — NO AUTHORITY&quot;;IF(OR([.U230]=&quot;UNKNOWN&quot;;[.U230]=&quot;BLOCKED&quot;);&quot;NOT REVIEW ELIGIBLE&quot;;&quot;NOT REVIEW ELIGIBLE&quot;))">
            <text:p>NOT REVIEW ELIGIBLE</text:p>
          </table:table-cell>
          <table:table-cell office:value-type="string" table:formula="of:=IF([.W230]=&quot;NOT REVIEW ELIGIBLE&quot;;&quot;DO NOT BEGIN SETTLEMENT REVIEW — RESOLVE READINESS OR CONTRADICTION CONDITIONS&quot;;IF([.W2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0]=&quot;&quot;;&quot;UNKNOWN&quot;;IF([.W230]&lt;&gt;&quot;REVIEW ELIGIBLE — NO AUTHORITY&quot;;&quot;BLOCKED — OUTCOME ASSERTED WITHOUT REVIEW ELIGIBILITY&quot;;IF(OR([.Y230]=&quot;REVIEWED — NO AUTHORITY&quot;;[.Y230]=&quot;REVIEW DEFERRED&quot;;[.Y230]=&quot;REVIEW BLOCKED&quot;);&quot;ACCEPTED INTAKE — NO AUTHORITY&quot;;&quot;BLOCKED — NONCANONICAL OUTCOME&quot;)))">
            <text:p>UNKNOWN</text:p>
          </table:table-cell>
          <table:table-cell office:value-type="string" table:formula="of:=IF([.Z230]=&quot;UNKNOWN&quot;;&quot;NO REVIEW OUTCOME ASSERTED — REMAINS UNKNOWN&quot;;IF([.Z230]=&quot;BLOCKED — OUTCOME ASSERTED WITHOUT REVIEW ELIGIBILITY&quot;;&quot;REMOVE OR CORRECT OUTCOME ASSERTION — REVIEW ELIGIBILITY REQUIRED FIRST&quot;;IF([.Z230]=&quot;BLOCKED — NONCANONICAL OUTCOME&quot;;&quot;CORRECT OUTCOME TO CANONICAL CONTROLLED VOCABULARY&quot;;IF([.Z2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0]=&quot;UNKNOWN&quot;;&quot;UNKNOWN&quot;;IF(OR([.Z230]=&quot;BLOCKED — OUTCOME ASSERTED WITHOUT REVIEW ELIGIBILITY&quot;;[.Z230]=&quot;BLOCKED — NONCANONICAL OUTCOME&quot;);&quot;BLOCKED&quot;;IF([.Z23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cell office:value-type="string" table:formula="of:=IF([.U231]=&quot;UNKNOWN&quot;;&quot;COMPLETE OR ASSERT REQUIRED EVIDENCE BEFORE REVIEW&quot;;IF([.U231]=&quot;BLOCKED&quot;;&quot;RESOLVE CONTRADICTION BEFORE REVIEW — NO AUTHORITY CREATED&quot;;IF([.U2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1]=&quot;READY FOR REVIEW&quot;;&quot;REVIEW ELIGIBLE — NO AUTHORITY&quot;;IF(OR([.U231]=&quot;UNKNOWN&quot;;[.U231]=&quot;BLOCKED&quot;);&quot;NOT REVIEW ELIGIBLE&quot;;&quot;NOT REVIEW ELIGIBLE&quot;))">
            <text:p>NOT REVIEW ELIGIBLE</text:p>
          </table:table-cell>
          <table:table-cell office:value-type="string" table:formula="of:=IF([.W231]=&quot;NOT REVIEW ELIGIBLE&quot;;&quot;DO NOT BEGIN SETTLEMENT REVIEW — RESOLVE READINESS OR CONTRADICTION CONDITIONS&quot;;IF([.W2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1]=&quot;&quot;;&quot;UNKNOWN&quot;;IF([.W231]&lt;&gt;&quot;REVIEW ELIGIBLE — NO AUTHORITY&quot;;&quot;BLOCKED — OUTCOME ASSERTED WITHOUT REVIEW ELIGIBILITY&quot;;IF(OR([.Y231]=&quot;REVIEWED — NO AUTHORITY&quot;;[.Y231]=&quot;REVIEW DEFERRED&quot;;[.Y231]=&quot;REVIEW BLOCKED&quot;);&quot;ACCEPTED INTAKE — NO AUTHORITY&quot;;&quot;BLOCKED — NONCANONICAL OUTCOME&quot;)))">
            <text:p>UNKNOWN</text:p>
          </table:table-cell>
          <table:table-cell office:value-type="string" table:formula="of:=IF([.Z231]=&quot;UNKNOWN&quot;;&quot;NO REVIEW OUTCOME ASSERTED — REMAINS UNKNOWN&quot;;IF([.Z231]=&quot;BLOCKED — OUTCOME ASSERTED WITHOUT REVIEW ELIGIBILITY&quot;;&quot;REMOVE OR CORRECT OUTCOME ASSERTION — REVIEW ELIGIBILITY REQUIRED FIRST&quot;;IF([.Z231]=&quot;BLOCKED — NONCANONICAL OUTCOME&quot;;&quot;CORRECT OUTCOME TO CANONICAL CONTROLLED VOCABULARY&quot;;IF([.Z2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1]=&quot;UNKNOWN&quot;;&quot;UNKNOWN&quot;;IF(OR([.Z231]=&quot;BLOCKED — OUTCOME ASSERTED WITHOUT REVIEW ELIGIBILITY&quot;;[.Z231]=&quot;BLOCKED — NONCANONICAL OUTCOME&quot;);&quot;BLOCKED&quot;;IF([.Z23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cell office:value-type="string" table:formula="of:=IF([.U232]=&quot;UNKNOWN&quot;;&quot;COMPLETE OR ASSERT REQUIRED EVIDENCE BEFORE REVIEW&quot;;IF([.U232]=&quot;BLOCKED&quot;;&quot;RESOLVE CONTRADICTION BEFORE REVIEW — NO AUTHORITY CREATED&quot;;IF([.U2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2]=&quot;READY FOR REVIEW&quot;;&quot;REVIEW ELIGIBLE — NO AUTHORITY&quot;;IF(OR([.U232]=&quot;UNKNOWN&quot;;[.U232]=&quot;BLOCKED&quot;);&quot;NOT REVIEW ELIGIBLE&quot;;&quot;NOT REVIEW ELIGIBLE&quot;))">
            <text:p>NOT REVIEW ELIGIBLE</text:p>
          </table:table-cell>
          <table:table-cell office:value-type="string" table:formula="of:=IF([.W232]=&quot;NOT REVIEW ELIGIBLE&quot;;&quot;DO NOT BEGIN SETTLEMENT REVIEW — RESOLVE READINESS OR CONTRADICTION CONDITIONS&quot;;IF([.W2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2]=&quot;&quot;;&quot;UNKNOWN&quot;;IF([.W232]&lt;&gt;&quot;REVIEW ELIGIBLE — NO AUTHORITY&quot;;&quot;BLOCKED — OUTCOME ASSERTED WITHOUT REVIEW ELIGIBILITY&quot;;IF(OR([.Y232]=&quot;REVIEWED — NO AUTHORITY&quot;;[.Y232]=&quot;REVIEW DEFERRED&quot;;[.Y232]=&quot;REVIEW BLOCKED&quot;);&quot;ACCEPTED INTAKE — NO AUTHORITY&quot;;&quot;BLOCKED — NONCANONICAL OUTCOME&quot;)))">
            <text:p>UNKNOWN</text:p>
          </table:table-cell>
          <table:table-cell office:value-type="string" table:formula="of:=IF([.Z232]=&quot;UNKNOWN&quot;;&quot;NO REVIEW OUTCOME ASSERTED — REMAINS UNKNOWN&quot;;IF([.Z232]=&quot;BLOCKED — OUTCOME ASSERTED WITHOUT REVIEW ELIGIBILITY&quot;;&quot;REMOVE OR CORRECT OUTCOME ASSERTION — REVIEW ELIGIBILITY REQUIRED FIRST&quot;;IF([.Z232]=&quot;BLOCKED — NONCANONICAL OUTCOME&quot;;&quot;CORRECT OUTCOME TO CANONICAL CONTROLLED VOCABULARY&quot;;IF([.Z2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2]=&quot;UNKNOWN&quot;;&quot;UNKNOWN&quot;;IF(OR([.Z232]=&quot;BLOCKED — OUTCOME ASSERTED WITHOUT REVIEW ELIGIBILITY&quot;;[.Z232]=&quot;BLOCKED — NONCANONICAL OUTCOME&quot;);&quot;BLOCKED&quot;;IF([.Z23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cell office:value-type="string" table:formula="of:=IF([.U233]=&quot;UNKNOWN&quot;;&quot;COMPLETE OR ASSERT REQUIRED EVIDENCE BEFORE REVIEW&quot;;IF([.U233]=&quot;BLOCKED&quot;;&quot;RESOLVE CONTRADICTION BEFORE REVIEW — NO AUTHORITY CREATED&quot;;IF([.U2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3]=&quot;READY FOR REVIEW&quot;;&quot;REVIEW ELIGIBLE — NO AUTHORITY&quot;;IF(OR([.U233]=&quot;UNKNOWN&quot;;[.U233]=&quot;BLOCKED&quot;);&quot;NOT REVIEW ELIGIBLE&quot;;&quot;NOT REVIEW ELIGIBLE&quot;))">
            <text:p>NOT REVIEW ELIGIBLE</text:p>
          </table:table-cell>
          <table:table-cell office:value-type="string" table:formula="of:=IF([.W233]=&quot;NOT REVIEW ELIGIBLE&quot;;&quot;DO NOT BEGIN SETTLEMENT REVIEW — RESOLVE READINESS OR CONTRADICTION CONDITIONS&quot;;IF([.W2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3]=&quot;&quot;;&quot;UNKNOWN&quot;;IF([.W233]&lt;&gt;&quot;REVIEW ELIGIBLE — NO AUTHORITY&quot;;&quot;BLOCKED — OUTCOME ASSERTED WITHOUT REVIEW ELIGIBILITY&quot;;IF(OR([.Y233]=&quot;REVIEWED — NO AUTHORITY&quot;;[.Y233]=&quot;REVIEW DEFERRED&quot;;[.Y233]=&quot;REVIEW BLOCKED&quot;);&quot;ACCEPTED INTAKE — NO AUTHORITY&quot;;&quot;BLOCKED — NONCANONICAL OUTCOME&quot;)))">
            <text:p>UNKNOWN</text:p>
          </table:table-cell>
          <table:table-cell office:value-type="string" table:formula="of:=IF([.Z233]=&quot;UNKNOWN&quot;;&quot;NO REVIEW OUTCOME ASSERTED — REMAINS UNKNOWN&quot;;IF([.Z233]=&quot;BLOCKED — OUTCOME ASSERTED WITHOUT REVIEW ELIGIBILITY&quot;;&quot;REMOVE OR CORRECT OUTCOME ASSERTION — REVIEW ELIGIBILITY REQUIRED FIRST&quot;;IF([.Z233]=&quot;BLOCKED — NONCANONICAL OUTCOME&quot;;&quot;CORRECT OUTCOME TO CANONICAL CONTROLLED VOCABULARY&quot;;IF([.Z2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3]=&quot;UNKNOWN&quot;;&quot;UNKNOWN&quot;;IF(OR([.Z233]=&quot;BLOCKED — OUTCOME ASSERTED WITHOUT REVIEW ELIGIBILITY&quot;;[.Z233]=&quot;BLOCKED — NONCANONICAL OUTCOME&quot;);&quot;BLOCKED&quot;;IF([.Z23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cell office:value-type="string" table:formula="of:=IF([.U234]=&quot;UNKNOWN&quot;;&quot;COMPLETE OR ASSERT REQUIRED EVIDENCE BEFORE REVIEW&quot;;IF([.U234]=&quot;BLOCKED&quot;;&quot;RESOLVE CONTRADICTION BEFORE REVIEW — NO AUTHORITY CREATED&quot;;IF([.U2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4]=&quot;READY FOR REVIEW&quot;;&quot;REVIEW ELIGIBLE — NO AUTHORITY&quot;;IF(OR([.U234]=&quot;UNKNOWN&quot;;[.U234]=&quot;BLOCKED&quot;);&quot;NOT REVIEW ELIGIBLE&quot;;&quot;NOT REVIEW ELIGIBLE&quot;))">
            <text:p>NOT REVIEW ELIGIBLE</text:p>
          </table:table-cell>
          <table:table-cell office:value-type="string" table:formula="of:=IF([.W234]=&quot;NOT REVIEW ELIGIBLE&quot;;&quot;DO NOT BEGIN SETTLEMENT REVIEW — RESOLVE READINESS OR CONTRADICTION CONDITIONS&quot;;IF([.W2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4]=&quot;&quot;;&quot;UNKNOWN&quot;;IF([.W234]&lt;&gt;&quot;REVIEW ELIGIBLE — NO AUTHORITY&quot;;&quot;BLOCKED — OUTCOME ASSERTED WITHOUT REVIEW ELIGIBILITY&quot;;IF(OR([.Y234]=&quot;REVIEWED — NO AUTHORITY&quot;;[.Y234]=&quot;REVIEW DEFERRED&quot;;[.Y234]=&quot;REVIEW BLOCKED&quot;);&quot;ACCEPTED INTAKE — NO AUTHORITY&quot;;&quot;BLOCKED — NONCANONICAL OUTCOME&quot;)))">
            <text:p>UNKNOWN</text:p>
          </table:table-cell>
          <table:table-cell office:value-type="string" table:formula="of:=IF([.Z234]=&quot;UNKNOWN&quot;;&quot;NO REVIEW OUTCOME ASSERTED — REMAINS UNKNOWN&quot;;IF([.Z234]=&quot;BLOCKED — OUTCOME ASSERTED WITHOUT REVIEW ELIGIBILITY&quot;;&quot;REMOVE OR CORRECT OUTCOME ASSERTION — REVIEW ELIGIBILITY REQUIRED FIRST&quot;;IF([.Z234]=&quot;BLOCKED — NONCANONICAL OUTCOME&quot;;&quot;CORRECT OUTCOME TO CANONICAL CONTROLLED VOCABULARY&quot;;IF([.Z2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4]=&quot;UNKNOWN&quot;;&quot;UNKNOWN&quot;;IF(OR([.Z234]=&quot;BLOCKED — OUTCOME ASSERTED WITHOUT REVIEW ELIGIBILITY&quot;;[.Z234]=&quot;BLOCKED — NONCANONICAL OUTCOME&quot;);&quot;BLOCKED&quot;;IF([.Z23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cell office:value-type="string" table:formula="of:=IF([.U235]=&quot;UNKNOWN&quot;;&quot;COMPLETE OR ASSERT REQUIRED EVIDENCE BEFORE REVIEW&quot;;IF([.U235]=&quot;BLOCKED&quot;;&quot;RESOLVE CONTRADICTION BEFORE REVIEW — NO AUTHORITY CREATED&quot;;IF([.U2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5]=&quot;READY FOR REVIEW&quot;;&quot;REVIEW ELIGIBLE — NO AUTHORITY&quot;;IF(OR([.U235]=&quot;UNKNOWN&quot;;[.U235]=&quot;BLOCKED&quot;);&quot;NOT REVIEW ELIGIBLE&quot;;&quot;NOT REVIEW ELIGIBLE&quot;))">
            <text:p>NOT REVIEW ELIGIBLE</text:p>
          </table:table-cell>
          <table:table-cell office:value-type="string" table:formula="of:=IF([.W235]=&quot;NOT REVIEW ELIGIBLE&quot;;&quot;DO NOT BEGIN SETTLEMENT REVIEW — RESOLVE READINESS OR CONTRADICTION CONDITIONS&quot;;IF([.W2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5]=&quot;&quot;;&quot;UNKNOWN&quot;;IF([.W235]&lt;&gt;&quot;REVIEW ELIGIBLE — NO AUTHORITY&quot;;&quot;BLOCKED — OUTCOME ASSERTED WITHOUT REVIEW ELIGIBILITY&quot;;IF(OR([.Y235]=&quot;REVIEWED — NO AUTHORITY&quot;;[.Y235]=&quot;REVIEW DEFERRED&quot;;[.Y235]=&quot;REVIEW BLOCKED&quot;);&quot;ACCEPTED INTAKE — NO AUTHORITY&quot;;&quot;BLOCKED — NONCANONICAL OUTCOME&quot;)))">
            <text:p>UNKNOWN</text:p>
          </table:table-cell>
          <table:table-cell office:value-type="string" table:formula="of:=IF([.Z235]=&quot;UNKNOWN&quot;;&quot;NO REVIEW OUTCOME ASSERTED — REMAINS UNKNOWN&quot;;IF([.Z235]=&quot;BLOCKED — OUTCOME ASSERTED WITHOUT REVIEW ELIGIBILITY&quot;;&quot;REMOVE OR CORRECT OUTCOME ASSERTION — REVIEW ELIGIBILITY REQUIRED FIRST&quot;;IF([.Z235]=&quot;BLOCKED — NONCANONICAL OUTCOME&quot;;&quot;CORRECT OUTCOME TO CANONICAL CONTROLLED VOCABULARY&quot;;IF([.Z2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5]=&quot;UNKNOWN&quot;;&quot;UNKNOWN&quot;;IF(OR([.Z235]=&quot;BLOCKED — OUTCOME ASSERTED WITHOUT REVIEW ELIGIBILITY&quot;;[.Z235]=&quot;BLOCKED — NONCANONICAL OUTCOME&quot;);&quot;BLOCKED&quot;;IF([.Z23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cell office:value-type="string" table:formula="of:=IF([.U236]=&quot;UNKNOWN&quot;;&quot;COMPLETE OR ASSERT REQUIRED EVIDENCE BEFORE REVIEW&quot;;IF([.U236]=&quot;BLOCKED&quot;;&quot;RESOLVE CONTRADICTION BEFORE REVIEW — NO AUTHORITY CREATED&quot;;IF([.U2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6]=&quot;READY FOR REVIEW&quot;;&quot;REVIEW ELIGIBLE — NO AUTHORITY&quot;;IF(OR([.U236]=&quot;UNKNOWN&quot;;[.U236]=&quot;BLOCKED&quot;);&quot;NOT REVIEW ELIGIBLE&quot;;&quot;NOT REVIEW ELIGIBLE&quot;))">
            <text:p>NOT REVIEW ELIGIBLE</text:p>
          </table:table-cell>
          <table:table-cell office:value-type="string" table:formula="of:=IF([.W236]=&quot;NOT REVIEW ELIGIBLE&quot;;&quot;DO NOT BEGIN SETTLEMENT REVIEW — RESOLVE READINESS OR CONTRADICTION CONDITIONS&quot;;IF([.W2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6]=&quot;&quot;;&quot;UNKNOWN&quot;;IF([.W236]&lt;&gt;&quot;REVIEW ELIGIBLE — NO AUTHORITY&quot;;&quot;BLOCKED — OUTCOME ASSERTED WITHOUT REVIEW ELIGIBILITY&quot;;IF(OR([.Y236]=&quot;REVIEWED — NO AUTHORITY&quot;;[.Y236]=&quot;REVIEW DEFERRED&quot;;[.Y236]=&quot;REVIEW BLOCKED&quot;);&quot;ACCEPTED INTAKE — NO AUTHORITY&quot;;&quot;BLOCKED — NONCANONICAL OUTCOME&quot;)))">
            <text:p>UNKNOWN</text:p>
          </table:table-cell>
          <table:table-cell office:value-type="string" table:formula="of:=IF([.Z236]=&quot;UNKNOWN&quot;;&quot;NO REVIEW OUTCOME ASSERTED — REMAINS UNKNOWN&quot;;IF([.Z236]=&quot;BLOCKED — OUTCOME ASSERTED WITHOUT REVIEW ELIGIBILITY&quot;;&quot;REMOVE OR CORRECT OUTCOME ASSERTION — REVIEW ELIGIBILITY REQUIRED FIRST&quot;;IF([.Z236]=&quot;BLOCKED — NONCANONICAL OUTCOME&quot;;&quot;CORRECT OUTCOME TO CANONICAL CONTROLLED VOCABULARY&quot;;IF([.Z2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6]=&quot;UNKNOWN&quot;;&quot;UNKNOWN&quot;;IF(OR([.Z236]=&quot;BLOCKED — OUTCOME ASSERTED WITHOUT REVIEW ELIGIBILITY&quot;;[.Z236]=&quot;BLOCKED — NONCANONICAL OUTCOME&quot;);&quot;BLOCKED&quot;;IF([.Z23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cell office:value-type="string" table:formula="of:=IF([.U237]=&quot;UNKNOWN&quot;;&quot;COMPLETE OR ASSERT REQUIRED EVIDENCE BEFORE REVIEW&quot;;IF([.U237]=&quot;BLOCKED&quot;;&quot;RESOLVE CONTRADICTION BEFORE REVIEW — NO AUTHORITY CREATED&quot;;IF([.U2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7]=&quot;READY FOR REVIEW&quot;;&quot;REVIEW ELIGIBLE — NO AUTHORITY&quot;;IF(OR([.U237]=&quot;UNKNOWN&quot;;[.U237]=&quot;BLOCKED&quot;);&quot;NOT REVIEW ELIGIBLE&quot;;&quot;NOT REVIEW ELIGIBLE&quot;))">
            <text:p>NOT REVIEW ELIGIBLE</text:p>
          </table:table-cell>
          <table:table-cell office:value-type="string" table:formula="of:=IF([.W237]=&quot;NOT REVIEW ELIGIBLE&quot;;&quot;DO NOT BEGIN SETTLEMENT REVIEW — RESOLVE READINESS OR CONTRADICTION CONDITIONS&quot;;IF([.W2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7]=&quot;&quot;;&quot;UNKNOWN&quot;;IF([.W237]&lt;&gt;&quot;REVIEW ELIGIBLE — NO AUTHORITY&quot;;&quot;BLOCKED — OUTCOME ASSERTED WITHOUT REVIEW ELIGIBILITY&quot;;IF(OR([.Y237]=&quot;REVIEWED — NO AUTHORITY&quot;;[.Y237]=&quot;REVIEW DEFERRED&quot;;[.Y237]=&quot;REVIEW BLOCKED&quot;);&quot;ACCEPTED INTAKE — NO AUTHORITY&quot;;&quot;BLOCKED — NONCANONICAL OUTCOME&quot;)))">
            <text:p>UNKNOWN</text:p>
          </table:table-cell>
          <table:table-cell office:value-type="string" table:formula="of:=IF([.Z237]=&quot;UNKNOWN&quot;;&quot;NO REVIEW OUTCOME ASSERTED — REMAINS UNKNOWN&quot;;IF([.Z237]=&quot;BLOCKED — OUTCOME ASSERTED WITHOUT REVIEW ELIGIBILITY&quot;;&quot;REMOVE OR CORRECT OUTCOME ASSERTION — REVIEW ELIGIBILITY REQUIRED FIRST&quot;;IF([.Z237]=&quot;BLOCKED — NONCANONICAL OUTCOME&quot;;&quot;CORRECT OUTCOME TO CANONICAL CONTROLLED VOCABULARY&quot;;IF([.Z2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7]=&quot;UNKNOWN&quot;;&quot;UNKNOWN&quot;;IF(OR([.Z237]=&quot;BLOCKED — OUTCOME ASSERTED WITHOUT REVIEW ELIGIBILITY&quot;;[.Z237]=&quot;BLOCKED — NONCANONICAL OUTCOME&quot;);&quot;BLOCKED&quot;;IF([.Z23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cell office:value-type="string" table:formula="of:=IF([.U238]=&quot;UNKNOWN&quot;;&quot;COMPLETE OR ASSERT REQUIRED EVIDENCE BEFORE REVIEW&quot;;IF([.U238]=&quot;BLOCKED&quot;;&quot;RESOLVE CONTRADICTION BEFORE REVIEW — NO AUTHORITY CREATED&quot;;IF([.U2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8]=&quot;READY FOR REVIEW&quot;;&quot;REVIEW ELIGIBLE — NO AUTHORITY&quot;;IF(OR([.U238]=&quot;UNKNOWN&quot;;[.U238]=&quot;BLOCKED&quot;);&quot;NOT REVIEW ELIGIBLE&quot;;&quot;NOT REVIEW ELIGIBLE&quot;))">
            <text:p>NOT REVIEW ELIGIBLE</text:p>
          </table:table-cell>
          <table:table-cell office:value-type="string" table:formula="of:=IF([.W238]=&quot;NOT REVIEW ELIGIBLE&quot;;&quot;DO NOT BEGIN SETTLEMENT REVIEW — RESOLVE READINESS OR CONTRADICTION CONDITIONS&quot;;IF([.W2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8]=&quot;&quot;;&quot;UNKNOWN&quot;;IF([.W238]&lt;&gt;&quot;REVIEW ELIGIBLE — NO AUTHORITY&quot;;&quot;BLOCKED — OUTCOME ASSERTED WITHOUT REVIEW ELIGIBILITY&quot;;IF(OR([.Y238]=&quot;REVIEWED — NO AUTHORITY&quot;;[.Y238]=&quot;REVIEW DEFERRED&quot;;[.Y238]=&quot;REVIEW BLOCKED&quot;);&quot;ACCEPTED INTAKE — NO AUTHORITY&quot;;&quot;BLOCKED — NONCANONICAL OUTCOME&quot;)))">
            <text:p>UNKNOWN</text:p>
          </table:table-cell>
          <table:table-cell office:value-type="string" table:formula="of:=IF([.Z238]=&quot;UNKNOWN&quot;;&quot;NO REVIEW OUTCOME ASSERTED — REMAINS UNKNOWN&quot;;IF([.Z238]=&quot;BLOCKED — OUTCOME ASSERTED WITHOUT REVIEW ELIGIBILITY&quot;;&quot;REMOVE OR CORRECT OUTCOME ASSERTION — REVIEW ELIGIBILITY REQUIRED FIRST&quot;;IF([.Z238]=&quot;BLOCKED — NONCANONICAL OUTCOME&quot;;&quot;CORRECT OUTCOME TO CANONICAL CONTROLLED VOCABULARY&quot;;IF([.Z2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8]=&quot;UNKNOWN&quot;;&quot;UNKNOWN&quot;;IF(OR([.Z238]=&quot;BLOCKED — OUTCOME ASSERTED WITHOUT REVIEW ELIGIBILITY&quot;;[.Z238]=&quot;BLOCKED — NONCANONICAL OUTCOME&quot;);&quot;BLOCKED&quot;;IF([.Z23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cell office:value-type="string" table:formula="of:=IF([.U239]=&quot;UNKNOWN&quot;;&quot;COMPLETE OR ASSERT REQUIRED EVIDENCE BEFORE REVIEW&quot;;IF([.U239]=&quot;BLOCKED&quot;;&quot;RESOLVE CONTRADICTION BEFORE REVIEW — NO AUTHORITY CREATED&quot;;IF([.U2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9]=&quot;READY FOR REVIEW&quot;;&quot;REVIEW ELIGIBLE — NO AUTHORITY&quot;;IF(OR([.U239]=&quot;UNKNOWN&quot;;[.U239]=&quot;BLOCKED&quot;);&quot;NOT REVIEW ELIGIBLE&quot;;&quot;NOT REVIEW ELIGIBLE&quot;))">
            <text:p>NOT REVIEW ELIGIBLE</text:p>
          </table:table-cell>
          <table:table-cell office:value-type="string" table:formula="of:=IF([.W239]=&quot;NOT REVIEW ELIGIBLE&quot;;&quot;DO NOT BEGIN SETTLEMENT REVIEW — RESOLVE READINESS OR CONTRADICTION CONDITIONS&quot;;IF([.W2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9]=&quot;&quot;;&quot;UNKNOWN&quot;;IF([.W239]&lt;&gt;&quot;REVIEW ELIGIBLE — NO AUTHORITY&quot;;&quot;BLOCKED — OUTCOME ASSERTED WITHOUT REVIEW ELIGIBILITY&quot;;IF(OR([.Y239]=&quot;REVIEWED — NO AUTHORITY&quot;;[.Y239]=&quot;REVIEW DEFERRED&quot;;[.Y239]=&quot;REVIEW BLOCKED&quot;);&quot;ACCEPTED INTAKE — NO AUTHORITY&quot;;&quot;BLOCKED — NONCANONICAL OUTCOME&quot;)))">
            <text:p>UNKNOWN</text:p>
          </table:table-cell>
          <table:table-cell office:value-type="string" table:formula="of:=IF([.Z239]=&quot;UNKNOWN&quot;;&quot;NO REVIEW OUTCOME ASSERTED — REMAINS UNKNOWN&quot;;IF([.Z239]=&quot;BLOCKED — OUTCOME ASSERTED WITHOUT REVIEW ELIGIBILITY&quot;;&quot;REMOVE OR CORRECT OUTCOME ASSERTION — REVIEW ELIGIBILITY REQUIRED FIRST&quot;;IF([.Z239]=&quot;BLOCKED — NONCANONICAL OUTCOME&quot;;&quot;CORRECT OUTCOME TO CANONICAL CONTROLLED VOCABULARY&quot;;IF([.Z2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39]=&quot;UNKNOWN&quot;;&quot;UNKNOWN&quot;;IF(OR([.Z239]=&quot;BLOCKED — OUTCOME ASSERTED WITHOUT REVIEW ELIGIBILITY&quot;;[.Z239]=&quot;BLOCKED — NONCANONICAL OUTCOME&quot;);&quot;BLOCKED&quot;;IF([.Z23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cell office:value-type="string" table:formula="of:=IF([.U240]=&quot;UNKNOWN&quot;;&quot;COMPLETE OR ASSERT REQUIRED EVIDENCE BEFORE REVIEW&quot;;IF([.U240]=&quot;BLOCKED&quot;;&quot;RESOLVE CONTRADICTION BEFORE REVIEW — NO AUTHORITY CREATED&quot;;IF([.U2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0]=&quot;READY FOR REVIEW&quot;;&quot;REVIEW ELIGIBLE — NO AUTHORITY&quot;;IF(OR([.U240]=&quot;UNKNOWN&quot;;[.U240]=&quot;BLOCKED&quot;);&quot;NOT REVIEW ELIGIBLE&quot;;&quot;NOT REVIEW ELIGIBLE&quot;))">
            <text:p>NOT REVIEW ELIGIBLE</text:p>
          </table:table-cell>
          <table:table-cell office:value-type="string" table:formula="of:=IF([.W240]=&quot;NOT REVIEW ELIGIBLE&quot;;&quot;DO NOT BEGIN SETTLEMENT REVIEW — RESOLVE READINESS OR CONTRADICTION CONDITIONS&quot;;IF([.W2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0]=&quot;&quot;;&quot;UNKNOWN&quot;;IF([.W240]&lt;&gt;&quot;REVIEW ELIGIBLE — NO AUTHORITY&quot;;&quot;BLOCKED — OUTCOME ASSERTED WITHOUT REVIEW ELIGIBILITY&quot;;IF(OR([.Y240]=&quot;REVIEWED — NO AUTHORITY&quot;;[.Y240]=&quot;REVIEW DEFERRED&quot;;[.Y240]=&quot;REVIEW BLOCKED&quot;);&quot;ACCEPTED INTAKE — NO AUTHORITY&quot;;&quot;BLOCKED — NONCANONICAL OUTCOME&quot;)))">
            <text:p>UNKNOWN</text:p>
          </table:table-cell>
          <table:table-cell office:value-type="string" table:formula="of:=IF([.Z240]=&quot;UNKNOWN&quot;;&quot;NO REVIEW OUTCOME ASSERTED — REMAINS UNKNOWN&quot;;IF([.Z240]=&quot;BLOCKED — OUTCOME ASSERTED WITHOUT REVIEW ELIGIBILITY&quot;;&quot;REMOVE OR CORRECT OUTCOME ASSERTION — REVIEW ELIGIBILITY REQUIRED FIRST&quot;;IF([.Z240]=&quot;BLOCKED — NONCANONICAL OUTCOME&quot;;&quot;CORRECT OUTCOME TO CANONICAL CONTROLLED VOCABULARY&quot;;IF([.Z2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0]=&quot;UNKNOWN&quot;;&quot;UNKNOWN&quot;;IF(OR([.Z240]=&quot;BLOCKED — OUTCOME ASSERTED WITHOUT REVIEW ELIGIBILITY&quot;;[.Z240]=&quot;BLOCKED — NONCANONICAL OUTCOME&quot;);&quot;BLOCKED&quot;;IF([.Z24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cell office:value-type="string" table:formula="of:=IF([.U241]=&quot;UNKNOWN&quot;;&quot;COMPLETE OR ASSERT REQUIRED EVIDENCE BEFORE REVIEW&quot;;IF([.U241]=&quot;BLOCKED&quot;;&quot;RESOLVE CONTRADICTION BEFORE REVIEW — NO AUTHORITY CREATED&quot;;IF([.U2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1]=&quot;READY FOR REVIEW&quot;;&quot;REVIEW ELIGIBLE — NO AUTHORITY&quot;;IF(OR([.U241]=&quot;UNKNOWN&quot;;[.U241]=&quot;BLOCKED&quot;);&quot;NOT REVIEW ELIGIBLE&quot;;&quot;NOT REVIEW ELIGIBLE&quot;))">
            <text:p>NOT REVIEW ELIGIBLE</text:p>
          </table:table-cell>
          <table:table-cell office:value-type="string" table:formula="of:=IF([.W241]=&quot;NOT REVIEW ELIGIBLE&quot;;&quot;DO NOT BEGIN SETTLEMENT REVIEW — RESOLVE READINESS OR CONTRADICTION CONDITIONS&quot;;IF([.W2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1]=&quot;&quot;;&quot;UNKNOWN&quot;;IF([.W241]&lt;&gt;&quot;REVIEW ELIGIBLE — NO AUTHORITY&quot;;&quot;BLOCKED — OUTCOME ASSERTED WITHOUT REVIEW ELIGIBILITY&quot;;IF(OR([.Y241]=&quot;REVIEWED — NO AUTHORITY&quot;;[.Y241]=&quot;REVIEW DEFERRED&quot;;[.Y241]=&quot;REVIEW BLOCKED&quot;);&quot;ACCEPTED INTAKE — NO AUTHORITY&quot;;&quot;BLOCKED — NONCANONICAL OUTCOME&quot;)))">
            <text:p>UNKNOWN</text:p>
          </table:table-cell>
          <table:table-cell office:value-type="string" table:formula="of:=IF([.Z241]=&quot;UNKNOWN&quot;;&quot;NO REVIEW OUTCOME ASSERTED — REMAINS UNKNOWN&quot;;IF([.Z241]=&quot;BLOCKED — OUTCOME ASSERTED WITHOUT REVIEW ELIGIBILITY&quot;;&quot;REMOVE OR CORRECT OUTCOME ASSERTION — REVIEW ELIGIBILITY REQUIRED FIRST&quot;;IF([.Z241]=&quot;BLOCKED — NONCANONICAL OUTCOME&quot;;&quot;CORRECT OUTCOME TO CANONICAL CONTROLLED VOCABULARY&quot;;IF([.Z2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1]=&quot;UNKNOWN&quot;;&quot;UNKNOWN&quot;;IF(OR([.Z241]=&quot;BLOCKED — OUTCOME ASSERTED WITHOUT REVIEW ELIGIBILITY&quot;;[.Z241]=&quot;BLOCKED — NONCANONICAL OUTCOME&quot;);&quot;BLOCKED&quot;;IF([.Z241]=&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cell office:value-type="string" table:formula="of:=IF([.U242]=&quot;UNKNOWN&quot;;&quot;COMPLETE OR ASSERT REQUIRED EVIDENCE BEFORE REVIEW&quot;;IF([.U242]=&quot;BLOCKED&quot;;&quot;RESOLVE CONTRADICTION BEFORE REVIEW — NO AUTHORITY CREATED&quot;;IF([.U2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2]=&quot;READY FOR REVIEW&quot;;&quot;REVIEW ELIGIBLE — NO AUTHORITY&quot;;IF(OR([.U242]=&quot;UNKNOWN&quot;;[.U242]=&quot;BLOCKED&quot;);&quot;NOT REVIEW ELIGIBLE&quot;;&quot;NOT REVIEW ELIGIBLE&quot;))">
            <text:p>NOT REVIEW ELIGIBLE</text:p>
          </table:table-cell>
          <table:table-cell office:value-type="string" table:formula="of:=IF([.W242]=&quot;NOT REVIEW ELIGIBLE&quot;;&quot;DO NOT BEGIN SETTLEMENT REVIEW — RESOLVE READINESS OR CONTRADICTION CONDITIONS&quot;;IF([.W2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2]=&quot;&quot;;&quot;UNKNOWN&quot;;IF([.W242]&lt;&gt;&quot;REVIEW ELIGIBLE — NO AUTHORITY&quot;;&quot;BLOCKED — OUTCOME ASSERTED WITHOUT REVIEW ELIGIBILITY&quot;;IF(OR([.Y242]=&quot;REVIEWED — NO AUTHORITY&quot;;[.Y242]=&quot;REVIEW DEFERRED&quot;;[.Y242]=&quot;REVIEW BLOCKED&quot;);&quot;ACCEPTED INTAKE — NO AUTHORITY&quot;;&quot;BLOCKED — NONCANONICAL OUTCOME&quot;)))">
            <text:p>UNKNOWN</text:p>
          </table:table-cell>
          <table:table-cell office:value-type="string" table:formula="of:=IF([.Z242]=&quot;UNKNOWN&quot;;&quot;NO REVIEW OUTCOME ASSERTED — REMAINS UNKNOWN&quot;;IF([.Z242]=&quot;BLOCKED — OUTCOME ASSERTED WITHOUT REVIEW ELIGIBILITY&quot;;&quot;REMOVE OR CORRECT OUTCOME ASSERTION — REVIEW ELIGIBILITY REQUIRED FIRST&quot;;IF([.Z242]=&quot;BLOCKED — NONCANONICAL OUTCOME&quot;;&quot;CORRECT OUTCOME TO CANONICAL CONTROLLED VOCABULARY&quot;;IF([.Z2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2]=&quot;UNKNOWN&quot;;&quot;UNKNOWN&quot;;IF(OR([.Z242]=&quot;BLOCKED — OUTCOME ASSERTED WITHOUT REVIEW ELIGIBILITY&quot;;[.Z242]=&quot;BLOCKED — NONCANONICAL OUTCOME&quot;);&quot;BLOCKED&quot;;IF([.Z242]=&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cell office:value-type="string" table:formula="of:=IF([.U243]=&quot;UNKNOWN&quot;;&quot;COMPLETE OR ASSERT REQUIRED EVIDENCE BEFORE REVIEW&quot;;IF([.U243]=&quot;BLOCKED&quot;;&quot;RESOLVE CONTRADICTION BEFORE REVIEW — NO AUTHORITY CREATED&quot;;IF([.U2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3]=&quot;READY FOR REVIEW&quot;;&quot;REVIEW ELIGIBLE — NO AUTHORITY&quot;;IF(OR([.U243]=&quot;UNKNOWN&quot;;[.U243]=&quot;BLOCKED&quot;);&quot;NOT REVIEW ELIGIBLE&quot;;&quot;NOT REVIEW ELIGIBLE&quot;))">
            <text:p>NOT REVIEW ELIGIBLE</text:p>
          </table:table-cell>
          <table:table-cell office:value-type="string" table:formula="of:=IF([.W243]=&quot;NOT REVIEW ELIGIBLE&quot;;&quot;DO NOT BEGIN SETTLEMENT REVIEW — RESOLVE READINESS OR CONTRADICTION CONDITIONS&quot;;IF([.W2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3]=&quot;&quot;;&quot;UNKNOWN&quot;;IF([.W243]&lt;&gt;&quot;REVIEW ELIGIBLE — NO AUTHORITY&quot;;&quot;BLOCKED — OUTCOME ASSERTED WITHOUT REVIEW ELIGIBILITY&quot;;IF(OR([.Y243]=&quot;REVIEWED — NO AUTHORITY&quot;;[.Y243]=&quot;REVIEW DEFERRED&quot;;[.Y243]=&quot;REVIEW BLOCKED&quot;);&quot;ACCEPTED INTAKE — NO AUTHORITY&quot;;&quot;BLOCKED — NONCANONICAL OUTCOME&quot;)))">
            <text:p>UNKNOWN</text:p>
          </table:table-cell>
          <table:table-cell office:value-type="string" table:formula="of:=IF([.Z243]=&quot;UNKNOWN&quot;;&quot;NO REVIEW OUTCOME ASSERTED — REMAINS UNKNOWN&quot;;IF([.Z243]=&quot;BLOCKED — OUTCOME ASSERTED WITHOUT REVIEW ELIGIBILITY&quot;;&quot;REMOVE OR CORRECT OUTCOME ASSERTION — REVIEW ELIGIBILITY REQUIRED FIRST&quot;;IF([.Z243]=&quot;BLOCKED — NONCANONICAL OUTCOME&quot;;&quot;CORRECT OUTCOME TO CANONICAL CONTROLLED VOCABULARY&quot;;IF([.Z2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3]=&quot;UNKNOWN&quot;;&quot;UNKNOWN&quot;;IF(OR([.Z243]=&quot;BLOCKED — OUTCOME ASSERTED WITHOUT REVIEW ELIGIBILITY&quot;;[.Z243]=&quot;BLOCKED — NONCANONICAL OUTCOME&quot;);&quot;BLOCKED&quot;;IF([.Z243]=&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cell office:value-type="string" table:formula="of:=IF([.U244]=&quot;UNKNOWN&quot;;&quot;COMPLETE OR ASSERT REQUIRED EVIDENCE BEFORE REVIEW&quot;;IF([.U244]=&quot;BLOCKED&quot;;&quot;RESOLVE CONTRADICTION BEFORE REVIEW — NO AUTHORITY CREATED&quot;;IF([.U2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4]=&quot;READY FOR REVIEW&quot;;&quot;REVIEW ELIGIBLE — NO AUTHORITY&quot;;IF(OR([.U244]=&quot;UNKNOWN&quot;;[.U244]=&quot;BLOCKED&quot;);&quot;NOT REVIEW ELIGIBLE&quot;;&quot;NOT REVIEW ELIGIBLE&quot;))">
            <text:p>NOT REVIEW ELIGIBLE</text:p>
          </table:table-cell>
          <table:table-cell office:value-type="string" table:formula="of:=IF([.W244]=&quot;NOT REVIEW ELIGIBLE&quot;;&quot;DO NOT BEGIN SETTLEMENT REVIEW — RESOLVE READINESS OR CONTRADICTION CONDITIONS&quot;;IF([.W2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4]=&quot;&quot;;&quot;UNKNOWN&quot;;IF([.W244]&lt;&gt;&quot;REVIEW ELIGIBLE — NO AUTHORITY&quot;;&quot;BLOCKED — OUTCOME ASSERTED WITHOUT REVIEW ELIGIBILITY&quot;;IF(OR([.Y244]=&quot;REVIEWED — NO AUTHORITY&quot;;[.Y244]=&quot;REVIEW DEFERRED&quot;;[.Y244]=&quot;REVIEW BLOCKED&quot;);&quot;ACCEPTED INTAKE — NO AUTHORITY&quot;;&quot;BLOCKED — NONCANONICAL OUTCOME&quot;)))">
            <text:p>UNKNOWN</text:p>
          </table:table-cell>
          <table:table-cell office:value-type="string" table:formula="of:=IF([.Z244]=&quot;UNKNOWN&quot;;&quot;NO REVIEW OUTCOME ASSERTED — REMAINS UNKNOWN&quot;;IF([.Z244]=&quot;BLOCKED — OUTCOME ASSERTED WITHOUT REVIEW ELIGIBILITY&quot;;&quot;REMOVE OR CORRECT OUTCOME ASSERTION — REVIEW ELIGIBILITY REQUIRED FIRST&quot;;IF([.Z244]=&quot;BLOCKED — NONCANONICAL OUTCOME&quot;;&quot;CORRECT OUTCOME TO CANONICAL CONTROLLED VOCABULARY&quot;;IF([.Z2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4]=&quot;UNKNOWN&quot;;&quot;UNKNOWN&quot;;IF(OR([.Z244]=&quot;BLOCKED — OUTCOME ASSERTED WITHOUT REVIEW ELIGIBILITY&quot;;[.Z244]=&quot;BLOCKED — NONCANONICAL OUTCOME&quot;);&quot;BLOCKED&quot;;IF([.Z244]=&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cell office:value-type="string" table:formula="of:=IF([.U245]=&quot;UNKNOWN&quot;;&quot;COMPLETE OR ASSERT REQUIRED EVIDENCE BEFORE REVIEW&quot;;IF([.U245]=&quot;BLOCKED&quot;;&quot;RESOLVE CONTRADICTION BEFORE REVIEW — NO AUTHORITY CREATED&quot;;IF([.U2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5]=&quot;READY FOR REVIEW&quot;;&quot;REVIEW ELIGIBLE — NO AUTHORITY&quot;;IF(OR([.U245]=&quot;UNKNOWN&quot;;[.U245]=&quot;BLOCKED&quot;);&quot;NOT REVIEW ELIGIBLE&quot;;&quot;NOT REVIEW ELIGIBLE&quot;))">
            <text:p>NOT REVIEW ELIGIBLE</text:p>
          </table:table-cell>
          <table:table-cell office:value-type="string" table:formula="of:=IF([.W245]=&quot;NOT REVIEW ELIGIBLE&quot;;&quot;DO NOT BEGIN SETTLEMENT REVIEW — RESOLVE READINESS OR CONTRADICTION CONDITIONS&quot;;IF([.W2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5]=&quot;&quot;;&quot;UNKNOWN&quot;;IF([.W245]&lt;&gt;&quot;REVIEW ELIGIBLE — NO AUTHORITY&quot;;&quot;BLOCKED — OUTCOME ASSERTED WITHOUT REVIEW ELIGIBILITY&quot;;IF(OR([.Y245]=&quot;REVIEWED — NO AUTHORITY&quot;;[.Y245]=&quot;REVIEW DEFERRED&quot;;[.Y245]=&quot;REVIEW BLOCKED&quot;);&quot;ACCEPTED INTAKE — NO AUTHORITY&quot;;&quot;BLOCKED — NONCANONICAL OUTCOME&quot;)))">
            <text:p>UNKNOWN</text:p>
          </table:table-cell>
          <table:table-cell office:value-type="string" table:formula="of:=IF([.Z245]=&quot;UNKNOWN&quot;;&quot;NO REVIEW OUTCOME ASSERTED — REMAINS UNKNOWN&quot;;IF([.Z245]=&quot;BLOCKED — OUTCOME ASSERTED WITHOUT REVIEW ELIGIBILITY&quot;;&quot;REMOVE OR CORRECT OUTCOME ASSERTION — REVIEW ELIGIBILITY REQUIRED FIRST&quot;;IF([.Z245]=&quot;BLOCKED — NONCANONICAL OUTCOME&quot;;&quot;CORRECT OUTCOME TO CANONICAL CONTROLLED VOCABULARY&quot;;IF([.Z2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5]=&quot;UNKNOWN&quot;;&quot;UNKNOWN&quot;;IF(OR([.Z245]=&quot;BLOCKED — OUTCOME ASSERTED WITHOUT REVIEW ELIGIBILITY&quot;;[.Z245]=&quot;BLOCKED — NONCANONICAL OUTCOME&quot;);&quot;BLOCKED&quot;;IF([.Z245]=&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cell office:value-type="string" table:formula="of:=IF([.U246]=&quot;UNKNOWN&quot;;&quot;COMPLETE OR ASSERT REQUIRED EVIDENCE BEFORE REVIEW&quot;;IF([.U246]=&quot;BLOCKED&quot;;&quot;RESOLVE CONTRADICTION BEFORE REVIEW — NO AUTHORITY CREATED&quot;;IF([.U2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6]=&quot;READY FOR REVIEW&quot;;&quot;REVIEW ELIGIBLE — NO AUTHORITY&quot;;IF(OR([.U246]=&quot;UNKNOWN&quot;;[.U246]=&quot;BLOCKED&quot;);&quot;NOT REVIEW ELIGIBLE&quot;;&quot;NOT REVIEW ELIGIBLE&quot;))">
            <text:p>NOT REVIEW ELIGIBLE</text:p>
          </table:table-cell>
          <table:table-cell office:value-type="string" table:formula="of:=IF([.W246]=&quot;NOT REVIEW ELIGIBLE&quot;;&quot;DO NOT BEGIN SETTLEMENT REVIEW — RESOLVE READINESS OR CONTRADICTION CONDITIONS&quot;;IF([.W2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6]=&quot;&quot;;&quot;UNKNOWN&quot;;IF([.W246]&lt;&gt;&quot;REVIEW ELIGIBLE — NO AUTHORITY&quot;;&quot;BLOCKED — OUTCOME ASSERTED WITHOUT REVIEW ELIGIBILITY&quot;;IF(OR([.Y246]=&quot;REVIEWED — NO AUTHORITY&quot;;[.Y246]=&quot;REVIEW DEFERRED&quot;;[.Y246]=&quot;REVIEW BLOCKED&quot;);&quot;ACCEPTED INTAKE — NO AUTHORITY&quot;;&quot;BLOCKED — NONCANONICAL OUTCOME&quot;)))">
            <text:p>UNKNOWN</text:p>
          </table:table-cell>
          <table:table-cell office:value-type="string" table:formula="of:=IF([.Z246]=&quot;UNKNOWN&quot;;&quot;NO REVIEW OUTCOME ASSERTED — REMAINS UNKNOWN&quot;;IF([.Z246]=&quot;BLOCKED — OUTCOME ASSERTED WITHOUT REVIEW ELIGIBILITY&quot;;&quot;REMOVE OR CORRECT OUTCOME ASSERTION — REVIEW ELIGIBILITY REQUIRED FIRST&quot;;IF([.Z246]=&quot;BLOCKED — NONCANONICAL OUTCOME&quot;;&quot;CORRECT OUTCOME TO CANONICAL CONTROLLED VOCABULARY&quot;;IF([.Z2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6]=&quot;UNKNOWN&quot;;&quot;UNKNOWN&quot;;IF(OR([.Z246]=&quot;BLOCKED — OUTCOME ASSERTED WITHOUT REVIEW ELIGIBILITY&quot;;[.Z246]=&quot;BLOCKED — NONCANONICAL OUTCOME&quot;);&quot;BLOCKED&quot;;IF([.Z246]=&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cell office:value-type="string" table:formula="of:=IF([.U247]=&quot;UNKNOWN&quot;;&quot;COMPLETE OR ASSERT REQUIRED EVIDENCE BEFORE REVIEW&quot;;IF([.U247]=&quot;BLOCKED&quot;;&quot;RESOLVE CONTRADICTION BEFORE REVIEW — NO AUTHORITY CREATED&quot;;IF([.U2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7]=&quot;READY FOR REVIEW&quot;;&quot;REVIEW ELIGIBLE — NO AUTHORITY&quot;;IF(OR([.U247]=&quot;UNKNOWN&quot;;[.U247]=&quot;BLOCKED&quot;);&quot;NOT REVIEW ELIGIBLE&quot;;&quot;NOT REVIEW ELIGIBLE&quot;))">
            <text:p>NOT REVIEW ELIGIBLE</text:p>
          </table:table-cell>
          <table:table-cell office:value-type="string" table:formula="of:=IF([.W247]=&quot;NOT REVIEW ELIGIBLE&quot;;&quot;DO NOT BEGIN SETTLEMENT REVIEW — RESOLVE READINESS OR CONTRADICTION CONDITIONS&quot;;IF([.W2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7]=&quot;&quot;;&quot;UNKNOWN&quot;;IF([.W247]&lt;&gt;&quot;REVIEW ELIGIBLE — NO AUTHORITY&quot;;&quot;BLOCKED — OUTCOME ASSERTED WITHOUT REVIEW ELIGIBILITY&quot;;IF(OR([.Y247]=&quot;REVIEWED — NO AUTHORITY&quot;;[.Y247]=&quot;REVIEW DEFERRED&quot;;[.Y247]=&quot;REVIEW BLOCKED&quot;);&quot;ACCEPTED INTAKE — NO AUTHORITY&quot;;&quot;BLOCKED — NONCANONICAL OUTCOME&quot;)))">
            <text:p>UNKNOWN</text:p>
          </table:table-cell>
          <table:table-cell office:value-type="string" table:formula="of:=IF([.Z247]=&quot;UNKNOWN&quot;;&quot;NO REVIEW OUTCOME ASSERTED — REMAINS UNKNOWN&quot;;IF([.Z247]=&quot;BLOCKED — OUTCOME ASSERTED WITHOUT REVIEW ELIGIBILITY&quot;;&quot;REMOVE OR CORRECT OUTCOME ASSERTION — REVIEW ELIGIBILITY REQUIRED FIRST&quot;;IF([.Z247]=&quot;BLOCKED — NONCANONICAL OUTCOME&quot;;&quot;CORRECT OUTCOME TO CANONICAL CONTROLLED VOCABULARY&quot;;IF([.Z2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7]=&quot;UNKNOWN&quot;;&quot;UNKNOWN&quot;;IF(OR([.Z247]=&quot;BLOCKED — OUTCOME ASSERTED WITHOUT REVIEW ELIGIBILITY&quot;;[.Z247]=&quot;BLOCKED — NONCANONICAL OUTCOME&quot;);&quot;BLOCKED&quot;;IF([.Z247]=&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cell office:value-type="string" table:formula="of:=IF([.U248]=&quot;UNKNOWN&quot;;&quot;COMPLETE OR ASSERT REQUIRED EVIDENCE BEFORE REVIEW&quot;;IF([.U248]=&quot;BLOCKED&quot;;&quot;RESOLVE CONTRADICTION BEFORE REVIEW — NO AUTHORITY CREATED&quot;;IF([.U2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8]=&quot;READY FOR REVIEW&quot;;&quot;REVIEW ELIGIBLE — NO AUTHORITY&quot;;IF(OR([.U248]=&quot;UNKNOWN&quot;;[.U248]=&quot;BLOCKED&quot;);&quot;NOT REVIEW ELIGIBLE&quot;;&quot;NOT REVIEW ELIGIBLE&quot;))">
            <text:p>NOT REVIEW ELIGIBLE</text:p>
          </table:table-cell>
          <table:table-cell office:value-type="string" table:formula="of:=IF([.W248]=&quot;NOT REVIEW ELIGIBLE&quot;;&quot;DO NOT BEGIN SETTLEMENT REVIEW — RESOLVE READINESS OR CONTRADICTION CONDITIONS&quot;;IF([.W2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8]=&quot;&quot;;&quot;UNKNOWN&quot;;IF([.W248]&lt;&gt;&quot;REVIEW ELIGIBLE — NO AUTHORITY&quot;;&quot;BLOCKED — OUTCOME ASSERTED WITHOUT REVIEW ELIGIBILITY&quot;;IF(OR([.Y248]=&quot;REVIEWED — NO AUTHORITY&quot;;[.Y248]=&quot;REVIEW DEFERRED&quot;;[.Y248]=&quot;REVIEW BLOCKED&quot;);&quot;ACCEPTED INTAKE — NO AUTHORITY&quot;;&quot;BLOCKED — NONCANONICAL OUTCOME&quot;)))">
            <text:p>UNKNOWN</text:p>
          </table:table-cell>
          <table:table-cell office:value-type="string" table:formula="of:=IF([.Z248]=&quot;UNKNOWN&quot;;&quot;NO REVIEW OUTCOME ASSERTED — REMAINS UNKNOWN&quot;;IF([.Z248]=&quot;BLOCKED — OUTCOME ASSERTED WITHOUT REVIEW ELIGIBILITY&quot;;&quot;REMOVE OR CORRECT OUTCOME ASSERTION — REVIEW ELIGIBILITY REQUIRED FIRST&quot;;IF([.Z248]=&quot;BLOCKED — NONCANONICAL OUTCOME&quot;;&quot;CORRECT OUTCOME TO CANONICAL CONTROLLED VOCABULARY&quot;;IF([.Z2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8]=&quot;UNKNOWN&quot;;&quot;UNKNOWN&quot;;IF(OR([.Z248]=&quot;BLOCKED — OUTCOME ASSERTED WITHOUT REVIEW ELIGIBILITY&quot;;[.Z248]=&quot;BLOCKED — NONCANONICAL OUTCOME&quot;);&quot;BLOCKED&quot;;IF([.Z248]=&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cell office:value-type="string" table:formula="of:=IF([.U249]=&quot;UNKNOWN&quot;;&quot;COMPLETE OR ASSERT REQUIRED EVIDENCE BEFORE REVIEW&quot;;IF([.U249]=&quot;BLOCKED&quot;;&quot;RESOLVE CONTRADICTION BEFORE REVIEW — NO AUTHORITY CREATED&quot;;IF([.U2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9]=&quot;READY FOR REVIEW&quot;;&quot;REVIEW ELIGIBLE — NO AUTHORITY&quot;;IF(OR([.U249]=&quot;UNKNOWN&quot;;[.U249]=&quot;BLOCKED&quot;);&quot;NOT REVIEW ELIGIBLE&quot;;&quot;NOT REVIEW ELIGIBLE&quot;))">
            <text:p>NOT REVIEW ELIGIBLE</text:p>
          </table:table-cell>
          <table:table-cell office:value-type="string" table:formula="of:=IF([.W249]=&quot;NOT REVIEW ELIGIBLE&quot;;&quot;DO NOT BEGIN SETTLEMENT REVIEW — RESOLVE READINESS OR CONTRADICTION CONDITIONS&quot;;IF([.W2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9]=&quot;&quot;;&quot;UNKNOWN&quot;;IF([.W249]&lt;&gt;&quot;REVIEW ELIGIBLE — NO AUTHORITY&quot;;&quot;BLOCKED — OUTCOME ASSERTED WITHOUT REVIEW ELIGIBILITY&quot;;IF(OR([.Y249]=&quot;REVIEWED — NO AUTHORITY&quot;;[.Y249]=&quot;REVIEW DEFERRED&quot;;[.Y249]=&quot;REVIEW BLOCKED&quot;);&quot;ACCEPTED INTAKE — NO AUTHORITY&quot;;&quot;BLOCKED — NONCANONICAL OUTCOME&quot;)))">
            <text:p>UNKNOWN</text:p>
          </table:table-cell>
          <table:table-cell office:value-type="string" table:formula="of:=IF([.Z249]=&quot;UNKNOWN&quot;;&quot;NO REVIEW OUTCOME ASSERTED — REMAINS UNKNOWN&quot;;IF([.Z249]=&quot;BLOCKED — OUTCOME ASSERTED WITHOUT REVIEW ELIGIBILITY&quot;;&quot;REMOVE OR CORRECT OUTCOME ASSERTION — REVIEW ELIGIBILITY REQUIRED FIRST&quot;;IF([.Z249]=&quot;BLOCKED — NONCANONICAL OUTCOME&quot;;&quot;CORRECT OUTCOME TO CANONICAL CONTROLLED VOCABULARY&quot;;IF([.Z2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49]=&quot;UNKNOWN&quot;;&quot;UNKNOWN&quot;;IF(OR([.Z249]=&quot;BLOCKED — OUTCOME ASSERTED WITHOUT REVIEW ELIGIBILITY&quot;;[.Z249]=&quot;BLOCKED — NONCANONICAL OUTCOME&quot;);&quot;BLOCKED&quot;;IF([.Z249]=&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cell office:value-type="string" table:formula="of:=IF([.U250]=&quot;UNKNOWN&quot;;&quot;COMPLETE OR ASSERT REQUIRED EVIDENCE BEFORE REVIEW&quot;;IF([.U250]=&quot;BLOCKED&quot;;&quot;RESOLVE CONTRADICTION BEFORE REVIEW — NO AUTHORITY CREATED&quot;;IF([.U2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0]=&quot;READY FOR REVIEW&quot;;&quot;REVIEW ELIGIBLE — NO AUTHORITY&quot;;IF(OR([.U250]=&quot;UNKNOWN&quot;;[.U250]=&quot;BLOCKED&quot;);&quot;NOT REVIEW ELIGIBLE&quot;;&quot;NOT REVIEW ELIGIBLE&quot;))">
            <text:p>NOT REVIEW ELIGIBLE</text:p>
          </table:table-cell>
          <table:table-cell office:value-type="string" table:formula="of:=IF([.W250]=&quot;NOT REVIEW ELIGIBLE&quot;;&quot;DO NOT BEGIN SETTLEMENT REVIEW — RESOLVE READINESS OR CONTRADICTION CONDITIONS&quot;;IF([.W2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0]=&quot;&quot;;&quot;UNKNOWN&quot;;IF([.W250]&lt;&gt;&quot;REVIEW ELIGIBLE — NO AUTHORITY&quot;;&quot;BLOCKED — OUTCOME ASSERTED WITHOUT REVIEW ELIGIBILITY&quot;;IF(OR([.Y250]=&quot;REVIEWED — NO AUTHORITY&quot;;[.Y250]=&quot;REVIEW DEFERRED&quot;;[.Y250]=&quot;REVIEW BLOCKED&quot;);&quot;ACCEPTED INTAKE — NO AUTHORITY&quot;;&quot;BLOCKED — NONCANONICAL OUTCOME&quot;)))">
            <text:p>UNKNOWN</text:p>
          </table:table-cell>
          <table:table-cell office:value-type="string" table:formula="of:=IF([.Z250]=&quot;UNKNOWN&quot;;&quot;NO REVIEW OUTCOME ASSERTED — REMAINS UNKNOWN&quot;;IF([.Z250]=&quot;BLOCKED — OUTCOME ASSERTED WITHOUT REVIEW ELIGIBILITY&quot;;&quot;REMOVE OR CORRECT OUTCOME ASSERTION — REVIEW ELIGIBILITY REQUIRED FIRST&quot;;IF([.Z250]=&quot;BLOCKED — NONCANONICAL OUTCOME&quot;;&quot;CORRECT OUTCOME TO CANONICAL CONTROLLED VOCABULARY&quot;;IF([.Z2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50]=&quot;UNKNOWN&quot;;&quot;UNKNOWN&quot;;IF(OR([.Z250]=&quot;BLOCKED — OUTCOME ASSERTED WITHOUT REVIEW ELIGIBILITY&quot;;[.Z250]=&quot;BLOCKED — NONCANONICAL OUTCOME&quot;);&quot;BLOCKED&quot;;IF([.Z250]=&quot;ACCEPTED INTAKE — NO AUTHORITY&quot;;&quot;OUTCOME EVIDENCE RECORDED — NO AUTHORITY&quot;;&quot;UNKNOW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cell office:value-type="string" table:formula="of:=IF([.U251]=&quot;UNKNOWN&quot;;&quot;COMPLETE OR ASSERT REQUIRED EVIDENCE BEFORE REVIEW&quot;;IF([.U251]=&quot;BLOCKED&quot;;&quot;RESOLVE CONTRADICTION BEFORE REVIEW — NO AUTHORITY CREATED&quot;;IF([.U2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1]=&quot;READY FOR REVIEW&quot;;&quot;REVIEW ELIGIBLE — NO AUTHORITY&quot;;IF(OR([.U251]=&quot;UNKNOWN&quot;;[.U251]=&quot;BLOCKED&quot;);&quot;NOT REVIEW ELIGIBLE&quot;;&quot;NOT REVIEW ELIGIBLE&quot;))">
            <text:p>NOT REVIEW ELIGIBLE</text:p>
          </table:table-cell>
          <table:table-cell office:value-type="string" table:formula="of:=IF([.W251]=&quot;NOT REVIEW ELIGIBLE&quot;;&quot;DO NOT BEGIN SETTLEMENT REVIEW — RESOLVE READINESS OR CONTRADICTION CONDITIONS&quot;;IF([.W2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1]=&quot;&quot;;&quot;UNKNOWN&quot;;IF([.W251]&lt;&gt;&quot;REVIEW ELIGIBLE — NO AUTHORITY&quot;;&quot;BLOCKED — OUTCOME ASSERTED WITHOUT REVIEW ELIGIBILITY&quot;;IF(OR([.Y251]=&quot;REVIEWED — NO AUTHORITY&quot;;[.Y251]=&quot;REVIEW DEFERRED&quot;;[.Y251]=&quot;REVIEW BLOCKED&quot;);&quot;ACCEPTED INTAKE — NO AUTHORITY&quot;;&quot;BLOCKED — NONCANONICAL OUTCOME&quot;)))">
            <text:p>UNKNOWN</text:p>
          </table:table-cell>
          <table:table-cell office:value-type="string" table:formula="of:=IF([.Z251]=&quot;UNKNOWN&quot;;&quot;NO REVIEW OUTCOME ASSERTED — REMAINS UNKNOWN&quot;;IF([.Z251]=&quot;BLOCKED — OUTCOME ASSERTED WITHOUT REVIEW ELIGIBILITY&quot;;&quot;REMOVE OR CORRECT OUTCOME ASSERTION — REVIEW ELIGIBILITY REQUIRED FIRST&quot;;IF([.Z251]=&quot;BLOCKED — NONCANONICAL OUTCOME&quot;;&quot;CORRECT OUTCOME TO CANONICAL CONTROLLED VOCABULARY&quot;;IF([.Z2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cell office:value-type="string" table:formula="of:=IF([.Z251]=&quot;UNKNOWN&quot;;&quot;UNKNOWN&quot;;IF(OR([.Z251]=&quot;BLOCKED — OUTCOME ASSERTED WITHOUT REVIEW ELIGIBILITY&quot;;[.Z251]=&quot;BLOCKED — NONCANONICAL OUTCOME&quot;);&quot;BLOCKED&quot;;IF([.Z251]=&quot;ACCEPTED INTAKE — NO AUTHORITY&quot;;&quot;OUTCOME EVIDENCE RECORDED — NO AUTHORITY&quot;;&quot;UNKNOWN&quot;)))">
            <text:p>UNKNOWN</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