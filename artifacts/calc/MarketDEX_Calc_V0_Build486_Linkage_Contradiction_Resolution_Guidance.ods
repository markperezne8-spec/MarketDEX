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cell table:style-name="Build481Header" office:value-type="string">
            <text:p>Linkage Contradiction Resolution Guidanc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cell office:value-type="string" table:formula="of:=IF([.S2]=&quot;UNKNOWN&quot;;&quot;NO ACTION — linkage status is UNKNOWN / not asserted&quot;;IF([.S2]=&quot;CLEAR&quot;;&quot;NO CONTRADICTION — preserve evidence as entered&quot;;IF([.M2]=&quot;&quot;;&quot;REVIEW LINKAGE STATUS — identifiers are present while status is UNKNOWN&quot;;IF([.M2]=&quot;UNMATCHED&quot;;&quot;REMOVE LINKAGE IDENTIFIERS OR CORRECT LINKAGE STATUS&quot;;IF([.M2]=&quot;SINGLE_SALE_LINKED&quot;;&quot;REQUIRE LINKED SALE ID AND NO ALLOCATION GROUP ID&quot;;IF([.M2]=&quot;MULTI_SALE_PENDING_ALLOCATION&quot;;&quot;REMOVE LINKED SALE ID OR CORRECT LINKAGE STATUS&quot;;IF([.M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cell office:value-type="string" table:formula="of:=IF([.S3]=&quot;UNKNOWN&quot;;&quot;NO ACTION — linkage status is UNKNOWN / not asserted&quot;;IF([.S3]=&quot;CLEAR&quot;;&quot;NO CONTRADICTION — preserve evidence as entered&quot;;IF([.M3]=&quot;&quot;;&quot;REVIEW LINKAGE STATUS — identifiers are present while status is UNKNOWN&quot;;IF([.M3]=&quot;UNMATCHED&quot;;&quot;REMOVE LINKAGE IDENTIFIERS OR CORRECT LINKAGE STATUS&quot;;IF([.M3]=&quot;SINGLE_SALE_LINKED&quot;;&quot;REQUIRE LINKED SALE ID AND NO ALLOCATION GROUP ID&quot;;IF([.M3]=&quot;MULTI_SALE_PENDING_ALLOCATION&quot;;&quot;REMOVE LINKED SALE ID OR CORRECT LINKAGE STATUS&quot;;IF([.M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cell office:value-type="string" table:formula="of:=IF([.S4]=&quot;UNKNOWN&quot;;&quot;NO ACTION — linkage status is UNKNOWN / not asserted&quot;;IF([.S4]=&quot;CLEAR&quot;;&quot;NO CONTRADICTION — preserve evidence as entered&quot;;IF([.M4]=&quot;&quot;;&quot;REVIEW LINKAGE STATUS — identifiers are present while status is UNKNOWN&quot;;IF([.M4]=&quot;UNMATCHED&quot;;&quot;REMOVE LINKAGE IDENTIFIERS OR CORRECT LINKAGE STATUS&quot;;IF([.M4]=&quot;SINGLE_SALE_LINKED&quot;;&quot;REQUIRE LINKED SALE ID AND NO ALLOCATION GROUP ID&quot;;IF([.M4]=&quot;MULTI_SALE_PENDING_ALLOCATION&quot;;&quot;REMOVE LINKED SALE ID OR CORRECT LINKAGE STATUS&quot;;IF([.M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cell office:value-type="string" table:formula="of:=IF([.S5]=&quot;UNKNOWN&quot;;&quot;NO ACTION — linkage status is UNKNOWN / not asserted&quot;;IF([.S5]=&quot;CLEAR&quot;;&quot;NO CONTRADICTION — preserve evidence as entered&quot;;IF([.M5]=&quot;&quot;;&quot;REVIEW LINKAGE STATUS — identifiers are present while status is UNKNOWN&quot;;IF([.M5]=&quot;UNMATCHED&quot;;&quot;REMOVE LINKAGE IDENTIFIERS OR CORRECT LINKAGE STATUS&quot;;IF([.M5]=&quot;SINGLE_SALE_LINKED&quot;;&quot;REQUIRE LINKED SALE ID AND NO ALLOCATION GROUP ID&quot;;IF([.M5]=&quot;MULTI_SALE_PENDING_ALLOCATION&quot;;&quot;REMOVE LINKED SALE ID OR CORRECT LINKAGE STATUS&quot;;IF([.M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cell office:value-type="string" table:formula="of:=IF([.S6]=&quot;UNKNOWN&quot;;&quot;NO ACTION — linkage status is UNKNOWN / not asserted&quot;;IF([.S6]=&quot;CLEAR&quot;;&quot;NO CONTRADICTION — preserve evidence as entered&quot;;IF([.M6]=&quot;&quot;;&quot;REVIEW LINKAGE STATUS — identifiers are present while status is UNKNOWN&quot;;IF([.M6]=&quot;UNMATCHED&quot;;&quot;REMOVE LINKAGE IDENTIFIERS OR CORRECT LINKAGE STATUS&quot;;IF([.M6]=&quot;SINGLE_SALE_LINKED&quot;;&quot;REQUIRE LINKED SALE ID AND NO ALLOCATION GROUP ID&quot;;IF([.M6]=&quot;MULTI_SALE_PENDING_ALLOCATION&quot;;&quot;REMOVE LINKED SALE ID OR CORRECT LINKAGE STATUS&quot;;IF([.M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cell office:value-type="string" table:formula="of:=IF([.S7]=&quot;UNKNOWN&quot;;&quot;NO ACTION — linkage status is UNKNOWN / not asserted&quot;;IF([.S7]=&quot;CLEAR&quot;;&quot;NO CONTRADICTION — preserve evidence as entered&quot;;IF([.M7]=&quot;&quot;;&quot;REVIEW LINKAGE STATUS — identifiers are present while status is UNKNOWN&quot;;IF([.M7]=&quot;UNMATCHED&quot;;&quot;REMOVE LINKAGE IDENTIFIERS OR CORRECT LINKAGE STATUS&quot;;IF([.M7]=&quot;SINGLE_SALE_LINKED&quot;;&quot;REQUIRE LINKED SALE ID AND NO ALLOCATION GROUP ID&quot;;IF([.M7]=&quot;MULTI_SALE_PENDING_ALLOCATION&quot;;&quot;REMOVE LINKED SALE ID OR CORRECT LINKAGE STATUS&quot;;IF([.M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cell office:value-type="string" table:formula="of:=IF([.S8]=&quot;UNKNOWN&quot;;&quot;NO ACTION — linkage status is UNKNOWN / not asserted&quot;;IF([.S8]=&quot;CLEAR&quot;;&quot;NO CONTRADICTION — preserve evidence as entered&quot;;IF([.M8]=&quot;&quot;;&quot;REVIEW LINKAGE STATUS — identifiers are present while status is UNKNOWN&quot;;IF([.M8]=&quot;UNMATCHED&quot;;&quot;REMOVE LINKAGE IDENTIFIERS OR CORRECT LINKAGE STATUS&quot;;IF([.M8]=&quot;SINGLE_SALE_LINKED&quot;;&quot;REQUIRE LINKED SALE ID AND NO ALLOCATION GROUP ID&quot;;IF([.M8]=&quot;MULTI_SALE_PENDING_ALLOCATION&quot;;&quot;REMOVE LINKED SALE ID OR CORRECT LINKAGE STATUS&quot;;IF([.M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cell office:value-type="string" table:formula="of:=IF([.S9]=&quot;UNKNOWN&quot;;&quot;NO ACTION — linkage status is UNKNOWN / not asserted&quot;;IF([.S9]=&quot;CLEAR&quot;;&quot;NO CONTRADICTION — preserve evidence as entered&quot;;IF([.M9]=&quot;&quot;;&quot;REVIEW LINKAGE STATUS — identifiers are present while status is UNKNOWN&quot;;IF([.M9]=&quot;UNMATCHED&quot;;&quot;REMOVE LINKAGE IDENTIFIERS OR CORRECT LINKAGE STATUS&quot;;IF([.M9]=&quot;SINGLE_SALE_LINKED&quot;;&quot;REQUIRE LINKED SALE ID AND NO ALLOCATION GROUP ID&quot;;IF([.M9]=&quot;MULTI_SALE_PENDING_ALLOCATION&quot;;&quot;REMOVE LINKED SALE ID OR CORRECT LINKAGE STATUS&quot;;IF([.M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cell office:value-type="string" table:formula="of:=IF([.S10]=&quot;UNKNOWN&quot;;&quot;NO ACTION — linkage status is UNKNOWN / not asserted&quot;;IF([.S10]=&quot;CLEAR&quot;;&quot;NO CONTRADICTION — preserve evidence as entered&quot;;IF([.M10]=&quot;&quot;;&quot;REVIEW LINKAGE STATUS — identifiers are present while status is UNKNOWN&quot;;IF([.M10]=&quot;UNMATCHED&quot;;&quot;REMOVE LINKAGE IDENTIFIERS OR CORRECT LINKAGE STATUS&quot;;IF([.M10]=&quot;SINGLE_SALE_LINKED&quot;;&quot;REQUIRE LINKED SALE ID AND NO ALLOCATION GROUP ID&quot;;IF([.M10]=&quot;MULTI_SALE_PENDING_ALLOCATION&quot;;&quot;REMOVE LINKED SALE ID OR CORRECT LINKAGE STATUS&quot;;IF([.M1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cell office:value-type="string" table:formula="of:=IF([.S11]=&quot;UNKNOWN&quot;;&quot;NO ACTION — linkage status is UNKNOWN / not asserted&quot;;IF([.S11]=&quot;CLEAR&quot;;&quot;NO CONTRADICTION — preserve evidence as entered&quot;;IF([.M11]=&quot;&quot;;&quot;REVIEW LINKAGE STATUS — identifiers are present while status is UNKNOWN&quot;;IF([.M11]=&quot;UNMATCHED&quot;;&quot;REMOVE LINKAGE IDENTIFIERS OR CORRECT LINKAGE STATUS&quot;;IF([.M11]=&quot;SINGLE_SALE_LINKED&quot;;&quot;REQUIRE LINKED SALE ID AND NO ALLOCATION GROUP ID&quot;;IF([.M11]=&quot;MULTI_SALE_PENDING_ALLOCATION&quot;;&quot;REMOVE LINKED SALE ID OR CORRECT LINKAGE STATUS&quot;;IF([.M1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cell office:value-type="string" table:formula="of:=IF([.S12]=&quot;UNKNOWN&quot;;&quot;NO ACTION — linkage status is UNKNOWN / not asserted&quot;;IF([.S12]=&quot;CLEAR&quot;;&quot;NO CONTRADICTION — preserve evidence as entered&quot;;IF([.M12]=&quot;&quot;;&quot;REVIEW LINKAGE STATUS — identifiers are present while status is UNKNOWN&quot;;IF([.M12]=&quot;UNMATCHED&quot;;&quot;REMOVE LINKAGE IDENTIFIERS OR CORRECT LINKAGE STATUS&quot;;IF([.M12]=&quot;SINGLE_SALE_LINKED&quot;;&quot;REQUIRE LINKED SALE ID AND NO ALLOCATION GROUP ID&quot;;IF([.M12]=&quot;MULTI_SALE_PENDING_ALLOCATION&quot;;&quot;REMOVE LINKED SALE ID OR CORRECT LINKAGE STATUS&quot;;IF([.M1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cell office:value-type="string" table:formula="of:=IF([.S13]=&quot;UNKNOWN&quot;;&quot;NO ACTION — linkage status is UNKNOWN / not asserted&quot;;IF([.S13]=&quot;CLEAR&quot;;&quot;NO CONTRADICTION — preserve evidence as entered&quot;;IF([.M13]=&quot;&quot;;&quot;REVIEW LINKAGE STATUS — identifiers are present while status is UNKNOWN&quot;;IF([.M13]=&quot;UNMATCHED&quot;;&quot;REMOVE LINKAGE IDENTIFIERS OR CORRECT LINKAGE STATUS&quot;;IF([.M13]=&quot;SINGLE_SALE_LINKED&quot;;&quot;REQUIRE LINKED SALE ID AND NO ALLOCATION GROUP ID&quot;;IF([.M13]=&quot;MULTI_SALE_PENDING_ALLOCATION&quot;;&quot;REMOVE LINKED SALE ID OR CORRECT LINKAGE STATUS&quot;;IF([.M1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cell office:value-type="string" table:formula="of:=IF([.S14]=&quot;UNKNOWN&quot;;&quot;NO ACTION — linkage status is UNKNOWN / not asserted&quot;;IF([.S14]=&quot;CLEAR&quot;;&quot;NO CONTRADICTION — preserve evidence as entered&quot;;IF([.M14]=&quot;&quot;;&quot;REVIEW LINKAGE STATUS — identifiers are present while status is UNKNOWN&quot;;IF([.M14]=&quot;UNMATCHED&quot;;&quot;REMOVE LINKAGE IDENTIFIERS OR CORRECT LINKAGE STATUS&quot;;IF([.M14]=&quot;SINGLE_SALE_LINKED&quot;;&quot;REQUIRE LINKED SALE ID AND NO ALLOCATION GROUP ID&quot;;IF([.M14]=&quot;MULTI_SALE_PENDING_ALLOCATION&quot;;&quot;REMOVE LINKED SALE ID OR CORRECT LINKAGE STATUS&quot;;IF([.M1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cell office:value-type="string" table:formula="of:=IF([.S15]=&quot;UNKNOWN&quot;;&quot;NO ACTION — linkage status is UNKNOWN / not asserted&quot;;IF([.S15]=&quot;CLEAR&quot;;&quot;NO CONTRADICTION — preserve evidence as entered&quot;;IF([.M15]=&quot;&quot;;&quot;REVIEW LINKAGE STATUS — identifiers are present while status is UNKNOWN&quot;;IF([.M15]=&quot;UNMATCHED&quot;;&quot;REMOVE LINKAGE IDENTIFIERS OR CORRECT LINKAGE STATUS&quot;;IF([.M15]=&quot;SINGLE_SALE_LINKED&quot;;&quot;REQUIRE LINKED SALE ID AND NO ALLOCATION GROUP ID&quot;;IF([.M15]=&quot;MULTI_SALE_PENDING_ALLOCATION&quot;;&quot;REMOVE LINKED SALE ID OR CORRECT LINKAGE STATUS&quot;;IF([.M1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cell office:value-type="string" table:formula="of:=IF([.S16]=&quot;UNKNOWN&quot;;&quot;NO ACTION — linkage status is UNKNOWN / not asserted&quot;;IF([.S16]=&quot;CLEAR&quot;;&quot;NO CONTRADICTION — preserve evidence as entered&quot;;IF([.M16]=&quot;&quot;;&quot;REVIEW LINKAGE STATUS — identifiers are present while status is UNKNOWN&quot;;IF([.M16]=&quot;UNMATCHED&quot;;&quot;REMOVE LINKAGE IDENTIFIERS OR CORRECT LINKAGE STATUS&quot;;IF([.M16]=&quot;SINGLE_SALE_LINKED&quot;;&quot;REQUIRE LINKED SALE ID AND NO ALLOCATION GROUP ID&quot;;IF([.M16]=&quot;MULTI_SALE_PENDING_ALLOCATION&quot;;&quot;REMOVE LINKED SALE ID OR CORRECT LINKAGE STATUS&quot;;IF([.M1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cell office:value-type="string" table:formula="of:=IF([.S17]=&quot;UNKNOWN&quot;;&quot;NO ACTION — linkage status is UNKNOWN / not asserted&quot;;IF([.S17]=&quot;CLEAR&quot;;&quot;NO CONTRADICTION — preserve evidence as entered&quot;;IF([.M17]=&quot;&quot;;&quot;REVIEW LINKAGE STATUS — identifiers are present while status is UNKNOWN&quot;;IF([.M17]=&quot;UNMATCHED&quot;;&quot;REMOVE LINKAGE IDENTIFIERS OR CORRECT LINKAGE STATUS&quot;;IF([.M17]=&quot;SINGLE_SALE_LINKED&quot;;&quot;REQUIRE LINKED SALE ID AND NO ALLOCATION GROUP ID&quot;;IF([.M17]=&quot;MULTI_SALE_PENDING_ALLOCATION&quot;;&quot;REMOVE LINKED SALE ID OR CORRECT LINKAGE STATUS&quot;;IF([.M1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cell office:value-type="string" table:formula="of:=IF([.S18]=&quot;UNKNOWN&quot;;&quot;NO ACTION — linkage status is UNKNOWN / not asserted&quot;;IF([.S18]=&quot;CLEAR&quot;;&quot;NO CONTRADICTION — preserve evidence as entered&quot;;IF([.M18]=&quot;&quot;;&quot;REVIEW LINKAGE STATUS — identifiers are present while status is UNKNOWN&quot;;IF([.M18]=&quot;UNMATCHED&quot;;&quot;REMOVE LINKAGE IDENTIFIERS OR CORRECT LINKAGE STATUS&quot;;IF([.M18]=&quot;SINGLE_SALE_LINKED&quot;;&quot;REQUIRE LINKED SALE ID AND NO ALLOCATION GROUP ID&quot;;IF([.M18]=&quot;MULTI_SALE_PENDING_ALLOCATION&quot;;&quot;REMOVE LINKED SALE ID OR CORRECT LINKAGE STATUS&quot;;IF([.M1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cell office:value-type="string" table:formula="of:=IF([.S19]=&quot;UNKNOWN&quot;;&quot;NO ACTION — linkage status is UNKNOWN / not asserted&quot;;IF([.S19]=&quot;CLEAR&quot;;&quot;NO CONTRADICTION — preserve evidence as entered&quot;;IF([.M19]=&quot;&quot;;&quot;REVIEW LINKAGE STATUS — identifiers are present while status is UNKNOWN&quot;;IF([.M19]=&quot;UNMATCHED&quot;;&quot;REMOVE LINKAGE IDENTIFIERS OR CORRECT LINKAGE STATUS&quot;;IF([.M19]=&quot;SINGLE_SALE_LINKED&quot;;&quot;REQUIRE LINKED SALE ID AND NO ALLOCATION GROUP ID&quot;;IF([.M19]=&quot;MULTI_SALE_PENDING_ALLOCATION&quot;;&quot;REMOVE LINKED SALE ID OR CORRECT LINKAGE STATUS&quot;;IF([.M1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cell office:value-type="string" table:formula="of:=IF([.S20]=&quot;UNKNOWN&quot;;&quot;NO ACTION — linkage status is UNKNOWN / not asserted&quot;;IF([.S20]=&quot;CLEAR&quot;;&quot;NO CONTRADICTION — preserve evidence as entered&quot;;IF([.M20]=&quot;&quot;;&quot;REVIEW LINKAGE STATUS — identifiers are present while status is UNKNOWN&quot;;IF([.M20]=&quot;UNMATCHED&quot;;&quot;REMOVE LINKAGE IDENTIFIERS OR CORRECT LINKAGE STATUS&quot;;IF([.M20]=&quot;SINGLE_SALE_LINKED&quot;;&quot;REQUIRE LINKED SALE ID AND NO ALLOCATION GROUP ID&quot;;IF([.M20]=&quot;MULTI_SALE_PENDING_ALLOCATION&quot;;&quot;REMOVE LINKED SALE ID OR CORRECT LINKAGE STATUS&quot;;IF([.M2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cell office:value-type="string" table:formula="of:=IF([.S21]=&quot;UNKNOWN&quot;;&quot;NO ACTION — linkage status is UNKNOWN / not asserted&quot;;IF([.S21]=&quot;CLEAR&quot;;&quot;NO CONTRADICTION — preserve evidence as entered&quot;;IF([.M21]=&quot;&quot;;&quot;REVIEW LINKAGE STATUS — identifiers are present while status is UNKNOWN&quot;;IF([.M21]=&quot;UNMATCHED&quot;;&quot;REMOVE LINKAGE IDENTIFIERS OR CORRECT LINKAGE STATUS&quot;;IF([.M21]=&quot;SINGLE_SALE_LINKED&quot;;&quot;REQUIRE LINKED SALE ID AND NO ALLOCATION GROUP ID&quot;;IF([.M21]=&quot;MULTI_SALE_PENDING_ALLOCATION&quot;;&quot;REMOVE LINKED SALE ID OR CORRECT LINKAGE STATUS&quot;;IF([.M2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cell office:value-type="string" table:formula="of:=IF([.S22]=&quot;UNKNOWN&quot;;&quot;NO ACTION — linkage status is UNKNOWN / not asserted&quot;;IF([.S22]=&quot;CLEAR&quot;;&quot;NO CONTRADICTION — preserve evidence as entered&quot;;IF([.M22]=&quot;&quot;;&quot;REVIEW LINKAGE STATUS — identifiers are present while status is UNKNOWN&quot;;IF([.M22]=&quot;UNMATCHED&quot;;&quot;REMOVE LINKAGE IDENTIFIERS OR CORRECT LINKAGE STATUS&quot;;IF([.M22]=&quot;SINGLE_SALE_LINKED&quot;;&quot;REQUIRE LINKED SALE ID AND NO ALLOCATION GROUP ID&quot;;IF([.M22]=&quot;MULTI_SALE_PENDING_ALLOCATION&quot;;&quot;REMOVE LINKED SALE ID OR CORRECT LINKAGE STATUS&quot;;IF([.M2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cell office:value-type="string" table:formula="of:=IF([.S23]=&quot;UNKNOWN&quot;;&quot;NO ACTION — linkage status is UNKNOWN / not asserted&quot;;IF([.S23]=&quot;CLEAR&quot;;&quot;NO CONTRADICTION — preserve evidence as entered&quot;;IF([.M23]=&quot;&quot;;&quot;REVIEW LINKAGE STATUS — identifiers are present while status is UNKNOWN&quot;;IF([.M23]=&quot;UNMATCHED&quot;;&quot;REMOVE LINKAGE IDENTIFIERS OR CORRECT LINKAGE STATUS&quot;;IF([.M23]=&quot;SINGLE_SALE_LINKED&quot;;&quot;REQUIRE LINKED SALE ID AND NO ALLOCATION GROUP ID&quot;;IF([.M23]=&quot;MULTI_SALE_PENDING_ALLOCATION&quot;;&quot;REMOVE LINKED SALE ID OR CORRECT LINKAGE STATUS&quot;;IF([.M2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cell office:value-type="string" table:formula="of:=IF([.S24]=&quot;UNKNOWN&quot;;&quot;NO ACTION — linkage status is UNKNOWN / not asserted&quot;;IF([.S24]=&quot;CLEAR&quot;;&quot;NO CONTRADICTION — preserve evidence as entered&quot;;IF([.M24]=&quot;&quot;;&quot;REVIEW LINKAGE STATUS — identifiers are present while status is UNKNOWN&quot;;IF([.M24]=&quot;UNMATCHED&quot;;&quot;REMOVE LINKAGE IDENTIFIERS OR CORRECT LINKAGE STATUS&quot;;IF([.M24]=&quot;SINGLE_SALE_LINKED&quot;;&quot;REQUIRE LINKED SALE ID AND NO ALLOCATION GROUP ID&quot;;IF([.M24]=&quot;MULTI_SALE_PENDING_ALLOCATION&quot;;&quot;REMOVE LINKED SALE ID OR CORRECT LINKAGE STATUS&quot;;IF([.M2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cell office:value-type="string" table:formula="of:=IF([.S25]=&quot;UNKNOWN&quot;;&quot;NO ACTION — linkage status is UNKNOWN / not asserted&quot;;IF([.S25]=&quot;CLEAR&quot;;&quot;NO CONTRADICTION — preserve evidence as entered&quot;;IF([.M25]=&quot;&quot;;&quot;REVIEW LINKAGE STATUS — identifiers are present while status is UNKNOWN&quot;;IF([.M25]=&quot;UNMATCHED&quot;;&quot;REMOVE LINKAGE IDENTIFIERS OR CORRECT LINKAGE STATUS&quot;;IF([.M25]=&quot;SINGLE_SALE_LINKED&quot;;&quot;REQUIRE LINKED SALE ID AND NO ALLOCATION GROUP ID&quot;;IF([.M25]=&quot;MULTI_SALE_PENDING_ALLOCATION&quot;;&quot;REMOVE LINKED SALE ID OR CORRECT LINKAGE STATUS&quot;;IF([.M2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cell office:value-type="string" table:formula="of:=IF([.S26]=&quot;UNKNOWN&quot;;&quot;NO ACTION — linkage status is UNKNOWN / not asserted&quot;;IF([.S26]=&quot;CLEAR&quot;;&quot;NO CONTRADICTION — preserve evidence as entered&quot;;IF([.M26]=&quot;&quot;;&quot;REVIEW LINKAGE STATUS — identifiers are present while status is UNKNOWN&quot;;IF([.M26]=&quot;UNMATCHED&quot;;&quot;REMOVE LINKAGE IDENTIFIERS OR CORRECT LINKAGE STATUS&quot;;IF([.M26]=&quot;SINGLE_SALE_LINKED&quot;;&quot;REQUIRE LINKED SALE ID AND NO ALLOCATION GROUP ID&quot;;IF([.M26]=&quot;MULTI_SALE_PENDING_ALLOCATION&quot;;&quot;REMOVE LINKED SALE ID OR CORRECT LINKAGE STATUS&quot;;IF([.M2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cell office:value-type="string" table:formula="of:=IF([.S27]=&quot;UNKNOWN&quot;;&quot;NO ACTION — linkage status is UNKNOWN / not asserted&quot;;IF([.S27]=&quot;CLEAR&quot;;&quot;NO CONTRADICTION — preserve evidence as entered&quot;;IF([.M27]=&quot;&quot;;&quot;REVIEW LINKAGE STATUS — identifiers are present while status is UNKNOWN&quot;;IF([.M27]=&quot;UNMATCHED&quot;;&quot;REMOVE LINKAGE IDENTIFIERS OR CORRECT LINKAGE STATUS&quot;;IF([.M27]=&quot;SINGLE_SALE_LINKED&quot;;&quot;REQUIRE LINKED SALE ID AND NO ALLOCATION GROUP ID&quot;;IF([.M27]=&quot;MULTI_SALE_PENDING_ALLOCATION&quot;;&quot;REMOVE LINKED SALE ID OR CORRECT LINKAGE STATUS&quot;;IF([.M2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cell office:value-type="string" table:formula="of:=IF([.S28]=&quot;UNKNOWN&quot;;&quot;NO ACTION — linkage status is UNKNOWN / not asserted&quot;;IF([.S28]=&quot;CLEAR&quot;;&quot;NO CONTRADICTION — preserve evidence as entered&quot;;IF([.M28]=&quot;&quot;;&quot;REVIEW LINKAGE STATUS — identifiers are present while status is UNKNOWN&quot;;IF([.M28]=&quot;UNMATCHED&quot;;&quot;REMOVE LINKAGE IDENTIFIERS OR CORRECT LINKAGE STATUS&quot;;IF([.M28]=&quot;SINGLE_SALE_LINKED&quot;;&quot;REQUIRE LINKED SALE ID AND NO ALLOCATION GROUP ID&quot;;IF([.M28]=&quot;MULTI_SALE_PENDING_ALLOCATION&quot;;&quot;REMOVE LINKED SALE ID OR CORRECT LINKAGE STATUS&quot;;IF([.M2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cell office:value-type="string" table:formula="of:=IF([.S29]=&quot;UNKNOWN&quot;;&quot;NO ACTION — linkage status is UNKNOWN / not asserted&quot;;IF([.S29]=&quot;CLEAR&quot;;&quot;NO CONTRADICTION — preserve evidence as entered&quot;;IF([.M29]=&quot;&quot;;&quot;REVIEW LINKAGE STATUS — identifiers are present while status is UNKNOWN&quot;;IF([.M29]=&quot;UNMATCHED&quot;;&quot;REMOVE LINKAGE IDENTIFIERS OR CORRECT LINKAGE STATUS&quot;;IF([.M29]=&quot;SINGLE_SALE_LINKED&quot;;&quot;REQUIRE LINKED SALE ID AND NO ALLOCATION GROUP ID&quot;;IF([.M29]=&quot;MULTI_SALE_PENDING_ALLOCATION&quot;;&quot;REMOVE LINKED SALE ID OR CORRECT LINKAGE STATUS&quot;;IF([.M2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cell office:value-type="string" table:formula="of:=IF([.S30]=&quot;UNKNOWN&quot;;&quot;NO ACTION — linkage status is UNKNOWN / not asserted&quot;;IF([.S30]=&quot;CLEAR&quot;;&quot;NO CONTRADICTION — preserve evidence as entered&quot;;IF([.M30]=&quot;&quot;;&quot;REVIEW LINKAGE STATUS — identifiers are present while status is UNKNOWN&quot;;IF([.M30]=&quot;UNMATCHED&quot;;&quot;REMOVE LINKAGE IDENTIFIERS OR CORRECT LINKAGE STATUS&quot;;IF([.M30]=&quot;SINGLE_SALE_LINKED&quot;;&quot;REQUIRE LINKED SALE ID AND NO ALLOCATION GROUP ID&quot;;IF([.M30]=&quot;MULTI_SALE_PENDING_ALLOCATION&quot;;&quot;REMOVE LINKED SALE ID OR CORRECT LINKAGE STATUS&quot;;IF([.M3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cell office:value-type="string" table:formula="of:=IF([.S31]=&quot;UNKNOWN&quot;;&quot;NO ACTION — linkage status is UNKNOWN / not asserted&quot;;IF([.S31]=&quot;CLEAR&quot;;&quot;NO CONTRADICTION — preserve evidence as entered&quot;;IF([.M31]=&quot;&quot;;&quot;REVIEW LINKAGE STATUS — identifiers are present while status is UNKNOWN&quot;;IF([.M31]=&quot;UNMATCHED&quot;;&quot;REMOVE LINKAGE IDENTIFIERS OR CORRECT LINKAGE STATUS&quot;;IF([.M31]=&quot;SINGLE_SALE_LINKED&quot;;&quot;REQUIRE LINKED SALE ID AND NO ALLOCATION GROUP ID&quot;;IF([.M31]=&quot;MULTI_SALE_PENDING_ALLOCATION&quot;;&quot;REMOVE LINKED SALE ID OR CORRECT LINKAGE STATUS&quot;;IF([.M3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cell office:value-type="string" table:formula="of:=IF([.S32]=&quot;UNKNOWN&quot;;&quot;NO ACTION — linkage status is UNKNOWN / not asserted&quot;;IF([.S32]=&quot;CLEAR&quot;;&quot;NO CONTRADICTION — preserve evidence as entered&quot;;IF([.M32]=&quot;&quot;;&quot;REVIEW LINKAGE STATUS — identifiers are present while status is UNKNOWN&quot;;IF([.M32]=&quot;UNMATCHED&quot;;&quot;REMOVE LINKAGE IDENTIFIERS OR CORRECT LINKAGE STATUS&quot;;IF([.M32]=&quot;SINGLE_SALE_LINKED&quot;;&quot;REQUIRE LINKED SALE ID AND NO ALLOCATION GROUP ID&quot;;IF([.M32]=&quot;MULTI_SALE_PENDING_ALLOCATION&quot;;&quot;REMOVE LINKED SALE ID OR CORRECT LINKAGE STATUS&quot;;IF([.M3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cell office:value-type="string" table:formula="of:=IF([.S33]=&quot;UNKNOWN&quot;;&quot;NO ACTION — linkage status is UNKNOWN / not asserted&quot;;IF([.S33]=&quot;CLEAR&quot;;&quot;NO CONTRADICTION — preserve evidence as entered&quot;;IF([.M33]=&quot;&quot;;&quot;REVIEW LINKAGE STATUS — identifiers are present while status is UNKNOWN&quot;;IF([.M33]=&quot;UNMATCHED&quot;;&quot;REMOVE LINKAGE IDENTIFIERS OR CORRECT LINKAGE STATUS&quot;;IF([.M33]=&quot;SINGLE_SALE_LINKED&quot;;&quot;REQUIRE LINKED SALE ID AND NO ALLOCATION GROUP ID&quot;;IF([.M33]=&quot;MULTI_SALE_PENDING_ALLOCATION&quot;;&quot;REMOVE LINKED SALE ID OR CORRECT LINKAGE STATUS&quot;;IF([.M3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cell office:value-type="string" table:formula="of:=IF([.S34]=&quot;UNKNOWN&quot;;&quot;NO ACTION — linkage status is UNKNOWN / not asserted&quot;;IF([.S34]=&quot;CLEAR&quot;;&quot;NO CONTRADICTION — preserve evidence as entered&quot;;IF([.M34]=&quot;&quot;;&quot;REVIEW LINKAGE STATUS — identifiers are present while status is UNKNOWN&quot;;IF([.M34]=&quot;UNMATCHED&quot;;&quot;REMOVE LINKAGE IDENTIFIERS OR CORRECT LINKAGE STATUS&quot;;IF([.M34]=&quot;SINGLE_SALE_LINKED&quot;;&quot;REQUIRE LINKED SALE ID AND NO ALLOCATION GROUP ID&quot;;IF([.M34]=&quot;MULTI_SALE_PENDING_ALLOCATION&quot;;&quot;REMOVE LINKED SALE ID OR CORRECT LINKAGE STATUS&quot;;IF([.M3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cell office:value-type="string" table:formula="of:=IF([.S35]=&quot;UNKNOWN&quot;;&quot;NO ACTION — linkage status is UNKNOWN / not asserted&quot;;IF([.S35]=&quot;CLEAR&quot;;&quot;NO CONTRADICTION — preserve evidence as entered&quot;;IF([.M35]=&quot;&quot;;&quot;REVIEW LINKAGE STATUS — identifiers are present while status is UNKNOWN&quot;;IF([.M35]=&quot;UNMATCHED&quot;;&quot;REMOVE LINKAGE IDENTIFIERS OR CORRECT LINKAGE STATUS&quot;;IF([.M35]=&quot;SINGLE_SALE_LINKED&quot;;&quot;REQUIRE LINKED SALE ID AND NO ALLOCATION GROUP ID&quot;;IF([.M35]=&quot;MULTI_SALE_PENDING_ALLOCATION&quot;;&quot;REMOVE LINKED SALE ID OR CORRECT LINKAGE STATUS&quot;;IF([.M3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cell office:value-type="string" table:formula="of:=IF([.S36]=&quot;UNKNOWN&quot;;&quot;NO ACTION — linkage status is UNKNOWN / not asserted&quot;;IF([.S36]=&quot;CLEAR&quot;;&quot;NO CONTRADICTION — preserve evidence as entered&quot;;IF([.M36]=&quot;&quot;;&quot;REVIEW LINKAGE STATUS — identifiers are present while status is UNKNOWN&quot;;IF([.M36]=&quot;UNMATCHED&quot;;&quot;REMOVE LINKAGE IDENTIFIERS OR CORRECT LINKAGE STATUS&quot;;IF([.M36]=&quot;SINGLE_SALE_LINKED&quot;;&quot;REQUIRE LINKED SALE ID AND NO ALLOCATION GROUP ID&quot;;IF([.M36]=&quot;MULTI_SALE_PENDING_ALLOCATION&quot;;&quot;REMOVE LINKED SALE ID OR CORRECT LINKAGE STATUS&quot;;IF([.M3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cell office:value-type="string" table:formula="of:=IF([.S37]=&quot;UNKNOWN&quot;;&quot;NO ACTION — linkage status is UNKNOWN / not asserted&quot;;IF([.S37]=&quot;CLEAR&quot;;&quot;NO CONTRADICTION — preserve evidence as entered&quot;;IF([.M37]=&quot;&quot;;&quot;REVIEW LINKAGE STATUS — identifiers are present while status is UNKNOWN&quot;;IF([.M37]=&quot;UNMATCHED&quot;;&quot;REMOVE LINKAGE IDENTIFIERS OR CORRECT LINKAGE STATUS&quot;;IF([.M37]=&quot;SINGLE_SALE_LINKED&quot;;&quot;REQUIRE LINKED SALE ID AND NO ALLOCATION GROUP ID&quot;;IF([.M37]=&quot;MULTI_SALE_PENDING_ALLOCATION&quot;;&quot;REMOVE LINKED SALE ID OR CORRECT LINKAGE STATUS&quot;;IF([.M3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cell office:value-type="string" table:formula="of:=IF([.S38]=&quot;UNKNOWN&quot;;&quot;NO ACTION — linkage status is UNKNOWN / not asserted&quot;;IF([.S38]=&quot;CLEAR&quot;;&quot;NO CONTRADICTION — preserve evidence as entered&quot;;IF([.M38]=&quot;&quot;;&quot;REVIEW LINKAGE STATUS — identifiers are present while status is UNKNOWN&quot;;IF([.M38]=&quot;UNMATCHED&quot;;&quot;REMOVE LINKAGE IDENTIFIERS OR CORRECT LINKAGE STATUS&quot;;IF([.M38]=&quot;SINGLE_SALE_LINKED&quot;;&quot;REQUIRE LINKED SALE ID AND NO ALLOCATION GROUP ID&quot;;IF([.M38]=&quot;MULTI_SALE_PENDING_ALLOCATION&quot;;&quot;REMOVE LINKED SALE ID OR CORRECT LINKAGE STATUS&quot;;IF([.M3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cell office:value-type="string" table:formula="of:=IF([.S39]=&quot;UNKNOWN&quot;;&quot;NO ACTION — linkage status is UNKNOWN / not asserted&quot;;IF([.S39]=&quot;CLEAR&quot;;&quot;NO CONTRADICTION — preserve evidence as entered&quot;;IF([.M39]=&quot;&quot;;&quot;REVIEW LINKAGE STATUS — identifiers are present while status is UNKNOWN&quot;;IF([.M39]=&quot;UNMATCHED&quot;;&quot;REMOVE LINKAGE IDENTIFIERS OR CORRECT LINKAGE STATUS&quot;;IF([.M39]=&quot;SINGLE_SALE_LINKED&quot;;&quot;REQUIRE LINKED SALE ID AND NO ALLOCATION GROUP ID&quot;;IF([.M39]=&quot;MULTI_SALE_PENDING_ALLOCATION&quot;;&quot;REMOVE LINKED SALE ID OR CORRECT LINKAGE STATUS&quot;;IF([.M3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cell office:value-type="string" table:formula="of:=IF([.S40]=&quot;UNKNOWN&quot;;&quot;NO ACTION — linkage status is UNKNOWN / not asserted&quot;;IF([.S40]=&quot;CLEAR&quot;;&quot;NO CONTRADICTION — preserve evidence as entered&quot;;IF([.M40]=&quot;&quot;;&quot;REVIEW LINKAGE STATUS — identifiers are present while status is UNKNOWN&quot;;IF([.M40]=&quot;UNMATCHED&quot;;&quot;REMOVE LINKAGE IDENTIFIERS OR CORRECT LINKAGE STATUS&quot;;IF([.M40]=&quot;SINGLE_SALE_LINKED&quot;;&quot;REQUIRE LINKED SALE ID AND NO ALLOCATION GROUP ID&quot;;IF([.M40]=&quot;MULTI_SALE_PENDING_ALLOCATION&quot;;&quot;REMOVE LINKED SALE ID OR CORRECT LINKAGE STATUS&quot;;IF([.M4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cell office:value-type="string" table:formula="of:=IF([.S41]=&quot;UNKNOWN&quot;;&quot;NO ACTION — linkage status is UNKNOWN / not asserted&quot;;IF([.S41]=&quot;CLEAR&quot;;&quot;NO CONTRADICTION — preserve evidence as entered&quot;;IF([.M41]=&quot;&quot;;&quot;REVIEW LINKAGE STATUS — identifiers are present while status is UNKNOWN&quot;;IF([.M41]=&quot;UNMATCHED&quot;;&quot;REMOVE LINKAGE IDENTIFIERS OR CORRECT LINKAGE STATUS&quot;;IF([.M41]=&quot;SINGLE_SALE_LINKED&quot;;&quot;REQUIRE LINKED SALE ID AND NO ALLOCATION GROUP ID&quot;;IF([.M41]=&quot;MULTI_SALE_PENDING_ALLOCATION&quot;;&quot;REMOVE LINKED SALE ID OR CORRECT LINKAGE STATUS&quot;;IF([.M4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cell office:value-type="string" table:formula="of:=IF([.S42]=&quot;UNKNOWN&quot;;&quot;NO ACTION — linkage status is UNKNOWN / not asserted&quot;;IF([.S42]=&quot;CLEAR&quot;;&quot;NO CONTRADICTION — preserve evidence as entered&quot;;IF([.M42]=&quot;&quot;;&quot;REVIEW LINKAGE STATUS — identifiers are present while status is UNKNOWN&quot;;IF([.M42]=&quot;UNMATCHED&quot;;&quot;REMOVE LINKAGE IDENTIFIERS OR CORRECT LINKAGE STATUS&quot;;IF([.M42]=&quot;SINGLE_SALE_LINKED&quot;;&quot;REQUIRE LINKED SALE ID AND NO ALLOCATION GROUP ID&quot;;IF([.M42]=&quot;MULTI_SALE_PENDING_ALLOCATION&quot;;&quot;REMOVE LINKED SALE ID OR CORRECT LINKAGE STATUS&quot;;IF([.M4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cell office:value-type="string" table:formula="of:=IF([.S43]=&quot;UNKNOWN&quot;;&quot;NO ACTION — linkage status is UNKNOWN / not asserted&quot;;IF([.S43]=&quot;CLEAR&quot;;&quot;NO CONTRADICTION — preserve evidence as entered&quot;;IF([.M43]=&quot;&quot;;&quot;REVIEW LINKAGE STATUS — identifiers are present while status is UNKNOWN&quot;;IF([.M43]=&quot;UNMATCHED&quot;;&quot;REMOVE LINKAGE IDENTIFIERS OR CORRECT LINKAGE STATUS&quot;;IF([.M43]=&quot;SINGLE_SALE_LINKED&quot;;&quot;REQUIRE LINKED SALE ID AND NO ALLOCATION GROUP ID&quot;;IF([.M43]=&quot;MULTI_SALE_PENDING_ALLOCATION&quot;;&quot;REMOVE LINKED SALE ID OR CORRECT LINKAGE STATUS&quot;;IF([.M4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cell office:value-type="string" table:formula="of:=IF([.S44]=&quot;UNKNOWN&quot;;&quot;NO ACTION — linkage status is UNKNOWN / not asserted&quot;;IF([.S44]=&quot;CLEAR&quot;;&quot;NO CONTRADICTION — preserve evidence as entered&quot;;IF([.M44]=&quot;&quot;;&quot;REVIEW LINKAGE STATUS — identifiers are present while status is UNKNOWN&quot;;IF([.M44]=&quot;UNMATCHED&quot;;&quot;REMOVE LINKAGE IDENTIFIERS OR CORRECT LINKAGE STATUS&quot;;IF([.M44]=&quot;SINGLE_SALE_LINKED&quot;;&quot;REQUIRE LINKED SALE ID AND NO ALLOCATION GROUP ID&quot;;IF([.M44]=&quot;MULTI_SALE_PENDING_ALLOCATION&quot;;&quot;REMOVE LINKED SALE ID OR CORRECT LINKAGE STATUS&quot;;IF([.M4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cell office:value-type="string" table:formula="of:=IF([.S45]=&quot;UNKNOWN&quot;;&quot;NO ACTION — linkage status is UNKNOWN / not asserted&quot;;IF([.S45]=&quot;CLEAR&quot;;&quot;NO CONTRADICTION — preserve evidence as entered&quot;;IF([.M45]=&quot;&quot;;&quot;REVIEW LINKAGE STATUS — identifiers are present while status is UNKNOWN&quot;;IF([.M45]=&quot;UNMATCHED&quot;;&quot;REMOVE LINKAGE IDENTIFIERS OR CORRECT LINKAGE STATUS&quot;;IF([.M45]=&quot;SINGLE_SALE_LINKED&quot;;&quot;REQUIRE LINKED SALE ID AND NO ALLOCATION GROUP ID&quot;;IF([.M45]=&quot;MULTI_SALE_PENDING_ALLOCATION&quot;;&quot;REMOVE LINKED SALE ID OR CORRECT LINKAGE STATUS&quot;;IF([.M4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cell office:value-type="string" table:formula="of:=IF([.S46]=&quot;UNKNOWN&quot;;&quot;NO ACTION — linkage status is UNKNOWN / not asserted&quot;;IF([.S46]=&quot;CLEAR&quot;;&quot;NO CONTRADICTION — preserve evidence as entered&quot;;IF([.M46]=&quot;&quot;;&quot;REVIEW LINKAGE STATUS — identifiers are present while status is UNKNOWN&quot;;IF([.M46]=&quot;UNMATCHED&quot;;&quot;REMOVE LINKAGE IDENTIFIERS OR CORRECT LINKAGE STATUS&quot;;IF([.M46]=&quot;SINGLE_SALE_LINKED&quot;;&quot;REQUIRE LINKED SALE ID AND NO ALLOCATION GROUP ID&quot;;IF([.M46]=&quot;MULTI_SALE_PENDING_ALLOCATION&quot;;&quot;REMOVE LINKED SALE ID OR CORRECT LINKAGE STATUS&quot;;IF([.M4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cell office:value-type="string" table:formula="of:=IF([.S47]=&quot;UNKNOWN&quot;;&quot;NO ACTION — linkage status is UNKNOWN / not asserted&quot;;IF([.S47]=&quot;CLEAR&quot;;&quot;NO CONTRADICTION — preserve evidence as entered&quot;;IF([.M47]=&quot;&quot;;&quot;REVIEW LINKAGE STATUS — identifiers are present while status is UNKNOWN&quot;;IF([.M47]=&quot;UNMATCHED&quot;;&quot;REMOVE LINKAGE IDENTIFIERS OR CORRECT LINKAGE STATUS&quot;;IF([.M47]=&quot;SINGLE_SALE_LINKED&quot;;&quot;REQUIRE LINKED SALE ID AND NO ALLOCATION GROUP ID&quot;;IF([.M47]=&quot;MULTI_SALE_PENDING_ALLOCATION&quot;;&quot;REMOVE LINKED SALE ID OR CORRECT LINKAGE STATUS&quot;;IF([.M4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cell office:value-type="string" table:formula="of:=IF([.S48]=&quot;UNKNOWN&quot;;&quot;NO ACTION — linkage status is UNKNOWN / not asserted&quot;;IF([.S48]=&quot;CLEAR&quot;;&quot;NO CONTRADICTION — preserve evidence as entered&quot;;IF([.M48]=&quot;&quot;;&quot;REVIEW LINKAGE STATUS — identifiers are present while status is UNKNOWN&quot;;IF([.M48]=&quot;UNMATCHED&quot;;&quot;REMOVE LINKAGE IDENTIFIERS OR CORRECT LINKAGE STATUS&quot;;IF([.M48]=&quot;SINGLE_SALE_LINKED&quot;;&quot;REQUIRE LINKED SALE ID AND NO ALLOCATION GROUP ID&quot;;IF([.M48]=&quot;MULTI_SALE_PENDING_ALLOCATION&quot;;&quot;REMOVE LINKED SALE ID OR CORRECT LINKAGE STATUS&quot;;IF([.M4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cell office:value-type="string" table:formula="of:=IF([.S49]=&quot;UNKNOWN&quot;;&quot;NO ACTION — linkage status is UNKNOWN / not asserted&quot;;IF([.S49]=&quot;CLEAR&quot;;&quot;NO CONTRADICTION — preserve evidence as entered&quot;;IF([.M49]=&quot;&quot;;&quot;REVIEW LINKAGE STATUS — identifiers are present while status is UNKNOWN&quot;;IF([.M49]=&quot;UNMATCHED&quot;;&quot;REMOVE LINKAGE IDENTIFIERS OR CORRECT LINKAGE STATUS&quot;;IF([.M49]=&quot;SINGLE_SALE_LINKED&quot;;&quot;REQUIRE LINKED SALE ID AND NO ALLOCATION GROUP ID&quot;;IF([.M49]=&quot;MULTI_SALE_PENDING_ALLOCATION&quot;;&quot;REMOVE LINKED SALE ID OR CORRECT LINKAGE STATUS&quot;;IF([.M4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cell office:value-type="string" table:formula="of:=IF([.S50]=&quot;UNKNOWN&quot;;&quot;NO ACTION — linkage status is UNKNOWN / not asserted&quot;;IF([.S50]=&quot;CLEAR&quot;;&quot;NO CONTRADICTION — preserve evidence as entered&quot;;IF([.M50]=&quot;&quot;;&quot;REVIEW LINKAGE STATUS — identifiers are present while status is UNKNOWN&quot;;IF([.M50]=&quot;UNMATCHED&quot;;&quot;REMOVE LINKAGE IDENTIFIERS OR CORRECT LINKAGE STATUS&quot;;IF([.M50]=&quot;SINGLE_SALE_LINKED&quot;;&quot;REQUIRE LINKED SALE ID AND NO ALLOCATION GROUP ID&quot;;IF([.M50]=&quot;MULTI_SALE_PENDING_ALLOCATION&quot;;&quot;REMOVE LINKED SALE ID OR CORRECT LINKAGE STATUS&quot;;IF([.M5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cell office:value-type="string" table:formula="of:=IF([.S51]=&quot;UNKNOWN&quot;;&quot;NO ACTION — linkage status is UNKNOWN / not asserted&quot;;IF([.S51]=&quot;CLEAR&quot;;&quot;NO CONTRADICTION — preserve evidence as entered&quot;;IF([.M51]=&quot;&quot;;&quot;REVIEW LINKAGE STATUS — identifiers are present while status is UNKNOWN&quot;;IF([.M51]=&quot;UNMATCHED&quot;;&quot;REMOVE LINKAGE IDENTIFIERS OR CORRECT LINKAGE STATUS&quot;;IF([.M51]=&quot;SINGLE_SALE_LINKED&quot;;&quot;REQUIRE LINKED SALE ID AND NO ALLOCATION GROUP ID&quot;;IF([.M51]=&quot;MULTI_SALE_PENDING_ALLOCATION&quot;;&quot;REMOVE LINKED SALE ID OR CORRECT LINKAGE STATUS&quot;;IF([.M5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cell office:value-type="string" table:formula="of:=IF([.S52]=&quot;UNKNOWN&quot;;&quot;NO ACTION — linkage status is UNKNOWN / not asserted&quot;;IF([.S52]=&quot;CLEAR&quot;;&quot;NO CONTRADICTION — preserve evidence as entered&quot;;IF([.M52]=&quot;&quot;;&quot;REVIEW LINKAGE STATUS — identifiers are present while status is UNKNOWN&quot;;IF([.M52]=&quot;UNMATCHED&quot;;&quot;REMOVE LINKAGE IDENTIFIERS OR CORRECT LINKAGE STATUS&quot;;IF([.M52]=&quot;SINGLE_SALE_LINKED&quot;;&quot;REQUIRE LINKED SALE ID AND NO ALLOCATION GROUP ID&quot;;IF([.M52]=&quot;MULTI_SALE_PENDING_ALLOCATION&quot;;&quot;REMOVE LINKED SALE ID OR CORRECT LINKAGE STATUS&quot;;IF([.M5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cell office:value-type="string" table:formula="of:=IF([.S53]=&quot;UNKNOWN&quot;;&quot;NO ACTION — linkage status is UNKNOWN / not asserted&quot;;IF([.S53]=&quot;CLEAR&quot;;&quot;NO CONTRADICTION — preserve evidence as entered&quot;;IF([.M53]=&quot;&quot;;&quot;REVIEW LINKAGE STATUS — identifiers are present while status is UNKNOWN&quot;;IF([.M53]=&quot;UNMATCHED&quot;;&quot;REMOVE LINKAGE IDENTIFIERS OR CORRECT LINKAGE STATUS&quot;;IF([.M53]=&quot;SINGLE_SALE_LINKED&quot;;&quot;REQUIRE LINKED SALE ID AND NO ALLOCATION GROUP ID&quot;;IF([.M53]=&quot;MULTI_SALE_PENDING_ALLOCATION&quot;;&quot;REMOVE LINKED SALE ID OR CORRECT LINKAGE STATUS&quot;;IF([.M5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cell office:value-type="string" table:formula="of:=IF([.S54]=&quot;UNKNOWN&quot;;&quot;NO ACTION — linkage status is UNKNOWN / not asserted&quot;;IF([.S54]=&quot;CLEAR&quot;;&quot;NO CONTRADICTION — preserve evidence as entered&quot;;IF([.M54]=&quot;&quot;;&quot;REVIEW LINKAGE STATUS — identifiers are present while status is UNKNOWN&quot;;IF([.M54]=&quot;UNMATCHED&quot;;&quot;REMOVE LINKAGE IDENTIFIERS OR CORRECT LINKAGE STATUS&quot;;IF([.M54]=&quot;SINGLE_SALE_LINKED&quot;;&quot;REQUIRE LINKED SALE ID AND NO ALLOCATION GROUP ID&quot;;IF([.M54]=&quot;MULTI_SALE_PENDING_ALLOCATION&quot;;&quot;REMOVE LINKED SALE ID OR CORRECT LINKAGE STATUS&quot;;IF([.M5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cell office:value-type="string" table:formula="of:=IF([.S55]=&quot;UNKNOWN&quot;;&quot;NO ACTION — linkage status is UNKNOWN / not asserted&quot;;IF([.S55]=&quot;CLEAR&quot;;&quot;NO CONTRADICTION — preserve evidence as entered&quot;;IF([.M55]=&quot;&quot;;&quot;REVIEW LINKAGE STATUS — identifiers are present while status is UNKNOWN&quot;;IF([.M55]=&quot;UNMATCHED&quot;;&quot;REMOVE LINKAGE IDENTIFIERS OR CORRECT LINKAGE STATUS&quot;;IF([.M55]=&quot;SINGLE_SALE_LINKED&quot;;&quot;REQUIRE LINKED SALE ID AND NO ALLOCATION GROUP ID&quot;;IF([.M55]=&quot;MULTI_SALE_PENDING_ALLOCATION&quot;;&quot;REMOVE LINKED SALE ID OR CORRECT LINKAGE STATUS&quot;;IF([.M5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cell office:value-type="string" table:formula="of:=IF([.S56]=&quot;UNKNOWN&quot;;&quot;NO ACTION — linkage status is UNKNOWN / not asserted&quot;;IF([.S56]=&quot;CLEAR&quot;;&quot;NO CONTRADICTION — preserve evidence as entered&quot;;IF([.M56]=&quot;&quot;;&quot;REVIEW LINKAGE STATUS — identifiers are present while status is UNKNOWN&quot;;IF([.M56]=&quot;UNMATCHED&quot;;&quot;REMOVE LINKAGE IDENTIFIERS OR CORRECT LINKAGE STATUS&quot;;IF([.M56]=&quot;SINGLE_SALE_LINKED&quot;;&quot;REQUIRE LINKED SALE ID AND NO ALLOCATION GROUP ID&quot;;IF([.M56]=&quot;MULTI_SALE_PENDING_ALLOCATION&quot;;&quot;REMOVE LINKED SALE ID OR CORRECT LINKAGE STATUS&quot;;IF([.M5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cell office:value-type="string" table:formula="of:=IF([.S57]=&quot;UNKNOWN&quot;;&quot;NO ACTION — linkage status is UNKNOWN / not asserted&quot;;IF([.S57]=&quot;CLEAR&quot;;&quot;NO CONTRADICTION — preserve evidence as entered&quot;;IF([.M57]=&quot;&quot;;&quot;REVIEW LINKAGE STATUS — identifiers are present while status is UNKNOWN&quot;;IF([.M57]=&quot;UNMATCHED&quot;;&quot;REMOVE LINKAGE IDENTIFIERS OR CORRECT LINKAGE STATUS&quot;;IF([.M57]=&quot;SINGLE_SALE_LINKED&quot;;&quot;REQUIRE LINKED SALE ID AND NO ALLOCATION GROUP ID&quot;;IF([.M57]=&quot;MULTI_SALE_PENDING_ALLOCATION&quot;;&quot;REMOVE LINKED SALE ID OR CORRECT LINKAGE STATUS&quot;;IF([.M5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cell office:value-type="string" table:formula="of:=IF([.S58]=&quot;UNKNOWN&quot;;&quot;NO ACTION — linkage status is UNKNOWN / not asserted&quot;;IF([.S58]=&quot;CLEAR&quot;;&quot;NO CONTRADICTION — preserve evidence as entered&quot;;IF([.M58]=&quot;&quot;;&quot;REVIEW LINKAGE STATUS — identifiers are present while status is UNKNOWN&quot;;IF([.M58]=&quot;UNMATCHED&quot;;&quot;REMOVE LINKAGE IDENTIFIERS OR CORRECT LINKAGE STATUS&quot;;IF([.M58]=&quot;SINGLE_SALE_LINKED&quot;;&quot;REQUIRE LINKED SALE ID AND NO ALLOCATION GROUP ID&quot;;IF([.M58]=&quot;MULTI_SALE_PENDING_ALLOCATION&quot;;&quot;REMOVE LINKED SALE ID OR CORRECT LINKAGE STATUS&quot;;IF([.M5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cell office:value-type="string" table:formula="of:=IF([.S59]=&quot;UNKNOWN&quot;;&quot;NO ACTION — linkage status is UNKNOWN / not asserted&quot;;IF([.S59]=&quot;CLEAR&quot;;&quot;NO CONTRADICTION — preserve evidence as entered&quot;;IF([.M59]=&quot;&quot;;&quot;REVIEW LINKAGE STATUS — identifiers are present while status is UNKNOWN&quot;;IF([.M59]=&quot;UNMATCHED&quot;;&quot;REMOVE LINKAGE IDENTIFIERS OR CORRECT LINKAGE STATUS&quot;;IF([.M59]=&quot;SINGLE_SALE_LINKED&quot;;&quot;REQUIRE LINKED SALE ID AND NO ALLOCATION GROUP ID&quot;;IF([.M59]=&quot;MULTI_SALE_PENDING_ALLOCATION&quot;;&quot;REMOVE LINKED SALE ID OR CORRECT LINKAGE STATUS&quot;;IF([.M5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cell office:value-type="string" table:formula="of:=IF([.S60]=&quot;UNKNOWN&quot;;&quot;NO ACTION — linkage status is UNKNOWN / not asserted&quot;;IF([.S60]=&quot;CLEAR&quot;;&quot;NO CONTRADICTION — preserve evidence as entered&quot;;IF([.M60]=&quot;&quot;;&quot;REVIEW LINKAGE STATUS — identifiers are present while status is UNKNOWN&quot;;IF([.M60]=&quot;UNMATCHED&quot;;&quot;REMOVE LINKAGE IDENTIFIERS OR CORRECT LINKAGE STATUS&quot;;IF([.M60]=&quot;SINGLE_SALE_LINKED&quot;;&quot;REQUIRE LINKED SALE ID AND NO ALLOCATION GROUP ID&quot;;IF([.M60]=&quot;MULTI_SALE_PENDING_ALLOCATION&quot;;&quot;REMOVE LINKED SALE ID OR CORRECT LINKAGE STATUS&quot;;IF([.M6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cell office:value-type="string" table:formula="of:=IF([.S61]=&quot;UNKNOWN&quot;;&quot;NO ACTION — linkage status is UNKNOWN / not asserted&quot;;IF([.S61]=&quot;CLEAR&quot;;&quot;NO CONTRADICTION — preserve evidence as entered&quot;;IF([.M61]=&quot;&quot;;&quot;REVIEW LINKAGE STATUS — identifiers are present while status is UNKNOWN&quot;;IF([.M61]=&quot;UNMATCHED&quot;;&quot;REMOVE LINKAGE IDENTIFIERS OR CORRECT LINKAGE STATUS&quot;;IF([.M61]=&quot;SINGLE_SALE_LINKED&quot;;&quot;REQUIRE LINKED SALE ID AND NO ALLOCATION GROUP ID&quot;;IF([.M61]=&quot;MULTI_SALE_PENDING_ALLOCATION&quot;;&quot;REMOVE LINKED SALE ID OR CORRECT LINKAGE STATUS&quot;;IF([.M6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cell office:value-type="string" table:formula="of:=IF([.S62]=&quot;UNKNOWN&quot;;&quot;NO ACTION — linkage status is UNKNOWN / not asserted&quot;;IF([.S62]=&quot;CLEAR&quot;;&quot;NO CONTRADICTION — preserve evidence as entered&quot;;IF([.M62]=&quot;&quot;;&quot;REVIEW LINKAGE STATUS — identifiers are present while status is UNKNOWN&quot;;IF([.M62]=&quot;UNMATCHED&quot;;&quot;REMOVE LINKAGE IDENTIFIERS OR CORRECT LINKAGE STATUS&quot;;IF([.M62]=&quot;SINGLE_SALE_LINKED&quot;;&quot;REQUIRE LINKED SALE ID AND NO ALLOCATION GROUP ID&quot;;IF([.M62]=&quot;MULTI_SALE_PENDING_ALLOCATION&quot;;&quot;REMOVE LINKED SALE ID OR CORRECT LINKAGE STATUS&quot;;IF([.M6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cell office:value-type="string" table:formula="of:=IF([.S63]=&quot;UNKNOWN&quot;;&quot;NO ACTION — linkage status is UNKNOWN / not asserted&quot;;IF([.S63]=&quot;CLEAR&quot;;&quot;NO CONTRADICTION — preserve evidence as entered&quot;;IF([.M63]=&quot;&quot;;&quot;REVIEW LINKAGE STATUS — identifiers are present while status is UNKNOWN&quot;;IF([.M63]=&quot;UNMATCHED&quot;;&quot;REMOVE LINKAGE IDENTIFIERS OR CORRECT LINKAGE STATUS&quot;;IF([.M63]=&quot;SINGLE_SALE_LINKED&quot;;&quot;REQUIRE LINKED SALE ID AND NO ALLOCATION GROUP ID&quot;;IF([.M63]=&quot;MULTI_SALE_PENDING_ALLOCATION&quot;;&quot;REMOVE LINKED SALE ID OR CORRECT LINKAGE STATUS&quot;;IF([.M6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cell office:value-type="string" table:formula="of:=IF([.S64]=&quot;UNKNOWN&quot;;&quot;NO ACTION — linkage status is UNKNOWN / not asserted&quot;;IF([.S64]=&quot;CLEAR&quot;;&quot;NO CONTRADICTION — preserve evidence as entered&quot;;IF([.M64]=&quot;&quot;;&quot;REVIEW LINKAGE STATUS — identifiers are present while status is UNKNOWN&quot;;IF([.M64]=&quot;UNMATCHED&quot;;&quot;REMOVE LINKAGE IDENTIFIERS OR CORRECT LINKAGE STATUS&quot;;IF([.M64]=&quot;SINGLE_SALE_LINKED&quot;;&quot;REQUIRE LINKED SALE ID AND NO ALLOCATION GROUP ID&quot;;IF([.M64]=&quot;MULTI_SALE_PENDING_ALLOCATION&quot;;&quot;REMOVE LINKED SALE ID OR CORRECT LINKAGE STATUS&quot;;IF([.M6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cell office:value-type="string" table:formula="of:=IF([.S65]=&quot;UNKNOWN&quot;;&quot;NO ACTION — linkage status is UNKNOWN / not asserted&quot;;IF([.S65]=&quot;CLEAR&quot;;&quot;NO CONTRADICTION — preserve evidence as entered&quot;;IF([.M65]=&quot;&quot;;&quot;REVIEW LINKAGE STATUS — identifiers are present while status is UNKNOWN&quot;;IF([.M65]=&quot;UNMATCHED&quot;;&quot;REMOVE LINKAGE IDENTIFIERS OR CORRECT LINKAGE STATUS&quot;;IF([.M65]=&quot;SINGLE_SALE_LINKED&quot;;&quot;REQUIRE LINKED SALE ID AND NO ALLOCATION GROUP ID&quot;;IF([.M65]=&quot;MULTI_SALE_PENDING_ALLOCATION&quot;;&quot;REMOVE LINKED SALE ID OR CORRECT LINKAGE STATUS&quot;;IF([.M6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cell office:value-type="string" table:formula="of:=IF([.S66]=&quot;UNKNOWN&quot;;&quot;NO ACTION — linkage status is UNKNOWN / not asserted&quot;;IF([.S66]=&quot;CLEAR&quot;;&quot;NO CONTRADICTION — preserve evidence as entered&quot;;IF([.M66]=&quot;&quot;;&quot;REVIEW LINKAGE STATUS — identifiers are present while status is UNKNOWN&quot;;IF([.M66]=&quot;UNMATCHED&quot;;&quot;REMOVE LINKAGE IDENTIFIERS OR CORRECT LINKAGE STATUS&quot;;IF([.M66]=&quot;SINGLE_SALE_LINKED&quot;;&quot;REQUIRE LINKED SALE ID AND NO ALLOCATION GROUP ID&quot;;IF([.M66]=&quot;MULTI_SALE_PENDING_ALLOCATION&quot;;&quot;REMOVE LINKED SALE ID OR CORRECT LINKAGE STATUS&quot;;IF([.M6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cell office:value-type="string" table:formula="of:=IF([.S67]=&quot;UNKNOWN&quot;;&quot;NO ACTION — linkage status is UNKNOWN / not asserted&quot;;IF([.S67]=&quot;CLEAR&quot;;&quot;NO CONTRADICTION — preserve evidence as entered&quot;;IF([.M67]=&quot;&quot;;&quot;REVIEW LINKAGE STATUS — identifiers are present while status is UNKNOWN&quot;;IF([.M67]=&quot;UNMATCHED&quot;;&quot;REMOVE LINKAGE IDENTIFIERS OR CORRECT LINKAGE STATUS&quot;;IF([.M67]=&quot;SINGLE_SALE_LINKED&quot;;&quot;REQUIRE LINKED SALE ID AND NO ALLOCATION GROUP ID&quot;;IF([.M67]=&quot;MULTI_SALE_PENDING_ALLOCATION&quot;;&quot;REMOVE LINKED SALE ID OR CORRECT LINKAGE STATUS&quot;;IF([.M6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cell office:value-type="string" table:formula="of:=IF([.S68]=&quot;UNKNOWN&quot;;&quot;NO ACTION — linkage status is UNKNOWN / not asserted&quot;;IF([.S68]=&quot;CLEAR&quot;;&quot;NO CONTRADICTION — preserve evidence as entered&quot;;IF([.M68]=&quot;&quot;;&quot;REVIEW LINKAGE STATUS — identifiers are present while status is UNKNOWN&quot;;IF([.M68]=&quot;UNMATCHED&quot;;&quot;REMOVE LINKAGE IDENTIFIERS OR CORRECT LINKAGE STATUS&quot;;IF([.M68]=&quot;SINGLE_SALE_LINKED&quot;;&quot;REQUIRE LINKED SALE ID AND NO ALLOCATION GROUP ID&quot;;IF([.M68]=&quot;MULTI_SALE_PENDING_ALLOCATION&quot;;&quot;REMOVE LINKED SALE ID OR CORRECT LINKAGE STATUS&quot;;IF([.M6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cell office:value-type="string" table:formula="of:=IF([.S69]=&quot;UNKNOWN&quot;;&quot;NO ACTION — linkage status is UNKNOWN / not asserted&quot;;IF([.S69]=&quot;CLEAR&quot;;&quot;NO CONTRADICTION — preserve evidence as entered&quot;;IF([.M69]=&quot;&quot;;&quot;REVIEW LINKAGE STATUS — identifiers are present while status is UNKNOWN&quot;;IF([.M69]=&quot;UNMATCHED&quot;;&quot;REMOVE LINKAGE IDENTIFIERS OR CORRECT LINKAGE STATUS&quot;;IF([.M69]=&quot;SINGLE_SALE_LINKED&quot;;&quot;REQUIRE LINKED SALE ID AND NO ALLOCATION GROUP ID&quot;;IF([.M69]=&quot;MULTI_SALE_PENDING_ALLOCATION&quot;;&quot;REMOVE LINKED SALE ID OR CORRECT LINKAGE STATUS&quot;;IF([.M6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cell office:value-type="string" table:formula="of:=IF([.S70]=&quot;UNKNOWN&quot;;&quot;NO ACTION — linkage status is UNKNOWN / not asserted&quot;;IF([.S70]=&quot;CLEAR&quot;;&quot;NO CONTRADICTION — preserve evidence as entered&quot;;IF([.M70]=&quot;&quot;;&quot;REVIEW LINKAGE STATUS — identifiers are present while status is UNKNOWN&quot;;IF([.M70]=&quot;UNMATCHED&quot;;&quot;REMOVE LINKAGE IDENTIFIERS OR CORRECT LINKAGE STATUS&quot;;IF([.M70]=&quot;SINGLE_SALE_LINKED&quot;;&quot;REQUIRE LINKED SALE ID AND NO ALLOCATION GROUP ID&quot;;IF([.M70]=&quot;MULTI_SALE_PENDING_ALLOCATION&quot;;&quot;REMOVE LINKED SALE ID OR CORRECT LINKAGE STATUS&quot;;IF([.M7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cell office:value-type="string" table:formula="of:=IF([.S71]=&quot;UNKNOWN&quot;;&quot;NO ACTION — linkage status is UNKNOWN / not asserted&quot;;IF([.S71]=&quot;CLEAR&quot;;&quot;NO CONTRADICTION — preserve evidence as entered&quot;;IF([.M71]=&quot;&quot;;&quot;REVIEW LINKAGE STATUS — identifiers are present while status is UNKNOWN&quot;;IF([.M71]=&quot;UNMATCHED&quot;;&quot;REMOVE LINKAGE IDENTIFIERS OR CORRECT LINKAGE STATUS&quot;;IF([.M71]=&quot;SINGLE_SALE_LINKED&quot;;&quot;REQUIRE LINKED SALE ID AND NO ALLOCATION GROUP ID&quot;;IF([.M71]=&quot;MULTI_SALE_PENDING_ALLOCATION&quot;;&quot;REMOVE LINKED SALE ID OR CORRECT LINKAGE STATUS&quot;;IF([.M7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cell office:value-type="string" table:formula="of:=IF([.S72]=&quot;UNKNOWN&quot;;&quot;NO ACTION — linkage status is UNKNOWN / not asserted&quot;;IF([.S72]=&quot;CLEAR&quot;;&quot;NO CONTRADICTION — preserve evidence as entered&quot;;IF([.M72]=&quot;&quot;;&quot;REVIEW LINKAGE STATUS — identifiers are present while status is UNKNOWN&quot;;IF([.M72]=&quot;UNMATCHED&quot;;&quot;REMOVE LINKAGE IDENTIFIERS OR CORRECT LINKAGE STATUS&quot;;IF([.M72]=&quot;SINGLE_SALE_LINKED&quot;;&quot;REQUIRE LINKED SALE ID AND NO ALLOCATION GROUP ID&quot;;IF([.M72]=&quot;MULTI_SALE_PENDING_ALLOCATION&quot;;&quot;REMOVE LINKED SALE ID OR CORRECT LINKAGE STATUS&quot;;IF([.M7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cell office:value-type="string" table:formula="of:=IF([.S73]=&quot;UNKNOWN&quot;;&quot;NO ACTION — linkage status is UNKNOWN / not asserted&quot;;IF([.S73]=&quot;CLEAR&quot;;&quot;NO CONTRADICTION — preserve evidence as entered&quot;;IF([.M73]=&quot;&quot;;&quot;REVIEW LINKAGE STATUS — identifiers are present while status is UNKNOWN&quot;;IF([.M73]=&quot;UNMATCHED&quot;;&quot;REMOVE LINKAGE IDENTIFIERS OR CORRECT LINKAGE STATUS&quot;;IF([.M73]=&quot;SINGLE_SALE_LINKED&quot;;&quot;REQUIRE LINKED SALE ID AND NO ALLOCATION GROUP ID&quot;;IF([.M73]=&quot;MULTI_SALE_PENDING_ALLOCATION&quot;;&quot;REMOVE LINKED SALE ID OR CORRECT LINKAGE STATUS&quot;;IF([.M7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cell office:value-type="string" table:formula="of:=IF([.S74]=&quot;UNKNOWN&quot;;&quot;NO ACTION — linkage status is UNKNOWN / not asserted&quot;;IF([.S74]=&quot;CLEAR&quot;;&quot;NO CONTRADICTION — preserve evidence as entered&quot;;IF([.M74]=&quot;&quot;;&quot;REVIEW LINKAGE STATUS — identifiers are present while status is UNKNOWN&quot;;IF([.M74]=&quot;UNMATCHED&quot;;&quot;REMOVE LINKAGE IDENTIFIERS OR CORRECT LINKAGE STATUS&quot;;IF([.M74]=&quot;SINGLE_SALE_LINKED&quot;;&quot;REQUIRE LINKED SALE ID AND NO ALLOCATION GROUP ID&quot;;IF([.M74]=&quot;MULTI_SALE_PENDING_ALLOCATION&quot;;&quot;REMOVE LINKED SALE ID OR CORRECT LINKAGE STATUS&quot;;IF([.M7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cell office:value-type="string" table:formula="of:=IF([.S75]=&quot;UNKNOWN&quot;;&quot;NO ACTION — linkage status is UNKNOWN / not asserted&quot;;IF([.S75]=&quot;CLEAR&quot;;&quot;NO CONTRADICTION — preserve evidence as entered&quot;;IF([.M75]=&quot;&quot;;&quot;REVIEW LINKAGE STATUS — identifiers are present while status is UNKNOWN&quot;;IF([.M75]=&quot;UNMATCHED&quot;;&quot;REMOVE LINKAGE IDENTIFIERS OR CORRECT LINKAGE STATUS&quot;;IF([.M75]=&quot;SINGLE_SALE_LINKED&quot;;&quot;REQUIRE LINKED SALE ID AND NO ALLOCATION GROUP ID&quot;;IF([.M75]=&quot;MULTI_SALE_PENDING_ALLOCATION&quot;;&quot;REMOVE LINKED SALE ID OR CORRECT LINKAGE STATUS&quot;;IF([.M7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cell office:value-type="string" table:formula="of:=IF([.S76]=&quot;UNKNOWN&quot;;&quot;NO ACTION — linkage status is UNKNOWN / not asserted&quot;;IF([.S76]=&quot;CLEAR&quot;;&quot;NO CONTRADICTION — preserve evidence as entered&quot;;IF([.M76]=&quot;&quot;;&quot;REVIEW LINKAGE STATUS — identifiers are present while status is UNKNOWN&quot;;IF([.M76]=&quot;UNMATCHED&quot;;&quot;REMOVE LINKAGE IDENTIFIERS OR CORRECT LINKAGE STATUS&quot;;IF([.M76]=&quot;SINGLE_SALE_LINKED&quot;;&quot;REQUIRE LINKED SALE ID AND NO ALLOCATION GROUP ID&quot;;IF([.M76]=&quot;MULTI_SALE_PENDING_ALLOCATION&quot;;&quot;REMOVE LINKED SALE ID OR CORRECT LINKAGE STATUS&quot;;IF([.M7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cell office:value-type="string" table:formula="of:=IF([.S77]=&quot;UNKNOWN&quot;;&quot;NO ACTION — linkage status is UNKNOWN / not asserted&quot;;IF([.S77]=&quot;CLEAR&quot;;&quot;NO CONTRADICTION — preserve evidence as entered&quot;;IF([.M77]=&quot;&quot;;&quot;REVIEW LINKAGE STATUS — identifiers are present while status is UNKNOWN&quot;;IF([.M77]=&quot;UNMATCHED&quot;;&quot;REMOVE LINKAGE IDENTIFIERS OR CORRECT LINKAGE STATUS&quot;;IF([.M77]=&quot;SINGLE_SALE_LINKED&quot;;&quot;REQUIRE LINKED SALE ID AND NO ALLOCATION GROUP ID&quot;;IF([.M77]=&quot;MULTI_SALE_PENDING_ALLOCATION&quot;;&quot;REMOVE LINKED SALE ID OR CORRECT LINKAGE STATUS&quot;;IF([.M7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cell office:value-type="string" table:formula="of:=IF([.S78]=&quot;UNKNOWN&quot;;&quot;NO ACTION — linkage status is UNKNOWN / not asserted&quot;;IF([.S78]=&quot;CLEAR&quot;;&quot;NO CONTRADICTION — preserve evidence as entered&quot;;IF([.M78]=&quot;&quot;;&quot;REVIEW LINKAGE STATUS — identifiers are present while status is UNKNOWN&quot;;IF([.M78]=&quot;UNMATCHED&quot;;&quot;REMOVE LINKAGE IDENTIFIERS OR CORRECT LINKAGE STATUS&quot;;IF([.M78]=&quot;SINGLE_SALE_LINKED&quot;;&quot;REQUIRE LINKED SALE ID AND NO ALLOCATION GROUP ID&quot;;IF([.M78]=&quot;MULTI_SALE_PENDING_ALLOCATION&quot;;&quot;REMOVE LINKED SALE ID OR CORRECT LINKAGE STATUS&quot;;IF([.M7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cell office:value-type="string" table:formula="of:=IF([.S79]=&quot;UNKNOWN&quot;;&quot;NO ACTION — linkage status is UNKNOWN / not asserted&quot;;IF([.S79]=&quot;CLEAR&quot;;&quot;NO CONTRADICTION — preserve evidence as entered&quot;;IF([.M79]=&quot;&quot;;&quot;REVIEW LINKAGE STATUS — identifiers are present while status is UNKNOWN&quot;;IF([.M79]=&quot;UNMATCHED&quot;;&quot;REMOVE LINKAGE IDENTIFIERS OR CORRECT LINKAGE STATUS&quot;;IF([.M79]=&quot;SINGLE_SALE_LINKED&quot;;&quot;REQUIRE LINKED SALE ID AND NO ALLOCATION GROUP ID&quot;;IF([.M79]=&quot;MULTI_SALE_PENDING_ALLOCATION&quot;;&quot;REMOVE LINKED SALE ID OR CORRECT LINKAGE STATUS&quot;;IF([.M7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cell office:value-type="string" table:formula="of:=IF([.S80]=&quot;UNKNOWN&quot;;&quot;NO ACTION — linkage status is UNKNOWN / not asserted&quot;;IF([.S80]=&quot;CLEAR&quot;;&quot;NO CONTRADICTION — preserve evidence as entered&quot;;IF([.M80]=&quot;&quot;;&quot;REVIEW LINKAGE STATUS — identifiers are present while status is UNKNOWN&quot;;IF([.M80]=&quot;UNMATCHED&quot;;&quot;REMOVE LINKAGE IDENTIFIERS OR CORRECT LINKAGE STATUS&quot;;IF([.M80]=&quot;SINGLE_SALE_LINKED&quot;;&quot;REQUIRE LINKED SALE ID AND NO ALLOCATION GROUP ID&quot;;IF([.M80]=&quot;MULTI_SALE_PENDING_ALLOCATION&quot;;&quot;REMOVE LINKED SALE ID OR CORRECT LINKAGE STATUS&quot;;IF([.M8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cell office:value-type="string" table:formula="of:=IF([.S81]=&quot;UNKNOWN&quot;;&quot;NO ACTION — linkage status is UNKNOWN / not asserted&quot;;IF([.S81]=&quot;CLEAR&quot;;&quot;NO CONTRADICTION — preserve evidence as entered&quot;;IF([.M81]=&quot;&quot;;&quot;REVIEW LINKAGE STATUS — identifiers are present while status is UNKNOWN&quot;;IF([.M81]=&quot;UNMATCHED&quot;;&quot;REMOVE LINKAGE IDENTIFIERS OR CORRECT LINKAGE STATUS&quot;;IF([.M81]=&quot;SINGLE_SALE_LINKED&quot;;&quot;REQUIRE LINKED SALE ID AND NO ALLOCATION GROUP ID&quot;;IF([.M81]=&quot;MULTI_SALE_PENDING_ALLOCATION&quot;;&quot;REMOVE LINKED SALE ID OR CORRECT LINKAGE STATUS&quot;;IF([.M8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cell office:value-type="string" table:formula="of:=IF([.S82]=&quot;UNKNOWN&quot;;&quot;NO ACTION — linkage status is UNKNOWN / not asserted&quot;;IF([.S82]=&quot;CLEAR&quot;;&quot;NO CONTRADICTION — preserve evidence as entered&quot;;IF([.M82]=&quot;&quot;;&quot;REVIEW LINKAGE STATUS — identifiers are present while status is UNKNOWN&quot;;IF([.M82]=&quot;UNMATCHED&quot;;&quot;REMOVE LINKAGE IDENTIFIERS OR CORRECT LINKAGE STATUS&quot;;IF([.M82]=&quot;SINGLE_SALE_LINKED&quot;;&quot;REQUIRE LINKED SALE ID AND NO ALLOCATION GROUP ID&quot;;IF([.M82]=&quot;MULTI_SALE_PENDING_ALLOCATION&quot;;&quot;REMOVE LINKED SALE ID OR CORRECT LINKAGE STATUS&quot;;IF([.M8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cell office:value-type="string" table:formula="of:=IF([.S83]=&quot;UNKNOWN&quot;;&quot;NO ACTION — linkage status is UNKNOWN / not asserted&quot;;IF([.S83]=&quot;CLEAR&quot;;&quot;NO CONTRADICTION — preserve evidence as entered&quot;;IF([.M83]=&quot;&quot;;&quot;REVIEW LINKAGE STATUS — identifiers are present while status is UNKNOWN&quot;;IF([.M83]=&quot;UNMATCHED&quot;;&quot;REMOVE LINKAGE IDENTIFIERS OR CORRECT LINKAGE STATUS&quot;;IF([.M83]=&quot;SINGLE_SALE_LINKED&quot;;&quot;REQUIRE LINKED SALE ID AND NO ALLOCATION GROUP ID&quot;;IF([.M83]=&quot;MULTI_SALE_PENDING_ALLOCATION&quot;;&quot;REMOVE LINKED SALE ID OR CORRECT LINKAGE STATUS&quot;;IF([.M8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cell office:value-type="string" table:formula="of:=IF([.S84]=&quot;UNKNOWN&quot;;&quot;NO ACTION — linkage status is UNKNOWN / not asserted&quot;;IF([.S84]=&quot;CLEAR&quot;;&quot;NO CONTRADICTION — preserve evidence as entered&quot;;IF([.M84]=&quot;&quot;;&quot;REVIEW LINKAGE STATUS — identifiers are present while status is UNKNOWN&quot;;IF([.M84]=&quot;UNMATCHED&quot;;&quot;REMOVE LINKAGE IDENTIFIERS OR CORRECT LINKAGE STATUS&quot;;IF([.M84]=&quot;SINGLE_SALE_LINKED&quot;;&quot;REQUIRE LINKED SALE ID AND NO ALLOCATION GROUP ID&quot;;IF([.M84]=&quot;MULTI_SALE_PENDING_ALLOCATION&quot;;&quot;REMOVE LINKED SALE ID OR CORRECT LINKAGE STATUS&quot;;IF([.M8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cell office:value-type="string" table:formula="of:=IF([.S85]=&quot;UNKNOWN&quot;;&quot;NO ACTION — linkage status is UNKNOWN / not asserted&quot;;IF([.S85]=&quot;CLEAR&quot;;&quot;NO CONTRADICTION — preserve evidence as entered&quot;;IF([.M85]=&quot;&quot;;&quot;REVIEW LINKAGE STATUS — identifiers are present while status is UNKNOWN&quot;;IF([.M85]=&quot;UNMATCHED&quot;;&quot;REMOVE LINKAGE IDENTIFIERS OR CORRECT LINKAGE STATUS&quot;;IF([.M85]=&quot;SINGLE_SALE_LINKED&quot;;&quot;REQUIRE LINKED SALE ID AND NO ALLOCATION GROUP ID&quot;;IF([.M85]=&quot;MULTI_SALE_PENDING_ALLOCATION&quot;;&quot;REMOVE LINKED SALE ID OR CORRECT LINKAGE STATUS&quot;;IF([.M8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cell office:value-type="string" table:formula="of:=IF([.S86]=&quot;UNKNOWN&quot;;&quot;NO ACTION — linkage status is UNKNOWN / not asserted&quot;;IF([.S86]=&quot;CLEAR&quot;;&quot;NO CONTRADICTION — preserve evidence as entered&quot;;IF([.M86]=&quot;&quot;;&quot;REVIEW LINKAGE STATUS — identifiers are present while status is UNKNOWN&quot;;IF([.M86]=&quot;UNMATCHED&quot;;&quot;REMOVE LINKAGE IDENTIFIERS OR CORRECT LINKAGE STATUS&quot;;IF([.M86]=&quot;SINGLE_SALE_LINKED&quot;;&quot;REQUIRE LINKED SALE ID AND NO ALLOCATION GROUP ID&quot;;IF([.M86]=&quot;MULTI_SALE_PENDING_ALLOCATION&quot;;&quot;REMOVE LINKED SALE ID OR CORRECT LINKAGE STATUS&quot;;IF([.M8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cell office:value-type="string" table:formula="of:=IF([.S87]=&quot;UNKNOWN&quot;;&quot;NO ACTION — linkage status is UNKNOWN / not asserted&quot;;IF([.S87]=&quot;CLEAR&quot;;&quot;NO CONTRADICTION — preserve evidence as entered&quot;;IF([.M87]=&quot;&quot;;&quot;REVIEW LINKAGE STATUS — identifiers are present while status is UNKNOWN&quot;;IF([.M87]=&quot;UNMATCHED&quot;;&quot;REMOVE LINKAGE IDENTIFIERS OR CORRECT LINKAGE STATUS&quot;;IF([.M87]=&quot;SINGLE_SALE_LINKED&quot;;&quot;REQUIRE LINKED SALE ID AND NO ALLOCATION GROUP ID&quot;;IF([.M87]=&quot;MULTI_SALE_PENDING_ALLOCATION&quot;;&quot;REMOVE LINKED SALE ID OR CORRECT LINKAGE STATUS&quot;;IF([.M8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cell office:value-type="string" table:formula="of:=IF([.S88]=&quot;UNKNOWN&quot;;&quot;NO ACTION — linkage status is UNKNOWN / not asserted&quot;;IF([.S88]=&quot;CLEAR&quot;;&quot;NO CONTRADICTION — preserve evidence as entered&quot;;IF([.M88]=&quot;&quot;;&quot;REVIEW LINKAGE STATUS — identifiers are present while status is UNKNOWN&quot;;IF([.M88]=&quot;UNMATCHED&quot;;&quot;REMOVE LINKAGE IDENTIFIERS OR CORRECT LINKAGE STATUS&quot;;IF([.M88]=&quot;SINGLE_SALE_LINKED&quot;;&quot;REQUIRE LINKED SALE ID AND NO ALLOCATION GROUP ID&quot;;IF([.M88]=&quot;MULTI_SALE_PENDING_ALLOCATION&quot;;&quot;REMOVE LINKED SALE ID OR CORRECT LINKAGE STATUS&quot;;IF([.M8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cell office:value-type="string" table:formula="of:=IF([.S89]=&quot;UNKNOWN&quot;;&quot;NO ACTION — linkage status is UNKNOWN / not asserted&quot;;IF([.S89]=&quot;CLEAR&quot;;&quot;NO CONTRADICTION — preserve evidence as entered&quot;;IF([.M89]=&quot;&quot;;&quot;REVIEW LINKAGE STATUS — identifiers are present while status is UNKNOWN&quot;;IF([.M89]=&quot;UNMATCHED&quot;;&quot;REMOVE LINKAGE IDENTIFIERS OR CORRECT LINKAGE STATUS&quot;;IF([.M89]=&quot;SINGLE_SALE_LINKED&quot;;&quot;REQUIRE LINKED SALE ID AND NO ALLOCATION GROUP ID&quot;;IF([.M89]=&quot;MULTI_SALE_PENDING_ALLOCATION&quot;;&quot;REMOVE LINKED SALE ID OR CORRECT LINKAGE STATUS&quot;;IF([.M8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cell office:value-type="string" table:formula="of:=IF([.S90]=&quot;UNKNOWN&quot;;&quot;NO ACTION — linkage status is UNKNOWN / not asserted&quot;;IF([.S90]=&quot;CLEAR&quot;;&quot;NO CONTRADICTION — preserve evidence as entered&quot;;IF([.M90]=&quot;&quot;;&quot;REVIEW LINKAGE STATUS — identifiers are present while status is UNKNOWN&quot;;IF([.M90]=&quot;UNMATCHED&quot;;&quot;REMOVE LINKAGE IDENTIFIERS OR CORRECT LINKAGE STATUS&quot;;IF([.M90]=&quot;SINGLE_SALE_LINKED&quot;;&quot;REQUIRE LINKED SALE ID AND NO ALLOCATION GROUP ID&quot;;IF([.M90]=&quot;MULTI_SALE_PENDING_ALLOCATION&quot;;&quot;REMOVE LINKED SALE ID OR CORRECT LINKAGE STATUS&quot;;IF([.M9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cell office:value-type="string" table:formula="of:=IF([.S91]=&quot;UNKNOWN&quot;;&quot;NO ACTION — linkage status is UNKNOWN / not asserted&quot;;IF([.S91]=&quot;CLEAR&quot;;&quot;NO CONTRADICTION — preserve evidence as entered&quot;;IF([.M91]=&quot;&quot;;&quot;REVIEW LINKAGE STATUS — identifiers are present while status is UNKNOWN&quot;;IF([.M91]=&quot;UNMATCHED&quot;;&quot;REMOVE LINKAGE IDENTIFIERS OR CORRECT LINKAGE STATUS&quot;;IF([.M91]=&quot;SINGLE_SALE_LINKED&quot;;&quot;REQUIRE LINKED SALE ID AND NO ALLOCATION GROUP ID&quot;;IF([.M91]=&quot;MULTI_SALE_PENDING_ALLOCATION&quot;;&quot;REMOVE LINKED SALE ID OR CORRECT LINKAGE STATUS&quot;;IF([.M9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cell office:value-type="string" table:formula="of:=IF([.S92]=&quot;UNKNOWN&quot;;&quot;NO ACTION — linkage status is UNKNOWN / not asserted&quot;;IF([.S92]=&quot;CLEAR&quot;;&quot;NO CONTRADICTION — preserve evidence as entered&quot;;IF([.M92]=&quot;&quot;;&quot;REVIEW LINKAGE STATUS — identifiers are present while status is UNKNOWN&quot;;IF([.M92]=&quot;UNMATCHED&quot;;&quot;REMOVE LINKAGE IDENTIFIERS OR CORRECT LINKAGE STATUS&quot;;IF([.M92]=&quot;SINGLE_SALE_LINKED&quot;;&quot;REQUIRE LINKED SALE ID AND NO ALLOCATION GROUP ID&quot;;IF([.M92]=&quot;MULTI_SALE_PENDING_ALLOCATION&quot;;&quot;REMOVE LINKED SALE ID OR CORRECT LINKAGE STATUS&quot;;IF([.M9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cell office:value-type="string" table:formula="of:=IF([.S93]=&quot;UNKNOWN&quot;;&quot;NO ACTION — linkage status is UNKNOWN / not asserted&quot;;IF([.S93]=&quot;CLEAR&quot;;&quot;NO CONTRADICTION — preserve evidence as entered&quot;;IF([.M93]=&quot;&quot;;&quot;REVIEW LINKAGE STATUS — identifiers are present while status is UNKNOWN&quot;;IF([.M93]=&quot;UNMATCHED&quot;;&quot;REMOVE LINKAGE IDENTIFIERS OR CORRECT LINKAGE STATUS&quot;;IF([.M93]=&quot;SINGLE_SALE_LINKED&quot;;&quot;REQUIRE LINKED SALE ID AND NO ALLOCATION GROUP ID&quot;;IF([.M93]=&quot;MULTI_SALE_PENDING_ALLOCATION&quot;;&quot;REMOVE LINKED SALE ID OR CORRECT LINKAGE STATUS&quot;;IF([.M9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cell office:value-type="string" table:formula="of:=IF([.S94]=&quot;UNKNOWN&quot;;&quot;NO ACTION — linkage status is UNKNOWN / not asserted&quot;;IF([.S94]=&quot;CLEAR&quot;;&quot;NO CONTRADICTION — preserve evidence as entered&quot;;IF([.M94]=&quot;&quot;;&quot;REVIEW LINKAGE STATUS — identifiers are present while status is UNKNOWN&quot;;IF([.M94]=&quot;UNMATCHED&quot;;&quot;REMOVE LINKAGE IDENTIFIERS OR CORRECT LINKAGE STATUS&quot;;IF([.M94]=&quot;SINGLE_SALE_LINKED&quot;;&quot;REQUIRE LINKED SALE ID AND NO ALLOCATION GROUP ID&quot;;IF([.M94]=&quot;MULTI_SALE_PENDING_ALLOCATION&quot;;&quot;REMOVE LINKED SALE ID OR CORRECT LINKAGE STATUS&quot;;IF([.M9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cell office:value-type="string" table:formula="of:=IF([.S95]=&quot;UNKNOWN&quot;;&quot;NO ACTION — linkage status is UNKNOWN / not asserted&quot;;IF([.S95]=&quot;CLEAR&quot;;&quot;NO CONTRADICTION — preserve evidence as entered&quot;;IF([.M95]=&quot;&quot;;&quot;REVIEW LINKAGE STATUS — identifiers are present while status is UNKNOWN&quot;;IF([.M95]=&quot;UNMATCHED&quot;;&quot;REMOVE LINKAGE IDENTIFIERS OR CORRECT LINKAGE STATUS&quot;;IF([.M95]=&quot;SINGLE_SALE_LINKED&quot;;&quot;REQUIRE LINKED SALE ID AND NO ALLOCATION GROUP ID&quot;;IF([.M95]=&quot;MULTI_SALE_PENDING_ALLOCATION&quot;;&quot;REMOVE LINKED SALE ID OR CORRECT LINKAGE STATUS&quot;;IF([.M9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cell office:value-type="string" table:formula="of:=IF([.S96]=&quot;UNKNOWN&quot;;&quot;NO ACTION — linkage status is UNKNOWN / not asserted&quot;;IF([.S96]=&quot;CLEAR&quot;;&quot;NO CONTRADICTION — preserve evidence as entered&quot;;IF([.M96]=&quot;&quot;;&quot;REVIEW LINKAGE STATUS — identifiers are present while status is UNKNOWN&quot;;IF([.M96]=&quot;UNMATCHED&quot;;&quot;REMOVE LINKAGE IDENTIFIERS OR CORRECT LINKAGE STATUS&quot;;IF([.M96]=&quot;SINGLE_SALE_LINKED&quot;;&quot;REQUIRE LINKED SALE ID AND NO ALLOCATION GROUP ID&quot;;IF([.M96]=&quot;MULTI_SALE_PENDING_ALLOCATION&quot;;&quot;REMOVE LINKED SALE ID OR CORRECT LINKAGE STATUS&quot;;IF([.M9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cell office:value-type="string" table:formula="of:=IF([.S97]=&quot;UNKNOWN&quot;;&quot;NO ACTION — linkage status is UNKNOWN / not asserted&quot;;IF([.S97]=&quot;CLEAR&quot;;&quot;NO CONTRADICTION — preserve evidence as entered&quot;;IF([.M97]=&quot;&quot;;&quot;REVIEW LINKAGE STATUS — identifiers are present while status is UNKNOWN&quot;;IF([.M97]=&quot;UNMATCHED&quot;;&quot;REMOVE LINKAGE IDENTIFIERS OR CORRECT LINKAGE STATUS&quot;;IF([.M97]=&quot;SINGLE_SALE_LINKED&quot;;&quot;REQUIRE LINKED SALE ID AND NO ALLOCATION GROUP ID&quot;;IF([.M97]=&quot;MULTI_SALE_PENDING_ALLOCATION&quot;;&quot;REMOVE LINKED SALE ID OR CORRECT LINKAGE STATUS&quot;;IF([.M9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cell office:value-type="string" table:formula="of:=IF([.S98]=&quot;UNKNOWN&quot;;&quot;NO ACTION — linkage status is UNKNOWN / not asserted&quot;;IF([.S98]=&quot;CLEAR&quot;;&quot;NO CONTRADICTION — preserve evidence as entered&quot;;IF([.M98]=&quot;&quot;;&quot;REVIEW LINKAGE STATUS — identifiers are present while status is UNKNOWN&quot;;IF([.M98]=&quot;UNMATCHED&quot;;&quot;REMOVE LINKAGE IDENTIFIERS OR CORRECT LINKAGE STATUS&quot;;IF([.M98]=&quot;SINGLE_SALE_LINKED&quot;;&quot;REQUIRE LINKED SALE ID AND NO ALLOCATION GROUP ID&quot;;IF([.M98]=&quot;MULTI_SALE_PENDING_ALLOCATION&quot;;&quot;REMOVE LINKED SALE ID OR CORRECT LINKAGE STATUS&quot;;IF([.M9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cell office:value-type="string" table:formula="of:=IF([.S99]=&quot;UNKNOWN&quot;;&quot;NO ACTION — linkage status is UNKNOWN / not asserted&quot;;IF([.S99]=&quot;CLEAR&quot;;&quot;NO CONTRADICTION — preserve evidence as entered&quot;;IF([.M99]=&quot;&quot;;&quot;REVIEW LINKAGE STATUS — identifiers are present while status is UNKNOWN&quot;;IF([.M99]=&quot;UNMATCHED&quot;;&quot;REMOVE LINKAGE IDENTIFIERS OR CORRECT LINKAGE STATUS&quot;;IF([.M99]=&quot;SINGLE_SALE_LINKED&quot;;&quot;REQUIRE LINKED SALE ID AND NO ALLOCATION GROUP ID&quot;;IF([.M99]=&quot;MULTI_SALE_PENDING_ALLOCATION&quot;;&quot;REMOVE LINKED SALE ID OR CORRECT LINKAGE STATUS&quot;;IF([.M9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cell office:value-type="string" table:formula="of:=IF([.S100]=&quot;UNKNOWN&quot;;&quot;NO ACTION — linkage status is UNKNOWN / not asserted&quot;;IF([.S100]=&quot;CLEAR&quot;;&quot;NO CONTRADICTION — preserve evidence as entered&quot;;IF([.M100]=&quot;&quot;;&quot;REVIEW LINKAGE STATUS — identifiers are present while status is UNKNOWN&quot;;IF([.M100]=&quot;UNMATCHED&quot;;&quot;REMOVE LINKAGE IDENTIFIERS OR CORRECT LINKAGE STATUS&quot;;IF([.M100]=&quot;SINGLE_SALE_LINKED&quot;;&quot;REQUIRE LINKED SALE ID AND NO ALLOCATION GROUP ID&quot;;IF([.M100]=&quot;MULTI_SALE_PENDING_ALLOCATION&quot;;&quot;REMOVE LINKED SALE ID OR CORRECT LINKAGE STATUS&quot;;IF([.M10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cell office:value-type="string" table:formula="of:=IF([.S101]=&quot;UNKNOWN&quot;;&quot;NO ACTION — linkage status is UNKNOWN / not asserted&quot;;IF([.S101]=&quot;CLEAR&quot;;&quot;NO CONTRADICTION — preserve evidence as entered&quot;;IF([.M101]=&quot;&quot;;&quot;REVIEW LINKAGE STATUS — identifiers are present while status is UNKNOWN&quot;;IF([.M101]=&quot;UNMATCHED&quot;;&quot;REMOVE LINKAGE IDENTIFIERS OR CORRECT LINKAGE STATUS&quot;;IF([.M101]=&quot;SINGLE_SALE_LINKED&quot;;&quot;REQUIRE LINKED SALE ID AND NO ALLOCATION GROUP ID&quot;;IF([.M101]=&quot;MULTI_SALE_PENDING_ALLOCATION&quot;;&quot;REMOVE LINKED SALE ID OR CORRECT LINKAGE STATUS&quot;;IF([.M10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cell office:value-type="string" table:formula="of:=IF([.S102]=&quot;UNKNOWN&quot;;&quot;NO ACTION — linkage status is UNKNOWN / not asserted&quot;;IF([.S102]=&quot;CLEAR&quot;;&quot;NO CONTRADICTION — preserve evidence as entered&quot;;IF([.M102]=&quot;&quot;;&quot;REVIEW LINKAGE STATUS — identifiers are present while status is UNKNOWN&quot;;IF([.M102]=&quot;UNMATCHED&quot;;&quot;REMOVE LINKAGE IDENTIFIERS OR CORRECT LINKAGE STATUS&quot;;IF([.M102]=&quot;SINGLE_SALE_LINKED&quot;;&quot;REQUIRE LINKED SALE ID AND NO ALLOCATION GROUP ID&quot;;IF([.M102]=&quot;MULTI_SALE_PENDING_ALLOCATION&quot;;&quot;REMOVE LINKED SALE ID OR CORRECT LINKAGE STATUS&quot;;IF([.M10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cell office:value-type="string" table:formula="of:=IF([.S103]=&quot;UNKNOWN&quot;;&quot;NO ACTION — linkage status is UNKNOWN / not asserted&quot;;IF([.S103]=&quot;CLEAR&quot;;&quot;NO CONTRADICTION — preserve evidence as entered&quot;;IF([.M103]=&quot;&quot;;&quot;REVIEW LINKAGE STATUS — identifiers are present while status is UNKNOWN&quot;;IF([.M103]=&quot;UNMATCHED&quot;;&quot;REMOVE LINKAGE IDENTIFIERS OR CORRECT LINKAGE STATUS&quot;;IF([.M103]=&quot;SINGLE_SALE_LINKED&quot;;&quot;REQUIRE LINKED SALE ID AND NO ALLOCATION GROUP ID&quot;;IF([.M103]=&quot;MULTI_SALE_PENDING_ALLOCATION&quot;;&quot;REMOVE LINKED SALE ID OR CORRECT LINKAGE STATUS&quot;;IF([.M10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cell office:value-type="string" table:formula="of:=IF([.S104]=&quot;UNKNOWN&quot;;&quot;NO ACTION — linkage status is UNKNOWN / not asserted&quot;;IF([.S104]=&quot;CLEAR&quot;;&quot;NO CONTRADICTION — preserve evidence as entered&quot;;IF([.M104]=&quot;&quot;;&quot;REVIEW LINKAGE STATUS — identifiers are present while status is UNKNOWN&quot;;IF([.M104]=&quot;UNMATCHED&quot;;&quot;REMOVE LINKAGE IDENTIFIERS OR CORRECT LINKAGE STATUS&quot;;IF([.M104]=&quot;SINGLE_SALE_LINKED&quot;;&quot;REQUIRE LINKED SALE ID AND NO ALLOCATION GROUP ID&quot;;IF([.M104]=&quot;MULTI_SALE_PENDING_ALLOCATION&quot;;&quot;REMOVE LINKED SALE ID OR CORRECT LINKAGE STATUS&quot;;IF([.M10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cell office:value-type="string" table:formula="of:=IF([.S105]=&quot;UNKNOWN&quot;;&quot;NO ACTION — linkage status is UNKNOWN / not asserted&quot;;IF([.S105]=&quot;CLEAR&quot;;&quot;NO CONTRADICTION — preserve evidence as entered&quot;;IF([.M105]=&quot;&quot;;&quot;REVIEW LINKAGE STATUS — identifiers are present while status is UNKNOWN&quot;;IF([.M105]=&quot;UNMATCHED&quot;;&quot;REMOVE LINKAGE IDENTIFIERS OR CORRECT LINKAGE STATUS&quot;;IF([.M105]=&quot;SINGLE_SALE_LINKED&quot;;&quot;REQUIRE LINKED SALE ID AND NO ALLOCATION GROUP ID&quot;;IF([.M105]=&quot;MULTI_SALE_PENDING_ALLOCATION&quot;;&quot;REMOVE LINKED SALE ID OR CORRECT LINKAGE STATUS&quot;;IF([.M10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cell office:value-type="string" table:formula="of:=IF([.S106]=&quot;UNKNOWN&quot;;&quot;NO ACTION — linkage status is UNKNOWN / not asserted&quot;;IF([.S106]=&quot;CLEAR&quot;;&quot;NO CONTRADICTION — preserve evidence as entered&quot;;IF([.M106]=&quot;&quot;;&quot;REVIEW LINKAGE STATUS — identifiers are present while status is UNKNOWN&quot;;IF([.M106]=&quot;UNMATCHED&quot;;&quot;REMOVE LINKAGE IDENTIFIERS OR CORRECT LINKAGE STATUS&quot;;IF([.M106]=&quot;SINGLE_SALE_LINKED&quot;;&quot;REQUIRE LINKED SALE ID AND NO ALLOCATION GROUP ID&quot;;IF([.M106]=&quot;MULTI_SALE_PENDING_ALLOCATION&quot;;&quot;REMOVE LINKED SALE ID OR CORRECT LINKAGE STATUS&quot;;IF([.M10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cell office:value-type="string" table:formula="of:=IF([.S107]=&quot;UNKNOWN&quot;;&quot;NO ACTION — linkage status is UNKNOWN / not asserted&quot;;IF([.S107]=&quot;CLEAR&quot;;&quot;NO CONTRADICTION — preserve evidence as entered&quot;;IF([.M107]=&quot;&quot;;&quot;REVIEW LINKAGE STATUS — identifiers are present while status is UNKNOWN&quot;;IF([.M107]=&quot;UNMATCHED&quot;;&quot;REMOVE LINKAGE IDENTIFIERS OR CORRECT LINKAGE STATUS&quot;;IF([.M107]=&quot;SINGLE_SALE_LINKED&quot;;&quot;REQUIRE LINKED SALE ID AND NO ALLOCATION GROUP ID&quot;;IF([.M107]=&quot;MULTI_SALE_PENDING_ALLOCATION&quot;;&quot;REMOVE LINKED SALE ID OR CORRECT LINKAGE STATUS&quot;;IF([.M10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cell office:value-type="string" table:formula="of:=IF([.S108]=&quot;UNKNOWN&quot;;&quot;NO ACTION — linkage status is UNKNOWN / not asserted&quot;;IF([.S108]=&quot;CLEAR&quot;;&quot;NO CONTRADICTION — preserve evidence as entered&quot;;IF([.M108]=&quot;&quot;;&quot;REVIEW LINKAGE STATUS — identifiers are present while status is UNKNOWN&quot;;IF([.M108]=&quot;UNMATCHED&quot;;&quot;REMOVE LINKAGE IDENTIFIERS OR CORRECT LINKAGE STATUS&quot;;IF([.M108]=&quot;SINGLE_SALE_LINKED&quot;;&quot;REQUIRE LINKED SALE ID AND NO ALLOCATION GROUP ID&quot;;IF([.M108]=&quot;MULTI_SALE_PENDING_ALLOCATION&quot;;&quot;REMOVE LINKED SALE ID OR CORRECT LINKAGE STATUS&quot;;IF([.M10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cell office:value-type="string" table:formula="of:=IF([.S109]=&quot;UNKNOWN&quot;;&quot;NO ACTION — linkage status is UNKNOWN / not asserted&quot;;IF([.S109]=&quot;CLEAR&quot;;&quot;NO CONTRADICTION — preserve evidence as entered&quot;;IF([.M109]=&quot;&quot;;&quot;REVIEW LINKAGE STATUS — identifiers are present while status is UNKNOWN&quot;;IF([.M109]=&quot;UNMATCHED&quot;;&quot;REMOVE LINKAGE IDENTIFIERS OR CORRECT LINKAGE STATUS&quot;;IF([.M109]=&quot;SINGLE_SALE_LINKED&quot;;&quot;REQUIRE LINKED SALE ID AND NO ALLOCATION GROUP ID&quot;;IF([.M109]=&quot;MULTI_SALE_PENDING_ALLOCATION&quot;;&quot;REMOVE LINKED SALE ID OR CORRECT LINKAGE STATUS&quot;;IF([.M10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cell office:value-type="string" table:formula="of:=IF([.S110]=&quot;UNKNOWN&quot;;&quot;NO ACTION — linkage status is UNKNOWN / not asserted&quot;;IF([.S110]=&quot;CLEAR&quot;;&quot;NO CONTRADICTION — preserve evidence as entered&quot;;IF([.M110]=&quot;&quot;;&quot;REVIEW LINKAGE STATUS — identifiers are present while status is UNKNOWN&quot;;IF([.M110]=&quot;UNMATCHED&quot;;&quot;REMOVE LINKAGE IDENTIFIERS OR CORRECT LINKAGE STATUS&quot;;IF([.M110]=&quot;SINGLE_SALE_LINKED&quot;;&quot;REQUIRE LINKED SALE ID AND NO ALLOCATION GROUP ID&quot;;IF([.M110]=&quot;MULTI_SALE_PENDING_ALLOCATION&quot;;&quot;REMOVE LINKED SALE ID OR CORRECT LINKAGE STATUS&quot;;IF([.M11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cell office:value-type="string" table:formula="of:=IF([.S111]=&quot;UNKNOWN&quot;;&quot;NO ACTION — linkage status is UNKNOWN / not asserted&quot;;IF([.S111]=&quot;CLEAR&quot;;&quot;NO CONTRADICTION — preserve evidence as entered&quot;;IF([.M111]=&quot;&quot;;&quot;REVIEW LINKAGE STATUS — identifiers are present while status is UNKNOWN&quot;;IF([.M111]=&quot;UNMATCHED&quot;;&quot;REMOVE LINKAGE IDENTIFIERS OR CORRECT LINKAGE STATUS&quot;;IF([.M111]=&quot;SINGLE_SALE_LINKED&quot;;&quot;REQUIRE LINKED SALE ID AND NO ALLOCATION GROUP ID&quot;;IF([.M111]=&quot;MULTI_SALE_PENDING_ALLOCATION&quot;;&quot;REMOVE LINKED SALE ID OR CORRECT LINKAGE STATUS&quot;;IF([.M11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cell office:value-type="string" table:formula="of:=IF([.S112]=&quot;UNKNOWN&quot;;&quot;NO ACTION — linkage status is UNKNOWN / not asserted&quot;;IF([.S112]=&quot;CLEAR&quot;;&quot;NO CONTRADICTION — preserve evidence as entered&quot;;IF([.M112]=&quot;&quot;;&quot;REVIEW LINKAGE STATUS — identifiers are present while status is UNKNOWN&quot;;IF([.M112]=&quot;UNMATCHED&quot;;&quot;REMOVE LINKAGE IDENTIFIERS OR CORRECT LINKAGE STATUS&quot;;IF([.M112]=&quot;SINGLE_SALE_LINKED&quot;;&quot;REQUIRE LINKED SALE ID AND NO ALLOCATION GROUP ID&quot;;IF([.M112]=&quot;MULTI_SALE_PENDING_ALLOCATION&quot;;&quot;REMOVE LINKED SALE ID OR CORRECT LINKAGE STATUS&quot;;IF([.M11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cell office:value-type="string" table:formula="of:=IF([.S113]=&quot;UNKNOWN&quot;;&quot;NO ACTION — linkage status is UNKNOWN / not asserted&quot;;IF([.S113]=&quot;CLEAR&quot;;&quot;NO CONTRADICTION — preserve evidence as entered&quot;;IF([.M113]=&quot;&quot;;&quot;REVIEW LINKAGE STATUS — identifiers are present while status is UNKNOWN&quot;;IF([.M113]=&quot;UNMATCHED&quot;;&quot;REMOVE LINKAGE IDENTIFIERS OR CORRECT LINKAGE STATUS&quot;;IF([.M113]=&quot;SINGLE_SALE_LINKED&quot;;&quot;REQUIRE LINKED SALE ID AND NO ALLOCATION GROUP ID&quot;;IF([.M113]=&quot;MULTI_SALE_PENDING_ALLOCATION&quot;;&quot;REMOVE LINKED SALE ID OR CORRECT LINKAGE STATUS&quot;;IF([.M11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cell office:value-type="string" table:formula="of:=IF([.S114]=&quot;UNKNOWN&quot;;&quot;NO ACTION — linkage status is UNKNOWN / not asserted&quot;;IF([.S114]=&quot;CLEAR&quot;;&quot;NO CONTRADICTION — preserve evidence as entered&quot;;IF([.M114]=&quot;&quot;;&quot;REVIEW LINKAGE STATUS — identifiers are present while status is UNKNOWN&quot;;IF([.M114]=&quot;UNMATCHED&quot;;&quot;REMOVE LINKAGE IDENTIFIERS OR CORRECT LINKAGE STATUS&quot;;IF([.M114]=&quot;SINGLE_SALE_LINKED&quot;;&quot;REQUIRE LINKED SALE ID AND NO ALLOCATION GROUP ID&quot;;IF([.M114]=&quot;MULTI_SALE_PENDING_ALLOCATION&quot;;&quot;REMOVE LINKED SALE ID OR CORRECT LINKAGE STATUS&quot;;IF([.M11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cell office:value-type="string" table:formula="of:=IF([.S115]=&quot;UNKNOWN&quot;;&quot;NO ACTION — linkage status is UNKNOWN / not asserted&quot;;IF([.S115]=&quot;CLEAR&quot;;&quot;NO CONTRADICTION — preserve evidence as entered&quot;;IF([.M115]=&quot;&quot;;&quot;REVIEW LINKAGE STATUS — identifiers are present while status is UNKNOWN&quot;;IF([.M115]=&quot;UNMATCHED&quot;;&quot;REMOVE LINKAGE IDENTIFIERS OR CORRECT LINKAGE STATUS&quot;;IF([.M115]=&quot;SINGLE_SALE_LINKED&quot;;&quot;REQUIRE LINKED SALE ID AND NO ALLOCATION GROUP ID&quot;;IF([.M115]=&quot;MULTI_SALE_PENDING_ALLOCATION&quot;;&quot;REMOVE LINKED SALE ID OR CORRECT LINKAGE STATUS&quot;;IF([.M11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cell office:value-type="string" table:formula="of:=IF([.S116]=&quot;UNKNOWN&quot;;&quot;NO ACTION — linkage status is UNKNOWN / not asserted&quot;;IF([.S116]=&quot;CLEAR&quot;;&quot;NO CONTRADICTION — preserve evidence as entered&quot;;IF([.M116]=&quot;&quot;;&quot;REVIEW LINKAGE STATUS — identifiers are present while status is UNKNOWN&quot;;IF([.M116]=&quot;UNMATCHED&quot;;&quot;REMOVE LINKAGE IDENTIFIERS OR CORRECT LINKAGE STATUS&quot;;IF([.M116]=&quot;SINGLE_SALE_LINKED&quot;;&quot;REQUIRE LINKED SALE ID AND NO ALLOCATION GROUP ID&quot;;IF([.M116]=&quot;MULTI_SALE_PENDING_ALLOCATION&quot;;&quot;REMOVE LINKED SALE ID OR CORRECT LINKAGE STATUS&quot;;IF([.M11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cell office:value-type="string" table:formula="of:=IF([.S117]=&quot;UNKNOWN&quot;;&quot;NO ACTION — linkage status is UNKNOWN / not asserted&quot;;IF([.S117]=&quot;CLEAR&quot;;&quot;NO CONTRADICTION — preserve evidence as entered&quot;;IF([.M117]=&quot;&quot;;&quot;REVIEW LINKAGE STATUS — identifiers are present while status is UNKNOWN&quot;;IF([.M117]=&quot;UNMATCHED&quot;;&quot;REMOVE LINKAGE IDENTIFIERS OR CORRECT LINKAGE STATUS&quot;;IF([.M117]=&quot;SINGLE_SALE_LINKED&quot;;&quot;REQUIRE LINKED SALE ID AND NO ALLOCATION GROUP ID&quot;;IF([.M117]=&quot;MULTI_SALE_PENDING_ALLOCATION&quot;;&quot;REMOVE LINKED SALE ID OR CORRECT LINKAGE STATUS&quot;;IF([.M11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cell office:value-type="string" table:formula="of:=IF([.S118]=&quot;UNKNOWN&quot;;&quot;NO ACTION — linkage status is UNKNOWN / not asserted&quot;;IF([.S118]=&quot;CLEAR&quot;;&quot;NO CONTRADICTION — preserve evidence as entered&quot;;IF([.M118]=&quot;&quot;;&quot;REVIEW LINKAGE STATUS — identifiers are present while status is UNKNOWN&quot;;IF([.M118]=&quot;UNMATCHED&quot;;&quot;REMOVE LINKAGE IDENTIFIERS OR CORRECT LINKAGE STATUS&quot;;IF([.M118]=&quot;SINGLE_SALE_LINKED&quot;;&quot;REQUIRE LINKED SALE ID AND NO ALLOCATION GROUP ID&quot;;IF([.M118]=&quot;MULTI_SALE_PENDING_ALLOCATION&quot;;&quot;REMOVE LINKED SALE ID OR CORRECT LINKAGE STATUS&quot;;IF([.M11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cell office:value-type="string" table:formula="of:=IF([.S119]=&quot;UNKNOWN&quot;;&quot;NO ACTION — linkage status is UNKNOWN / not asserted&quot;;IF([.S119]=&quot;CLEAR&quot;;&quot;NO CONTRADICTION — preserve evidence as entered&quot;;IF([.M119]=&quot;&quot;;&quot;REVIEW LINKAGE STATUS — identifiers are present while status is UNKNOWN&quot;;IF([.M119]=&quot;UNMATCHED&quot;;&quot;REMOVE LINKAGE IDENTIFIERS OR CORRECT LINKAGE STATUS&quot;;IF([.M119]=&quot;SINGLE_SALE_LINKED&quot;;&quot;REQUIRE LINKED SALE ID AND NO ALLOCATION GROUP ID&quot;;IF([.M119]=&quot;MULTI_SALE_PENDING_ALLOCATION&quot;;&quot;REMOVE LINKED SALE ID OR CORRECT LINKAGE STATUS&quot;;IF([.M11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cell office:value-type="string" table:formula="of:=IF([.S120]=&quot;UNKNOWN&quot;;&quot;NO ACTION — linkage status is UNKNOWN / not asserted&quot;;IF([.S120]=&quot;CLEAR&quot;;&quot;NO CONTRADICTION — preserve evidence as entered&quot;;IF([.M120]=&quot;&quot;;&quot;REVIEW LINKAGE STATUS — identifiers are present while status is UNKNOWN&quot;;IF([.M120]=&quot;UNMATCHED&quot;;&quot;REMOVE LINKAGE IDENTIFIERS OR CORRECT LINKAGE STATUS&quot;;IF([.M120]=&quot;SINGLE_SALE_LINKED&quot;;&quot;REQUIRE LINKED SALE ID AND NO ALLOCATION GROUP ID&quot;;IF([.M120]=&quot;MULTI_SALE_PENDING_ALLOCATION&quot;;&quot;REMOVE LINKED SALE ID OR CORRECT LINKAGE STATUS&quot;;IF([.M12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cell office:value-type="string" table:formula="of:=IF([.S121]=&quot;UNKNOWN&quot;;&quot;NO ACTION — linkage status is UNKNOWN / not asserted&quot;;IF([.S121]=&quot;CLEAR&quot;;&quot;NO CONTRADICTION — preserve evidence as entered&quot;;IF([.M121]=&quot;&quot;;&quot;REVIEW LINKAGE STATUS — identifiers are present while status is UNKNOWN&quot;;IF([.M121]=&quot;UNMATCHED&quot;;&quot;REMOVE LINKAGE IDENTIFIERS OR CORRECT LINKAGE STATUS&quot;;IF([.M121]=&quot;SINGLE_SALE_LINKED&quot;;&quot;REQUIRE LINKED SALE ID AND NO ALLOCATION GROUP ID&quot;;IF([.M121]=&quot;MULTI_SALE_PENDING_ALLOCATION&quot;;&quot;REMOVE LINKED SALE ID OR CORRECT LINKAGE STATUS&quot;;IF([.M12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cell office:value-type="string" table:formula="of:=IF([.S122]=&quot;UNKNOWN&quot;;&quot;NO ACTION — linkage status is UNKNOWN / not asserted&quot;;IF([.S122]=&quot;CLEAR&quot;;&quot;NO CONTRADICTION — preserve evidence as entered&quot;;IF([.M122]=&quot;&quot;;&quot;REVIEW LINKAGE STATUS — identifiers are present while status is UNKNOWN&quot;;IF([.M122]=&quot;UNMATCHED&quot;;&quot;REMOVE LINKAGE IDENTIFIERS OR CORRECT LINKAGE STATUS&quot;;IF([.M122]=&quot;SINGLE_SALE_LINKED&quot;;&quot;REQUIRE LINKED SALE ID AND NO ALLOCATION GROUP ID&quot;;IF([.M122]=&quot;MULTI_SALE_PENDING_ALLOCATION&quot;;&quot;REMOVE LINKED SALE ID OR CORRECT LINKAGE STATUS&quot;;IF([.M12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cell office:value-type="string" table:formula="of:=IF([.S123]=&quot;UNKNOWN&quot;;&quot;NO ACTION — linkage status is UNKNOWN / not asserted&quot;;IF([.S123]=&quot;CLEAR&quot;;&quot;NO CONTRADICTION — preserve evidence as entered&quot;;IF([.M123]=&quot;&quot;;&quot;REVIEW LINKAGE STATUS — identifiers are present while status is UNKNOWN&quot;;IF([.M123]=&quot;UNMATCHED&quot;;&quot;REMOVE LINKAGE IDENTIFIERS OR CORRECT LINKAGE STATUS&quot;;IF([.M123]=&quot;SINGLE_SALE_LINKED&quot;;&quot;REQUIRE LINKED SALE ID AND NO ALLOCATION GROUP ID&quot;;IF([.M123]=&quot;MULTI_SALE_PENDING_ALLOCATION&quot;;&quot;REMOVE LINKED SALE ID OR CORRECT LINKAGE STATUS&quot;;IF([.M12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cell office:value-type="string" table:formula="of:=IF([.S124]=&quot;UNKNOWN&quot;;&quot;NO ACTION — linkage status is UNKNOWN / not asserted&quot;;IF([.S124]=&quot;CLEAR&quot;;&quot;NO CONTRADICTION — preserve evidence as entered&quot;;IF([.M124]=&quot;&quot;;&quot;REVIEW LINKAGE STATUS — identifiers are present while status is UNKNOWN&quot;;IF([.M124]=&quot;UNMATCHED&quot;;&quot;REMOVE LINKAGE IDENTIFIERS OR CORRECT LINKAGE STATUS&quot;;IF([.M124]=&quot;SINGLE_SALE_LINKED&quot;;&quot;REQUIRE LINKED SALE ID AND NO ALLOCATION GROUP ID&quot;;IF([.M124]=&quot;MULTI_SALE_PENDING_ALLOCATION&quot;;&quot;REMOVE LINKED SALE ID OR CORRECT LINKAGE STATUS&quot;;IF([.M12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cell office:value-type="string" table:formula="of:=IF([.S125]=&quot;UNKNOWN&quot;;&quot;NO ACTION — linkage status is UNKNOWN / not asserted&quot;;IF([.S125]=&quot;CLEAR&quot;;&quot;NO CONTRADICTION — preserve evidence as entered&quot;;IF([.M125]=&quot;&quot;;&quot;REVIEW LINKAGE STATUS — identifiers are present while status is UNKNOWN&quot;;IF([.M125]=&quot;UNMATCHED&quot;;&quot;REMOVE LINKAGE IDENTIFIERS OR CORRECT LINKAGE STATUS&quot;;IF([.M125]=&quot;SINGLE_SALE_LINKED&quot;;&quot;REQUIRE LINKED SALE ID AND NO ALLOCATION GROUP ID&quot;;IF([.M125]=&quot;MULTI_SALE_PENDING_ALLOCATION&quot;;&quot;REMOVE LINKED SALE ID OR CORRECT LINKAGE STATUS&quot;;IF([.M12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cell office:value-type="string" table:formula="of:=IF([.S126]=&quot;UNKNOWN&quot;;&quot;NO ACTION — linkage status is UNKNOWN / not asserted&quot;;IF([.S126]=&quot;CLEAR&quot;;&quot;NO CONTRADICTION — preserve evidence as entered&quot;;IF([.M126]=&quot;&quot;;&quot;REVIEW LINKAGE STATUS — identifiers are present while status is UNKNOWN&quot;;IF([.M126]=&quot;UNMATCHED&quot;;&quot;REMOVE LINKAGE IDENTIFIERS OR CORRECT LINKAGE STATUS&quot;;IF([.M126]=&quot;SINGLE_SALE_LINKED&quot;;&quot;REQUIRE LINKED SALE ID AND NO ALLOCATION GROUP ID&quot;;IF([.M126]=&quot;MULTI_SALE_PENDING_ALLOCATION&quot;;&quot;REMOVE LINKED SALE ID OR CORRECT LINKAGE STATUS&quot;;IF([.M12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cell office:value-type="string" table:formula="of:=IF([.S127]=&quot;UNKNOWN&quot;;&quot;NO ACTION — linkage status is UNKNOWN / not asserted&quot;;IF([.S127]=&quot;CLEAR&quot;;&quot;NO CONTRADICTION — preserve evidence as entered&quot;;IF([.M127]=&quot;&quot;;&quot;REVIEW LINKAGE STATUS — identifiers are present while status is UNKNOWN&quot;;IF([.M127]=&quot;UNMATCHED&quot;;&quot;REMOVE LINKAGE IDENTIFIERS OR CORRECT LINKAGE STATUS&quot;;IF([.M127]=&quot;SINGLE_SALE_LINKED&quot;;&quot;REQUIRE LINKED SALE ID AND NO ALLOCATION GROUP ID&quot;;IF([.M127]=&quot;MULTI_SALE_PENDING_ALLOCATION&quot;;&quot;REMOVE LINKED SALE ID OR CORRECT LINKAGE STATUS&quot;;IF([.M12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cell office:value-type="string" table:formula="of:=IF([.S128]=&quot;UNKNOWN&quot;;&quot;NO ACTION — linkage status is UNKNOWN / not asserted&quot;;IF([.S128]=&quot;CLEAR&quot;;&quot;NO CONTRADICTION — preserve evidence as entered&quot;;IF([.M128]=&quot;&quot;;&quot;REVIEW LINKAGE STATUS — identifiers are present while status is UNKNOWN&quot;;IF([.M128]=&quot;UNMATCHED&quot;;&quot;REMOVE LINKAGE IDENTIFIERS OR CORRECT LINKAGE STATUS&quot;;IF([.M128]=&quot;SINGLE_SALE_LINKED&quot;;&quot;REQUIRE LINKED SALE ID AND NO ALLOCATION GROUP ID&quot;;IF([.M128]=&quot;MULTI_SALE_PENDING_ALLOCATION&quot;;&quot;REMOVE LINKED SALE ID OR CORRECT LINKAGE STATUS&quot;;IF([.M12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cell office:value-type="string" table:formula="of:=IF([.S129]=&quot;UNKNOWN&quot;;&quot;NO ACTION — linkage status is UNKNOWN / not asserted&quot;;IF([.S129]=&quot;CLEAR&quot;;&quot;NO CONTRADICTION — preserve evidence as entered&quot;;IF([.M129]=&quot;&quot;;&quot;REVIEW LINKAGE STATUS — identifiers are present while status is UNKNOWN&quot;;IF([.M129]=&quot;UNMATCHED&quot;;&quot;REMOVE LINKAGE IDENTIFIERS OR CORRECT LINKAGE STATUS&quot;;IF([.M129]=&quot;SINGLE_SALE_LINKED&quot;;&quot;REQUIRE LINKED SALE ID AND NO ALLOCATION GROUP ID&quot;;IF([.M129]=&quot;MULTI_SALE_PENDING_ALLOCATION&quot;;&quot;REMOVE LINKED SALE ID OR CORRECT LINKAGE STATUS&quot;;IF([.M12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cell office:value-type="string" table:formula="of:=IF([.S130]=&quot;UNKNOWN&quot;;&quot;NO ACTION — linkage status is UNKNOWN / not asserted&quot;;IF([.S130]=&quot;CLEAR&quot;;&quot;NO CONTRADICTION — preserve evidence as entered&quot;;IF([.M130]=&quot;&quot;;&quot;REVIEW LINKAGE STATUS — identifiers are present while status is UNKNOWN&quot;;IF([.M130]=&quot;UNMATCHED&quot;;&quot;REMOVE LINKAGE IDENTIFIERS OR CORRECT LINKAGE STATUS&quot;;IF([.M130]=&quot;SINGLE_SALE_LINKED&quot;;&quot;REQUIRE LINKED SALE ID AND NO ALLOCATION GROUP ID&quot;;IF([.M130]=&quot;MULTI_SALE_PENDING_ALLOCATION&quot;;&quot;REMOVE LINKED SALE ID OR CORRECT LINKAGE STATUS&quot;;IF([.M13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cell office:value-type="string" table:formula="of:=IF([.S131]=&quot;UNKNOWN&quot;;&quot;NO ACTION — linkage status is UNKNOWN / not asserted&quot;;IF([.S131]=&quot;CLEAR&quot;;&quot;NO CONTRADICTION — preserve evidence as entered&quot;;IF([.M131]=&quot;&quot;;&quot;REVIEW LINKAGE STATUS — identifiers are present while status is UNKNOWN&quot;;IF([.M131]=&quot;UNMATCHED&quot;;&quot;REMOVE LINKAGE IDENTIFIERS OR CORRECT LINKAGE STATUS&quot;;IF([.M131]=&quot;SINGLE_SALE_LINKED&quot;;&quot;REQUIRE LINKED SALE ID AND NO ALLOCATION GROUP ID&quot;;IF([.M131]=&quot;MULTI_SALE_PENDING_ALLOCATION&quot;;&quot;REMOVE LINKED SALE ID OR CORRECT LINKAGE STATUS&quot;;IF([.M13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cell office:value-type="string" table:formula="of:=IF([.S132]=&quot;UNKNOWN&quot;;&quot;NO ACTION — linkage status is UNKNOWN / not asserted&quot;;IF([.S132]=&quot;CLEAR&quot;;&quot;NO CONTRADICTION — preserve evidence as entered&quot;;IF([.M132]=&quot;&quot;;&quot;REVIEW LINKAGE STATUS — identifiers are present while status is UNKNOWN&quot;;IF([.M132]=&quot;UNMATCHED&quot;;&quot;REMOVE LINKAGE IDENTIFIERS OR CORRECT LINKAGE STATUS&quot;;IF([.M132]=&quot;SINGLE_SALE_LINKED&quot;;&quot;REQUIRE LINKED SALE ID AND NO ALLOCATION GROUP ID&quot;;IF([.M132]=&quot;MULTI_SALE_PENDING_ALLOCATION&quot;;&quot;REMOVE LINKED SALE ID OR CORRECT LINKAGE STATUS&quot;;IF([.M13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cell office:value-type="string" table:formula="of:=IF([.S133]=&quot;UNKNOWN&quot;;&quot;NO ACTION — linkage status is UNKNOWN / not asserted&quot;;IF([.S133]=&quot;CLEAR&quot;;&quot;NO CONTRADICTION — preserve evidence as entered&quot;;IF([.M133]=&quot;&quot;;&quot;REVIEW LINKAGE STATUS — identifiers are present while status is UNKNOWN&quot;;IF([.M133]=&quot;UNMATCHED&quot;;&quot;REMOVE LINKAGE IDENTIFIERS OR CORRECT LINKAGE STATUS&quot;;IF([.M133]=&quot;SINGLE_SALE_LINKED&quot;;&quot;REQUIRE LINKED SALE ID AND NO ALLOCATION GROUP ID&quot;;IF([.M133]=&quot;MULTI_SALE_PENDING_ALLOCATION&quot;;&quot;REMOVE LINKED SALE ID OR CORRECT LINKAGE STATUS&quot;;IF([.M13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cell office:value-type="string" table:formula="of:=IF([.S134]=&quot;UNKNOWN&quot;;&quot;NO ACTION — linkage status is UNKNOWN / not asserted&quot;;IF([.S134]=&quot;CLEAR&quot;;&quot;NO CONTRADICTION — preserve evidence as entered&quot;;IF([.M134]=&quot;&quot;;&quot;REVIEW LINKAGE STATUS — identifiers are present while status is UNKNOWN&quot;;IF([.M134]=&quot;UNMATCHED&quot;;&quot;REMOVE LINKAGE IDENTIFIERS OR CORRECT LINKAGE STATUS&quot;;IF([.M134]=&quot;SINGLE_SALE_LINKED&quot;;&quot;REQUIRE LINKED SALE ID AND NO ALLOCATION GROUP ID&quot;;IF([.M134]=&quot;MULTI_SALE_PENDING_ALLOCATION&quot;;&quot;REMOVE LINKED SALE ID OR CORRECT LINKAGE STATUS&quot;;IF([.M13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cell office:value-type="string" table:formula="of:=IF([.S135]=&quot;UNKNOWN&quot;;&quot;NO ACTION — linkage status is UNKNOWN / not asserted&quot;;IF([.S135]=&quot;CLEAR&quot;;&quot;NO CONTRADICTION — preserve evidence as entered&quot;;IF([.M135]=&quot;&quot;;&quot;REVIEW LINKAGE STATUS — identifiers are present while status is UNKNOWN&quot;;IF([.M135]=&quot;UNMATCHED&quot;;&quot;REMOVE LINKAGE IDENTIFIERS OR CORRECT LINKAGE STATUS&quot;;IF([.M135]=&quot;SINGLE_SALE_LINKED&quot;;&quot;REQUIRE LINKED SALE ID AND NO ALLOCATION GROUP ID&quot;;IF([.M135]=&quot;MULTI_SALE_PENDING_ALLOCATION&quot;;&quot;REMOVE LINKED SALE ID OR CORRECT LINKAGE STATUS&quot;;IF([.M13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cell office:value-type="string" table:formula="of:=IF([.S136]=&quot;UNKNOWN&quot;;&quot;NO ACTION — linkage status is UNKNOWN / not asserted&quot;;IF([.S136]=&quot;CLEAR&quot;;&quot;NO CONTRADICTION — preserve evidence as entered&quot;;IF([.M136]=&quot;&quot;;&quot;REVIEW LINKAGE STATUS — identifiers are present while status is UNKNOWN&quot;;IF([.M136]=&quot;UNMATCHED&quot;;&quot;REMOVE LINKAGE IDENTIFIERS OR CORRECT LINKAGE STATUS&quot;;IF([.M136]=&quot;SINGLE_SALE_LINKED&quot;;&quot;REQUIRE LINKED SALE ID AND NO ALLOCATION GROUP ID&quot;;IF([.M136]=&quot;MULTI_SALE_PENDING_ALLOCATION&quot;;&quot;REMOVE LINKED SALE ID OR CORRECT LINKAGE STATUS&quot;;IF([.M13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cell office:value-type="string" table:formula="of:=IF([.S137]=&quot;UNKNOWN&quot;;&quot;NO ACTION — linkage status is UNKNOWN / not asserted&quot;;IF([.S137]=&quot;CLEAR&quot;;&quot;NO CONTRADICTION — preserve evidence as entered&quot;;IF([.M137]=&quot;&quot;;&quot;REVIEW LINKAGE STATUS — identifiers are present while status is UNKNOWN&quot;;IF([.M137]=&quot;UNMATCHED&quot;;&quot;REMOVE LINKAGE IDENTIFIERS OR CORRECT LINKAGE STATUS&quot;;IF([.M137]=&quot;SINGLE_SALE_LINKED&quot;;&quot;REQUIRE LINKED SALE ID AND NO ALLOCATION GROUP ID&quot;;IF([.M137]=&quot;MULTI_SALE_PENDING_ALLOCATION&quot;;&quot;REMOVE LINKED SALE ID OR CORRECT LINKAGE STATUS&quot;;IF([.M13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cell office:value-type="string" table:formula="of:=IF([.S138]=&quot;UNKNOWN&quot;;&quot;NO ACTION — linkage status is UNKNOWN / not asserted&quot;;IF([.S138]=&quot;CLEAR&quot;;&quot;NO CONTRADICTION — preserve evidence as entered&quot;;IF([.M138]=&quot;&quot;;&quot;REVIEW LINKAGE STATUS — identifiers are present while status is UNKNOWN&quot;;IF([.M138]=&quot;UNMATCHED&quot;;&quot;REMOVE LINKAGE IDENTIFIERS OR CORRECT LINKAGE STATUS&quot;;IF([.M138]=&quot;SINGLE_SALE_LINKED&quot;;&quot;REQUIRE LINKED SALE ID AND NO ALLOCATION GROUP ID&quot;;IF([.M138]=&quot;MULTI_SALE_PENDING_ALLOCATION&quot;;&quot;REMOVE LINKED SALE ID OR CORRECT LINKAGE STATUS&quot;;IF([.M13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cell office:value-type="string" table:formula="of:=IF([.S139]=&quot;UNKNOWN&quot;;&quot;NO ACTION — linkage status is UNKNOWN / not asserted&quot;;IF([.S139]=&quot;CLEAR&quot;;&quot;NO CONTRADICTION — preserve evidence as entered&quot;;IF([.M139]=&quot;&quot;;&quot;REVIEW LINKAGE STATUS — identifiers are present while status is UNKNOWN&quot;;IF([.M139]=&quot;UNMATCHED&quot;;&quot;REMOVE LINKAGE IDENTIFIERS OR CORRECT LINKAGE STATUS&quot;;IF([.M139]=&quot;SINGLE_SALE_LINKED&quot;;&quot;REQUIRE LINKED SALE ID AND NO ALLOCATION GROUP ID&quot;;IF([.M139]=&quot;MULTI_SALE_PENDING_ALLOCATION&quot;;&quot;REMOVE LINKED SALE ID OR CORRECT LINKAGE STATUS&quot;;IF([.M13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cell office:value-type="string" table:formula="of:=IF([.S140]=&quot;UNKNOWN&quot;;&quot;NO ACTION — linkage status is UNKNOWN / not asserted&quot;;IF([.S140]=&quot;CLEAR&quot;;&quot;NO CONTRADICTION — preserve evidence as entered&quot;;IF([.M140]=&quot;&quot;;&quot;REVIEW LINKAGE STATUS — identifiers are present while status is UNKNOWN&quot;;IF([.M140]=&quot;UNMATCHED&quot;;&quot;REMOVE LINKAGE IDENTIFIERS OR CORRECT LINKAGE STATUS&quot;;IF([.M140]=&quot;SINGLE_SALE_LINKED&quot;;&quot;REQUIRE LINKED SALE ID AND NO ALLOCATION GROUP ID&quot;;IF([.M140]=&quot;MULTI_SALE_PENDING_ALLOCATION&quot;;&quot;REMOVE LINKED SALE ID OR CORRECT LINKAGE STATUS&quot;;IF([.M14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cell office:value-type="string" table:formula="of:=IF([.S141]=&quot;UNKNOWN&quot;;&quot;NO ACTION — linkage status is UNKNOWN / not asserted&quot;;IF([.S141]=&quot;CLEAR&quot;;&quot;NO CONTRADICTION — preserve evidence as entered&quot;;IF([.M141]=&quot;&quot;;&quot;REVIEW LINKAGE STATUS — identifiers are present while status is UNKNOWN&quot;;IF([.M141]=&quot;UNMATCHED&quot;;&quot;REMOVE LINKAGE IDENTIFIERS OR CORRECT LINKAGE STATUS&quot;;IF([.M141]=&quot;SINGLE_SALE_LINKED&quot;;&quot;REQUIRE LINKED SALE ID AND NO ALLOCATION GROUP ID&quot;;IF([.M141]=&quot;MULTI_SALE_PENDING_ALLOCATION&quot;;&quot;REMOVE LINKED SALE ID OR CORRECT LINKAGE STATUS&quot;;IF([.M14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cell office:value-type="string" table:formula="of:=IF([.S142]=&quot;UNKNOWN&quot;;&quot;NO ACTION — linkage status is UNKNOWN / not asserted&quot;;IF([.S142]=&quot;CLEAR&quot;;&quot;NO CONTRADICTION — preserve evidence as entered&quot;;IF([.M142]=&quot;&quot;;&quot;REVIEW LINKAGE STATUS — identifiers are present while status is UNKNOWN&quot;;IF([.M142]=&quot;UNMATCHED&quot;;&quot;REMOVE LINKAGE IDENTIFIERS OR CORRECT LINKAGE STATUS&quot;;IF([.M142]=&quot;SINGLE_SALE_LINKED&quot;;&quot;REQUIRE LINKED SALE ID AND NO ALLOCATION GROUP ID&quot;;IF([.M142]=&quot;MULTI_SALE_PENDING_ALLOCATION&quot;;&quot;REMOVE LINKED SALE ID OR CORRECT LINKAGE STATUS&quot;;IF([.M14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cell office:value-type="string" table:formula="of:=IF([.S143]=&quot;UNKNOWN&quot;;&quot;NO ACTION — linkage status is UNKNOWN / not asserted&quot;;IF([.S143]=&quot;CLEAR&quot;;&quot;NO CONTRADICTION — preserve evidence as entered&quot;;IF([.M143]=&quot;&quot;;&quot;REVIEW LINKAGE STATUS — identifiers are present while status is UNKNOWN&quot;;IF([.M143]=&quot;UNMATCHED&quot;;&quot;REMOVE LINKAGE IDENTIFIERS OR CORRECT LINKAGE STATUS&quot;;IF([.M143]=&quot;SINGLE_SALE_LINKED&quot;;&quot;REQUIRE LINKED SALE ID AND NO ALLOCATION GROUP ID&quot;;IF([.M143]=&quot;MULTI_SALE_PENDING_ALLOCATION&quot;;&quot;REMOVE LINKED SALE ID OR CORRECT LINKAGE STATUS&quot;;IF([.M14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cell office:value-type="string" table:formula="of:=IF([.S144]=&quot;UNKNOWN&quot;;&quot;NO ACTION — linkage status is UNKNOWN / not asserted&quot;;IF([.S144]=&quot;CLEAR&quot;;&quot;NO CONTRADICTION — preserve evidence as entered&quot;;IF([.M144]=&quot;&quot;;&quot;REVIEW LINKAGE STATUS — identifiers are present while status is UNKNOWN&quot;;IF([.M144]=&quot;UNMATCHED&quot;;&quot;REMOVE LINKAGE IDENTIFIERS OR CORRECT LINKAGE STATUS&quot;;IF([.M144]=&quot;SINGLE_SALE_LINKED&quot;;&quot;REQUIRE LINKED SALE ID AND NO ALLOCATION GROUP ID&quot;;IF([.M144]=&quot;MULTI_SALE_PENDING_ALLOCATION&quot;;&quot;REMOVE LINKED SALE ID OR CORRECT LINKAGE STATUS&quot;;IF([.M14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cell office:value-type="string" table:formula="of:=IF([.S145]=&quot;UNKNOWN&quot;;&quot;NO ACTION — linkage status is UNKNOWN / not asserted&quot;;IF([.S145]=&quot;CLEAR&quot;;&quot;NO CONTRADICTION — preserve evidence as entered&quot;;IF([.M145]=&quot;&quot;;&quot;REVIEW LINKAGE STATUS — identifiers are present while status is UNKNOWN&quot;;IF([.M145]=&quot;UNMATCHED&quot;;&quot;REMOVE LINKAGE IDENTIFIERS OR CORRECT LINKAGE STATUS&quot;;IF([.M145]=&quot;SINGLE_SALE_LINKED&quot;;&quot;REQUIRE LINKED SALE ID AND NO ALLOCATION GROUP ID&quot;;IF([.M145]=&quot;MULTI_SALE_PENDING_ALLOCATION&quot;;&quot;REMOVE LINKED SALE ID OR CORRECT LINKAGE STATUS&quot;;IF([.M14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cell office:value-type="string" table:formula="of:=IF([.S146]=&quot;UNKNOWN&quot;;&quot;NO ACTION — linkage status is UNKNOWN / not asserted&quot;;IF([.S146]=&quot;CLEAR&quot;;&quot;NO CONTRADICTION — preserve evidence as entered&quot;;IF([.M146]=&quot;&quot;;&quot;REVIEW LINKAGE STATUS — identifiers are present while status is UNKNOWN&quot;;IF([.M146]=&quot;UNMATCHED&quot;;&quot;REMOVE LINKAGE IDENTIFIERS OR CORRECT LINKAGE STATUS&quot;;IF([.M146]=&quot;SINGLE_SALE_LINKED&quot;;&quot;REQUIRE LINKED SALE ID AND NO ALLOCATION GROUP ID&quot;;IF([.M146]=&quot;MULTI_SALE_PENDING_ALLOCATION&quot;;&quot;REMOVE LINKED SALE ID OR CORRECT LINKAGE STATUS&quot;;IF([.M14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cell office:value-type="string" table:formula="of:=IF([.S147]=&quot;UNKNOWN&quot;;&quot;NO ACTION — linkage status is UNKNOWN / not asserted&quot;;IF([.S147]=&quot;CLEAR&quot;;&quot;NO CONTRADICTION — preserve evidence as entered&quot;;IF([.M147]=&quot;&quot;;&quot;REVIEW LINKAGE STATUS — identifiers are present while status is UNKNOWN&quot;;IF([.M147]=&quot;UNMATCHED&quot;;&quot;REMOVE LINKAGE IDENTIFIERS OR CORRECT LINKAGE STATUS&quot;;IF([.M147]=&quot;SINGLE_SALE_LINKED&quot;;&quot;REQUIRE LINKED SALE ID AND NO ALLOCATION GROUP ID&quot;;IF([.M147]=&quot;MULTI_SALE_PENDING_ALLOCATION&quot;;&quot;REMOVE LINKED SALE ID OR CORRECT LINKAGE STATUS&quot;;IF([.M14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cell office:value-type="string" table:formula="of:=IF([.S148]=&quot;UNKNOWN&quot;;&quot;NO ACTION — linkage status is UNKNOWN / not asserted&quot;;IF([.S148]=&quot;CLEAR&quot;;&quot;NO CONTRADICTION — preserve evidence as entered&quot;;IF([.M148]=&quot;&quot;;&quot;REVIEW LINKAGE STATUS — identifiers are present while status is UNKNOWN&quot;;IF([.M148]=&quot;UNMATCHED&quot;;&quot;REMOVE LINKAGE IDENTIFIERS OR CORRECT LINKAGE STATUS&quot;;IF([.M148]=&quot;SINGLE_SALE_LINKED&quot;;&quot;REQUIRE LINKED SALE ID AND NO ALLOCATION GROUP ID&quot;;IF([.M148]=&quot;MULTI_SALE_PENDING_ALLOCATION&quot;;&quot;REMOVE LINKED SALE ID OR CORRECT LINKAGE STATUS&quot;;IF([.M14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cell office:value-type="string" table:formula="of:=IF([.S149]=&quot;UNKNOWN&quot;;&quot;NO ACTION — linkage status is UNKNOWN / not asserted&quot;;IF([.S149]=&quot;CLEAR&quot;;&quot;NO CONTRADICTION — preserve evidence as entered&quot;;IF([.M149]=&quot;&quot;;&quot;REVIEW LINKAGE STATUS — identifiers are present while status is UNKNOWN&quot;;IF([.M149]=&quot;UNMATCHED&quot;;&quot;REMOVE LINKAGE IDENTIFIERS OR CORRECT LINKAGE STATUS&quot;;IF([.M149]=&quot;SINGLE_SALE_LINKED&quot;;&quot;REQUIRE LINKED SALE ID AND NO ALLOCATION GROUP ID&quot;;IF([.M149]=&quot;MULTI_SALE_PENDING_ALLOCATION&quot;;&quot;REMOVE LINKED SALE ID OR CORRECT LINKAGE STATUS&quot;;IF([.M14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cell office:value-type="string" table:formula="of:=IF([.S150]=&quot;UNKNOWN&quot;;&quot;NO ACTION — linkage status is UNKNOWN / not asserted&quot;;IF([.S150]=&quot;CLEAR&quot;;&quot;NO CONTRADICTION — preserve evidence as entered&quot;;IF([.M150]=&quot;&quot;;&quot;REVIEW LINKAGE STATUS — identifiers are present while status is UNKNOWN&quot;;IF([.M150]=&quot;UNMATCHED&quot;;&quot;REMOVE LINKAGE IDENTIFIERS OR CORRECT LINKAGE STATUS&quot;;IF([.M150]=&quot;SINGLE_SALE_LINKED&quot;;&quot;REQUIRE LINKED SALE ID AND NO ALLOCATION GROUP ID&quot;;IF([.M150]=&quot;MULTI_SALE_PENDING_ALLOCATION&quot;;&quot;REMOVE LINKED SALE ID OR CORRECT LINKAGE STATUS&quot;;IF([.M15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cell office:value-type="string" table:formula="of:=IF([.S151]=&quot;UNKNOWN&quot;;&quot;NO ACTION — linkage status is UNKNOWN / not asserted&quot;;IF([.S151]=&quot;CLEAR&quot;;&quot;NO CONTRADICTION — preserve evidence as entered&quot;;IF([.M151]=&quot;&quot;;&quot;REVIEW LINKAGE STATUS — identifiers are present while status is UNKNOWN&quot;;IF([.M151]=&quot;UNMATCHED&quot;;&quot;REMOVE LINKAGE IDENTIFIERS OR CORRECT LINKAGE STATUS&quot;;IF([.M151]=&quot;SINGLE_SALE_LINKED&quot;;&quot;REQUIRE LINKED SALE ID AND NO ALLOCATION GROUP ID&quot;;IF([.M151]=&quot;MULTI_SALE_PENDING_ALLOCATION&quot;;&quot;REMOVE LINKED SALE ID OR CORRECT LINKAGE STATUS&quot;;IF([.M15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cell office:value-type="string" table:formula="of:=IF([.S152]=&quot;UNKNOWN&quot;;&quot;NO ACTION — linkage status is UNKNOWN / not asserted&quot;;IF([.S152]=&quot;CLEAR&quot;;&quot;NO CONTRADICTION — preserve evidence as entered&quot;;IF([.M152]=&quot;&quot;;&quot;REVIEW LINKAGE STATUS — identifiers are present while status is UNKNOWN&quot;;IF([.M152]=&quot;UNMATCHED&quot;;&quot;REMOVE LINKAGE IDENTIFIERS OR CORRECT LINKAGE STATUS&quot;;IF([.M152]=&quot;SINGLE_SALE_LINKED&quot;;&quot;REQUIRE LINKED SALE ID AND NO ALLOCATION GROUP ID&quot;;IF([.M152]=&quot;MULTI_SALE_PENDING_ALLOCATION&quot;;&quot;REMOVE LINKED SALE ID OR CORRECT LINKAGE STATUS&quot;;IF([.M15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cell office:value-type="string" table:formula="of:=IF([.S153]=&quot;UNKNOWN&quot;;&quot;NO ACTION — linkage status is UNKNOWN / not asserted&quot;;IF([.S153]=&quot;CLEAR&quot;;&quot;NO CONTRADICTION — preserve evidence as entered&quot;;IF([.M153]=&quot;&quot;;&quot;REVIEW LINKAGE STATUS — identifiers are present while status is UNKNOWN&quot;;IF([.M153]=&quot;UNMATCHED&quot;;&quot;REMOVE LINKAGE IDENTIFIERS OR CORRECT LINKAGE STATUS&quot;;IF([.M153]=&quot;SINGLE_SALE_LINKED&quot;;&quot;REQUIRE LINKED SALE ID AND NO ALLOCATION GROUP ID&quot;;IF([.M153]=&quot;MULTI_SALE_PENDING_ALLOCATION&quot;;&quot;REMOVE LINKED SALE ID OR CORRECT LINKAGE STATUS&quot;;IF([.M15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cell office:value-type="string" table:formula="of:=IF([.S154]=&quot;UNKNOWN&quot;;&quot;NO ACTION — linkage status is UNKNOWN / not asserted&quot;;IF([.S154]=&quot;CLEAR&quot;;&quot;NO CONTRADICTION — preserve evidence as entered&quot;;IF([.M154]=&quot;&quot;;&quot;REVIEW LINKAGE STATUS — identifiers are present while status is UNKNOWN&quot;;IF([.M154]=&quot;UNMATCHED&quot;;&quot;REMOVE LINKAGE IDENTIFIERS OR CORRECT LINKAGE STATUS&quot;;IF([.M154]=&quot;SINGLE_SALE_LINKED&quot;;&quot;REQUIRE LINKED SALE ID AND NO ALLOCATION GROUP ID&quot;;IF([.M154]=&quot;MULTI_SALE_PENDING_ALLOCATION&quot;;&quot;REMOVE LINKED SALE ID OR CORRECT LINKAGE STATUS&quot;;IF([.M15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cell office:value-type="string" table:formula="of:=IF([.S155]=&quot;UNKNOWN&quot;;&quot;NO ACTION — linkage status is UNKNOWN / not asserted&quot;;IF([.S155]=&quot;CLEAR&quot;;&quot;NO CONTRADICTION — preserve evidence as entered&quot;;IF([.M155]=&quot;&quot;;&quot;REVIEW LINKAGE STATUS — identifiers are present while status is UNKNOWN&quot;;IF([.M155]=&quot;UNMATCHED&quot;;&quot;REMOVE LINKAGE IDENTIFIERS OR CORRECT LINKAGE STATUS&quot;;IF([.M155]=&quot;SINGLE_SALE_LINKED&quot;;&quot;REQUIRE LINKED SALE ID AND NO ALLOCATION GROUP ID&quot;;IF([.M155]=&quot;MULTI_SALE_PENDING_ALLOCATION&quot;;&quot;REMOVE LINKED SALE ID OR CORRECT LINKAGE STATUS&quot;;IF([.M15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cell office:value-type="string" table:formula="of:=IF([.S156]=&quot;UNKNOWN&quot;;&quot;NO ACTION — linkage status is UNKNOWN / not asserted&quot;;IF([.S156]=&quot;CLEAR&quot;;&quot;NO CONTRADICTION — preserve evidence as entered&quot;;IF([.M156]=&quot;&quot;;&quot;REVIEW LINKAGE STATUS — identifiers are present while status is UNKNOWN&quot;;IF([.M156]=&quot;UNMATCHED&quot;;&quot;REMOVE LINKAGE IDENTIFIERS OR CORRECT LINKAGE STATUS&quot;;IF([.M156]=&quot;SINGLE_SALE_LINKED&quot;;&quot;REQUIRE LINKED SALE ID AND NO ALLOCATION GROUP ID&quot;;IF([.M156]=&quot;MULTI_SALE_PENDING_ALLOCATION&quot;;&quot;REMOVE LINKED SALE ID OR CORRECT LINKAGE STATUS&quot;;IF([.M15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cell office:value-type="string" table:formula="of:=IF([.S157]=&quot;UNKNOWN&quot;;&quot;NO ACTION — linkage status is UNKNOWN / not asserted&quot;;IF([.S157]=&quot;CLEAR&quot;;&quot;NO CONTRADICTION — preserve evidence as entered&quot;;IF([.M157]=&quot;&quot;;&quot;REVIEW LINKAGE STATUS — identifiers are present while status is UNKNOWN&quot;;IF([.M157]=&quot;UNMATCHED&quot;;&quot;REMOVE LINKAGE IDENTIFIERS OR CORRECT LINKAGE STATUS&quot;;IF([.M157]=&quot;SINGLE_SALE_LINKED&quot;;&quot;REQUIRE LINKED SALE ID AND NO ALLOCATION GROUP ID&quot;;IF([.M157]=&quot;MULTI_SALE_PENDING_ALLOCATION&quot;;&quot;REMOVE LINKED SALE ID OR CORRECT LINKAGE STATUS&quot;;IF([.M15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cell office:value-type="string" table:formula="of:=IF([.S158]=&quot;UNKNOWN&quot;;&quot;NO ACTION — linkage status is UNKNOWN / not asserted&quot;;IF([.S158]=&quot;CLEAR&quot;;&quot;NO CONTRADICTION — preserve evidence as entered&quot;;IF([.M158]=&quot;&quot;;&quot;REVIEW LINKAGE STATUS — identifiers are present while status is UNKNOWN&quot;;IF([.M158]=&quot;UNMATCHED&quot;;&quot;REMOVE LINKAGE IDENTIFIERS OR CORRECT LINKAGE STATUS&quot;;IF([.M158]=&quot;SINGLE_SALE_LINKED&quot;;&quot;REQUIRE LINKED SALE ID AND NO ALLOCATION GROUP ID&quot;;IF([.M158]=&quot;MULTI_SALE_PENDING_ALLOCATION&quot;;&quot;REMOVE LINKED SALE ID OR CORRECT LINKAGE STATUS&quot;;IF([.M15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cell office:value-type="string" table:formula="of:=IF([.S159]=&quot;UNKNOWN&quot;;&quot;NO ACTION — linkage status is UNKNOWN / not asserted&quot;;IF([.S159]=&quot;CLEAR&quot;;&quot;NO CONTRADICTION — preserve evidence as entered&quot;;IF([.M159]=&quot;&quot;;&quot;REVIEW LINKAGE STATUS — identifiers are present while status is UNKNOWN&quot;;IF([.M159]=&quot;UNMATCHED&quot;;&quot;REMOVE LINKAGE IDENTIFIERS OR CORRECT LINKAGE STATUS&quot;;IF([.M159]=&quot;SINGLE_SALE_LINKED&quot;;&quot;REQUIRE LINKED SALE ID AND NO ALLOCATION GROUP ID&quot;;IF([.M159]=&quot;MULTI_SALE_PENDING_ALLOCATION&quot;;&quot;REMOVE LINKED SALE ID OR CORRECT LINKAGE STATUS&quot;;IF([.M15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cell office:value-type="string" table:formula="of:=IF([.S160]=&quot;UNKNOWN&quot;;&quot;NO ACTION — linkage status is UNKNOWN / not asserted&quot;;IF([.S160]=&quot;CLEAR&quot;;&quot;NO CONTRADICTION — preserve evidence as entered&quot;;IF([.M160]=&quot;&quot;;&quot;REVIEW LINKAGE STATUS — identifiers are present while status is UNKNOWN&quot;;IF([.M160]=&quot;UNMATCHED&quot;;&quot;REMOVE LINKAGE IDENTIFIERS OR CORRECT LINKAGE STATUS&quot;;IF([.M160]=&quot;SINGLE_SALE_LINKED&quot;;&quot;REQUIRE LINKED SALE ID AND NO ALLOCATION GROUP ID&quot;;IF([.M160]=&quot;MULTI_SALE_PENDING_ALLOCATION&quot;;&quot;REMOVE LINKED SALE ID OR CORRECT LINKAGE STATUS&quot;;IF([.M16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cell office:value-type="string" table:formula="of:=IF([.S161]=&quot;UNKNOWN&quot;;&quot;NO ACTION — linkage status is UNKNOWN / not asserted&quot;;IF([.S161]=&quot;CLEAR&quot;;&quot;NO CONTRADICTION — preserve evidence as entered&quot;;IF([.M161]=&quot;&quot;;&quot;REVIEW LINKAGE STATUS — identifiers are present while status is UNKNOWN&quot;;IF([.M161]=&quot;UNMATCHED&quot;;&quot;REMOVE LINKAGE IDENTIFIERS OR CORRECT LINKAGE STATUS&quot;;IF([.M161]=&quot;SINGLE_SALE_LINKED&quot;;&quot;REQUIRE LINKED SALE ID AND NO ALLOCATION GROUP ID&quot;;IF([.M161]=&quot;MULTI_SALE_PENDING_ALLOCATION&quot;;&quot;REMOVE LINKED SALE ID OR CORRECT LINKAGE STATUS&quot;;IF([.M16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cell office:value-type="string" table:formula="of:=IF([.S162]=&quot;UNKNOWN&quot;;&quot;NO ACTION — linkage status is UNKNOWN / not asserted&quot;;IF([.S162]=&quot;CLEAR&quot;;&quot;NO CONTRADICTION — preserve evidence as entered&quot;;IF([.M162]=&quot;&quot;;&quot;REVIEW LINKAGE STATUS — identifiers are present while status is UNKNOWN&quot;;IF([.M162]=&quot;UNMATCHED&quot;;&quot;REMOVE LINKAGE IDENTIFIERS OR CORRECT LINKAGE STATUS&quot;;IF([.M162]=&quot;SINGLE_SALE_LINKED&quot;;&quot;REQUIRE LINKED SALE ID AND NO ALLOCATION GROUP ID&quot;;IF([.M162]=&quot;MULTI_SALE_PENDING_ALLOCATION&quot;;&quot;REMOVE LINKED SALE ID OR CORRECT LINKAGE STATUS&quot;;IF([.M16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cell office:value-type="string" table:formula="of:=IF([.S163]=&quot;UNKNOWN&quot;;&quot;NO ACTION — linkage status is UNKNOWN / not asserted&quot;;IF([.S163]=&quot;CLEAR&quot;;&quot;NO CONTRADICTION — preserve evidence as entered&quot;;IF([.M163]=&quot;&quot;;&quot;REVIEW LINKAGE STATUS — identifiers are present while status is UNKNOWN&quot;;IF([.M163]=&quot;UNMATCHED&quot;;&quot;REMOVE LINKAGE IDENTIFIERS OR CORRECT LINKAGE STATUS&quot;;IF([.M163]=&quot;SINGLE_SALE_LINKED&quot;;&quot;REQUIRE LINKED SALE ID AND NO ALLOCATION GROUP ID&quot;;IF([.M163]=&quot;MULTI_SALE_PENDING_ALLOCATION&quot;;&quot;REMOVE LINKED SALE ID OR CORRECT LINKAGE STATUS&quot;;IF([.M16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cell office:value-type="string" table:formula="of:=IF([.S164]=&quot;UNKNOWN&quot;;&quot;NO ACTION — linkage status is UNKNOWN / not asserted&quot;;IF([.S164]=&quot;CLEAR&quot;;&quot;NO CONTRADICTION — preserve evidence as entered&quot;;IF([.M164]=&quot;&quot;;&quot;REVIEW LINKAGE STATUS — identifiers are present while status is UNKNOWN&quot;;IF([.M164]=&quot;UNMATCHED&quot;;&quot;REMOVE LINKAGE IDENTIFIERS OR CORRECT LINKAGE STATUS&quot;;IF([.M164]=&quot;SINGLE_SALE_LINKED&quot;;&quot;REQUIRE LINKED SALE ID AND NO ALLOCATION GROUP ID&quot;;IF([.M164]=&quot;MULTI_SALE_PENDING_ALLOCATION&quot;;&quot;REMOVE LINKED SALE ID OR CORRECT LINKAGE STATUS&quot;;IF([.M16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cell office:value-type="string" table:formula="of:=IF([.S165]=&quot;UNKNOWN&quot;;&quot;NO ACTION — linkage status is UNKNOWN / not asserted&quot;;IF([.S165]=&quot;CLEAR&quot;;&quot;NO CONTRADICTION — preserve evidence as entered&quot;;IF([.M165]=&quot;&quot;;&quot;REVIEW LINKAGE STATUS — identifiers are present while status is UNKNOWN&quot;;IF([.M165]=&quot;UNMATCHED&quot;;&quot;REMOVE LINKAGE IDENTIFIERS OR CORRECT LINKAGE STATUS&quot;;IF([.M165]=&quot;SINGLE_SALE_LINKED&quot;;&quot;REQUIRE LINKED SALE ID AND NO ALLOCATION GROUP ID&quot;;IF([.M165]=&quot;MULTI_SALE_PENDING_ALLOCATION&quot;;&quot;REMOVE LINKED SALE ID OR CORRECT LINKAGE STATUS&quot;;IF([.M16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cell office:value-type="string" table:formula="of:=IF([.S166]=&quot;UNKNOWN&quot;;&quot;NO ACTION — linkage status is UNKNOWN / not asserted&quot;;IF([.S166]=&quot;CLEAR&quot;;&quot;NO CONTRADICTION — preserve evidence as entered&quot;;IF([.M166]=&quot;&quot;;&quot;REVIEW LINKAGE STATUS — identifiers are present while status is UNKNOWN&quot;;IF([.M166]=&quot;UNMATCHED&quot;;&quot;REMOVE LINKAGE IDENTIFIERS OR CORRECT LINKAGE STATUS&quot;;IF([.M166]=&quot;SINGLE_SALE_LINKED&quot;;&quot;REQUIRE LINKED SALE ID AND NO ALLOCATION GROUP ID&quot;;IF([.M166]=&quot;MULTI_SALE_PENDING_ALLOCATION&quot;;&quot;REMOVE LINKED SALE ID OR CORRECT LINKAGE STATUS&quot;;IF([.M16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cell office:value-type="string" table:formula="of:=IF([.S167]=&quot;UNKNOWN&quot;;&quot;NO ACTION — linkage status is UNKNOWN / not asserted&quot;;IF([.S167]=&quot;CLEAR&quot;;&quot;NO CONTRADICTION — preserve evidence as entered&quot;;IF([.M167]=&quot;&quot;;&quot;REVIEW LINKAGE STATUS — identifiers are present while status is UNKNOWN&quot;;IF([.M167]=&quot;UNMATCHED&quot;;&quot;REMOVE LINKAGE IDENTIFIERS OR CORRECT LINKAGE STATUS&quot;;IF([.M167]=&quot;SINGLE_SALE_LINKED&quot;;&quot;REQUIRE LINKED SALE ID AND NO ALLOCATION GROUP ID&quot;;IF([.M167]=&quot;MULTI_SALE_PENDING_ALLOCATION&quot;;&quot;REMOVE LINKED SALE ID OR CORRECT LINKAGE STATUS&quot;;IF([.M16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cell office:value-type="string" table:formula="of:=IF([.S168]=&quot;UNKNOWN&quot;;&quot;NO ACTION — linkage status is UNKNOWN / not asserted&quot;;IF([.S168]=&quot;CLEAR&quot;;&quot;NO CONTRADICTION — preserve evidence as entered&quot;;IF([.M168]=&quot;&quot;;&quot;REVIEW LINKAGE STATUS — identifiers are present while status is UNKNOWN&quot;;IF([.M168]=&quot;UNMATCHED&quot;;&quot;REMOVE LINKAGE IDENTIFIERS OR CORRECT LINKAGE STATUS&quot;;IF([.M168]=&quot;SINGLE_SALE_LINKED&quot;;&quot;REQUIRE LINKED SALE ID AND NO ALLOCATION GROUP ID&quot;;IF([.M168]=&quot;MULTI_SALE_PENDING_ALLOCATION&quot;;&quot;REMOVE LINKED SALE ID OR CORRECT LINKAGE STATUS&quot;;IF([.M16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cell office:value-type="string" table:formula="of:=IF([.S169]=&quot;UNKNOWN&quot;;&quot;NO ACTION — linkage status is UNKNOWN / not asserted&quot;;IF([.S169]=&quot;CLEAR&quot;;&quot;NO CONTRADICTION — preserve evidence as entered&quot;;IF([.M169]=&quot;&quot;;&quot;REVIEW LINKAGE STATUS — identifiers are present while status is UNKNOWN&quot;;IF([.M169]=&quot;UNMATCHED&quot;;&quot;REMOVE LINKAGE IDENTIFIERS OR CORRECT LINKAGE STATUS&quot;;IF([.M169]=&quot;SINGLE_SALE_LINKED&quot;;&quot;REQUIRE LINKED SALE ID AND NO ALLOCATION GROUP ID&quot;;IF([.M169]=&quot;MULTI_SALE_PENDING_ALLOCATION&quot;;&quot;REMOVE LINKED SALE ID OR CORRECT LINKAGE STATUS&quot;;IF([.M16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cell office:value-type="string" table:formula="of:=IF([.S170]=&quot;UNKNOWN&quot;;&quot;NO ACTION — linkage status is UNKNOWN / not asserted&quot;;IF([.S170]=&quot;CLEAR&quot;;&quot;NO CONTRADICTION — preserve evidence as entered&quot;;IF([.M170]=&quot;&quot;;&quot;REVIEW LINKAGE STATUS — identifiers are present while status is UNKNOWN&quot;;IF([.M170]=&quot;UNMATCHED&quot;;&quot;REMOVE LINKAGE IDENTIFIERS OR CORRECT LINKAGE STATUS&quot;;IF([.M170]=&quot;SINGLE_SALE_LINKED&quot;;&quot;REQUIRE LINKED SALE ID AND NO ALLOCATION GROUP ID&quot;;IF([.M170]=&quot;MULTI_SALE_PENDING_ALLOCATION&quot;;&quot;REMOVE LINKED SALE ID OR CORRECT LINKAGE STATUS&quot;;IF([.M17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cell office:value-type="string" table:formula="of:=IF([.S171]=&quot;UNKNOWN&quot;;&quot;NO ACTION — linkage status is UNKNOWN / not asserted&quot;;IF([.S171]=&quot;CLEAR&quot;;&quot;NO CONTRADICTION — preserve evidence as entered&quot;;IF([.M171]=&quot;&quot;;&quot;REVIEW LINKAGE STATUS — identifiers are present while status is UNKNOWN&quot;;IF([.M171]=&quot;UNMATCHED&quot;;&quot;REMOVE LINKAGE IDENTIFIERS OR CORRECT LINKAGE STATUS&quot;;IF([.M171]=&quot;SINGLE_SALE_LINKED&quot;;&quot;REQUIRE LINKED SALE ID AND NO ALLOCATION GROUP ID&quot;;IF([.M171]=&quot;MULTI_SALE_PENDING_ALLOCATION&quot;;&quot;REMOVE LINKED SALE ID OR CORRECT LINKAGE STATUS&quot;;IF([.M17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cell office:value-type="string" table:formula="of:=IF([.S172]=&quot;UNKNOWN&quot;;&quot;NO ACTION — linkage status is UNKNOWN / not asserted&quot;;IF([.S172]=&quot;CLEAR&quot;;&quot;NO CONTRADICTION — preserve evidence as entered&quot;;IF([.M172]=&quot;&quot;;&quot;REVIEW LINKAGE STATUS — identifiers are present while status is UNKNOWN&quot;;IF([.M172]=&quot;UNMATCHED&quot;;&quot;REMOVE LINKAGE IDENTIFIERS OR CORRECT LINKAGE STATUS&quot;;IF([.M172]=&quot;SINGLE_SALE_LINKED&quot;;&quot;REQUIRE LINKED SALE ID AND NO ALLOCATION GROUP ID&quot;;IF([.M172]=&quot;MULTI_SALE_PENDING_ALLOCATION&quot;;&quot;REMOVE LINKED SALE ID OR CORRECT LINKAGE STATUS&quot;;IF([.M17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cell office:value-type="string" table:formula="of:=IF([.S173]=&quot;UNKNOWN&quot;;&quot;NO ACTION — linkage status is UNKNOWN / not asserted&quot;;IF([.S173]=&quot;CLEAR&quot;;&quot;NO CONTRADICTION — preserve evidence as entered&quot;;IF([.M173]=&quot;&quot;;&quot;REVIEW LINKAGE STATUS — identifiers are present while status is UNKNOWN&quot;;IF([.M173]=&quot;UNMATCHED&quot;;&quot;REMOVE LINKAGE IDENTIFIERS OR CORRECT LINKAGE STATUS&quot;;IF([.M173]=&quot;SINGLE_SALE_LINKED&quot;;&quot;REQUIRE LINKED SALE ID AND NO ALLOCATION GROUP ID&quot;;IF([.M173]=&quot;MULTI_SALE_PENDING_ALLOCATION&quot;;&quot;REMOVE LINKED SALE ID OR CORRECT LINKAGE STATUS&quot;;IF([.M17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cell office:value-type="string" table:formula="of:=IF([.S174]=&quot;UNKNOWN&quot;;&quot;NO ACTION — linkage status is UNKNOWN / not asserted&quot;;IF([.S174]=&quot;CLEAR&quot;;&quot;NO CONTRADICTION — preserve evidence as entered&quot;;IF([.M174]=&quot;&quot;;&quot;REVIEW LINKAGE STATUS — identifiers are present while status is UNKNOWN&quot;;IF([.M174]=&quot;UNMATCHED&quot;;&quot;REMOVE LINKAGE IDENTIFIERS OR CORRECT LINKAGE STATUS&quot;;IF([.M174]=&quot;SINGLE_SALE_LINKED&quot;;&quot;REQUIRE LINKED SALE ID AND NO ALLOCATION GROUP ID&quot;;IF([.M174]=&quot;MULTI_SALE_PENDING_ALLOCATION&quot;;&quot;REMOVE LINKED SALE ID OR CORRECT LINKAGE STATUS&quot;;IF([.M17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cell office:value-type="string" table:formula="of:=IF([.S175]=&quot;UNKNOWN&quot;;&quot;NO ACTION — linkage status is UNKNOWN / not asserted&quot;;IF([.S175]=&quot;CLEAR&quot;;&quot;NO CONTRADICTION — preserve evidence as entered&quot;;IF([.M175]=&quot;&quot;;&quot;REVIEW LINKAGE STATUS — identifiers are present while status is UNKNOWN&quot;;IF([.M175]=&quot;UNMATCHED&quot;;&quot;REMOVE LINKAGE IDENTIFIERS OR CORRECT LINKAGE STATUS&quot;;IF([.M175]=&quot;SINGLE_SALE_LINKED&quot;;&quot;REQUIRE LINKED SALE ID AND NO ALLOCATION GROUP ID&quot;;IF([.M175]=&quot;MULTI_SALE_PENDING_ALLOCATION&quot;;&quot;REMOVE LINKED SALE ID OR CORRECT LINKAGE STATUS&quot;;IF([.M17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cell office:value-type="string" table:formula="of:=IF([.S176]=&quot;UNKNOWN&quot;;&quot;NO ACTION — linkage status is UNKNOWN / not asserted&quot;;IF([.S176]=&quot;CLEAR&quot;;&quot;NO CONTRADICTION — preserve evidence as entered&quot;;IF([.M176]=&quot;&quot;;&quot;REVIEW LINKAGE STATUS — identifiers are present while status is UNKNOWN&quot;;IF([.M176]=&quot;UNMATCHED&quot;;&quot;REMOVE LINKAGE IDENTIFIERS OR CORRECT LINKAGE STATUS&quot;;IF([.M176]=&quot;SINGLE_SALE_LINKED&quot;;&quot;REQUIRE LINKED SALE ID AND NO ALLOCATION GROUP ID&quot;;IF([.M176]=&quot;MULTI_SALE_PENDING_ALLOCATION&quot;;&quot;REMOVE LINKED SALE ID OR CORRECT LINKAGE STATUS&quot;;IF([.M17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cell office:value-type="string" table:formula="of:=IF([.S177]=&quot;UNKNOWN&quot;;&quot;NO ACTION — linkage status is UNKNOWN / not asserted&quot;;IF([.S177]=&quot;CLEAR&quot;;&quot;NO CONTRADICTION — preserve evidence as entered&quot;;IF([.M177]=&quot;&quot;;&quot;REVIEW LINKAGE STATUS — identifiers are present while status is UNKNOWN&quot;;IF([.M177]=&quot;UNMATCHED&quot;;&quot;REMOVE LINKAGE IDENTIFIERS OR CORRECT LINKAGE STATUS&quot;;IF([.M177]=&quot;SINGLE_SALE_LINKED&quot;;&quot;REQUIRE LINKED SALE ID AND NO ALLOCATION GROUP ID&quot;;IF([.M177]=&quot;MULTI_SALE_PENDING_ALLOCATION&quot;;&quot;REMOVE LINKED SALE ID OR CORRECT LINKAGE STATUS&quot;;IF([.M17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cell office:value-type="string" table:formula="of:=IF([.S178]=&quot;UNKNOWN&quot;;&quot;NO ACTION — linkage status is UNKNOWN / not asserted&quot;;IF([.S178]=&quot;CLEAR&quot;;&quot;NO CONTRADICTION — preserve evidence as entered&quot;;IF([.M178]=&quot;&quot;;&quot;REVIEW LINKAGE STATUS — identifiers are present while status is UNKNOWN&quot;;IF([.M178]=&quot;UNMATCHED&quot;;&quot;REMOVE LINKAGE IDENTIFIERS OR CORRECT LINKAGE STATUS&quot;;IF([.M178]=&quot;SINGLE_SALE_LINKED&quot;;&quot;REQUIRE LINKED SALE ID AND NO ALLOCATION GROUP ID&quot;;IF([.M178]=&quot;MULTI_SALE_PENDING_ALLOCATION&quot;;&quot;REMOVE LINKED SALE ID OR CORRECT LINKAGE STATUS&quot;;IF([.M17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cell office:value-type="string" table:formula="of:=IF([.S179]=&quot;UNKNOWN&quot;;&quot;NO ACTION — linkage status is UNKNOWN / not asserted&quot;;IF([.S179]=&quot;CLEAR&quot;;&quot;NO CONTRADICTION — preserve evidence as entered&quot;;IF([.M179]=&quot;&quot;;&quot;REVIEW LINKAGE STATUS — identifiers are present while status is UNKNOWN&quot;;IF([.M179]=&quot;UNMATCHED&quot;;&quot;REMOVE LINKAGE IDENTIFIERS OR CORRECT LINKAGE STATUS&quot;;IF([.M179]=&quot;SINGLE_SALE_LINKED&quot;;&quot;REQUIRE LINKED SALE ID AND NO ALLOCATION GROUP ID&quot;;IF([.M179]=&quot;MULTI_SALE_PENDING_ALLOCATION&quot;;&quot;REMOVE LINKED SALE ID OR CORRECT LINKAGE STATUS&quot;;IF([.M17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cell office:value-type="string" table:formula="of:=IF([.S180]=&quot;UNKNOWN&quot;;&quot;NO ACTION — linkage status is UNKNOWN / not asserted&quot;;IF([.S180]=&quot;CLEAR&quot;;&quot;NO CONTRADICTION — preserve evidence as entered&quot;;IF([.M180]=&quot;&quot;;&quot;REVIEW LINKAGE STATUS — identifiers are present while status is UNKNOWN&quot;;IF([.M180]=&quot;UNMATCHED&quot;;&quot;REMOVE LINKAGE IDENTIFIERS OR CORRECT LINKAGE STATUS&quot;;IF([.M180]=&quot;SINGLE_SALE_LINKED&quot;;&quot;REQUIRE LINKED SALE ID AND NO ALLOCATION GROUP ID&quot;;IF([.M180]=&quot;MULTI_SALE_PENDING_ALLOCATION&quot;;&quot;REMOVE LINKED SALE ID OR CORRECT LINKAGE STATUS&quot;;IF([.M18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cell office:value-type="string" table:formula="of:=IF([.S181]=&quot;UNKNOWN&quot;;&quot;NO ACTION — linkage status is UNKNOWN / not asserted&quot;;IF([.S181]=&quot;CLEAR&quot;;&quot;NO CONTRADICTION — preserve evidence as entered&quot;;IF([.M181]=&quot;&quot;;&quot;REVIEW LINKAGE STATUS — identifiers are present while status is UNKNOWN&quot;;IF([.M181]=&quot;UNMATCHED&quot;;&quot;REMOVE LINKAGE IDENTIFIERS OR CORRECT LINKAGE STATUS&quot;;IF([.M181]=&quot;SINGLE_SALE_LINKED&quot;;&quot;REQUIRE LINKED SALE ID AND NO ALLOCATION GROUP ID&quot;;IF([.M181]=&quot;MULTI_SALE_PENDING_ALLOCATION&quot;;&quot;REMOVE LINKED SALE ID OR CORRECT LINKAGE STATUS&quot;;IF([.M18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cell office:value-type="string" table:formula="of:=IF([.S182]=&quot;UNKNOWN&quot;;&quot;NO ACTION — linkage status is UNKNOWN / not asserted&quot;;IF([.S182]=&quot;CLEAR&quot;;&quot;NO CONTRADICTION — preserve evidence as entered&quot;;IF([.M182]=&quot;&quot;;&quot;REVIEW LINKAGE STATUS — identifiers are present while status is UNKNOWN&quot;;IF([.M182]=&quot;UNMATCHED&quot;;&quot;REMOVE LINKAGE IDENTIFIERS OR CORRECT LINKAGE STATUS&quot;;IF([.M182]=&quot;SINGLE_SALE_LINKED&quot;;&quot;REQUIRE LINKED SALE ID AND NO ALLOCATION GROUP ID&quot;;IF([.M182]=&quot;MULTI_SALE_PENDING_ALLOCATION&quot;;&quot;REMOVE LINKED SALE ID OR CORRECT LINKAGE STATUS&quot;;IF([.M18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cell office:value-type="string" table:formula="of:=IF([.S183]=&quot;UNKNOWN&quot;;&quot;NO ACTION — linkage status is UNKNOWN / not asserted&quot;;IF([.S183]=&quot;CLEAR&quot;;&quot;NO CONTRADICTION — preserve evidence as entered&quot;;IF([.M183]=&quot;&quot;;&quot;REVIEW LINKAGE STATUS — identifiers are present while status is UNKNOWN&quot;;IF([.M183]=&quot;UNMATCHED&quot;;&quot;REMOVE LINKAGE IDENTIFIERS OR CORRECT LINKAGE STATUS&quot;;IF([.M183]=&quot;SINGLE_SALE_LINKED&quot;;&quot;REQUIRE LINKED SALE ID AND NO ALLOCATION GROUP ID&quot;;IF([.M183]=&quot;MULTI_SALE_PENDING_ALLOCATION&quot;;&quot;REMOVE LINKED SALE ID OR CORRECT LINKAGE STATUS&quot;;IF([.M18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cell office:value-type="string" table:formula="of:=IF([.S184]=&quot;UNKNOWN&quot;;&quot;NO ACTION — linkage status is UNKNOWN / not asserted&quot;;IF([.S184]=&quot;CLEAR&quot;;&quot;NO CONTRADICTION — preserve evidence as entered&quot;;IF([.M184]=&quot;&quot;;&quot;REVIEW LINKAGE STATUS — identifiers are present while status is UNKNOWN&quot;;IF([.M184]=&quot;UNMATCHED&quot;;&quot;REMOVE LINKAGE IDENTIFIERS OR CORRECT LINKAGE STATUS&quot;;IF([.M184]=&quot;SINGLE_SALE_LINKED&quot;;&quot;REQUIRE LINKED SALE ID AND NO ALLOCATION GROUP ID&quot;;IF([.M184]=&quot;MULTI_SALE_PENDING_ALLOCATION&quot;;&quot;REMOVE LINKED SALE ID OR CORRECT LINKAGE STATUS&quot;;IF([.M18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cell office:value-type="string" table:formula="of:=IF([.S185]=&quot;UNKNOWN&quot;;&quot;NO ACTION — linkage status is UNKNOWN / not asserted&quot;;IF([.S185]=&quot;CLEAR&quot;;&quot;NO CONTRADICTION — preserve evidence as entered&quot;;IF([.M185]=&quot;&quot;;&quot;REVIEW LINKAGE STATUS — identifiers are present while status is UNKNOWN&quot;;IF([.M185]=&quot;UNMATCHED&quot;;&quot;REMOVE LINKAGE IDENTIFIERS OR CORRECT LINKAGE STATUS&quot;;IF([.M185]=&quot;SINGLE_SALE_LINKED&quot;;&quot;REQUIRE LINKED SALE ID AND NO ALLOCATION GROUP ID&quot;;IF([.M185]=&quot;MULTI_SALE_PENDING_ALLOCATION&quot;;&quot;REMOVE LINKED SALE ID OR CORRECT LINKAGE STATUS&quot;;IF([.M18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cell office:value-type="string" table:formula="of:=IF([.S186]=&quot;UNKNOWN&quot;;&quot;NO ACTION — linkage status is UNKNOWN / not asserted&quot;;IF([.S186]=&quot;CLEAR&quot;;&quot;NO CONTRADICTION — preserve evidence as entered&quot;;IF([.M186]=&quot;&quot;;&quot;REVIEW LINKAGE STATUS — identifiers are present while status is UNKNOWN&quot;;IF([.M186]=&quot;UNMATCHED&quot;;&quot;REMOVE LINKAGE IDENTIFIERS OR CORRECT LINKAGE STATUS&quot;;IF([.M186]=&quot;SINGLE_SALE_LINKED&quot;;&quot;REQUIRE LINKED SALE ID AND NO ALLOCATION GROUP ID&quot;;IF([.M186]=&quot;MULTI_SALE_PENDING_ALLOCATION&quot;;&quot;REMOVE LINKED SALE ID OR CORRECT LINKAGE STATUS&quot;;IF([.M18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cell office:value-type="string" table:formula="of:=IF([.S187]=&quot;UNKNOWN&quot;;&quot;NO ACTION — linkage status is UNKNOWN / not asserted&quot;;IF([.S187]=&quot;CLEAR&quot;;&quot;NO CONTRADICTION — preserve evidence as entered&quot;;IF([.M187]=&quot;&quot;;&quot;REVIEW LINKAGE STATUS — identifiers are present while status is UNKNOWN&quot;;IF([.M187]=&quot;UNMATCHED&quot;;&quot;REMOVE LINKAGE IDENTIFIERS OR CORRECT LINKAGE STATUS&quot;;IF([.M187]=&quot;SINGLE_SALE_LINKED&quot;;&quot;REQUIRE LINKED SALE ID AND NO ALLOCATION GROUP ID&quot;;IF([.M187]=&quot;MULTI_SALE_PENDING_ALLOCATION&quot;;&quot;REMOVE LINKED SALE ID OR CORRECT LINKAGE STATUS&quot;;IF([.M18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cell office:value-type="string" table:formula="of:=IF([.S188]=&quot;UNKNOWN&quot;;&quot;NO ACTION — linkage status is UNKNOWN / not asserted&quot;;IF([.S188]=&quot;CLEAR&quot;;&quot;NO CONTRADICTION — preserve evidence as entered&quot;;IF([.M188]=&quot;&quot;;&quot;REVIEW LINKAGE STATUS — identifiers are present while status is UNKNOWN&quot;;IF([.M188]=&quot;UNMATCHED&quot;;&quot;REMOVE LINKAGE IDENTIFIERS OR CORRECT LINKAGE STATUS&quot;;IF([.M188]=&quot;SINGLE_SALE_LINKED&quot;;&quot;REQUIRE LINKED SALE ID AND NO ALLOCATION GROUP ID&quot;;IF([.M188]=&quot;MULTI_SALE_PENDING_ALLOCATION&quot;;&quot;REMOVE LINKED SALE ID OR CORRECT LINKAGE STATUS&quot;;IF([.M18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cell office:value-type="string" table:formula="of:=IF([.S189]=&quot;UNKNOWN&quot;;&quot;NO ACTION — linkage status is UNKNOWN / not asserted&quot;;IF([.S189]=&quot;CLEAR&quot;;&quot;NO CONTRADICTION — preserve evidence as entered&quot;;IF([.M189]=&quot;&quot;;&quot;REVIEW LINKAGE STATUS — identifiers are present while status is UNKNOWN&quot;;IF([.M189]=&quot;UNMATCHED&quot;;&quot;REMOVE LINKAGE IDENTIFIERS OR CORRECT LINKAGE STATUS&quot;;IF([.M189]=&quot;SINGLE_SALE_LINKED&quot;;&quot;REQUIRE LINKED SALE ID AND NO ALLOCATION GROUP ID&quot;;IF([.M189]=&quot;MULTI_SALE_PENDING_ALLOCATION&quot;;&quot;REMOVE LINKED SALE ID OR CORRECT LINKAGE STATUS&quot;;IF([.M18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cell office:value-type="string" table:formula="of:=IF([.S190]=&quot;UNKNOWN&quot;;&quot;NO ACTION — linkage status is UNKNOWN / not asserted&quot;;IF([.S190]=&quot;CLEAR&quot;;&quot;NO CONTRADICTION — preserve evidence as entered&quot;;IF([.M190]=&quot;&quot;;&quot;REVIEW LINKAGE STATUS — identifiers are present while status is UNKNOWN&quot;;IF([.M190]=&quot;UNMATCHED&quot;;&quot;REMOVE LINKAGE IDENTIFIERS OR CORRECT LINKAGE STATUS&quot;;IF([.M190]=&quot;SINGLE_SALE_LINKED&quot;;&quot;REQUIRE LINKED SALE ID AND NO ALLOCATION GROUP ID&quot;;IF([.M190]=&quot;MULTI_SALE_PENDING_ALLOCATION&quot;;&quot;REMOVE LINKED SALE ID OR CORRECT LINKAGE STATUS&quot;;IF([.M19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cell office:value-type="string" table:formula="of:=IF([.S191]=&quot;UNKNOWN&quot;;&quot;NO ACTION — linkage status is UNKNOWN / not asserted&quot;;IF([.S191]=&quot;CLEAR&quot;;&quot;NO CONTRADICTION — preserve evidence as entered&quot;;IF([.M191]=&quot;&quot;;&quot;REVIEW LINKAGE STATUS — identifiers are present while status is UNKNOWN&quot;;IF([.M191]=&quot;UNMATCHED&quot;;&quot;REMOVE LINKAGE IDENTIFIERS OR CORRECT LINKAGE STATUS&quot;;IF([.M191]=&quot;SINGLE_SALE_LINKED&quot;;&quot;REQUIRE LINKED SALE ID AND NO ALLOCATION GROUP ID&quot;;IF([.M191]=&quot;MULTI_SALE_PENDING_ALLOCATION&quot;;&quot;REMOVE LINKED SALE ID OR CORRECT LINKAGE STATUS&quot;;IF([.M19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cell office:value-type="string" table:formula="of:=IF([.S192]=&quot;UNKNOWN&quot;;&quot;NO ACTION — linkage status is UNKNOWN / not asserted&quot;;IF([.S192]=&quot;CLEAR&quot;;&quot;NO CONTRADICTION — preserve evidence as entered&quot;;IF([.M192]=&quot;&quot;;&quot;REVIEW LINKAGE STATUS — identifiers are present while status is UNKNOWN&quot;;IF([.M192]=&quot;UNMATCHED&quot;;&quot;REMOVE LINKAGE IDENTIFIERS OR CORRECT LINKAGE STATUS&quot;;IF([.M192]=&quot;SINGLE_SALE_LINKED&quot;;&quot;REQUIRE LINKED SALE ID AND NO ALLOCATION GROUP ID&quot;;IF([.M192]=&quot;MULTI_SALE_PENDING_ALLOCATION&quot;;&quot;REMOVE LINKED SALE ID OR CORRECT LINKAGE STATUS&quot;;IF([.M19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cell office:value-type="string" table:formula="of:=IF([.S193]=&quot;UNKNOWN&quot;;&quot;NO ACTION — linkage status is UNKNOWN / not asserted&quot;;IF([.S193]=&quot;CLEAR&quot;;&quot;NO CONTRADICTION — preserve evidence as entered&quot;;IF([.M193]=&quot;&quot;;&quot;REVIEW LINKAGE STATUS — identifiers are present while status is UNKNOWN&quot;;IF([.M193]=&quot;UNMATCHED&quot;;&quot;REMOVE LINKAGE IDENTIFIERS OR CORRECT LINKAGE STATUS&quot;;IF([.M193]=&quot;SINGLE_SALE_LINKED&quot;;&quot;REQUIRE LINKED SALE ID AND NO ALLOCATION GROUP ID&quot;;IF([.M193]=&quot;MULTI_SALE_PENDING_ALLOCATION&quot;;&quot;REMOVE LINKED SALE ID OR CORRECT LINKAGE STATUS&quot;;IF([.M19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cell office:value-type="string" table:formula="of:=IF([.S194]=&quot;UNKNOWN&quot;;&quot;NO ACTION — linkage status is UNKNOWN / not asserted&quot;;IF([.S194]=&quot;CLEAR&quot;;&quot;NO CONTRADICTION — preserve evidence as entered&quot;;IF([.M194]=&quot;&quot;;&quot;REVIEW LINKAGE STATUS — identifiers are present while status is UNKNOWN&quot;;IF([.M194]=&quot;UNMATCHED&quot;;&quot;REMOVE LINKAGE IDENTIFIERS OR CORRECT LINKAGE STATUS&quot;;IF([.M194]=&quot;SINGLE_SALE_LINKED&quot;;&quot;REQUIRE LINKED SALE ID AND NO ALLOCATION GROUP ID&quot;;IF([.M194]=&quot;MULTI_SALE_PENDING_ALLOCATION&quot;;&quot;REMOVE LINKED SALE ID OR CORRECT LINKAGE STATUS&quot;;IF([.M19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cell office:value-type="string" table:formula="of:=IF([.S195]=&quot;UNKNOWN&quot;;&quot;NO ACTION — linkage status is UNKNOWN / not asserted&quot;;IF([.S195]=&quot;CLEAR&quot;;&quot;NO CONTRADICTION — preserve evidence as entered&quot;;IF([.M195]=&quot;&quot;;&quot;REVIEW LINKAGE STATUS — identifiers are present while status is UNKNOWN&quot;;IF([.M195]=&quot;UNMATCHED&quot;;&quot;REMOVE LINKAGE IDENTIFIERS OR CORRECT LINKAGE STATUS&quot;;IF([.M195]=&quot;SINGLE_SALE_LINKED&quot;;&quot;REQUIRE LINKED SALE ID AND NO ALLOCATION GROUP ID&quot;;IF([.M195]=&quot;MULTI_SALE_PENDING_ALLOCATION&quot;;&quot;REMOVE LINKED SALE ID OR CORRECT LINKAGE STATUS&quot;;IF([.M19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cell office:value-type="string" table:formula="of:=IF([.S196]=&quot;UNKNOWN&quot;;&quot;NO ACTION — linkage status is UNKNOWN / not asserted&quot;;IF([.S196]=&quot;CLEAR&quot;;&quot;NO CONTRADICTION — preserve evidence as entered&quot;;IF([.M196]=&quot;&quot;;&quot;REVIEW LINKAGE STATUS — identifiers are present while status is UNKNOWN&quot;;IF([.M196]=&quot;UNMATCHED&quot;;&quot;REMOVE LINKAGE IDENTIFIERS OR CORRECT LINKAGE STATUS&quot;;IF([.M196]=&quot;SINGLE_SALE_LINKED&quot;;&quot;REQUIRE LINKED SALE ID AND NO ALLOCATION GROUP ID&quot;;IF([.M196]=&quot;MULTI_SALE_PENDING_ALLOCATION&quot;;&quot;REMOVE LINKED SALE ID OR CORRECT LINKAGE STATUS&quot;;IF([.M19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cell office:value-type="string" table:formula="of:=IF([.S197]=&quot;UNKNOWN&quot;;&quot;NO ACTION — linkage status is UNKNOWN / not asserted&quot;;IF([.S197]=&quot;CLEAR&quot;;&quot;NO CONTRADICTION — preserve evidence as entered&quot;;IF([.M197]=&quot;&quot;;&quot;REVIEW LINKAGE STATUS — identifiers are present while status is UNKNOWN&quot;;IF([.M197]=&quot;UNMATCHED&quot;;&quot;REMOVE LINKAGE IDENTIFIERS OR CORRECT LINKAGE STATUS&quot;;IF([.M197]=&quot;SINGLE_SALE_LINKED&quot;;&quot;REQUIRE LINKED SALE ID AND NO ALLOCATION GROUP ID&quot;;IF([.M197]=&quot;MULTI_SALE_PENDING_ALLOCATION&quot;;&quot;REMOVE LINKED SALE ID OR CORRECT LINKAGE STATUS&quot;;IF([.M19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cell office:value-type="string" table:formula="of:=IF([.S198]=&quot;UNKNOWN&quot;;&quot;NO ACTION — linkage status is UNKNOWN / not asserted&quot;;IF([.S198]=&quot;CLEAR&quot;;&quot;NO CONTRADICTION — preserve evidence as entered&quot;;IF([.M198]=&quot;&quot;;&quot;REVIEW LINKAGE STATUS — identifiers are present while status is UNKNOWN&quot;;IF([.M198]=&quot;UNMATCHED&quot;;&quot;REMOVE LINKAGE IDENTIFIERS OR CORRECT LINKAGE STATUS&quot;;IF([.M198]=&quot;SINGLE_SALE_LINKED&quot;;&quot;REQUIRE LINKED SALE ID AND NO ALLOCATION GROUP ID&quot;;IF([.M198]=&quot;MULTI_SALE_PENDING_ALLOCATION&quot;;&quot;REMOVE LINKED SALE ID OR CORRECT LINKAGE STATUS&quot;;IF([.M19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cell office:value-type="string" table:formula="of:=IF([.S199]=&quot;UNKNOWN&quot;;&quot;NO ACTION — linkage status is UNKNOWN / not asserted&quot;;IF([.S199]=&quot;CLEAR&quot;;&quot;NO CONTRADICTION — preserve evidence as entered&quot;;IF([.M199]=&quot;&quot;;&quot;REVIEW LINKAGE STATUS — identifiers are present while status is UNKNOWN&quot;;IF([.M199]=&quot;UNMATCHED&quot;;&quot;REMOVE LINKAGE IDENTIFIERS OR CORRECT LINKAGE STATUS&quot;;IF([.M199]=&quot;SINGLE_SALE_LINKED&quot;;&quot;REQUIRE LINKED SALE ID AND NO ALLOCATION GROUP ID&quot;;IF([.M199]=&quot;MULTI_SALE_PENDING_ALLOCATION&quot;;&quot;REMOVE LINKED SALE ID OR CORRECT LINKAGE STATUS&quot;;IF([.M19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cell office:value-type="string" table:formula="of:=IF([.S200]=&quot;UNKNOWN&quot;;&quot;NO ACTION — linkage status is UNKNOWN / not asserted&quot;;IF([.S200]=&quot;CLEAR&quot;;&quot;NO CONTRADICTION — preserve evidence as entered&quot;;IF([.M200]=&quot;&quot;;&quot;REVIEW LINKAGE STATUS — identifiers are present while status is UNKNOWN&quot;;IF([.M200]=&quot;UNMATCHED&quot;;&quot;REMOVE LINKAGE IDENTIFIERS OR CORRECT LINKAGE STATUS&quot;;IF([.M200]=&quot;SINGLE_SALE_LINKED&quot;;&quot;REQUIRE LINKED SALE ID AND NO ALLOCATION GROUP ID&quot;;IF([.M200]=&quot;MULTI_SALE_PENDING_ALLOCATION&quot;;&quot;REMOVE LINKED SALE ID OR CORRECT LINKAGE STATUS&quot;;IF([.M20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cell office:value-type="string" table:formula="of:=IF([.S201]=&quot;UNKNOWN&quot;;&quot;NO ACTION — linkage status is UNKNOWN / not asserted&quot;;IF([.S201]=&quot;CLEAR&quot;;&quot;NO CONTRADICTION — preserve evidence as entered&quot;;IF([.M201]=&quot;&quot;;&quot;REVIEW LINKAGE STATUS — identifiers are present while status is UNKNOWN&quot;;IF([.M201]=&quot;UNMATCHED&quot;;&quot;REMOVE LINKAGE IDENTIFIERS OR CORRECT LINKAGE STATUS&quot;;IF([.M201]=&quot;SINGLE_SALE_LINKED&quot;;&quot;REQUIRE LINKED SALE ID AND NO ALLOCATION GROUP ID&quot;;IF([.M201]=&quot;MULTI_SALE_PENDING_ALLOCATION&quot;;&quot;REMOVE LINKED SALE ID OR CORRECT LINKAGE STATUS&quot;;IF([.M20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cell office:value-type="string" table:formula="of:=IF([.S202]=&quot;UNKNOWN&quot;;&quot;NO ACTION — linkage status is UNKNOWN / not asserted&quot;;IF([.S202]=&quot;CLEAR&quot;;&quot;NO CONTRADICTION — preserve evidence as entered&quot;;IF([.M202]=&quot;&quot;;&quot;REVIEW LINKAGE STATUS — identifiers are present while status is UNKNOWN&quot;;IF([.M202]=&quot;UNMATCHED&quot;;&quot;REMOVE LINKAGE IDENTIFIERS OR CORRECT LINKAGE STATUS&quot;;IF([.M202]=&quot;SINGLE_SALE_LINKED&quot;;&quot;REQUIRE LINKED SALE ID AND NO ALLOCATION GROUP ID&quot;;IF([.M202]=&quot;MULTI_SALE_PENDING_ALLOCATION&quot;;&quot;REMOVE LINKED SALE ID OR CORRECT LINKAGE STATUS&quot;;IF([.M20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cell office:value-type="string" table:formula="of:=IF([.S203]=&quot;UNKNOWN&quot;;&quot;NO ACTION — linkage status is UNKNOWN / not asserted&quot;;IF([.S203]=&quot;CLEAR&quot;;&quot;NO CONTRADICTION — preserve evidence as entered&quot;;IF([.M203]=&quot;&quot;;&quot;REVIEW LINKAGE STATUS — identifiers are present while status is UNKNOWN&quot;;IF([.M203]=&quot;UNMATCHED&quot;;&quot;REMOVE LINKAGE IDENTIFIERS OR CORRECT LINKAGE STATUS&quot;;IF([.M203]=&quot;SINGLE_SALE_LINKED&quot;;&quot;REQUIRE LINKED SALE ID AND NO ALLOCATION GROUP ID&quot;;IF([.M203]=&quot;MULTI_SALE_PENDING_ALLOCATION&quot;;&quot;REMOVE LINKED SALE ID OR CORRECT LINKAGE STATUS&quot;;IF([.M20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cell office:value-type="string" table:formula="of:=IF([.S204]=&quot;UNKNOWN&quot;;&quot;NO ACTION — linkage status is UNKNOWN / not asserted&quot;;IF([.S204]=&quot;CLEAR&quot;;&quot;NO CONTRADICTION — preserve evidence as entered&quot;;IF([.M204]=&quot;&quot;;&quot;REVIEW LINKAGE STATUS — identifiers are present while status is UNKNOWN&quot;;IF([.M204]=&quot;UNMATCHED&quot;;&quot;REMOVE LINKAGE IDENTIFIERS OR CORRECT LINKAGE STATUS&quot;;IF([.M204]=&quot;SINGLE_SALE_LINKED&quot;;&quot;REQUIRE LINKED SALE ID AND NO ALLOCATION GROUP ID&quot;;IF([.M204]=&quot;MULTI_SALE_PENDING_ALLOCATION&quot;;&quot;REMOVE LINKED SALE ID OR CORRECT LINKAGE STATUS&quot;;IF([.M20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cell office:value-type="string" table:formula="of:=IF([.S205]=&quot;UNKNOWN&quot;;&quot;NO ACTION — linkage status is UNKNOWN / not asserted&quot;;IF([.S205]=&quot;CLEAR&quot;;&quot;NO CONTRADICTION — preserve evidence as entered&quot;;IF([.M205]=&quot;&quot;;&quot;REVIEW LINKAGE STATUS — identifiers are present while status is UNKNOWN&quot;;IF([.M205]=&quot;UNMATCHED&quot;;&quot;REMOVE LINKAGE IDENTIFIERS OR CORRECT LINKAGE STATUS&quot;;IF([.M205]=&quot;SINGLE_SALE_LINKED&quot;;&quot;REQUIRE LINKED SALE ID AND NO ALLOCATION GROUP ID&quot;;IF([.M205]=&quot;MULTI_SALE_PENDING_ALLOCATION&quot;;&quot;REMOVE LINKED SALE ID OR CORRECT LINKAGE STATUS&quot;;IF([.M20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cell office:value-type="string" table:formula="of:=IF([.S206]=&quot;UNKNOWN&quot;;&quot;NO ACTION — linkage status is UNKNOWN / not asserted&quot;;IF([.S206]=&quot;CLEAR&quot;;&quot;NO CONTRADICTION — preserve evidence as entered&quot;;IF([.M206]=&quot;&quot;;&quot;REVIEW LINKAGE STATUS — identifiers are present while status is UNKNOWN&quot;;IF([.M206]=&quot;UNMATCHED&quot;;&quot;REMOVE LINKAGE IDENTIFIERS OR CORRECT LINKAGE STATUS&quot;;IF([.M206]=&quot;SINGLE_SALE_LINKED&quot;;&quot;REQUIRE LINKED SALE ID AND NO ALLOCATION GROUP ID&quot;;IF([.M206]=&quot;MULTI_SALE_PENDING_ALLOCATION&quot;;&quot;REMOVE LINKED SALE ID OR CORRECT LINKAGE STATUS&quot;;IF([.M20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cell office:value-type="string" table:formula="of:=IF([.S207]=&quot;UNKNOWN&quot;;&quot;NO ACTION — linkage status is UNKNOWN / not asserted&quot;;IF([.S207]=&quot;CLEAR&quot;;&quot;NO CONTRADICTION — preserve evidence as entered&quot;;IF([.M207]=&quot;&quot;;&quot;REVIEW LINKAGE STATUS — identifiers are present while status is UNKNOWN&quot;;IF([.M207]=&quot;UNMATCHED&quot;;&quot;REMOVE LINKAGE IDENTIFIERS OR CORRECT LINKAGE STATUS&quot;;IF([.M207]=&quot;SINGLE_SALE_LINKED&quot;;&quot;REQUIRE LINKED SALE ID AND NO ALLOCATION GROUP ID&quot;;IF([.M207]=&quot;MULTI_SALE_PENDING_ALLOCATION&quot;;&quot;REMOVE LINKED SALE ID OR CORRECT LINKAGE STATUS&quot;;IF([.M20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cell office:value-type="string" table:formula="of:=IF([.S208]=&quot;UNKNOWN&quot;;&quot;NO ACTION — linkage status is UNKNOWN / not asserted&quot;;IF([.S208]=&quot;CLEAR&quot;;&quot;NO CONTRADICTION — preserve evidence as entered&quot;;IF([.M208]=&quot;&quot;;&quot;REVIEW LINKAGE STATUS — identifiers are present while status is UNKNOWN&quot;;IF([.M208]=&quot;UNMATCHED&quot;;&quot;REMOVE LINKAGE IDENTIFIERS OR CORRECT LINKAGE STATUS&quot;;IF([.M208]=&quot;SINGLE_SALE_LINKED&quot;;&quot;REQUIRE LINKED SALE ID AND NO ALLOCATION GROUP ID&quot;;IF([.M208]=&quot;MULTI_SALE_PENDING_ALLOCATION&quot;;&quot;REMOVE LINKED SALE ID OR CORRECT LINKAGE STATUS&quot;;IF([.M20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cell office:value-type="string" table:formula="of:=IF([.S209]=&quot;UNKNOWN&quot;;&quot;NO ACTION — linkage status is UNKNOWN / not asserted&quot;;IF([.S209]=&quot;CLEAR&quot;;&quot;NO CONTRADICTION — preserve evidence as entered&quot;;IF([.M209]=&quot;&quot;;&quot;REVIEW LINKAGE STATUS — identifiers are present while status is UNKNOWN&quot;;IF([.M209]=&quot;UNMATCHED&quot;;&quot;REMOVE LINKAGE IDENTIFIERS OR CORRECT LINKAGE STATUS&quot;;IF([.M209]=&quot;SINGLE_SALE_LINKED&quot;;&quot;REQUIRE LINKED SALE ID AND NO ALLOCATION GROUP ID&quot;;IF([.M209]=&quot;MULTI_SALE_PENDING_ALLOCATION&quot;;&quot;REMOVE LINKED SALE ID OR CORRECT LINKAGE STATUS&quot;;IF([.M20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cell office:value-type="string" table:formula="of:=IF([.S210]=&quot;UNKNOWN&quot;;&quot;NO ACTION — linkage status is UNKNOWN / not asserted&quot;;IF([.S210]=&quot;CLEAR&quot;;&quot;NO CONTRADICTION — preserve evidence as entered&quot;;IF([.M210]=&quot;&quot;;&quot;REVIEW LINKAGE STATUS — identifiers are present while status is UNKNOWN&quot;;IF([.M210]=&quot;UNMATCHED&quot;;&quot;REMOVE LINKAGE IDENTIFIERS OR CORRECT LINKAGE STATUS&quot;;IF([.M210]=&quot;SINGLE_SALE_LINKED&quot;;&quot;REQUIRE LINKED SALE ID AND NO ALLOCATION GROUP ID&quot;;IF([.M210]=&quot;MULTI_SALE_PENDING_ALLOCATION&quot;;&quot;REMOVE LINKED SALE ID OR CORRECT LINKAGE STATUS&quot;;IF([.M21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cell office:value-type="string" table:formula="of:=IF([.S211]=&quot;UNKNOWN&quot;;&quot;NO ACTION — linkage status is UNKNOWN / not asserted&quot;;IF([.S211]=&quot;CLEAR&quot;;&quot;NO CONTRADICTION — preserve evidence as entered&quot;;IF([.M211]=&quot;&quot;;&quot;REVIEW LINKAGE STATUS — identifiers are present while status is UNKNOWN&quot;;IF([.M211]=&quot;UNMATCHED&quot;;&quot;REMOVE LINKAGE IDENTIFIERS OR CORRECT LINKAGE STATUS&quot;;IF([.M211]=&quot;SINGLE_SALE_LINKED&quot;;&quot;REQUIRE LINKED SALE ID AND NO ALLOCATION GROUP ID&quot;;IF([.M211]=&quot;MULTI_SALE_PENDING_ALLOCATION&quot;;&quot;REMOVE LINKED SALE ID OR CORRECT LINKAGE STATUS&quot;;IF([.M21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cell office:value-type="string" table:formula="of:=IF([.S212]=&quot;UNKNOWN&quot;;&quot;NO ACTION — linkage status is UNKNOWN / not asserted&quot;;IF([.S212]=&quot;CLEAR&quot;;&quot;NO CONTRADICTION — preserve evidence as entered&quot;;IF([.M212]=&quot;&quot;;&quot;REVIEW LINKAGE STATUS — identifiers are present while status is UNKNOWN&quot;;IF([.M212]=&quot;UNMATCHED&quot;;&quot;REMOVE LINKAGE IDENTIFIERS OR CORRECT LINKAGE STATUS&quot;;IF([.M212]=&quot;SINGLE_SALE_LINKED&quot;;&quot;REQUIRE LINKED SALE ID AND NO ALLOCATION GROUP ID&quot;;IF([.M212]=&quot;MULTI_SALE_PENDING_ALLOCATION&quot;;&quot;REMOVE LINKED SALE ID OR CORRECT LINKAGE STATUS&quot;;IF([.M21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cell office:value-type="string" table:formula="of:=IF([.S213]=&quot;UNKNOWN&quot;;&quot;NO ACTION — linkage status is UNKNOWN / not asserted&quot;;IF([.S213]=&quot;CLEAR&quot;;&quot;NO CONTRADICTION — preserve evidence as entered&quot;;IF([.M213]=&quot;&quot;;&quot;REVIEW LINKAGE STATUS — identifiers are present while status is UNKNOWN&quot;;IF([.M213]=&quot;UNMATCHED&quot;;&quot;REMOVE LINKAGE IDENTIFIERS OR CORRECT LINKAGE STATUS&quot;;IF([.M213]=&quot;SINGLE_SALE_LINKED&quot;;&quot;REQUIRE LINKED SALE ID AND NO ALLOCATION GROUP ID&quot;;IF([.M213]=&quot;MULTI_SALE_PENDING_ALLOCATION&quot;;&quot;REMOVE LINKED SALE ID OR CORRECT LINKAGE STATUS&quot;;IF([.M21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cell office:value-type="string" table:formula="of:=IF([.S214]=&quot;UNKNOWN&quot;;&quot;NO ACTION — linkage status is UNKNOWN / not asserted&quot;;IF([.S214]=&quot;CLEAR&quot;;&quot;NO CONTRADICTION — preserve evidence as entered&quot;;IF([.M214]=&quot;&quot;;&quot;REVIEW LINKAGE STATUS — identifiers are present while status is UNKNOWN&quot;;IF([.M214]=&quot;UNMATCHED&quot;;&quot;REMOVE LINKAGE IDENTIFIERS OR CORRECT LINKAGE STATUS&quot;;IF([.M214]=&quot;SINGLE_SALE_LINKED&quot;;&quot;REQUIRE LINKED SALE ID AND NO ALLOCATION GROUP ID&quot;;IF([.M214]=&quot;MULTI_SALE_PENDING_ALLOCATION&quot;;&quot;REMOVE LINKED SALE ID OR CORRECT LINKAGE STATUS&quot;;IF([.M21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cell office:value-type="string" table:formula="of:=IF([.S215]=&quot;UNKNOWN&quot;;&quot;NO ACTION — linkage status is UNKNOWN / not asserted&quot;;IF([.S215]=&quot;CLEAR&quot;;&quot;NO CONTRADICTION — preserve evidence as entered&quot;;IF([.M215]=&quot;&quot;;&quot;REVIEW LINKAGE STATUS — identifiers are present while status is UNKNOWN&quot;;IF([.M215]=&quot;UNMATCHED&quot;;&quot;REMOVE LINKAGE IDENTIFIERS OR CORRECT LINKAGE STATUS&quot;;IF([.M215]=&quot;SINGLE_SALE_LINKED&quot;;&quot;REQUIRE LINKED SALE ID AND NO ALLOCATION GROUP ID&quot;;IF([.M215]=&quot;MULTI_SALE_PENDING_ALLOCATION&quot;;&quot;REMOVE LINKED SALE ID OR CORRECT LINKAGE STATUS&quot;;IF([.M21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cell office:value-type="string" table:formula="of:=IF([.S216]=&quot;UNKNOWN&quot;;&quot;NO ACTION — linkage status is UNKNOWN / not asserted&quot;;IF([.S216]=&quot;CLEAR&quot;;&quot;NO CONTRADICTION — preserve evidence as entered&quot;;IF([.M216]=&quot;&quot;;&quot;REVIEW LINKAGE STATUS — identifiers are present while status is UNKNOWN&quot;;IF([.M216]=&quot;UNMATCHED&quot;;&quot;REMOVE LINKAGE IDENTIFIERS OR CORRECT LINKAGE STATUS&quot;;IF([.M216]=&quot;SINGLE_SALE_LINKED&quot;;&quot;REQUIRE LINKED SALE ID AND NO ALLOCATION GROUP ID&quot;;IF([.M216]=&quot;MULTI_SALE_PENDING_ALLOCATION&quot;;&quot;REMOVE LINKED SALE ID OR CORRECT LINKAGE STATUS&quot;;IF([.M21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cell office:value-type="string" table:formula="of:=IF([.S217]=&quot;UNKNOWN&quot;;&quot;NO ACTION — linkage status is UNKNOWN / not asserted&quot;;IF([.S217]=&quot;CLEAR&quot;;&quot;NO CONTRADICTION — preserve evidence as entered&quot;;IF([.M217]=&quot;&quot;;&quot;REVIEW LINKAGE STATUS — identifiers are present while status is UNKNOWN&quot;;IF([.M217]=&quot;UNMATCHED&quot;;&quot;REMOVE LINKAGE IDENTIFIERS OR CORRECT LINKAGE STATUS&quot;;IF([.M217]=&quot;SINGLE_SALE_LINKED&quot;;&quot;REQUIRE LINKED SALE ID AND NO ALLOCATION GROUP ID&quot;;IF([.M217]=&quot;MULTI_SALE_PENDING_ALLOCATION&quot;;&quot;REMOVE LINKED SALE ID OR CORRECT LINKAGE STATUS&quot;;IF([.M21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cell office:value-type="string" table:formula="of:=IF([.S218]=&quot;UNKNOWN&quot;;&quot;NO ACTION — linkage status is UNKNOWN / not asserted&quot;;IF([.S218]=&quot;CLEAR&quot;;&quot;NO CONTRADICTION — preserve evidence as entered&quot;;IF([.M218]=&quot;&quot;;&quot;REVIEW LINKAGE STATUS — identifiers are present while status is UNKNOWN&quot;;IF([.M218]=&quot;UNMATCHED&quot;;&quot;REMOVE LINKAGE IDENTIFIERS OR CORRECT LINKAGE STATUS&quot;;IF([.M218]=&quot;SINGLE_SALE_LINKED&quot;;&quot;REQUIRE LINKED SALE ID AND NO ALLOCATION GROUP ID&quot;;IF([.M218]=&quot;MULTI_SALE_PENDING_ALLOCATION&quot;;&quot;REMOVE LINKED SALE ID OR CORRECT LINKAGE STATUS&quot;;IF([.M21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cell office:value-type="string" table:formula="of:=IF([.S219]=&quot;UNKNOWN&quot;;&quot;NO ACTION — linkage status is UNKNOWN / not asserted&quot;;IF([.S219]=&quot;CLEAR&quot;;&quot;NO CONTRADICTION — preserve evidence as entered&quot;;IF([.M219]=&quot;&quot;;&quot;REVIEW LINKAGE STATUS — identifiers are present while status is UNKNOWN&quot;;IF([.M219]=&quot;UNMATCHED&quot;;&quot;REMOVE LINKAGE IDENTIFIERS OR CORRECT LINKAGE STATUS&quot;;IF([.M219]=&quot;SINGLE_SALE_LINKED&quot;;&quot;REQUIRE LINKED SALE ID AND NO ALLOCATION GROUP ID&quot;;IF([.M219]=&quot;MULTI_SALE_PENDING_ALLOCATION&quot;;&quot;REMOVE LINKED SALE ID OR CORRECT LINKAGE STATUS&quot;;IF([.M21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cell office:value-type="string" table:formula="of:=IF([.S220]=&quot;UNKNOWN&quot;;&quot;NO ACTION — linkage status is UNKNOWN / not asserted&quot;;IF([.S220]=&quot;CLEAR&quot;;&quot;NO CONTRADICTION — preserve evidence as entered&quot;;IF([.M220]=&quot;&quot;;&quot;REVIEW LINKAGE STATUS — identifiers are present while status is UNKNOWN&quot;;IF([.M220]=&quot;UNMATCHED&quot;;&quot;REMOVE LINKAGE IDENTIFIERS OR CORRECT LINKAGE STATUS&quot;;IF([.M220]=&quot;SINGLE_SALE_LINKED&quot;;&quot;REQUIRE LINKED SALE ID AND NO ALLOCATION GROUP ID&quot;;IF([.M220]=&quot;MULTI_SALE_PENDING_ALLOCATION&quot;;&quot;REMOVE LINKED SALE ID OR CORRECT LINKAGE STATUS&quot;;IF([.M22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cell office:value-type="string" table:formula="of:=IF([.S221]=&quot;UNKNOWN&quot;;&quot;NO ACTION — linkage status is UNKNOWN / not asserted&quot;;IF([.S221]=&quot;CLEAR&quot;;&quot;NO CONTRADICTION — preserve evidence as entered&quot;;IF([.M221]=&quot;&quot;;&quot;REVIEW LINKAGE STATUS — identifiers are present while status is UNKNOWN&quot;;IF([.M221]=&quot;UNMATCHED&quot;;&quot;REMOVE LINKAGE IDENTIFIERS OR CORRECT LINKAGE STATUS&quot;;IF([.M221]=&quot;SINGLE_SALE_LINKED&quot;;&quot;REQUIRE LINKED SALE ID AND NO ALLOCATION GROUP ID&quot;;IF([.M221]=&quot;MULTI_SALE_PENDING_ALLOCATION&quot;;&quot;REMOVE LINKED SALE ID OR CORRECT LINKAGE STATUS&quot;;IF([.M22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cell office:value-type="string" table:formula="of:=IF([.S222]=&quot;UNKNOWN&quot;;&quot;NO ACTION — linkage status is UNKNOWN / not asserted&quot;;IF([.S222]=&quot;CLEAR&quot;;&quot;NO CONTRADICTION — preserve evidence as entered&quot;;IF([.M222]=&quot;&quot;;&quot;REVIEW LINKAGE STATUS — identifiers are present while status is UNKNOWN&quot;;IF([.M222]=&quot;UNMATCHED&quot;;&quot;REMOVE LINKAGE IDENTIFIERS OR CORRECT LINKAGE STATUS&quot;;IF([.M222]=&quot;SINGLE_SALE_LINKED&quot;;&quot;REQUIRE LINKED SALE ID AND NO ALLOCATION GROUP ID&quot;;IF([.M222]=&quot;MULTI_SALE_PENDING_ALLOCATION&quot;;&quot;REMOVE LINKED SALE ID OR CORRECT LINKAGE STATUS&quot;;IF([.M22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cell office:value-type="string" table:formula="of:=IF([.S223]=&quot;UNKNOWN&quot;;&quot;NO ACTION — linkage status is UNKNOWN / not asserted&quot;;IF([.S223]=&quot;CLEAR&quot;;&quot;NO CONTRADICTION — preserve evidence as entered&quot;;IF([.M223]=&quot;&quot;;&quot;REVIEW LINKAGE STATUS — identifiers are present while status is UNKNOWN&quot;;IF([.M223]=&quot;UNMATCHED&quot;;&quot;REMOVE LINKAGE IDENTIFIERS OR CORRECT LINKAGE STATUS&quot;;IF([.M223]=&quot;SINGLE_SALE_LINKED&quot;;&quot;REQUIRE LINKED SALE ID AND NO ALLOCATION GROUP ID&quot;;IF([.M223]=&quot;MULTI_SALE_PENDING_ALLOCATION&quot;;&quot;REMOVE LINKED SALE ID OR CORRECT LINKAGE STATUS&quot;;IF([.M22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cell office:value-type="string" table:formula="of:=IF([.S224]=&quot;UNKNOWN&quot;;&quot;NO ACTION — linkage status is UNKNOWN / not asserted&quot;;IF([.S224]=&quot;CLEAR&quot;;&quot;NO CONTRADICTION — preserve evidence as entered&quot;;IF([.M224]=&quot;&quot;;&quot;REVIEW LINKAGE STATUS — identifiers are present while status is UNKNOWN&quot;;IF([.M224]=&quot;UNMATCHED&quot;;&quot;REMOVE LINKAGE IDENTIFIERS OR CORRECT LINKAGE STATUS&quot;;IF([.M224]=&quot;SINGLE_SALE_LINKED&quot;;&quot;REQUIRE LINKED SALE ID AND NO ALLOCATION GROUP ID&quot;;IF([.M224]=&quot;MULTI_SALE_PENDING_ALLOCATION&quot;;&quot;REMOVE LINKED SALE ID OR CORRECT LINKAGE STATUS&quot;;IF([.M22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cell office:value-type="string" table:formula="of:=IF([.S225]=&quot;UNKNOWN&quot;;&quot;NO ACTION — linkage status is UNKNOWN / not asserted&quot;;IF([.S225]=&quot;CLEAR&quot;;&quot;NO CONTRADICTION — preserve evidence as entered&quot;;IF([.M225]=&quot;&quot;;&quot;REVIEW LINKAGE STATUS — identifiers are present while status is UNKNOWN&quot;;IF([.M225]=&quot;UNMATCHED&quot;;&quot;REMOVE LINKAGE IDENTIFIERS OR CORRECT LINKAGE STATUS&quot;;IF([.M225]=&quot;SINGLE_SALE_LINKED&quot;;&quot;REQUIRE LINKED SALE ID AND NO ALLOCATION GROUP ID&quot;;IF([.M225]=&quot;MULTI_SALE_PENDING_ALLOCATION&quot;;&quot;REMOVE LINKED SALE ID OR CORRECT LINKAGE STATUS&quot;;IF([.M22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cell office:value-type="string" table:formula="of:=IF([.S226]=&quot;UNKNOWN&quot;;&quot;NO ACTION — linkage status is UNKNOWN / not asserted&quot;;IF([.S226]=&quot;CLEAR&quot;;&quot;NO CONTRADICTION — preserve evidence as entered&quot;;IF([.M226]=&quot;&quot;;&quot;REVIEW LINKAGE STATUS — identifiers are present while status is UNKNOWN&quot;;IF([.M226]=&quot;UNMATCHED&quot;;&quot;REMOVE LINKAGE IDENTIFIERS OR CORRECT LINKAGE STATUS&quot;;IF([.M226]=&quot;SINGLE_SALE_LINKED&quot;;&quot;REQUIRE LINKED SALE ID AND NO ALLOCATION GROUP ID&quot;;IF([.M226]=&quot;MULTI_SALE_PENDING_ALLOCATION&quot;;&quot;REMOVE LINKED SALE ID OR CORRECT LINKAGE STATUS&quot;;IF([.M22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cell office:value-type="string" table:formula="of:=IF([.S227]=&quot;UNKNOWN&quot;;&quot;NO ACTION — linkage status is UNKNOWN / not asserted&quot;;IF([.S227]=&quot;CLEAR&quot;;&quot;NO CONTRADICTION — preserve evidence as entered&quot;;IF([.M227]=&quot;&quot;;&quot;REVIEW LINKAGE STATUS — identifiers are present while status is UNKNOWN&quot;;IF([.M227]=&quot;UNMATCHED&quot;;&quot;REMOVE LINKAGE IDENTIFIERS OR CORRECT LINKAGE STATUS&quot;;IF([.M227]=&quot;SINGLE_SALE_LINKED&quot;;&quot;REQUIRE LINKED SALE ID AND NO ALLOCATION GROUP ID&quot;;IF([.M227]=&quot;MULTI_SALE_PENDING_ALLOCATION&quot;;&quot;REMOVE LINKED SALE ID OR CORRECT LINKAGE STATUS&quot;;IF([.M22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cell office:value-type="string" table:formula="of:=IF([.S228]=&quot;UNKNOWN&quot;;&quot;NO ACTION — linkage status is UNKNOWN / not asserted&quot;;IF([.S228]=&quot;CLEAR&quot;;&quot;NO CONTRADICTION — preserve evidence as entered&quot;;IF([.M228]=&quot;&quot;;&quot;REVIEW LINKAGE STATUS — identifiers are present while status is UNKNOWN&quot;;IF([.M228]=&quot;UNMATCHED&quot;;&quot;REMOVE LINKAGE IDENTIFIERS OR CORRECT LINKAGE STATUS&quot;;IF([.M228]=&quot;SINGLE_SALE_LINKED&quot;;&quot;REQUIRE LINKED SALE ID AND NO ALLOCATION GROUP ID&quot;;IF([.M228]=&quot;MULTI_SALE_PENDING_ALLOCATION&quot;;&quot;REMOVE LINKED SALE ID OR CORRECT LINKAGE STATUS&quot;;IF([.M22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cell office:value-type="string" table:formula="of:=IF([.S229]=&quot;UNKNOWN&quot;;&quot;NO ACTION — linkage status is UNKNOWN / not asserted&quot;;IF([.S229]=&quot;CLEAR&quot;;&quot;NO CONTRADICTION — preserve evidence as entered&quot;;IF([.M229]=&quot;&quot;;&quot;REVIEW LINKAGE STATUS — identifiers are present while status is UNKNOWN&quot;;IF([.M229]=&quot;UNMATCHED&quot;;&quot;REMOVE LINKAGE IDENTIFIERS OR CORRECT LINKAGE STATUS&quot;;IF([.M229]=&quot;SINGLE_SALE_LINKED&quot;;&quot;REQUIRE LINKED SALE ID AND NO ALLOCATION GROUP ID&quot;;IF([.M229]=&quot;MULTI_SALE_PENDING_ALLOCATION&quot;;&quot;REMOVE LINKED SALE ID OR CORRECT LINKAGE STATUS&quot;;IF([.M22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cell office:value-type="string" table:formula="of:=IF([.S230]=&quot;UNKNOWN&quot;;&quot;NO ACTION — linkage status is UNKNOWN / not asserted&quot;;IF([.S230]=&quot;CLEAR&quot;;&quot;NO CONTRADICTION — preserve evidence as entered&quot;;IF([.M230]=&quot;&quot;;&quot;REVIEW LINKAGE STATUS — identifiers are present while status is UNKNOWN&quot;;IF([.M230]=&quot;UNMATCHED&quot;;&quot;REMOVE LINKAGE IDENTIFIERS OR CORRECT LINKAGE STATUS&quot;;IF([.M230]=&quot;SINGLE_SALE_LINKED&quot;;&quot;REQUIRE LINKED SALE ID AND NO ALLOCATION GROUP ID&quot;;IF([.M230]=&quot;MULTI_SALE_PENDING_ALLOCATION&quot;;&quot;REMOVE LINKED SALE ID OR CORRECT LINKAGE STATUS&quot;;IF([.M23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cell office:value-type="string" table:formula="of:=IF([.S231]=&quot;UNKNOWN&quot;;&quot;NO ACTION — linkage status is UNKNOWN / not asserted&quot;;IF([.S231]=&quot;CLEAR&quot;;&quot;NO CONTRADICTION — preserve evidence as entered&quot;;IF([.M231]=&quot;&quot;;&quot;REVIEW LINKAGE STATUS — identifiers are present while status is UNKNOWN&quot;;IF([.M231]=&quot;UNMATCHED&quot;;&quot;REMOVE LINKAGE IDENTIFIERS OR CORRECT LINKAGE STATUS&quot;;IF([.M231]=&quot;SINGLE_SALE_LINKED&quot;;&quot;REQUIRE LINKED SALE ID AND NO ALLOCATION GROUP ID&quot;;IF([.M231]=&quot;MULTI_SALE_PENDING_ALLOCATION&quot;;&quot;REMOVE LINKED SALE ID OR CORRECT LINKAGE STATUS&quot;;IF([.M23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cell office:value-type="string" table:formula="of:=IF([.S232]=&quot;UNKNOWN&quot;;&quot;NO ACTION — linkage status is UNKNOWN / not asserted&quot;;IF([.S232]=&quot;CLEAR&quot;;&quot;NO CONTRADICTION — preserve evidence as entered&quot;;IF([.M232]=&quot;&quot;;&quot;REVIEW LINKAGE STATUS — identifiers are present while status is UNKNOWN&quot;;IF([.M232]=&quot;UNMATCHED&quot;;&quot;REMOVE LINKAGE IDENTIFIERS OR CORRECT LINKAGE STATUS&quot;;IF([.M232]=&quot;SINGLE_SALE_LINKED&quot;;&quot;REQUIRE LINKED SALE ID AND NO ALLOCATION GROUP ID&quot;;IF([.M232]=&quot;MULTI_SALE_PENDING_ALLOCATION&quot;;&quot;REMOVE LINKED SALE ID OR CORRECT LINKAGE STATUS&quot;;IF([.M23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cell office:value-type="string" table:formula="of:=IF([.S233]=&quot;UNKNOWN&quot;;&quot;NO ACTION — linkage status is UNKNOWN / not asserted&quot;;IF([.S233]=&quot;CLEAR&quot;;&quot;NO CONTRADICTION — preserve evidence as entered&quot;;IF([.M233]=&quot;&quot;;&quot;REVIEW LINKAGE STATUS — identifiers are present while status is UNKNOWN&quot;;IF([.M233]=&quot;UNMATCHED&quot;;&quot;REMOVE LINKAGE IDENTIFIERS OR CORRECT LINKAGE STATUS&quot;;IF([.M233]=&quot;SINGLE_SALE_LINKED&quot;;&quot;REQUIRE LINKED SALE ID AND NO ALLOCATION GROUP ID&quot;;IF([.M233]=&quot;MULTI_SALE_PENDING_ALLOCATION&quot;;&quot;REMOVE LINKED SALE ID OR CORRECT LINKAGE STATUS&quot;;IF([.M23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cell office:value-type="string" table:formula="of:=IF([.S234]=&quot;UNKNOWN&quot;;&quot;NO ACTION — linkage status is UNKNOWN / not asserted&quot;;IF([.S234]=&quot;CLEAR&quot;;&quot;NO CONTRADICTION — preserve evidence as entered&quot;;IF([.M234]=&quot;&quot;;&quot;REVIEW LINKAGE STATUS — identifiers are present while status is UNKNOWN&quot;;IF([.M234]=&quot;UNMATCHED&quot;;&quot;REMOVE LINKAGE IDENTIFIERS OR CORRECT LINKAGE STATUS&quot;;IF([.M234]=&quot;SINGLE_SALE_LINKED&quot;;&quot;REQUIRE LINKED SALE ID AND NO ALLOCATION GROUP ID&quot;;IF([.M234]=&quot;MULTI_SALE_PENDING_ALLOCATION&quot;;&quot;REMOVE LINKED SALE ID OR CORRECT LINKAGE STATUS&quot;;IF([.M23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cell office:value-type="string" table:formula="of:=IF([.S235]=&quot;UNKNOWN&quot;;&quot;NO ACTION — linkage status is UNKNOWN / not asserted&quot;;IF([.S235]=&quot;CLEAR&quot;;&quot;NO CONTRADICTION — preserve evidence as entered&quot;;IF([.M235]=&quot;&quot;;&quot;REVIEW LINKAGE STATUS — identifiers are present while status is UNKNOWN&quot;;IF([.M235]=&quot;UNMATCHED&quot;;&quot;REMOVE LINKAGE IDENTIFIERS OR CORRECT LINKAGE STATUS&quot;;IF([.M235]=&quot;SINGLE_SALE_LINKED&quot;;&quot;REQUIRE LINKED SALE ID AND NO ALLOCATION GROUP ID&quot;;IF([.M235]=&quot;MULTI_SALE_PENDING_ALLOCATION&quot;;&quot;REMOVE LINKED SALE ID OR CORRECT LINKAGE STATUS&quot;;IF([.M23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cell office:value-type="string" table:formula="of:=IF([.S236]=&quot;UNKNOWN&quot;;&quot;NO ACTION — linkage status is UNKNOWN / not asserted&quot;;IF([.S236]=&quot;CLEAR&quot;;&quot;NO CONTRADICTION — preserve evidence as entered&quot;;IF([.M236]=&quot;&quot;;&quot;REVIEW LINKAGE STATUS — identifiers are present while status is UNKNOWN&quot;;IF([.M236]=&quot;UNMATCHED&quot;;&quot;REMOVE LINKAGE IDENTIFIERS OR CORRECT LINKAGE STATUS&quot;;IF([.M236]=&quot;SINGLE_SALE_LINKED&quot;;&quot;REQUIRE LINKED SALE ID AND NO ALLOCATION GROUP ID&quot;;IF([.M236]=&quot;MULTI_SALE_PENDING_ALLOCATION&quot;;&quot;REMOVE LINKED SALE ID OR CORRECT LINKAGE STATUS&quot;;IF([.M23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cell office:value-type="string" table:formula="of:=IF([.S237]=&quot;UNKNOWN&quot;;&quot;NO ACTION — linkage status is UNKNOWN / not asserted&quot;;IF([.S237]=&quot;CLEAR&quot;;&quot;NO CONTRADICTION — preserve evidence as entered&quot;;IF([.M237]=&quot;&quot;;&quot;REVIEW LINKAGE STATUS — identifiers are present while status is UNKNOWN&quot;;IF([.M237]=&quot;UNMATCHED&quot;;&quot;REMOVE LINKAGE IDENTIFIERS OR CORRECT LINKAGE STATUS&quot;;IF([.M237]=&quot;SINGLE_SALE_LINKED&quot;;&quot;REQUIRE LINKED SALE ID AND NO ALLOCATION GROUP ID&quot;;IF([.M237]=&quot;MULTI_SALE_PENDING_ALLOCATION&quot;;&quot;REMOVE LINKED SALE ID OR CORRECT LINKAGE STATUS&quot;;IF([.M23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cell office:value-type="string" table:formula="of:=IF([.S238]=&quot;UNKNOWN&quot;;&quot;NO ACTION — linkage status is UNKNOWN / not asserted&quot;;IF([.S238]=&quot;CLEAR&quot;;&quot;NO CONTRADICTION — preserve evidence as entered&quot;;IF([.M238]=&quot;&quot;;&quot;REVIEW LINKAGE STATUS — identifiers are present while status is UNKNOWN&quot;;IF([.M238]=&quot;UNMATCHED&quot;;&quot;REMOVE LINKAGE IDENTIFIERS OR CORRECT LINKAGE STATUS&quot;;IF([.M238]=&quot;SINGLE_SALE_LINKED&quot;;&quot;REQUIRE LINKED SALE ID AND NO ALLOCATION GROUP ID&quot;;IF([.M238]=&quot;MULTI_SALE_PENDING_ALLOCATION&quot;;&quot;REMOVE LINKED SALE ID OR CORRECT LINKAGE STATUS&quot;;IF([.M23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cell office:value-type="string" table:formula="of:=IF([.S239]=&quot;UNKNOWN&quot;;&quot;NO ACTION — linkage status is UNKNOWN / not asserted&quot;;IF([.S239]=&quot;CLEAR&quot;;&quot;NO CONTRADICTION — preserve evidence as entered&quot;;IF([.M239]=&quot;&quot;;&quot;REVIEW LINKAGE STATUS — identifiers are present while status is UNKNOWN&quot;;IF([.M239]=&quot;UNMATCHED&quot;;&quot;REMOVE LINKAGE IDENTIFIERS OR CORRECT LINKAGE STATUS&quot;;IF([.M239]=&quot;SINGLE_SALE_LINKED&quot;;&quot;REQUIRE LINKED SALE ID AND NO ALLOCATION GROUP ID&quot;;IF([.M239]=&quot;MULTI_SALE_PENDING_ALLOCATION&quot;;&quot;REMOVE LINKED SALE ID OR CORRECT LINKAGE STATUS&quot;;IF([.M23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cell office:value-type="string" table:formula="of:=IF([.S240]=&quot;UNKNOWN&quot;;&quot;NO ACTION — linkage status is UNKNOWN / not asserted&quot;;IF([.S240]=&quot;CLEAR&quot;;&quot;NO CONTRADICTION — preserve evidence as entered&quot;;IF([.M240]=&quot;&quot;;&quot;REVIEW LINKAGE STATUS — identifiers are present while status is UNKNOWN&quot;;IF([.M240]=&quot;UNMATCHED&quot;;&quot;REMOVE LINKAGE IDENTIFIERS OR CORRECT LINKAGE STATUS&quot;;IF([.M240]=&quot;SINGLE_SALE_LINKED&quot;;&quot;REQUIRE LINKED SALE ID AND NO ALLOCATION GROUP ID&quot;;IF([.M240]=&quot;MULTI_SALE_PENDING_ALLOCATION&quot;;&quot;REMOVE LINKED SALE ID OR CORRECT LINKAGE STATUS&quot;;IF([.M24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cell office:value-type="string" table:formula="of:=IF([.S241]=&quot;UNKNOWN&quot;;&quot;NO ACTION — linkage status is UNKNOWN / not asserted&quot;;IF([.S241]=&quot;CLEAR&quot;;&quot;NO CONTRADICTION — preserve evidence as entered&quot;;IF([.M241]=&quot;&quot;;&quot;REVIEW LINKAGE STATUS — identifiers are present while status is UNKNOWN&quot;;IF([.M241]=&quot;UNMATCHED&quot;;&quot;REMOVE LINKAGE IDENTIFIERS OR CORRECT LINKAGE STATUS&quot;;IF([.M241]=&quot;SINGLE_SALE_LINKED&quot;;&quot;REQUIRE LINKED SALE ID AND NO ALLOCATION GROUP ID&quot;;IF([.M241]=&quot;MULTI_SALE_PENDING_ALLOCATION&quot;;&quot;REMOVE LINKED SALE ID OR CORRECT LINKAGE STATUS&quot;;IF([.M241]=&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cell office:value-type="string" table:formula="of:=IF([.S242]=&quot;UNKNOWN&quot;;&quot;NO ACTION — linkage status is UNKNOWN / not asserted&quot;;IF([.S242]=&quot;CLEAR&quot;;&quot;NO CONTRADICTION — preserve evidence as entered&quot;;IF([.M242]=&quot;&quot;;&quot;REVIEW LINKAGE STATUS — identifiers are present while status is UNKNOWN&quot;;IF([.M242]=&quot;UNMATCHED&quot;;&quot;REMOVE LINKAGE IDENTIFIERS OR CORRECT LINKAGE STATUS&quot;;IF([.M242]=&quot;SINGLE_SALE_LINKED&quot;;&quot;REQUIRE LINKED SALE ID AND NO ALLOCATION GROUP ID&quot;;IF([.M242]=&quot;MULTI_SALE_PENDING_ALLOCATION&quot;;&quot;REMOVE LINKED SALE ID OR CORRECT LINKAGE STATUS&quot;;IF([.M242]=&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cell office:value-type="string" table:formula="of:=IF([.S243]=&quot;UNKNOWN&quot;;&quot;NO ACTION — linkage status is UNKNOWN / not asserted&quot;;IF([.S243]=&quot;CLEAR&quot;;&quot;NO CONTRADICTION — preserve evidence as entered&quot;;IF([.M243]=&quot;&quot;;&quot;REVIEW LINKAGE STATUS — identifiers are present while status is UNKNOWN&quot;;IF([.M243]=&quot;UNMATCHED&quot;;&quot;REMOVE LINKAGE IDENTIFIERS OR CORRECT LINKAGE STATUS&quot;;IF([.M243]=&quot;SINGLE_SALE_LINKED&quot;;&quot;REQUIRE LINKED SALE ID AND NO ALLOCATION GROUP ID&quot;;IF([.M243]=&quot;MULTI_SALE_PENDING_ALLOCATION&quot;;&quot;REMOVE LINKED SALE ID OR CORRECT LINKAGE STATUS&quot;;IF([.M243]=&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cell office:value-type="string" table:formula="of:=IF([.S244]=&quot;UNKNOWN&quot;;&quot;NO ACTION — linkage status is UNKNOWN / not asserted&quot;;IF([.S244]=&quot;CLEAR&quot;;&quot;NO CONTRADICTION — preserve evidence as entered&quot;;IF([.M244]=&quot;&quot;;&quot;REVIEW LINKAGE STATUS — identifiers are present while status is UNKNOWN&quot;;IF([.M244]=&quot;UNMATCHED&quot;;&quot;REMOVE LINKAGE IDENTIFIERS OR CORRECT LINKAGE STATUS&quot;;IF([.M244]=&quot;SINGLE_SALE_LINKED&quot;;&quot;REQUIRE LINKED SALE ID AND NO ALLOCATION GROUP ID&quot;;IF([.M244]=&quot;MULTI_SALE_PENDING_ALLOCATION&quot;;&quot;REMOVE LINKED SALE ID OR CORRECT LINKAGE STATUS&quot;;IF([.M244]=&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cell office:value-type="string" table:formula="of:=IF([.S245]=&quot;UNKNOWN&quot;;&quot;NO ACTION — linkage status is UNKNOWN / not asserted&quot;;IF([.S245]=&quot;CLEAR&quot;;&quot;NO CONTRADICTION — preserve evidence as entered&quot;;IF([.M245]=&quot;&quot;;&quot;REVIEW LINKAGE STATUS — identifiers are present while status is UNKNOWN&quot;;IF([.M245]=&quot;UNMATCHED&quot;;&quot;REMOVE LINKAGE IDENTIFIERS OR CORRECT LINKAGE STATUS&quot;;IF([.M245]=&quot;SINGLE_SALE_LINKED&quot;;&quot;REQUIRE LINKED SALE ID AND NO ALLOCATION GROUP ID&quot;;IF([.M245]=&quot;MULTI_SALE_PENDING_ALLOCATION&quot;;&quot;REMOVE LINKED SALE ID OR CORRECT LINKAGE STATUS&quot;;IF([.M245]=&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cell office:value-type="string" table:formula="of:=IF([.S246]=&quot;UNKNOWN&quot;;&quot;NO ACTION — linkage status is UNKNOWN / not asserted&quot;;IF([.S246]=&quot;CLEAR&quot;;&quot;NO CONTRADICTION — preserve evidence as entered&quot;;IF([.M246]=&quot;&quot;;&quot;REVIEW LINKAGE STATUS — identifiers are present while status is UNKNOWN&quot;;IF([.M246]=&quot;UNMATCHED&quot;;&quot;REMOVE LINKAGE IDENTIFIERS OR CORRECT LINKAGE STATUS&quot;;IF([.M246]=&quot;SINGLE_SALE_LINKED&quot;;&quot;REQUIRE LINKED SALE ID AND NO ALLOCATION GROUP ID&quot;;IF([.M246]=&quot;MULTI_SALE_PENDING_ALLOCATION&quot;;&quot;REMOVE LINKED SALE ID OR CORRECT LINKAGE STATUS&quot;;IF([.M246]=&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cell office:value-type="string" table:formula="of:=IF([.S247]=&quot;UNKNOWN&quot;;&quot;NO ACTION — linkage status is UNKNOWN / not asserted&quot;;IF([.S247]=&quot;CLEAR&quot;;&quot;NO CONTRADICTION — preserve evidence as entered&quot;;IF([.M247]=&quot;&quot;;&quot;REVIEW LINKAGE STATUS — identifiers are present while status is UNKNOWN&quot;;IF([.M247]=&quot;UNMATCHED&quot;;&quot;REMOVE LINKAGE IDENTIFIERS OR CORRECT LINKAGE STATUS&quot;;IF([.M247]=&quot;SINGLE_SALE_LINKED&quot;;&quot;REQUIRE LINKED SALE ID AND NO ALLOCATION GROUP ID&quot;;IF([.M247]=&quot;MULTI_SALE_PENDING_ALLOCATION&quot;;&quot;REMOVE LINKED SALE ID OR CORRECT LINKAGE STATUS&quot;;IF([.M247]=&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cell office:value-type="string" table:formula="of:=IF([.S248]=&quot;UNKNOWN&quot;;&quot;NO ACTION — linkage status is UNKNOWN / not asserted&quot;;IF([.S248]=&quot;CLEAR&quot;;&quot;NO CONTRADICTION — preserve evidence as entered&quot;;IF([.M248]=&quot;&quot;;&quot;REVIEW LINKAGE STATUS — identifiers are present while status is UNKNOWN&quot;;IF([.M248]=&quot;UNMATCHED&quot;;&quot;REMOVE LINKAGE IDENTIFIERS OR CORRECT LINKAGE STATUS&quot;;IF([.M248]=&quot;SINGLE_SALE_LINKED&quot;;&quot;REQUIRE LINKED SALE ID AND NO ALLOCATION GROUP ID&quot;;IF([.M248]=&quot;MULTI_SALE_PENDING_ALLOCATION&quot;;&quot;REMOVE LINKED SALE ID OR CORRECT LINKAGE STATUS&quot;;IF([.M248]=&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cell office:value-type="string" table:formula="of:=IF([.S249]=&quot;UNKNOWN&quot;;&quot;NO ACTION — linkage status is UNKNOWN / not asserted&quot;;IF([.S249]=&quot;CLEAR&quot;;&quot;NO CONTRADICTION — preserve evidence as entered&quot;;IF([.M249]=&quot;&quot;;&quot;REVIEW LINKAGE STATUS — identifiers are present while status is UNKNOWN&quot;;IF([.M249]=&quot;UNMATCHED&quot;;&quot;REMOVE LINKAGE IDENTIFIERS OR CORRECT LINKAGE STATUS&quot;;IF([.M249]=&quot;SINGLE_SALE_LINKED&quot;;&quot;REQUIRE LINKED SALE ID AND NO ALLOCATION GROUP ID&quot;;IF([.M249]=&quot;MULTI_SALE_PENDING_ALLOCATION&quot;;&quot;REMOVE LINKED SALE ID OR CORRECT LINKAGE STATUS&quot;;IF([.M249]=&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cell office:value-type="string" table:formula="of:=IF([.S250]=&quot;UNKNOWN&quot;;&quot;NO ACTION — linkage status is UNKNOWN / not asserted&quot;;IF([.S250]=&quot;CLEAR&quot;;&quot;NO CONTRADICTION — preserve evidence as entered&quot;;IF([.M250]=&quot;&quot;;&quot;REVIEW LINKAGE STATUS — identifiers are present while status is UNKNOWN&quot;;IF([.M250]=&quot;UNMATCHED&quot;;&quot;REMOVE LINKAGE IDENTIFIERS OR CORRECT LINKAGE STATUS&quot;;IF([.M250]=&quot;SINGLE_SALE_LINKED&quot;;&quot;REQUIRE LINKED SALE ID AND NO ALLOCATION GROUP ID&quot;;IF([.M250]=&quot;MULTI_SALE_PENDING_ALLOCATION&quot;;&quot;REMOVE LINKED SALE ID OR CORRECT LINKAGE STATUS&quot;;IF([.M250]=&quot;ALLOCATED&quot;;&quot;REQUIRE ALLOCATION GROUP ID AND NO LINKED SALE ID&quot;;&quot;REVIEW LINKAGE EVIDENCE — NO AUTHORITY CREATED&quot;)))))))">
            <text:p>NO ACTION — linkage status is UNKNOWN / not asserted</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cell office:value-type="string" table:formula="of:=IF([.S251]=&quot;UNKNOWN&quot;;&quot;NO ACTION — linkage status is UNKNOWN / not asserted&quot;;IF([.S251]=&quot;CLEAR&quot;;&quot;NO CONTRADICTION — preserve evidence as entered&quot;;IF([.M251]=&quot;&quot;;&quot;REVIEW LINKAGE STATUS — identifiers are present while status is UNKNOWN&quot;;IF([.M251]=&quot;UNMATCHED&quot;;&quot;REMOVE LINKAGE IDENTIFIERS OR CORRECT LINKAGE STATUS&quot;;IF([.M251]=&quot;SINGLE_SALE_LINKED&quot;;&quot;REQUIRE LINKED SALE ID AND NO ALLOCATION GROUP ID&quot;;IF([.M251]=&quot;MULTI_SALE_PENDING_ALLOCATION&quot;;&quot;REMOVE LINKED SALE ID OR CORRECT LINKAGE STATUS&quot;;IF([.M251]=&quot;ALLOCATED&quot;;&quot;REQUIRE ALLOCATION GROUP ID AND NO LINKED SALE ID&quot;;&quot;REVIEW LINKAGE EVIDENCE — NO AUTHORITY CREATED&quot;)))))))">
            <text:p>NO ACTION — linkage status is UNKNOWN / not asserted</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