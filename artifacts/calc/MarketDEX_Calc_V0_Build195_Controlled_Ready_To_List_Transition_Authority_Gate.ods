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3"/>
        <table:table-column table:style-name="co5" table:number-columns-repeated="2" table:default-cell-style-name="ce13"/>
        <table:table-column table:style-name="co6" table:number-columns-repeated="2" table:default-cell-style-name="ce23"/>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2"/>
          <table:covered-table-cell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2" table:style-name="ce23"/>
          <table:covered-table-cell table:number-columns-repeated="2"/>
          <table:covered-table-cell table:number-columns-repeated="13"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2" table:style-name="ce23"/>
          <table:covered-table-cell table:number-columns-repeated="2"/>
          <table:covered-table-cell table:style-name="ce23"/>
          <table:table-cell table:style-name="ce23"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2" table:style-name="ce23"/>
          <table:covered-table-cell table:number-columns-repeated="2"/>
          <table:covered-table-cell table:number-columns-repeated="13"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2"/>
          <table:covered-table-cell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2" table:style-name="ce23"/>
          <table:covered-table-cell table:number-columns-repeated="2"/>
          <table:covered-table-cell table:number-columns-repeated="13"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2" table:style-name="ce23"/>
          <table:covered-table-cell table:number-columns-repeated="2"/>
          <table:covered-table-cell table:number-columns-repeated="13"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2"/>
          <table:covered-table-cell table:style-name="ce1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2"/>
          <table:covered-table-cell table:style-name="ce1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2"/>
          <table:covered-table-cell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2"/>
          <table:covered-table-cell table:style-name="ce1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2"/>
          <table:covered-table-cell table:style-name="ce1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2"/>
          <table:covered-table-cell table:style-name="ce1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2"/>
          <table:covered-table-cell table:style-name="ce1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2"/>
          <table:covered-table-cell table:style-name="ce1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2"/>
          <table:covered-table-cell table:style-name="ce1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2"/>
          <table:covered-table-cell table:style-name="ce1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2"/>
          <table:covered-table-cell table:style-name="ce1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2"/>
          <table:covered-table-cell table:style-name="ce1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2" table:style-name="ce23"/>
          <table:covered-table-cell table:number-columns-repeated="2"/>
          <table:covered-table-cell table:number-columns-repeated="13"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2" table:style-name="ce23"/>
          <table:covered-table-cell table:number-columns-repeated="2"/>
          <table:covered-table-cell table:number-columns-repeated="13"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2"/>
          <table:covered-table-cell table:style-name="ce13"/>
          <table:table-cell table:style-name="ce13" table:content-validation-name="val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2" table:style-name="ce23"/>
          <table:covered-table-cell table:number-columns-repeated="2"/>
          <table:covered-table-cell table:number-columns-repeated="4" table:style-name="ce23"/>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2" table:style-name="ce23"/>
          <table:covered-table-cell table:number-columns-repeated="2"/>
          <table:covered-table-cell table:number-columns-repeated="4" table:style-name="ce23"/>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2"/>
          <table:covered-table-cell table:style-name="ce1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2" table:style-name="ce23"/>
          <table:covered-table-cell table:number-columns-repeated="2"/>
          <table:covered-table-cell table:style-name="ce23"/>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style-name="ce13"/>
          <table:covered-table-cell/>
          <table:table-cell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style-name="ce13"/>
          <table:covered-table-cell/>
          <table:table-cell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style-name="ce13"/>
          <table:covered-table-cell/>
          <table:table-cell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style-name="ce13"/>
          <table:covered-table-cell/>
          <table:table-cell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style-name="ce13"/>
          <table:covered-table-cell/>
          <table:table-cell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style-name="ce13"/>
          <table:covered-table-cell/>
          <table:table-cell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style-name="ce13"/>
          <table:covered-table-cell/>
          <table:table-cell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2"/>
          <table:covered-table-cell table:style-name="ce1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2"/>
          <table:covered-table-cell table:number-columns-repeated="2"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4"/>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2"/>
          <table:covered-table-cell table:number-columns-repeated="2"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2"/>
          <table:covered-table-cell table:number-columns-repeated="2" table:style-name="ce13"/>
          <table:covered-table-cell/>
          <table:table-cell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2"/>
          <table:covered-table-cell table:style-name="ce1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2"/>
          <table:covered-table-cell table:style-name="ce1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2"/>
          <table:covered-table-cell table:number-columns-repeated="2" table:style-name="ce13"/>
          <table:table-cell office:value-type="string" calcext:value-type="string" table:number-columns-spanned="6" table:number-rows-spanned="1">
            <text:p>OWNED</text:p>
          </table:table-cell>
          <table:covered-table-cell table:number-columns-repeated="5"/>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2"/>
          <table:covered-table-cell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3"/>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2"/>
          <table:covered-table-cell table:style-name="ce1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2"/>
          <table:covered-table-cell table:number-columns-repeated="2"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LISTING CONTENT" calcext:value-type="string" table:number-columns-spanned="4" table:number-rows-spanned="1">
            <text:p>LISTING CONTENT</text:p>
          </table:table-cell>
          <table:covered-table-cell table:number-columns-repeated="2"/>
          <table:covered-table-cell table:style-name="ce13"/>
          <table:table-cell table:style-name="ce13" table:formula="of:=[.D597]" office:value-type="string" office:string-value="LISTING CONTENT" calcext:value-type="string" table:number-columns-spanned="4" table:number-rows-spanned="1">
            <text:p>LISTING CONTENT</text:p>
          </table:table-cell>
          <table:covered-table-cell table:number-columns-repeated="3"/>
          <table:table-cell table:formula="of:=IF(UPPER(TRIM([.A600]))=UPPER(TRIM([.E600]));&quot;MATCH&quot;;&quot;MISMATCH&quot;)" office:value-type="string" office:string-value="MATCH" calcext:value-type="string" table:number-columns-spanned="3" table:number-rows-spanned="1">
            <text:p>MATCH</text:p>
          </table:table-cell>
          <table:covered-table-cell table:number-columns-repeated="2"/>
          <table:table-cell table:formula="of:=IF(AND(UPPER(TRIM([.L597]))=&quot;REVIEWED&quot;;UPPER(TRIM([.O597]))=&quot;YES&quot;);&quot;SUPPORTED&quot;;&quot;UNSUPPORTED&quot;)" office:value-type="string" office:string-value="SUPPORTED" calcext:value-type="string" table:number-columns-spanned="3" table:number-rows-spanned="1">
            <text:p>SUPPORTED</text:p>
          </table:table-cell>
          <table:covered-table-cell table:number-columns-repeated="2"/>
          <table:table-cell table:formula="of:=IF(AND(UPPER(TRIM([.I600]))=&quot;MATCH&quot;;UPPER(TRIM([.L600]))=&quot;SUPPORTED&quot;);&quot;RESOLVE MATCHED FACTOR ONLY&quot;;&quot;NO RESOLUTION&quot;)" office:value-type="string" office:string-value="RESOLVE MATCHED FACTOR ONLY" calcext:value-type="string" table:number-columns-spanned="4" table:number-rows-spanned="1">
            <text:p>RESOLVE MATCHED FACTOR ONLY</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IF(UPPER(TRIM([.O600]))=&quot;RESOLVE MATCHED FACTOR ONLY&quot;;[.A600];&quot;NO FACTOR RESOLUTION&quot;)" office:value-type="string" office:string-value="LISTING CONTENT" calcext:value-type="string" table:number-columns-spanned="3" table:number-rows-spanned="1">
            <text:p>LISTING CONTENT</text:p>
          </table:table-cell>
          <table:covered-table-cell table:number-columns-repeated="2"/>
          <table:table-cell table:style-name="ce13"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LISTING CONTENT READY = YES" calcext:value-type="string" table:number-columns-spanned="4" table:number-rows-spanned="1">
            <text:p>LISTING CONTENT READY = YES</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2"/>
          <table:covered-table-cell table:style-name="ce1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A603]" office:value-type="string" office:string-value="LISTING CONTENT" calcext:value-type="string" table:number-columns-spanned="4" table:number-rows-spanned="1">
            <text:p>LISTING CONTENT</text:p>
          </table:table-cell>
          <table:covered-table-cell table:style-name="ce13"/>
          <table:covered-table-cell table:number-columns-repeated="2"/>
          <table:table-cell table:formula="of:=[.D603]" office:value-type="string" office:string-value="LISTING CONTENT READY = YES" calcext:value-type="string" table:number-columns-spanned="4" table:number-rows-spanned="1">
            <text:p>LISTING CONTENT READY = YES</text:p>
          </table:table-cell>
          <table:covered-table-cell table:number-columns-repeated="3"/>
          <table:table-cell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PRICE DECISION" calcext:value-type="string" table:number-columns-spanned="3" table:number-rows-spanned="1">
            <text:p>PRICE DECISION</text:p>
          </table:table-cell>
          <table:covered-table-cell table:number-columns-repeated="2"/>
          <table:table-cell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MAKE PRICE DECISION" calcext:value-type="string" table:number-columns-spanned="4" table:number-rows-spanned="1">
            <text:p>MAKE PRICE DECISION</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6]" office:value-type="string" office:string-value="MAKE PRICE DECISION" calcext:value-type="string" table:number-columns-spanned="4" table:number-rows-spanned="1">
            <text:p>MAKE PRICE DECISION</text:p>
          </table:table-cell>
          <table:covered-table-cell table:number-columns-repeated="2"/>
          <table:covered-table-cell table:style-name="ce13"/>
          <table:table-cell table:style-name="ce13" table:formula="of:=[.L616]" office:value-type="string" office:string-value="PRICE DECISION" calcext:value-type="string" table:number-columns-spanned="4" table:number-rows-spanned="1">
            <text:p>PRICE DECISION</text:p>
          </table:table-cell>
          <table:covered-table-cell table:number-columns-repeated="3"/>
          <table:table-cell table:formula="of:=[.L616]&amp;&quot; EVIDENCE&quot;" office:value-type="string" office:string-value="PRICE DECISION EVIDENCE" calcext:value-type="string" table:number-columns-spanned="3" table:number-rows-spanned="1">
            <text:p>PRICE DECISION EVIDENCE</text:p>
          </table:table-cell>
          <table:covered-table-cell table:number-columns-repeated="2"/>
          <table:table-cell table:formula="of:=&quot;REVIEW &quot;&amp;[.L616]" office:value-type="string" office:string-value="REVIEW PRICE DECISION" calcext:value-type="string" table:number-columns-spanned="3" table:number-rows-spanned="1">
            <text:p>REVIEW PRICE DECISION</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2"/>
          <table:covered-table-cell table:number-columns-repeated="2" table:style-name="ce13"/>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 APPLICABLE</text:p>
          </table:table-cell>
          <table:covered-table-cell table:style-name="ce13"/>
          <table:covered-table-cell/>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2"/>
          <table:covered-table-cell table:number-columns-repeated="2" table:style-name="ce13"/>
          <table:covered-table-cell/>
          <table:table-cell office:value-type="string" calcext:value-type="string" table:number-columns-spanned="6" table:number-rows-spanned="1">
            <text:p>NO</text:p>
          </table:table-cell>
          <table:covered-table-cell table:number-columns-repeated="5"/>
          <table:table-cell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calcext:value-type="string" table:number-columns-spanned="5" table:number-rows-spanned="1">
            <text:p>PRICE DECISION</text:p>
          </table:table-cell>
          <table:covered-table-cell table:number-columns-repeated="2"/>
          <table:covered-table-cell table:number-columns-repeated="2" table:style-name="ce13"/>
          <table:table-cell table:formula="of:=IF(UPPER(TRIM([.M628]))=&quot;YES&quot;;&quot;PASSED&quot;;&quot;FAILED · REMAIN IN PREPARATION&quot;)" office:value-type="string" office:string-value="FAILED · REMAIN IN PREPARATION" calcext:value-type="string" table:number-columns-spanned="5" table:number-rows-spanned="1">
            <text:p>FAILED · REMAIN IN PREPARATION</text:p>
          </table:table-cell>
          <table:covered-table-cell table:number-columns-repeated="4"/>
          <table:table-cell table:formula="of:=IF(UPPER(TRIM([.M628]))=&quot;YES&quot;;&quot;READY TO LIST ELIGIBLE&quot;;&quot;NOT READY TO LIST ELIGIBLE&quot;)" office:value-type="string" office:string-value="NOT READY TO LIST ELIGIBLE" calcext:value-type="string" table:number-columns-spanned="4" table:number-rows-spanned="1">
            <text:p>NOT READY TO LIST ELIGIBLE</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2"/>
          <table:covered-table-cell table:number-columns-repeated="2" table:style-name="ce13"/>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CORD TRANSITION TO READY TO LI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5" table:number-rows-spanned="1">
            <text:p>PREPARATION NEEDED → READY TO LIST</text:p>
          </table:table-cell>
          <table:covered-table-cell table:style-name="ce13"/>
          <table:covered-table-cell table:number-columns-repeated="3"/>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2"/>
          <table:covered-table-cell table:style-name="ce13"/>
          <table:table-cell table:style-name="ce13" office:value-type="string" calcext:value-type="string" table:number-columns-spanned="4" table:number-rows-spanned="1">
            <text:p>PREPARATION NEEDED</text:p>
          </table:table-cell>
          <table:covered-table-cell table:number-columns-repeated="3"/>
          <table:table-cell office:value-type="string" calcext:value-type="string" table:number-columns-spanned="3" table:number-rows-spanned="1">
            <text:p>READY TO LIST</text:p>
          </table:table-cell>
          <table:covered-table-cell table:number-columns-repeated="2"/>
          <table:table-cell table:formula="of:=IF(UPPER(TRIM([.A653]))=UPPER(TRIM([.E653]));&quot;YES&quot;;&quot;NO&quot;)" office:value-type="string" office:string-value="NO" calcext:value-type="string" table:number-columns-spanned="3" table:number-rows-spanned="1">
            <text:p>NO</text:p>
          </table:table-cell>
          <table:covered-table-cell table:number-columns-repeated="2"/>
          <table:table-cell table:formula="of:=IF(UPPER(TRIM([.I653]))=&quot;READY TO LIST&quot;;&quot;YES&quot;;&quot;NO&quot;)" office:value-type="string" office:string-value="NO"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3" office:value-type="string" calcext:value-type="string" table:number-columns-spanned="5" table:number-rows-spanned="1">
            <text:p>PASSED</text:p>
          </table:table-cell>
          <table:covered-table-cell table:number-columns-repeated="2"/>
          <table:covered-table-cell table:number-columns-repeated="2" table:style-name="ce13"/>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IF(AND(UPPER(TRIM([.A656]))=&quot;PASSED&quot;;UPPER(TRIM([.F656]))=&quot;READY TO LIST ELIGIBLE&quot;;UPPER(TRIM([.K656]))=&quot;YES&quot;);&quot;VALID&quot;;&quot;INVALID&quot;)" office:value-type="string" office:string-value="INVALID" calcext:value-type="string" table:number-columns-spanned="4" table:number-rows-spanned="1">
            <text:p>INVALID</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3" office:value-type="string" calcext:value-type="string" table:number-columns-spanned="4" table:number-rows-spanned="1">
            <text:p>MARK · OPERATOR</text:p>
          </table:table-cell>
          <table:covered-table-cell table:number-columns-repeated="2"/>
          <table:covered-table-cell table:style-name="ce1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IF(AND(UPPER(TRIM([.F650]))=&quot;PREPARATION NEEDED → READY TO LIST&quot;;UPPER(TRIM([.K650]))=&quot;REQUESTED&quot;);&quot;YES&quot;;&quot;NO&quot;)" office:value-type="string" office:string-value="NO" calcext:value-type="string" table:number-columns-spanned="3" table:number-rows-spanned="1">
            <text:p>NO</text:p>
          </table:table-cell>
          <table:covered-table-cell table:number-columns-repeated="2"/>
          <table:table-cell table:style-name="ce13" table:formula="of:=[.L653]" office:value-type="float" office:value="0" calcext:value-type="float" table:number-columns-spanned="3" table:number-rows-spanned="1">
            <text:p>0</text:p>
          </table:table-cell>
          <table:covered-table-cell table:style-name="ce13"/>
          <table:covered-table-cell/>
          <table:table-cell table:formula="of:=[.O653]" office:value-type="float" office:value="0" calcext:value-type="float" table:number-columns-spanned="3" table:number-rows-spanned="1">
            <text:p>0</text:p>
          </table:table-cell>
          <table:covered-table-cell table:number-columns-repeated="2"/>
          <table:table-cell table:formula="of:=IF(UPPER(TRIM([.O656]))=&quot;VALID&quot;;&quot;YES&quot;;&quot;NO&quot;)" office:value-type="string" office:string-value="NO" calcext:value-type="string" table:number-columns-spanned="3" table:number-rows-spanned="1">
            <text:p>NO</text:p>
          </table:table-cell>
          <table:covered-table-cell table:number-columns-repeated="2"/>
          <table:table-cell table:formula="of:=[.E659]" office:value-type="float" office:value="0" calcext:value-type="float" table:number-columns-spanned="3" table:number-rows-spanned="1">
            <text:p>0</text:p>
          </table:table-cell>
          <table:covered-table-cell table:number-columns-repeated="2"/>
          <table:table-cell table:formula="of:=[.O659]" office:value-type="string" office:string-value="STATE WRITE PERFORMED?" calcext:value-type="string" table:number-columns-spanned="3" table:number-rows-spanned="1">
            <text:p>STATE WRITE PERFORMED?</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NO</text:p>
          </table:table-cell>
          <table:covered-table-cell table:number-columns-repeated="2"/>
          <table:covered-table-cell table:number-columns-repeated="2"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3" table:formula="of:=IF(AND(UPPER(TRIM([.A662]))=&quot;YES&quot;;UPPER(TRIM([.D662]))=&quot;YES&quot;;UPPER(TRIM([.G662]))=&quot;YES&quot;;UPPER(TRIM([.J662]))=&quot;YES&quot;;UPPER(TRIM([.M662]))=&quot;YES&quot;;UPPER(TRIM([.P662]))=&quot;YES&quot;;UPPER(TRIM([.A665]))=&quot;NO&quot;;UPPER(TRIM([.F665]))=&quot;NO&quot;;UPPER(TRIM([.J665]))=&quot;NO&quot;);&quot;AUTHORIZED&quot;;&quot;DENIED&quot;)" office:value-type="string" office:string-value="DENIED" calcext:value-type="string" table:number-columns-spanned="5" table:number-rows-spanned="1">
            <text:p>DENIED</text:p>
          </table:table-cell>
          <table:covered-table-cell table:number-columns-repeated="2"/>
          <table:covered-table-cell table:number-columns-repeated="2" table:style-name="ce13"/>
          <table:table-cell table:formula="of:=IF(UPPER(TRIM([.A668]))=&quot;AUTHORIZED&quot;;&quot;GRANTED&quot;;&quot;NONE&quot;)" office:value-type="string" office:string-value="NONE" calcext:value-type="string" table:number-columns-spanned="5" table:number-rows-spanned="1">
            <text:p>NONE</text:p>
          </table:table-cell>
          <table:covered-table-cell table:number-columns-repeated="4"/>
          <table:table-cell table:formula="of:=IF(UPPER(TRIM([.A668]))=&quot;AUTHORIZED&quot;;[.F650];&quot;NO AUTHORIZED TRANSITION&quot;)" office:value-type="string" office:string-value="NO AUTHORIZED TRANSITION" calcext:value-type="string" table:number-columns-spanned="4" table:number-rows-spanned="1">
            <text:p>NO AUTHORIZED TRANSITION</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READY TO LIST</text:p>
          </table:table-cell>
          <table:covered-table-cell table:number-columns-repeated="2"/>
          <table:table-cell table:formula="of:=[.A668]" office:value-type="string" office:string-value="FAILURE CONDITION" calcext:value-type="string" table:number-columns-spanned="3" table:number-rows-spanned="1">
            <text:p>FAILURE CONDITION</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table:formula="of:=IF(UPPER(TRIM([.A668]))=&quot;AUTHORIZED&quot;;&quot;AUTHORIZATION RECORDED&quot;;&quot;DENIAL RECORDED&quot;)" office:value-type="string" office:string-value="DENIAL RECORDED" calcext:value-type="string" table:number-columns-spanned="3" table:number-rows-spanned="1">
            <text:p>DENIAL RECORDED</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3" office:value-type="string" calcext:value-type="string" table:number-columns-spanned="4" table:number-rows-spanned="1">
            <text:p>EVIDENCE CLASSIFICATION</text:p>
          </table:table-cell>
          <table:covered-table-cell table:number-columns-repeated="2"/>
          <table:covered-table-cell table:style-name="ce13"/>
          <table:table-cell table:style-name="ce13" office:value-type="string" calcext:value-type="string" table:number-columns-spanned="4" table:number-rows-spanned="1">
            <text:p>READ-ONLY RESULT</text:p>
          </table:table-cell>
          <table:covered-table-cell table:number-columns-repeated="3"/>
          <table:table-cell office:value-type="string" calcext:value-type="string" table:number-columns-spanned="3" table:number-rows-spanned="1">
            <text:p>READ-ONLY GUIDANCE</text:p>
          </table:table-cell>
          <table:covered-table-cell table:number-columns-repeated="2"/>
          <table:table-cell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MISSING TRANSITION REQUE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KNOWN CURRENT STAT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INVALID TARGET STAT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STALE ELIGIBILITY</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FULL READINESS FAILED</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AUTHORIZED ACTOR</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TRANSIT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CURRENT STATE CHANGED SINCE REQUE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DUPLICATE COMPLETED TRANSIT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3"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2"/>
          <table:covered-table-cell table:number-columns-repeated="2"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21:29.8523668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988" meta:object-count="1"/>
  </office:meta>
</office:document-meta>
</file>