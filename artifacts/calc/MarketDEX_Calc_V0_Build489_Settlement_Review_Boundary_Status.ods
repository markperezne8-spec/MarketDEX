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cell table:style-name="Build481Header" office:value-type="string">
            <text:p>Linkage Contradiction Check</text:p>
          </table:table-cell>
          <table:table-cell table:style-name="Build481Header" office:value-type="string">
            <text:p>Linkage Contradiction Resolution Guidance</text:p>
          </table:table-cell>
          <table:table-cell table:style-name="Build481Header" office:value-type="string">
            <text:p>Settlement Evidence Readiness</text:p>
          </table:table-cell>
          <table:table-cell table:style-name="Build481Header" office:value-type="string">
            <text:p>Settlement Evidence Review Guidance</text:p>
          </table:table-cell>
          <table:table-cell table:style-name="Build481Header" office:value-type="string">
            <text:p>Settlement Review Boundary Status</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quot;&quot;;IF(AND([.L2]=&quot;&quot;;[.N2]=&quot;&quot;);&quot;UNKNOWN&quot;;&quot;CONTRADICTION&quot;);IF([.M2]=&quot;UNMATCHED&quot;;IF(AND([.L2]=&quot;&quot;;[.N2]=&quot;&quot;);&quot;CLEAR&quot;;&quot;CONTRADICTION&quot;);IF([.M2]=&quot;SINGLE_SALE_LINKED&quot;;IF(AND([.L2]&lt;&gt;&quot;&quot;;[.N2]=&quot;&quot;);&quot;CLEAR&quot;;&quot;CONTRADICTION&quot;);IF([.M2]=&quot;MULTI_SALE_PENDING_ALLOCATION&quot;;IF([.L2]=&quot;&quot;;&quot;CLEAR&quot;;&quot;CONTRADICTION&quot;);IF([.M2]=&quot;ALLOCATED&quot;;IF(AND([.L2]=&quot;&quot;;[.N2]&lt;&gt;&quot;&quot;);&quot;CLEAR&quot;;&quot;CONTRADICTION&quot;);&quot;CONTRADICTION&quot;)))))">
            <text:p>UNKNOWN</text:p>
          </table:table-cell>
          <table:table-cell office:value-type="string" table:formula="of:=IF([.S2]=&quot;UNKNOWN&quot;;&quot;NO ACTION — linkage status is UNKNOWN / not asserted&quot;;IF([.S2]=&quot;CLEAR&quot;;&quot;NO CONTRADICTION — preserve evidence as entered&quot;;IF([.M2]=&quot;&quot;;&quot;REVIEW LINKAGE STATUS — identifiers are present while status is UNKNOWN&quot;;IF([.M2]=&quot;UNMATCHED&quot;;&quot;REMOVE LINKAGE IDENTIFIERS OR CORRECT LINKAGE STATUS&quot;;IF([.M2]=&quot;SINGLE_SALE_LINKED&quot;;&quot;REQUIRE LINKED SALE ID AND NO ALLOCATION GROUP ID&quot;;IF([.M2]=&quot;MULTI_SALE_PENDING_ALLOCATION&quot;;&quot;REMOVE LINKED SALE ID OR CORRECT LINKAGE STATUS&quot;;IF([.M2]=&quot;ALLOCATED&quot;;&quot;REQUIRE ALLOCATION GROUP ID AND NO LINKED SALE ID&quot;;&quot;REVIEW LINKAGE EVIDENCE — NO AUTHORITY CREATED&quot;)))))))">
            <text:p>NO ACTION — linkage status is UNKNOWN / not asserted</text:p>
          </table:table-cell>
          <table:table-cell office:value-type="string" table:formula="of:=IF([.S2]=&quot;CONTRADICTION&quot;;&quot;BLOCKED&quot;;IF([.S2]=&quot;UNKNOWN&quot;;&quot;UNKNOWN&quot;;IF([.S2]=&quot;CLEAR&quot;;IF(OR([.O2]=&quot;&quot;;[.P2]=&quot;&quot;);&quot;UNKNOWN&quot;;&quot;READY FOR REVIEW&quot;);&quot;BLOCKED&quot;)))">
            <text:p>UNKNOWN</text:p>
          </table:table-cell>
          <table:table-cell office:value-type="string" table:formula="of:=IF([.U2]=&quot;UNKNOWN&quot;;&quot;COMPLETE OR ASSERT REQUIRED EVIDENCE BEFORE REVIEW&quot;;IF([.U2]=&quot;BLOCKED&quot;;&quot;RESOLVE CONTRADICTION BEFORE REVIEW — NO AUTHORITY CREATED&quot;;IF([.U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quot;READY FOR REVIEW&quot;;&quot;REVIEW ELIGIBLE — NO AUTHORITY&quot;;IF(OR([.U2]=&quot;UNKNOWN&quot;;[.U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quot;&quot;;IF(AND([.L3]=&quot;&quot;;[.N3]=&quot;&quot;);&quot;UNKNOWN&quot;;&quot;CONTRADICTION&quot;);IF([.M3]=&quot;UNMATCHED&quot;;IF(AND([.L3]=&quot;&quot;;[.N3]=&quot;&quot;);&quot;CLEAR&quot;;&quot;CONTRADICTION&quot;);IF([.M3]=&quot;SINGLE_SALE_LINKED&quot;;IF(AND([.L3]&lt;&gt;&quot;&quot;;[.N3]=&quot;&quot;);&quot;CLEAR&quot;;&quot;CONTRADICTION&quot;);IF([.M3]=&quot;MULTI_SALE_PENDING_ALLOCATION&quot;;IF([.L3]=&quot;&quot;;&quot;CLEAR&quot;;&quot;CONTRADICTION&quot;);IF([.M3]=&quot;ALLOCATED&quot;;IF(AND([.L3]=&quot;&quot;;[.N3]&lt;&gt;&quot;&quot;);&quot;CLEAR&quot;;&quot;CONTRADICTION&quot;);&quot;CONTRADICTION&quot;)))))">
            <text:p>UNKNOWN</text:p>
          </table:table-cell>
          <table:table-cell office:value-type="string" table:formula="of:=IF([.S3]=&quot;UNKNOWN&quot;;&quot;NO ACTION — linkage status is UNKNOWN / not asserted&quot;;IF([.S3]=&quot;CLEAR&quot;;&quot;NO CONTRADICTION — preserve evidence as entered&quot;;IF([.M3]=&quot;&quot;;&quot;REVIEW LINKAGE STATUS — identifiers are present while status is UNKNOWN&quot;;IF([.M3]=&quot;UNMATCHED&quot;;&quot;REMOVE LINKAGE IDENTIFIERS OR CORRECT LINKAGE STATUS&quot;;IF([.M3]=&quot;SINGLE_SALE_LINKED&quot;;&quot;REQUIRE LINKED SALE ID AND NO ALLOCATION GROUP ID&quot;;IF([.M3]=&quot;MULTI_SALE_PENDING_ALLOCATION&quot;;&quot;REMOVE LINKED SALE ID OR CORRECT LINKAGE STATUS&quot;;IF([.M3]=&quot;ALLOCATED&quot;;&quot;REQUIRE ALLOCATION GROUP ID AND NO LINKED SALE ID&quot;;&quot;REVIEW LINKAGE EVIDENCE — NO AUTHORITY CREATED&quot;)))))))">
            <text:p>NO ACTION — linkage status is UNKNOWN / not asserted</text:p>
          </table:table-cell>
          <table:table-cell office:value-type="string" table:formula="of:=IF([.S3]=&quot;CONTRADICTION&quot;;&quot;BLOCKED&quot;;IF([.S3]=&quot;UNKNOWN&quot;;&quot;UNKNOWN&quot;;IF([.S3]=&quot;CLEAR&quot;;IF(OR([.O3]=&quot;&quot;;[.P3]=&quot;&quot;);&quot;UNKNOWN&quot;;&quot;READY FOR REVIEW&quot;);&quot;BLOCKED&quot;)))">
            <text:p>UNKNOWN</text:p>
          </table:table-cell>
          <table:table-cell office:value-type="string" table:formula="of:=IF([.U3]=&quot;UNKNOWN&quot;;&quot;COMPLETE OR ASSERT REQUIRED EVIDENCE BEFORE REVIEW&quot;;IF([.U3]=&quot;BLOCKED&quot;;&quot;RESOLVE CONTRADICTION BEFORE REVIEW — NO AUTHORITY CREATED&quot;;IF([.U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quot;READY FOR REVIEW&quot;;&quot;REVIEW ELIGIBLE — NO AUTHORITY&quot;;IF(OR([.U3]=&quot;UNKNOWN&quot;;[.U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quot;&quot;;IF(AND([.L4]=&quot;&quot;;[.N4]=&quot;&quot;);&quot;UNKNOWN&quot;;&quot;CONTRADICTION&quot;);IF([.M4]=&quot;UNMATCHED&quot;;IF(AND([.L4]=&quot;&quot;;[.N4]=&quot;&quot;);&quot;CLEAR&quot;;&quot;CONTRADICTION&quot;);IF([.M4]=&quot;SINGLE_SALE_LINKED&quot;;IF(AND([.L4]&lt;&gt;&quot;&quot;;[.N4]=&quot;&quot;);&quot;CLEAR&quot;;&quot;CONTRADICTION&quot;);IF([.M4]=&quot;MULTI_SALE_PENDING_ALLOCATION&quot;;IF([.L4]=&quot;&quot;;&quot;CLEAR&quot;;&quot;CONTRADICTION&quot;);IF([.M4]=&quot;ALLOCATED&quot;;IF(AND([.L4]=&quot;&quot;;[.N4]&lt;&gt;&quot;&quot;);&quot;CLEAR&quot;;&quot;CONTRADICTION&quot;);&quot;CONTRADICTION&quot;)))))">
            <text:p>UNKNOWN</text:p>
          </table:table-cell>
          <table:table-cell office:value-type="string" table:formula="of:=IF([.S4]=&quot;UNKNOWN&quot;;&quot;NO ACTION — linkage status is UNKNOWN / not asserted&quot;;IF([.S4]=&quot;CLEAR&quot;;&quot;NO CONTRADICTION — preserve evidence as entered&quot;;IF([.M4]=&quot;&quot;;&quot;REVIEW LINKAGE STATUS — identifiers are present while status is UNKNOWN&quot;;IF([.M4]=&quot;UNMATCHED&quot;;&quot;REMOVE LINKAGE IDENTIFIERS OR CORRECT LINKAGE STATUS&quot;;IF([.M4]=&quot;SINGLE_SALE_LINKED&quot;;&quot;REQUIRE LINKED SALE ID AND NO ALLOCATION GROUP ID&quot;;IF([.M4]=&quot;MULTI_SALE_PENDING_ALLOCATION&quot;;&quot;REMOVE LINKED SALE ID OR CORRECT LINKAGE STATUS&quot;;IF([.M4]=&quot;ALLOCATED&quot;;&quot;REQUIRE ALLOCATION GROUP ID AND NO LINKED SALE ID&quot;;&quot;REVIEW LINKAGE EVIDENCE — NO AUTHORITY CREATED&quot;)))))))">
            <text:p>NO ACTION — linkage status is UNKNOWN / not asserted</text:p>
          </table:table-cell>
          <table:table-cell office:value-type="string" table:formula="of:=IF([.S4]=&quot;CONTRADICTION&quot;;&quot;BLOCKED&quot;;IF([.S4]=&quot;UNKNOWN&quot;;&quot;UNKNOWN&quot;;IF([.S4]=&quot;CLEAR&quot;;IF(OR([.O4]=&quot;&quot;;[.P4]=&quot;&quot;);&quot;UNKNOWN&quot;;&quot;READY FOR REVIEW&quot;);&quot;BLOCKED&quot;)))">
            <text:p>UNKNOWN</text:p>
          </table:table-cell>
          <table:table-cell office:value-type="string" table:formula="of:=IF([.U4]=&quot;UNKNOWN&quot;;&quot;COMPLETE OR ASSERT REQUIRED EVIDENCE BEFORE REVIEW&quot;;IF([.U4]=&quot;BLOCKED&quot;;&quot;RESOLVE CONTRADICTION BEFORE REVIEW — NO AUTHORITY CREATED&quot;;IF([.U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quot;READY FOR REVIEW&quot;;&quot;REVIEW ELIGIBLE — NO AUTHORITY&quot;;IF(OR([.U4]=&quot;UNKNOWN&quot;;[.U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quot;&quot;;IF(AND([.L5]=&quot;&quot;;[.N5]=&quot;&quot;);&quot;UNKNOWN&quot;;&quot;CONTRADICTION&quot;);IF([.M5]=&quot;UNMATCHED&quot;;IF(AND([.L5]=&quot;&quot;;[.N5]=&quot;&quot;);&quot;CLEAR&quot;;&quot;CONTRADICTION&quot;);IF([.M5]=&quot;SINGLE_SALE_LINKED&quot;;IF(AND([.L5]&lt;&gt;&quot;&quot;;[.N5]=&quot;&quot;);&quot;CLEAR&quot;;&quot;CONTRADICTION&quot;);IF([.M5]=&quot;MULTI_SALE_PENDING_ALLOCATION&quot;;IF([.L5]=&quot;&quot;;&quot;CLEAR&quot;;&quot;CONTRADICTION&quot;);IF([.M5]=&quot;ALLOCATED&quot;;IF(AND([.L5]=&quot;&quot;;[.N5]&lt;&gt;&quot;&quot;);&quot;CLEAR&quot;;&quot;CONTRADICTION&quot;);&quot;CONTRADICTION&quot;)))))">
            <text:p>UNKNOWN</text:p>
          </table:table-cell>
          <table:table-cell office:value-type="string" table:formula="of:=IF([.S5]=&quot;UNKNOWN&quot;;&quot;NO ACTION — linkage status is UNKNOWN / not asserted&quot;;IF([.S5]=&quot;CLEAR&quot;;&quot;NO CONTRADICTION — preserve evidence as entered&quot;;IF([.M5]=&quot;&quot;;&quot;REVIEW LINKAGE STATUS — identifiers are present while status is UNKNOWN&quot;;IF([.M5]=&quot;UNMATCHED&quot;;&quot;REMOVE LINKAGE IDENTIFIERS OR CORRECT LINKAGE STATUS&quot;;IF([.M5]=&quot;SINGLE_SALE_LINKED&quot;;&quot;REQUIRE LINKED SALE ID AND NO ALLOCATION GROUP ID&quot;;IF([.M5]=&quot;MULTI_SALE_PENDING_ALLOCATION&quot;;&quot;REMOVE LINKED SALE ID OR CORRECT LINKAGE STATUS&quot;;IF([.M5]=&quot;ALLOCATED&quot;;&quot;REQUIRE ALLOCATION GROUP ID AND NO LINKED SALE ID&quot;;&quot;REVIEW LINKAGE EVIDENCE — NO AUTHORITY CREATED&quot;)))))))">
            <text:p>NO ACTION — linkage status is UNKNOWN / not asserted</text:p>
          </table:table-cell>
          <table:table-cell office:value-type="string" table:formula="of:=IF([.S5]=&quot;CONTRADICTION&quot;;&quot;BLOCKED&quot;;IF([.S5]=&quot;UNKNOWN&quot;;&quot;UNKNOWN&quot;;IF([.S5]=&quot;CLEAR&quot;;IF(OR([.O5]=&quot;&quot;;[.P5]=&quot;&quot;);&quot;UNKNOWN&quot;;&quot;READY FOR REVIEW&quot;);&quot;BLOCKED&quot;)))">
            <text:p>UNKNOWN</text:p>
          </table:table-cell>
          <table:table-cell office:value-type="string" table:formula="of:=IF([.U5]=&quot;UNKNOWN&quot;;&quot;COMPLETE OR ASSERT REQUIRED EVIDENCE BEFORE REVIEW&quot;;IF([.U5]=&quot;BLOCKED&quot;;&quot;RESOLVE CONTRADICTION BEFORE REVIEW — NO AUTHORITY CREATED&quot;;IF([.U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quot;READY FOR REVIEW&quot;;&quot;REVIEW ELIGIBLE — NO AUTHORITY&quot;;IF(OR([.U5]=&quot;UNKNOWN&quot;;[.U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quot;&quot;;IF(AND([.L6]=&quot;&quot;;[.N6]=&quot;&quot;);&quot;UNKNOWN&quot;;&quot;CONTRADICTION&quot;);IF([.M6]=&quot;UNMATCHED&quot;;IF(AND([.L6]=&quot;&quot;;[.N6]=&quot;&quot;);&quot;CLEAR&quot;;&quot;CONTRADICTION&quot;);IF([.M6]=&quot;SINGLE_SALE_LINKED&quot;;IF(AND([.L6]&lt;&gt;&quot;&quot;;[.N6]=&quot;&quot;);&quot;CLEAR&quot;;&quot;CONTRADICTION&quot;);IF([.M6]=&quot;MULTI_SALE_PENDING_ALLOCATION&quot;;IF([.L6]=&quot;&quot;;&quot;CLEAR&quot;;&quot;CONTRADICTION&quot;);IF([.M6]=&quot;ALLOCATED&quot;;IF(AND([.L6]=&quot;&quot;;[.N6]&lt;&gt;&quot;&quot;);&quot;CLEAR&quot;;&quot;CONTRADICTION&quot;);&quot;CONTRADICTION&quot;)))))">
            <text:p>UNKNOWN</text:p>
          </table:table-cell>
          <table:table-cell office:value-type="string" table:formula="of:=IF([.S6]=&quot;UNKNOWN&quot;;&quot;NO ACTION — linkage status is UNKNOWN / not asserted&quot;;IF([.S6]=&quot;CLEAR&quot;;&quot;NO CONTRADICTION — preserve evidence as entered&quot;;IF([.M6]=&quot;&quot;;&quot;REVIEW LINKAGE STATUS — identifiers are present while status is UNKNOWN&quot;;IF([.M6]=&quot;UNMATCHED&quot;;&quot;REMOVE LINKAGE IDENTIFIERS OR CORRECT LINKAGE STATUS&quot;;IF([.M6]=&quot;SINGLE_SALE_LINKED&quot;;&quot;REQUIRE LINKED SALE ID AND NO ALLOCATION GROUP ID&quot;;IF([.M6]=&quot;MULTI_SALE_PENDING_ALLOCATION&quot;;&quot;REMOVE LINKED SALE ID OR CORRECT LINKAGE STATUS&quot;;IF([.M6]=&quot;ALLOCATED&quot;;&quot;REQUIRE ALLOCATION GROUP ID AND NO LINKED SALE ID&quot;;&quot;REVIEW LINKAGE EVIDENCE — NO AUTHORITY CREATED&quot;)))))))">
            <text:p>NO ACTION — linkage status is UNKNOWN / not asserted</text:p>
          </table:table-cell>
          <table:table-cell office:value-type="string" table:formula="of:=IF([.S6]=&quot;CONTRADICTION&quot;;&quot;BLOCKED&quot;;IF([.S6]=&quot;UNKNOWN&quot;;&quot;UNKNOWN&quot;;IF([.S6]=&quot;CLEAR&quot;;IF(OR([.O6]=&quot;&quot;;[.P6]=&quot;&quot;);&quot;UNKNOWN&quot;;&quot;READY FOR REVIEW&quot;);&quot;BLOCKED&quot;)))">
            <text:p>UNKNOWN</text:p>
          </table:table-cell>
          <table:table-cell office:value-type="string" table:formula="of:=IF([.U6]=&quot;UNKNOWN&quot;;&quot;COMPLETE OR ASSERT REQUIRED EVIDENCE BEFORE REVIEW&quot;;IF([.U6]=&quot;BLOCKED&quot;;&quot;RESOLVE CONTRADICTION BEFORE REVIEW — NO AUTHORITY CREATED&quot;;IF([.U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quot;READY FOR REVIEW&quot;;&quot;REVIEW ELIGIBLE — NO AUTHORITY&quot;;IF(OR([.U6]=&quot;UNKNOWN&quot;;[.U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quot;&quot;;IF(AND([.L7]=&quot;&quot;;[.N7]=&quot;&quot;);&quot;UNKNOWN&quot;;&quot;CONTRADICTION&quot;);IF([.M7]=&quot;UNMATCHED&quot;;IF(AND([.L7]=&quot;&quot;;[.N7]=&quot;&quot;);&quot;CLEAR&quot;;&quot;CONTRADICTION&quot;);IF([.M7]=&quot;SINGLE_SALE_LINKED&quot;;IF(AND([.L7]&lt;&gt;&quot;&quot;;[.N7]=&quot;&quot;);&quot;CLEAR&quot;;&quot;CONTRADICTION&quot;);IF([.M7]=&quot;MULTI_SALE_PENDING_ALLOCATION&quot;;IF([.L7]=&quot;&quot;;&quot;CLEAR&quot;;&quot;CONTRADICTION&quot;);IF([.M7]=&quot;ALLOCATED&quot;;IF(AND([.L7]=&quot;&quot;;[.N7]&lt;&gt;&quot;&quot;);&quot;CLEAR&quot;;&quot;CONTRADICTION&quot;);&quot;CONTRADICTION&quot;)))))">
            <text:p>UNKNOWN</text:p>
          </table:table-cell>
          <table:table-cell office:value-type="string" table:formula="of:=IF([.S7]=&quot;UNKNOWN&quot;;&quot;NO ACTION — linkage status is UNKNOWN / not asserted&quot;;IF([.S7]=&quot;CLEAR&quot;;&quot;NO CONTRADICTION — preserve evidence as entered&quot;;IF([.M7]=&quot;&quot;;&quot;REVIEW LINKAGE STATUS — identifiers are present while status is UNKNOWN&quot;;IF([.M7]=&quot;UNMATCHED&quot;;&quot;REMOVE LINKAGE IDENTIFIERS OR CORRECT LINKAGE STATUS&quot;;IF([.M7]=&quot;SINGLE_SALE_LINKED&quot;;&quot;REQUIRE LINKED SALE ID AND NO ALLOCATION GROUP ID&quot;;IF([.M7]=&quot;MULTI_SALE_PENDING_ALLOCATION&quot;;&quot;REMOVE LINKED SALE ID OR CORRECT LINKAGE STATUS&quot;;IF([.M7]=&quot;ALLOCATED&quot;;&quot;REQUIRE ALLOCATION GROUP ID AND NO LINKED SALE ID&quot;;&quot;REVIEW LINKAGE EVIDENCE — NO AUTHORITY CREATED&quot;)))))))">
            <text:p>NO ACTION — linkage status is UNKNOWN / not asserted</text:p>
          </table:table-cell>
          <table:table-cell office:value-type="string" table:formula="of:=IF([.S7]=&quot;CONTRADICTION&quot;;&quot;BLOCKED&quot;;IF([.S7]=&quot;UNKNOWN&quot;;&quot;UNKNOWN&quot;;IF([.S7]=&quot;CLEAR&quot;;IF(OR([.O7]=&quot;&quot;;[.P7]=&quot;&quot;);&quot;UNKNOWN&quot;;&quot;READY FOR REVIEW&quot;);&quot;BLOCKED&quot;)))">
            <text:p>UNKNOWN</text:p>
          </table:table-cell>
          <table:table-cell office:value-type="string" table:formula="of:=IF([.U7]=&quot;UNKNOWN&quot;;&quot;COMPLETE OR ASSERT REQUIRED EVIDENCE BEFORE REVIEW&quot;;IF([.U7]=&quot;BLOCKED&quot;;&quot;RESOLVE CONTRADICTION BEFORE REVIEW — NO AUTHORITY CREATED&quot;;IF([.U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quot;READY FOR REVIEW&quot;;&quot;REVIEW ELIGIBLE — NO AUTHORITY&quot;;IF(OR([.U7]=&quot;UNKNOWN&quot;;[.U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quot;&quot;;IF(AND([.L8]=&quot;&quot;;[.N8]=&quot;&quot;);&quot;UNKNOWN&quot;;&quot;CONTRADICTION&quot;);IF([.M8]=&quot;UNMATCHED&quot;;IF(AND([.L8]=&quot;&quot;;[.N8]=&quot;&quot;);&quot;CLEAR&quot;;&quot;CONTRADICTION&quot;);IF([.M8]=&quot;SINGLE_SALE_LINKED&quot;;IF(AND([.L8]&lt;&gt;&quot;&quot;;[.N8]=&quot;&quot;);&quot;CLEAR&quot;;&quot;CONTRADICTION&quot;);IF([.M8]=&quot;MULTI_SALE_PENDING_ALLOCATION&quot;;IF([.L8]=&quot;&quot;;&quot;CLEAR&quot;;&quot;CONTRADICTION&quot;);IF([.M8]=&quot;ALLOCATED&quot;;IF(AND([.L8]=&quot;&quot;;[.N8]&lt;&gt;&quot;&quot;);&quot;CLEAR&quot;;&quot;CONTRADICTION&quot;);&quot;CONTRADICTION&quot;)))))">
            <text:p>UNKNOWN</text:p>
          </table:table-cell>
          <table:table-cell office:value-type="string" table:formula="of:=IF([.S8]=&quot;UNKNOWN&quot;;&quot;NO ACTION — linkage status is UNKNOWN / not asserted&quot;;IF([.S8]=&quot;CLEAR&quot;;&quot;NO CONTRADICTION — preserve evidence as entered&quot;;IF([.M8]=&quot;&quot;;&quot;REVIEW LINKAGE STATUS — identifiers are present while status is UNKNOWN&quot;;IF([.M8]=&quot;UNMATCHED&quot;;&quot;REMOVE LINKAGE IDENTIFIERS OR CORRECT LINKAGE STATUS&quot;;IF([.M8]=&quot;SINGLE_SALE_LINKED&quot;;&quot;REQUIRE LINKED SALE ID AND NO ALLOCATION GROUP ID&quot;;IF([.M8]=&quot;MULTI_SALE_PENDING_ALLOCATION&quot;;&quot;REMOVE LINKED SALE ID OR CORRECT LINKAGE STATUS&quot;;IF([.M8]=&quot;ALLOCATED&quot;;&quot;REQUIRE ALLOCATION GROUP ID AND NO LINKED SALE ID&quot;;&quot;REVIEW LINKAGE EVIDENCE — NO AUTHORITY CREATED&quot;)))))))">
            <text:p>NO ACTION — linkage status is UNKNOWN / not asserted</text:p>
          </table:table-cell>
          <table:table-cell office:value-type="string" table:formula="of:=IF([.S8]=&quot;CONTRADICTION&quot;;&quot;BLOCKED&quot;;IF([.S8]=&quot;UNKNOWN&quot;;&quot;UNKNOWN&quot;;IF([.S8]=&quot;CLEAR&quot;;IF(OR([.O8]=&quot;&quot;;[.P8]=&quot;&quot;);&quot;UNKNOWN&quot;;&quot;READY FOR REVIEW&quot;);&quot;BLOCKED&quot;)))">
            <text:p>UNKNOWN</text:p>
          </table:table-cell>
          <table:table-cell office:value-type="string" table:formula="of:=IF([.U8]=&quot;UNKNOWN&quot;;&quot;COMPLETE OR ASSERT REQUIRED EVIDENCE BEFORE REVIEW&quot;;IF([.U8]=&quot;BLOCKED&quot;;&quot;RESOLVE CONTRADICTION BEFORE REVIEW — NO AUTHORITY CREATED&quot;;IF([.U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quot;READY FOR REVIEW&quot;;&quot;REVIEW ELIGIBLE — NO AUTHORITY&quot;;IF(OR([.U8]=&quot;UNKNOWN&quot;;[.U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quot;&quot;;IF(AND([.L9]=&quot;&quot;;[.N9]=&quot;&quot;);&quot;UNKNOWN&quot;;&quot;CONTRADICTION&quot;);IF([.M9]=&quot;UNMATCHED&quot;;IF(AND([.L9]=&quot;&quot;;[.N9]=&quot;&quot;);&quot;CLEAR&quot;;&quot;CONTRADICTION&quot;);IF([.M9]=&quot;SINGLE_SALE_LINKED&quot;;IF(AND([.L9]&lt;&gt;&quot;&quot;;[.N9]=&quot;&quot;);&quot;CLEAR&quot;;&quot;CONTRADICTION&quot;);IF([.M9]=&quot;MULTI_SALE_PENDING_ALLOCATION&quot;;IF([.L9]=&quot;&quot;;&quot;CLEAR&quot;;&quot;CONTRADICTION&quot;);IF([.M9]=&quot;ALLOCATED&quot;;IF(AND([.L9]=&quot;&quot;;[.N9]&lt;&gt;&quot;&quot;);&quot;CLEAR&quot;;&quot;CONTRADICTION&quot;);&quot;CONTRADICTION&quot;)))))">
            <text:p>UNKNOWN</text:p>
          </table:table-cell>
          <table:table-cell office:value-type="string" table:formula="of:=IF([.S9]=&quot;UNKNOWN&quot;;&quot;NO ACTION — linkage status is UNKNOWN / not asserted&quot;;IF([.S9]=&quot;CLEAR&quot;;&quot;NO CONTRADICTION — preserve evidence as entered&quot;;IF([.M9]=&quot;&quot;;&quot;REVIEW LINKAGE STATUS — identifiers are present while status is UNKNOWN&quot;;IF([.M9]=&quot;UNMATCHED&quot;;&quot;REMOVE LINKAGE IDENTIFIERS OR CORRECT LINKAGE STATUS&quot;;IF([.M9]=&quot;SINGLE_SALE_LINKED&quot;;&quot;REQUIRE LINKED SALE ID AND NO ALLOCATION GROUP ID&quot;;IF([.M9]=&quot;MULTI_SALE_PENDING_ALLOCATION&quot;;&quot;REMOVE LINKED SALE ID OR CORRECT LINKAGE STATUS&quot;;IF([.M9]=&quot;ALLOCATED&quot;;&quot;REQUIRE ALLOCATION GROUP ID AND NO LINKED SALE ID&quot;;&quot;REVIEW LINKAGE EVIDENCE — NO AUTHORITY CREATED&quot;)))))))">
            <text:p>NO ACTION — linkage status is UNKNOWN / not asserted</text:p>
          </table:table-cell>
          <table:table-cell office:value-type="string" table:formula="of:=IF([.S9]=&quot;CONTRADICTION&quot;;&quot;BLOCKED&quot;;IF([.S9]=&quot;UNKNOWN&quot;;&quot;UNKNOWN&quot;;IF([.S9]=&quot;CLEAR&quot;;IF(OR([.O9]=&quot;&quot;;[.P9]=&quot;&quot;);&quot;UNKNOWN&quot;;&quot;READY FOR REVIEW&quot;);&quot;BLOCKED&quot;)))">
            <text:p>UNKNOWN</text:p>
          </table:table-cell>
          <table:table-cell office:value-type="string" table:formula="of:=IF([.U9]=&quot;UNKNOWN&quot;;&quot;COMPLETE OR ASSERT REQUIRED EVIDENCE BEFORE REVIEW&quot;;IF([.U9]=&quot;BLOCKED&quot;;&quot;RESOLVE CONTRADICTION BEFORE REVIEW — NO AUTHORITY CREATED&quot;;IF([.U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quot;READY FOR REVIEW&quot;;&quot;REVIEW ELIGIBLE — NO AUTHORITY&quot;;IF(OR([.U9]=&quot;UNKNOWN&quot;;[.U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quot;&quot;;IF(AND([.L10]=&quot;&quot;;[.N10]=&quot;&quot;);&quot;UNKNOWN&quot;;&quot;CONTRADICTION&quot;);IF([.M10]=&quot;UNMATCHED&quot;;IF(AND([.L10]=&quot;&quot;;[.N10]=&quot;&quot;);&quot;CLEAR&quot;;&quot;CONTRADICTION&quot;);IF([.M10]=&quot;SINGLE_SALE_LINKED&quot;;IF(AND([.L10]&lt;&gt;&quot;&quot;;[.N10]=&quot;&quot;);&quot;CLEAR&quot;;&quot;CONTRADICTION&quot;);IF([.M10]=&quot;MULTI_SALE_PENDING_ALLOCATION&quot;;IF([.L10]=&quot;&quot;;&quot;CLEAR&quot;;&quot;CONTRADICTION&quot;);IF([.M10]=&quot;ALLOCATED&quot;;IF(AND([.L10]=&quot;&quot;;[.N10]&lt;&gt;&quot;&quot;);&quot;CLEAR&quot;;&quot;CONTRADICTION&quot;);&quot;CONTRADICTION&quot;)))))">
            <text:p>UNKNOWN</text:p>
          </table:table-cell>
          <table:table-cell office:value-type="string" table:formula="of:=IF([.S10]=&quot;UNKNOWN&quot;;&quot;NO ACTION — linkage status is UNKNOWN / not asserted&quot;;IF([.S10]=&quot;CLEAR&quot;;&quot;NO CONTRADICTION — preserve evidence as entered&quot;;IF([.M10]=&quot;&quot;;&quot;REVIEW LINKAGE STATUS — identifiers are present while status is UNKNOWN&quot;;IF([.M10]=&quot;UNMATCHED&quot;;&quot;REMOVE LINKAGE IDENTIFIERS OR CORRECT LINKAGE STATUS&quot;;IF([.M10]=&quot;SINGLE_SALE_LINKED&quot;;&quot;REQUIRE LINKED SALE ID AND NO ALLOCATION GROUP ID&quot;;IF([.M10]=&quot;MULTI_SALE_PENDING_ALLOCATION&quot;;&quot;REMOVE LINKED SALE ID OR CORRECT LINKAGE STATUS&quot;;IF([.M10]=&quot;ALLOCATED&quot;;&quot;REQUIRE ALLOCATION GROUP ID AND NO LINKED SALE ID&quot;;&quot;REVIEW LINKAGE EVIDENCE — NO AUTHORITY CREATED&quot;)))))))">
            <text:p>NO ACTION — linkage status is UNKNOWN / not asserted</text:p>
          </table:table-cell>
          <table:table-cell office:value-type="string" table:formula="of:=IF([.S10]=&quot;CONTRADICTION&quot;;&quot;BLOCKED&quot;;IF([.S10]=&quot;UNKNOWN&quot;;&quot;UNKNOWN&quot;;IF([.S10]=&quot;CLEAR&quot;;IF(OR([.O10]=&quot;&quot;;[.P10]=&quot;&quot;);&quot;UNKNOWN&quot;;&quot;READY FOR REVIEW&quot;);&quot;BLOCKED&quot;)))">
            <text:p>UNKNOWN</text:p>
          </table:table-cell>
          <table:table-cell office:value-type="string" table:formula="of:=IF([.U10]=&quot;UNKNOWN&quot;;&quot;COMPLETE OR ASSERT REQUIRED EVIDENCE BEFORE REVIEW&quot;;IF([.U10]=&quot;BLOCKED&quot;;&quot;RESOLVE CONTRADICTION BEFORE REVIEW — NO AUTHORITY CREATED&quot;;IF([.U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quot;READY FOR REVIEW&quot;;&quot;REVIEW ELIGIBLE — NO AUTHORITY&quot;;IF(OR([.U10]=&quot;UNKNOWN&quot;;[.U1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quot;&quot;;IF(AND([.L11]=&quot;&quot;;[.N11]=&quot;&quot;);&quot;UNKNOWN&quot;;&quot;CONTRADICTION&quot;);IF([.M11]=&quot;UNMATCHED&quot;;IF(AND([.L11]=&quot;&quot;;[.N11]=&quot;&quot;);&quot;CLEAR&quot;;&quot;CONTRADICTION&quot;);IF([.M11]=&quot;SINGLE_SALE_LINKED&quot;;IF(AND([.L11]&lt;&gt;&quot;&quot;;[.N11]=&quot;&quot;);&quot;CLEAR&quot;;&quot;CONTRADICTION&quot;);IF([.M11]=&quot;MULTI_SALE_PENDING_ALLOCATION&quot;;IF([.L11]=&quot;&quot;;&quot;CLEAR&quot;;&quot;CONTRADICTION&quot;);IF([.M11]=&quot;ALLOCATED&quot;;IF(AND([.L11]=&quot;&quot;;[.N11]&lt;&gt;&quot;&quot;);&quot;CLEAR&quot;;&quot;CONTRADICTION&quot;);&quot;CONTRADICTION&quot;)))))">
            <text:p>UNKNOWN</text:p>
          </table:table-cell>
          <table:table-cell office:value-type="string" table:formula="of:=IF([.S11]=&quot;UNKNOWN&quot;;&quot;NO ACTION — linkage status is UNKNOWN / not asserted&quot;;IF([.S11]=&quot;CLEAR&quot;;&quot;NO CONTRADICTION — preserve evidence as entered&quot;;IF([.M11]=&quot;&quot;;&quot;REVIEW LINKAGE STATUS — identifiers are present while status is UNKNOWN&quot;;IF([.M11]=&quot;UNMATCHED&quot;;&quot;REMOVE LINKAGE IDENTIFIERS OR CORRECT LINKAGE STATUS&quot;;IF([.M11]=&quot;SINGLE_SALE_LINKED&quot;;&quot;REQUIRE LINKED SALE ID AND NO ALLOCATION GROUP ID&quot;;IF([.M11]=&quot;MULTI_SALE_PENDING_ALLOCATION&quot;;&quot;REMOVE LINKED SALE ID OR CORRECT LINKAGE STATUS&quot;;IF([.M11]=&quot;ALLOCATED&quot;;&quot;REQUIRE ALLOCATION GROUP ID AND NO LINKED SALE ID&quot;;&quot;REVIEW LINKAGE EVIDENCE — NO AUTHORITY CREATED&quot;)))))))">
            <text:p>NO ACTION — linkage status is UNKNOWN / not asserted</text:p>
          </table:table-cell>
          <table:table-cell office:value-type="string" table:formula="of:=IF([.S11]=&quot;CONTRADICTION&quot;;&quot;BLOCKED&quot;;IF([.S11]=&quot;UNKNOWN&quot;;&quot;UNKNOWN&quot;;IF([.S11]=&quot;CLEAR&quot;;IF(OR([.O11]=&quot;&quot;;[.P11]=&quot;&quot;);&quot;UNKNOWN&quot;;&quot;READY FOR REVIEW&quot;);&quot;BLOCKED&quot;)))">
            <text:p>UNKNOWN</text:p>
          </table:table-cell>
          <table:table-cell office:value-type="string" table:formula="of:=IF([.U11]=&quot;UNKNOWN&quot;;&quot;COMPLETE OR ASSERT REQUIRED EVIDENCE BEFORE REVIEW&quot;;IF([.U11]=&quot;BLOCKED&quot;;&quot;RESOLVE CONTRADICTION BEFORE REVIEW — NO AUTHORITY CREATED&quot;;IF([.U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quot;READY FOR REVIEW&quot;;&quot;REVIEW ELIGIBLE — NO AUTHORITY&quot;;IF(OR([.U11]=&quot;UNKNOWN&quot;;[.U1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quot;&quot;;IF(AND([.L12]=&quot;&quot;;[.N12]=&quot;&quot;);&quot;UNKNOWN&quot;;&quot;CONTRADICTION&quot;);IF([.M12]=&quot;UNMATCHED&quot;;IF(AND([.L12]=&quot;&quot;;[.N12]=&quot;&quot;);&quot;CLEAR&quot;;&quot;CONTRADICTION&quot;);IF([.M12]=&quot;SINGLE_SALE_LINKED&quot;;IF(AND([.L12]&lt;&gt;&quot;&quot;;[.N12]=&quot;&quot;);&quot;CLEAR&quot;;&quot;CONTRADICTION&quot;);IF([.M12]=&quot;MULTI_SALE_PENDING_ALLOCATION&quot;;IF([.L12]=&quot;&quot;;&quot;CLEAR&quot;;&quot;CONTRADICTION&quot;);IF([.M12]=&quot;ALLOCATED&quot;;IF(AND([.L12]=&quot;&quot;;[.N12]&lt;&gt;&quot;&quot;);&quot;CLEAR&quot;;&quot;CONTRADICTION&quot;);&quot;CONTRADICTION&quot;)))))">
            <text:p>UNKNOWN</text:p>
          </table:table-cell>
          <table:table-cell office:value-type="string" table:formula="of:=IF([.S12]=&quot;UNKNOWN&quot;;&quot;NO ACTION — linkage status is UNKNOWN / not asserted&quot;;IF([.S12]=&quot;CLEAR&quot;;&quot;NO CONTRADICTION — preserve evidence as entered&quot;;IF([.M12]=&quot;&quot;;&quot;REVIEW LINKAGE STATUS — identifiers are present while status is UNKNOWN&quot;;IF([.M12]=&quot;UNMATCHED&quot;;&quot;REMOVE LINKAGE IDENTIFIERS OR CORRECT LINKAGE STATUS&quot;;IF([.M12]=&quot;SINGLE_SALE_LINKED&quot;;&quot;REQUIRE LINKED SALE ID AND NO ALLOCATION GROUP ID&quot;;IF([.M12]=&quot;MULTI_SALE_PENDING_ALLOCATION&quot;;&quot;REMOVE LINKED SALE ID OR CORRECT LINKAGE STATUS&quot;;IF([.M12]=&quot;ALLOCATED&quot;;&quot;REQUIRE ALLOCATION GROUP ID AND NO LINKED SALE ID&quot;;&quot;REVIEW LINKAGE EVIDENCE — NO AUTHORITY CREATED&quot;)))))))">
            <text:p>NO ACTION — linkage status is UNKNOWN / not asserted</text:p>
          </table:table-cell>
          <table:table-cell office:value-type="string" table:formula="of:=IF([.S12]=&quot;CONTRADICTION&quot;;&quot;BLOCKED&quot;;IF([.S12]=&quot;UNKNOWN&quot;;&quot;UNKNOWN&quot;;IF([.S12]=&quot;CLEAR&quot;;IF(OR([.O12]=&quot;&quot;;[.P12]=&quot;&quot;);&quot;UNKNOWN&quot;;&quot;READY FOR REVIEW&quot;);&quot;BLOCKED&quot;)))">
            <text:p>UNKNOWN</text:p>
          </table:table-cell>
          <table:table-cell office:value-type="string" table:formula="of:=IF([.U12]=&quot;UNKNOWN&quot;;&quot;COMPLETE OR ASSERT REQUIRED EVIDENCE BEFORE REVIEW&quot;;IF([.U12]=&quot;BLOCKED&quot;;&quot;RESOLVE CONTRADICTION BEFORE REVIEW — NO AUTHORITY CREATED&quot;;IF([.U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quot;READY FOR REVIEW&quot;;&quot;REVIEW ELIGIBLE — NO AUTHORITY&quot;;IF(OR([.U12]=&quot;UNKNOWN&quot;;[.U1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quot;&quot;;IF(AND([.L13]=&quot;&quot;;[.N13]=&quot;&quot;);&quot;UNKNOWN&quot;;&quot;CONTRADICTION&quot;);IF([.M13]=&quot;UNMATCHED&quot;;IF(AND([.L13]=&quot;&quot;;[.N13]=&quot;&quot;);&quot;CLEAR&quot;;&quot;CONTRADICTION&quot;);IF([.M13]=&quot;SINGLE_SALE_LINKED&quot;;IF(AND([.L13]&lt;&gt;&quot;&quot;;[.N13]=&quot;&quot;);&quot;CLEAR&quot;;&quot;CONTRADICTION&quot;);IF([.M13]=&quot;MULTI_SALE_PENDING_ALLOCATION&quot;;IF([.L13]=&quot;&quot;;&quot;CLEAR&quot;;&quot;CONTRADICTION&quot;);IF([.M13]=&quot;ALLOCATED&quot;;IF(AND([.L13]=&quot;&quot;;[.N13]&lt;&gt;&quot;&quot;);&quot;CLEAR&quot;;&quot;CONTRADICTION&quot;);&quot;CONTRADICTION&quot;)))))">
            <text:p>UNKNOWN</text:p>
          </table:table-cell>
          <table:table-cell office:value-type="string" table:formula="of:=IF([.S13]=&quot;UNKNOWN&quot;;&quot;NO ACTION — linkage status is UNKNOWN / not asserted&quot;;IF([.S13]=&quot;CLEAR&quot;;&quot;NO CONTRADICTION — preserve evidence as entered&quot;;IF([.M13]=&quot;&quot;;&quot;REVIEW LINKAGE STATUS — identifiers are present while status is UNKNOWN&quot;;IF([.M13]=&quot;UNMATCHED&quot;;&quot;REMOVE LINKAGE IDENTIFIERS OR CORRECT LINKAGE STATUS&quot;;IF([.M13]=&quot;SINGLE_SALE_LINKED&quot;;&quot;REQUIRE LINKED SALE ID AND NO ALLOCATION GROUP ID&quot;;IF([.M13]=&quot;MULTI_SALE_PENDING_ALLOCATION&quot;;&quot;REMOVE LINKED SALE ID OR CORRECT LINKAGE STATUS&quot;;IF([.M13]=&quot;ALLOCATED&quot;;&quot;REQUIRE ALLOCATION GROUP ID AND NO LINKED SALE ID&quot;;&quot;REVIEW LINKAGE EVIDENCE — NO AUTHORITY CREATED&quot;)))))))">
            <text:p>NO ACTION — linkage status is UNKNOWN / not asserted</text:p>
          </table:table-cell>
          <table:table-cell office:value-type="string" table:formula="of:=IF([.S13]=&quot;CONTRADICTION&quot;;&quot;BLOCKED&quot;;IF([.S13]=&quot;UNKNOWN&quot;;&quot;UNKNOWN&quot;;IF([.S13]=&quot;CLEAR&quot;;IF(OR([.O13]=&quot;&quot;;[.P13]=&quot;&quot;);&quot;UNKNOWN&quot;;&quot;READY FOR REVIEW&quot;);&quot;BLOCKED&quot;)))">
            <text:p>UNKNOWN</text:p>
          </table:table-cell>
          <table:table-cell office:value-type="string" table:formula="of:=IF([.U13]=&quot;UNKNOWN&quot;;&quot;COMPLETE OR ASSERT REQUIRED EVIDENCE BEFORE REVIEW&quot;;IF([.U13]=&quot;BLOCKED&quot;;&quot;RESOLVE CONTRADICTION BEFORE REVIEW — NO AUTHORITY CREATED&quot;;IF([.U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quot;READY FOR REVIEW&quot;;&quot;REVIEW ELIGIBLE — NO AUTHORITY&quot;;IF(OR([.U13]=&quot;UNKNOWN&quot;;[.U1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quot;&quot;;IF(AND([.L14]=&quot;&quot;;[.N14]=&quot;&quot;);&quot;UNKNOWN&quot;;&quot;CONTRADICTION&quot;);IF([.M14]=&quot;UNMATCHED&quot;;IF(AND([.L14]=&quot;&quot;;[.N14]=&quot;&quot;);&quot;CLEAR&quot;;&quot;CONTRADICTION&quot;);IF([.M14]=&quot;SINGLE_SALE_LINKED&quot;;IF(AND([.L14]&lt;&gt;&quot;&quot;;[.N14]=&quot;&quot;);&quot;CLEAR&quot;;&quot;CONTRADICTION&quot;);IF([.M14]=&quot;MULTI_SALE_PENDING_ALLOCATION&quot;;IF([.L14]=&quot;&quot;;&quot;CLEAR&quot;;&quot;CONTRADICTION&quot;);IF([.M14]=&quot;ALLOCATED&quot;;IF(AND([.L14]=&quot;&quot;;[.N14]&lt;&gt;&quot;&quot;);&quot;CLEAR&quot;;&quot;CONTRADICTION&quot;);&quot;CONTRADICTION&quot;)))))">
            <text:p>UNKNOWN</text:p>
          </table:table-cell>
          <table:table-cell office:value-type="string" table:formula="of:=IF([.S14]=&quot;UNKNOWN&quot;;&quot;NO ACTION — linkage status is UNKNOWN / not asserted&quot;;IF([.S14]=&quot;CLEAR&quot;;&quot;NO CONTRADICTION — preserve evidence as entered&quot;;IF([.M14]=&quot;&quot;;&quot;REVIEW LINKAGE STATUS — identifiers are present while status is UNKNOWN&quot;;IF([.M14]=&quot;UNMATCHED&quot;;&quot;REMOVE LINKAGE IDENTIFIERS OR CORRECT LINKAGE STATUS&quot;;IF([.M14]=&quot;SINGLE_SALE_LINKED&quot;;&quot;REQUIRE LINKED SALE ID AND NO ALLOCATION GROUP ID&quot;;IF([.M14]=&quot;MULTI_SALE_PENDING_ALLOCATION&quot;;&quot;REMOVE LINKED SALE ID OR CORRECT LINKAGE STATUS&quot;;IF([.M14]=&quot;ALLOCATED&quot;;&quot;REQUIRE ALLOCATION GROUP ID AND NO LINKED SALE ID&quot;;&quot;REVIEW LINKAGE EVIDENCE — NO AUTHORITY CREATED&quot;)))))))">
            <text:p>NO ACTION — linkage status is UNKNOWN / not asserted</text:p>
          </table:table-cell>
          <table:table-cell office:value-type="string" table:formula="of:=IF([.S14]=&quot;CONTRADICTION&quot;;&quot;BLOCKED&quot;;IF([.S14]=&quot;UNKNOWN&quot;;&quot;UNKNOWN&quot;;IF([.S14]=&quot;CLEAR&quot;;IF(OR([.O14]=&quot;&quot;;[.P14]=&quot;&quot;);&quot;UNKNOWN&quot;;&quot;READY FOR REVIEW&quot;);&quot;BLOCKED&quot;)))">
            <text:p>UNKNOWN</text:p>
          </table:table-cell>
          <table:table-cell office:value-type="string" table:formula="of:=IF([.U14]=&quot;UNKNOWN&quot;;&quot;COMPLETE OR ASSERT REQUIRED EVIDENCE BEFORE REVIEW&quot;;IF([.U14]=&quot;BLOCKED&quot;;&quot;RESOLVE CONTRADICTION BEFORE REVIEW — NO AUTHORITY CREATED&quot;;IF([.U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quot;READY FOR REVIEW&quot;;&quot;REVIEW ELIGIBLE — NO AUTHORITY&quot;;IF(OR([.U14]=&quot;UNKNOWN&quot;;[.U1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quot;&quot;;IF(AND([.L15]=&quot;&quot;;[.N15]=&quot;&quot;);&quot;UNKNOWN&quot;;&quot;CONTRADICTION&quot;);IF([.M15]=&quot;UNMATCHED&quot;;IF(AND([.L15]=&quot;&quot;;[.N15]=&quot;&quot;);&quot;CLEAR&quot;;&quot;CONTRADICTION&quot;);IF([.M15]=&quot;SINGLE_SALE_LINKED&quot;;IF(AND([.L15]&lt;&gt;&quot;&quot;;[.N15]=&quot;&quot;);&quot;CLEAR&quot;;&quot;CONTRADICTION&quot;);IF([.M15]=&quot;MULTI_SALE_PENDING_ALLOCATION&quot;;IF([.L15]=&quot;&quot;;&quot;CLEAR&quot;;&quot;CONTRADICTION&quot;);IF([.M15]=&quot;ALLOCATED&quot;;IF(AND([.L15]=&quot;&quot;;[.N15]&lt;&gt;&quot;&quot;);&quot;CLEAR&quot;;&quot;CONTRADICTION&quot;);&quot;CONTRADICTION&quot;)))))">
            <text:p>UNKNOWN</text:p>
          </table:table-cell>
          <table:table-cell office:value-type="string" table:formula="of:=IF([.S15]=&quot;UNKNOWN&quot;;&quot;NO ACTION — linkage status is UNKNOWN / not asserted&quot;;IF([.S15]=&quot;CLEAR&quot;;&quot;NO CONTRADICTION — preserve evidence as entered&quot;;IF([.M15]=&quot;&quot;;&quot;REVIEW LINKAGE STATUS — identifiers are present while status is UNKNOWN&quot;;IF([.M15]=&quot;UNMATCHED&quot;;&quot;REMOVE LINKAGE IDENTIFIERS OR CORRECT LINKAGE STATUS&quot;;IF([.M15]=&quot;SINGLE_SALE_LINKED&quot;;&quot;REQUIRE LINKED SALE ID AND NO ALLOCATION GROUP ID&quot;;IF([.M15]=&quot;MULTI_SALE_PENDING_ALLOCATION&quot;;&quot;REMOVE LINKED SALE ID OR CORRECT LINKAGE STATUS&quot;;IF([.M15]=&quot;ALLOCATED&quot;;&quot;REQUIRE ALLOCATION GROUP ID AND NO LINKED SALE ID&quot;;&quot;REVIEW LINKAGE EVIDENCE — NO AUTHORITY CREATED&quot;)))))))">
            <text:p>NO ACTION — linkage status is UNKNOWN / not asserted</text:p>
          </table:table-cell>
          <table:table-cell office:value-type="string" table:formula="of:=IF([.S15]=&quot;CONTRADICTION&quot;;&quot;BLOCKED&quot;;IF([.S15]=&quot;UNKNOWN&quot;;&quot;UNKNOWN&quot;;IF([.S15]=&quot;CLEAR&quot;;IF(OR([.O15]=&quot;&quot;;[.P15]=&quot;&quot;);&quot;UNKNOWN&quot;;&quot;READY FOR REVIEW&quot;);&quot;BLOCKED&quot;)))">
            <text:p>UNKNOWN</text:p>
          </table:table-cell>
          <table:table-cell office:value-type="string" table:formula="of:=IF([.U15]=&quot;UNKNOWN&quot;;&quot;COMPLETE OR ASSERT REQUIRED EVIDENCE BEFORE REVIEW&quot;;IF([.U15]=&quot;BLOCKED&quot;;&quot;RESOLVE CONTRADICTION BEFORE REVIEW — NO AUTHORITY CREATED&quot;;IF([.U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quot;READY FOR REVIEW&quot;;&quot;REVIEW ELIGIBLE — NO AUTHORITY&quot;;IF(OR([.U15]=&quot;UNKNOWN&quot;;[.U1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quot;&quot;;IF(AND([.L16]=&quot;&quot;;[.N16]=&quot;&quot;);&quot;UNKNOWN&quot;;&quot;CONTRADICTION&quot;);IF([.M16]=&quot;UNMATCHED&quot;;IF(AND([.L16]=&quot;&quot;;[.N16]=&quot;&quot;);&quot;CLEAR&quot;;&quot;CONTRADICTION&quot;);IF([.M16]=&quot;SINGLE_SALE_LINKED&quot;;IF(AND([.L16]&lt;&gt;&quot;&quot;;[.N16]=&quot;&quot;);&quot;CLEAR&quot;;&quot;CONTRADICTION&quot;);IF([.M16]=&quot;MULTI_SALE_PENDING_ALLOCATION&quot;;IF([.L16]=&quot;&quot;;&quot;CLEAR&quot;;&quot;CONTRADICTION&quot;);IF([.M16]=&quot;ALLOCATED&quot;;IF(AND([.L16]=&quot;&quot;;[.N16]&lt;&gt;&quot;&quot;);&quot;CLEAR&quot;;&quot;CONTRADICTION&quot;);&quot;CONTRADICTION&quot;)))))">
            <text:p>UNKNOWN</text:p>
          </table:table-cell>
          <table:table-cell office:value-type="string" table:formula="of:=IF([.S16]=&quot;UNKNOWN&quot;;&quot;NO ACTION — linkage status is UNKNOWN / not asserted&quot;;IF([.S16]=&quot;CLEAR&quot;;&quot;NO CONTRADICTION — preserve evidence as entered&quot;;IF([.M16]=&quot;&quot;;&quot;REVIEW LINKAGE STATUS — identifiers are present while status is UNKNOWN&quot;;IF([.M16]=&quot;UNMATCHED&quot;;&quot;REMOVE LINKAGE IDENTIFIERS OR CORRECT LINKAGE STATUS&quot;;IF([.M16]=&quot;SINGLE_SALE_LINKED&quot;;&quot;REQUIRE LINKED SALE ID AND NO ALLOCATION GROUP ID&quot;;IF([.M16]=&quot;MULTI_SALE_PENDING_ALLOCATION&quot;;&quot;REMOVE LINKED SALE ID OR CORRECT LINKAGE STATUS&quot;;IF([.M16]=&quot;ALLOCATED&quot;;&quot;REQUIRE ALLOCATION GROUP ID AND NO LINKED SALE ID&quot;;&quot;REVIEW LINKAGE EVIDENCE — NO AUTHORITY CREATED&quot;)))))))">
            <text:p>NO ACTION — linkage status is UNKNOWN / not asserted</text:p>
          </table:table-cell>
          <table:table-cell office:value-type="string" table:formula="of:=IF([.S16]=&quot;CONTRADICTION&quot;;&quot;BLOCKED&quot;;IF([.S16]=&quot;UNKNOWN&quot;;&quot;UNKNOWN&quot;;IF([.S16]=&quot;CLEAR&quot;;IF(OR([.O16]=&quot;&quot;;[.P16]=&quot;&quot;);&quot;UNKNOWN&quot;;&quot;READY FOR REVIEW&quot;);&quot;BLOCKED&quot;)))">
            <text:p>UNKNOWN</text:p>
          </table:table-cell>
          <table:table-cell office:value-type="string" table:formula="of:=IF([.U16]=&quot;UNKNOWN&quot;;&quot;COMPLETE OR ASSERT REQUIRED EVIDENCE BEFORE REVIEW&quot;;IF([.U16]=&quot;BLOCKED&quot;;&quot;RESOLVE CONTRADICTION BEFORE REVIEW — NO AUTHORITY CREATED&quot;;IF([.U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quot;READY FOR REVIEW&quot;;&quot;REVIEW ELIGIBLE — NO AUTHORITY&quot;;IF(OR([.U16]=&quot;UNKNOWN&quot;;[.U1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quot;&quot;;IF(AND([.L17]=&quot;&quot;;[.N17]=&quot;&quot;);&quot;UNKNOWN&quot;;&quot;CONTRADICTION&quot;);IF([.M17]=&quot;UNMATCHED&quot;;IF(AND([.L17]=&quot;&quot;;[.N17]=&quot;&quot;);&quot;CLEAR&quot;;&quot;CONTRADICTION&quot;);IF([.M17]=&quot;SINGLE_SALE_LINKED&quot;;IF(AND([.L17]&lt;&gt;&quot;&quot;;[.N17]=&quot;&quot;);&quot;CLEAR&quot;;&quot;CONTRADICTION&quot;);IF([.M17]=&quot;MULTI_SALE_PENDING_ALLOCATION&quot;;IF([.L17]=&quot;&quot;;&quot;CLEAR&quot;;&quot;CONTRADICTION&quot;);IF([.M17]=&quot;ALLOCATED&quot;;IF(AND([.L17]=&quot;&quot;;[.N17]&lt;&gt;&quot;&quot;);&quot;CLEAR&quot;;&quot;CONTRADICTION&quot;);&quot;CONTRADICTION&quot;)))))">
            <text:p>UNKNOWN</text:p>
          </table:table-cell>
          <table:table-cell office:value-type="string" table:formula="of:=IF([.S17]=&quot;UNKNOWN&quot;;&quot;NO ACTION — linkage status is UNKNOWN / not asserted&quot;;IF([.S17]=&quot;CLEAR&quot;;&quot;NO CONTRADICTION — preserve evidence as entered&quot;;IF([.M17]=&quot;&quot;;&quot;REVIEW LINKAGE STATUS — identifiers are present while status is UNKNOWN&quot;;IF([.M17]=&quot;UNMATCHED&quot;;&quot;REMOVE LINKAGE IDENTIFIERS OR CORRECT LINKAGE STATUS&quot;;IF([.M17]=&quot;SINGLE_SALE_LINKED&quot;;&quot;REQUIRE LINKED SALE ID AND NO ALLOCATION GROUP ID&quot;;IF([.M17]=&quot;MULTI_SALE_PENDING_ALLOCATION&quot;;&quot;REMOVE LINKED SALE ID OR CORRECT LINKAGE STATUS&quot;;IF([.M17]=&quot;ALLOCATED&quot;;&quot;REQUIRE ALLOCATION GROUP ID AND NO LINKED SALE ID&quot;;&quot;REVIEW LINKAGE EVIDENCE — NO AUTHORITY CREATED&quot;)))))))">
            <text:p>NO ACTION — linkage status is UNKNOWN / not asserted</text:p>
          </table:table-cell>
          <table:table-cell office:value-type="string" table:formula="of:=IF([.S17]=&quot;CONTRADICTION&quot;;&quot;BLOCKED&quot;;IF([.S17]=&quot;UNKNOWN&quot;;&quot;UNKNOWN&quot;;IF([.S17]=&quot;CLEAR&quot;;IF(OR([.O17]=&quot;&quot;;[.P17]=&quot;&quot;);&quot;UNKNOWN&quot;;&quot;READY FOR REVIEW&quot;);&quot;BLOCKED&quot;)))">
            <text:p>UNKNOWN</text:p>
          </table:table-cell>
          <table:table-cell office:value-type="string" table:formula="of:=IF([.U17]=&quot;UNKNOWN&quot;;&quot;COMPLETE OR ASSERT REQUIRED EVIDENCE BEFORE REVIEW&quot;;IF([.U17]=&quot;BLOCKED&quot;;&quot;RESOLVE CONTRADICTION BEFORE REVIEW — NO AUTHORITY CREATED&quot;;IF([.U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quot;READY FOR REVIEW&quot;;&quot;REVIEW ELIGIBLE — NO AUTHORITY&quot;;IF(OR([.U17]=&quot;UNKNOWN&quot;;[.U1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quot;&quot;;IF(AND([.L18]=&quot;&quot;;[.N18]=&quot;&quot;);&quot;UNKNOWN&quot;;&quot;CONTRADICTION&quot;);IF([.M18]=&quot;UNMATCHED&quot;;IF(AND([.L18]=&quot;&quot;;[.N18]=&quot;&quot;);&quot;CLEAR&quot;;&quot;CONTRADICTION&quot;);IF([.M18]=&quot;SINGLE_SALE_LINKED&quot;;IF(AND([.L18]&lt;&gt;&quot;&quot;;[.N18]=&quot;&quot;);&quot;CLEAR&quot;;&quot;CONTRADICTION&quot;);IF([.M18]=&quot;MULTI_SALE_PENDING_ALLOCATION&quot;;IF([.L18]=&quot;&quot;;&quot;CLEAR&quot;;&quot;CONTRADICTION&quot;);IF([.M18]=&quot;ALLOCATED&quot;;IF(AND([.L18]=&quot;&quot;;[.N18]&lt;&gt;&quot;&quot;);&quot;CLEAR&quot;;&quot;CONTRADICTION&quot;);&quot;CONTRADICTION&quot;)))))">
            <text:p>UNKNOWN</text:p>
          </table:table-cell>
          <table:table-cell office:value-type="string" table:formula="of:=IF([.S18]=&quot;UNKNOWN&quot;;&quot;NO ACTION — linkage status is UNKNOWN / not asserted&quot;;IF([.S18]=&quot;CLEAR&quot;;&quot;NO CONTRADICTION — preserve evidence as entered&quot;;IF([.M18]=&quot;&quot;;&quot;REVIEW LINKAGE STATUS — identifiers are present while status is UNKNOWN&quot;;IF([.M18]=&quot;UNMATCHED&quot;;&quot;REMOVE LINKAGE IDENTIFIERS OR CORRECT LINKAGE STATUS&quot;;IF([.M18]=&quot;SINGLE_SALE_LINKED&quot;;&quot;REQUIRE LINKED SALE ID AND NO ALLOCATION GROUP ID&quot;;IF([.M18]=&quot;MULTI_SALE_PENDING_ALLOCATION&quot;;&quot;REMOVE LINKED SALE ID OR CORRECT LINKAGE STATUS&quot;;IF([.M18]=&quot;ALLOCATED&quot;;&quot;REQUIRE ALLOCATION GROUP ID AND NO LINKED SALE ID&quot;;&quot;REVIEW LINKAGE EVIDENCE — NO AUTHORITY CREATED&quot;)))))))">
            <text:p>NO ACTION — linkage status is UNKNOWN / not asserted</text:p>
          </table:table-cell>
          <table:table-cell office:value-type="string" table:formula="of:=IF([.S18]=&quot;CONTRADICTION&quot;;&quot;BLOCKED&quot;;IF([.S18]=&quot;UNKNOWN&quot;;&quot;UNKNOWN&quot;;IF([.S18]=&quot;CLEAR&quot;;IF(OR([.O18]=&quot;&quot;;[.P18]=&quot;&quot;);&quot;UNKNOWN&quot;;&quot;READY FOR REVIEW&quot;);&quot;BLOCKED&quot;)))">
            <text:p>UNKNOWN</text:p>
          </table:table-cell>
          <table:table-cell office:value-type="string" table:formula="of:=IF([.U18]=&quot;UNKNOWN&quot;;&quot;COMPLETE OR ASSERT REQUIRED EVIDENCE BEFORE REVIEW&quot;;IF([.U18]=&quot;BLOCKED&quot;;&quot;RESOLVE CONTRADICTION BEFORE REVIEW — NO AUTHORITY CREATED&quot;;IF([.U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quot;READY FOR REVIEW&quot;;&quot;REVIEW ELIGIBLE — NO AUTHORITY&quot;;IF(OR([.U18]=&quot;UNKNOWN&quot;;[.U1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quot;&quot;;IF(AND([.L19]=&quot;&quot;;[.N19]=&quot;&quot;);&quot;UNKNOWN&quot;;&quot;CONTRADICTION&quot;);IF([.M19]=&quot;UNMATCHED&quot;;IF(AND([.L19]=&quot;&quot;;[.N19]=&quot;&quot;);&quot;CLEAR&quot;;&quot;CONTRADICTION&quot;);IF([.M19]=&quot;SINGLE_SALE_LINKED&quot;;IF(AND([.L19]&lt;&gt;&quot;&quot;;[.N19]=&quot;&quot;);&quot;CLEAR&quot;;&quot;CONTRADICTION&quot;);IF([.M19]=&quot;MULTI_SALE_PENDING_ALLOCATION&quot;;IF([.L19]=&quot;&quot;;&quot;CLEAR&quot;;&quot;CONTRADICTION&quot;);IF([.M19]=&quot;ALLOCATED&quot;;IF(AND([.L19]=&quot;&quot;;[.N19]&lt;&gt;&quot;&quot;);&quot;CLEAR&quot;;&quot;CONTRADICTION&quot;);&quot;CONTRADICTION&quot;)))))">
            <text:p>UNKNOWN</text:p>
          </table:table-cell>
          <table:table-cell office:value-type="string" table:formula="of:=IF([.S19]=&quot;UNKNOWN&quot;;&quot;NO ACTION — linkage status is UNKNOWN / not asserted&quot;;IF([.S19]=&quot;CLEAR&quot;;&quot;NO CONTRADICTION — preserve evidence as entered&quot;;IF([.M19]=&quot;&quot;;&quot;REVIEW LINKAGE STATUS — identifiers are present while status is UNKNOWN&quot;;IF([.M19]=&quot;UNMATCHED&quot;;&quot;REMOVE LINKAGE IDENTIFIERS OR CORRECT LINKAGE STATUS&quot;;IF([.M19]=&quot;SINGLE_SALE_LINKED&quot;;&quot;REQUIRE LINKED SALE ID AND NO ALLOCATION GROUP ID&quot;;IF([.M19]=&quot;MULTI_SALE_PENDING_ALLOCATION&quot;;&quot;REMOVE LINKED SALE ID OR CORRECT LINKAGE STATUS&quot;;IF([.M19]=&quot;ALLOCATED&quot;;&quot;REQUIRE ALLOCATION GROUP ID AND NO LINKED SALE ID&quot;;&quot;REVIEW LINKAGE EVIDENCE — NO AUTHORITY CREATED&quot;)))))))">
            <text:p>NO ACTION — linkage status is UNKNOWN / not asserted</text:p>
          </table:table-cell>
          <table:table-cell office:value-type="string" table:formula="of:=IF([.S19]=&quot;CONTRADICTION&quot;;&quot;BLOCKED&quot;;IF([.S19]=&quot;UNKNOWN&quot;;&quot;UNKNOWN&quot;;IF([.S19]=&quot;CLEAR&quot;;IF(OR([.O19]=&quot;&quot;;[.P19]=&quot;&quot;);&quot;UNKNOWN&quot;;&quot;READY FOR REVIEW&quot;);&quot;BLOCKED&quot;)))">
            <text:p>UNKNOWN</text:p>
          </table:table-cell>
          <table:table-cell office:value-type="string" table:formula="of:=IF([.U19]=&quot;UNKNOWN&quot;;&quot;COMPLETE OR ASSERT REQUIRED EVIDENCE BEFORE REVIEW&quot;;IF([.U19]=&quot;BLOCKED&quot;;&quot;RESOLVE CONTRADICTION BEFORE REVIEW — NO AUTHORITY CREATED&quot;;IF([.U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quot;READY FOR REVIEW&quot;;&quot;REVIEW ELIGIBLE — NO AUTHORITY&quot;;IF(OR([.U19]=&quot;UNKNOWN&quot;;[.U1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quot;&quot;;IF(AND([.L20]=&quot;&quot;;[.N20]=&quot;&quot;);&quot;UNKNOWN&quot;;&quot;CONTRADICTION&quot;);IF([.M20]=&quot;UNMATCHED&quot;;IF(AND([.L20]=&quot;&quot;;[.N20]=&quot;&quot;);&quot;CLEAR&quot;;&quot;CONTRADICTION&quot;);IF([.M20]=&quot;SINGLE_SALE_LINKED&quot;;IF(AND([.L20]&lt;&gt;&quot;&quot;;[.N20]=&quot;&quot;);&quot;CLEAR&quot;;&quot;CONTRADICTION&quot;);IF([.M20]=&quot;MULTI_SALE_PENDING_ALLOCATION&quot;;IF([.L20]=&quot;&quot;;&quot;CLEAR&quot;;&quot;CONTRADICTION&quot;);IF([.M20]=&quot;ALLOCATED&quot;;IF(AND([.L20]=&quot;&quot;;[.N20]&lt;&gt;&quot;&quot;);&quot;CLEAR&quot;;&quot;CONTRADICTION&quot;);&quot;CONTRADICTION&quot;)))))">
            <text:p>UNKNOWN</text:p>
          </table:table-cell>
          <table:table-cell office:value-type="string" table:formula="of:=IF([.S20]=&quot;UNKNOWN&quot;;&quot;NO ACTION — linkage status is UNKNOWN / not asserted&quot;;IF([.S20]=&quot;CLEAR&quot;;&quot;NO CONTRADICTION — preserve evidence as entered&quot;;IF([.M20]=&quot;&quot;;&quot;REVIEW LINKAGE STATUS — identifiers are present while status is UNKNOWN&quot;;IF([.M20]=&quot;UNMATCHED&quot;;&quot;REMOVE LINKAGE IDENTIFIERS OR CORRECT LINKAGE STATUS&quot;;IF([.M20]=&quot;SINGLE_SALE_LINKED&quot;;&quot;REQUIRE LINKED SALE ID AND NO ALLOCATION GROUP ID&quot;;IF([.M20]=&quot;MULTI_SALE_PENDING_ALLOCATION&quot;;&quot;REMOVE LINKED SALE ID OR CORRECT LINKAGE STATUS&quot;;IF([.M20]=&quot;ALLOCATED&quot;;&quot;REQUIRE ALLOCATION GROUP ID AND NO LINKED SALE ID&quot;;&quot;REVIEW LINKAGE EVIDENCE — NO AUTHORITY CREATED&quot;)))))))">
            <text:p>NO ACTION — linkage status is UNKNOWN / not asserted</text:p>
          </table:table-cell>
          <table:table-cell office:value-type="string" table:formula="of:=IF([.S20]=&quot;CONTRADICTION&quot;;&quot;BLOCKED&quot;;IF([.S20]=&quot;UNKNOWN&quot;;&quot;UNKNOWN&quot;;IF([.S20]=&quot;CLEAR&quot;;IF(OR([.O20]=&quot;&quot;;[.P20]=&quot;&quot;);&quot;UNKNOWN&quot;;&quot;READY FOR REVIEW&quot;);&quot;BLOCKED&quot;)))">
            <text:p>UNKNOWN</text:p>
          </table:table-cell>
          <table:table-cell office:value-type="string" table:formula="of:=IF([.U20]=&quot;UNKNOWN&quot;;&quot;COMPLETE OR ASSERT REQUIRED EVIDENCE BEFORE REVIEW&quot;;IF([.U20]=&quot;BLOCKED&quot;;&quot;RESOLVE CONTRADICTION BEFORE REVIEW — NO AUTHORITY CREATED&quot;;IF([.U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quot;READY FOR REVIEW&quot;;&quot;REVIEW ELIGIBLE — NO AUTHORITY&quot;;IF(OR([.U20]=&quot;UNKNOWN&quot;;[.U2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quot;&quot;;IF(AND([.L21]=&quot;&quot;;[.N21]=&quot;&quot;);&quot;UNKNOWN&quot;;&quot;CONTRADICTION&quot;);IF([.M21]=&quot;UNMATCHED&quot;;IF(AND([.L21]=&quot;&quot;;[.N21]=&quot;&quot;);&quot;CLEAR&quot;;&quot;CONTRADICTION&quot;);IF([.M21]=&quot;SINGLE_SALE_LINKED&quot;;IF(AND([.L21]&lt;&gt;&quot;&quot;;[.N21]=&quot;&quot;);&quot;CLEAR&quot;;&quot;CONTRADICTION&quot;);IF([.M21]=&quot;MULTI_SALE_PENDING_ALLOCATION&quot;;IF([.L21]=&quot;&quot;;&quot;CLEAR&quot;;&quot;CONTRADICTION&quot;);IF([.M21]=&quot;ALLOCATED&quot;;IF(AND([.L21]=&quot;&quot;;[.N21]&lt;&gt;&quot;&quot;);&quot;CLEAR&quot;;&quot;CONTRADICTION&quot;);&quot;CONTRADICTION&quot;)))))">
            <text:p>UNKNOWN</text:p>
          </table:table-cell>
          <table:table-cell office:value-type="string" table:formula="of:=IF([.S21]=&quot;UNKNOWN&quot;;&quot;NO ACTION — linkage status is UNKNOWN / not asserted&quot;;IF([.S21]=&quot;CLEAR&quot;;&quot;NO CONTRADICTION — preserve evidence as entered&quot;;IF([.M21]=&quot;&quot;;&quot;REVIEW LINKAGE STATUS — identifiers are present while status is UNKNOWN&quot;;IF([.M21]=&quot;UNMATCHED&quot;;&quot;REMOVE LINKAGE IDENTIFIERS OR CORRECT LINKAGE STATUS&quot;;IF([.M21]=&quot;SINGLE_SALE_LINKED&quot;;&quot;REQUIRE LINKED SALE ID AND NO ALLOCATION GROUP ID&quot;;IF([.M21]=&quot;MULTI_SALE_PENDING_ALLOCATION&quot;;&quot;REMOVE LINKED SALE ID OR CORRECT LINKAGE STATUS&quot;;IF([.M21]=&quot;ALLOCATED&quot;;&quot;REQUIRE ALLOCATION GROUP ID AND NO LINKED SALE ID&quot;;&quot;REVIEW LINKAGE EVIDENCE — NO AUTHORITY CREATED&quot;)))))))">
            <text:p>NO ACTION — linkage status is UNKNOWN / not asserted</text:p>
          </table:table-cell>
          <table:table-cell office:value-type="string" table:formula="of:=IF([.S21]=&quot;CONTRADICTION&quot;;&quot;BLOCKED&quot;;IF([.S21]=&quot;UNKNOWN&quot;;&quot;UNKNOWN&quot;;IF([.S21]=&quot;CLEAR&quot;;IF(OR([.O21]=&quot;&quot;;[.P21]=&quot;&quot;);&quot;UNKNOWN&quot;;&quot;READY FOR REVIEW&quot;);&quot;BLOCKED&quot;)))">
            <text:p>UNKNOWN</text:p>
          </table:table-cell>
          <table:table-cell office:value-type="string" table:formula="of:=IF([.U21]=&quot;UNKNOWN&quot;;&quot;COMPLETE OR ASSERT REQUIRED EVIDENCE BEFORE REVIEW&quot;;IF([.U21]=&quot;BLOCKED&quot;;&quot;RESOLVE CONTRADICTION BEFORE REVIEW — NO AUTHORITY CREATED&quot;;IF([.U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quot;READY FOR REVIEW&quot;;&quot;REVIEW ELIGIBLE — NO AUTHORITY&quot;;IF(OR([.U21]=&quot;UNKNOWN&quot;;[.U2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quot;&quot;;IF(AND([.L22]=&quot;&quot;;[.N22]=&quot;&quot;);&quot;UNKNOWN&quot;;&quot;CONTRADICTION&quot;);IF([.M22]=&quot;UNMATCHED&quot;;IF(AND([.L22]=&quot;&quot;;[.N22]=&quot;&quot;);&quot;CLEAR&quot;;&quot;CONTRADICTION&quot;);IF([.M22]=&quot;SINGLE_SALE_LINKED&quot;;IF(AND([.L22]&lt;&gt;&quot;&quot;;[.N22]=&quot;&quot;);&quot;CLEAR&quot;;&quot;CONTRADICTION&quot;);IF([.M22]=&quot;MULTI_SALE_PENDING_ALLOCATION&quot;;IF([.L22]=&quot;&quot;;&quot;CLEAR&quot;;&quot;CONTRADICTION&quot;);IF([.M22]=&quot;ALLOCATED&quot;;IF(AND([.L22]=&quot;&quot;;[.N22]&lt;&gt;&quot;&quot;);&quot;CLEAR&quot;;&quot;CONTRADICTION&quot;);&quot;CONTRADICTION&quot;)))))">
            <text:p>UNKNOWN</text:p>
          </table:table-cell>
          <table:table-cell office:value-type="string" table:formula="of:=IF([.S22]=&quot;UNKNOWN&quot;;&quot;NO ACTION — linkage status is UNKNOWN / not asserted&quot;;IF([.S22]=&quot;CLEAR&quot;;&quot;NO CONTRADICTION — preserve evidence as entered&quot;;IF([.M22]=&quot;&quot;;&quot;REVIEW LINKAGE STATUS — identifiers are present while status is UNKNOWN&quot;;IF([.M22]=&quot;UNMATCHED&quot;;&quot;REMOVE LINKAGE IDENTIFIERS OR CORRECT LINKAGE STATUS&quot;;IF([.M22]=&quot;SINGLE_SALE_LINKED&quot;;&quot;REQUIRE LINKED SALE ID AND NO ALLOCATION GROUP ID&quot;;IF([.M22]=&quot;MULTI_SALE_PENDING_ALLOCATION&quot;;&quot;REMOVE LINKED SALE ID OR CORRECT LINKAGE STATUS&quot;;IF([.M22]=&quot;ALLOCATED&quot;;&quot;REQUIRE ALLOCATION GROUP ID AND NO LINKED SALE ID&quot;;&quot;REVIEW LINKAGE EVIDENCE — NO AUTHORITY CREATED&quot;)))))))">
            <text:p>NO ACTION — linkage status is UNKNOWN / not asserted</text:p>
          </table:table-cell>
          <table:table-cell office:value-type="string" table:formula="of:=IF([.S22]=&quot;CONTRADICTION&quot;;&quot;BLOCKED&quot;;IF([.S22]=&quot;UNKNOWN&quot;;&quot;UNKNOWN&quot;;IF([.S22]=&quot;CLEAR&quot;;IF(OR([.O22]=&quot;&quot;;[.P22]=&quot;&quot;);&quot;UNKNOWN&quot;;&quot;READY FOR REVIEW&quot;);&quot;BLOCKED&quot;)))">
            <text:p>UNKNOWN</text:p>
          </table:table-cell>
          <table:table-cell office:value-type="string" table:formula="of:=IF([.U22]=&quot;UNKNOWN&quot;;&quot;COMPLETE OR ASSERT REQUIRED EVIDENCE BEFORE REVIEW&quot;;IF([.U22]=&quot;BLOCKED&quot;;&quot;RESOLVE CONTRADICTION BEFORE REVIEW — NO AUTHORITY CREATED&quot;;IF([.U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quot;READY FOR REVIEW&quot;;&quot;REVIEW ELIGIBLE — NO AUTHORITY&quot;;IF(OR([.U22]=&quot;UNKNOWN&quot;;[.U2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quot;&quot;;IF(AND([.L23]=&quot;&quot;;[.N23]=&quot;&quot;);&quot;UNKNOWN&quot;;&quot;CONTRADICTION&quot;);IF([.M23]=&quot;UNMATCHED&quot;;IF(AND([.L23]=&quot;&quot;;[.N23]=&quot;&quot;);&quot;CLEAR&quot;;&quot;CONTRADICTION&quot;);IF([.M23]=&quot;SINGLE_SALE_LINKED&quot;;IF(AND([.L23]&lt;&gt;&quot;&quot;;[.N23]=&quot;&quot;);&quot;CLEAR&quot;;&quot;CONTRADICTION&quot;);IF([.M23]=&quot;MULTI_SALE_PENDING_ALLOCATION&quot;;IF([.L23]=&quot;&quot;;&quot;CLEAR&quot;;&quot;CONTRADICTION&quot;);IF([.M23]=&quot;ALLOCATED&quot;;IF(AND([.L23]=&quot;&quot;;[.N23]&lt;&gt;&quot;&quot;);&quot;CLEAR&quot;;&quot;CONTRADICTION&quot;);&quot;CONTRADICTION&quot;)))))">
            <text:p>UNKNOWN</text:p>
          </table:table-cell>
          <table:table-cell office:value-type="string" table:formula="of:=IF([.S23]=&quot;UNKNOWN&quot;;&quot;NO ACTION — linkage status is UNKNOWN / not asserted&quot;;IF([.S23]=&quot;CLEAR&quot;;&quot;NO CONTRADICTION — preserve evidence as entered&quot;;IF([.M23]=&quot;&quot;;&quot;REVIEW LINKAGE STATUS — identifiers are present while status is UNKNOWN&quot;;IF([.M23]=&quot;UNMATCHED&quot;;&quot;REMOVE LINKAGE IDENTIFIERS OR CORRECT LINKAGE STATUS&quot;;IF([.M23]=&quot;SINGLE_SALE_LINKED&quot;;&quot;REQUIRE LINKED SALE ID AND NO ALLOCATION GROUP ID&quot;;IF([.M23]=&quot;MULTI_SALE_PENDING_ALLOCATION&quot;;&quot;REMOVE LINKED SALE ID OR CORRECT LINKAGE STATUS&quot;;IF([.M23]=&quot;ALLOCATED&quot;;&quot;REQUIRE ALLOCATION GROUP ID AND NO LINKED SALE ID&quot;;&quot;REVIEW LINKAGE EVIDENCE — NO AUTHORITY CREATED&quot;)))))))">
            <text:p>NO ACTION — linkage status is UNKNOWN / not asserted</text:p>
          </table:table-cell>
          <table:table-cell office:value-type="string" table:formula="of:=IF([.S23]=&quot;CONTRADICTION&quot;;&quot;BLOCKED&quot;;IF([.S23]=&quot;UNKNOWN&quot;;&quot;UNKNOWN&quot;;IF([.S23]=&quot;CLEAR&quot;;IF(OR([.O23]=&quot;&quot;;[.P23]=&quot;&quot;);&quot;UNKNOWN&quot;;&quot;READY FOR REVIEW&quot;);&quot;BLOCKED&quot;)))">
            <text:p>UNKNOWN</text:p>
          </table:table-cell>
          <table:table-cell office:value-type="string" table:formula="of:=IF([.U23]=&quot;UNKNOWN&quot;;&quot;COMPLETE OR ASSERT REQUIRED EVIDENCE BEFORE REVIEW&quot;;IF([.U23]=&quot;BLOCKED&quot;;&quot;RESOLVE CONTRADICTION BEFORE REVIEW — NO AUTHORITY CREATED&quot;;IF([.U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quot;READY FOR REVIEW&quot;;&quot;REVIEW ELIGIBLE — NO AUTHORITY&quot;;IF(OR([.U23]=&quot;UNKNOWN&quot;;[.U2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quot;&quot;;IF(AND([.L24]=&quot;&quot;;[.N24]=&quot;&quot;);&quot;UNKNOWN&quot;;&quot;CONTRADICTION&quot;);IF([.M24]=&quot;UNMATCHED&quot;;IF(AND([.L24]=&quot;&quot;;[.N24]=&quot;&quot;);&quot;CLEAR&quot;;&quot;CONTRADICTION&quot;);IF([.M24]=&quot;SINGLE_SALE_LINKED&quot;;IF(AND([.L24]&lt;&gt;&quot;&quot;;[.N24]=&quot;&quot;);&quot;CLEAR&quot;;&quot;CONTRADICTION&quot;);IF([.M24]=&quot;MULTI_SALE_PENDING_ALLOCATION&quot;;IF([.L24]=&quot;&quot;;&quot;CLEAR&quot;;&quot;CONTRADICTION&quot;);IF([.M24]=&quot;ALLOCATED&quot;;IF(AND([.L24]=&quot;&quot;;[.N24]&lt;&gt;&quot;&quot;);&quot;CLEAR&quot;;&quot;CONTRADICTION&quot;);&quot;CONTRADICTION&quot;)))))">
            <text:p>UNKNOWN</text:p>
          </table:table-cell>
          <table:table-cell office:value-type="string" table:formula="of:=IF([.S24]=&quot;UNKNOWN&quot;;&quot;NO ACTION — linkage status is UNKNOWN / not asserted&quot;;IF([.S24]=&quot;CLEAR&quot;;&quot;NO CONTRADICTION — preserve evidence as entered&quot;;IF([.M24]=&quot;&quot;;&quot;REVIEW LINKAGE STATUS — identifiers are present while status is UNKNOWN&quot;;IF([.M24]=&quot;UNMATCHED&quot;;&quot;REMOVE LINKAGE IDENTIFIERS OR CORRECT LINKAGE STATUS&quot;;IF([.M24]=&quot;SINGLE_SALE_LINKED&quot;;&quot;REQUIRE LINKED SALE ID AND NO ALLOCATION GROUP ID&quot;;IF([.M24]=&quot;MULTI_SALE_PENDING_ALLOCATION&quot;;&quot;REMOVE LINKED SALE ID OR CORRECT LINKAGE STATUS&quot;;IF([.M24]=&quot;ALLOCATED&quot;;&quot;REQUIRE ALLOCATION GROUP ID AND NO LINKED SALE ID&quot;;&quot;REVIEW LINKAGE EVIDENCE — NO AUTHORITY CREATED&quot;)))))))">
            <text:p>NO ACTION — linkage status is UNKNOWN / not asserted</text:p>
          </table:table-cell>
          <table:table-cell office:value-type="string" table:formula="of:=IF([.S24]=&quot;CONTRADICTION&quot;;&quot;BLOCKED&quot;;IF([.S24]=&quot;UNKNOWN&quot;;&quot;UNKNOWN&quot;;IF([.S24]=&quot;CLEAR&quot;;IF(OR([.O24]=&quot;&quot;;[.P24]=&quot;&quot;);&quot;UNKNOWN&quot;;&quot;READY FOR REVIEW&quot;);&quot;BLOCKED&quot;)))">
            <text:p>UNKNOWN</text:p>
          </table:table-cell>
          <table:table-cell office:value-type="string" table:formula="of:=IF([.U24]=&quot;UNKNOWN&quot;;&quot;COMPLETE OR ASSERT REQUIRED EVIDENCE BEFORE REVIEW&quot;;IF([.U24]=&quot;BLOCKED&quot;;&quot;RESOLVE CONTRADICTION BEFORE REVIEW — NO AUTHORITY CREATED&quot;;IF([.U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quot;READY FOR REVIEW&quot;;&quot;REVIEW ELIGIBLE — NO AUTHORITY&quot;;IF(OR([.U24]=&quot;UNKNOWN&quot;;[.U2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quot;&quot;;IF(AND([.L25]=&quot;&quot;;[.N25]=&quot;&quot;);&quot;UNKNOWN&quot;;&quot;CONTRADICTION&quot;);IF([.M25]=&quot;UNMATCHED&quot;;IF(AND([.L25]=&quot;&quot;;[.N25]=&quot;&quot;);&quot;CLEAR&quot;;&quot;CONTRADICTION&quot;);IF([.M25]=&quot;SINGLE_SALE_LINKED&quot;;IF(AND([.L25]&lt;&gt;&quot;&quot;;[.N25]=&quot;&quot;);&quot;CLEAR&quot;;&quot;CONTRADICTION&quot;);IF([.M25]=&quot;MULTI_SALE_PENDING_ALLOCATION&quot;;IF([.L25]=&quot;&quot;;&quot;CLEAR&quot;;&quot;CONTRADICTION&quot;);IF([.M25]=&quot;ALLOCATED&quot;;IF(AND([.L25]=&quot;&quot;;[.N25]&lt;&gt;&quot;&quot;);&quot;CLEAR&quot;;&quot;CONTRADICTION&quot;);&quot;CONTRADICTION&quot;)))))">
            <text:p>UNKNOWN</text:p>
          </table:table-cell>
          <table:table-cell office:value-type="string" table:formula="of:=IF([.S25]=&quot;UNKNOWN&quot;;&quot;NO ACTION — linkage status is UNKNOWN / not asserted&quot;;IF([.S25]=&quot;CLEAR&quot;;&quot;NO CONTRADICTION — preserve evidence as entered&quot;;IF([.M25]=&quot;&quot;;&quot;REVIEW LINKAGE STATUS — identifiers are present while status is UNKNOWN&quot;;IF([.M25]=&quot;UNMATCHED&quot;;&quot;REMOVE LINKAGE IDENTIFIERS OR CORRECT LINKAGE STATUS&quot;;IF([.M25]=&quot;SINGLE_SALE_LINKED&quot;;&quot;REQUIRE LINKED SALE ID AND NO ALLOCATION GROUP ID&quot;;IF([.M25]=&quot;MULTI_SALE_PENDING_ALLOCATION&quot;;&quot;REMOVE LINKED SALE ID OR CORRECT LINKAGE STATUS&quot;;IF([.M25]=&quot;ALLOCATED&quot;;&quot;REQUIRE ALLOCATION GROUP ID AND NO LINKED SALE ID&quot;;&quot;REVIEW LINKAGE EVIDENCE — NO AUTHORITY CREATED&quot;)))))))">
            <text:p>NO ACTION — linkage status is UNKNOWN / not asserted</text:p>
          </table:table-cell>
          <table:table-cell office:value-type="string" table:formula="of:=IF([.S25]=&quot;CONTRADICTION&quot;;&quot;BLOCKED&quot;;IF([.S25]=&quot;UNKNOWN&quot;;&quot;UNKNOWN&quot;;IF([.S25]=&quot;CLEAR&quot;;IF(OR([.O25]=&quot;&quot;;[.P25]=&quot;&quot;);&quot;UNKNOWN&quot;;&quot;READY FOR REVIEW&quot;);&quot;BLOCKED&quot;)))">
            <text:p>UNKNOWN</text:p>
          </table:table-cell>
          <table:table-cell office:value-type="string" table:formula="of:=IF([.U25]=&quot;UNKNOWN&quot;;&quot;COMPLETE OR ASSERT REQUIRED EVIDENCE BEFORE REVIEW&quot;;IF([.U25]=&quot;BLOCKED&quot;;&quot;RESOLVE CONTRADICTION BEFORE REVIEW — NO AUTHORITY CREATED&quot;;IF([.U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quot;READY FOR REVIEW&quot;;&quot;REVIEW ELIGIBLE — NO AUTHORITY&quot;;IF(OR([.U25]=&quot;UNKNOWN&quot;;[.U2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6]=&quot;&quot;;IF(AND([.L26]=&quot;&quot;;[.N26]=&quot;&quot;);&quot;UNKNOWN&quot;;&quot;CONTRADICTION&quot;);IF([.M26]=&quot;UNMATCHED&quot;;IF(AND([.L26]=&quot;&quot;;[.N26]=&quot;&quot;);&quot;CLEAR&quot;;&quot;CONTRADICTION&quot;);IF([.M26]=&quot;SINGLE_SALE_LINKED&quot;;IF(AND([.L26]&lt;&gt;&quot;&quot;;[.N26]=&quot;&quot;);&quot;CLEAR&quot;;&quot;CONTRADICTION&quot;);IF([.M26]=&quot;MULTI_SALE_PENDING_ALLOCATION&quot;;IF([.L26]=&quot;&quot;;&quot;CLEAR&quot;;&quot;CONTRADICTION&quot;);IF([.M26]=&quot;ALLOCATED&quot;;IF(AND([.L26]=&quot;&quot;;[.N26]&lt;&gt;&quot;&quot;);&quot;CLEAR&quot;;&quot;CONTRADICTION&quot;);&quot;CONTRADICTION&quot;)))))">
            <text:p>UNKNOWN</text:p>
          </table:table-cell>
          <table:table-cell office:value-type="string" table:formula="of:=IF([.S26]=&quot;UNKNOWN&quot;;&quot;NO ACTION — linkage status is UNKNOWN / not asserted&quot;;IF([.S26]=&quot;CLEAR&quot;;&quot;NO CONTRADICTION — preserve evidence as entered&quot;;IF([.M26]=&quot;&quot;;&quot;REVIEW LINKAGE STATUS — identifiers are present while status is UNKNOWN&quot;;IF([.M26]=&quot;UNMATCHED&quot;;&quot;REMOVE LINKAGE IDENTIFIERS OR CORRECT LINKAGE STATUS&quot;;IF([.M26]=&quot;SINGLE_SALE_LINKED&quot;;&quot;REQUIRE LINKED SALE ID AND NO ALLOCATION GROUP ID&quot;;IF([.M26]=&quot;MULTI_SALE_PENDING_ALLOCATION&quot;;&quot;REMOVE LINKED SALE ID OR CORRECT LINKAGE STATUS&quot;;IF([.M26]=&quot;ALLOCATED&quot;;&quot;REQUIRE ALLOCATION GROUP ID AND NO LINKED SALE ID&quot;;&quot;REVIEW LINKAGE EVIDENCE — NO AUTHORITY CREATED&quot;)))))))">
            <text:p>NO ACTION — linkage status is UNKNOWN / not asserted</text:p>
          </table:table-cell>
          <table:table-cell office:value-type="string" table:formula="of:=IF([.S26]=&quot;CONTRADICTION&quot;;&quot;BLOCKED&quot;;IF([.S26]=&quot;UNKNOWN&quot;;&quot;UNKNOWN&quot;;IF([.S26]=&quot;CLEAR&quot;;IF(OR([.O26]=&quot;&quot;;[.P26]=&quot;&quot;);&quot;UNKNOWN&quot;;&quot;READY FOR REVIEW&quot;);&quot;BLOCKED&quot;)))">
            <text:p>UNKNOWN</text:p>
          </table:table-cell>
          <table:table-cell office:value-type="string" table:formula="of:=IF([.U26]=&quot;UNKNOWN&quot;;&quot;COMPLETE OR ASSERT REQUIRED EVIDENCE BEFORE REVIEW&quot;;IF([.U26]=&quot;BLOCKED&quot;;&quot;RESOLVE CONTRADICTION BEFORE REVIEW — NO AUTHORITY CREATED&quot;;IF([.U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6]=&quot;READY FOR REVIEW&quot;;&quot;REVIEW ELIGIBLE — NO AUTHORITY&quot;;IF(OR([.U26]=&quot;UNKNOWN&quot;;[.U2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7]=&quot;&quot;;IF(AND([.L27]=&quot;&quot;;[.N27]=&quot;&quot;);&quot;UNKNOWN&quot;;&quot;CONTRADICTION&quot;);IF([.M27]=&quot;UNMATCHED&quot;;IF(AND([.L27]=&quot;&quot;;[.N27]=&quot;&quot;);&quot;CLEAR&quot;;&quot;CONTRADICTION&quot;);IF([.M27]=&quot;SINGLE_SALE_LINKED&quot;;IF(AND([.L27]&lt;&gt;&quot;&quot;;[.N27]=&quot;&quot;);&quot;CLEAR&quot;;&quot;CONTRADICTION&quot;);IF([.M27]=&quot;MULTI_SALE_PENDING_ALLOCATION&quot;;IF([.L27]=&quot;&quot;;&quot;CLEAR&quot;;&quot;CONTRADICTION&quot;);IF([.M27]=&quot;ALLOCATED&quot;;IF(AND([.L27]=&quot;&quot;;[.N27]&lt;&gt;&quot;&quot;);&quot;CLEAR&quot;;&quot;CONTRADICTION&quot;);&quot;CONTRADICTION&quot;)))))">
            <text:p>UNKNOWN</text:p>
          </table:table-cell>
          <table:table-cell office:value-type="string" table:formula="of:=IF([.S27]=&quot;UNKNOWN&quot;;&quot;NO ACTION — linkage status is UNKNOWN / not asserted&quot;;IF([.S27]=&quot;CLEAR&quot;;&quot;NO CONTRADICTION — preserve evidence as entered&quot;;IF([.M27]=&quot;&quot;;&quot;REVIEW LINKAGE STATUS — identifiers are present while status is UNKNOWN&quot;;IF([.M27]=&quot;UNMATCHED&quot;;&quot;REMOVE LINKAGE IDENTIFIERS OR CORRECT LINKAGE STATUS&quot;;IF([.M27]=&quot;SINGLE_SALE_LINKED&quot;;&quot;REQUIRE LINKED SALE ID AND NO ALLOCATION GROUP ID&quot;;IF([.M27]=&quot;MULTI_SALE_PENDING_ALLOCATION&quot;;&quot;REMOVE LINKED SALE ID OR CORRECT LINKAGE STATUS&quot;;IF([.M27]=&quot;ALLOCATED&quot;;&quot;REQUIRE ALLOCATION GROUP ID AND NO LINKED SALE ID&quot;;&quot;REVIEW LINKAGE EVIDENCE — NO AUTHORITY CREATED&quot;)))))))">
            <text:p>NO ACTION — linkage status is UNKNOWN / not asserted</text:p>
          </table:table-cell>
          <table:table-cell office:value-type="string" table:formula="of:=IF([.S27]=&quot;CONTRADICTION&quot;;&quot;BLOCKED&quot;;IF([.S27]=&quot;UNKNOWN&quot;;&quot;UNKNOWN&quot;;IF([.S27]=&quot;CLEAR&quot;;IF(OR([.O27]=&quot;&quot;;[.P27]=&quot;&quot;);&quot;UNKNOWN&quot;;&quot;READY FOR REVIEW&quot;);&quot;BLOCKED&quot;)))">
            <text:p>UNKNOWN</text:p>
          </table:table-cell>
          <table:table-cell office:value-type="string" table:formula="of:=IF([.U27]=&quot;UNKNOWN&quot;;&quot;COMPLETE OR ASSERT REQUIRED EVIDENCE BEFORE REVIEW&quot;;IF([.U27]=&quot;BLOCKED&quot;;&quot;RESOLVE CONTRADICTION BEFORE REVIEW — NO AUTHORITY CREATED&quot;;IF([.U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7]=&quot;READY FOR REVIEW&quot;;&quot;REVIEW ELIGIBLE — NO AUTHORITY&quot;;IF(OR([.U27]=&quot;UNKNOWN&quot;;[.U2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8]=&quot;&quot;;IF(AND([.L28]=&quot;&quot;;[.N28]=&quot;&quot;);&quot;UNKNOWN&quot;;&quot;CONTRADICTION&quot;);IF([.M28]=&quot;UNMATCHED&quot;;IF(AND([.L28]=&quot;&quot;;[.N28]=&quot;&quot;);&quot;CLEAR&quot;;&quot;CONTRADICTION&quot;);IF([.M28]=&quot;SINGLE_SALE_LINKED&quot;;IF(AND([.L28]&lt;&gt;&quot;&quot;;[.N28]=&quot;&quot;);&quot;CLEAR&quot;;&quot;CONTRADICTION&quot;);IF([.M28]=&quot;MULTI_SALE_PENDING_ALLOCATION&quot;;IF([.L28]=&quot;&quot;;&quot;CLEAR&quot;;&quot;CONTRADICTION&quot;);IF([.M28]=&quot;ALLOCATED&quot;;IF(AND([.L28]=&quot;&quot;;[.N28]&lt;&gt;&quot;&quot;);&quot;CLEAR&quot;;&quot;CONTRADICTION&quot;);&quot;CONTRADICTION&quot;)))))">
            <text:p>UNKNOWN</text:p>
          </table:table-cell>
          <table:table-cell office:value-type="string" table:formula="of:=IF([.S28]=&quot;UNKNOWN&quot;;&quot;NO ACTION — linkage status is UNKNOWN / not asserted&quot;;IF([.S28]=&quot;CLEAR&quot;;&quot;NO CONTRADICTION — preserve evidence as entered&quot;;IF([.M28]=&quot;&quot;;&quot;REVIEW LINKAGE STATUS — identifiers are present while status is UNKNOWN&quot;;IF([.M28]=&quot;UNMATCHED&quot;;&quot;REMOVE LINKAGE IDENTIFIERS OR CORRECT LINKAGE STATUS&quot;;IF([.M28]=&quot;SINGLE_SALE_LINKED&quot;;&quot;REQUIRE LINKED SALE ID AND NO ALLOCATION GROUP ID&quot;;IF([.M28]=&quot;MULTI_SALE_PENDING_ALLOCATION&quot;;&quot;REMOVE LINKED SALE ID OR CORRECT LINKAGE STATUS&quot;;IF([.M28]=&quot;ALLOCATED&quot;;&quot;REQUIRE ALLOCATION GROUP ID AND NO LINKED SALE ID&quot;;&quot;REVIEW LINKAGE EVIDENCE — NO AUTHORITY CREATED&quot;)))))))">
            <text:p>NO ACTION — linkage status is UNKNOWN / not asserted</text:p>
          </table:table-cell>
          <table:table-cell office:value-type="string" table:formula="of:=IF([.S28]=&quot;CONTRADICTION&quot;;&quot;BLOCKED&quot;;IF([.S28]=&quot;UNKNOWN&quot;;&quot;UNKNOWN&quot;;IF([.S28]=&quot;CLEAR&quot;;IF(OR([.O28]=&quot;&quot;;[.P28]=&quot;&quot;);&quot;UNKNOWN&quot;;&quot;READY FOR REVIEW&quot;);&quot;BLOCKED&quot;)))">
            <text:p>UNKNOWN</text:p>
          </table:table-cell>
          <table:table-cell office:value-type="string" table:formula="of:=IF([.U28]=&quot;UNKNOWN&quot;;&quot;COMPLETE OR ASSERT REQUIRED EVIDENCE BEFORE REVIEW&quot;;IF([.U28]=&quot;BLOCKED&quot;;&quot;RESOLVE CONTRADICTION BEFORE REVIEW — NO AUTHORITY CREATED&quot;;IF([.U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8]=&quot;READY FOR REVIEW&quot;;&quot;REVIEW ELIGIBLE — NO AUTHORITY&quot;;IF(OR([.U28]=&quot;UNKNOWN&quot;;[.U2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9]=&quot;&quot;;IF(AND([.L29]=&quot;&quot;;[.N29]=&quot;&quot;);&quot;UNKNOWN&quot;;&quot;CONTRADICTION&quot;);IF([.M29]=&quot;UNMATCHED&quot;;IF(AND([.L29]=&quot;&quot;;[.N29]=&quot;&quot;);&quot;CLEAR&quot;;&quot;CONTRADICTION&quot;);IF([.M29]=&quot;SINGLE_SALE_LINKED&quot;;IF(AND([.L29]&lt;&gt;&quot;&quot;;[.N29]=&quot;&quot;);&quot;CLEAR&quot;;&quot;CONTRADICTION&quot;);IF([.M29]=&quot;MULTI_SALE_PENDING_ALLOCATION&quot;;IF([.L29]=&quot;&quot;;&quot;CLEAR&quot;;&quot;CONTRADICTION&quot;);IF([.M29]=&quot;ALLOCATED&quot;;IF(AND([.L29]=&quot;&quot;;[.N29]&lt;&gt;&quot;&quot;);&quot;CLEAR&quot;;&quot;CONTRADICTION&quot;);&quot;CONTRADICTION&quot;)))))">
            <text:p>UNKNOWN</text:p>
          </table:table-cell>
          <table:table-cell office:value-type="string" table:formula="of:=IF([.S29]=&quot;UNKNOWN&quot;;&quot;NO ACTION — linkage status is UNKNOWN / not asserted&quot;;IF([.S29]=&quot;CLEAR&quot;;&quot;NO CONTRADICTION — preserve evidence as entered&quot;;IF([.M29]=&quot;&quot;;&quot;REVIEW LINKAGE STATUS — identifiers are present while status is UNKNOWN&quot;;IF([.M29]=&quot;UNMATCHED&quot;;&quot;REMOVE LINKAGE IDENTIFIERS OR CORRECT LINKAGE STATUS&quot;;IF([.M29]=&quot;SINGLE_SALE_LINKED&quot;;&quot;REQUIRE LINKED SALE ID AND NO ALLOCATION GROUP ID&quot;;IF([.M29]=&quot;MULTI_SALE_PENDING_ALLOCATION&quot;;&quot;REMOVE LINKED SALE ID OR CORRECT LINKAGE STATUS&quot;;IF([.M29]=&quot;ALLOCATED&quot;;&quot;REQUIRE ALLOCATION GROUP ID AND NO LINKED SALE ID&quot;;&quot;REVIEW LINKAGE EVIDENCE — NO AUTHORITY CREATED&quot;)))))))">
            <text:p>NO ACTION — linkage status is UNKNOWN / not asserted</text:p>
          </table:table-cell>
          <table:table-cell office:value-type="string" table:formula="of:=IF([.S29]=&quot;CONTRADICTION&quot;;&quot;BLOCKED&quot;;IF([.S29]=&quot;UNKNOWN&quot;;&quot;UNKNOWN&quot;;IF([.S29]=&quot;CLEAR&quot;;IF(OR([.O29]=&quot;&quot;;[.P29]=&quot;&quot;);&quot;UNKNOWN&quot;;&quot;READY FOR REVIEW&quot;);&quot;BLOCKED&quot;)))">
            <text:p>UNKNOWN</text:p>
          </table:table-cell>
          <table:table-cell office:value-type="string" table:formula="of:=IF([.U29]=&quot;UNKNOWN&quot;;&quot;COMPLETE OR ASSERT REQUIRED EVIDENCE BEFORE REVIEW&quot;;IF([.U29]=&quot;BLOCKED&quot;;&quot;RESOLVE CONTRADICTION BEFORE REVIEW — NO AUTHORITY CREATED&quot;;IF([.U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9]=&quot;READY FOR REVIEW&quot;;&quot;REVIEW ELIGIBLE — NO AUTHORITY&quot;;IF(OR([.U29]=&quot;UNKNOWN&quot;;[.U2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0]=&quot;&quot;;IF(AND([.L30]=&quot;&quot;;[.N30]=&quot;&quot;);&quot;UNKNOWN&quot;;&quot;CONTRADICTION&quot;);IF([.M30]=&quot;UNMATCHED&quot;;IF(AND([.L30]=&quot;&quot;;[.N30]=&quot;&quot;);&quot;CLEAR&quot;;&quot;CONTRADICTION&quot;);IF([.M30]=&quot;SINGLE_SALE_LINKED&quot;;IF(AND([.L30]&lt;&gt;&quot;&quot;;[.N30]=&quot;&quot;);&quot;CLEAR&quot;;&quot;CONTRADICTION&quot;);IF([.M30]=&quot;MULTI_SALE_PENDING_ALLOCATION&quot;;IF([.L30]=&quot;&quot;;&quot;CLEAR&quot;;&quot;CONTRADICTION&quot;);IF([.M30]=&quot;ALLOCATED&quot;;IF(AND([.L30]=&quot;&quot;;[.N30]&lt;&gt;&quot;&quot;);&quot;CLEAR&quot;;&quot;CONTRADICTION&quot;);&quot;CONTRADICTION&quot;)))))">
            <text:p>UNKNOWN</text:p>
          </table:table-cell>
          <table:table-cell office:value-type="string" table:formula="of:=IF([.S30]=&quot;UNKNOWN&quot;;&quot;NO ACTION — linkage status is UNKNOWN / not asserted&quot;;IF([.S30]=&quot;CLEAR&quot;;&quot;NO CONTRADICTION — preserve evidence as entered&quot;;IF([.M30]=&quot;&quot;;&quot;REVIEW LINKAGE STATUS — identifiers are present while status is UNKNOWN&quot;;IF([.M30]=&quot;UNMATCHED&quot;;&quot;REMOVE LINKAGE IDENTIFIERS OR CORRECT LINKAGE STATUS&quot;;IF([.M30]=&quot;SINGLE_SALE_LINKED&quot;;&quot;REQUIRE LINKED SALE ID AND NO ALLOCATION GROUP ID&quot;;IF([.M30]=&quot;MULTI_SALE_PENDING_ALLOCATION&quot;;&quot;REMOVE LINKED SALE ID OR CORRECT LINKAGE STATUS&quot;;IF([.M30]=&quot;ALLOCATED&quot;;&quot;REQUIRE ALLOCATION GROUP ID AND NO LINKED SALE ID&quot;;&quot;REVIEW LINKAGE EVIDENCE — NO AUTHORITY CREATED&quot;)))))))">
            <text:p>NO ACTION — linkage status is UNKNOWN / not asserted</text:p>
          </table:table-cell>
          <table:table-cell office:value-type="string" table:formula="of:=IF([.S30]=&quot;CONTRADICTION&quot;;&quot;BLOCKED&quot;;IF([.S30]=&quot;UNKNOWN&quot;;&quot;UNKNOWN&quot;;IF([.S30]=&quot;CLEAR&quot;;IF(OR([.O30]=&quot;&quot;;[.P30]=&quot;&quot;);&quot;UNKNOWN&quot;;&quot;READY FOR REVIEW&quot;);&quot;BLOCKED&quot;)))">
            <text:p>UNKNOWN</text:p>
          </table:table-cell>
          <table:table-cell office:value-type="string" table:formula="of:=IF([.U30]=&quot;UNKNOWN&quot;;&quot;COMPLETE OR ASSERT REQUIRED EVIDENCE BEFORE REVIEW&quot;;IF([.U30]=&quot;BLOCKED&quot;;&quot;RESOLVE CONTRADICTION BEFORE REVIEW — NO AUTHORITY CREATED&quot;;IF([.U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0]=&quot;READY FOR REVIEW&quot;;&quot;REVIEW ELIGIBLE — NO AUTHORITY&quot;;IF(OR([.U30]=&quot;UNKNOWN&quot;;[.U3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1]=&quot;&quot;;IF(AND([.L31]=&quot;&quot;;[.N31]=&quot;&quot;);&quot;UNKNOWN&quot;;&quot;CONTRADICTION&quot;);IF([.M31]=&quot;UNMATCHED&quot;;IF(AND([.L31]=&quot;&quot;;[.N31]=&quot;&quot;);&quot;CLEAR&quot;;&quot;CONTRADICTION&quot;);IF([.M31]=&quot;SINGLE_SALE_LINKED&quot;;IF(AND([.L31]&lt;&gt;&quot;&quot;;[.N31]=&quot;&quot;);&quot;CLEAR&quot;;&quot;CONTRADICTION&quot;);IF([.M31]=&quot;MULTI_SALE_PENDING_ALLOCATION&quot;;IF([.L31]=&quot;&quot;;&quot;CLEAR&quot;;&quot;CONTRADICTION&quot;);IF([.M31]=&quot;ALLOCATED&quot;;IF(AND([.L31]=&quot;&quot;;[.N31]&lt;&gt;&quot;&quot;);&quot;CLEAR&quot;;&quot;CONTRADICTION&quot;);&quot;CONTRADICTION&quot;)))))">
            <text:p>UNKNOWN</text:p>
          </table:table-cell>
          <table:table-cell office:value-type="string" table:formula="of:=IF([.S31]=&quot;UNKNOWN&quot;;&quot;NO ACTION — linkage status is UNKNOWN / not asserted&quot;;IF([.S31]=&quot;CLEAR&quot;;&quot;NO CONTRADICTION — preserve evidence as entered&quot;;IF([.M31]=&quot;&quot;;&quot;REVIEW LINKAGE STATUS — identifiers are present while status is UNKNOWN&quot;;IF([.M31]=&quot;UNMATCHED&quot;;&quot;REMOVE LINKAGE IDENTIFIERS OR CORRECT LINKAGE STATUS&quot;;IF([.M31]=&quot;SINGLE_SALE_LINKED&quot;;&quot;REQUIRE LINKED SALE ID AND NO ALLOCATION GROUP ID&quot;;IF([.M31]=&quot;MULTI_SALE_PENDING_ALLOCATION&quot;;&quot;REMOVE LINKED SALE ID OR CORRECT LINKAGE STATUS&quot;;IF([.M31]=&quot;ALLOCATED&quot;;&quot;REQUIRE ALLOCATION GROUP ID AND NO LINKED SALE ID&quot;;&quot;REVIEW LINKAGE EVIDENCE — NO AUTHORITY CREATED&quot;)))))))">
            <text:p>NO ACTION — linkage status is UNKNOWN / not asserted</text:p>
          </table:table-cell>
          <table:table-cell office:value-type="string" table:formula="of:=IF([.S31]=&quot;CONTRADICTION&quot;;&quot;BLOCKED&quot;;IF([.S31]=&quot;UNKNOWN&quot;;&quot;UNKNOWN&quot;;IF([.S31]=&quot;CLEAR&quot;;IF(OR([.O31]=&quot;&quot;;[.P31]=&quot;&quot;);&quot;UNKNOWN&quot;;&quot;READY FOR REVIEW&quot;);&quot;BLOCKED&quot;)))">
            <text:p>UNKNOWN</text:p>
          </table:table-cell>
          <table:table-cell office:value-type="string" table:formula="of:=IF([.U31]=&quot;UNKNOWN&quot;;&quot;COMPLETE OR ASSERT REQUIRED EVIDENCE BEFORE REVIEW&quot;;IF([.U31]=&quot;BLOCKED&quot;;&quot;RESOLVE CONTRADICTION BEFORE REVIEW — NO AUTHORITY CREATED&quot;;IF([.U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1]=&quot;READY FOR REVIEW&quot;;&quot;REVIEW ELIGIBLE — NO AUTHORITY&quot;;IF(OR([.U31]=&quot;UNKNOWN&quot;;[.U3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2]=&quot;&quot;;IF(AND([.L32]=&quot;&quot;;[.N32]=&quot;&quot;);&quot;UNKNOWN&quot;;&quot;CONTRADICTION&quot;);IF([.M32]=&quot;UNMATCHED&quot;;IF(AND([.L32]=&quot;&quot;;[.N32]=&quot;&quot;);&quot;CLEAR&quot;;&quot;CONTRADICTION&quot;);IF([.M32]=&quot;SINGLE_SALE_LINKED&quot;;IF(AND([.L32]&lt;&gt;&quot;&quot;;[.N32]=&quot;&quot;);&quot;CLEAR&quot;;&quot;CONTRADICTION&quot;);IF([.M32]=&quot;MULTI_SALE_PENDING_ALLOCATION&quot;;IF([.L32]=&quot;&quot;;&quot;CLEAR&quot;;&quot;CONTRADICTION&quot;);IF([.M32]=&quot;ALLOCATED&quot;;IF(AND([.L32]=&quot;&quot;;[.N32]&lt;&gt;&quot;&quot;);&quot;CLEAR&quot;;&quot;CONTRADICTION&quot;);&quot;CONTRADICTION&quot;)))))">
            <text:p>UNKNOWN</text:p>
          </table:table-cell>
          <table:table-cell office:value-type="string" table:formula="of:=IF([.S32]=&quot;UNKNOWN&quot;;&quot;NO ACTION — linkage status is UNKNOWN / not asserted&quot;;IF([.S32]=&quot;CLEAR&quot;;&quot;NO CONTRADICTION — preserve evidence as entered&quot;;IF([.M32]=&quot;&quot;;&quot;REVIEW LINKAGE STATUS — identifiers are present while status is UNKNOWN&quot;;IF([.M32]=&quot;UNMATCHED&quot;;&quot;REMOVE LINKAGE IDENTIFIERS OR CORRECT LINKAGE STATUS&quot;;IF([.M32]=&quot;SINGLE_SALE_LINKED&quot;;&quot;REQUIRE LINKED SALE ID AND NO ALLOCATION GROUP ID&quot;;IF([.M32]=&quot;MULTI_SALE_PENDING_ALLOCATION&quot;;&quot;REMOVE LINKED SALE ID OR CORRECT LINKAGE STATUS&quot;;IF([.M32]=&quot;ALLOCATED&quot;;&quot;REQUIRE ALLOCATION GROUP ID AND NO LINKED SALE ID&quot;;&quot;REVIEW LINKAGE EVIDENCE — NO AUTHORITY CREATED&quot;)))))))">
            <text:p>NO ACTION — linkage status is UNKNOWN / not asserted</text:p>
          </table:table-cell>
          <table:table-cell office:value-type="string" table:formula="of:=IF([.S32]=&quot;CONTRADICTION&quot;;&quot;BLOCKED&quot;;IF([.S32]=&quot;UNKNOWN&quot;;&quot;UNKNOWN&quot;;IF([.S32]=&quot;CLEAR&quot;;IF(OR([.O32]=&quot;&quot;;[.P32]=&quot;&quot;);&quot;UNKNOWN&quot;;&quot;READY FOR REVIEW&quot;);&quot;BLOCKED&quot;)))">
            <text:p>UNKNOWN</text:p>
          </table:table-cell>
          <table:table-cell office:value-type="string" table:formula="of:=IF([.U32]=&quot;UNKNOWN&quot;;&quot;COMPLETE OR ASSERT REQUIRED EVIDENCE BEFORE REVIEW&quot;;IF([.U32]=&quot;BLOCKED&quot;;&quot;RESOLVE CONTRADICTION BEFORE REVIEW — NO AUTHORITY CREATED&quot;;IF([.U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2]=&quot;READY FOR REVIEW&quot;;&quot;REVIEW ELIGIBLE — NO AUTHORITY&quot;;IF(OR([.U32]=&quot;UNKNOWN&quot;;[.U3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3]=&quot;&quot;;IF(AND([.L33]=&quot;&quot;;[.N33]=&quot;&quot;);&quot;UNKNOWN&quot;;&quot;CONTRADICTION&quot;);IF([.M33]=&quot;UNMATCHED&quot;;IF(AND([.L33]=&quot;&quot;;[.N33]=&quot;&quot;);&quot;CLEAR&quot;;&quot;CONTRADICTION&quot;);IF([.M33]=&quot;SINGLE_SALE_LINKED&quot;;IF(AND([.L33]&lt;&gt;&quot;&quot;;[.N33]=&quot;&quot;);&quot;CLEAR&quot;;&quot;CONTRADICTION&quot;);IF([.M33]=&quot;MULTI_SALE_PENDING_ALLOCATION&quot;;IF([.L33]=&quot;&quot;;&quot;CLEAR&quot;;&quot;CONTRADICTION&quot;);IF([.M33]=&quot;ALLOCATED&quot;;IF(AND([.L33]=&quot;&quot;;[.N33]&lt;&gt;&quot;&quot;);&quot;CLEAR&quot;;&quot;CONTRADICTION&quot;);&quot;CONTRADICTION&quot;)))))">
            <text:p>UNKNOWN</text:p>
          </table:table-cell>
          <table:table-cell office:value-type="string" table:formula="of:=IF([.S33]=&quot;UNKNOWN&quot;;&quot;NO ACTION — linkage status is UNKNOWN / not asserted&quot;;IF([.S33]=&quot;CLEAR&quot;;&quot;NO CONTRADICTION — preserve evidence as entered&quot;;IF([.M33]=&quot;&quot;;&quot;REVIEW LINKAGE STATUS — identifiers are present while status is UNKNOWN&quot;;IF([.M33]=&quot;UNMATCHED&quot;;&quot;REMOVE LINKAGE IDENTIFIERS OR CORRECT LINKAGE STATUS&quot;;IF([.M33]=&quot;SINGLE_SALE_LINKED&quot;;&quot;REQUIRE LINKED SALE ID AND NO ALLOCATION GROUP ID&quot;;IF([.M33]=&quot;MULTI_SALE_PENDING_ALLOCATION&quot;;&quot;REMOVE LINKED SALE ID OR CORRECT LINKAGE STATUS&quot;;IF([.M33]=&quot;ALLOCATED&quot;;&quot;REQUIRE ALLOCATION GROUP ID AND NO LINKED SALE ID&quot;;&quot;REVIEW LINKAGE EVIDENCE — NO AUTHORITY CREATED&quot;)))))))">
            <text:p>NO ACTION — linkage status is UNKNOWN / not asserted</text:p>
          </table:table-cell>
          <table:table-cell office:value-type="string" table:formula="of:=IF([.S33]=&quot;CONTRADICTION&quot;;&quot;BLOCKED&quot;;IF([.S33]=&quot;UNKNOWN&quot;;&quot;UNKNOWN&quot;;IF([.S33]=&quot;CLEAR&quot;;IF(OR([.O33]=&quot;&quot;;[.P33]=&quot;&quot;);&quot;UNKNOWN&quot;;&quot;READY FOR REVIEW&quot;);&quot;BLOCKED&quot;)))">
            <text:p>UNKNOWN</text:p>
          </table:table-cell>
          <table:table-cell office:value-type="string" table:formula="of:=IF([.U33]=&quot;UNKNOWN&quot;;&quot;COMPLETE OR ASSERT REQUIRED EVIDENCE BEFORE REVIEW&quot;;IF([.U33]=&quot;BLOCKED&quot;;&quot;RESOLVE CONTRADICTION BEFORE REVIEW — NO AUTHORITY CREATED&quot;;IF([.U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3]=&quot;READY FOR REVIEW&quot;;&quot;REVIEW ELIGIBLE — NO AUTHORITY&quot;;IF(OR([.U33]=&quot;UNKNOWN&quot;;[.U3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4]=&quot;&quot;;IF(AND([.L34]=&quot;&quot;;[.N34]=&quot;&quot;);&quot;UNKNOWN&quot;;&quot;CONTRADICTION&quot;);IF([.M34]=&quot;UNMATCHED&quot;;IF(AND([.L34]=&quot;&quot;;[.N34]=&quot;&quot;);&quot;CLEAR&quot;;&quot;CONTRADICTION&quot;);IF([.M34]=&quot;SINGLE_SALE_LINKED&quot;;IF(AND([.L34]&lt;&gt;&quot;&quot;;[.N34]=&quot;&quot;);&quot;CLEAR&quot;;&quot;CONTRADICTION&quot;);IF([.M34]=&quot;MULTI_SALE_PENDING_ALLOCATION&quot;;IF([.L34]=&quot;&quot;;&quot;CLEAR&quot;;&quot;CONTRADICTION&quot;);IF([.M34]=&quot;ALLOCATED&quot;;IF(AND([.L34]=&quot;&quot;;[.N34]&lt;&gt;&quot;&quot;);&quot;CLEAR&quot;;&quot;CONTRADICTION&quot;);&quot;CONTRADICTION&quot;)))))">
            <text:p>UNKNOWN</text:p>
          </table:table-cell>
          <table:table-cell office:value-type="string" table:formula="of:=IF([.S34]=&quot;UNKNOWN&quot;;&quot;NO ACTION — linkage status is UNKNOWN / not asserted&quot;;IF([.S34]=&quot;CLEAR&quot;;&quot;NO CONTRADICTION — preserve evidence as entered&quot;;IF([.M34]=&quot;&quot;;&quot;REVIEW LINKAGE STATUS — identifiers are present while status is UNKNOWN&quot;;IF([.M34]=&quot;UNMATCHED&quot;;&quot;REMOVE LINKAGE IDENTIFIERS OR CORRECT LINKAGE STATUS&quot;;IF([.M34]=&quot;SINGLE_SALE_LINKED&quot;;&quot;REQUIRE LINKED SALE ID AND NO ALLOCATION GROUP ID&quot;;IF([.M34]=&quot;MULTI_SALE_PENDING_ALLOCATION&quot;;&quot;REMOVE LINKED SALE ID OR CORRECT LINKAGE STATUS&quot;;IF([.M34]=&quot;ALLOCATED&quot;;&quot;REQUIRE ALLOCATION GROUP ID AND NO LINKED SALE ID&quot;;&quot;REVIEW LINKAGE EVIDENCE — NO AUTHORITY CREATED&quot;)))))))">
            <text:p>NO ACTION — linkage status is UNKNOWN / not asserted</text:p>
          </table:table-cell>
          <table:table-cell office:value-type="string" table:formula="of:=IF([.S34]=&quot;CONTRADICTION&quot;;&quot;BLOCKED&quot;;IF([.S34]=&quot;UNKNOWN&quot;;&quot;UNKNOWN&quot;;IF([.S34]=&quot;CLEAR&quot;;IF(OR([.O34]=&quot;&quot;;[.P34]=&quot;&quot;);&quot;UNKNOWN&quot;;&quot;READY FOR REVIEW&quot;);&quot;BLOCKED&quot;)))">
            <text:p>UNKNOWN</text:p>
          </table:table-cell>
          <table:table-cell office:value-type="string" table:formula="of:=IF([.U34]=&quot;UNKNOWN&quot;;&quot;COMPLETE OR ASSERT REQUIRED EVIDENCE BEFORE REVIEW&quot;;IF([.U34]=&quot;BLOCKED&quot;;&quot;RESOLVE CONTRADICTION BEFORE REVIEW — NO AUTHORITY CREATED&quot;;IF([.U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4]=&quot;READY FOR REVIEW&quot;;&quot;REVIEW ELIGIBLE — NO AUTHORITY&quot;;IF(OR([.U34]=&quot;UNKNOWN&quot;;[.U3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5]=&quot;&quot;;IF(AND([.L35]=&quot;&quot;;[.N35]=&quot;&quot;);&quot;UNKNOWN&quot;;&quot;CONTRADICTION&quot;);IF([.M35]=&quot;UNMATCHED&quot;;IF(AND([.L35]=&quot;&quot;;[.N35]=&quot;&quot;);&quot;CLEAR&quot;;&quot;CONTRADICTION&quot;);IF([.M35]=&quot;SINGLE_SALE_LINKED&quot;;IF(AND([.L35]&lt;&gt;&quot;&quot;;[.N35]=&quot;&quot;);&quot;CLEAR&quot;;&quot;CONTRADICTION&quot;);IF([.M35]=&quot;MULTI_SALE_PENDING_ALLOCATION&quot;;IF([.L35]=&quot;&quot;;&quot;CLEAR&quot;;&quot;CONTRADICTION&quot;);IF([.M35]=&quot;ALLOCATED&quot;;IF(AND([.L35]=&quot;&quot;;[.N35]&lt;&gt;&quot;&quot;);&quot;CLEAR&quot;;&quot;CONTRADICTION&quot;);&quot;CONTRADICTION&quot;)))))">
            <text:p>UNKNOWN</text:p>
          </table:table-cell>
          <table:table-cell office:value-type="string" table:formula="of:=IF([.S35]=&quot;UNKNOWN&quot;;&quot;NO ACTION — linkage status is UNKNOWN / not asserted&quot;;IF([.S35]=&quot;CLEAR&quot;;&quot;NO CONTRADICTION — preserve evidence as entered&quot;;IF([.M35]=&quot;&quot;;&quot;REVIEW LINKAGE STATUS — identifiers are present while status is UNKNOWN&quot;;IF([.M35]=&quot;UNMATCHED&quot;;&quot;REMOVE LINKAGE IDENTIFIERS OR CORRECT LINKAGE STATUS&quot;;IF([.M35]=&quot;SINGLE_SALE_LINKED&quot;;&quot;REQUIRE LINKED SALE ID AND NO ALLOCATION GROUP ID&quot;;IF([.M35]=&quot;MULTI_SALE_PENDING_ALLOCATION&quot;;&quot;REMOVE LINKED SALE ID OR CORRECT LINKAGE STATUS&quot;;IF([.M35]=&quot;ALLOCATED&quot;;&quot;REQUIRE ALLOCATION GROUP ID AND NO LINKED SALE ID&quot;;&quot;REVIEW LINKAGE EVIDENCE — NO AUTHORITY CREATED&quot;)))))))">
            <text:p>NO ACTION — linkage status is UNKNOWN / not asserted</text:p>
          </table:table-cell>
          <table:table-cell office:value-type="string" table:formula="of:=IF([.S35]=&quot;CONTRADICTION&quot;;&quot;BLOCKED&quot;;IF([.S35]=&quot;UNKNOWN&quot;;&quot;UNKNOWN&quot;;IF([.S35]=&quot;CLEAR&quot;;IF(OR([.O35]=&quot;&quot;;[.P35]=&quot;&quot;);&quot;UNKNOWN&quot;;&quot;READY FOR REVIEW&quot;);&quot;BLOCKED&quot;)))">
            <text:p>UNKNOWN</text:p>
          </table:table-cell>
          <table:table-cell office:value-type="string" table:formula="of:=IF([.U35]=&quot;UNKNOWN&quot;;&quot;COMPLETE OR ASSERT REQUIRED EVIDENCE BEFORE REVIEW&quot;;IF([.U35]=&quot;BLOCKED&quot;;&quot;RESOLVE CONTRADICTION BEFORE REVIEW — NO AUTHORITY CREATED&quot;;IF([.U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5]=&quot;READY FOR REVIEW&quot;;&quot;REVIEW ELIGIBLE — NO AUTHORITY&quot;;IF(OR([.U35]=&quot;UNKNOWN&quot;;[.U3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6]=&quot;&quot;;IF(AND([.L36]=&quot;&quot;;[.N36]=&quot;&quot;);&quot;UNKNOWN&quot;;&quot;CONTRADICTION&quot;);IF([.M36]=&quot;UNMATCHED&quot;;IF(AND([.L36]=&quot;&quot;;[.N36]=&quot;&quot;);&quot;CLEAR&quot;;&quot;CONTRADICTION&quot;);IF([.M36]=&quot;SINGLE_SALE_LINKED&quot;;IF(AND([.L36]&lt;&gt;&quot;&quot;;[.N36]=&quot;&quot;);&quot;CLEAR&quot;;&quot;CONTRADICTION&quot;);IF([.M36]=&quot;MULTI_SALE_PENDING_ALLOCATION&quot;;IF([.L36]=&quot;&quot;;&quot;CLEAR&quot;;&quot;CONTRADICTION&quot;);IF([.M36]=&quot;ALLOCATED&quot;;IF(AND([.L36]=&quot;&quot;;[.N36]&lt;&gt;&quot;&quot;);&quot;CLEAR&quot;;&quot;CONTRADICTION&quot;);&quot;CONTRADICTION&quot;)))))">
            <text:p>UNKNOWN</text:p>
          </table:table-cell>
          <table:table-cell office:value-type="string" table:formula="of:=IF([.S36]=&quot;UNKNOWN&quot;;&quot;NO ACTION — linkage status is UNKNOWN / not asserted&quot;;IF([.S36]=&quot;CLEAR&quot;;&quot;NO CONTRADICTION — preserve evidence as entered&quot;;IF([.M36]=&quot;&quot;;&quot;REVIEW LINKAGE STATUS — identifiers are present while status is UNKNOWN&quot;;IF([.M36]=&quot;UNMATCHED&quot;;&quot;REMOVE LINKAGE IDENTIFIERS OR CORRECT LINKAGE STATUS&quot;;IF([.M36]=&quot;SINGLE_SALE_LINKED&quot;;&quot;REQUIRE LINKED SALE ID AND NO ALLOCATION GROUP ID&quot;;IF([.M36]=&quot;MULTI_SALE_PENDING_ALLOCATION&quot;;&quot;REMOVE LINKED SALE ID OR CORRECT LINKAGE STATUS&quot;;IF([.M36]=&quot;ALLOCATED&quot;;&quot;REQUIRE ALLOCATION GROUP ID AND NO LINKED SALE ID&quot;;&quot;REVIEW LINKAGE EVIDENCE — NO AUTHORITY CREATED&quot;)))))))">
            <text:p>NO ACTION — linkage status is UNKNOWN / not asserted</text:p>
          </table:table-cell>
          <table:table-cell office:value-type="string" table:formula="of:=IF([.S36]=&quot;CONTRADICTION&quot;;&quot;BLOCKED&quot;;IF([.S36]=&quot;UNKNOWN&quot;;&quot;UNKNOWN&quot;;IF([.S36]=&quot;CLEAR&quot;;IF(OR([.O36]=&quot;&quot;;[.P36]=&quot;&quot;);&quot;UNKNOWN&quot;;&quot;READY FOR REVIEW&quot;);&quot;BLOCKED&quot;)))">
            <text:p>UNKNOWN</text:p>
          </table:table-cell>
          <table:table-cell office:value-type="string" table:formula="of:=IF([.U36]=&quot;UNKNOWN&quot;;&quot;COMPLETE OR ASSERT REQUIRED EVIDENCE BEFORE REVIEW&quot;;IF([.U36]=&quot;BLOCKED&quot;;&quot;RESOLVE CONTRADICTION BEFORE REVIEW — NO AUTHORITY CREATED&quot;;IF([.U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6]=&quot;READY FOR REVIEW&quot;;&quot;REVIEW ELIGIBLE — NO AUTHORITY&quot;;IF(OR([.U36]=&quot;UNKNOWN&quot;;[.U3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7]=&quot;&quot;;IF(AND([.L37]=&quot;&quot;;[.N37]=&quot;&quot;);&quot;UNKNOWN&quot;;&quot;CONTRADICTION&quot;);IF([.M37]=&quot;UNMATCHED&quot;;IF(AND([.L37]=&quot;&quot;;[.N37]=&quot;&quot;);&quot;CLEAR&quot;;&quot;CONTRADICTION&quot;);IF([.M37]=&quot;SINGLE_SALE_LINKED&quot;;IF(AND([.L37]&lt;&gt;&quot;&quot;;[.N37]=&quot;&quot;);&quot;CLEAR&quot;;&quot;CONTRADICTION&quot;);IF([.M37]=&quot;MULTI_SALE_PENDING_ALLOCATION&quot;;IF([.L37]=&quot;&quot;;&quot;CLEAR&quot;;&quot;CONTRADICTION&quot;);IF([.M37]=&quot;ALLOCATED&quot;;IF(AND([.L37]=&quot;&quot;;[.N37]&lt;&gt;&quot;&quot;);&quot;CLEAR&quot;;&quot;CONTRADICTION&quot;);&quot;CONTRADICTION&quot;)))))">
            <text:p>UNKNOWN</text:p>
          </table:table-cell>
          <table:table-cell office:value-type="string" table:formula="of:=IF([.S37]=&quot;UNKNOWN&quot;;&quot;NO ACTION — linkage status is UNKNOWN / not asserted&quot;;IF([.S37]=&quot;CLEAR&quot;;&quot;NO CONTRADICTION — preserve evidence as entered&quot;;IF([.M37]=&quot;&quot;;&quot;REVIEW LINKAGE STATUS — identifiers are present while status is UNKNOWN&quot;;IF([.M37]=&quot;UNMATCHED&quot;;&quot;REMOVE LINKAGE IDENTIFIERS OR CORRECT LINKAGE STATUS&quot;;IF([.M37]=&quot;SINGLE_SALE_LINKED&quot;;&quot;REQUIRE LINKED SALE ID AND NO ALLOCATION GROUP ID&quot;;IF([.M37]=&quot;MULTI_SALE_PENDING_ALLOCATION&quot;;&quot;REMOVE LINKED SALE ID OR CORRECT LINKAGE STATUS&quot;;IF([.M37]=&quot;ALLOCATED&quot;;&quot;REQUIRE ALLOCATION GROUP ID AND NO LINKED SALE ID&quot;;&quot;REVIEW LINKAGE EVIDENCE — NO AUTHORITY CREATED&quot;)))))))">
            <text:p>NO ACTION — linkage status is UNKNOWN / not asserted</text:p>
          </table:table-cell>
          <table:table-cell office:value-type="string" table:formula="of:=IF([.S37]=&quot;CONTRADICTION&quot;;&quot;BLOCKED&quot;;IF([.S37]=&quot;UNKNOWN&quot;;&quot;UNKNOWN&quot;;IF([.S37]=&quot;CLEAR&quot;;IF(OR([.O37]=&quot;&quot;;[.P37]=&quot;&quot;);&quot;UNKNOWN&quot;;&quot;READY FOR REVIEW&quot;);&quot;BLOCKED&quot;)))">
            <text:p>UNKNOWN</text:p>
          </table:table-cell>
          <table:table-cell office:value-type="string" table:formula="of:=IF([.U37]=&quot;UNKNOWN&quot;;&quot;COMPLETE OR ASSERT REQUIRED EVIDENCE BEFORE REVIEW&quot;;IF([.U37]=&quot;BLOCKED&quot;;&quot;RESOLVE CONTRADICTION BEFORE REVIEW — NO AUTHORITY CREATED&quot;;IF([.U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7]=&quot;READY FOR REVIEW&quot;;&quot;REVIEW ELIGIBLE — NO AUTHORITY&quot;;IF(OR([.U37]=&quot;UNKNOWN&quot;;[.U3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8]=&quot;&quot;;IF(AND([.L38]=&quot;&quot;;[.N38]=&quot;&quot;);&quot;UNKNOWN&quot;;&quot;CONTRADICTION&quot;);IF([.M38]=&quot;UNMATCHED&quot;;IF(AND([.L38]=&quot;&quot;;[.N38]=&quot;&quot;);&quot;CLEAR&quot;;&quot;CONTRADICTION&quot;);IF([.M38]=&quot;SINGLE_SALE_LINKED&quot;;IF(AND([.L38]&lt;&gt;&quot;&quot;;[.N38]=&quot;&quot;);&quot;CLEAR&quot;;&quot;CONTRADICTION&quot;);IF([.M38]=&quot;MULTI_SALE_PENDING_ALLOCATION&quot;;IF([.L38]=&quot;&quot;;&quot;CLEAR&quot;;&quot;CONTRADICTION&quot;);IF([.M38]=&quot;ALLOCATED&quot;;IF(AND([.L38]=&quot;&quot;;[.N38]&lt;&gt;&quot;&quot;);&quot;CLEAR&quot;;&quot;CONTRADICTION&quot;);&quot;CONTRADICTION&quot;)))))">
            <text:p>UNKNOWN</text:p>
          </table:table-cell>
          <table:table-cell office:value-type="string" table:formula="of:=IF([.S38]=&quot;UNKNOWN&quot;;&quot;NO ACTION — linkage status is UNKNOWN / not asserted&quot;;IF([.S38]=&quot;CLEAR&quot;;&quot;NO CONTRADICTION — preserve evidence as entered&quot;;IF([.M38]=&quot;&quot;;&quot;REVIEW LINKAGE STATUS — identifiers are present while status is UNKNOWN&quot;;IF([.M38]=&quot;UNMATCHED&quot;;&quot;REMOVE LINKAGE IDENTIFIERS OR CORRECT LINKAGE STATUS&quot;;IF([.M38]=&quot;SINGLE_SALE_LINKED&quot;;&quot;REQUIRE LINKED SALE ID AND NO ALLOCATION GROUP ID&quot;;IF([.M38]=&quot;MULTI_SALE_PENDING_ALLOCATION&quot;;&quot;REMOVE LINKED SALE ID OR CORRECT LINKAGE STATUS&quot;;IF([.M38]=&quot;ALLOCATED&quot;;&quot;REQUIRE ALLOCATION GROUP ID AND NO LINKED SALE ID&quot;;&quot;REVIEW LINKAGE EVIDENCE — NO AUTHORITY CREATED&quot;)))))))">
            <text:p>NO ACTION — linkage status is UNKNOWN / not asserted</text:p>
          </table:table-cell>
          <table:table-cell office:value-type="string" table:formula="of:=IF([.S38]=&quot;CONTRADICTION&quot;;&quot;BLOCKED&quot;;IF([.S38]=&quot;UNKNOWN&quot;;&quot;UNKNOWN&quot;;IF([.S38]=&quot;CLEAR&quot;;IF(OR([.O38]=&quot;&quot;;[.P38]=&quot;&quot;);&quot;UNKNOWN&quot;;&quot;READY FOR REVIEW&quot;);&quot;BLOCKED&quot;)))">
            <text:p>UNKNOWN</text:p>
          </table:table-cell>
          <table:table-cell office:value-type="string" table:formula="of:=IF([.U38]=&quot;UNKNOWN&quot;;&quot;COMPLETE OR ASSERT REQUIRED EVIDENCE BEFORE REVIEW&quot;;IF([.U38]=&quot;BLOCKED&quot;;&quot;RESOLVE CONTRADICTION BEFORE REVIEW — NO AUTHORITY CREATED&quot;;IF([.U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8]=&quot;READY FOR REVIEW&quot;;&quot;REVIEW ELIGIBLE — NO AUTHORITY&quot;;IF(OR([.U38]=&quot;UNKNOWN&quot;;[.U3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9]=&quot;&quot;;IF(AND([.L39]=&quot;&quot;;[.N39]=&quot;&quot;);&quot;UNKNOWN&quot;;&quot;CONTRADICTION&quot;);IF([.M39]=&quot;UNMATCHED&quot;;IF(AND([.L39]=&quot;&quot;;[.N39]=&quot;&quot;);&quot;CLEAR&quot;;&quot;CONTRADICTION&quot;);IF([.M39]=&quot;SINGLE_SALE_LINKED&quot;;IF(AND([.L39]&lt;&gt;&quot;&quot;;[.N39]=&quot;&quot;);&quot;CLEAR&quot;;&quot;CONTRADICTION&quot;);IF([.M39]=&quot;MULTI_SALE_PENDING_ALLOCATION&quot;;IF([.L39]=&quot;&quot;;&quot;CLEAR&quot;;&quot;CONTRADICTION&quot;);IF([.M39]=&quot;ALLOCATED&quot;;IF(AND([.L39]=&quot;&quot;;[.N39]&lt;&gt;&quot;&quot;);&quot;CLEAR&quot;;&quot;CONTRADICTION&quot;);&quot;CONTRADICTION&quot;)))))">
            <text:p>UNKNOWN</text:p>
          </table:table-cell>
          <table:table-cell office:value-type="string" table:formula="of:=IF([.S39]=&quot;UNKNOWN&quot;;&quot;NO ACTION — linkage status is UNKNOWN / not asserted&quot;;IF([.S39]=&quot;CLEAR&quot;;&quot;NO CONTRADICTION — preserve evidence as entered&quot;;IF([.M39]=&quot;&quot;;&quot;REVIEW LINKAGE STATUS — identifiers are present while status is UNKNOWN&quot;;IF([.M39]=&quot;UNMATCHED&quot;;&quot;REMOVE LINKAGE IDENTIFIERS OR CORRECT LINKAGE STATUS&quot;;IF([.M39]=&quot;SINGLE_SALE_LINKED&quot;;&quot;REQUIRE LINKED SALE ID AND NO ALLOCATION GROUP ID&quot;;IF([.M39]=&quot;MULTI_SALE_PENDING_ALLOCATION&quot;;&quot;REMOVE LINKED SALE ID OR CORRECT LINKAGE STATUS&quot;;IF([.M39]=&quot;ALLOCATED&quot;;&quot;REQUIRE ALLOCATION GROUP ID AND NO LINKED SALE ID&quot;;&quot;REVIEW LINKAGE EVIDENCE — NO AUTHORITY CREATED&quot;)))))))">
            <text:p>NO ACTION — linkage status is UNKNOWN / not asserted</text:p>
          </table:table-cell>
          <table:table-cell office:value-type="string" table:formula="of:=IF([.S39]=&quot;CONTRADICTION&quot;;&quot;BLOCKED&quot;;IF([.S39]=&quot;UNKNOWN&quot;;&quot;UNKNOWN&quot;;IF([.S39]=&quot;CLEAR&quot;;IF(OR([.O39]=&quot;&quot;;[.P39]=&quot;&quot;);&quot;UNKNOWN&quot;;&quot;READY FOR REVIEW&quot;);&quot;BLOCKED&quot;)))">
            <text:p>UNKNOWN</text:p>
          </table:table-cell>
          <table:table-cell office:value-type="string" table:formula="of:=IF([.U39]=&quot;UNKNOWN&quot;;&quot;COMPLETE OR ASSERT REQUIRED EVIDENCE BEFORE REVIEW&quot;;IF([.U39]=&quot;BLOCKED&quot;;&quot;RESOLVE CONTRADICTION BEFORE REVIEW — NO AUTHORITY CREATED&quot;;IF([.U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9]=&quot;READY FOR REVIEW&quot;;&quot;REVIEW ELIGIBLE — NO AUTHORITY&quot;;IF(OR([.U39]=&quot;UNKNOWN&quot;;[.U3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0]=&quot;&quot;;IF(AND([.L40]=&quot;&quot;;[.N40]=&quot;&quot;);&quot;UNKNOWN&quot;;&quot;CONTRADICTION&quot;);IF([.M40]=&quot;UNMATCHED&quot;;IF(AND([.L40]=&quot;&quot;;[.N40]=&quot;&quot;);&quot;CLEAR&quot;;&quot;CONTRADICTION&quot;);IF([.M40]=&quot;SINGLE_SALE_LINKED&quot;;IF(AND([.L40]&lt;&gt;&quot;&quot;;[.N40]=&quot;&quot;);&quot;CLEAR&quot;;&quot;CONTRADICTION&quot;);IF([.M40]=&quot;MULTI_SALE_PENDING_ALLOCATION&quot;;IF([.L40]=&quot;&quot;;&quot;CLEAR&quot;;&quot;CONTRADICTION&quot;);IF([.M40]=&quot;ALLOCATED&quot;;IF(AND([.L40]=&quot;&quot;;[.N40]&lt;&gt;&quot;&quot;);&quot;CLEAR&quot;;&quot;CONTRADICTION&quot;);&quot;CONTRADICTION&quot;)))))">
            <text:p>UNKNOWN</text:p>
          </table:table-cell>
          <table:table-cell office:value-type="string" table:formula="of:=IF([.S40]=&quot;UNKNOWN&quot;;&quot;NO ACTION — linkage status is UNKNOWN / not asserted&quot;;IF([.S40]=&quot;CLEAR&quot;;&quot;NO CONTRADICTION — preserve evidence as entered&quot;;IF([.M40]=&quot;&quot;;&quot;REVIEW LINKAGE STATUS — identifiers are present while status is UNKNOWN&quot;;IF([.M40]=&quot;UNMATCHED&quot;;&quot;REMOVE LINKAGE IDENTIFIERS OR CORRECT LINKAGE STATUS&quot;;IF([.M40]=&quot;SINGLE_SALE_LINKED&quot;;&quot;REQUIRE LINKED SALE ID AND NO ALLOCATION GROUP ID&quot;;IF([.M40]=&quot;MULTI_SALE_PENDING_ALLOCATION&quot;;&quot;REMOVE LINKED SALE ID OR CORRECT LINKAGE STATUS&quot;;IF([.M40]=&quot;ALLOCATED&quot;;&quot;REQUIRE ALLOCATION GROUP ID AND NO LINKED SALE ID&quot;;&quot;REVIEW LINKAGE EVIDENCE — NO AUTHORITY CREATED&quot;)))))))">
            <text:p>NO ACTION — linkage status is UNKNOWN / not asserted</text:p>
          </table:table-cell>
          <table:table-cell office:value-type="string" table:formula="of:=IF([.S40]=&quot;CONTRADICTION&quot;;&quot;BLOCKED&quot;;IF([.S40]=&quot;UNKNOWN&quot;;&quot;UNKNOWN&quot;;IF([.S40]=&quot;CLEAR&quot;;IF(OR([.O40]=&quot;&quot;;[.P40]=&quot;&quot;);&quot;UNKNOWN&quot;;&quot;READY FOR REVIEW&quot;);&quot;BLOCKED&quot;)))">
            <text:p>UNKNOWN</text:p>
          </table:table-cell>
          <table:table-cell office:value-type="string" table:formula="of:=IF([.U40]=&quot;UNKNOWN&quot;;&quot;COMPLETE OR ASSERT REQUIRED EVIDENCE BEFORE REVIEW&quot;;IF([.U40]=&quot;BLOCKED&quot;;&quot;RESOLVE CONTRADICTION BEFORE REVIEW — NO AUTHORITY CREATED&quot;;IF([.U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0]=&quot;READY FOR REVIEW&quot;;&quot;REVIEW ELIGIBLE — NO AUTHORITY&quot;;IF(OR([.U40]=&quot;UNKNOWN&quot;;[.U4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1]=&quot;&quot;;IF(AND([.L41]=&quot;&quot;;[.N41]=&quot;&quot;);&quot;UNKNOWN&quot;;&quot;CONTRADICTION&quot;);IF([.M41]=&quot;UNMATCHED&quot;;IF(AND([.L41]=&quot;&quot;;[.N41]=&quot;&quot;);&quot;CLEAR&quot;;&quot;CONTRADICTION&quot;);IF([.M41]=&quot;SINGLE_SALE_LINKED&quot;;IF(AND([.L41]&lt;&gt;&quot;&quot;;[.N41]=&quot;&quot;);&quot;CLEAR&quot;;&quot;CONTRADICTION&quot;);IF([.M41]=&quot;MULTI_SALE_PENDING_ALLOCATION&quot;;IF([.L41]=&quot;&quot;;&quot;CLEAR&quot;;&quot;CONTRADICTION&quot;);IF([.M41]=&quot;ALLOCATED&quot;;IF(AND([.L41]=&quot;&quot;;[.N41]&lt;&gt;&quot;&quot;);&quot;CLEAR&quot;;&quot;CONTRADICTION&quot;);&quot;CONTRADICTION&quot;)))))">
            <text:p>UNKNOWN</text:p>
          </table:table-cell>
          <table:table-cell office:value-type="string" table:formula="of:=IF([.S41]=&quot;UNKNOWN&quot;;&quot;NO ACTION — linkage status is UNKNOWN / not asserted&quot;;IF([.S41]=&quot;CLEAR&quot;;&quot;NO CONTRADICTION — preserve evidence as entered&quot;;IF([.M41]=&quot;&quot;;&quot;REVIEW LINKAGE STATUS — identifiers are present while status is UNKNOWN&quot;;IF([.M41]=&quot;UNMATCHED&quot;;&quot;REMOVE LINKAGE IDENTIFIERS OR CORRECT LINKAGE STATUS&quot;;IF([.M41]=&quot;SINGLE_SALE_LINKED&quot;;&quot;REQUIRE LINKED SALE ID AND NO ALLOCATION GROUP ID&quot;;IF([.M41]=&quot;MULTI_SALE_PENDING_ALLOCATION&quot;;&quot;REMOVE LINKED SALE ID OR CORRECT LINKAGE STATUS&quot;;IF([.M41]=&quot;ALLOCATED&quot;;&quot;REQUIRE ALLOCATION GROUP ID AND NO LINKED SALE ID&quot;;&quot;REVIEW LINKAGE EVIDENCE — NO AUTHORITY CREATED&quot;)))))))">
            <text:p>NO ACTION — linkage status is UNKNOWN / not asserted</text:p>
          </table:table-cell>
          <table:table-cell office:value-type="string" table:formula="of:=IF([.S41]=&quot;CONTRADICTION&quot;;&quot;BLOCKED&quot;;IF([.S41]=&quot;UNKNOWN&quot;;&quot;UNKNOWN&quot;;IF([.S41]=&quot;CLEAR&quot;;IF(OR([.O41]=&quot;&quot;;[.P41]=&quot;&quot;);&quot;UNKNOWN&quot;;&quot;READY FOR REVIEW&quot;);&quot;BLOCKED&quot;)))">
            <text:p>UNKNOWN</text:p>
          </table:table-cell>
          <table:table-cell office:value-type="string" table:formula="of:=IF([.U41]=&quot;UNKNOWN&quot;;&quot;COMPLETE OR ASSERT REQUIRED EVIDENCE BEFORE REVIEW&quot;;IF([.U41]=&quot;BLOCKED&quot;;&quot;RESOLVE CONTRADICTION BEFORE REVIEW — NO AUTHORITY CREATED&quot;;IF([.U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1]=&quot;READY FOR REVIEW&quot;;&quot;REVIEW ELIGIBLE — NO AUTHORITY&quot;;IF(OR([.U41]=&quot;UNKNOWN&quot;;[.U4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2]=&quot;&quot;;IF(AND([.L42]=&quot;&quot;;[.N42]=&quot;&quot;);&quot;UNKNOWN&quot;;&quot;CONTRADICTION&quot;);IF([.M42]=&quot;UNMATCHED&quot;;IF(AND([.L42]=&quot;&quot;;[.N42]=&quot;&quot;);&quot;CLEAR&quot;;&quot;CONTRADICTION&quot;);IF([.M42]=&quot;SINGLE_SALE_LINKED&quot;;IF(AND([.L42]&lt;&gt;&quot;&quot;;[.N42]=&quot;&quot;);&quot;CLEAR&quot;;&quot;CONTRADICTION&quot;);IF([.M42]=&quot;MULTI_SALE_PENDING_ALLOCATION&quot;;IF([.L42]=&quot;&quot;;&quot;CLEAR&quot;;&quot;CONTRADICTION&quot;);IF([.M42]=&quot;ALLOCATED&quot;;IF(AND([.L42]=&quot;&quot;;[.N42]&lt;&gt;&quot;&quot;);&quot;CLEAR&quot;;&quot;CONTRADICTION&quot;);&quot;CONTRADICTION&quot;)))))">
            <text:p>UNKNOWN</text:p>
          </table:table-cell>
          <table:table-cell office:value-type="string" table:formula="of:=IF([.S42]=&quot;UNKNOWN&quot;;&quot;NO ACTION — linkage status is UNKNOWN / not asserted&quot;;IF([.S42]=&quot;CLEAR&quot;;&quot;NO CONTRADICTION — preserve evidence as entered&quot;;IF([.M42]=&quot;&quot;;&quot;REVIEW LINKAGE STATUS — identifiers are present while status is UNKNOWN&quot;;IF([.M42]=&quot;UNMATCHED&quot;;&quot;REMOVE LINKAGE IDENTIFIERS OR CORRECT LINKAGE STATUS&quot;;IF([.M42]=&quot;SINGLE_SALE_LINKED&quot;;&quot;REQUIRE LINKED SALE ID AND NO ALLOCATION GROUP ID&quot;;IF([.M42]=&quot;MULTI_SALE_PENDING_ALLOCATION&quot;;&quot;REMOVE LINKED SALE ID OR CORRECT LINKAGE STATUS&quot;;IF([.M42]=&quot;ALLOCATED&quot;;&quot;REQUIRE ALLOCATION GROUP ID AND NO LINKED SALE ID&quot;;&quot;REVIEW LINKAGE EVIDENCE — NO AUTHORITY CREATED&quot;)))))))">
            <text:p>NO ACTION — linkage status is UNKNOWN / not asserted</text:p>
          </table:table-cell>
          <table:table-cell office:value-type="string" table:formula="of:=IF([.S42]=&quot;CONTRADICTION&quot;;&quot;BLOCKED&quot;;IF([.S42]=&quot;UNKNOWN&quot;;&quot;UNKNOWN&quot;;IF([.S42]=&quot;CLEAR&quot;;IF(OR([.O42]=&quot;&quot;;[.P42]=&quot;&quot;);&quot;UNKNOWN&quot;;&quot;READY FOR REVIEW&quot;);&quot;BLOCKED&quot;)))">
            <text:p>UNKNOWN</text:p>
          </table:table-cell>
          <table:table-cell office:value-type="string" table:formula="of:=IF([.U42]=&quot;UNKNOWN&quot;;&quot;COMPLETE OR ASSERT REQUIRED EVIDENCE BEFORE REVIEW&quot;;IF([.U42]=&quot;BLOCKED&quot;;&quot;RESOLVE CONTRADICTION BEFORE REVIEW — NO AUTHORITY CREATED&quot;;IF([.U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2]=&quot;READY FOR REVIEW&quot;;&quot;REVIEW ELIGIBLE — NO AUTHORITY&quot;;IF(OR([.U42]=&quot;UNKNOWN&quot;;[.U4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3]=&quot;&quot;;IF(AND([.L43]=&quot;&quot;;[.N43]=&quot;&quot;);&quot;UNKNOWN&quot;;&quot;CONTRADICTION&quot;);IF([.M43]=&quot;UNMATCHED&quot;;IF(AND([.L43]=&quot;&quot;;[.N43]=&quot;&quot;);&quot;CLEAR&quot;;&quot;CONTRADICTION&quot;);IF([.M43]=&quot;SINGLE_SALE_LINKED&quot;;IF(AND([.L43]&lt;&gt;&quot;&quot;;[.N43]=&quot;&quot;);&quot;CLEAR&quot;;&quot;CONTRADICTION&quot;);IF([.M43]=&quot;MULTI_SALE_PENDING_ALLOCATION&quot;;IF([.L43]=&quot;&quot;;&quot;CLEAR&quot;;&quot;CONTRADICTION&quot;);IF([.M43]=&quot;ALLOCATED&quot;;IF(AND([.L43]=&quot;&quot;;[.N43]&lt;&gt;&quot;&quot;);&quot;CLEAR&quot;;&quot;CONTRADICTION&quot;);&quot;CONTRADICTION&quot;)))))">
            <text:p>UNKNOWN</text:p>
          </table:table-cell>
          <table:table-cell office:value-type="string" table:formula="of:=IF([.S43]=&quot;UNKNOWN&quot;;&quot;NO ACTION — linkage status is UNKNOWN / not asserted&quot;;IF([.S43]=&quot;CLEAR&quot;;&quot;NO CONTRADICTION — preserve evidence as entered&quot;;IF([.M43]=&quot;&quot;;&quot;REVIEW LINKAGE STATUS — identifiers are present while status is UNKNOWN&quot;;IF([.M43]=&quot;UNMATCHED&quot;;&quot;REMOVE LINKAGE IDENTIFIERS OR CORRECT LINKAGE STATUS&quot;;IF([.M43]=&quot;SINGLE_SALE_LINKED&quot;;&quot;REQUIRE LINKED SALE ID AND NO ALLOCATION GROUP ID&quot;;IF([.M43]=&quot;MULTI_SALE_PENDING_ALLOCATION&quot;;&quot;REMOVE LINKED SALE ID OR CORRECT LINKAGE STATUS&quot;;IF([.M43]=&quot;ALLOCATED&quot;;&quot;REQUIRE ALLOCATION GROUP ID AND NO LINKED SALE ID&quot;;&quot;REVIEW LINKAGE EVIDENCE — NO AUTHORITY CREATED&quot;)))))))">
            <text:p>NO ACTION — linkage status is UNKNOWN / not asserted</text:p>
          </table:table-cell>
          <table:table-cell office:value-type="string" table:formula="of:=IF([.S43]=&quot;CONTRADICTION&quot;;&quot;BLOCKED&quot;;IF([.S43]=&quot;UNKNOWN&quot;;&quot;UNKNOWN&quot;;IF([.S43]=&quot;CLEAR&quot;;IF(OR([.O43]=&quot;&quot;;[.P43]=&quot;&quot;);&quot;UNKNOWN&quot;;&quot;READY FOR REVIEW&quot;);&quot;BLOCKED&quot;)))">
            <text:p>UNKNOWN</text:p>
          </table:table-cell>
          <table:table-cell office:value-type="string" table:formula="of:=IF([.U43]=&quot;UNKNOWN&quot;;&quot;COMPLETE OR ASSERT REQUIRED EVIDENCE BEFORE REVIEW&quot;;IF([.U43]=&quot;BLOCKED&quot;;&quot;RESOLVE CONTRADICTION BEFORE REVIEW — NO AUTHORITY CREATED&quot;;IF([.U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3]=&quot;READY FOR REVIEW&quot;;&quot;REVIEW ELIGIBLE — NO AUTHORITY&quot;;IF(OR([.U43]=&quot;UNKNOWN&quot;;[.U4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4]=&quot;&quot;;IF(AND([.L44]=&quot;&quot;;[.N44]=&quot;&quot;);&quot;UNKNOWN&quot;;&quot;CONTRADICTION&quot;);IF([.M44]=&quot;UNMATCHED&quot;;IF(AND([.L44]=&quot;&quot;;[.N44]=&quot;&quot;);&quot;CLEAR&quot;;&quot;CONTRADICTION&quot;);IF([.M44]=&quot;SINGLE_SALE_LINKED&quot;;IF(AND([.L44]&lt;&gt;&quot;&quot;;[.N44]=&quot;&quot;);&quot;CLEAR&quot;;&quot;CONTRADICTION&quot;);IF([.M44]=&quot;MULTI_SALE_PENDING_ALLOCATION&quot;;IF([.L44]=&quot;&quot;;&quot;CLEAR&quot;;&quot;CONTRADICTION&quot;);IF([.M44]=&quot;ALLOCATED&quot;;IF(AND([.L44]=&quot;&quot;;[.N44]&lt;&gt;&quot;&quot;);&quot;CLEAR&quot;;&quot;CONTRADICTION&quot;);&quot;CONTRADICTION&quot;)))))">
            <text:p>UNKNOWN</text:p>
          </table:table-cell>
          <table:table-cell office:value-type="string" table:formula="of:=IF([.S44]=&quot;UNKNOWN&quot;;&quot;NO ACTION — linkage status is UNKNOWN / not asserted&quot;;IF([.S44]=&quot;CLEAR&quot;;&quot;NO CONTRADICTION — preserve evidence as entered&quot;;IF([.M44]=&quot;&quot;;&quot;REVIEW LINKAGE STATUS — identifiers are present while status is UNKNOWN&quot;;IF([.M44]=&quot;UNMATCHED&quot;;&quot;REMOVE LINKAGE IDENTIFIERS OR CORRECT LINKAGE STATUS&quot;;IF([.M44]=&quot;SINGLE_SALE_LINKED&quot;;&quot;REQUIRE LINKED SALE ID AND NO ALLOCATION GROUP ID&quot;;IF([.M44]=&quot;MULTI_SALE_PENDING_ALLOCATION&quot;;&quot;REMOVE LINKED SALE ID OR CORRECT LINKAGE STATUS&quot;;IF([.M44]=&quot;ALLOCATED&quot;;&quot;REQUIRE ALLOCATION GROUP ID AND NO LINKED SALE ID&quot;;&quot;REVIEW LINKAGE EVIDENCE — NO AUTHORITY CREATED&quot;)))))))">
            <text:p>NO ACTION — linkage status is UNKNOWN / not asserted</text:p>
          </table:table-cell>
          <table:table-cell office:value-type="string" table:formula="of:=IF([.S44]=&quot;CONTRADICTION&quot;;&quot;BLOCKED&quot;;IF([.S44]=&quot;UNKNOWN&quot;;&quot;UNKNOWN&quot;;IF([.S44]=&quot;CLEAR&quot;;IF(OR([.O44]=&quot;&quot;;[.P44]=&quot;&quot;);&quot;UNKNOWN&quot;;&quot;READY FOR REVIEW&quot;);&quot;BLOCKED&quot;)))">
            <text:p>UNKNOWN</text:p>
          </table:table-cell>
          <table:table-cell office:value-type="string" table:formula="of:=IF([.U44]=&quot;UNKNOWN&quot;;&quot;COMPLETE OR ASSERT REQUIRED EVIDENCE BEFORE REVIEW&quot;;IF([.U44]=&quot;BLOCKED&quot;;&quot;RESOLVE CONTRADICTION BEFORE REVIEW — NO AUTHORITY CREATED&quot;;IF([.U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4]=&quot;READY FOR REVIEW&quot;;&quot;REVIEW ELIGIBLE — NO AUTHORITY&quot;;IF(OR([.U44]=&quot;UNKNOWN&quot;;[.U4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5]=&quot;&quot;;IF(AND([.L45]=&quot;&quot;;[.N45]=&quot;&quot;);&quot;UNKNOWN&quot;;&quot;CONTRADICTION&quot;);IF([.M45]=&quot;UNMATCHED&quot;;IF(AND([.L45]=&quot;&quot;;[.N45]=&quot;&quot;);&quot;CLEAR&quot;;&quot;CONTRADICTION&quot;);IF([.M45]=&quot;SINGLE_SALE_LINKED&quot;;IF(AND([.L45]&lt;&gt;&quot;&quot;;[.N45]=&quot;&quot;);&quot;CLEAR&quot;;&quot;CONTRADICTION&quot;);IF([.M45]=&quot;MULTI_SALE_PENDING_ALLOCATION&quot;;IF([.L45]=&quot;&quot;;&quot;CLEAR&quot;;&quot;CONTRADICTION&quot;);IF([.M45]=&quot;ALLOCATED&quot;;IF(AND([.L45]=&quot;&quot;;[.N45]&lt;&gt;&quot;&quot;);&quot;CLEAR&quot;;&quot;CONTRADICTION&quot;);&quot;CONTRADICTION&quot;)))))">
            <text:p>UNKNOWN</text:p>
          </table:table-cell>
          <table:table-cell office:value-type="string" table:formula="of:=IF([.S45]=&quot;UNKNOWN&quot;;&quot;NO ACTION — linkage status is UNKNOWN / not asserted&quot;;IF([.S45]=&quot;CLEAR&quot;;&quot;NO CONTRADICTION — preserve evidence as entered&quot;;IF([.M45]=&quot;&quot;;&quot;REVIEW LINKAGE STATUS — identifiers are present while status is UNKNOWN&quot;;IF([.M45]=&quot;UNMATCHED&quot;;&quot;REMOVE LINKAGE IDENTIFIERS OR CORRECT LINKAGE STATUS&quot;;IF([.M45]=&quot;SINGLE_SALE_LINKED&quot;;&quot;REQUIRE LINKED SALE ID AND NO ALLOCATION GROUP ID&quot;;IF([.M45]=&quot;MULTI_SALE_PENDING_ALLOCATION&quot;;&quot;REMOVE LINKED SALE ID OR CORRECT LINKAGE STATUS&quot;;IF([.M45]=&quot;ALLOCATED&quot;;&quot;REQUIRE ALLOCATION GROUP ID AND NO LINKED SALE ID&quot;;&quot;REVIEW LINKAGE EVIDENCE — NO AUTHORITY CREATED&quot;)))))))">
            <text:p>NO ACTION — linkage status is UNKNOWN / not asserted</text:p>
          </table:table-cell>
          <table:table-cell office:value-type="string" table:formula="of:=IF([.S45]=&quot;CONTRADICTION&quot;;&quot;BLOCKED&quot;;IF([.S45]=&quot;UNKNOWN&quot;;&quot;UNKNOWN&quot;;IF([.S45]=&quot;CLEAR&quot;;IF(OR([.O45]=&quot;&quot;;[.P45]=&quot;&quot;);&quot;UNKNOWN&quot;;&quot;READY FOR REVIEW&quot;);&quot;BLOCKED&quot;)))">
            <text:p>UNKNOWN</text:p>
          </table:table-cell>
          <table:table-cell office:value-type="string" table:formula="of:=IF([.U45]=&quot;UNKNOWN&quot;;&quot;COMPLETE OR ASSERT REQUIRED EVIDENCE BEFORE REVIEW&quot;;IF([.U45]=&quot;BLOCKED&quot;;&quot;RESOLVE CONTRADICTION BEFORE REVIEW — NO AUTHORITY CREATED&quot;;IF([.U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5]=&quot;READY FOR REVIEW&quot;;&quot;REVIEW ELIGIBLE — NO AUTHORITY&quot;;IF(OR([.U45]=&quot;UNKNOWN&quot;;[.U4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6]=&quot;&quot;;IF(AND([.L46]=&quot;&quot;;[.N46]=&quot;&quot;);&quot;UNKNOWN&quot;;&quot;CONTRADICTION&quot;);IF([.M46]=&quot;UNMATCHED&quot;;IF(AND([.L46]=&quot;&quot;;[.N46]=&quot;&quot;);&quot;CLEAR&quot;;&quot;CONTRADICTION&quot;);IF([.M46]=&quot;SINGLE_SALE_LINKED&quot;;IF(AND([.L46]&lt;&gt;&quot;&quot;;[.N46]=&quot;&quot;);&quot;CLEAR&quot;;&quot;CONTRADICTION&quot;);IF([.M46]=&quot;MULTI_SALE_PENDING_ALLOCATION&quot;;IF([.L46]=&quot;&quot;;&quot;CLEAR&quot;;&quot;CONTRADICTION&quot;);IF([.M46]=&quot;ALLOCATED&quot;;IF(AND([.L46]=&quot;&quot;;[.N46]&lt;&gt;&quot;&quot;);&quot;CLEAR&quot;;&quot;CONTRADICTION&quot;);&quot;CONTRADICTION&quot;)))))">
            <text:p>UNKNOWN</text:p>
          </table:table-cell>
          <table:table-cell office:value-type="string" table:formula="of:=IF([.S46]=&quot;UNKNOWN&quot;;&quot;NO ACTION — linkage status is UNKNOWN / not asserted&quot;;IF([.S46]=&quot;CLEAR&quot;;&quot;NO CONTRADICTION — preserve evidence as entered&quot;;IF([.M46]=&quot;&quot;;&quot;REVIEW LINKAGE STATUS — identifiers are present while status is UNKNOWN&quot;;IF([.M46]=&quot;UNMATCHED&quot;;&quot;REMOVE LINKAGE IDENTIFIERS OR CORRECT LINKAGE STATUS&quot;;IF([.M46]=&quot;SINGLE_SALE_LINKED&quot;;&quot;REQUIRE LINKED SALE ID AND NO ALLOCATION GROUP ID&quot;;IF([.M46]=&quot;MULTI_SALE_PENDING_ALLOCATION&quot;;&quot;REMOVE LINKED SALE ID OR CORRECT LINKAGE STATUS&quot;;IF([.M46]=&quot;ALLOCATED&quot;;&quot;REQUIRE ALLOCATION GROUP ID AND NO LINKED SALE ID&quot;;&quot;REVIEW LINKAGE EVIDENCE — NO AUTHORITY CREATED&quot;)))))))">
            <text:p>NO ACTION — linkage status is UNKNOWN / not asserted</text:p>
          </table:table-cell>
          <table:table-cell office:value-type="string" table:formula="of:=IF([.S46]=&quot;CONTRADICTION&quot;;&quot;BLOCKED&quot;;IF([.S46]=&quot;UNKNOWN&quot;;&quot;UNKNOWN&quot;;IF([.S46]=&quot;CLEAR&quot;;IF(OR([.O46]=&quot;&quot;;[.P46]=&quot;&quot;);&quot;UNKNOWN&quot;;&quot;READY FOR REVIEW&quot;);&quot;BLOCKED&quot;)))">
            <text:p>UNKNOWN</text:p>
          </table:table-cell>
          <table:table-cell office:value-type="string" table:formula="of:=IF([.U46]=&quot;UNKNOWN&quot;;&quot;COMPLETE OR ASSERT REQUIRED EVIDENCE BEFORE REVIEW&quot;;IF([.U46]=&quot;BLOCKED&quot;;&quot;RESOLVE CONTRADICTION BEFORE REVIEW — NO AUTHORITY CREATED&quot;;IF([.U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6]=&quot;READY FOR REVIEW&quot;;&quot;REVIEW ELIGIBLE — NO AUTHORITY&quot;;IF(OR([.U46]=&quot;UNKNOWN&quot;;[.U4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7]=&quot;&quot;;IF(AND([.L47]=&quot;&quot;;[.N47]=&quot;&quot;);&quot;UNKNOWN&quot;;&quot;CONTRADICTION&quot;);IF([.M47]=&quot;UNMATCHED&quot;;IF(AND([.L47]=&quot;&quot;;[.N47]=&quot;&quot;);&quot;CLEAR&quot;;&quot;CONTRADICTION&quot;);IF([.M47]=&quot;SINGLE_SALE_LINKED&quot;;IF(AND([.L47]&lt;&gt;&quot;&quot;;[.N47]=&quot;&quot;);&quot;CLEAR&quot;;&quot;CONTRADICTION&quot;);IF([.M47]=&quot;MULTI_SALE_PENDING_ALLOCATION&quot;;IF([.L47]=&quot;&quot;;&quot;CLEAR&quot;;&quot;CONTRADICTION&quot;);IF([.M47]=&quot;ALLOCATED&quot;;IF(AND([.L47]=&quot;&quot;;[.N47]&lt;&gt;&quot;&quot;);&quot;CLEAR&quot;;&quot;CONTRADICTION&quot;);&quot;CONTRADICTION&quot;)))))">
            <text:p>UNKNOWN</text:p>
          </table:table-cell>
          <table:table-cell office:value-type="string" table:formula="of:=IF([.S47]=&quot;UNKNOWN&quot;;&quot;NO ACTION — linkage status is UNKNOWN / not asserted&quot;;IF([.S47]=&quot;CLEAR&quot;;&quot;NO CONTRADICTION — preserve evidence as entered&quot;;IF([.M47]=&quot;&quot;;&quot;REVIEW LINKAGE STATUS — identifiers are present while status is UNKNOWN&quot;;IF([.M47]=&quot;UNMATCHED&quot;;&quot;REMOVE LINKAGE IDENTIFIERS OR CORRECT LINKAGE STATUS&quot;;IF([.M47]=&quot;SINGLE_SALE_LINKED&quot;;&quot;REQUIRE LINKED SALE ID AND NO ALLOCATION GROUP ID&quot;;IF([.M47]=&quot;MULTI_SALE_PENDING_ALLOCATION&quot;;&quot;REMOVE LINKED SALE ID OR CORRECT LINKAGE STATUS&quot;;IF([.M47]=&quot;ALLOCATED&quot;;&quot;REQUIRE ALLOCATION GROUP ID AND NO LINKED SALE ID&quot;;&quot;REVIEW LINKAGE EVIDENCE — NO AUTHORITY CREATED&quot;)))))))">
            <text:p>NO ACTION — linkage status is UNKNOWN / not asserted</text:p>
          </table:table-cell>
          <table:table-cell office:value-type="string" table:formula="of:=IF([.S47]=&quot;CONTRADICTION&quot;;&quot;BLOCKED&quot;;IF([.S47]=&quot;UNKNOWN&quot;;&quot;UNKNOWN&quot;;IF([.S47]=&quot;CLEAR&quot;;IF(OR([.O47]=&quot;&quot;;[.P47]=&quot;&quot;);&quot;UNKNOWN&quot;;&quot;READY FOR REVIEW&quot;);&quot;BLOCKED&quot;)))">
            <text:p>UNKNOWN</text:p>
          </table:table-cell>
          <table:table-cell office:value-type="string" table:formula="of:=IF([.U47]=&quot;UNKNOWN&quot;;&quot;COMPLETE OR ASSERT REQUIRED EVIDENCE BEFORE REVIEW&quot;;IF([.U47]=&quot;BLOCKED&quot;;&quot;RESOLVE CONTRADICTION BEFORE REVIEW — NO AUTHORITY CREATED&quot;;IF([.U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7]=&quot;READY FOR REVIEW&quot;;&quot;REVIEW ELIGIBLE — NO AUTHORITY&quot;;IF(OR([.U47]=&quot;UNKNOWN&quot;;[.U4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8]=&quot;&quot;;IF(AND([.L48]=&quot;&quot;;[.N48]=&quot;&quot;);&quot;UNKNOWN&quot;;&quot;CONTRADICTION&quot;);IF([.M48]=&quot;UNMATCHED&quot;;IF(AND([.L48]=&quot;&quot;;[.N48]=&quot;&quot;);&quot;CLEAR&quot;;&quot;CONTRADICTION&quot;);IF([.M48]=&quot;SINGLE_SALE_LINKED&quot;;IF(AND([.L48]&lt;&gt;&quot;&quot;;[.N48]=&quot;&quot;);&quot;CLEAR&quot;;&quot;CONTRADICTION&quot;);IF([.M48]=&quot;MULTI_SALE_PENDING_ALLOCATION&quot;;IF([.L48]=&quot;&quot;;&quot;CLEAR&quot;;&quot;CONTRADICTION&quot;);IF([.M48]=&quot;ALLOCATED&quot;;IF(AND([.L48]=&quot;&quot;;[.N48]&lt;&gt;&quot;&quot;);&quot;CLEAR&quot;;&quot;CONTRADICTION&quot;);&quot;CONTRADICTION&quot;)))))">
            <text:p>UNKNOWN</text:p>
          </table:table-cell>
          <table:table-cell office:value-type="string" table:formula="of:=IF([.S48]=&quot;UNKNOWN&quot;;&quot;NO ACTION — linkage status is UNKNOWN / not asserted&quot;;IF([.S48]=&quot;CLEAR&quot;;&quot;NO CONTRADICTION — preserve evidence as entered&quot;;IF([.M48]=&quot;&quot;;&quot;REVIEW LINKAGE STATUS — identifiers are present while status is UNKNOWN&quot;;IF([.M48]=&quot;UNMATCHED&quot;;&quot;REMOVE LINKAGE IDENTIFIERS OR CORRECT LINKAGE STATUS&quot;;IF([.M48]=&quot;SINGLE_SALE_LINKED&quot;;&quot;REQUIRE LINKED SALE ID AND NO ALLOCATION GROUP ID&quot;;IF([.M48]=&quot;MULTI_SALE_PENDING_ALLOCATION&quot;;&quot;REMOVE LINKED SALE ID OR CORRECT LINKAGE STATUS&quot;;IF([.M48]=&quot;ALLOCATED&quot;;&quot;REQUIRE ALLOCATION GROUP ID AND NO LINKED SALE ID&quot;;&quot;REVIEW LINKAGE EVIDENCE — NO AUTHORITY CREATED&quot;)))))))">
            <text:p>NO ACTION — linkage status is UNKNOWN / not asserted</text:p>
          </table:table-cell>
          <table:table-cell office:value-type="string" table:formula="of:=IF([.S48]=&quot;CONTRADICTION&quot;;&quot;BLOCKED&quot;;IF([.S48]=&quot;UNKNOWN&quot;;&quot;UNKNOWN&quot;;IF([.S48]=&quot;CLEAR&quot;;IF(OR([.O48]=&quot;&quot;;[.P48]=&quot;&quot;);&quot;UNKNOWN&quot;;&quot;READY FOR REVIEW&quot;);&quot;BLOCKED&quot;)))">
            <text:p>UNKNOWN</text:p>
          </table:table-cell>
          <table:table-cell office:value-type="string" table:formula="of:=IF([.U48]=&quot;UNKNOWN&quot;;&quot;COMPLETE OR ASSERT REQUIRED EVIDENCE BEFORE REVIEW&quot;;IF([.U48]=&quot;BLOCKED&quot;;&quot;RESOLVE CONTRADICTION BEFORE REVIEW — NO AUTHORITY CREATED&quot;;IF([.U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8]=&quot;READY FOR REVIEW&quot;;&quot;REVIEW ELIGIBLE — NO AUTHORITY&quot;;IF(OR([.U48]=&quot;UNKNOWN&quot;;[.U4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9]=&quot;&quot;;IF(AND([.L49]=&quot;&quot;;[.N49]=&quot;&quot;);&quot;UNKNOWN&quot;;&quot;CONTRADICTION&quot;);IF([.M49]=&quot;UNMATCHED&quot;;IF(AND([.L49]=&quot;&quot;;[.N49]=&quot;&quot;);&quot;CLEAR&quot;;&quot;CONTRADICTION&quot;);IF([.M49]=&quot;SINGLE_SALE_LINKED&quot;;IF(AND([.L49]&lt;&gt;&quot;&quot;;[.N49]=&quot;&quot;);&quot;CLEAR&quot;;&quot;CONTRADICTION&quot;);IF([.M49]=&quot;MULTI_SALE_PENDING_ALLOCATION&quot;;IF([.L49]=&quot;&quot;;&quot;CLEAR&quot;;&quot;CONTRADICTION&quot;);IF([.M49]=&quot;ALLOCATED&quot;;IF(AND([.L49]=&quot;&quot;;[.N49]&lt;&gt;&quot;&quot;);&quot;CLEAR&quot;;&quot;CONTRADICTION&quot;);&quot;CONTRADICTION&quot;)))))">
            <text:p>UNKNOWN</text:p>
          </table:table-cell>
          <table:table-cell office:value-type="string" table:formula="of:=IF([.S49]=&quot;UNKNOWN&quot;;&quot;NO ACTION — linkage status is UNKNOWN / not asserted&quot;;IF([.S49]=&quot;CLEAR&quot;;&quot;NO CONTRADICTION — preserve evidence as entered&quot;;IF([.M49]=&quot;&quot;;&quot;REVIEW LINKAGE STATUS — identifiers are present while status is UNKNOWN&quot;;IF([.M49]=&quot;UNMATCHED&quot;;&quot;REMOVE LINKAGE IDENTIFIERS OR CORRECT LINKAGE STATUS&quot;;IF([.M49]=&quot;SINGLE_SALE_LINKED&quot;;&quot;REQUIRE LINKED SALE ID AND NO ALLOCATION GROUP ID&quot;;IF([.M49]=&quot;MULTI_SALE_PENDING_ALLOCATION&quot;;&quot;REMOVE LINKED SALE ID OR CORRECT LINKAGE STATUS&quot;;IF([.M49]=&quot;ALLOCATED&quot;;&quot;REQUIRE ALLOCATION GROUP ID AND NO LINKED SALE ID&quot;;&quot;REVIEW LINKAGE EVIDENCE — NO AUTHORITY CREATED&quot;)))))))">
            <text:p>NO ACTION — linkage status is UNKNOWN / not asserted</text:p>
          </table:table-cell>
          <table:table-cell office:value-type="string" table:formula="of:=IF([.S49]=&quot;CONTRADICTION&quot;;&quot;BLOCKED&quot;;IF([.S49]=&quot;UNKNOWN&quot;;&quot;UNKNOWN&quot;;IF([.S49]=&quot;CLEAR&quot;;IF(OR([.O49]=&quot;&quot;;[.P49]=&quot;&quot;);&quot;UNKNOWN&quot;;&quot;READY FOR REVIEW&quot;);&quot;BLOCKED&quot;)))">
            <text:p>UNKNOWN</text:p>
          </table:table-cell>
          <table:table-cell office:value-type="string" table:formula="of:=IF([.U49]=&quot;UNKNOWN&quot;;&quot;COMPLETE OR ASSERT REQUIRED EVIDENCE BEFORE REVIEW&quot;;IF([.U49]=&quot;BLOCKED&quot;;&quot;RESOLVE CONTRADICTION BEFORE REVIEW — NO AUTHORITY CREATED&quot;;IF([.U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9]=&quot;READY FOR REVIEW&quot;;&quot;REVIEW ELIGIBLE — NO AUTHORITY&quot;;IF(OR([.U49]=&quot;UNKNOWN&quot;;[.U4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0]=&quot;&quot;;IF(AND([.L50]=&quot;&quot;;[.N50]=&quot;&quot;);&quot;UNKNOWN&quot;;&quot;CONTRADICTION&quot;);IF([.M50]=&quot;UNMATCHED&quot;;IF(AND([.L50]=&quot;&quot;;[.N50]=&quot;&quot;);&quot;CLEAR&quot;;&quot;CONTRADICTION&quot;);IF([.M50]=&quot;SINGLE_SALE_LINKED&quot;;IF(AND([.L50]&lt;&gt;&quot;&quot;;[.N50]=&quot;&quot;);&quot;CLEAR&quot;;&quot;CONTRADICTION&quot;);IF([.M50]=&quot;MULTI_SALE_PENDING_ALLOCATION&quot;;IF([.L50]=&quot;&quot;;&quot;CLEAR&quot;;&quot;CONTRADICTION&quot;);IF([.M50]=&quot;ALLOCATED&quot;;IF(AND([.L50]=&quot;&quot;;[.N50]&lt;&gt;&quot;&quot;);&quot;CLEAR&quot;;&quot;CONTRADICTION&quot;);&quot;CONTRADICTION&quot;)))))">
            <text:p>UNKNOWN</text:p>
          </table:table-cell>
          <table:table-cell office:value-type="string" table:formula="of:=IF([.S50]=&quot;UNKNOWN&quot;;&quot;NO ACTION — linkage status is UNKNOWN / not asserted&quot;;IF([.S50]=&quot;CLEAR&quot;;&quot;NO CONTRADICTION — preserve evidence as entered&quot;;IF([.M50]=&quot;&quot;;&quot;REVIEW LINKAGE STATUS — identifiers are present while status is UNKNOWN&quot;;IF([.M50]=&quot;UNMATCHED&quot;;&quot;REMOVE LINKAGE IDENTIFIERS OR CORRECT LINKAGE STATUS&quot;;IF([.M50]=&quot;SINGLE_SALE_LINKED&quot;;&quot;REQUIRE LINKED SALE ID AND NO ALLOCATION GROUP ID&quot;;IF([.M50]=&quot;MULTI_SALE_PENDING_ALLOCATION&quot;;&quot;REMOVE LINKED SALE ID OR CORRECT LINKAGE STATUS&quot;;IF([.M50]=&quot;ALLOCATED&quot;;&quot;REQUIRE ALLOCATION GROUP ID AND NO LINKED SALE ID&quot;;&quot;REVIEW LINKAGE EVIDENCE — NO AUTHORITY CREATED&quot;)))))))">
            <text:p>NO ACTION — linkage status is UNKNOWN / not asserted</text:p>
          </table:table-cell>
          <table:table-cell office:value-type="string" table:formula="of:=IF([.S50]=&quot;CONTRADICTION&quot;;&quot;BLOCKED&quot;;IF([.S50]=&quot;UNKNOWN&quot;;&quot;UNKNOWN&quot;;IF([.S50]=&quot;CLEAR&quot;;IF(OR([.O50]=&quot;&quot;;[.P50]=&quot;&quot;);&quot;UNKNOWN&quot;;&quot;READY FOR REVIEW&quot;);&quot;BLOCKED&quot;)))">
            <text:p>UNKNOWN</text:p>
          </table:table-cell>
          <table:table-cell office:value-type="string" table:formula="of:=IF([.U50]=&quot;UNKNOWN&quot;;&quot;COMPLETE OR ASSERT REQUIRED EVIDENCE BEFORE REVIEW&quot;;IF([.U50]=&quot;BLOCKED&quot;;&quot;RESOLVE CONTRADICTION BEFORE REVIEW — NO AUTHORITY CREATED&quot;;IF([.U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0]=&quot;READY FOR REVIEW&quot;;&quot;REVIEW ELIGIBLE — NO AUTHORITY&quot;;IF(OR([.U50]=&quot;UNKNOWN&quot;;[.U5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1]=&quot;&quot;;IF(AND([.L51]=&quot;&quot;;[.N51]=&quot;&quot;);&quot;UNKNOWN&quot;;&quot;CONTRADICTION&quot;);IF([.M51]=&quot;UNMATCHED&quot;;IF(AND([.L51]=&quot;&quot;;[.N51]=&quot;&quot;);&quot;CLEAR&quot;;&quot;CONTRADICTION&quot;);IF([.M51]=&quot;SINGLE_SALE_LINKED&quot;;IF(AND([.L51]&lt;&gt;&quot;&quot;;[.N51]=&quot;&quot;);&quot;CLEAR&quot;;&quot;CONTRADICTION&quot;);IF([.M51]=&quot;MULTI_SALE_PENDING_ALLOCATION&quot;;IF([.L51]=&quot;&quot;;&quot;CLEAR&quot;;&quot;CONTRADICTION&quot;);IF([.M51]=&quot;ALLOCATED&quot;;IF(AND([.L51]=&quot;&quot;;[.N51]&lt;&gt;&quot;&quot;);&quot;CLEAR&quot;;&quot;CONTRADICTION&quot;);&quot;CONTRADICTION&quot;)))))">
            <text:p>UNKNOWN</text:p>
          </table:table-cell>
          <table:table-cell office:value-type="string" table:formula="of:=IF([.S51]=&quot;UNKNOWN&quot;;&quot;NO ACTION — linkage status is UNKNOWN / not asserted&quot;;IF([.S51]=&quot;CLEAR&quot;;&quot;NO CONTRADICTION — preserve evidence as entered&quot;;IF([.M51]=&quot;&quot;;&quot;REVIEW LINKAGE STATUS — identifiers are present while status is UNKNOWN&quot;;IF([.M51]=&quot;UNMATCHED&quot;;&quot;REMOVE LINKAGE IDENTIFIERS OR CORRECT LINKAGE STATUS&quot;;IF([.M51]=&quot;SINGLE_SALE_LINKED&quot;;&quot;REQUIRE LINKED SALE ID AND NO ALLOCATION GROUP ID&quot;;IF([.M51]=&quot;MULTI_SALE_PENDING_ALLOCATION&quot;;&quot;REMOVE LINKED SALE ID OR CORRECT LINKAGE STATUS&quot;;IF([.M51]=&quot;ALLOCATED&quot;;&quot;REQUIRE ALLOCATION GROUP ID AND NO LINKED SALE ID&quot;;&quot;REVIEW LINKAGE EVIDENCE — NO AUTHORITY CREATED&quot;)))))))">
            <text:p>NO ACTION — linkage status is UNKNOWN / not asserted</text:p>
          </table:table-cell>
          <table:table-cell office:value-type="string" table:formula="of:=IF([.S51]=&quot;CONTRADICTION&quot;;&quot;BLOCKED&quot;;IF([.S51]=&quot;UNKNOWN&quot;;&quot;UNKNOWN&quot;;IF([.S51]=&quot;CLEAR&quot;;IF(OR([.O51]=&quot;&quot;;[.P51]=&quot;&quot;);&quot;UNKNOWN&quot;;&quot;READY FOR REVIEW&quot;);&quot;BLOCKED&quot;)))">
            <text:p>UNKNOWN</text:p>
          </table:table-cell>
          <table:table-cell office:value-type="string" table:formula="of:=IF([.U51]=&quot;UNKNOWN&quot;;&quot;COMPLETE OR ASSERT REQUIRED EVIDENCE BEFORE REVIEW&quot;;IF([.U51]=&quot;BLOCKED&quot;;&quot;RESOLVE CONTRADICTION BEFORE REVIEW — NO AUTHORITY CREATED&quot;;IF([.U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1]=&quot;READY FOR REVIEW&quot;;&quot;REVIEW ELIGIBLE — NO AUTHORITY&quot;;IF(OR([.U51]=&quot;UNKNOWN&quot;;[.U5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2]=&quot;&quot;;IF(AND([.L52]=&quot;&quot;;[.N52]=&quot;&quot;);&quot;UNKNOWN&quot;;&quot;CONTRADICTION&quot;);IF([.M52]=&quot;UNMATCHED&quot;;IF(AND([.L52]=&quot;&quot;;[.N52]=&quot;&quot;);&quot;CLEAR&quot;;&quot;CONTRADICTION&quot;);IF([.M52]=&quot;SINGLE_SALE_LINKED&quot;;IF(AND([.L52]&lt;&gt;&quot;&quot;;[.N52]=&quot;&quot;);&quot;CLEAR&quot;;&quot;CONTRADICTION&quot;);IF([.M52]=&quot;MULTI_SALE_PENDING_ALLOCATION&quot;;IF([.L52]=&quot;&quot;;&quot;CLEAR&quot;;&quot;CONTRADICTION&quot;);IF([.M52]=&quot;ALLOCATED&quot;;IF(AND([.L52]=&quot;&quot;;[.N52]&lt;&gt;&quot;&quot;);&quot;CLEAR&quot;;&quot;CONTRADICTION&quot;);&quot;CONTRADICTION&quot;)))))">
            <text:p>UNKNOWN</text:p>
          </table:table-cell>
          <table:table-cell office:value-type="string" table:formula="of:=IF([.S52]=&quot;UNKNOWN&quot;;&quot;NO ACTION — linkage status is UNKNOWN / not asserted&quot;;IF([.S52]=&quot;CLEAR&quot;;&quot;NO CONTRADICTION — preserve evidence as entered&quot;;IF([.M52]=&quot;&quot;;&quot;REVIEW LINKAGE STATUS — identifiers are present while status is UNKNOWN&quot;;IF([.M52]=&quot;UNMATCHED&quot;;&quot;REMOVE LINKAGE IDENTIFIERS OR CORRECT LINKAGE STATUS&quot;;IF([.M52]=&quot;SINGLE_SALE_LINKED&quot;;&quot;REQUIRE LINKED SALE ID AND NO ALLOCATION GROUP ID&quot;;IF([.M52]=&quot;MULTI_SALE_PENDING_ALLOCATION&quot;;&quot;REMOVE LINKED SALE ID OR CORRECT LINKAGE STATUS&quot;;IF([.M52]=&quot;ALLOCATED&quot;;&quot;REQUIRE ALLOCATION GROUP ID AND NO LINKED SALE ID&quot;;&quot;REVIEW LINKAGE EVIDENCE — NO AUTHORITY CREATED&quot;)))))))">
            <text:p>NO ACTION — linkage status is UNKNOWN / not asserted</text:p>
          </table:table-cell>
          <table:table-cell office:value-type="string" table:formula="of:=IF([.S52]=&quot;CONTRADICTION&quot;;&quot;BLOCKED&quot;;IF([.S52]=&quot;UNKNOWN&quot;;&quot;UNKNOWN&quot;;IF([.S52]=&quot;CLEAR&quot;;IF(OR([.O52]=&quot;&quot;;[.P52]=&quot;&quot;);&quot;UNKNOWN&quot;;&quot;READY FOR REVIEW&quot;);&quot;BLOCKED&quot;)))">
            <text:p>UNKNOWN</text:p>
          </table:table-cell>
          <table:table-cell office:value-type="string" table:formula="of:=IF([.U52]=&quot;UNKNOWN&quot;;&quot;COMPLETE OR ASSERT REQUIRED EVIDENCE BEFORE REVIEW&quot;;IF([.U52]=&quot;BLOCKED&quot;;&quot;RESOLVE CONTRADICTION BEFORE REVIEW — NO AUTHORITY CREATED&quot;;IF([.U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2]=&quot;READY FOR REVIEW&quot;;&quot;REVIEW ELIGIBLE — NO AUTHORITY&quot;;IF(OR([.U52]=&quot;UNKNOWN&quot;;[.U5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3]=&quot;&quot;;IF(AND([.L53]=&quot;&quot;;[.N53]=&quot;&quot;);&quot;UNKNOWN&quot;;&quot;CONTRADICTION&quot;);IF([.M53]=&quot;UNMATCHED&quot;;IF(AND([.L53]=&quot;&quot;;[.N53]=&quot;&quot;);&quot;CLEAR&quot;;&quot;CONTRADICTION&quot;);IF([.M53]=&quot;SINGLE_SALE_LINKED&quot;;IF(AND([.L53]&lt;&gt;&quot;&quot;;[.N53]=&quot;&quot;);&quot;CLEAR&quot;;&quot;CONTRADICTION&quot;);IF([.M53]=&quot;MULTI_SALE_PENDING_ALLOCATION&quot;;IF([.L53]=&quot;&quot;;&quot;CLEAR&quot;;&quot;CONTRADICTION&quot;);IF([.M53]=&quot;ALLOCATED&quot;;IF(AND([.L53]=&quot;&quot;;[.N53]&lt;&gt;&quot;&quot;);&quot;CLEAR&quot;;&quot;CONTRADICTION&quot;);&quot;CONTRADICTION&quot;)))))">
            <text:p>UNKNOWN</text:p>
          </table:table-cell>
          <table:table-cell office:value-type="string" table:formula="of:=IF([.S53]=&quot;UNKNOWN&quot;;&quot;NO ACTION — linkage status is UNKNOWN / not asserted&quot;;IF([.S53]=&quot;CLEAR&quot;;&quot;NO CONTRADICTION — preserve evidence as entered&quot;;IF([.M53]=&quot;&quot;;&quot;REVIEW LINKAGE STATUS — identifiers are present while status is UNKNOWN&quot;;IF([.M53]=&quot;UNMATCHED&quot;;&quot;REMOVE LINKAGE IDENTIFIERS OR CORRECT LINKAGE STATUS&quot;;IF([.M53]=&quot;SINGLE_SALE_LINKED&quot;;&quot;REQUIRE LINKED SALE ID AND NO ALLOCATION GROUP ID&quot;;IF([.M53]=&quot;MULTI_SALE_PENDING_ALLOCATION&quot;;&quot;REMOVE LINKED SALE ID OR CORRECT LINKAGE STATUS&quot;;IF([.M53]=&quot;ALLOCATED&quot;;&quot;REQUIRE ALLOCATION GROUP ID AND NO LINKED SALE ID&quot;;&quot;REVIEW LINKAGE EVIDENCE — NO AUTHORITY CREATED&quot;)))))))">
            <text:p>NO ACTION — linkage status is UNKNOWN / not asserted</text:p>
          </table:table-cell>
          <table:table-cell office:value-type="string" table:formula="of:=IF([.S53]=&quot;CONTRADICTION&quot;;&quot;BLOCKED&quot;;IF([.S53]=&quot;UNKNOWN&quot;;&quot;UNKNOWN&quot;;IF([.S53]=&quot;CLEAR&quot;;IF(OR([.O53]=&quot;&quot;;[.P53]=&quot;&quot;);&quot;UNKNOWN&quot;;&quot;READY FOR REVIEW&quot;);&quot;BLOCKED&quot;)))">
            <text:p>UNKNOWN</text:p>
          </table:table-cell>
          <table:table-cell office:value-type="string" table:formula="of:=IF([.U53]=&quot;UNKNOWN&quot;;&quot;COMPLETE OR ASSERT REQUIRED EVIDENCE BEFORE REVIEW&quot;;IF([.U53]=&quot;BLOCKED&quot;;&quot;RESOLVE CONTRADICTION BEFORE REVIEW — NO AUTHORITY CREATED&quot;;IF([.U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3]=&quot;READY FOR REVIEW&quot;;&quot;REVIEW ELIGIBLE — NO AUTHORITY&quot;;IF(OR([.U53]=&quot;UNKNOWN&quot;;[.U5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4]=&quot;&quot;;IF(AND([.L54]=&quot;&quot;;[.N54]=&quot;&quot;);&quot;UNKNOWN&quot;;&quot;CONTRADICTION&quot;);IF([.M54]=&quot;UNMATCHED&quot;;IF(AND([.L54]=&quot;&quot;;[.N54]=&quot;&quot;);&quot;CLEAR&quot;;&quot;CONTRADICTION&quot;);IF([.M54]=&quot;SINGLE_SALE_LINKED&quot;;IF(AND([.L54]&lt;&gt;&quot;&quot;;[.N54]=&quot;&quot;);&quot;CLEAR&quot;;&quot;CONTRADICTION&quot;);IF([.M54]=&quot;MULTI_SALE_PENDING_ALLOCATION&quot;;IF([.L54]=&quot;&quot;;&quot;CLEAR&quot;;&quot;CONTRADICTION&quot;);IF([.M54]=&quot;ALLOCATED&quot;;IF(AND([.L54]=&quot;&quot;;[.N54]&lt;&gt;&quot;&quot;);&quot;CLEAR&quot;;&quot;CONTRADICTION&quot;);&quot;CONTRADICTION&quot;)))))">
            <text:p>UNKNOWN</text:p>
          </table:table-cell>
          <table:table-cell office:value-type="string" table:formula="of:=IF([.S54]=&quot;UNKNOWN&quot;;&quot;NO ACTION — linkage status is UNKNOWN / not asserted&quot;;IF([.S54]=&quot;CLEAR&quot;;&quot;NO CONTRADICTION — preserve evidence as entered&quot;;IF([.M54]=&quot;&quot;;&quot;REVIEW LINKAGE STATUS — identifiers are present while status is UNKNOWN&quot;;IF([.M54]=&quot;UNMATCHED&quot;;&quot;REMOVE LINKAGE IDENTIFIERS OR CORRECT LINKAGE STATUS&quot;;IF([.M54]=&quot;SINGLE_SALE_LINKED&quot;;&quot;REQUIRE LINKED SALE ID AND NO ALLOCATION GROUP ID&quot;;IF([.M54]=&quot;MULTI_SALE_PENDING_ALLOCATION&quot;;&quot;REMOVE LINKED SALE ID OR CORRECT LINKAGE STATUS&quot;;IF([.M54]=&quot;ALLOCATED&quot;;&quot;REQUIRE ALLOCATION GROUP ID AND NO LINKED SALE ID&quot;;&quot;REVIEW LINKAGE EVIDENCE — NO AUTHORITY CREATED&quot;)))))))">
            <text:p>NO ACTION — linkage status is UNKNOWN / not asserted</text:p>
          </table:table-cell>
          <table:table-cell office:value-type="string" table:formula="of:=IF([.S54]=&quot;CONTRADICTION&quot;;&quot;BLOCKED&quot;;IF([.S54]=&quot;UNKNOWN&quot;;&quot;UNKNOWN&quot;;IF([.S54]=&quot;CLEAR&quot;;IF(OR([.O54]=&quot;&quot;;[.P54]=&quot;&quot;);&quot;UNKNOWN&quot;;&quot;READY FOR REVIEW&quot;);&quot;BLOCKED&quot;)))">
            <text:p>UNKNOWN</text:p>
          </table:table-cell>
          <table:table-cell office:value-type="string" table:formula="of:=IF([.U54]=&quot;UNKNOWN&quot;;&quot;COMPLETE OR ASSERT REQUIRED EVIDENCE BEFORE REVIEW&quot;;IF([.U54]=&quot;BLOCKED&quot;;&quot;RESOLVE CONTRADICTION BEFORE REVIEW — NO AUTHORITY CREATED&quot;;IF([.U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4]=&quot;READY FOR REVIEW&quot;;&quot;REVIEW ELIGIBLE — NO AUTHORITY&quot;;IF(OR([.U54]=&quot;UNKNOWN&quot;;[.U5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5]=&quot;&quot;;IF(AND([.L55]=&quot;&quot;;[.N55]=&quot;&quot;);&quot;UNKNOWN&quot;;&quot;CONTRADICTION&quot;);IF([.M55]=&quot;UNMATCHED&quot;;IF(AND([.L55]=&quot;&quot;;[.N55]=&quot;&quot;);&quot;CLEAR&quot;;&quot;CONTRADICTION&quot;);IF([.M55]=&quot;SINGLE_SALE_LINKED&quot;;IF(AND([.L55]&lt;&gt;&quot;&quot;;[.N55]=&quot;&quot;);&quot;CLEAR&quot;;&quot;CONTRADICTION&quot;);IF([.M55]=&quot;MULTI_SALE_PENDING_ALLOCATION&quot;;IF([.L55]=&quot;&quot;;&quot;CLEAR&quot;;&quot;CONTRADICTION&quot;);IF([.M55]=&quot;ALLOCATED&quot;;IF(AND([.L55]=&quot;&quot;;[.N55]&lt;&gt;&quot;&quot;);&quot;CLEAR&quot;;&quot;CONTRADICTION&quot;);&quot;CONTRADICTION&quot;)))))">
            <text:p>UNKNOWN</text:p>
          </table:table-cell>
          <table:table-cell office:value-type="string" table:formula="of:=IF([.S55]=&quot;UNKNOWN&quot;;&quot;NO ACTION — linkage status is UNKNOWN / not asserted&quot;;IF([.S55]=&quot;CLEAR&quot;;&quot;NO CONTRADICTION — preserve evidence as entered&quot;;IF([.M55]=&quot;&quot;;&quot;REVIEW LINKAGE STATUS — identifiers are present while status is UNKNOWN&quot;;IF([.M55]=&quot;UNMATCHED&quot;;&quot;REMOVE LINKAGE IDENTIFIERS OR CORRECT LINKAGE STATUS&quot;;IF([.M55]=&quot;SINGLE_SALE_LINKED&quot;;&quot;REQUIRE LINKED SALE ID AND NO ALLOCATION GROUP ID&quot;;IF([.M55]=&quot;MULTI_SALE_PENDING_ALLOCATION&quot;;&quot;REMOVE LINKED SALE ID OR CORRECT LINKAGE STATUS&quot;;IF([.M55]=&quot;ALLOCATED&quot;;&quot;REQUIRE ALLOCATION GROUP ID AND NO LINKED SALE ID&quot;;&quot;REVIEW LINKAGE EVIDENCE — NO AUTHORITY CREATED&quot;)))))))">
            <text:p>NO ACTION — linkage status is UNKNOWN / not asserted</text:p>
          </table:table-cell>
          <table:table-cell office:value-type="string" table:formula="of:=IF([.S55]=&quot;CONTRADICTION&quot;;&quot;BLOCKED&quot;;IF([.S55]=&quot;UNKNOWN&quot;;&quot;UNKNOWN&quot;;IF([.S55]=&quot;CLEAR&quot;;IF(OR([.O55]=&quot;&quot;;[.P55]=&quot;&quot;);&quot;UNKNOWN&quot;;&quot;READY FOR REVIEW&quot;);&quot;BLOCKED&quot;)))">
            <text:p>UNKNOWN</text:p>
          </table:table-cell>
          <table:table-cell office:value-type="string" table:formula="of:=IF([.U55]=&quot;UNKNOWN&quot;;&quot;COMPLETE OR ASSERT REQUIRED EVIDENCE BEFORE REVIEW&quot;;IF([.U55]=&quot;BLOCKED&quot;;&quot;RESOLVE CONTRADICTION BEFORE REVIEW — NO AUTHORITY CREATED&quot;;IF([.U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5]=&quot;READY FOR REVIEW&quot;;&quot;REVIEW ELIGIBLE — NO AUTHORITY&quot;;IF(OR([.U55]=&quot;UNKNOWN&quot;;[.U5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6]=&quot;&quot;;IF(AND([.L56]=&quot;&quot;;[.N56]=&quot;&quot;);&quot;UNKNOWN&quot;;&quot;CONTRADICTION&quot;);IF([.M56]=&quot;UNMATCHED&quot;;IF(AND([.L56]=&quot;&quot;;[.N56]=&quot;&quot;);&quot;CLEAR&quot;;&quot;CONTRADICTION&quot;);IF([.M56]=&quot;SINGLE_SALE_LINKED&quot;;IF(AND([.L56]&lt;&gt;&quot;&quot;;[.N56]=&quot;&quot;);&quot;CLEAR&quot;;&quot;CONTRADICTION&quot;);IF([.M56]=&quot;MULTI_SALE_PENDING_ALLOCATION&quot;;IF([.L56]=&quot;&quot;;&quot;CLEAR&quot;;&quot;CONTRADICTION&quot;);IF([.M56]=&quot;ALLOCATED&quot;;IF(AND([.L56]=&quot;&quot;;[.N56]&lt;&gt;&quot;&quot;);&quot;CLEAR&quot;;&quot;CONTRADICTION&quot;);&quot;CONTRADICTION&quot;)))))">
            <text:p>UNKNOWN</text:p>
          </table:table-cell>
          <table:table-cell office:value-type="string" table:formula="of:=IF([.S56]=&quot;UNKNOWN&quot;;&quot;NO ACTION — linkage status is UNKNOWN / not asserted&quot;;IF([.S56]=&quot;CLEAR&quot;;&quot;NO CONTRADICTION — preserve evidence as entered&quot;;IF([.M56]=&quot;&quot;;&quot;REVIEW LINKAGE STATUS — identifiers are present while status is UNKNOWN&quot;;IF([.M56]=&quot;UNMATCHED&quot;;&quot;REMOVE LINKAGE IDENTIFIERS OR CORRECT LINKAGE STATUS&quot;;IF([.M56]=&quot;SINGLE_SALE_LINKED&quot;;&quot;REQUIRE LINKED SALE ID AND NO ALLOCATION GROUP ID&quot;;IF([.M56]=&quot;MULTI_SALE_PENDING_ALLOCATION&quot;;&quot;REMOVE LINKED SALE ID OR CORRECT LINKAGE STATUS&quot;;IF([.M56]=&quot;ALLOCATED&quot;;&quot;REQUIRE ALLOCATION GROUP ID AND NO LINKED SALE ID&quot;;&quot;REVIEW LINKAGE EVIDENCE — NO AUTHORITY CREATED&quot;)))))))">
            <text:p>NO ACTION — linkage status is UNKNOWN / not asserted</text:p>
          </table:table-cell>
          <table:table-cell office:value-type="string" table:formula="of:=IF([.S56]=&quot;CONTRADICTION&quot;;&quot;BLOCKED&quot;;IF([.S56]=&quot;UNKNOWN&quot;;&quot;UNKNOWN&quot;;IF([.S56]=&quot;CLEAR&quot;;IF(OR([.O56]=&quot;&quot;;[.P56]=&quot;&quot;);&quot;UNKNOWN&quot;;&quot;READY FOR REVIEW&quot;);&quot;BLOCKED&quot;)))">
            <text:p>UNKNOWN</text:p>
          </table:table-cell>
          <table:table-cell office:value-type="string" table:formula="of:=IF([.U56]=&quot;UNKNOWN&quot;;&quot;COMPLETE OR ASSERT REQUIRED EVIDENCE BEFORE REVIEW&quot;;IF([.U56]=&quot;BLOCKED&quot;;&quot;RESOLVE CONTRADICTION BEFORE REVIEW — NO AUTHORITY CREATED&quot;;IF([.U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6]=&quot;READY FOR REVIEW&quot;;&quot;REVIEW ELIGIBLE — NO AUTHORITY&quot;;IF(OR([.U56]=&quot;UNKNOWN&quot;;[.U5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7]=&quot;&quot;;IF(AND([.L57]=&quot;&quot;;[.N57]=&quot;&quot;);&quot;UNKNOWN&quot;;&quot;CONTRADICTION&quot;);IF([.M57]=&quot;UNMATCHED&quot;;IF(AND([.L57]=&quot;&quot;;[.N57]=&quot;&quot;);&quot;CLEAR&quot;;&quot;CONTRADICTION&quot;);IF([.M57]=&quot;SINGLE_SALE_LINKED&quot;;IF(AND([.L57]&lt;&gt;&quot;&quot;;[.N57]=&quot;&quot;);&quot;CLEAR&quot;;&quot;CONTRADICTION&quot;);IF([.M57]=&quot;MULTI_SALE_PENDING_ALLOCATION&quot;;IF([.L57]=&quot;&quot;;&quot;CLEAR&quot;;&quot;CONTRADICTION&quot;);IF([.M57]=&quot;ALLOCATED&quot;;IF(AND([.L57]=&quot;&quot;;[.N57]&lt;&gt;&quot;&quot;);&quot;CLEAR&quot;;&quot;CONTRADICTION&quot;);&quot;CONTRADICTION&quot;)))))">
            <text:p>UNKNOWN</text:p>
          </table:table-cell>
          <table:table-cell office:value-type="string" table:formula="of:=IF([.S57]=&quot;UNKNOWN&quot;;&quot;NO ACTION — linkage status is UNKNOWN / not asserted&quot;;IF([.S57]=&quot;CLEAR&quot;;&quot;NO CONTRADICTION — preserve evidence as entered&quot;;IF([.M57]=&quot;&quot;;&quot;REVIEW LINKAGE STATUS — identifiers are present while status is UNKNOWN&quot;;IF([.M57]=&quot;UNMATCHED&quot;;&quot;REMOVE LINKAGE IDENTIFIERS OR CORRECT LINKAGE STATUS&quot;;IF([.M57]=&quot;SINGLE_SALE_LINKED&quot;;&quot;REQUIRE LINKED SALE ID AND NO ALLOCATION GROUP ID&quot;;IF([.M57]=&quot;MULTI_SALE_PENDING_ALLOCATION&quot;;&quot;REMOVE LINKED SALE ID OR CORRECT LINKAGE STATUS&quot;;IF([.M57]=&quot;ALLOCATED&quot;;&quot;REQUIRE ALLOCATION GROUP ID AND NO LINKED SALE ID&quot;;&quot;REVIEW LINKAGE EVIDENCE — NO AUTHORITY CREATED&quot;)))))))">
            <text:p>NO ACTION — linkage status is UNKNOWN / not asserted</text:p>
          </table:table-cell>
          <table:table-cell office:value-type="string" table:formula="of:=IF([.S57]=&quot;CONTRADICTION&quot;;&quot;BLOCKED&quot;;IF([.S57]=&quot;UNKNOWN&quot;;&quot;UNKNOWN&quot;;IF([.S57]=&quot;CLEAR&quot;;IF(OR([.O57]=&quot;&quot;;[.P57]=&quot;&quot;);&quot;UNKNOWN&quot;;&quot;READY FOR REVIEW&quot;);&quot;BLOCKED&quot;)))">
            <text:p>UNKNOWN</text:p>
          </table:table-cell>
          <table:table-cell office:value-type="string" table:formula="of:=IF([.U57]=&quot;UNKNOWN&quot;;&quot;COMPLETE OR ASSERT REQUIRED EVIDENCE BEFORE REVIEW&quot;;IF([.U57]=&quot;BLOCKED&quot;;&quot;RESOLVE CONTRADICTION BEFORE REVIEW — NO AUTHORITY CREATED&quot;;IF([.U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7]=&quot;READY FOR REVIEW&quot;;&quot;REVIEW ELIGIBLE — NO AUTHORITY&quot;;IF(OR([.U57]=&quot;UNKNOWN&quot;;[.U5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8]=&quot;&quot;;IF(AND([.L58]=&quot;&quot;;[.N58]=&quot;&quot;);&quot;UNKNOWN&quot;;&quot;CONTRADICTION&quot;);IF([.M58]=&quot;UNMATCHED&quot;;IF(AND([.L58]=&quot;&quot;;[.N58]=&quot;&quot;);&quot;CLEAR&quot;;&quot;CONTRADICTION&quot;);IF([.M58]=&quot;SINGLE_SALE_LINKED&quot;;IF(AND([.L58]&lt;&gt;&quot;&quot;;[.N58]=&quot;&quot;);&quot;CLEAR&quot;;&quot;CONTRADICTION&quot;);IF([.M58]=&quot;MULTI_SALE_PENDING_ALLOCATION&quot;;IF([.L58]=&quot;&quot;;&quot;CLEAR&quot;;&quot;CONTRADICTION&quot;);IF([.M58]=&quot;ALLOCATED&quot;;IF(AND([.L58]=&quot;&quot;;[.N58]&lt;&gt;&quot;&quot;);&quot;CLEAR&quot;;&quot;CONTRADICTION&quot;);&quot;CONTRADICTION&quot;)))))">
            <text:p>UNKNOWN</text:p>
          </table:table-cell>
          <table:table-cell office:value-type="string" table:formula="of:=IF([.S58]=&quot;UNKNOWN&quot;;&quot;NO ACTION — linkage status is UNKNOWN / not asserted&quot;;IF([.S58]=&quot;CLEAR&quot;;&quot;NO CONTRADICTION — preserve evidence as entered&quot;;IF([.M58]=&quot;&quot;;&quot;REVIEW LINKAGE STATUS — identifiers are present while status is UNKNOWN&quot;;IF([.M58]=&quot;UNMATCHED&quot;;&quot;REMOVE LINKAGE IDENTIFIERS OR CORRECT LINKAGE STATUS&quot;;IF([.M58]=&quot;SINGLE_SALE_LINKED&quot;;&quot;REQUIRE LINKED SALE ID AND NO ALLOCATION GROUP ID&quot;;IF([.M58]=&quot;MULTI_SALE_PENDING_ALLOCATION&quot;;&quot;REMOVE LINKED SALE ID OR CORRECT LINKAGE STATUS&quot;;IF([.M58]=&quot;ALLOCATED&quot;;&quot;REQUIRE ALLOCATION GROUP ID AND NO LINKED SALE ID&quot;;&quot;REVIEW LINKAGE EVIDENCE — NO AUTHORITY CREATED&quot;)))))))">
            <text:p>NO ACTION — linkage status is UNKNOWN / not asserted</text:p>
          </table:table-cell>
          <table:table-cell office:value-type="string" table:formula="of:=IF([.S58]=&quot;CONTRADICTION&quot;;&quot;BLOCKED&quot;;IF([.S58]=&quot;UNKNOWN&quot;;&quot;UNKNOWN&quot;;IF([.S58]=&quot;CLEAR&quot;;IF(OR([.O58]=&quot;&quot;;[.P58]=&quot;&quot;);&quot;UNKNOWN&quot;;&quot;READY FOR REVIEW&quot;);&quot;BLOCKED&quot;)))">
            <text:p>UNKNOWN</text:p>
          </table:table-cell>
          <table:table-cell office:value-type="string" table:formula="of:=IF([.U58]=&quot;UNKNOWN&quot;;&quot;COMPLETE OR ASSERT REQUIRED EVIDENCE BEFORE REVIEW&quot;;IF([.U58]=&quot;BLOCKED&quot;;&quot;RESOLVE CONTRADICTION BEFORE REVIEW — NO AUTHORITY CREATED&quot;;IF([.U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8]=&quot;READY FOR REVIEW&quot;;&quot;REVIEW ELIGIBLE — NO AUTHORITY&quot;;IF(OR([.U58]=&quot;UNKNOWN&quot;;[.U5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9]=&quot;&quot;;IF(AND([.L59]=&quot;&quot;;[.N59]=&quot;&quot;);&quot;UNKNOWN&quot;;&quot;CONTRADICTION&quot;);IF([.M59]=&quot;UNMATCHED&quot;;IF(AND([.L59]=&quot;&quot;;[.N59]=&quot;&quot;);&quot;CLEAR&quot;;&quot;CONTRADICTION&quot;);IF([.M59]=&quot;SINGLE_SALE_LINKED&quot;;IF(AND([.L59]&lt;&gt;&quot;&quot;;[.N59]=&quot;&quot;);&quot;CLEAR&quot;;&quot;CONTRADICTION&quot;);IF([.M59]=&quot;MULTI_SALE_PENDING_ALLOCATION&quot;;IF([.L59]=&quot;&quot;;&quot;CLEAR&quot;;&quot;CONTRADICTION&quot;);IF([.M59]=&quot;ALLOCATED&quot;;IF(AND([.L59]=&quot;&quot;;[.N59]&lt;&gt;&quot;&quot;);&quot;CLEAR&quot;;&quot;CONTRADICTION&quot;);&quot;CONTRADICTION&quot;)))))">
            <text:p>UNKNOWN</text:p>
          </table:table-cell>
          <table:table-cell office:value-type="string" table:formula="of:=IF([.S59]=&quot;UNKNOWN&quot;;&quot;NO ACTION — linkage status is UNKNOWN / not asserted&quot;;IF([.S59]=&quot;CLEAR&quot;;&quot;NO CONTRADICTION — preserve evidence as entered&quot;;IF([.M59]=&quot;&quot;;&quot;REVIEW LINKAGE STATUS — identifiers are present while status is UNKNOWN&quot;;IF([.M59]=&quot;UNMATCHED&quot;;&quot;REMOVE LINKAGE IDENTIFIERS OR CORRECT LINKAGE STATUS&quot;;IF([.M59]=&quot;SINGLE_SALE_LINKED&quot;;&quot;REQUIRE LINKED SALE ID AND NO ALLOCATION GROUP ID&quot;;IF([.M59]=&quot;MULTI_SALE_PENDING_ALLOCATION&quot;;&quot;REMOVE LINKED SALE ID OR CORRECT LINKAGE STATUS&quot;;IF([.M59]=&quot;ALLOCATED&quot;;&quot;REQUIRE ALLOCATION GROUP ID AND NO LINKED SALE ID&quot;;&quot;REVIEW LINKAGE EVIDENCE — NO AUTHORITY CREATED&quot;)))))))">
            <text:p>NO ACTION — linkage status is UNKNOWN / not asserted</text:p>
          </table:table-cell>
          <table:table-cell office:value-type="string" table:formula="of:=IF([.S59]=&quot;CONTRADICTION&quot;;&quot;BLOCKED&quot;;IF([.S59]=&quot;UNKNOWN&quot;;&quot;UNKNOWN&quot;;IF([.S59]=&quot;CLEAR&quot;;IF(OR([.O59]=&quot;&quot;;[.P59]=&quot;&quot;);&quot;UNKNOWN&quot;;&quot;READY FOR REVIEW&quot;);&quot;BLOCKED&quot;)))">
            <text:p>UNKNOWN</text:p>
          </table:table-cell>
          <table:table-cell office:value-type="string" table:formula="of:=IF([.U59]=&quot;UNKNOWN&quot;;&quot;COMPLETE OR ASSERT REQUIRED EVIDENCE BEFORE REVIEW&quot;;IF([.U59]=&quot;BLOCKED&quot;;&quot;RESOLVE CONTRADICTION BEFORE REVIEW — NO AUTHORITY CREATED&quot;;IF([.U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9]=&quot;READY FOR REVIEW&quot;;&quot;REVIEW ELIGIBLE — NO AUTHORITY&quot;;IF(OR([.U59]=&quot;UNKNOWN&quot;;[.U5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0]=&quot;&quot;;IF(AND([.L60]=&quot;&quot;;[.N60]=&quot;&quot;);&quot;UNKNOWN&quot;;&quot;CONTRADICTION&quot;);IF([.M60]=&quot;UNMATCHED&quot;;IF(AND([.L60]=&quot;&quot;;[.N60]=&quot;&quot;);&quot;CLEAR&quot;;&quot;CONTRADICTION&quot;);IF([.M60]=&quot;SINGLE_SALE_LINKED&quot;;IF(AND([.L60]&lt;&gt;&quot;&quot;;[.N60]=&quot;&quot;);&quot;CLEAR&quot;;&quot;CONTRADICTION&quot;);IF([.M60]=&quot;MULTI_SALE_PENDING_ALLOCATION&quot;;IF([.L60]=&quot;&quot;;&quot;CLEAR&quot;;&quot;CONTRADICTION&quot;);IF([.M60]=&quot;ALLOCATED&quot;;IF(AND([.L60]=&quot;&quot;;[.N60]&lt;&gt;&quot;&quot;);&quot;CLEAR&quot;;&quot;CONTRADICTION&quot;);&quot;CONTRADICTION&quot;)))))">
            <text:p>UNKNOWN</text:p>
          </table:table-cell>
          <table:table-cell office:value-type="string" table:formula="of:=IF([.S60]=&quot;UNKNOWN&quot;;&quot;NO ACTION — linkage status is UNKNOWN / not asserted&quot;;IF([.S60]=&quot;CLEAR&quot;;&quot;NO CONTRADICTION — preserve evidence as entered&quot;;IF([.M60]=&quot;&quot;;&quot;REVIEW LINKAGE STATUS — identifiers are present while status is UNKNOWN&quot;;IF([.M60]=&quot;UNMATCHED&quot;;&quot;REMOVE LINKAGE IDENTIFIERS OR CORRECT LINKAGE STATUS&quot;;IF([.M60]=&quot;SINGLE_SALE_LINKED&quot;;&quot;REQUIRE LINKED SALE ID AND NO ALLOCATION GROUP ID&quot;;IF([.M60]=&quot;MULTI_SALE_PENDING_ALLOCATION&quot;;&quot;REMOVE LINKED SALE ID OR CORRECT LINKAGE STATUS&quot;;IF([.M60]=&quot;ALLOCATED&quot;;&quot;REQUIRE ALLOCATION GROUP ID AND NO LINKED SALE ID&quot;;&quot;REVIEW LINKAGE EVIDENCE — NO AUTHORITY CREATED&quot;)))))))">
            <text:p>NO ACTION — linkage status is UNKNOWN / not asserted</text:p>
          </table:table-cell>
          <table:table-cell office:value-type="string" table:formula="of:=IF([.S60]=&quot;CONTRADICTION&quot;;&quot;BLOCKED&quot;;IF([.S60]=&quot;UNKNOWN&quot;;&quot;UNKNOWN&quot;;IF([.S60]=&quot;CLEAR&quot;;IF(OR([.O60]=&quot;&quot;;[.P60]=&quot;&quot;);&quot;UNKNOWN&quot;;&quot;READY FOR REVIEW&quot;);&quot;BLOCKED&quot;)))">
            <text:p>UNKNOWN</text:p>
          </table:table-cell>
          <table:table-cell office:value-type="string" table:formula="of:=IF([.U60]=&quot;UNKNOWN&quot;;&quot;COMPLETE OR ASSERT REQUIRED EVIDENCE BEFORE REVIEW&quot;;IF([.U60]=&quot;BLOCKED&quot;;&quot;RESOLVE CONTRADICTION BEFORE REVIEW — NO AUTHORITY CREATED&quot;;IF([.U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0]=&quot;READY FOR REVIEW&quot;;&quot;REVIEW ELIGIBLE — NO AUTHORITY&quot;;IF(OR([.U60]=&quot;UNKNOWN&quot;;[.U6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1]=&quot;&quot;;IF(AND([.L61]=&quot;&quot;;[.N61]=&quot;&quot;);&quot;UNKNOWN&quot;;&quot;CONTRADICTION&quot;);IF([.M61]=&quot;UNMATCHED&quot;;IF(AND([.L61]=&quot;&quot;;[.N61]=&quot;&quot;);&quot;CLEAR&quot;;&quot;CONTRADICTION&quot;);IF([.M61]=&quot;SINGLE_SALE_LINKED&quot;;IF(AND([.L61]&lt;&gt;&quot;&quot;;[.N61]=&quot;&quot;);&quot;CLEAR&quot;;&quot;CONTRADICTION&quot;);IF([.M61]=&quot;MULTI_SALE_PENDING_ALLOCATION&quot;;IF([.L61]=&quot;&quot;;&quot;CLEAR&quot;;&quot;CONTRADICTION&quot;);IF([.M61]=&quot;ALLOCATED&quot;;IF(AND([.L61]=&quot;&quot;;[.N61]&lt;&gt;&quot;&quot;);&quot;CLEAR&quot;;&quot;CONTRADICTION&quot;);&quot;CONTRADICTION&quot;)))))">
            <text:p>UNKNOWN</text:p>
          </table:table-cell>
          <table:table-cell office:value-type="string" table:formula="of:=IF([.S61]=&quot;UNKNOWN&quot;;&quot;NO ACTION — linkage status is UNKNOWN / not asserted&quot;;IF([.S61]=&quot;CLEAR&quot;;&quot;NO CONTRADICTION — preserve evidence as entered&quot;;IF([.M61]=&quot;&quot;;&quot;REVIEW LINKAGE STATUS — identifiers are present while status is UNKNOWN&quot;;IF([.M61]=&quot;UNMATCHED&quot;;&quot;REMOVE LINKAGE IDENTIFIERS OR CORRECT LINKAGE STATUS&quot;;IF([.M61]=&quot;SINGLE_SALE_LINKED&quot;;&quot;REQUIRE LINKED SALE ID AND NO ALLOCATION GROUP ID&quot;;IF([.M61]=&quot;MULTI_SALE_PENDING_ALLOCATION&quot;;&quot;REMOVE LINKED SALE ID OR CORRECT LINKAGE STATUS&quot;;IF([.M61]=&quot;ALLOCATED&quot;;&quot;REQUIRE ALLOCATION GROUP ID AND NO LINKED SALE ID&quot;;&quot;REVIEW LINKAGE EVIDENCE — NO AUTHORITY CREATED&quot;)))))))">
            <text:p>NO ACTION — linkage status is UNKNOWN / not asserted</text:p>
          </table:table-cell>
          <table:table-cell office:value-type="string" table:formula="of:=IF([.S61]=&quot;CONTRADICTION&quot;;&quot;BLOCKED&quot;;IF([.S61]=&quot;UNKNOWN&quot;;&quot;UNKNOWN&quot;;IF([.S61]=&quot;CLEAR&quot;;IF(OR([.O61]=&quot;&quot;;[.P61]=&quot;&quot;);&quot;UNKNOWN&quot;;&quot;READY FOR REVIEW&quot;);&quot;BLOCKED&quot;)))">
            <text:p>UNKNOWN</text:p>
          </table:table-cell>
          <table:table-cell office:value-type="string" table:formula="of:=IF([.U61]=&quot;UNKNOWN&quot;;&quot;COMPLETE OR ASSERT REQUIRED EVIDENCE BEFORE REVIEW&quot;;IF([.U61]=&quot;BLOCKED&quot;;&quot;RESOLVE CONTRADICTION BEFORE REVIEW — NO AUTHORITY CREATED&quot;;IF([.U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1]=&quot;READY FOR REVIEW&quot;;&quot;REVIEW ELIGIBLE — NO AUTHORITY&quot;;IF(OR([.U61]=&quot;UNKNOWN&quot;;[.U6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2]=&quot;&quot;;IF(AND([.L62]=&quot;&quot;;[.N62]=&quot;&quot;);&quot;UNKNOWN&quot;;&quot;CONTRADICTION&quot;);IF([.M62]=&quot;UNMATCHED&quot;;IF(AND([.L62]=&quot;&quot;;[.N62]=&quot;&quot;);&quot;CLEAR&quot;;&quot;CONTRADICTION&quot;);IF([.M62]=&quot;SINGLE_SALE_LINKED&quot;;IF(AND([.L62]&lt;&gt;&quot;&quot;;[.N62]=&quot;&quot;);&quot;CLEAR&quot;;&quot;CONTRADICTION&quot;);IF([.M62]=&quot;MULTI_SALE_PENDING_ALLOCATION&quot;;IF([.L62]=&quot;&quot;;&quot;CLEAR&quot;;&quot;CONTRADICTION&quot;);IF([.M62]=&quot;ALLOCATED&quot;;IF(AND([.L62]=&quot;&quot;;[.N62]&lt;&gt;&quot;&quot;);&quot;CLEAR&quot;;&quot;CONTRADICTION&quot;);&quot;CONTRADICTION&quot;)))))">
            <text:p>UNKNOWN</text:p>
          </table:table-cell>
          <table:table-cell office:value-type="string" table:formula="of:=IF([.S62]=&quot;UNKNOWN&quot;;&quot;NO ACTION — linkage status is UNKNOWN / not asserted&quot;;IF([.S62]=&quot;CLEAR&quot;;&quot;NO CONTRADICTION — preserve evidence as entered&quot;;IF([.M62]=&quot;&quot;;&quot;REVIEW LINKAGE STATUS — identifiers are present while status is UNKNOWN&quot;;IF([.M62]=&quot;UNMATCHED&quot;;&quot;REMOVE LINKAGE IDENTIFIERS OR CORRECT LINKAGE STATUS&quot;;IF([.M62]=&quot;SINGLE_SALE_LINKED&quot;;&quot;REQUIRE LINKED SALE ID AND NO ALLOCATION GROUP ID&quot;;IF([.M62]=&quot;MULTI_SALE_PENDING_ALLOCATION&quot;;&quot;REMOVE LINKED SALE ID OR CORRECT LINKAGE STATUS&quot;;IF([.M62]=&quot;ALLOCATED&quot;;&quot;REQUIRE ALLOCATION GROUP ID AND NO LINKED SALE ID&quot;;&quot;REVIEW LINKAGE EVIDENCE — NO AUTHORITY CREATED&quot;)))))))">
            <text:p>NO ACTION — linkage status is UNKNOWN / not asserted</text:p>
          </table:table-cell>
          <table:table-cell office:value-type="string" table:formula="of:=IF([.S62]=&quot;CONTRADICTION&quot;;&quot;BLOCKED&quot;;IF([.S62]=&quot;UNKNOWN&quot;;&quot;UNKNOWN&quot;;IF([.S62]=&quot;CLEAR&quot;;IF(OR([.O62]=&quot;&quot;;[.P62]=&quot;&quot;);&quot;UNKNOWN&quot;;&quot;READY FOR REVIEW&quot;);&quot;BLOCKED&quot;)))">
            <text:p>UNKNOWN</text:p>
          </table:table-cell>
          <table:table-cell office:value-type="string" table:formula="of:=IF([.U62]=&quot;UNKNOWN&quot;;&quot;COMPLETE OR ASSERT REQUIRED EVIDENCE BEFORE REVIEW&quot;;IF([.U62]=&quot;BLOCKED&quot;;&quot;RESOLVE CONTRADICTION BEFORE REVIEW — NO AUTHORITY CREATED&quot;;IF([.U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2]=&quot;READY FOR REVIEW&quot;;&quot;REVIEW ELIGIBLE — NO AUTHORITY&quot;;IF(OR([.U62]=&quot;UNKNOWN&quot;;[.U6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3]=&quot;&quot;;IF(AND([.L63]=&quot;&quot;;[.N63]=&quot;&quot;);&quot;UNKNOWN&quot;;&quot;CONTRADICTION&quot;);IF([.M63]=&quot;UNMATCHED&quot;;IF(AND([.L63]=&quot;&quot;;[.N63]=&quot;&quot;);&quot;CLEAR&quot;;&quot;CONTRADICTION&quot;);IF([.M63]=&quot;SINGLE_SALE_LINKED&quot;;IF(AND([.L63]&lt;&gt;&quot;&quot;;[.N63]=&quot;&quot;);&quot;CLEAR&quot;;&quot;CONTRADICTION&quot;);IF([.M63]=&quot;MULTI_SALE_PENDING_ALLOCATION&quot;;IF([.L63]=&quot;&quot;;&quot;CLEAR&quot;;&quot;CONTRADICTION&quot;);IF([.M63]=&quot;ALLOCATED&quot;;IF(AND([.L63]=&quot;&quot;;[.N63]&lt;&gt;&quot;&quot;);&quot;CLEAR&quot;;&quot;CONTRADICTION&quot;);&quot;CONTRADICTION&quot;)))))">
            <text:p>UNKNOWN</text:p>
          </table:table-cell>
          <table:table-cell office:value-type="string" table:formula="of:=IF([.S63]=&quot;UNKNOWN&quot;;&quot;NO ACTION — linkage status is UNKNOWN / not asserted&quot;;IF([.S63]=&quot;CLEAR&quot;;&quot;NO CONTRADICTION — preserve evidence as entered&quot;;IF([.M63]=&quot;&quot;;&quot;REVIEW LINKAGE STATUS — identifiers are present while status is UNKNOWN&quot;;IF([.M63]=&quot;UNMATCHED&quot;;&quot;REMOVE LINKAGE IDENTIFIERS OR CORRECT LINKAGE STATUS&quot;;IF([.M63]=&quot;SINGLE_SALE_LINKED&quot;;&quot;REQUIRE LINKED SALE ID AND NO ALLOCATION GROUP ID&quot;;IF([.M63]=&quot;MULTI_SALE_PENDING_ALLOCATION&quot;;&quot;REMOVE LINKED SALE ID OR CORRECT LINKAGE STATUS&quot;;IF([.M63]=&quot;ALLOCATED&quot;;&quot;REQUIRE ALLOCATION GROUP ID AND NO LINKED SALE ID&quot;;&quot;REVIEW LINKAGE EVIDENCE — NO AUTHORITY CREATED&quot;)))))))">
            <text:p>NO ACTION — linkage status is UNKNOWN / not asserted</text:p>
          </table:table-cell>
          <table:table-cell office:value-type="string" table:formula="of:=IF([.S63]=&quot;CONTRADICTION&quot;;&quot;BLOCKED&quot;;IF([.S63]=&quot;UNKNOWN&quot;;&quot;UNKNOWN&quot;;IF([.S63]=&quot;CLEAR&quot;;IF(OR([.O63]=&quot;&quot;;[.P63]=&quot;&quot;);&quot;UNKNOWN&quot;;&quot;READY FOR REVIEW&quot;);&quot;BLOCKED&quot;)))">
            <text:p>UNKNOWN</text:p>
          </table:table-cell>
          <table:table-cell office:value-type="string" table:formula="of:=IF([.U63]=&quot;UNKNOWN&quot;;&quot;COMPLETE OR ASSERT REQUIRED EVIDENCE BEFORE REVIEW&quot;;IF([.U63]=&quot;BLOCKED&quot;;&quot;RESOLVE CONTRADICTION BEFORE REVIEW — NO AUTHORITY CREATED&quot;;IF([.U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3]=&quot;READY FOR REVIEW&quot;;&quot;REVIEW ELIGIBLE — NO AUTHORITY&quot;;IF(OR([.U63]=&quot;UNKNOWN&quot;;[.U6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4]=&quot;&quot;;IF(AND([.L64]=&quot;&quot;;[.N64]=&quot;&quot;);&quot;UNKNOWN&quot;;&quot;CONTRADICTION&quot;);IF([.M64]=&quot;UNMATCHED&quot;;IF(AND([.L64]=&quot;&quot;;[.N64]=&quot;&quot;);&quot;CLEAR&quot;;&quot;CONTRADICTION&quot;);IF([.M64]=&quot;SINGLE_SALE_LINKED&quot;;IF(AND([.L64]&lt;&gt;&quot;&quot;;[.N64]=&quot;&quot;);&quot;CLEAR&quot;;&quot;CONTRADICTION&quot;);IF([.M64]=&quot;MULTI_SALE_PENDING_ALLOCATION&quot;;IF([.L64]=&quot;&quot;;&quot;CLEAR&quot;;&quot;CONTRADICTION&quot;);IF([.M64]=&quot;ALLOCATED&quot;;IF(AND([.L64]=&quot;&quot;;[.N64]&lt;&gt;&quot;&quot;);&quot;CLEAR&quot;;&quot;CONTRADICTION&quot;);&quot;CONTRADICTION&quot;)))))">
            <text:p>UNKNOWN</text:p>
          </table:table-cell>
          <table:table-cell office:value-type="string" table:formula="of:=IF([.S64]=&quot;UNKNOWN&quot;;&quot;NO ACTION — linkage status is UNKNOWN / not asserted&quot;;IF([.S64]=&quot;CLEAR&quot;;&quot;NO CONTRADICTION — preserve evidence as entered&quot;;IF([.M64]=&quot;&quot;;&quot;REVIEW LINKAGE STATUS — identifiers are present while status is UNKNOWN&quot;;IF([.M64]=&quot;UNMATCHED&quot;;&quot;REMOVE LINKAGE IDENTIFIERS OR CORRECT LINKAGE STATUS&quot;;IF([.M64]=&quot;SINGLE_SALE_LINKED&quot;;&quot;REQUIRE LINKED SALE ID AND NO ALLOCATION GROUP ID&quot;;IF([.M64]=&quot;MULTI_SALE_PENDING_ALLOCATION&quot;;&quot;REMOVE LINKED SALE ID OR CORRECT LINKAGE STATUS&quot;;IF([.M64]=&quot;ALLOCATED&quot;;&quot;REQUIRE ALLOCATION GROUP ID AND NO LINKED SALE ID&quot;;&quot;REVIEW LINKAGE EVIDENCE — NO AUTHORITY CREATED&quot;)))))))">
            <text:p>NO ACTION — linkage status is UNKNOWN / not asserted</text:p>
          </table:table-cell>
          <table:table-cell office:value-type="string" table:formula="of:=IF([.S64]=&quot;CONTRADICTION&quot;;&quot;BLOCKED&quot;;IF([.S64]=&quot;UNKNOWN&quot;;&quot;UNKNOWN&quot;;IF([.S64]=&quot;CLEAR&quot;;IF(OR([.O64]=&quot;&quot;;[.P64]=&quot;&quot;);&quot;UNKNOWN&quot;;&quot;READY FOR REVIEW&quot;);&quot;BLOCKED&quot;)))">
            <text:p>UNKNOWN</text:p>
          </table:table-cell>
          <table:table-cell office:value-type="string" table:formula="of:=IF([.U64]=&quot;UNKNOWN&quot;;&quot;COMPLETE OR ASSERT REQUIRED EVIDENCE BEFORE REVIEW&quot;;IF([.U64]=&quot;BLOCKED&quot;;&quot;RESOLVE CONTRADICTION BEFORE REVIEW — NO AUTHORITY CREATED&quot;;IF([.U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4]=&quot;READY FOR REVIEW&quot;;&quot;REVIEW ELIGIBLE — NO AUTHORITY&quot;;IF(OR([.U64]=&quot;UNKNOWN&quot;;[.U6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5]=&quot;&quot;;IF(AND([.L65]=&quot;&quot;;[.N65]=&quot;&quot;);&quot;UNKNOWN&quot;;&quot;CONTRADICTION&quot;);IF([.M65]=&quot;UNMATCHED&quot;;IF(AND([.L65]=&quot;&quot;;[.N65]=&quot;&quot;);&quot;CLEAR&quot;;&quot;CONTRADICTION&quot;);IF([.M65]=&quot;SINGLE_SALE_LINKED&quot;;IF(AND([.L65]&lt;&gt;&quot;&quot;;[.N65]=&quot;&quot;);&quot;CLEAR&quot;;&quot;CONTRADICTION&quot;);IF([.M65]=&quot;MULTI_SALE_PENDING_ALLOCATION&quot;;IF([.L65]=&quot;&quot;;&quot;CLEAR&quot;;&quot;CONTRADICTION&quot;);IF([.M65]=&quot;ALLOCATED&quot;;IF(AND([.L65]=&quot;&quot;;[.N65]&lt;&gt;&quot;&quot;);&quot;CLEAR&quot;;&quot;CONTRADICTION&quot;);&quot;CONTRADICTION&quot;)))))">
            <text:p>UNKNOWN</text:p>
          </table:table-cell>
          <table:table-cell office:value-type="string" table:formula="of:=IF([.S65]=&quot;UNKNOWN&quot;;&quot;NO ACTION — linkage status is UNKNOWN / not asserted&quot;;IF([.S65]=&quot;CLEAR&quot;;&quot;NO CONTRADICTION — preserve evidence as entered&quot;;IF([.M65]=&quot;&quot;;&quot;REVIEW LINKAGE STATUS — identifiers are present while status is UNKNOWN&quot;;IF([.M65]=&quot;UNMATCHED&quot;;&quot;REMOVE LINKAGE IDENTIFIERS OR CORRECT LINKAGE STATUS&quot;;IF([.M65]=&quot;SINGLE_SALE_LINKED&quot;;&quot;REQUIRE LINKED SALE ID AND NO ALLOCATION GROUP ID&quot;;IF([.M65]=&quot;MULTI_SALE_PENDING_ALLOCATION&quot;;&quot;REMOVE LINKED SALE ID OR CORRECT LINKAGE STATUS&quot;;IF([.M65]=&quot;ALLOCATED&quot;;&quot;REQUIRE ALLOCATION GROUP ID AND NO LINKED SALE ID&quot;;&quot;REVIEW LINKAGE EVIDENCE — NO AUTHORITY CREATED&quot;)))))))">
            <text:p>NO ACTION — linkage status is UNKNOWN / not asserted</text:p>
          </table:table-cell>
          <table:table-cell office:value-type="string" table:formula="of:=IF([.S65]=&quot;CONTRADICTION&quot;;&quot;BLOCKED&quot;;IF([.S65]=&quot;UNKNOWN&quot;;&quot;UNKNOWN&quot;;IF([.S65]=&quot;CLEAR&quot;;IF(OR([.O65]=&quot;&quot;;[.P65]=&quot;&quot;);&quot;UNKNOWN&quot;;&quot;READY FOR REVIEW&quot;);&quot;BLOCKED&quot;)))">
            <text:p>UNKNOWN</text:p>
          </table:table-cell>
          <table:table-cell office:value-type="string" table:formula="of:=IF([.U65]=&quot;UNKNOWN&quot;;&quot;COMPLETE OR ASSERT REQUIRED EVIDENCE BEFORE REVIEW&quot;;IF([.U65]=&quot;BLOCKED&quot;;&quot;RESOLVE CONTRADICTION BEFORE REVIEW — NO AUTHORITY CREATED&quot;;IF([.U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5]=&quot;READY FOR REVIEW&quot;;&quot;REVIEW ELIGIBLE — NO AUTHORITY&quot;;IF(OR([.U65]=&quot;UNKNOWN&quot;;[.U6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6]=&quot;&quot;;IF(AND([.L66]=&quot;&quot;;[.N66]=&quot;&quot;);&quot;UNKNOWN&quot;;&quot;CONTRADICTION&quot;);IF([.M66]=&quot;UNMATCHED&quot;;IF(AND([.L66]=&quot;&quot;;[.N66]=&quot;&quot;);&quot;CLEAR&quot;;&quot;CONTRADICTION&quot;);IF([.M66]=&quot;SINGLE_SALE_LINKED&quot;;IF(AND([.L66]&lt;&gt;&quot;&quot;;[.N66]=&quot;&quot;);&quot;CLEAR&quot;;&quot;CONTRADICTION&quot;);IF([.M66]=&quot;MULTI_SALE_PENDING_ALLOCATION&quot;;IF([.L66]=&quot;&quot;;&quot;CLEAR&quot;;&quot;CONTRADICTION&quot;);IF([.M66]=&quot;ALLOCATED&quot;;IF(AND([.L66]=&quot;&quot;;[.N66]&lt;&gt;&quot;&quot;);&quot;CLEAR&quot;;&quot;CONTRADICTION&quot;);&quot;CONTRADICTION&quot;)))))">
            <text:p>UNKNOWN</text:p>
          </table:table-cell>
          <table:table-cell office:value-type="string" table:formula="of:=IF([.S66]=&quot;UNKNOWN&quot;;&quot;NO ACTION — linkage status is UNKNOWN / not asserted&quot;;IF([.S66]=&quot;CLEAR&quot;;&quot;NO CONTRADICTION — preserve evidence as entered&quot;;IF([.M66]=&quot;&quot;;&quot;REVIEW LINKAGE STATUS — identifiers are present while status is UNKNOWN&quot;;IF([.M66]=&quot;UNMATCHED&quot;;&quot;REMOVE LINKAGE IDENTIFIERS OR CORRECT LINKAGE STATUS&quot;;IF([.M66]=&quot;SINGLE_SALE_LINKED&quot;;&quot;REQUIRE LINKED SALE ID AND NO ALLOCATION GROUP ID&quot;;IF([.M66]=&quot;MULTI_SALE_PENDING_ALLOCATION&quot;;&quot;REMOVE LINKED SALE ID OR CORRECT LINKAGE STATUS&quot;;IF([.M66]=&quot;ALLOCATED&quot;;&quot;REQUIRE ALLOCATION GROUP ID AND NO LINKED SALE ID&quot;;&quot;REVIEW LINKAGE EVIDENCE — NO AUTHORITY CREATED&quot;)))))))">
            <text:p>NO ACTION — linkage status is UNKNOWN / not asserted</text:p>
          </table:table-cell>
          <table:table-cell office:value-type="string" table:formula="of:=IF([.S66]=&quot;CONTRADICTION&quot;;&quot;BLOCKED&quot;;IF([.S66]=&quot;UNKNOWN&quot;;&quot;UNKNOWN&quot;;IF([.S66]=&quot;CLEAR&quot;;IF(OR([.O66]=&quot;&quot;;[.P66]=&quot;&quot;);&quot;UNKNOWN&quot;;&quot;READY FOR REVIEW&quot;);&quot;BLOCKED&quot;)))">
            <text:p>UNKNOWN</text:p>
          </table:table-cell>
          <table:table-cell office:value-type="string" table:formula="of:=IF([.U66]=&quot;UNKNOWN&quot;;&quot;COMPLETE OR ASSERT REQUIRED EVIDENCE BEFORE REVIEW&quot;;IF([.U66]=&quot;BLOCKED&quot;;&quot;RESOLVE CONTRADICTION BEFORE REVIEW — NO AUTHORITY CREATED&quot;;IF([.U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6]=&quot;READY FOR REVIEW&quot;;&quot;REVIEW ELIGIBLE — NO AUTHORITY&quot;;IF(OR([.U66]=&quot;UNKNOWN&quot;;[.U6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7]=&quot;&quot;;IF(AND([.L67]=&quot;&quot;;[.N67]=&quot;&quot;);&quot;UNKNOWN&quot;;&quot;CONTRADICTION&quot;);IF([.M67]=&quot;UNMATCHED&quot;;IF(AND([.L67]=&quot;&quot;;[.N67]=&quot;&quot;);&quot;CLEAR&quot;;&quot;CONTRADICTION&quot;);IF([.M67]=&quot;SINGLE_SALE_LINKED&quot;;IF(AND([.L67]&lt;&gt;&quot;&quot;;[.N67]=&quot;&quot;);&quot;CLEAR&quot;;&quot;CONTRADICTION&quot;);IF([.M67]=&quot;MULTI_SALE_PENDING_ALLOCATION&quot;;IF([.L67]=&quot;&quot;;&quot;CLEAR&quot;;&quot;CONTRADICTION&quot;);IF([.M67]=&quot;ALLOCATED&quot;;IF(AND([.L67]=&quot;&quot;;[.N67]&lt;&gt;&quot;&quot;);&quot;CLEAR&quot;;&quot;CONTRADICTION&quot;);&quot;CONTRADICTION&quot;)))))">
            <text:p>UNKNOWN</text:p>
          </table:table-cell>
          <table:table-cell office:value-type="string" table:formula="of:=IF([.S67]=&quot;UNKNOWN&quot;;&quot;NO ACTION — linkage status is UNKNOWN / not asserted&quot;;IF([.S67]=&quot;CLEAR&quot;;&quot;NO CONTRADICTION — preserve evidence as entered&quot;;IF([.M67]=&quot;&quot;;&quot;REVIEW LINKAGE STATUS — identifiers are present while status is UNKNOWN&quot;;IF([.M67]=&quot;UNMATCHED&quot;;&quot;REMOVE LINKAGE IDENTIFIERS OR CORRECT LINKAGE STATUS&quot;;IF([.M67]=&quot;SINGLE_SALE_LINKED&quot;;&quot;REQUIRE LINKED SALE ID AND NO ALLOCATION GROUP ID&quot;;IF([.M67]=&quot;MULTI_SALE_PENDING_ALLOCATION&quot;;&quot;REMOVE LINKED SALE ID OR CORRECT LINKAGE STATUS&quot;;IF([.M67]=&quot;ALLOCATED&quot;;&quot;REQUIRE ALLOCATION GROUP ID AND NO LINKED SALE ID&quot;;&quot;REVIEW LINKAGE EVIDENCE — NO AUTHORITY CREATED&quot;)))))))">
            <text:p>NO ACTION — linkage status is UNKNOWN / not asserted</text:p>
          </table:table-cell>
          <table:table-cell office:value-type="string" table:formula="of:=IF([.S67]=&quot;CONTRADICTION&quot;;&quot;BLOCKED&quot;;IF([.S67]=&quot;UNKNOWN&quot;;&quot;UNKNOWN&quot;;IF([.S67]=&quot;CLEAR&quot;;IF(OR([.O67]=&quot;&quot;;[.P67]=&quot;&quot;);&quot;UNKNOWN&quot;;&quot;READY FOR REVIEW&quot;);&quot;BLOCKED&quot;)))">
            <text:p>UNKNOWN</text:p>
          </table:table-cell>
          <table:table-cell office:value-type="string" table:formula="of:=IF([.U67]=&quot;UNKNOWN&quot;;&quot;COMPLETE OR ASSERT REQUIRED EVIDENCE BEFORE REVIEW&quot;;IF([.U67]=&quot;BLOCKED&quot;;&quot;RESOLVE CONTRADICTION BEFORE REVIEW — NO AUTHORITY CREATED&quot;;IF([.U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7]=&quot;READY FOR REVIEW&quot;;&quot;REVIEW ELIGIBLE — NO AUTHORITY&quot;;IF(OR([.U67]=&quot;UNKNOWN&quot;;[.U6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8]=&quot;&quot;;IF(AND([.L68]=&quot;&quot;;[.N68]=&quot;&quot;);&quot;UNKNOWN&quot;;&quot;CONTRADICTION&quot;);IF([.M68]=&quot;UNMATCHED&quot;;IF(AND([.L68]=&quot;&quot;;[.N68]=&quot;&quot;);&quot;CLEAR&quot;;&quot;CONTRADICTION&quot;);IF([.M68]=&quot;SINGLE_SALE_LINKED&quot;;IF(AND([.L68]&lt;&gt;&quot;&quot;;[.N68]=&quot;&quot;);&quot;CLEAR&quot;;&quot;CONTRADICTION&quot;);IF([.M68]=&quot;MULTI_SALE_PENDING_ALLOCATION&quot;;IF([.L68]=&quot;&quot;;&quot;CLEAR&quot;;&quot;CONTRADICTION&quot;);IF([.M68]=&quot;ALLOCATED&quot;;IF(AND([.L68]=&quot;&quot;;[.N68]&lt;&gt;&quot;&quot;);&quot;CLEAR&quot;;&quot;CONTRADICTION&quot;);&quot;CONTRADICTION&quot;)))))">
            <text:p>UNKNOWN</text:p>
          </table:table-cell>
          <table:table-cell office:value-type="string" table:formula="of:=IF([.S68]=&quot;UNKNOWN&quot;;&quot;NO ACTION — linkage status is UNKNOWN / not asserted&quot;;IF([.S68]=&quot;CLEAR&quot;;&quot;NO CONTRADICTION — preserve evidence as entered&quot;;IF([.M68]=&quot;&quot;;&quot;REVIEW LINKAGE STATUS — identifiers are present while status is UNKNOWN&quot;;IF([.M68]=&quot;UNMATCHED&quot;;&quot;REMOVE LINKAGE IDENTIFIERS OR CORRECT LINKAGE STATUS&quot;;IF([.M68]=&quot;SINGLE_SALE_LINKED&quot;;&quot;REQUIRE LINKED SALE ID AND NO ALLOCATION GROUP ID&quot;;IF([.M68]=&quot;MULTI_SALE_PENDING_ALLOCATION&quot;;&quot;REMOVE LINKED SALE ID OR CORRECT LINKAGE STATUS&quot;;IF([.M68]=&quot;ALLOCATED&quot;;&quot;REQUIRE ALLOCATION GROUP ID AND NO LINKED SALE ID&quot;;&quot;REVIEW LINKAGE EVIDENCE — NO AUTHORITY CREATED&quot;)))))))">
            <text:p>NO ACTION — linkage status is UNKNOWN / not asserted</text:p>
          </table:table-cell>
          <table:table-cell office:value-type="string" table:formula="of:=IF([.S68]=&quot;CONTRADICTION&quot;;&quot;BLOCKED&quot;;IF([.S68]=&quot;UNKNOWN&quot;;&quot;UNKNOWN&quot;;IF([.S68]=&quot;CLEAR&quot;;IF(OR([.O68]=&quot;&quot;;[.P68]=&quot;&quot;);&quot;UNKNOWN&quot;;&quot;READY FOR REVIEW&quot;);&quot;BLOCKED&quot;)))">
            <text:p>UNKNOWN</text:p>
          </table:table-cell>
          <table:table-cell office:value-type="string" table:formula="of:=IF([.U68]=&quot;UNKNOWN&quot;;&quot;COMPLETE OR ASSERT REQUIRED EVIDENCE BEFORE REVIEW&quot;;IF([.U68]=&quot;BLOCKED&quot;;&quot;RESOLVE CONTRADICTION BEFORE REVIEW — NO AUTHORITY CREATED&quot;;IF([.U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8]=&quot;READY FOR REVIEW&quot;;&quot;REVIEW ELIGIBLE — NO AUTHORITY&quot;;IF(OR([.U68]=&quot;UNKNOWN&quot;;[.U6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9]=&quot;&quot;;IF(AND([.L69]=&quot;&quot;;[.N69]=&quot;&quot;);&quot;UNKNOWN&quot;;&quot;CONTRADICTION&quot;);IF([.M69]=&quot;UNMATCHED&quot;;IF(AND([.L69]=&quot;&quot;;[.N69]=&quot;&quot;);&quot;CLEAR&quot;;&quot;CONTRADICTION&quot;);IF([.M69]=&quot;SINGLE_SALE_LINKED&quot;;IF(AND([.L69]&lt;&gt;&quot;&quot;;[.N69]=&quot;&quot;);&quot;CLEAR&quot;;&quot;CONTRADICTION&quot;);IF([.M69]=&quot;MULTI_SALE_PENDING_ALLOCATION&quot;;IF([.L69]=&quot;&quot;;&quot;CLEAR&quot;;&quot;CONTRADICTION&quot;);IF([.M69]=&quot;ALLOCATED&quot;;IF(AND([.L69]=&quot;&quot;;[.N69]&lt;&gt;&quot;&quot;);&quot;CLEAR&quot;;&quot;CONTRADICTION&quot;);&quot;CONTRADICTION&quot;)))))">
            <text:p>UNKNOWN</text:p>
          </table:table-cell>
          <table:table-cell office:value-type="string" table:formula="of:=IF([.S69]=&quot;UNKNOWN&quot;;&quot;NO ACTION — linkage status is UNKNOWN / not asserted&quot;;IF([.S69]=&quot;CLEAR&quot;;&quot;NO CONTRADICTION — preserve evidence as entered&quot;;IF([.M69]=&quot;&quot;;&quot;REVIEW LINKAGE STATUS — identifiers are present while status is UNKNOWN&quot;;IF([.M69]=&quot;UNMATCHED&quot;;&quot;REMOVE LINKAGE IDENTIFIERS OR CORRECT LINKAGE STATUS&quot;;IF([.M69]=&quot;SINGLE_SALE_LINKED&quot;;&quot;REQUIRE LINKED SALE ID AND NO ALLOCATION GROUP ID&quot;;IF([.M69]=&quot;MULTI_SALE_PENDING_ALLOCATION&quot;;&quot;REMOVE LINKED SALE ID OR CORRECT LINKAGE STATUS&quot;;IF([.M69]=&quot;ALLOCATED&quot;;&quot;REQUIRE ALLOCATION GROUP ID AND NO LINKED SALE ID&quot;;&quot;REVIEW LINKAGE EVIDENCE — NO AUTHORITY CREATED&quot;)))))))">
            <text:p>NO ACTION — linkage status is UNKNOWN / not asserted</text:p>
          </table:table-cell>
          <table:table-cell office:value-type="string" table:formula="of:=IF([.S69]=&quot;CONTRADICTION&quot;;&quot;BLOCKED&quot;;IF([.S69]=&quot;UNKNOWN&quot;;&quot;UNKNOWN&quot;;IF([.S69]=&quot;CLEAR&quot;;IF(OR([.O69]=&quot;&quot;;[.P69]=&quot;&quot;);&quot;UNKNOWN&quot;;&quot;READY FOR REVIEW&quot;);&quot;BLOCKED&quot;)))">
            <text:p>UNKNOWN</text:p>
          </table:table-cell>
          <table:table-cell office:value-type="string" table:formula="of:=IF([.U69]=&quot;UNKNOWN&quot;;&quot;COMPLETE OR ASSERT REQUIRED EVIDENCE BEFORE REVIEW&quot;;IF([.U69]=&quot;BLOCKED&quot;;&quot;RESOLVE CONTRADICTION BEFORE REVIEW — NO AUTHORITY CREATED&quot;;IF([.U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9]=&quot;READY FOR REVIEW&quot;;&quot;REVIEW ELIGIBLE — NO AUTHORITY&quot;;IF(OR([.U69]=&quot;UNKNOWN&quot;;[.U6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0]=&quot;&quot;;IF(AND([.L70]=&quot;&quot;;[.N70]=&quot;&quot;);&quot;UNKNOWN&quot;;&quot;CONTRADICTION&quot;);IF([.M70]=&quot;UNMATCHED&quot;;IF(AND([.L70]=&quot;&quot;;[.N70]=&quot;&quot;);&quot;CLEAR&quot;;&quot;CONTRADICTION&quot;);IF([.M70]=&quot;SINGLE_SALE_LINKED&quot;;IF(AND([.L70]&lt;&gt;&quot;&quot;;[.N70]=&quot;&quot;);&quot;CLEAR&quot;;&quot;CONTRADICTION&quot;);IF([.M70]=&quot;MULTI_SALE_PENDING_ALLOCATION&quot;;IF([.L70]=&quot;&quot;;&quot;CLEAR&quot;;&quot;CONTRADICTION&quot;);IF([.M70]=&quot;ALLOCATED&quot;;IF(AND([.L70]=&quot;&quot;;[.N70]&lt;&gt;&quot;&quot;);&quot;CLEAR&quot;;&quot;CONTRADICTION&quot;);&quot;CONTRADICTION&quot;)))))">
            <text:p>UNKNOWN</text:p>
          </table:table-cell>
          <table:table-cell office:value-type="string" table:formula="of:=IF([.S70]=&quot;UNKNOWN&quot;;&quot;NO ACTION — linkage status is UNKNOWN / not asserted&quot;;IF([.S70]=&quot;CLEAR&quot;;&quot;NO CONTRADICTION — preserve evidence as entered&quot;;IF([.M70]=&quot;&quot;;&quot;REVIEW LINKAGE STATUS — identifiers are present while status is UNKNOWN&quot;;IF([.M70]=&quot;UNMATCHED&quot;;&quot;REMOVE LINKAGE IDENTIFIERS OR CORRECT LINKAGE STATUS&quot;;IF([.M70]=&quot;SINGLE_SALE_LINKED&quot;;&quot;REQUIRE LINKED SALE ID AND NO ALLOCATION GROUP ID&quot;;IF([.M70]=&quot;MULTI_SALE_PENDING_ALLOCATION&quot;;&quot;REMOVE LINKED SALE ID OR CORRECT LINKAGE STATUS&quot;;IF([.M70]=&quot;ALLOCATED&quot;;&quot;REQUIRE ALLOCATION GROUP ID AND NO LINKED SALE ID&quot;;&quot;REVIEW LINKAGE EVIDENCE — NO AUTHORITY CREATED&quot;)))))))">
            <text:p>NO ACTION — linkage status is UNKNOWN / not asserted</text:p>
          </table:table-cell>
          <table:table-cell office:value-type="string" table:formula="of:=IF([.S70]=&quot;CONTRADICTION&quot;;&quot;BLOCKED&quot;;IF([.S70]=&quot;UNKNOWN&quot;;&quot;UNKNOWN&quot;;IF([.S70]=&quot;CLEAR&quot;;IF(OR([.O70]=&quot;&quot;;[.P70]=&quot;&quot;);&quot;UNKNOWN&quot;;&quot;READY FOR REVIEW&quot;);&quot;BLOCKED&quot;)))">
            <text:p>UNKNOWN</text:p>
          </table:table-cell>
          <table:table-cell office:value-type="string" table:formula="of:=IF([.U70]=&quot;UNKNOWN&quot;;&quot;COMPLETE OR ASSERT REQUIRED EVIDENCE BEFORE REVIEW&quot;;IF([.U70]=&quot;BLOCKED&quot;;&quot;RESOLVE CONTRADICTION BEFORE REVIEW — NO AUTHORITY CREATED&quot;;IF([.U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0]=&quot;READY FOR REVIEW&quot;;&quot;REVIEW ELIGIBLE — NO AUTHORITY&quot;;IF(OR([.U70]=&quot;UNKNOWN&quot;;[.U7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1]=&quot;&quot;;IF(AND([.L71]=&quot;&quot;;[.N71]=&quot;&quot;);&quot;UNKNOWN&quot;;&quot;CONTRADICTION&quot;);IF([.M71]=&quot;UNMATCHED&quot;;IF(AND([.L71]=&quot;&quot;;[.N71]=&quot;&quot;);&quot;CLEAR&quot;;&quot;CONTRADICTION&quot;);IF([.M71]=&quot;SINGLE_SALE_LINKED&quot;;IF(AND([.L71]&lt;&gt;&quot;&quot;;[.N71]=&quot;&quot;);&quot;CLEAR&quot;;&quot;CONTRADICTION&quot;);IF([.M71]=&quot;MULTI_SALE_PENDING_ALLOCATION&quot;;IF([.L71]=&quot;&quot;;&quot;CLEAR&quot;;&quot;CONTRADICTION&quot;);IF([.M71]=&quot;ALLOCATED&quot;;IF(AND([.L71]=&quot;&quot;;[.N71]&lt;&gt;&quot;&quot;);&quot;CLEAR&quot;;&quot;CONTRADICTION&quot;);&quot;CONTRADICTION&quot;)))))">
            <text:p>UNKNOWN</text:p>
          </table:table-cell>
          <table:table-cell office:value-type="string" table:formula="of:=IF([.S71]=&quot;UNKNOWN&quot;;&quot;NO ACTION — linkage status is UNKNOWN / not asserted&quot;;IF([.S71]=&quot;CLEAR&quot;;&quot;NO CONTRADICTION — preserve evidence as entered&quot;;IF([.M71]=&quot;&quot;;&quot;REVIEW LINKAGE STATUS — identifiers are present while status is UNKNOWN&quot;;IF([.M71]=&quot;UNMATCHED&quot;;&quot;REMOVE LINKAGE IDENTIFIERS OR CORRECT LINKAGE STATUS&quot;;IF([.M71]=&quot;SINGLE_SALE_LINKED&quot;;&quot;REQUIRE LINKED SALE ID AND NO ALLOCATION GROUP ID&quot;;IF([.M71]=&quot;MULTI_SALE_PENDING_ALLOCATION&quot;;&quot;REMOVE LINKED SALE ID OR CORRECT LINKAGE STATUS&quot;;IF([.M71]=&quot;ALLOCATED&quot;;&quot;REQUIRE ALLOCATION GROUP ID AND NO LINKED SALE ID&quot;;&quot;REVIEW LINKAGE EVIDENCE — NO AUTHORITY CREATED&quot;)))))))">
            <text:p>NO ACTION — linkage status is UNKNOWN / not asserted</text:p>
          </table:table-cell>
          <table:table-cell office:value-type="string" table:formula="of:=IF([.S71]=&quot;CONTRADICTION&quot;;&quot;BLOCKED&quot;;IF([.S71]=&quot;UNKNOWN&quot;;&quot;UNKNOWN&quot;;IF([.S71]=&quot;CLEAR&quot;;IF(OR([.O71]=&quot;&quot;;[.P71]=&quot;&quot;);&quot;UNKNOWN&quot;;&quot;READY FOR REVIEW&quot;);&quot;BLOCKED&quot;)))">
            <text:p>UNKNOWN</text:p>
          </table:table-cell>
          <table:table-cell office:value-type="string" table:formula="of:=IF([.U71]=&quot;UNKNOWN&quot;;&quot;COMPLETE OR ASSERT REQUIRED EVIDENCE BEFORE REVIEW&quot;;IF([.U71]=&quot;BLOCKED&quot;;&quot;RESOLVE CONTRADICTION BEFORE REVIEW — NO AUTHORITY CREATED&quot;;IF([.U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1]=&quot;READY FOR REVIEW&quot;;&quot;REVIEW ELIGIBLE — NO AUTHORITY&quot;;IF(OR([.U71]=&quot;UNKNOWN&quot;;[.U7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2]=&quot;&quot;;IF(AND([.L72]=&quot;&quot;;[.N72]=&quot;&quot;);&quot;UNKNOWN&quot;;&quot;CONTRADICTION&quot;);IF([.M72]=&quot;UNMATCHED&quot;;IF(AND([.L72]=&quot;&quot;;[.N72]=&quot;&quot;);&quot;CLEAR&quot;;&quot;CONTRADICTION&quot;);IF([.M72]=&quot;SINGLE_SALE_LINKED&quot;;IF(AND([.L72]&lt;&gt;&quot;&quot;;[.N72]=&quot;&quot;);&quot;CLEAR&quot;;&quot;CONTRADICTION&quot;);IF([.M72]=&quot;MULTI_SALE_PENDING_ALLOCATION&quot;;IF([.L72]=&quot;&quot;;&quot;CLEAR&quot;;&quot;CONTRADICTION&quot;);IF([.M72]=&quot;ALLOCATED&quot;;IF(AND([.L72]=&quot;&quot;;[.N72]&lt;&gt;&quot;&quot;);&quot;CLEAR&quot;;&quot;CONTRADICTION&quot;);&quot;CONTRADICTION&quot;)))))">
            <text:p>UNKNOWN</text:p>
          </table:table-cell>
          <table:table-cell office:value-type="string" table:formula="of:=IF([.S72]=&quot;UNKNOWN&quot;;&quot;NO ACTION — linkage status is UNKNOWN / not asserted&quot;;IF([.S72]=&quot;CLEAR&quot;;&quot;NO CONTRADICTION — preserve evidence as entered&quot;;IF([.M72]=&quot;&quot;;&quot;REVIEW LINKAGE STATUS — identifiers are present while status is UNKNOWN&quot;;IF([.M72]=&quot;UNMATCHED&quot;;&quot;REMOVE LINKAGE IDENTIFIERS OR CORRECT LINKAGE STATUS&quot;;IF([.M72]=&quot;SINGLE_SALE_LINKED&quot;;&quot;REQUIRE LINKED SALE ID AND NO ALLOCATION GROUP ID&quot;;IF([.M72]=&quot;MULTI_SALE_PENDING_ALLOCATION&quot;;&quot;REMOVE LINKED SALE ID OR CORRECT LINKAGE STATUS&quot;;IF([.M72]=&quot;ALLOCATED&quot;;&quot;REQUIRE ALLOCATION GROUP ID AND NO LINKED SALE ID&quot;;&quot;REVIEW LINKAGE EVIDENCE — NO AUTHORITY CREATED&quot;)))))))">
            <text:p>NO ACTION — linkage status is UNKNOWN / not asserted</text:p>
          </table:table-cell>
          <table:table-cell office:value-type="string" table:formula="of:=IF([.S72]=&quot;CONTRADICTION&quot;;&quot;BLOCKED&quot;;IF([.S72]=&quot;UNKNOWN&quot;;&quot;UNKNOWN&quot;;IF([.S72]=&quot;CLEAR&quot;;IF(OR([.O72]=&quot;&quot;;[.P72]=&quot;&quot;);&quot;UNKNOWN&quot;;&quot;READY FOR REVIEW&quot;);&quot;BLOCKED&quot;)))">
            <text:p>UNKNOWN</text:p>
          </table:table-cell>
          <table:table-cell office:value-type="string" table:formula="of:=IF([.U72]=&quot;UNKNOWN&quot;;&quot;COMPLETE OR ASSERT REQUIRED EVIDENCE BEFORE REVIEW&quot;;IF([.U72]=&quot;BLOCKED&quot;;&quot;RESOLVE CONTRADICTION BEFORE REVIEW — NO AUTHORITY CREATED&quot;;IF([.U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2]=&quot;READY FOR REVIEW&quot;;&quot;REVIEW ELIGIBLE — NO AUTHORITY&quot;;IF(OR([.U72]=&quot;UNKNOWN&quot;;[.U7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3]=&quot;&quot;;IF(AND([.L73]=&quot;&quot;;[.N73]=&quot;&quot;);&quot;UNKNOWN&quot;;&quot;CONTRADICTION&quot;);IF([.M73]=&quot;UNMATCHED&quot;;IF(AND([.L73]=&quot;&quot;;[.N73]=&quot;&quot;);&quot;CLEAR&quot;;&quot;CONTRADICTION&quot;);IF([.M73]=&quot;SINGLE_SALE_LINKED&quot;;IF(AND([.L73]&lt;&gt;&quot;&quot;;[.N73]=&quot;&quot;);&quot;CLEAR&quot;;&quot;CONTRADICTION&quot;);IF([.M73]=&quot;MULTI_SALE_PENDING_ALLOCATION&quot;;IF([.L73]=&quot;&quot;;&quot;CLEAR&quot;;&quot;CONTRADICTION&quot;);IF([.M73]=&quot;ALLOCATED&quot;;IF(AND([.L73]=&quot;&quot;;[.N73]&lt;&gt;&quot;&quot;);&quot;CLEAR&quot;;&quot;CONTRADICTION&quot;);&quot;CONTRADICTION&quot;)))))">
            <text:p>UNKNOWN</text:p>
          </table:table-cell>
          <table:table-cell office:value-type="string" table:formula="of:=IF([.S73]=&quot;UNKNOWN&quot;;&quot;NO ACTION — linkage status is UNKNOWN / not asserted&quot;;IF([.S73]=&quot;CLEAR&quot;;&quot;NO CONTRADICTION — preserve evidence as entered&quot;;IF([.M73]=&quot;&quot;;&quot;REVIEW LINKAGE STATUS — identifiers are present while status is UNKNOWN&quot;;IF([.M73]=&quot;UNMATCHED&quot;;&quot;REMOVE LINKAGE IDENTIFIERS OR CORRECT LINKAGE STATUS&quot;;IF([.M73]=&quot;SINGLE_SALE_LINKED&quot;;&quot;REQUIRE LINKED SALE ID AND NO ALLOCATION GROUP ID&quot;;IF([.M73]=&quot;MULTI_SALE_PENDING_ALLOCATION&quot;;&quot;REMOVE LINKED SALE ID OR CORRECT LINKAGE STATUS&quot;;IF([.M73]=&quot;ALLOCATED&quot;;&quot;REQUIRE ALLOCATION GROUP ID AND NO LINKED SALE ID&quot;;&quot;REVIEW LINKAGE EVIDENCE — NO AUTHORITY CREATED&quot;)))))))">
            <text:p>NO ACTION — linkage status is UNKNOWN / not asserted</text:p>
          </table:table-cell>
          <table:table-cell office:value-type="string" table:formula="of:=IF([.S73]=&quot;CONTRADICTION&quot;;&quot;BLOCKED&quot;;IF([.S73]=&quot;UNKNOWN&quot;;&quot;UNKNOWN&quot;;IF([.S73]=&quot;CLEAR&quot;;IF(OR([.O73]=&quot;&quot;;[.P73]=&quot;&quot;);&quot;UNKNOWN&quot;;&quot;READY FOR REVIEW&quot;);&quot;BLOCKED&quot;)))">
            <text:p>UNKNOWN</text:p>
          </table:table-cell>
          <table:table-cell office:value-type="string" table:formula="of:=IF([.U73]=&quot;UNKNOWN&quot;;&quot;COMPLETE OR ASSERT REQUIRED EVIDENCE BEFORE REVIEW&quot;;IF([.U73]=&quot;BLOCKED&quot;;&quot;RESOLVE CONTRADICTION BEFORE REVIEW — NO AUTHORITY CREATED&quot;;IF([.U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3]=&quot;READY FOR REVIEW&quot;;&quot;REVIEW ELIGIBLE — NO AUTHORITY&quot;;IF(OR([.U73]=&quot;UNKNOWN&quot;;[.U7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4]=&quot;&quot;;IF(AND([.L74]=&quot;&quot;;[.N74]=&quot;&quot;);&quot;UNKNOWN&quot;;&quot;CONTRADICTION&quot;);IF([.M74]=&quot;UNMATCHED&quot;;IF(AND([.L74]=&quot;&quot;;[.N74]=&quot;&quot;);&quot;CLEAR&quot;;&quot;CONTRADICTION&quot;);IF([.M74]=&quot;SINGLE_SALE_LINKED&quot;;IF(AND([.L74]&lt;&gt;&quot;&quot;;[.N74]=&quot;&quot;);&quot;CLEAR&quot;;&quot;CONTRADICTION&quot;);IF([.M74]=&quot;MULTI_SALE_PENDING_ALLOCATION&quot;;IF([.L74]=&quot;&quot;;&quot;CLEAR&quot;;&quot;CONTRADICTION&quot;);IF([.M74]=&quot;ALLOCATED&quot;;IF(AND([.L74]=&quot;&quot;;[.N74]&lt;&gt;&quot;&quot;);&quot;CLEAR&quot;;&quot;CONTRADICTION&quot;);&quot;CONTRADICTION&quot;)))))">
            <text:p>UNKNOWN</text:p>
          </table:table-cell>
          <table:table-cell office:value-type="string" table:formula="of:=IF([.S74]=&quot;UNKNOWN&quot;;&quot;NO ACTION — linkage status is UNKNOWN / not asserted&quot;;IF([.S74]=&quot;CLEAR&quot;;&quot;NO CONTRADICTION — preserve evidence as entered&quot;;IF([.M74]=&quot;&quot;;&quot;REVIEW LINKAGE STATUS — identifiers are present while status is UNKNOWN&quot;;IF([.M74]=&quot;UNMATCHED&quot;;&quot;REMOVE LINKAGE IDENTIFIERS OR CORRECT LINKAGE STATUS&quot;;IF([.M74]=&quot;SINGLE_SALE_LINKED&quot;;&quot;REQUIRE LINKED SALE ID AND NO ALLOCATION GROUP ID&quot;;IF([.M74]=&quot;MULTI_SALE_PENDING_ALLOCATION&quot;;&quot;REMOVE LINKED SALE ID OR CORRECT LINKAGE STATUS&quot;;IF([.M74]=&quot;ALLOCATED&quot;;&quot;REQUIRE ALLOCATION GROUP ID AND NO LINKED SALE ID&quot;;&quot;REVIEW LINKAGE EVIDENCE — NO AUTHORITY CREATED&quot;)))))))">
            <text:p>NO ACTION — linkage status is UNKNOWN / not asserted</text:p>
          </table:table-cell>
          <table:table-cell office:value-type="string" table:formula="of:=IF([.S74]=&quot;CONTRADICTION&quot;;&quot;BLOCKED&quot;;IF([.S74]=&quot;UNKNOWN&quot;;&quot;UNKNOWN&quot;;IF([.S74]=&quot;CLEAR&quot;;IF(OR([.O74]=&quot;&quot;;[.P74]=&quot;&quot;);&quot;UNKNOWN&quot;;&quot;READY FOR REVIEW&quot;);&quot;BLOCKED&quot;)))">
            <text:p>UNKNOWN</text:p>
          </table:table-cell>
          <table:table-cell office:value-type="string" table:formula="of:=IF([.U74]=&quot;UNKNOWN&quot;;&quot;COMPLETE OR ASSERT REQUIRED EVIDENCE BEFORE REVIEW&quot;;IF([.U74]=&quot;BLOCKED&quot;;&quot;RESOLVE CONTRADICTION BEFORE REVIEW — NO AUTHORITY CREATED&quot;;IF([.U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4]=&quot;READY FOR REVIEW&quot;;&quot;REVIEW ELIGIBLE — NO AUTHORITY&quot;;IF(OR([.U74]=&quot;UNKNOWN&quot;;[.U7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5]=&quot;&quot;;IF(AND([.L75]=&quot;&quot;;[.N75]=&quot;&quot;);&quot;UNKNOWN&quot;;&quot;CONTRADICTION&quot;);IF([.M75]=&quot;UNMATCHED&quot;;IF(AND([.L75]=&quot;&quot;;[.N75]=&quot;&quot;);&quot;CLEAR&quot;;&quot;CONTRADICTION&quot;);IF([.M75]=&quot;SINGLE_SALE_LINKED&quot;;IF(AND([.L75]&lt;&gt;&quot;&quot;;[.N75]=&quot;&quot;);&quot;CLEAR&quot;;&quot;CONTRADICTION&quot;);IF([.M75]=&quot;MULTI_SALE_PENDING_ALLOCATION&quot;;IF([.L75]=&quot;&quot;;&quot;CLEAR&quot;;&quot;CONTRADICTION&quot;);IF([.M75]=&quot;ALLOCATED&quot;;IF(AND([.L75]=&quot;&quot;;[.N75]&lt;&gt;&quot;&quot;);&quot;CLEAR&quot;;&quot;CONTRADICTION&quot;);&quot;CONTRADICTION&quot;)))))">
            <text:p>UNKNOWN</text:p>
          </table:table-cell>
          <table:table-cell office:value-type="string" table:formula="of:=IF([.S75]=&quot;UNKNOWN&quot;;&quot;NO ACTION — linkage status is UNKNOWN / not asserted&quot;;IF([.S75]=&quot;CLEAR&quot;;&quot;NO CONTRADICTION — preserve evidence as entered&quot;;IF([.M75]=&quot;&quot;;&quot;REVIEW LINKAGE STATUS — identifiers are present while status is UNKNOWN&quot;;IF([.M75]=&quot;UNMATCHED&quot;;&quot;REMOVE LINKAGE IDENTIFIERS OR CORRECT LINKAGE STATUS&quot;;IF([.M75]=&quot;SINGLE_SALE_LINKED&quot;;&quot;REQUIRE LINKED SALE ID AND NO ALLOCATION GROUP ID&quot;;IF([.M75]=&quot;MULTI_SALE_PENDING_ALLOCATION&quot;;&quot;REMOVE LINKED SALE ID OR CORRECT LINKAGE STATUS&quot;;IF([.M75]=&quot;ALLOCATED&quot;;&quot;REQUIRE ALLOCATION GROUP ID AND NO LINKED SALE ID&quot;;&quot;REVIEW LINKAGE EVIDENCE — NO AUTHORITY CREATED&quot;)))))))">
            <text:p>NO ACTION — linkage status is UNKNOWN / not asserted</text:p>
          </table:table-cell>
          <table:table-cell office:value-type="string" table:formula="of:=IF([.S75]=&quot;CONTRADICTION&quot;;&quot;BLOCKED&quot;;IF([.S75]=&quot;UNKNOWN&quot;;&quot;UNKNOWN&quot;;IF([.S75]=&quot;CLEAR&quot;;IF(OR([.O75]=&quot;&quot;;[.P75]=&quot;&quot;);&quot;UNKNOWN&quot;;&quot;READY FOR REVIEW&quot;);&quot;BLOCKED&quot;)))">
            <text:p>UNKNOWN</text:p>
          </table:table-cell>
          <table:table-cell office:value-type="string" table:formula="of:=IF([.U75]=&quot;UNKNOWN&quot;;&quot;COMPLETE OR ASSERT REQUIRED EVIDENCE BEFORE REVIEW&quot;;IF([.U75]=&quot;BLOCKED&quot;;&quot;RESOLVE CONTRADICTION BEFORE REVIEW — NO AUTHORITY CREATED&quot;;IF([.U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5]=&quot;READY FOR REVIEW&quot;;&quot;REVIEW ELIGIBLE — NO AUTHORITY&quot;;IF(OR([.U75]=&quot;UNKNOWN&quot;;[.U7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6]=&quot;&quot;;IF(AND([.L76]=&quot;&quot;;[.N76]=&quot;&quot;);&quot;UNKNOWN&quot;;&quot;CONTRADICTION&quot;);IF([.M76]=&quot;UNMATCHED&quot;;IF(AND([.L76]=&quot;&quot;;[.N76]=&quot;&quot;);&quot;CLEAR&quot;;&quot;CONTRADICTION&quot;);IF([.M76]=&quot;SINGLE_SALE_LINKED&quot;;IF(AND([.L76]&lt;&gt;&quot;&quot;;[.N76]=&quot;&quot;);&quot;CLEAR&quot;;&quot;CONTRADICTION&quot;);IF([.M76]=&quot;MULTI_SALE_PENDING_ALLOCATION&quot;;IF([.L76]=&quot;&quot;;&quot;CLEAR&quot;;&quot;CONTRADICTION&quot;);IF([.M76]=&quot;ALLOCATED&quot;;IF(AND([.L76]=&quot;&quot;;[.N76]&lt;&gt;&quot;&quot;);&quot;CLEAR&quot;;&quot;CONTRADICTION&quot;);&quot;CONTRADICTION&quot;)))))">
            <text:p>UNKNOWN</text:p>
          </table:table-cell>
          <table:table-cell office:value-type="string" table:formula="of:=IF([.S76]=&quot;UNKNOWN&quot;;&quot;NO ACTION — linkage status is UNKNOWN / not asserted&quot;;IF([.S76]=&quot;CLEAR&quot;;&quot;NO CONTRADICTION — preserve evidence as entered&quot;;IF([.M76]=&quot;&quot;;&quot;REVIEW LINKAGE STATUS — identifiers are present while status is UNKNOWN&quot;;IF([.M76]=&quot;UNMATCHED&quot;;&quot;REMOVE LINKAGE IDENTIFIERS OR CORRECT LINKAGE STATUS&quot;;IF([.M76]=&quot;SINGLE_SALE_LINKED&quot;;&quot;REQUIRE LINKED SALE ID AND NO ALLOCATION GROUP ID&quot;;IF([.M76]=&quot;MULTI_SALE_PENDING_ALLOCATION&quot;;&quot;REMOVE LINKED SALE ID OR CORRECT LINKAGE STATUS&quot;;IF([.M76]=&quot;ALLOCATED&quot;;&quot;REQUIRE ALLOCATION GROUP ID AND NO LINKED SALE ID&quot;;&quot;REVIEW LINKAGE EVIDENCE — NO AUTHORITY CREATED&quot;)))))))">
            <text:p>NO ACTION — linkage status is UNKNOWN / not asserted</text:p>
          </table:table-cell>
          <table:table-cell office:value-type="string" table:formula="of:=IF([.S76]=&quot;CONTRADICTION&quot;;&quot;BLOCKED&quot;;IF([.S76]=&quot;UNKNOWN&quot;;&quot;UNKNOWN&quot;;IF([.S76]=&quot;CLEAR&quot;;IF(OR([.O76]=&quot;&quot;;[.P76]=&quot;&quot;);&quot;UNKNOWN&quot;;&quot;READY FOR REVIEW&quot;);&quot;BLOCKED&quot;)))">
            <text:p>UNKNOWN</text:p>
          </table:table-cell>
          <table:table-cell office:value-type="string" table:formula="of:=IF([.U76]=&quot;UNKNOWN&quot;;&quot;COMPLETE OR ASSERT REQUIRED EVIDENCE BEFORE REVIEW&quot;;IF([.U76]=&quot;BLOCKED&quot;;&quot;RESOLVE CONTRADICTION BEFORE REVIEW — NO AUTHORITY CREATED&quot;;IF([.U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6]=&quot;READY FOR REVIEW&quot;;&quot;REVIEW ELIGIBLE — NO AUTHORITY&quot;;IF(OR([.U76]=&quot;UNKNOWN&quot;;[.U7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7]=&quot;&quot;;IF(AND([.L77]=&quot;&quot;;[.N77]=&quot;&quot;);&quot;UNKNOWN&quot;;&quot;CONTRADICTION&quot;);IF([.M77]=&quot;UNMATCHED&quot;;IF(AND([.L77]=&quot;&quot;;[.N77]=&quot;&quot;);&quot;CLEAR&quot;;&quot;CONTRADICTION&quot;);IF([.M77]=&quot;SINGLE_SALE_LINKED&quot;;IF(AND([.L77]&lt;&gt;&quot;&quot;;[.N77]=&quot;&quot;);&quot;CLEAR&quot;;&quot;CONTRADICTION&quot;);IF([.M77]=&quot;MULTI_SALE_PENDING_ALLOCATION&quot;;IF([.L77]=&quot;&quot;;&quot;CLEAR&quot;;&quot;CONTRADICTION&quot;);IF([.M77]=&quot;ALLOCATED&quot;;IF(AND([.L77]=&quot;&quot;;[.N77]&lt;&gt;&quot;&quot;);&quot;CLEAR&quot;;&quot;CONTRADICTION&quot;);&quot;CONTRADICTION&quot;)))))">
            <text:p>UNKNOWN</text:p>
          </table:table-cell>
          <table:table-cell office:value-type="string" table:formula="of:=IF([.S77]=&quot;UNKNOWN&quot;;&quot;NO ACTION — linkage status is UNKNOWN / not asserted&quot;;IF([.S77]=&quot;CLEAR&quot;;&quot;NO CONTRADICTION — preserve evidence as entered&quot;;IF([.M77]=&quot;&quot;;&quot;REVIEW LINKAGE STATUS — identifiers are present while status is UNKNOWN&quot;;IF([.M77]=&quot;UNMATCHED&quot;;&quot;REMOVE LINKAGE IDENTIFIERS OR CORRECT LINKAGE STATUS&quot;;IF([.M77]=&quot;SINGLE_SALE_LINKED&quot;;&quot;REQUIRE LINKED SALE ID AND NO ALLOCATION GROUP ID&quot;;IF([.M77]=&quot;MULTI_SALE_PENDING_ALLOCATION&quot;;&quot;REMOVE LINKED SALE ID OR CORRECT LINKAGE STATUS&quot;;IF([.M77]=&quot;ALLOCATED&quot;;&quot;REQUIRE ALLOCATION GROUP ID AND NO LINKED SALE ID&quot;;&quot;REVIEW LINKAGE EVIDENCE — NO AUTHORITY CREATED&quot;)))))))">
            <text:p>NO ACTION — linkage status is UNKNOWN / not asserted</text:p>
          </table:table-cell>
          <table:table-cell office:value-type="string" table:formula="of:=IF([.S77]=&quot;CONTRADICTION&quot;;&quot;BLOCKED&quot;;IF([.S77]=&quot;UNKNOWN&quot;;&quot;UNKNOWN&quot;;IF([.S77]=&quot;CLEAR&quot;;IF(OR([.O77]=&quot;&quot;;[.P77]=&quot;&quot;);&quot;UNKNOWN&quot;;&quot;READY FOR REVIEW&quot;);&quot;BLOCKED&quot;)))">
            <text:p>UNKNOWN</text:p>
          </table:table-cell>
          <table:table-cell office:value-type="string" table:formula="of:=IF([.U77]=&quot;UNKNOWN&quot;;&quot;COMPLETE OR ASSERT REQUIRED EVIDENCE BEFORE REVIEW&quot;;IF([.U77]=&quot;BLOCKED&quot;;&quot;RESOLVE CONTRADICTION BEFORE REVIEW — NO AUTHORITY CREATED&quot;;IF([.U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7]=&quot;READY FOR REVIEW&quot;;&quot;REVIEW ELIGIBLE — NO AUTHORITY&quot;;IF(OR([.U77]=&quot;UNKNOWN&quot;;[.U7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8]=&quot;&quot;;IF(AND([.L78]=&quot;&quot;;[.N78]=&quot;&quot;);&quot;UNKNOWN&quot;;&quot;CONTRADICTION&quot;);IF([.M78]=&quot;UNMATCHED&quot;;IF(AND([.L78]=&quot;&quot;;[.N78]=&quot;&quot;);&quot;CLEAR&quot;;&quot;CONTRADICTION&quot;);IF([.M78]=&quot;SINGLE_SALE_LINKED&quot;;IF(AND([.L78]&lt;&gt;&quot;&quot;;[.N78]=&quot;&quot;);&quot;CLEAR&quot;;&quot;CONTRADICTION&quot;);IF([.M78]=&quot;MULTI_SALE_PENDING_ALLOCATION&quot;;IF([.L78]=&quot;&quot;;&quot;CLEAR&quot;;&quot;CONTRADICTION&quot;);IF([.M78]=&quot;ALLOCATED&quot;;IF(AND([.L78]=&quot;&quot;;[.N78]&lt;&gt;&quot;&quot;);&quot;CLEAR&quot;;&quot;CONTRADICTION&quot;);&quot;CONTRADICTION&quot;)))))">
            <text:p>UNKNOWN</text:p>
          </table:table-cell>
          <table:table-cell office:value-type="string" table:formula="of:=IF([.S78]=&quot;UNKNOWN&quot;;&quot;NO ACTION — linkage status is UNKNOWN / not asserted&quot;;IF([.S78]=&quot;CLEAR&quot;;&quot;NO CONTRADICTION — preserve evidence as entered&quot;;IF([.M78]=&quot;&quot;;&quot;REVIEW LINKAGE STATUS — identifiers are present while status is UNKNOWN&quot;;IF([.M78]=&quot;UNMATCHED&quot;;&quot;REMOVE LINKAGE IDENTIFIERS OR CORRECT LINKAGE STATUS&quot;;IF([.M78]=&quot;SINGLE_SALE_LINKED&quot;;&quot;REQUIRE LINKED SALE ID AND NO ALLOCATION GROUP ID&quot;;IF([.M78]=&quot;MULTI_SALE_PENDING_ALLOCATION&quot;;&quot;REMOVE LINKED SALE ID OR CORRECT LINKAGE STATUS&quot;;IF([.M78]=&quot;ALLOCATED&quot;;&quot;REQUIRE ALLOCATION GROUP ID AND NO LINKED SALE ID&quot;;&quot;REVIEW LINKAGE EVIDENCE — NO AUTHORITY CREATED&quot;)))))))">
            <text:p>NO ACTION — linkage status is UNKNOWN / not asserted</text:p>
          </table:table-cell>
          <table:table-cell office:value-type="string" table:formula="of:=IF([.S78]=&quot;CONTRADICTION&quot;;&quot;BLOCKED&quot;;IF([.S78]=&quot;UNKNOWN&quot;;&quot;UNKNOWN&quot;;IF([.S78]=&quot;CLEAR&quot;;IF(OR([.O78]=&quot;&quot;;[.P78]=&quot;&quot;);&quot;UNKNOWN&quot;;&quot;READY FOR REVIEW&quot;);&quot;BLOCKED&quot;)))">
            <text:p>UNKNOWN</text:p>
          </table:table-cell>
          <table:table-cell office:value-type="string" table:formula="of:=IF([.U78]=&quot;UNKNOWN&quot;;&quot;COMPLETE OR ASSERT REQUIRED EVIDENCE BEFORE REVIEW&quot;;IF([.U78]=&quot;BLOCKED&quot;;&quot;RESOLVE CONTRADICTION BEFORE REVIEW — NO AUTHORITY CREATED&quot;;IF([.U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8]=&quot;READY FOR REVIEW&quot;;&quot;REVIEW ELIGIBLE — NO AUTHORITY&quot;;IF(OR([.U78]=&quot;UNKNOWN&quot;;[.U7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9]=&quot;&quot;;IF(AND([.L79]=&quot;&quot;;[.N79]=&quot;&quot;);&quot;UNKNOWN&quot;;&quot;CONTRADICTION&quot;);IF([.M79]=&quot;UNMATCHED&quot;;IF(AND([.L79]=&quot;&quot;;[.N79]=&quot;&quot;);&quot;CLEAR&quot;;&quot;CONTRADICTION&quot;);IF([.M79]=&quot;SINGLE_SALE_LINKED&quot;;IF(AND([.L79]&lt;&gt;&quot;&quot;;[.N79]=&quot;&quot;);&quot;CLEAR&quot;;&quot;CONTRADICTION&quot;);IF([.M79]=&quot;MULTI_SALE_PENDING_ALLOCATION&quot;;IF([.L79]=&quot;&quot;;&quot;CLEAR&quot;;&quot;CONTRADICTION&quot;);IF([.M79]=&quot;ALLOCATED&quot;;IF(AND([.L79]=&quot;&quot;;[.N79]&lt;&gt;&quot;&quot;);&quot;CLEAR&quot;;&quot;CONTRADICTION&quot;);&quot;CONTRADICTION&quot;)))))">
            <text:p>UNKNOWN</text:p>
          </table:table-cell>
          <table:table-cell office:value-type="string" table:formula="of:=IF([.S79]=&quot;UNKNOWN&quot;;&quot;NO ACTION — linkage status is UNKNOWN / not asserted&quot;;IF([.S79]=&quot;CLEAR&quot;;&quot;NO CONTRADICTION — preserve evidence as entered&quot;;IF([.M79]=&quot;&quot;;&quot;REVIEW LINKAGE STATUS — identifiers are present while status is UNKNOWN&quot;;IF([.M79]=&quot;UNMATCHED&quot;;&quot;REMOVE LINKAGE IDENTIFIERS OR CORRECT LINKAGE STATUS&quot;;IF([.M79]=&quot;SINGLE_SALE_LINKED&quot;;&quot;REQUIRE LINKED SALE ID AND NO ALLOCATION GROUP ID&quot;;IF([.M79]=&quot;MULTI_SALE_PENDING_ALLOCATION&quot;;&quot;REMOVE LINKED SALE ID OR CORRECT LINKAGE STATUS&quot;;IF([.M79]=&quot;ALLOCATED&quot;;&quot;REQUIRE ALLOCATION GROUP ID AND NO LINKED SALE ID&quot;;&quot;REVIEW LINKAGE EVIDENCE — NO AUTHORITY CREATED&quot;)))))))">
            <text:p>NO ACTION — linkage status is UNKNOWN / not asserted</text:p>
          </table:table-cell>
          <table:table-cell office:value-type="string" table:formula="of:=IF([.S79]=&quot;CONTRADICTION&quot;;&quot;BLOCKED&quot;;IF([.S79]=&quot;UNKNOWN&quot;;&quot;UNKNOWN&quot;;IF([.S79]=&quot;CLEAR&quot;;IF(OR([.O79]=&quot;&quot;;[.P79]=&quot;&quot;);&quot;UNKNOWN&quot;;&quot;READY FOR REVIEW&quot;);&quot;BLOCKED&quot;)))">
            <text:p>UNKNOWN</text:p>
          </table:table-cell>
          <table:table-cell office:value-type="string" table:formula="of:=IF([.U79]=&quot;UNKNOWN&quot;;&quot;COMPLETE OR ASSERT REQUIRED EVIDENCE BEFORE REVIEW&quot;;IF([.U79]=&quot;BLOCKED&quot;;&quot;RESOLVE CONTRADICTION BEFORE REVIEW — NO AUTHORITY CREATED&quot;;IF([.U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9]=&quot;READY FOR REVIEW&quot;;&quot;REVIEW ELIGIBLE — NO AUTHORITY&quot;;IF(OR([.U79]=&quot;UNKNOWN&quot;;[.U7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0]=&quot;&quot;;IF(AND([.L80]=&quot;&quot;;[.N80]=&quot;&quot;);&quot;UNKNOWN&quot;;&quot;CONTRADICTION&quot;);IF([.M80]=&quot;UNMATCHED&quot;;IF(AND([.L80]=&quot;&quot;;[.N80]=&quot;&quot;);&quot;CLEAR&quot;;&quot;CONTRADICTION&quot;);IF([.M80]=&quot;SINGLE_SALE_LINKED&quot;;IF(AND([.L80]&lt;&gt;&quot;&quot;;[.N80]=&quot;&quot;);&quot;CLEAR&quot;;&quot;CONTRADICTION&quot;);IF([.M80]=&quot;MULTI_SALE_PENDING_ALLOCATION&quot;;IF([.L80]=&quot;&quot;;&quot;CLEAR&quot;;&quot;CONTRADICTION&quot;);IF([.M80]=&quot;ALLOCATED&quot;;IF(AND([.L80]=&quot;&quot;;[.N80]&lt;&gt;&quot;&quot;);&quot;CLEAR&quot;;&quot;CONTRADICTION&quot;);&quot;CONTRADICTION&quot;)))))">
            <text:p>UNKNOWN</text:p>
          </table:table-cell>
          <table:table-cell office:value-type="string" table:formula="of:=IF([.S80]=&quot;UNKNOWN&quot;;&quot;NO ACTION — linkage status is UNKNOWN / not asserted&quot;;IF([.S80]=&quot;CLEAR&quot;;&quot;NO CONTRADICTION — preserve evidence as entered&quot;;IF([.M80]=&quot;&quot;;&quot;REVIEW LINKAGE STATUS — identifiers are present while status is UNKNOWN&quot;;IF([.M80]=&quot;UNMATCHED&quot;;&quot;REMOVE LINKAGE IDENTIFIERS OR CORRECT LINKAGE STATUS&quot;;IF([.M80]=&quot;SINGLE_SALE_LINKED&quot;;&quot;REQUIRE LINKED SALE ID AND NO ALLOCATION GROUP ID&quot;;IF([.M80]=&quot;MULTI_SALE_PENDING_ALLOCATION&quot;;&quot;REMOVE LINKED SALE ID OR CORRECT LINKAGE STATUS&quot;;IF([.M80]=&quot;ALLOCATED&quot;;&quot;REQUIRE ALLOCATION GROUP ID AND NO LINKED SALE ID&quot;;&quot;REVIEW LINKAGE EVIDENCE — NO AUTHORITY CREATED&quot;)))))))">
            <text:p>NO ACTION — linkage status is UNKNOWN / not asserted</text:p>
          </table:table-cell>
          <table:table-cell office:value-type="string" table:formula="of:=IF([.S80]=&quot;CONTRADICTION&quot;;&quot;BLOCKED&quot;;IF([.S80]=&quot;UNKNOWN&quot;;&quot;UNKNOWN&quot;;IF([.S80]=&quot;CLEAR&quot;;IF(OR([.O80]=&quot;&quot;;[.P80]=&quot;&quot;);&quot;UNKNOWN&quot;;&quot;READY FOR REVIEW&quot;);&quot;BLOCKED&quot;)))">
            <text:p>UNKNOWN</text:p>
          </table:table-cell>
          <table:table-cell office:value-type="string" table:formula="of:=IF([.U80]=&quot;UNKNOWN&quot;;&quot;COMPLETE OR ASSERT REQUIRED EVIDENCE BEFORE REVIEW&quot;;IF([.U80]=&quot;BLOCKED&quot;;&quot;RESOLVE CONTRADICTION BEFORE REVIEW — NO AUTHORITY CREATED&quot;;IF([.U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0]=&quot;READY FOR REVIEW&quot;;&quot;REVIEW ELIGIBLE — NO AUTHORITY&quot;;IF(OR([.U80]=&quot;UNKNOWN&quot;;[.U8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1]=&quot;&quot;;IF(AND([.L81]=&quot;&quot;;[.N81]=&quot;&quot;);&quot;UNKNOWN&quot;;&quot;CONTRADICTION&quot;);IF([.M81]=&quot;UNMATCHED&quot;;IF(AND([.L81]=&quot;&quot;;[.N81]=&quot;&quot;);&quot;CLEAR&quot;;&quot;CONTRADICTION&quot;);IF([.M81]=&quot;SINGLE_SALE_LINKED&quot;;IF(AND([.L81]&lt;&gt;&quot;&quot;;[.N81]=&quot;&quot;);&quot;CLEAR&quot;;&quot;CONTRADICTION&quot;);IF([.M81]=&quot;MULTI_SALE_PENDING_ALLOCATION&quot;;IF([.L81]=&quot;&quot;;&quot;CLEAR&quot;;&quot;CONTRADICTION&quot;);IF([.M81]=&quot;ALLOCATED&quot;;IF(AND([.L81]=&quot;&quot;;[.N81]&lt;&gt;&quot;&quot;);&quot;CLEAR&quot;;&quot;CONTRADICTION&quot;);&quot;CONTRADICTION&quot;)))))">
            <text:p>UNKNOWN</text:p>
          </table:table-cell>
          <table:table-cell office:value-type="string" table:formula="of:=IF([.S81]=&quot;UNKNOWN&quot;;&quot;NO ACTION — linkage status is UNKNOWN / not asserted&quot;;IF([.S81]=&quot;CLEAR&quot;;&quot;NO CONTRADICTION — preserve evidence as entered&quot;;IF([.M81]=&quot;&quot;;&quot;REVIEW LINKAGE STATUS — identifiers are present while status is UNKNOWN&quot;;IF([.M81]=&quot;UNMATCHED&quot;;&quot;REMOVE LINKAGE IDENTIFIERS OR CORRECT LINKAGE STATUS&quot;;IF([.M81]=&quot;SINGLE_SALE_LINKED&quot;;&quot;REQUIRE LINKED SALE ID AND NO ALLOCATION GROUP ID&quot;;IF([.M81]=&quot;MULTI_SALE_PENDING_ALLOCATION&quot;;&quot;REMOVE LINKED SALE ID OR CORRECT LINKAGE STATUS&quot;;IF([.M81]=&quot;ALLOCATED&quot;;&quot;REQUIRE ALLOCATION GROUP ID AND NO LINKED SALE ID&quot;;&quot;REVIEW LINKAGE EVIDENCE — NO AUTHORITY CREATED&quot;)))))))">
            <text:p>NO ACTION — linkage status is UNKNOWN / not asserted</text:p>
          </table:table-cell>
          <table:table-cell office:value-type="string" table:formula="of:=IF([.S81]=&quot;CONTRADICTION&quot;;&quot;BLOCKED&quot;;IF([.S81]=&quot;UNKNOWN&quot;;&quot;UNKNOWN&quot;;IF([.S81]=&quot;CLEAR&quot;;IF(OR([.O81]=&quot;&quot;;[.P81]=&quot;&quot;);&quot;UNKNOWN&quot;;&quot;READY FOR REVIEW&quot;);&quot;BLOCKED&quot;)))">
            <text:p>UNKNOWN</text:p>
          </table:table-cell>
          <table:table-cell office:value-type="string" table:formula="of:=IF([.U81]=&quot;UNKNOWN&quot;;&quot;COMPLETE OR ASSERT REQUIRED EVIDENCE BEFORE REVIEW&quot;;IF([.U81]=&quot;BLOCKED&quot;;&quot;RESOLVE CONTRADICTION BEFORE REVIEW — NO AUTHORITY CREATED&quot;;IF([.U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1]=&quot;READY FOR REVIEW&quot;;&quot;REVIEW ELIGIBLE — NO AUTHORITY&quot;;IF(OR([.U81]=&quot;UNKNOWN&quot;;[.U8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2]=&quot;&quot;;IF(AND([.L82]=&quot;&quot;;[.N82]=&quot;&quot;);&quot;UNKNOWN&quot;;&quot;CONTRADICTION&quot;);IF([.M82]=&quot;UNMATCHED&quot;;IF(AND([.L82]=&quot;&quot;;[.N82]=&quot;&quot;);&quot;CLEAR&quot;;&quot;CONTRADICTION&quot;);IF([.M82]=&quot;SINGLE_SALE_LINKED&quot;;IF(AND([.L82]&lt;&gt;&quot;&quot;;[.N82]=&quot;&quot;);&quot;CLEAR&quot;;&quot;CONTRADICTION&quot;);IF([.M82]=&quot;MULTI_SALE_PENDING_ALLOCATION&quot;;IF([.L82]=&quot;&quot;;&quot;CLEAR&quot;;&quot;CONTRADICTION&quot;);IF([.M82]=&quot;ALLOCATED&quot;;IF(AND([.L82]=&quot;&quot;;[.N82]&lt;&gt;&quot;&quot;);&quot;CLEAR&quot;;&quot;CONTRADICTION&quot;);&quot;CONTRADICTION&quot;)))))">
            <text:p>UNKNOWN</text:p>
          </table:table-cell>
          <table:table-cell office:value-type="string" table:formula="of:=IF([.S82]=&quot;UNKNOWN&quot;;&quot;NO ACTION — linkage status is UNKNOWN / not asserted&quot;;IF([.S82]=&quot;CLEAR&quot;;&quot;NO CONTRADICTION — preserve evidence as entered&quot;;IF([.M82]=&quot;&quot;;&quot;REVIEW LINKAGE STATUS — identifiers are present while status is UNKNOWN&quot;;IF([.M82]=&quot;UNMATCHED&quot;;&quot;REMOVE LINKAGE IDENTIFIERS OR CORRECT LINKAGE STATUS&quot;;IF([.M82]=&quot;SINGLE_SALE_LINKED&quot;;&quot;REQUIRE LINKED SALE ID AND NO ALLOCATION GROUP ID&quot;;IF([.M82]=&quot;MULTI_SALE_PENDING_ALLOCATION&quot;;&quot;REMOVE LINKED SALE ID OR CORRECT LINKAGE STATUS&quot;;IF([.M82]=&quot;ALLOCATED&quot;;&quot;REQUIRE ALLOCATION GROUP ID AND NO LINKED SALE ID&quot;;&quot;REVIEW LINKAGE EVIDENCE — NO AUTHORITY CREATED&quot;)))))))">
            <text:p>NO ACTION — linkage status is UNKNOWN / not asserted</text:p>
          </table:table-cell>
          <table:table-cell office:value-type="string" table:formula="of:=IF([.S82]=&quot;CONTRADICTION&quot;;&quot;BLOCKED&quot;;IF([.S82]=&quot;UNKNOWN&quot;;&quot;UNKNOWN&quot;;IF([.S82]=&quot;CLEAR&quot;;IF(OR([.O82]=&quot;&quot;;[.P82]=&quot;&quot;);&quot;UNKNOWN&quot;;&quot;READY FOR REVIEW&quot;);&quot;BLOCKED&quot;)))">
            <text:p>UNKNOWN</text:p>
          </table:table-cell>
          <table:table-cell office:value-type="string" table:formula="of:=IF([.U82]=&quot;UNKNOWN&quot;;&quot;COMPLETE OR ASSERT REQUIRED EVIDENCE BEFORE REVIEW&quot;;IF([.U82]=&quot;BLOCKED&quot;;&quot;RESOLVE CONTRADICTION BEFORE REVIEW — NO AUTHORITY CREATED&quot;;IF([.U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2]=&quot;READY FOR REVIEW&quot;;&quot;REVIEW ELIGIBLE — NO AUTHORITY&quot;;IF(OR([.U82]=&quot;UNKNOWN&quot;;[.U8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3]=&quot;&quot;;IF(AND([.L83]=&quot;&quot;;[.N83]=&quot;&quot;);&quot;UNKNOWN&quot;;&quot;CONTRADICTION&quot;);IF([.M83]=&quot;UNMATCHED&quot;;IF(AND([.L83]=&quot;&quot;;[.N83]=&quot;&quot;);&quot;CLEAR&quot;;&quot;CONTRADICTION&quot;);IF([.M83]=&quot;SINGLE_SALE_LINKED&quot;;IF(AND([.L83]&lt;&gt;&quot;&quot;;[.N83]=&quot;&quot;);&quot;CLEAR&quot;;&quot;CONTRADICTION&quot;);IF([.M83]=&quot;MULTI_SALE_PENDING_ALLOCATION&quot;;IF([.L83]=&quot;&quot;;&quot;CLEAR&quot;;&quot;CONTRADICTION&quot;);IF([.M83]=&quot;ALLOCATED&quot;;IF(AND([.L83]=&quot;&quot;;[.N83]&lt;&gt;&quot;&quot;);&quot;CLEAR&quot;;&quot;CONTRADICTION&quot;);&quot;CONTRADICTION&quot;)))))">
            <text:p>UNKNOWN</text:p>
          </table:table-cell>
          <table:table-cell office:value-type="string" table:formula="of:=IF([.S83]=&quot;UNKNOWN&quot;;&quot;NO ACTION — linkage status is UNKNOWN / not asserted&quot;;IF([.S83]=&quot;CLEAR&quot;;&quot;NO CONTRADICTION — preserve evidence as entered&quot;;IF([.M83]=&quot;&quot;;&quot;REVIEW LINKAGE STATUS — identifiers are present while status is UNKNOWN&quot;;IF([.M83]=&quot;UNMATCHED&quot;;&quot;REMOVE LINKAGE IDENTIFIERS OR CORRECT LINKAGE STATUS&quot;;IF([.M83]=&quot;SINGLE_SALE_LINKED&quot;;&quot;REQUIRE LINKED SALE ID AND NO ALLOCATION GROUP ID&quot;;IF([.M83]=&quot;MULTI_SALE_PENDING_ALLOCATION&quot;;&quot;REMOVE LINKED SALE ID OR CORRECT LINKAGE STATUS&quot;;IF([.M83]=&quot;ALLOCATED&quot;;&quot;REQUIRE ALLOCATION GROUP ID AND NO LINKED SALE ID&quot;;&quot;REVIEW LINKAGE EVIDENCE — NO AUTHORITY CREATED&quot;)))))))">
            <text:p>NO ACTION — linkage status is UNKNOWN / not asserted</text:p>
          </table:table-cell>
          <table:table-cell office:value-type="string" table:formula="of:=IF([.S83]=&quot;CONTRADICTION&quot;;&quot;BLOCKED&quot;;IF([.S83]=&quot;UNKNOWN&quot;;&quot;UNKNOWN&quot;;IF([.S83]=&quot;CLEAR&quot;;IF(OR([.O83]=&quot;&quot;;[.P83]=&quot;&quot;);&quot;UNKNOWN&quot;;&quot;READY FOR REVIEW&quot;);&quot;BLOCKED&quot;)))">
            <text:p>UNKNOWN</text:p>
          </table:table-cell>
          <table:table-cell office:value-type="string" table:formula="of:=IF([.U83]=&quot;UNKNOWN&quot;;&quot;COMPLETE OR ASSERT REQUIRED EVIDENCE BEFORE REVIEW&quot;;IF([.U83]=&quot;BLOCKED&quot;;&quot;RESOLVE CONTRADICTION BEFORE REVIEW — NO AUTHORITY CREATED&quot;;IF([.U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3]=&quot;READY FOR REVIEW&quot;;&quot;REVIEW ELIGIBLE — NO AUTHORITY&quot;;IF(OR([.U83]=&quot;UNKNOWN&quot;;[.U8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4]=&quot;&quot;;IF(AND([.L84]=&quot;&quot;;[.N84]=&quot;&quot;);&quot;UNKNOWN&quot;;&quot;CONTRADICTION&quot;);IF([.M84]=&quot;UNMATCHED&quot;;IF(AND([.L84]=&quot;&quot;;[.N84]=&quot;&quot;);&quot;CLEAR&quot;;&quot;CONTRADICTION&quot;);IF([.M84]=&quot;SINGLE_SALE_LINKED&quot;;IF(AND([.L84]&lt;&gt;&quot;&quot;;[.N84]=&quot;&quot;);&quot;CLEAR&quot;;&quot;CONTRADICTION&quot;);IF([.M84]=&quot;MULTI_SALE_PENDING_ALLOCATION&quot;;IF([.L84]=&quot;&quot;;&quot;CLEAR&quot;;&quot;CONTRADICTION&quot;);IF([.M84]=&quot;ALLOCATED&quot;;IF(AND([.L84]=&quot;&quot;;[.N84]&lt;&gt;&quot;&quot;);&quot;CLEAR&quot;;&quot;CONTRADICTION&quot;);&quot;CONTRADICTION&quot;)))))">
            <text:p>UNKNOWN</text:p>
          </table:table-cell>
          <table:table-cell office:value-type="string" table:formula="of:=IF([.S84]=&quot;UNKNOWN&quot;;&quot;NO ACTION — linkage status is UNKNOWN / not asserted&quot;;IF([.S84]=&quot;CLEAR&quot;;&quot;NO CONTRADICTION — preserve evidence as entered&quot;;IF([.M84]=&quot;&quot;;&quot;REVIEW LINKAGE STATUS — identifiers are present while status is UNKNOWN&quot;;IF([.M84]=&quot;UNMATCHED&quot;;&quot;REMOVE LINKAGE IDENTIFIERS OR CORRECT LINKAGE STATUS&quot;;IF([.M84]=&quot;SINGLE_SALE_LINKED&quot;;&quot;REQUIRE LINKED SALE ID AND NO ALLOCATION GROUP ID&quot;;IF([.M84]=&quot;MULTI_SALE_PENDING_ALLOCATION&quot;;&quot;REMOVE LINKED SALE ID OR CORRECT LINKAGE STATUS&quot;;IF([.M84]=&quot;ALLOCATED&quot;;&quot;REQUIRE ALLOCATION GROUP ID AND NO LINKED SALE ID&quot;;&quot;REVIEW LINKAGE EVIDENCE — NO AUTHORITY CREATED&quot;)))))))">
            <text:p>NO ACTION — linkage status is UNKNOWN / not asserted</text:p>
          </table:table-cell>
          <table:table-cell office:value-type="string" table:formula="of:=IF([.S84]=&quot;CONTRADICTION&quot;;&quot;BLOCKED&quot;;IF([.S84]=&quot;UNKNOWN&quot;;&quot;UNKNOWN&quot;;IF([.S84]=&quot;CLEAR&quot;;IF(OR([.O84]=&quot;&quot;;[.P84]=&quot;&quot;);&quot;UNKNOWN&quot;;&quot;READY FOR REVIEW&quot;);&quot;BLOCKED&quot;)))">
            <text:p>UNKNOWN</text:p>
          </table:table-cell>
          <table:table-cell office:value-type="string" table:formula="of:=IF([.U84]=&quot;UNKNOWN&quot;;&quot;COMPLETE OR ASSERT REQUIRED EVIDENCE BEFORE REVIEW&quot;;IF([.U84]=&quot;BLOCKED&quot;;&quot;RESOLVE CONTRADICTION BEFORE REVIEW — NO AUTHORITY CREATED&quot;;IF([.U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4]=&quot;READY FOR REVIEW&quot;;&quot;REVIEW ELIGIBLE — NO AUTHORITY&quot;;IF(OR([.U84]=&quot;UNKNOWN&quot;;[.U8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5]=&quot;&quot;;IF(AND([.L85]=&quot;&quot;;[.N85]=&quot;&quot;);&quot;UNKNOWN&quot;;&quot;CONTRADICTION&quot;);IF([.M85]=&quot;UNMATCHED&quot;;IF(AND([.L85]=&quot;&quot;;[.N85]=&quot;&quot;);&quot;CLEAR&quot;;&quot;CONTRADICTION&quot;);IF([.M85]=&quot;SINGLE_SALE_LINKED&quot;;IF(AND([.L85]&lt;&gt;&quot;&quot;;[.N85]=&quot;&quot;);&quot;CLEAR&quot;;&quot;CONTRADICTION&quot;);IF([.M85]=&quot;MULTI_SALE_PENDING_ALLOCATION&quot;;IF([.L85]=&quot;&quot;;&quot;CLEAR&quot;;&quot;CONTRADICTION&quot;);IF([.M85]=&quot;ALLOCATED&quot;;IF(AND([.L85]=&quot;&quot;;[.N85]&lt;&gt;&quot;&quot;);&quot;CLEAR&quot;;&quot;CONTRADICTION&quot;);&quot;CONTRADICTION&quot;)))))">
            <text:p>UNKNOWN</text:p>
          </table:table-cell>
          <table:table-cell office:value-type="string" table:formula="of:=IF([.S85]=&quot;UNKNOWN&quot;;&quot;NO ACTION — linkage status is UNKNOWN / not asserted&quot;;IF([.S85]=&quot;CLEAR&quot;;&quot;NO CONTRADICTION — preserve evidence as entered&quot;;IF([.M85]=&quot;&quot;;&quot;REVIEW LINKAGE STATUS — identifiers are present while status is UNKNOWN&quot;;IF([.M85]=&quot;UNMATCHED&quot;;&quot;REMOVE LINKAGE IDENTIFIERS OR CORRECT LINKAGE STATUS&quot;;IF([.M85]=&quot;SINGLE_SALE_LINKED&quot;;&quot;REQUIRE LINKED SALE ID AND NO ALLOCATION GROUP ID&quot;;IF([.M85]=&quot;MULTI_SALE_PENDING_ALLOCATION&quot;;&quot;REMOVE LINKED SALE ID OR CORRECT LINKAGE STATUS&quot;;IF([.M85]=&quot;ALLOCATED&quot;;&quot;REQUIRE ALLOCATION GROUP ID AND NO LINKED SALE ID&quot;;&quot;REVIEW LINKAGE EVIDENCE — NO AUTHORITY CREATED&quot;)))))))">
            <text:p>NO ACTION — linkage status is UNKNOWN / not asserted</text:p>
          </table:table-cell>
          <table:table-cell office:value-type="string" table:formula="of:=IF([.S85]=&quot;CONTRADICTION&quot;;&quot;BLOCKED&quot;;IF([.S85]=&quot;UNKNOWN&quot;;&quot;UNKNOWN&quot;;IF([.S85]=&quot;CLEAR&quot;;IF(OR([.O85]=&quot;&quot;;[.P85]=&quot;&quot;);&quot;UNKNOWN&quot;;&quot;READY FOR REVIEW&quot;);&quot;BLOCKED&quot;)))">
            <text:p>UNKNOWN</text:p>
          </table:table-cell>
          <table:table-cell office:value-type="string" table:formula="of:=IF([.U85]=&quot;UNKNOWN&quot;;&quot;COMPLETE OR ASSERT REQUIRED EVIDENCE BEFORE REVIEW&quot;;IF([.U85]=&quot;BLOCKED&quot;;&quot;RESOLVE CONTRADICTION BEFORE REVIEW — NO AUTHORITY CREATED&quot;;IF([.U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5]=&quot;READY FOR REVIEW&quot;;&quot;REVIEW ELIGIBLE — NO AUTHORITY&quot;;IF(OR([.U85]=&quot;UNKNOWN&quot;;[.U8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6]=&quot;&quot;;IF(AND([.L86]=&quot;&quot;;[.N86]=&quot;&quot;);&quot;UNKNOWN&quot;;&quot;CONTRADICTION&quot;);IF([.M86]=&quot;UNMATCHED&quot;;IF(AND([.L86]=&quot;&quot;;[.N86]=&quot;&quot;);&quot;CLEAR&quot;;&quot;CONTRADICTION&quot;);IF([.M86]=&quot;SINGLE_SALE_LINKED&quot;;IF(AND([.L86]&lt;&gt;&quot;&quot;;[.N86]=&quot;&quot;);&quot;CLEAR&quot;;&quot;CONTRADICTION&quot;);IF([.M86]=&quot;MULTI_SALE_PENDING_ALLOCATION&quot;;IF([.L86]=&quot;&quot;;&quot;CLEAR&quot;;&quot;CONTRADICTION&quot;);IF([.M86]=&quot;ALLOCATED&quot;;IF(AND([.L86]=&quot;&quot;;[.N86]&lt;&gt;&quot;&quot;);&quot;CLEAR&quot;;&quot;CONTRADICTION&quot;);&quot;CONTRADICTION&quot;)))))">
            <text:p>UNKNOWN</text:p>
          </table:table-cell>
          <table:table-cell office:value-type="string" table:formula="of:=IF([.S86]=&quot;UNKNOWN&quot;;&quot;NO ACTION — linkage status is UNKNOWN / not asserted&quot;;IF([.S86]=&quot;CLEAR&quot;;&quot;NO CONTRADICTION — preserve evidence as entered&quot;;IF([.M86]=&quot;&quot;;&quot;REVIEW LINKAGE STATUS — identifiers are present while status is UNKNOWN&quot;;IF([.M86]=&quot;UNMATCHED&quot;;&quot;REMOVE LINKAGE IDENTIFIERS OR CORRECT LINKAGE STATUS&quot;;IF([.M86]=&quot;SINGLE_SALE_LINKED&quot;;&quot;REQUIRE LINKED SALE ID AND NO ALLOCATION GROUP ID&quot;;IF([.M86]=&quot;MULTI_SALE_PENDING_ALLOCATION&quot;;&quot;REMOVE LINKED SALE ID OR CORRECT LINKAGE STATUS&quot;;IF([.M86]=&quot;ALLOCATED&quot;;&quot;REQUIRE ALLOCATION GROUP ID AND NO LINKED SALE ID&quot;;&quot;REVIEW LINKAGE EVIDENCE — NO AUTHORITY CREATED&quot;)))))))">
            <text:p>NO ACTION — linkage status is UNKNOWN / not asserted</text:p>
          </table:table-cell>
          <table:table-cell office:value-type="string" table:formula="of:=IF([.S86]=&quot;CONTRADICTION&quot;;&quot;BLOCKED&quot;;IF([.S86]=&quot;UNKNOWN&quot;;&quot;UNKNOWN&quot;;IF([.S86]=&quot;CLEAR&quot;;IF(OR([.O86]=&quot;&quot;;[.P86]=&quot;&quot;);&quot;UNKNOWN&quot;;&quot;READY FOR REVIEW&quot;);&quot;BLOCKED&quot;)))">
            <text:p>UNKNOWN</text:p>
          </table:table-cell>
          <table:table-cell office:value-type="string" table:formula="of:=IF([.U86]=&quot;UNKNOWN&quot;;&quot;COMPLETE OR ASSERT REQUIRED EVIDENCE BEFORE REVIEW&quot;;IF([.U86]=&quot;BLOCKED&quot;;&quot;RESOLVE CONTRADICTION BEFORE REVIEW — NO AUTHORITY CREATED&quot;;IF([.U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6]=&quot;READY FOR REVIEW&quot;;&quot;REVIEW ELIGIBLE — NO AUTHORITY&quot;;IF(OR([.U86]=&quot;UNKNOWN&quot;;[.U8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7]=&quot;&quot;;IF(AND([.L87]=&quot;&quot;;[.N87]=&quot;&quot;);&quot;UNKNOWN&quot;;&quot;CONTRADICTION&quot;);IF([.M87]=&quot;UNMATCHED&quot;;IF(AND([.L87]=&quot;&quot;;[.N87]=&quot;&quot;);&quot;CLEAR&quot;;&quot;CONTRADICTION&quot;);IF([.M87]=&quot;SINGLE_SALE_LINKED&quot;;IF(AND([.L87]&lt;&gt;&quot;&quot;;[.N87]=&quot;&quot;);&quot;CLEAR&quot;;&quot;CONTRADICTION&quot;);IF([.M87]=&quot;MULTI_SALE_PENDING_ALLOCATION&quot;;IF([.L87]=&quot;&quot;;&quot;CLEAR&quot;;&quot;CONTRADICTION&quot;);IF([.M87]=&quot;ALLOCATED&quot;;IF(AND([.L87]=&quot;&quot;;[.N87]&lt;&gt;&quot;&quot;);&quot;CLEAR&quot;;&quot;CONTRADICTION&quot;);&quot;CONTRADICTION&quot;)))))">
            <text:p>UNKNOWN</text:p>
          </table:table-cell>
          <table:table-cell office:value-type="string" table:formula="of:=IF([.S87]=&quot;UNKNOWN&quot;;&quot;NO ACTION — linkage status is UNKNOWN / not asserted&quot;;IF([.S87]=&quot;CLEAR&quot;;&quot;NO CONTRADICTION — preserve evidence as entered&quot;;IF([.M87]=&quot;&quot;;&quot;REVIEW LINKAGE STATUS — identifiers are present while status is UNKNOWN&quot;;IF([.M87]=&quot;UNMATCHED&quot;;&quot;REMOVE LINKAGE IDENTIFIERS OR CORRECT LINKAGE STATUS&quot;;IF([.M87]=&quot;SINGLE_SALE_LINKED&quot;;&quot;REQUIRE LINKED SALE ID AND NO ALLOCATION GROUP ID&quot;;IF([.M87]=&quot;MULTI_SALE_PENDING_ALLOCATION&quot;;&quot;REMOVE LINKED SALE ID OR CORRECT LINKAGE STATUS&quot;;IF([.M87]=&quot;ALLOCATED&quot;;&quot;REQUIRE ALLOCATION GROUP ID AND NO LINKED SALE ID&quot;;&quot;REVIEW LINKAGE EVIDENCE — NO AUTHORITY CREATED&quot;)))))))">
            <text:p>NO ACTION — linkage status is UNKNOWN / not asserted</text:p>
          </table:table-cell>
          <table:table-cell office:value-type="string" table:formula="of:=IF([.S87]=&quot;CONTRADICTION&quot;;&quot;BLOCKED&quot;;IF([.S87]=&quot;UNKNOWN&quot;;&quot;UNKNOWN&quot;;IF([.S87]=&quot;CLEAR&quot;;IF(OR([.O87]=&quot;&quot;;[.P87]=&quot;&quot;);&quot;UNKNOWN&quot;;&quot;READY FOR REVIEW&quot;);&quot;BLOCKED&quot;)))">
            <text:p>UNKNOWN</text:p>
          </table:table-cell>
          <table:table-cell office:value-type="string" table:formula="of:=IF([.U87]=&quot;UNKNOWN&quot;;&quot;COMPLETE OR ASSERT REQUIRED EVIDENCE BEFORE REVIEW&quot;;IF([.U87]=&quot;BLOCKED&quot;;&quot;RESOLVE CONTRADICTION BEFORE REVIEW — NO AUTHORITY CREATED&quot;;IF([.U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7]=&quot;READY FOR REVIEW&quot;;&quot;REVIEW ELIGIBLE — NO AUTHORITY&quot;;IF(OR([.U87]=&quot;UNKNOWN&quot;;[.U8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8]=&quot;&quot;;IF(AND([.L88]=&quot;&quot;;[.N88]=&quot;&quot;);&quot;UNKNOWN&quot;;&quot;CONTRADICTION&quot;);IF([.M88]=&quot;UNMATCHED&quot;;IF(AND([.L88]=&quot;&quot;;[.N88]=&quot;&quot;);&quot;CLEAR&quot;;&quot;CONTRADICTION&quot;);IF([.M88]=&quot;SINGLE_SALE_LINKED&quot;;IF(AND([.L88]&lt;&gt;&quot;&quot;;[.N88]=&quot;&quot;);&quot;CLEAR&quot;;&quot;CONTRADICTION&quot;);IF([.M88]=&quot;MULTI_SALE_PENDING_ALLOCATION&quot;;IF([.L88]=&quot;&quot;;&quot;CLEAR&quot;;&quot;CONTRADICTION&quot;);IF([.M88]=&quot;ALLOCATED&quot;;IF(AND([.L88]=&quot;&quot;;[.N88]&lt;&gt;&quot;&quot;);&quot;CLEAR&quot;;&quot;CONTRADICTION&quot;);&quot;CONTRADICTION&quot;)))))">
            <text:p>UNKNOWN</text:p>
          </table:table-cell>
          <table:table-cell office:value-type="string" table:formula="of:=IF([.S88]=&quot;UNKNOWN&quot;;&quot;NO ACTION — linkage status is UNKNOWN / not asserted&quot;;IF([.S88]=&quot;CLEAR&quot;;&quot;NO CONTRADICTION — preserve evidence as entered&quot;;IF([.M88]=&quot;&quot;;&quot;REVIEW LINKAGE STATUS — identifiers are present while status is UNKNOWN&quot;;IF([.M88]=&quot;UNMATCHED&quot;;&quot;REMOVE LINKAGE IDENTIFIERS OR CORRECT LINKAGE STATUS&quot;;IF([.M88]=&quot;SINGLE_SALE_LINKED&quot;;&quot;REQUIRE LINKED SALE ID AND NO ALLOCATION GROUP ID&quot;;IF([.M88]=&quot;MULTI_SALE_PENDING_ALLOCATION&quot;;&quot;REMOVE LINKED SALE ID OR CORRECT LINKAGE STATUS&quot;;IF([.M88]=&quot;ALLOCATED&quot;;&quot;REQUIRE ALLOCATION GROUP ID AND NO LINKED SALE ID&quot;;&quot;REVIEW LINKAGE EVIDENCE — NO AUTHORITY CREATED&quot;)))))))">
            <text:p>NO ACTION — linkage status is UNKNOWN / not asserted</text:p>
          </table:table-cell>
          <table:table-cell office:value-type="string" table:formula="of:=IF([.S88]=&quot;CONTRADICTION&quot;;&quot;BLOCKED&quot;;IF([.S88]=&quot;UNKNOWN&quot;;&quot;UNKNOWN&quot;;IF([.S88]=&quot;CLEAR&quot;;IF(OR([.O88]=&quot;&quot;;[.P88]=&quot;&quot;);&quot;UNKNOWN&quot;;&quot;READY FOR REVIEW&quot;);&quot;BLOCKED&quot;)))">
            <text:p>UNKNOWN</text:p>
          </table:table-cell>
          <table:table-cell office:value-type="string" table:formula="of:=IF([.U88]=&quot;UNKNOWN&quot;;&quot;COMPLETE OR ASSERT REQUIRED EVIDENCE BEFORE REVIEW&quot;;IF([.U88]=&quot;BLOCKED&quot;;&quot;RESOLVE CONTRADICTION BEFORE REVIEW — NO AUTHORITY CREATED&quot;;IF([.U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8]=&quot;READY FOR REVIEW&quot;;&quot;REVIEW ELIGIBLE — NO AUTHORITY&quot;;IF(OR([.U88]=&quot;UNKNOWN&quot;;[.U8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9]=&quot;&quot;;IF(AND([.L89]=&quot;&quot;;[.N89]=&quot;&quot;);&quot;UNKNOWN&quot;;&quot;CONTRADICTION&quot;);IF([.M89]=&quot;UNMATCHED&quot;;IF(AND([.L89]=&quot;&quot;;[.N89]=&quot;&quot;);&quot;CLEAR&quot;;&quot;CONTRADICTION&quot;);IF([.M89]=&quot;SINGLE_SALE_LINKED&quot;;IF(AND([.L89]&lt;&gt;&quot;&quot;;[.N89]=&quot;&quot;);&quot;CLEAR&quot;;&quot;CONTRADICTION&quot;);IF([.M89]=&quot;MULTI_SALE_PENDING_ALLOCATION&quot;;IF([.L89]=&quot;&quot;;&quot;CLEAR&quot;;&quot;CONTRADICTION&quot;);IF([.M89]=&quot;ALLOCATED&quot;;IF(AND([.L89]=&quot;&quot;;[.N89]&lt;&gt;&quot;&quot;);&quot;CLEAR&quot;;&quot;CONTRADICTION&quot;);&quot;CONTRADICTION&quot;)))))">
            <text:p>UNKNOWN</text:p>
          </table:table-cell>
          <table:table-cell office:value-type="string" table:formula="of:=IF([.S89]=&quot;UNKNOWN&quot;;&quot;NO ACTION — linkage status is UNKNOWN / not asserted&quot;;IF([.S89]=&quot;CLEAR&quot;;&quot;NO CONTRADICTION — preserve evidence as entered&quot;;IF([.M89]=&quot;&quot;;&quot;REVIEW LINKAGE STATUS — identifiers are present while status is UNKNOWN&quot;;IF([.M89]=&quot;UNMATCHED&quot;;&quot;REMOVE LINKAGE IDENTIFIERS OR CORRECT LINKAGE STATUS&quot;;IF([.M89]=&quot;SINGLE_SALE_LINKED&quot;;&quot;REQUIRE LINKED SALE ID AND NO ALLOCATION GROUP ID&quot;;IF([.M89]=&quot;MULTI_SALE_PENDING_ALLOCATION&quot;;&quot;REMOVE LINKED SALE ID OR CORRECT LINKAGE STATUS&quot;;IF([.M89]=&quot;ALLOCATED&quot;;&quot;REQUIRE ALLOCATION GROUP ID AND NO LINKED SALE ID&quot;;&quot;REVIEW LINKAGE EVIDENCE — NO AUTHORITY CREATED&quot;)))))))">
            <text:p>NO ACTION — linkage status is UNKNOWN / not asserted</text:p>
          </table:table-cell>
          <table:table-cell office:value-type="string" table:formula="of:=IF([.S89]=&quot;CONTRADICTION&quot;;&quot;BLOCKED&quot;;IF([.S89]=&quot;UNKNOWN&quot;;&quot;UNKNOWN&quot;;IF([.S89]=&quot;CLEAR&quot;;IF(OR([.O89]=&quot;&quot;;[.P89]=&quot;&quot;);&quot;UNKNOWN&quot;;&quot;READY FOR REVIEW&quot;);&quot;BLOCKED&quot;)))">
            <text:p>UNKNOWN</text:p>
          </table:table-cell>
          <table:table-cell office:value-type="string" table:formula="of:=IF([.U89]=&quot;UNKNOWN&quot;;&quot;COMPLETE OR ASSERT REQUIRED EVIDENCE BEFORE REVIEW&quot;;IF([.U89]=&quot;BLOCKED&quot;;&quot;RESOLVE CONTRADICTION BEFORE REVIEW — NO AUTHORITY CREATED&quot;;IF([.U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9]=&quot;READY FOR REVIEW&quot;;&quot;REVIEW ELIGIBLE — NO AUTHORITY&quot;;IF(OR([.U89]=&quot;UNKNOWN&quot;;[.U8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0]=&quot;&quot;;IF(AND([.L90]=&quot;&quot;;[.N90]=&quot;&quot;);&quot;UNKNOWN&quot;;&quot;CONTRADICTION&quot;);IF([.M90]=&quot;UNMATCHED&quot;;IF(AND([.L90]=&quot;&quot;;[.N90]=&quot;&quot;);&quot;CLEAR&quot;;&quot;CONTRADICTION&quot;);IF([.M90]=&quot;SINGLE_SALE_LINKED&quot;;IF(AND([.L90]&lt;&gt;&quot;&quot;;[.N90]=&quot;&quot;);&quot;CLEAR&quot;;&quot;CONTRADICTION&quot;);IF([.M90]=&quot;MULTI_SALE_PENDING_ALLOCATION&quot;;IF([.L90]=&quot;&quot;;&quot;CLEAR&quot;;&quot;CONTRADICTION&quot;);IF([.M90]=&quot;ALLOCATED&quot;;IF(AND([.L90]=&quot;&quot;;[.N90]&lt;&gt;&quot;&quot;);&quot;CLEAR&quot;;&quot;CONTRADICTION&quot;);&quot;CONTRADICTION&quot;)))))">
            <text:p>UNKNOWN</text:p>
          </table:table-cell>
          <table:table-cell office:value-type="string" table:formula="of:=IF([.S90]=&quot;UNKNOWN&quot;;&quot;NO ACTION — linkage status is UNKNOWN / not asserted&quot;;IF([.S90]=&quot;CLEAR&quot;;&quot;NO CONTRADICTION — preserve evidence as entered&quot;;IF([.M90]=&quot;&quot;;&quot;REVIEW LINKAGE STATUS — identifiers are present while status is UNKNOWN&quot;;IF([.M90]=&quot;UNMATCHED&quot;;&quot;REMOVE LINKAGE IDENTIFIERS OR CORRECT LINKAGE STATUS&quot;;IF([.M90]=&quot;SINGLE_SALE_LINKED&quot;;&quot;REQUIRE LINKED SALE ID AND NO ALLOCATION GROUP ID&quot;;IF([.M90]=&quot;MULTI_SALE_PENDING_ALLOCATION&quot;;&quot;REMOVE LINKED SALE ID OR CORRECT LINKAGE STATUS&quot;;IF([.M90]=&quot;ALLOCATED&quot;;&quot;REQUIRE ALLOCATION GROUP ID AND NO LINKED SALE ID&quot;;&quot;REVIEW LINKAGE EVIDENCE — NO AUTHORITY CREATED&quot;)))))))">
            <text:p>NO ACTION — linkage status is UNKNOWN / not asserted</text:p>
          </table:table-cell>
          <table:table-cell office:value-type="string" table:formula="of:=IF([.S90]=&quot;CONTRADICTION&quot;;&quot;BLOCKED&quot;;IF([.S90]=&quot;UNKNOWN&quot;;&quot;UNKNOWN&quot;;IF([.S90]=&quot;CLEAR&quot;;IF(OR([.O90]=&quot;&quot;;[.P90]=&quot;&quot;);&quot;UNKNOWN&quot;;&quot;READY FOR REVIEW&quot;);&quot;BLOCKED&quot;)))">
            <text:p>UNKNOWN</text:p>
          </table:table-cell>
          <table:table-cell office:value-type="string" table:formula="of:=IF([.U90]=&quot;UNKNOWN&quot;;&quot;COMPLETE OR ASSERT REQUIRED EVIDENCE BEFORE REVIEW&quot;;IF([.U90]=&quot;BLOCKED&quot;;&quot;RESOLVE CONTRADICTION BEFORE REVIEW — NO AUTHORITY CREATED&quot;;IF([.U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0]=&quot;READY FOR REVIEW&quot;;&quot;REVIEW ELIGIBLE — NO AUTHORITY&quot;;IF(OR([.U90]=&quot;UNKNOWN&quot;;[.U9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1]=&quot;&quot;;IF(AND([.L91]=&quot;&quot;;[.N91]=&quot;&quot;);&quot;UNKNOWN&quot;;&quot;CONTRADICTION&quot;);IF([.M91]=&quot;UNMATCHED&quot;;IF(AND([.L91]=&quot;&quot;;[.N91]=&quot;&quot;);&quot;CLEAR&quot;;&quot;CONTRADICTION&quot;);IF([.M91]=&quot;SINGLE_SALE_LINKED&quot;;IF(AND([.L91]&lt;&gt;&quot;&quot;;[.N91]=&quot;&quot;);&quot;CLEAR&quot;;&quot;CONTRADICTION&quot;);IF([.M91]=&quot;MULTI_SALE_PENDING_ALLOCATION&quot;;IF([.L91]=&quot;&quot;;&quot;CLEAR&quot;;&quot;CONTRADICTION&quot;);IF([.M91]=&quot;ALLOCATED&quot;;IF(AND([.L91]=&quot;&quot;;[.N91]&lt;&gt;&quot;&quot;);&quot;CLEAR&quot;;&quot;CONTRADICTION&quot;);&quot;CONTRADICTION&quot;)))))">
            <text:p>UNKNOWN</text:p>
          </table:table-cell>
          <table:table-cell office:value-type="string" table:formula="of:=IF([.S91]=&quot;UNKNOWN&quot;;&quot;NO ACTION — linkage status is UNKNOWN / not asserted&quot;;IF([.S91]=&quot;CLEAR&quot;;&quot;NO CONTRADICTION — preserve evidence as entered&quot;;IF([.M91]=&quot;&quot;;&quot;REVIEW LINKAGE STATUS — identifiers are present while status is UNKNOWN&quot;;IF([.M91]=&quot;UNMATCHED&quot;;&quot;REMOVE LINKAGE IDENTIFIERS OR CORRECT LINKAGE STATUS&quot;;IF([.M91]=&quot;SINGLE_SALE_LINKED&quot;;&quot;REQUIRE LINKED SALE ID AND NO ALLOCATION GROUP ID&quot;;IF([.M91]=&quot;MULTI_SALE_PENDING_ALLOCATION&quot;;&quot;REMOVE LINKED SALE ID OR CORRECT LINKAGE STATUS&quot;;IF([.M91]=&quot;ALLOCATED&quot;;&quot;REQUIRE ALLOCATION GROUP ID AND NO LINKED SALE ID&quot;;&quot;REVIEW LINKAGE EVIDENCE — NO AUTHORITY CREATED&quot;)))))))">
            <text:p>NO ACTION — linkage status is UNKNOWN / not asserted</text:p>
          </table:table-cell>
          <table:table-cell office:value-type="string" table:formula="of:=IF([.S91]=&quot;CONTRADICTION&quot;;&quot;BLOCKED&quot;;IF([.S91]=&quot;UNKNOWN&quot;;&quot;UNKNOWN&quot;;IF([.S91]=&quot;CLEAR&quot;;IF(OR([.O91]=&quot;&quot;;[.P91]=&quot;&quot;);&quot;UNKNOWN&quot;;&quot;READY FOR REVIEW&quot;);&quot;BLOCKED&quot;)))">
            <text:p>UNKNOWN</text:p>
          </table:table-cell>
          <table:table-cell office:value-type="string" table:formula="of:=IF([.U91]=&quot;UNKNOWN&quot;;&quot;COMPLETE OR ASSERT REQUIRED EVIDENCE BEFORE REVIEW&quot;;IF([.U91]=&quot;BLOCKED&quot;;&quot;RESOLVE CONTRADICTION BEFORE REVIEW — NO AUTHORITY CREATED&quot;;IF([.U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1]=&quot;READY FOR REVIEW&quot;;&quot;REVIEW ELIGIBLE — NO AUTHORITY&quot;;IF(OR([.U91]=&quot;UNKNOWN&quot;;[.U9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2]=&quot;&quot;;IF(AND([.L92]=&quot;&quot;;[.N92]=&quot;&quot;);&quot;UNKNOWN&quot;;&quot;CONTRADICTION&quot;);IF([.M92]=&quot;UNMATCHED&quot;;IF(AND([.L92]=&quot;&quot;;[.N92]=&quot;&quot;);&quot;CLEAR&quot;;&quot;CONTRADICTION&quot;);IF([.M92]=&quot;SINGLE_SALE_LINKED&quot;;IF(AND([.L92]&lt;&gt;&quot;&quot;;[.N92]=&quot;&quot;);&quot;CLEAR&quot;;&quot;CONTRADICTION&quot;);IF([.M92]=&quot;MULTI_SALE_PENDING_ALLOCATION&quot;;IF([.L92]=&quot;&quot;;&quot;CLEAR&quot;;&quot;CONTRADICTION&quot;);IF([.M92]=&quot;ALLOCATED&quot;;IF(AND([.L92]=&quot;&quot;;[.N92]&lt;&gt;&quot;&quot;);&quot;CLEAR&quot;;&quot;CONTRADICTION&quot;);&quot;CONTRADICTION&quot;)))))">
            <text:p>UNKNOWN</text:p>
          </table:table-cell>
          <table:table-cell office:value-type="string" table:formula="of:=IF([.S92]=&quot;UNKNOWN&quot;;&quot;NO ACTION — linkage status is UNKNOWN / not asserted&quot;;IF([.S92]=&quot;CLEAR&quot;;&quot;NO CONTRADICTION — preserve evidence as entered&quot;;IF([.M92]=&quot;&quot;;&quot;REVIEW LINKAGE STATUS — identifiers are present while status is UNKNOWN&quot;;IF([.M92]=&quot;UNMATCHED&quot;;&quot;REMOVE LINKAGE IDENTIFIERS OR CORRECT LINKAGE STATUS&quot;;IF([.M92]=&quot;SINGLE_SALE_LINKED&quot;;&quot;REQUIRE LINKED SALE ID AND NO ALLOCATION GROUP ID&quot;;IF([.M92]=&quot;MULTI_SALE_PENDING_ALLOCATION&quot;;&quot;REMOVE LINKED SALE ID OR CORRECT LINKAGE STATUS&quot;;IF([.M92]=&quot;ALLOCATED&quot;;&quot;REQUIRE ALLOCATION GROUP ID AND NO LINKED SALE ID&quot;;&quot;REVIEW LINKAGE EVIDENCE — NO AUTHORITY CREATED&quot;)))))))">
            <text:p>NO ACTION — linkage status is UNKNOWN / not asserted</text:p>
          </table:table-cell>
          <table:table-cell office:value-type="string" table:formula="of:=IF([.S92]=&quot;CONTRADICTION&quot;;&quot;BLOCKED&quot;;IF([.S92]=&quot;UNKNOWN&quot;;&quot;UNKNOWN&quot;;IF([.S92]=&quot;CLEAR&quot;;IF(OR([.O92]=&quot;&quot;;[.P92]=&quot;&quot;);&quot;UNKNOWN&quot;;&quot;READY FOR REVIEW&quot;);&quot;BLOCKED&quot;)))">
            <text:p>UNKNOWN</text:p>
          </table:table-cell>
          <table:table-cell office:value-type="string" table:formula="of:=IF([.U92]=&quot;UNKNOWN&quot;;&quot;COMPLETE OR ASSERT REQUIRED EVIDENCE BEFORE REVIEW&quot;;IF([.U92]=&quot;BLOCKED&quot;;&quot;RESOLVE CONTRADICTION BEFORE REVIEW — NO AUTHORITY CREATED&quot;;IF([.U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2]=&quot;READY FOR REVIEW&quot;;&quot;REVIEW ELIGIBLE — NO AUTHORITY&quot;;IF(OR([.U92]=&quot;UNKNOWN&quot;;[.U9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3]=&quot;&quot;;IF(AND([.L93]=&quot;&quot;;[.N93]=&quot;&quot;);&quot;UNKNOWN&quot;;&quot;CONTRADICTION&quot;);IF([.M93]=&quot;UNMATCHED&quot;;IF(AND([.L93]=&quot;&quot;;[.N93]=&quot;&quot;);&quot;CLEAR&quot;;&quot;CONTRADICTION&quot;);IF([.M93]=&quot;SINGLE_SALE_LINKED&quot;;IF(AND([.L93]&lt;&gt;&quot;&quot;;[.N93]=&quot;&quot;);&quot;CLEAR&quot;;&quot;CONTRADICTION&quot;);IF([.M93]=&quot;MULTI_SALE_PENDING_ALLOCATION&quot;;IF([.L93]=&quot;&quot;;&quot;CLEAR&quot;;&quot;CONTRADICTION&quot;);IF([.M93]=&quot;ALLOCATED&quot;;IF(AND([.L93]=&quot;&quot;;[.N93]&lt;&gt;&quot;&quot;);&quot;CLEAR&quot;;&quot;CONTRADICTION&quot;);&quot;CONTRADICTION&quot;)))))">
            <text:p>UNKNOWN</text:p>
          </table:table-cell>
          <table:table-cell office:value-type="string" table:formula="of:=IF([.S93]=&quot;UNKNOWN&quot;;&quot;NO ACTION — linkage status is UNKNOWN / not asserted&quot;;IF([.S93]=&quot;CLEAR&quot;;&quot;NO CONTRADICTION — preserve evidence as entered&quot;;IF([.M93]=&quot;&quot;;&quot;REVIEW LINKAGE STATUS — identifiers are present while status is UNKNOWN&quot;;IF([.M93]=&quot;UNMATCHED&quot;;&quot;REMOVE LINKAGE IDENTIFIERS OR CORRECT LINKAGE STATUS&quot;;IF([.M93]=&quot;SINGLE_SALE_LINKED&quot;;&quot;REQUIRE LINKED SALE ID AND NO ALLOCATION GROUP ID&quot;;IF([.M93]=&quot;MULTI_SALE_PENDING_ALLOCATION&quot;;&quot;REMOVE LINKED SALE ID OR CORRECT LINKAGE STATUS&quot;;IF([.M93]=&quot;ALLOCATED&quot;;&quot;REQUIRE ALLOCATION GROUP ID AND NO LINKED SALE ID&quot;;&quot;REVIEW LINKAGE EVIDENCE — NO AUTHORITY CREATED&quot;)))))))">
            <text:p>NO ACTION — linkage status is UNKNOWN / not asserted</text:p>
          </table:table-cell>
          <table:table-cell office:value-type="string" table:formula="of:=IF([.S93]=&quot;CONTRADICTION&quot;;&quot;BLOCKED&quot;;IF([.S93]=&quot;UNKNOWN&quot;;&quot;UNKNOWN&quot;;IF([.S93]=&quot;CLEAR&quot;;IF(OR([.O93]=&quot;&quot;;[.P93]=&quot;&quot;);&quot;UNKNOWN&quot;;&quot;READY FOR REVIEW&quot;);&quot;BLOCKED&quot;)))">
            <text:p>UNKNOWN</text:p>
          </table:table-cell>
          <table:table-cell office:value-type="string" table:formula="of:=IF([.U93]=&quot;UNKNOWN&quot;;&quot;COMPLETE OR ASSERT REQUIRED EVIDENCE BEFORE REVIEW&quot;;IF([.U93]=&quot;BLOCKED&quot;;&quot;RESOLVE CONTRADICTION BEFORE REVIEW — NO AUTHORITY CREATED&quot;;IF([.U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3]=&quot;READY FOR REVIEW&quot;;&quot;REVIEW ELIGIBLE — NO AUTHORITY&quot;;IF(OR([.U93]=&quot;UNKNOWN&quot;;[.U9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4]=&quot;&quot;;IF(AND([.L94]=&quot;&quot;;[.N94]=&quot;&quot;);&quot;UNKNOWN&quot;;&quot;CONTRADICTION&quot;);IF([.M94]=&quot;UNMATCHED&quot;;IF(AND([.L94]=&quot;&quot;;[.N94]=&quot;&quot;);&quot;CLEAR&quot;;&quot;CONTRADICTION&quot;);IF([.M94]=&quot;SINGLE_SALE_LINKED&quot;;IF(AND([.L94]&lt;&gt;&quot;&quot;;[.N94]=&quot;&quot;);&quot;CLEAR&quot;;&quot;CONTRADICTION&quot;);IF([.M94]=&quot;MULTI_SALE_PENDING_ALLOCATION&quot;;IF([.L94]=&quot;&quot;;&quot;CLEAR&quot;;&quot;CONTRADICTION&quot;);IF([.M94]=&quot;ALLOCATED&quot;;IF(AND([.L94]=&quot;&quot;;[.N94]&lt;&gt;&quot;&quot;);&quot;CLEAR&quot;;&quot;CONTRADICTION&quot;);&quot;CONTRADICTION&quot;)))))">
            <text:p>UNKNOWN</text:p>
          </table:table-cell>
          <table:table-cell office:value-type="string" table:formula="of:=IF([.S94]=&quot;UNKNOWN&quot;;&quot;NO ACTION — linkage status is UNKNOWN / not asserted&quot;;IF([.S94]=&quot;CLEAR&quot;;&quot;NO CONTRADICTION — preserve evidence as entered&quot;;IF([.M94]=&quot;&quot;;&quot;REVIEW LINKAGE STATUS — identifiers are present while status is UNKNOWN&quot;;IF([.M94]=&quot;UNMATCHED&quot;;&quot;REMOVE LINKAGE IDENTIFIERS OR CORRECT LINKAGE STATUS&quot;;IF([.M94]=&quot;SINGLE_SALE_LINKED&quot;;&quot;REQUIRE LINKED SALE ID AND NO ALLOCATION GROUP ID&quot;;IF([.M94]=&quot;MULTI_SALE_PENDING_ALLOCATION&quot;;&quot;REMOVE LINKED SALE ID OR CORRECT LINKAGE STATUS&quot;;IF([.M94]=&quot;ALLOCATED&quot;;&quot;REQUIRE ALLOCATION GROUP ID AND NO LINKED SALE ID&quot;;&quot;REVIEW LINKAGE EVIDENCE — NO AUTHORITY CREATED&quot;)))))))">
            <text:p>NO ACTION — linkage status is UNKNOWN / not asserted</text:p>
          </table:table-cell>
          <table:table-cell office:value-type="string" table:formula="of:=IF([.S94]=&quot;CONTRADICTION&quot;;&quot;BLOCKED&quot;;IF([.S94]=&quot;UNKNOWN&quot;;&quot;UNKNOWN&quot;;IF([.S94]=&quot;CLEAR&quot;;IF(OR([.O94]=&quot;&quot;;[.P94]=&quot;&quot;);&quot;UNKNOWN&quot;;&quot;READY FOR REVIEW&quot;);&quot;BLOCKED&quot;)))">
            <text:p>UNKNOWN</text:p>
          </table:table-cell>
          <table:table-cell office:value-type="string" table:formula="of:=IF([.U94]=&quot;UNKNOWN&quot;;&quot;COMPLETE OR ASSERT REQUIRED EVIDENCE BEFORE REVIEW&quot;;IF([.U94]=&quot;BLOCKED&quot;;&quot;RESOLVE CONTRADICTION BEFORE REVIEW — NO AUTHORITY CREATED&quot;;IF([.U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4]=&quot;READY FOR REVIEW&quot;;&quot;REVIEW ELIGIBLE — NO AUTHORITY&quot;;IF(OR([.U94]=&quot;UNKNOWN&quot;;[.U9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5]=&quot;&quot;;IF(AND([.L95]=&quot;&quot;;[.N95]=&quot;&quot;);&quot;UNKNOWN&quot;;&quot;CONTRADICTION&quot;);IF([.M95]=&quot;UNMATCHED&quot;;IF(AND([.L95]=&quot;&quot;;[.N95]=&quot;&quot;);&quot;CLEAR&quot;;&quot;CONTRADICTION&quot;);IF([.M95]=&quot;SINGLE_SALE_LINKED&quot;;IF(AND([.L95]&lt;&gt;&quot;&quot;;[.N95]=&quot;&quot;);&quot;CLEAR&quot;;&quot;CONTRADICTION&quot;);IF([.M95]=&quot;MULTI_SALE_PENDING_ALLOCATION&quot;;IF([.L95]=&quot;&quot;;&quot;CLEAR&quot;;&quot;CONTRADICTION&quot;);IF([.M95]=&quot;ALLOCATED&quot;;IF(AND([.L95]=&quot;&quot;;[.N95]&lt;&gt;&quot;&quot;);&quot;CLEAR&quot;;&quot;CONTRADICTION&quot;);&quot;CONTRADICTION&quot;)))))">
            <text:p>UNKNOWN</text:p>
          </table:table-cell>
          <table:table-cell office:value-type="string" table:formula="of:=IF([.S95]=&quot;UNKNOWN&quot;;&quot;NO ACTION — linkage status is UNKNOWN / not asserted&quot;;IF([.S95]=&quot;CLEAR&quot;;&quot;NO CONTRADICTION — preserve evidence as entered&quot;;IF([.M95]=&quot;&quot;;&quot;REVIEW LINKAGE STATUS — identifiers are present while status is UNKNOWN&quot;;IF([.M95]=&quot;UNMATCHED&quot;;&quot;REMOVE LINKAGE IDENTIFIERS OR CORRECT LINKAGE STATUS&quot;;IF([.M95]=&quot;SINGLE_SALE_LINKED&quot;;&quot;REQUIRE LINKED SALE ID AND NO ALLOCATION GROUP ID&quot;;IF([.M95]=&quot;MULTI_SALE_PENDING_ALLOCATION&quot;;&quot;REMOVE LINKED SALE ID OR CORRECT LINKAGE STATUS&quot;;IF([.M95]=&quot;ALLOCATED&quot;;&quot;REQUIRE ALLOCATION GROUP ID AND NO LINKED SALE ID&quot;;&quot;REVIEW LINKAGE EVIDENCE — NO AUTHORITY CREATED&quot;)))))))">
            <text:p>NO ACTION — linkage status is UNKNOWN / not asserted</text:p>
          </table:table-cell>
          <table:table-cell office:value-type="string" table:formula="of:=IF([.S95]=&quot;CONTRADICTION&quot;;&quot;BLOCKED&quot;;IF([.S95]=&quot;UNKNOWN&quot;;&quot;UNKNOWN&quot;;IF([.S95]=&quot;CLEAR&quot;;IF(OR([.O95]=&quot;&quot;;[.P95]=&quot;&quot;);&quot;UNKNOWN&quot;;&quot;READY FOR REVIEW&quot;);&quot;BLOCKED&quot;)))">
            <text:p>UNKNOWN</text:p>
          </table:table-cell>
          <table:table-cell office:value-type="string" table:formula="of:=IF([.U95]=&quot;UNKNOWN&quot;;&quot;COMPLETE OR ASSERT REQUIRED EVIDENCE BEFORE REVIEW&quot;;IF([.U95]=&quot;BLOCKED&quot;;&quot;RESOLVE CONTRADICTION BEFORE REVIEW — NO AUTHORITY CREATED&quot;;IF([.U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5]=&quot;READY FOR REVIEW&quot;;&quot;REVIEW ELIGIBLE — NO AUTHORITY&quot;;IF(OR([.U95]=&quot;UNKNOWN&quot;;[.U9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6]=&quot;&quot;;IF(AND([.L96]=&quot;&quot;;[.N96]=&quot;&quot;);&quot;UNKNOWN&quot;;&quot;CONTRADICTION&quot;);IF([.M96]=&quot;UNMATCHED&quot;;IF(AND([.L96]=&quot;&quot;;[.N96]=&quot;&quot;);&quot;CLEAR&quot;;&quot;CONTRADICTION&quot;);IF([.M96]=&quot;SINGLE_SALE_LINKED&quot;;IF(AND([.L96]&lt;&gt;&quot;&quot;;[.N96]=&quot;&quot;);&quot;CLEAR&quot;;&quot;CONTRADICTION&quot;);IF([.M96]=&quot;MULTI_SALE_PENDING_ALLOCATION&quot;;IF([.L96]=&quot;&quot;;&quot;CLEAR&quot;;&quot;CONTRADICTION&quot;);IF([.M96]=&quot;ALLOCATED&quot;;IF(AND([.L96]=&quot;&quot;;[.N96]&lt;&gt;&quot;&quot;);&quot;CLEAR&quot;;&quot;CONTRADICTION&quot;);&quot;CONTRADICTION&quot;)))))">
            <text:p>UNKNOWN</text:p>
          </table:table-cell>
          <table:table-cell office:value-type="string" table:formula="of:=IF([.S96]=&quot;UNKNOWN&quot;;&quot;NO ACTION — linkage status is UNKNOWN / not asserted&quot;;IF([.S96]=&quot;CLEAR&quot;;&quot;NO CONTRADICTION — preserve evidence as entered&quot;;IF([.M96]=&quot;&quot;;&quot;REVIEW LINKAGE STATUS — identifiers are present while status is UNKNOWN&quot;;IF([.M96]=&quot;UNMATCHED&quot;;&quot;REMOVE LINKAGE IDENTIFIERS OR CORRECT LINKAGE STATUS&quot;;IF([.M96]=&quot;SINGLE_SALE_LINKED&quot;;&quot;REQUIRE LINKED SALE ID AND NO ALLOCATION GROUP ID&quot;;IF([.M96]=&quot;MULTI_SALE_PENDING_ALLOCATION&quot;;&quot;REMOVE LINKED SALE ID OR CORRECT LINKAGE STATUS&quot;;IF([.M96]=&quot;ALLOCATED&quot;;&quot;REQUIRE ALLOCATION GROUP ID AND NO LINKED SALE ID&quot;;&quot;REVIEW LINKAGE EVIDENCE — NO AUTHORITY CREATED&quot;)))))))">
            <text:p>NO ACTION — linkage status is UNKNOWN / not asserted</text:p>
          </table:table-cell>
          <table:table-cell office:value-type="string" table:formula="of:=IF([.S96]=&quot;CONTRADICTION&quot;;&quot;BLOCKED&quot;;IF([.S96]=&quot;UNKNOWN&quot;;&quot;UNKNOWN&quot;;IF([.S96]=&quot;CLEAR&quot;;IF(OR([.O96]=&quot;&quot;;[.P96]=&quot;&quot;);&quot;UNKNOWN&quot;;&quot;READY FOR REVIEW&quot;);&quot;BLOCKED&quot;)))">
            <text:p>UNKNOWN</text:p>
          </table:table-cell>
          <table:table-cell office:value-type="string" table:formula="of:=IF([.U96]=&quot;UNKNOWN&quot;;&quot;COMPLETE OR ASSERT REQUIRED EVIDENCE BEFORE REVIEW&quot;;IF([.U96]=&quot;BLOCKED&quot;;&quot;RESOLVE CONTRADICTION BEFORE REVIEW — NO AUTHORITY CREATED&quot;;IF([.U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6]=&quot;READY FOR REVIEW&quot;;&quot;REVIEW ELIGIBLE — NO AUTHORITY&quot;;IF(OR([.U96]=&quot;UNKNOWN&quot;;[.U9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7]=&quot;&quot;;IF(AND([.L97]=&quot;&quot;;[.N97]=&quot;&quot;);&quot;UNKNOWN&quot;;&quot;CONTRADICTION&quot;);IF([.M97]=&quot;UNMATCHED&quot;;IF(AND([.L97]=&quot;&quot;;[.N97]=&quot;&quot;);&quot;CLEAR&quot;;&quot;CONTRADICTION&quot;);IF([.M97]=&quot;SINGLE_SALE_LINKED&quot;;IF(AND([.L97]&lt;&gt;&quot;&quot;;[.N97]=&quot;&quot;);&quot;CLEAR&quot;;&quot;CONTRADICTION&quot;);IF([.M97]=&quot;MULTI_SALE_PENDING_ALLOCATION&quot;;IF([.L97]=&quot;&quot;;&quot;CLEAR&quot;;&quot;CONTRADICTION&quot;);IF([.M97]=&quot;ALLOCATED&quot;;IF(AND([.L97]=&quot;&quot;;[.N97]&lt;&gt;&quot;&quot;);&quot;CLEAR&quot;;&quot;CONTRADICTION&quot;);&quot;CONTRADICTION&quot;)))))">
            <text:p>UNKNOWN</text:p>
          </table:table-cell>
          <table:table-cell office:value-type="string" table:formula="of:=IF([.S97]=&quot;UNKNOWN&quot;;&quot;NO ACTION — linkage status is UNKNOWN / not asserted&quot;;IF([.S97]=&quot;CLEAR&quot;;&quot;NO CONTRADICTION — preserve evidence as entered&quot;;IF([.M97]=&quot;&quot;;&quot;REVIEW LINKAGE STATUS — identifiers are present while status is UNKNOWN&quot;;IF([.M97]=&quot;UNMATCHED&quot;;&quot;REMOVE LINKAGE IDENTIFIERS OR CORRECT LINKAGE STATUS&quot;;IF([.M97]=&quot;SINGLE_SALE_LINKED&quot;;&quot;REQUIRE LINKED SALE ID AND NO ALLOCATION GROUP ID&quot;;IF([.M97]=&quot;MULTI_SALE_PENDING_ALLOCATION&quot;;&quot;REMOVE LINKED SALE ID OR CORRECT LINKAGE STATUS&quot;;IF([.M97]=&quot;ALLOCATED&quot;;&quot;REQUIRE ALLOCATION GROUP ID AND NO LINKED SALE ID&quot;;&quot;REVIEW LINKAGE EVIDENCE — NO AUTHORITY CREATED&quot;)))))))">
            <text:p>NO ACTION — linkage status is UNKNOWN / not asserted</text:p>
          </table:table-cell>
          <table:table-cell office:value-type="string" table:formula="of:=IF([.S97]=&quot;CONTRADICTION&quot;;&quot;BLOCKED&quot;;IF([.S97]=&quot;UNKNOWN&quot;;&quot;UNKNOWN&quot;;IF([.S97]=&quot;CLEAR&quot;;IF(OR([.O97]=&quot;&quot;;[.P97]=&quot;&quot;);&quot;UNKNOWN&quot;;&quot;READY FOR REVIEW&quot;);&quot;BLOCKED&quot;)))">
            <text:p>UNKNOWN</text:p>
          </table:table-cell>
          <table:table-cell office:value-type="string" table:formula="of:=IF([.U97]=&quot;UNKNOWN&quot;;&quot;COMPLETE OR ASSERT REQUIRED EVIDENCE BEFORE REVIEW&quot;;IF([.U97]=&quot;BLOCKED&quot;;&quot;RESOLVE CONTRADICTION BEFORE REVIEW — NO AUTHORITY CREATED&quot;;IF([.U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7]=&quot;READY FOR REVIEW&quot;;&quot;REVIEW ELIGIBLE — NO AUTHORITY&quot;;IF(OR([.U97]=&quot;UNKNOWN&quot;;[.U9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8]=&quot;&quot;;IF(AND([.L98]=&quot;&quot;;[.N98]=&quot;&quot;);&quot;UNKNOWN&quot;;&quot;CONTRADICTION&quot;);IF([.M98]=&quot;UNMATCHED&quot;;IF(AND([.L98]=&quot;&quot;;[.N98]=&quot;&quot;);&quot;CLEAR&quot;;&quot;CONTRADICTION&quot;);IF([.M98]=&quot;SINGLE_SALE_LINKED&quot;;IF(AND([.L98]&lt;&gt;&quot;&quot;;[.N98]=&quot;&quot;);&quot;CLEAR&quot;;&quot;CONTRADICTION&quot;);IF([.M98]=&quot;MULTI_SALE_PENDING_ALLOCATION&quot;;IF([.L98]=&quot;&quot;;&quot;CLEAR&quot;;&quot;CONTRADICTION&quot;);IF([.M98]=&quot;ALLOCATED&quot;;IF(AND([.L98]=&quot;&quot;;[.N98]&lt;&gt;&quot;&quot;);&quot;CLEAR&quot;;&quot;CONTRADICTION&quot;);&quot;CONTRADICTION&quot;)))))">
            <text:p>UNKNOWN</text:p>
          </table:table-cell>
          <table:table-cell office:value-type="string" table:formula="of:=IF([.S98]=&quot;UNKNOWN&quot;;&quot;NO ACTION — linkage status is UNKNOWN / not asserted&quot;;IF([.S98]=&quot;CLEAR&quot;;&quot;NO CONTRADICTION — preserve evidence as entered&quot;;IF([.M98]=&quot;&quot;;&quot;REVIEW LINKAGE STATUS — identifiers are present while status is UNKNOWN&quot;;IF([.M98]=&quot;UNMATCHED&quot;;&quot;REMOVE LINKAGE IDENTIFIERS OR CORRECT LINKAGE STATUS&quot;;IF([.M98]=&quot;SINGLE_SALE_LINKED&quot;;&quot;REQUIRE LINKED SALE ID AND NO ALLOCATION GROUP ID&quot;;IF([.M98]=&quot;MULTI_SALE_PENDING_ALLOCATION&quot;;&quot;REMOVE LINKED SALE ID OR CORRECT LINKAGE STATUS&quot;;IF([.M98]=&quot;ALLOCATED&quot;;&quot;REQUIRE ALLOCATION GROUP ID AND NO LINKED SALE ID&quot;;&quot;REVIEW LINKAGE EVIDENCE — NO AUTHORITY CREATED&quot;)))))))">
            <text:p>NO ACTION — linkage status is UNKNOWN / not asserted</text:p>
          </table:table-cell>
          <table:table-cell office:value-type="string" table:formula="of:=IF([.S98]=&quot;CONTRADICTION&quot;;&quot;BLOCKED&quot;;IF([.S98]=&quot;UNKNOWN&quot;;&quot;UNKNOWN&quot;;IF([.S98]=&quot;CLEAR&quot;;IF(OR([.O98]=&quot;&quot;;[.P98]=&quot;&quot;);&quot;UNKNOWN&quot;;&quot;READY FOR REVIEW&quot;);&quot;BLOCKED&quot;)))">
            <text:p>UNKNOWN</text:p>
          </table:table-cell>
          <table:table-cell office:value-type="string" table:formula="of:=IF([.U98]=&quot;UNKNOWN&quot;;&quot;COMPLETE OR ASSERT REQUIRED EVIDENCE BEFORE REVIEW&quot;;IF([.U98]=&quot;BLOCKED&quot;;&quot;RESOLVE CONTRADICTION BEFORE REVIEW — NO AUTHORITY CREATED&quot;;IF([.U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8]=&quot;READY FOR REVIEW&quot;;&quot;REVIEW ELIGIBLE — NO AUTHORITY&quot;;IF(OR([.U98]=&quot;UNKNOWN&quot;;[.U9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9]=&quot;&quot;;IF(AND([.L99]=&quot;&quot;;[.N99]=&quot;&quot;);&quot;UNKNOWN&quot;;&quot;CONTRADICTION&quot;);IF([.M99]=&quot;UNMATCHED&quot;;IF(AND([.L99]=&quot;&quot;;[.N99]=&quot;&quot;);&quot;CLEAR&quot;;&quot;CONTRADICTION&quot;);IF([.M99]=&quot;SINGLE_SALE_LINKED&quot;;IF(AND([.L99]&lt;&gt;&quot;&quot;;[.N99]=&quot;&quot;);&quot;CLEAR&quot;;&quot;CONTRADICTION&quot;);IF([.M99]=&quot;MULTI_SALE_PENDING_ALLOCATION&quot;;IF([.L99]=&quot;&quot;;&quot;CLEAR&quot;;&quot;CONTRADICTION&quot;);IF([.M99]=&quot;ALLOCATED&quot;;IF(AND([.L99]=&quot;&quot;;[.N99]&lt;&gt;&quot;&quot;);&quot;CLEAR&quot;;&quot;CONTRADICTION&quot;);&quot;CONTRADICTION&quot;)))))">
            <text:p>UNKNOWN</text:p>
          </table:table-cell>
          <table:table-cell office:value-type="string" table:formula="of:=IF([.S99]=&quot;UNKNOWN&quot;;&quot;NO ACTION — linkage status is UNKNOWN / not asserted&quot;;IF([.S99]=&quot;CLEAR&quot;;&quot;NO CONTRADICTION — preserve evidence as entered&quot;;IF([.M99]=&quot;&quot;;&quot;REVIEW LINKAGE STATUS — identifiers are present while status is UNKNOWN&quot;;IF([.M99]=&quot;UNMATCHED&quot;;&quot;REMOVE LINKAGE IDENTIFIERS OR CORRECT LINKAGE STATUS&quot;;IF([.M99]=&quot;SINGLE_SALE_LINKED&quot;;&quot;REQUIRE LINKED SALE ID AND NO ALLOCATION GROUP ID&quot;;IF([.M99]=&quot;MULTI_SALE_PENDING_ALLOCATION&quot;;&quot;REMOVE LINKED SALE ID OR CORRECT LINKAGE STATUS&quot;;IF([.M99]=&quot;ALLOCATED&quot;;&quot;REQUIRE ALLOCATION GROUP ID AND NO LINKED SALE ID&quot;;&quot;REVIEW LINKAGE EVIDENCE — NO AUTHORITY CREATED&quot;)))))))">
            <text:p>NO ACTION — linkage status is UNKNOWN / not asserted</text:p>
          </table:table-cell>
          <table:table-cell office:value-type="string" table:formula="of:=IF([.S99]=&quot;CONTRADICTION&quot;;&quot;BLOCKED&quot;;IF([.S99]=&quot;UNKNOWN&quot;;&quot;UNKNOWN&quot;;IF([.S99]=&quot;CLEAR&quot;;IF(OR([.O99]=&quot;&quot;;[.P99]=&quot;&quot;);&quot;UNKNOWN&quot;;&quot;READY FOR REVIEW&quot;);&quot;BLOCKED&quot;)))">
            <text:p>UNKNOWN</text:p>
          </table:table-cell>
          <table:table-cell office:value-type="string" table:formula="of:=IF([.U99]=&quot;UNKNOWN&quot;;&quot;COMPLETE OR ASSERT REQUIRED EVIDENCE BEFORE REVIEW&quot;;IF([.U99]=&quot;BLOCKED&quot;;&quot;RESOLVE CONTRADICTION BEFORE REVIEW — NO AUTHORITY CREATED&quot;;IF([.U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9]=&quot;READY FOR REVIEW&quot;;&quot;REVIEW ELIGIBLE — NO AUTHORITY&quot;;IF(OR([.U99]=&quot;UNKNOWN&quot;;[.U9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0]=&quot;&quot;;IF(AND([.L100]=&quot;&quot;;[.N100]=&quot;&quot;);&quot;UNKNOWN&quot;;&quot;CONTRADICTION&quot;);IF([.M100]=&quot;UNMATCHED&quot;;IF(AND([.L100]=&quot;&quot;;[.N100]=&quot;&quot;);&quot;CLEAR&quot;;&quot;CONTRADICTION&quot;);IF([.M100]=&quot;SINGLE_SALE_LINKED&quot;;IF(AND([.L100]&lt;&gt;&quot;&quot;;[.N100]=&quot;&quot;);&quot;CLEAR&quot;;&quot;CONTRADICTION&quot;);IF([.M100]=&quot;MULTI_SALE_PENDING_ALLOCATION&quot;;IF([.L100]=&quot;&quot;;&quot;CLEAR&quot;;&quot;CONTRADICTION&quot;);IF([.M100]=&quot;ALLOCATED&quot;;IF(AND([.L100]=&quot;&quot;;[.N100]&lt;&gt;&quot;&quot;);&quot;CLEAR&quot;;&quot;CONTRADICTION&quot;);&quot;CONTRADICTION&quot;)))))">
            <text:p>UNKNOWN</text:p>
          </table:table-cell>
          <table:table-cell office:value-type="string" table:formula="of:=IF([.S100]=&quot;UNKNOWN&quot;;&quot;NO ACTION — linkage status is UNKNOWN / not asserted&quot;;IF([.S100]=&quot;CLEAR&quot;;&quot;NO CONTRADICTION — preserve evidence as entered&quot;;IF([.M100]=&quot;&quot;;&quot;REVIEW LINKAGE STATUS — identifiers are present while status is UNKNOWN&quot;;IF([.M100]=&quot;UNMATCHED&quot;;&quot;REMOVE LINKAGE IDENTIFIERS OR CORRECT LINKAGE STATUS&quot;;IF([.M100]=&quot;SINGLE_SALE_LINKED&quot;;&quot;REQUIRE LINKED SALE ID AND NO ALLOCATION GROUP ID&quot;;IF([.M100]=&quot;MULTI_SALE_PENDING_ALLOCATION&quot;;&quot;REMOVE LINKED SALE ID OR CORRECT LINKAGE STATUS&quot;;IF([.M100]=&quot;ALLOCATED&quot;;&quot;REQUIRE ALLOCATION GROUP ID AND NO LINKED SALE ID&quot;;&quot;REVIEW LINKAGE EVIDENCE — NO AUTHORITY CREATED&quot;)))))))">
            <text:p>NO ACTION — linkage status is UNKNOWN / not asserted</text:p>
          </table:table-cell>
          <table:table-cell office:value-type="string" table:formula="of:=IF([.S100]=&quot;CONTRADICTION&quot;;&quot;BLOCKED&quot;;IF([.S100]=&quot;UNKNOWN&quot;;&quot;UNKNOWN&quot;;IF([.S100]=&quot;CLEAR&quot;;IF(OR([.O100]=&quot;&quot;;[.P100]=&quot;&quot;);&quot;UNKNOWN&quot;;&quot;READY FOR REVIEW&quot;);&quot;BLOCKED&quot;)))">
            <text:p>UNKNOWN</text:p>
          </table:table-cell>
          <table:table-cell office:value-type="string" table:formula="of:=IF([.U100]=&quot;UNKNOWN&quot;;&quot;COMPLETE OR ASSERT REQUIRED EVIDENCE BEFORE REVIEW&quot;;IF([.U100]=&quot;BLOCKED&quot;;&quot;RESOLVE CONTRADICTION BEFORE REVIEW — NO AUTHORITY CREATED&quot;;IF([.U1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0]=&quot;READY FOR REVIEW&quot;;&quot;REVIEW ELIGIBLE — NO AUTHORITY&quot;;IF(OR([.U100]=&quot;UNKNOWN&quot;;[.U10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1]=&quot;&quot;;IF(AND([.L101]=&quot;&quot;;[.N101]=&quot;&quot;);&quot;UNKNOWN&quot;;&quot;CONTRADICTION&quot;);IF([.M101]=&quot;UNMATCHED&quot;;IF(AND([.L101]=&quot;&quot;;[.N101]=&quot;&quot;);&quot;CLEAR&quot;;&quot;CONTRADICTION&quot;);IF([.M101]=&quot;SINGLE_SALE_LINKED&quot;;IF(AND([.L101]&lt;&gt;&quot;&quot;;[.N101]=&quot;&quot;);&quot;CLEAR&quot;;&quot;CONTRADICTION&quot;);IF([.M101]=&quot;MULTI_SALE_PENDING_ALLOCATION&quot;;IF([.L101]=&quot;&quot;;&quot;CLEAR&quot;;&quot;CONTRADICTION&quot;);IF([.M101]=&quot;ALLOCATED&quot;;IF(AND([.L101]=&quot;&quot;;[.N101]&lt;&gt;&quot;&quot;);&quot;CLEAR&quot;;&quot;CONTRADICTION&quot;);&quot;CONTRADICTION&quot;)))))">
            <text:p>UNKNOWN</text:p>
          </table:table-cell>
          <table:table-cell office:value-type="string" table:formula="of:=IF([.S101]=&quot;UNKNOWN&quot;;&quot;NO ACTION — linkage status is UNKNOWN / not asserted&quot;;IF([.S101]=&quot;CLEAR&quot;;&quot;NO CONTRADICTION — preserve evidence as entered&quot;;IF([.M101]=&quot;&quot;;&quot;REVIEW LINKAGE STATUS — identifiers are present while status is UNKNOWN&quot;;IF([.M101]=&quot;UNMATCHED&quot;;&quot;REMOVE LINKAGE IDENTIFIERS OR CORRECT LINKAGE STATUS&quot;;IF([.M101]=&quot;SINGLE_SALE_LINKED&quot;;&quot;REQUIRE LINKED SALE ID AND NO ALLOCATION GROUP ID&quot;;IF([.M101]=&quot;MULTI_SALE_PENDING_ALLOCATION&quot;;&quot;REMOVE LINKED SALE ID OR CORRECT LINKAGE STATUS&quot;;IF([.M101]=&quot;ALLOCATED&quot;;&quot;REQUIRE ALLOCATION GROUP ID AND NO LINKED SALE ID&quot;;&quot;REVIEW LINKAGE EVIDENCE — NO AUTHORITY CREATED&quot;)))))))">
            <text:p>NO ACTION — linkage status is UNKNOWN / not asserted</text:p>
          </table:table-cell>
          <table:table-cell office:value-type="string" table:formula="of:=IF([.S101]=&quot;CONTRADICTION&quot;;&quot;BLOCKED&quot;;IF([.S101]=&quot;UNKNOWN&quot;;&quot;UNKNOWN&quot;;IF([.S101]=&quot;CLEAR&quot;;IF(OR([.O101]=&quot;&quot;;[.P101]=&quot;&quot;);&quot;UNKNOWN&quot;;&quot;READY FOR REVIEW&quot;);&quot;BLOCKED&quot;)))">
            <text:p>UNKNOWN</text:p>
          </table:table-cell>
          <table:table-cell office:value-type="string" table:formula="of:=IF([.U101]=&quot;UNKNOWN&quot;;&quot;COMPLETE OR ASSERT REQUIRED EVIDENCE BEFORE REVIEW&quot;;IF([.U101]=&quot;BLOCKED&quot;;&quot;RESOLVE CONTRADICTION BEFORE REVIEW — NO AUTHORITY CREATED&quot;;IF([.U1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1]=&quot;READY FOR REVIEW&quot;;&quot;REVIEW ELIGIBLE — NO AUTHORITY&quot;;IF(OR([.U101]=&quot;UNKNOWN&quot;;[.U10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2]=&quot;&quot;;IF(AND([.L102]=&quot;&quot;;[.N102]=&quot;&quot;);&quot;UNKNOWN&quot;;&quot;CONTRADICTION&quot;);IF([.M102]=&quot;UNMATCHED&quot;;IF(AND([.L102]=&quot;&quot;;[.N102]=&quot;&quot;);&quot;CLEAR&quot;;&quot;CONTRADICTION&quot;);IF([.M102]=&quot;SINGLE_SALE_LINKED&quot;;IF(AND([.L102]&lt;&gt;&quot;&quot;;[.N102]=&quot;&quot;);&quot;CLEAR&quot;;&quot;CONTRADICTION&quot;);IF([.M102]=&quot;MULTI_SALE_PENDING_ALLOCATION&quot;;IF([.L102]=&quot;&quot;;&quot;CLEAR&quot;;&quot;CONTRADICTION&quot;);IF([.M102]=&quot;ALLOCATED&quot;;IF(AND([.L102]=&quot;&quot;;[.N102]&lt;&gt;&quot;&quot;);&quot;CLEAR&quot;;&quot;CONTRADICTION&quot;);&quot;CONTRADICTION&quot;)))))">
            <text:p>UNKNOWN</text:p>
          </table:table-cell>
          <table:table-cell office:value-type="string" table:formula="of:=IF([.S102]=&quot;UNKNOWN&quot;;&quot;NO ACTION — linkage status is UNKNOWN / not asserted&quot;;IF([.S102]=&quot;CLEAR&quot;;&quot;NO CONTRADICTION — preserve evidence as entered&quot;;IF([.M102]=&quot;&quot;;&quot;REVIEW LINKAGE STATUS — identifiers are present while status is UNKNOWN&quot;;IF([.M102]=&quot;UNMATCHED&quot;;&quot;REMOVE LINKAGE IDENTIFIERS OR CORRECT LINKAGE STATUS&quot;;IF([.M102]=&quot;SINGLE_SALE_LINKED&quot;;&quot;REQUIRE LINKED SALE ID AND NO ALLOCATION GROUP ID&quot;;IF([.M102]=&quot;MULTI_SALE_PENDING_ALLOCATION&quot;;&quot;REMOVE LINKED SALE ID OR CORRECT LINKAGE STATUS&quot;;IF([.M102]=&quot;ALLOCATED&quot;;&quot;REQUIRE ALLOCATION GROUP ID AND NO LINKED SALE ID&quot;;&quot;REVIEW LINKAGE EVIDENCE — NO AUTHORITY CREATED&quot;)))))))">
            <text:p>NO ACTION — linkage status is UNKNOWN / not asserted</text:p>
          </table:table-cell>
          <table:table-cell office:value-type="string" table:formula="of:=IF([.S102]=&quot;CONTRADICTION&quot;;&quot;BLOCKED&quot;;IF([.S102]=&quot;UNKNOWN&quot;;&quot;UNKNOWN&quot;;IF([.S102]=&quot;CLEAR&quot;;IF(OR([.O102]=&quot;&quot;;[.P102]=&quot;&quot;);&quot;UNKNOWN&quot;;&quot;READY FOR REVIEW&quot;);&quot;BLOCKED&quot;)))">
            <text:p>UNKNOWN</text:p>
          </table:table-cell>
          <table:table-cell office:value-type="string" table:formula="of:=IF([.U102]=&quot;UNKNOWN&quot;;&quot;COMPLETE OR ASSERT REQUIRED EVIDENCE BEFORE REVIEW&quot;;IF([.U102]=&quot;BLOCKED&quot;;&quot;RESOLVE CONTRADICTION BEFORE REVIEW — NO AUTHORITY CREATED&quot;;IF([.U1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2]=&quot;READY FOR REVIEW&quot;;&quot;REVIEW ELIGIBLE — NO AUTHORITY&quot;;IF(OR([.U102]=&quot;UNKNOWN&quot;;[.U10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3]=&quot;&quot;;IF(AND([.L103]=&quot;&quot;;[.N103]=&quot;&quot;);&quot;UNKNOWN&quot;;&quot;CONTRADICTION&quot;);IF([.M103]=&quot;UNMATCHED&quot;;IF(AND([.L103]=&quot;&quot;;[.N103]=&quot;&quot;);&quot;CLEAR&quot;;&quot;CONTRADICTION&quot;);IF([.M103]=&quot;SINGLE_SALE_LINKED&quot;;IF(AND([.L103]&lt;&gt;&quot;&quot;;[.N103]=&quot;&quot;);&quot;CLEAR&quot;;&quot;CONTRADICTION&quot;);IF([.M103]=&quot;MULTI_SALE_PENDING_ALLOCATION&quot;;IF([.L103]=&quot;&quot;;&quot;CLEAR&quot;;&quot;CONTRADICTION&quot;);IF([.M103]=&quot;ALLOCATED&quot;;IF(AND([.L103]=&quot;&quot;;[.N103]&lt;&gt;&quot;&quot;);&quot;CLEAR&quot;;&quot;CONTRADICTION&quot;);&quot;CONTRADICTION&quot;)))))">
            <text:p>UNKNOWN</text:p>
          </table:table-cell>
          <table:table-cell office:value-type="string" table:formula="of:=IF([.S103]=&quot;UNKNOWN&quot;;&quot;NO ACTION — linkage status is UNKNOWN / not asserted&quot;;IF([.S103]=&quot;CLEAR&quot;;&quot;NO CONTRADICTION — preserve evidence as entered&quot;;IF([.M103]=&quot;&quot;;&quot;REVIEW LINKAGE STATUS — identifiers are present while status is UNKNOWN&quot;;IF([.M103]=&quot;UNMATCHED&quot;;&quot;REMOVE LINKAGE IDENTIFIERS OR CORRECT LINKAGE STATUS&quot;;IF([.M103]=&quot;SINGLE_SALE_LINKED&quot;;&quot;REQUIRE LINKED SALE ID AND NO ALLOCATION GROUP ID&quot;;IF([.M103]=&quot;MULTI_SALE_PENDING_ALLOCATION&quot;;&quot;REMOVE LINKED SALE ID OR CORRECT LINKAGE STATUS&quot;;IF([.M103]=&quot;ALLOCATED&quot;;&quot;REQUIRE ALLOCATION GROUP ID AND NO LINKED SALE ID&quot;;&quot;REVIEW LINKAGE EVIDENCE — NO AUTHORITY CREATED&quot;)))))))">
            <text:p>NO ACTION — linkage status is UNKNOWN / not asserted</text:p>
          </table:table-cell>
          <table:table-cell office:value-type="string" table:formula="of:=IF([.S103]=&quot;CONTRADICTION&quot;;&quot;BLOCKED&quot;;IF([.S103]=&quot;UNKNOWN&quot;;&quot;UNKNOWN&quot;;IF([.S103]=&quot;CLEAR&quot;;IF(OR([.O103]=&quot;&quot;;[.P103]=&quot;&quot;);&quot;UNKNOWN&quot;;&quot;READY FOR REVIEW&quot;);&quot;BLOCKED&quot;)))">
            <text:p>UNKNOWN</text:p>
          </table:table-cell>
          <table:table-cell office:value-type="string" table:formula="of:=IF([.U103]=&quot;UNKNOWN&quot;;&quot;COMPLETE OR ASSERT REQUIRED EVIDENCE BEFORE REVIEW&quot;;IF([.U103]=&quot;BLOCKED&quot;;&quot;RESOLVE CONTRADICTION BEFORE REVIEW — NO AUTHORITY CREATED&quot;;IF([.U1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3]=&quot;READY FOR REVIEW&quot;;&quot;REVIEW ELIGIBLE — NO AUTHORITY&quot;;IF(OR([.U103]=&quot;UNKNOWN&quot;;[.U10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4]=&quot;&quot;;IF(AND([.L104]=&quot;&quot;;[.N104]=&quot;&quot;);&quot;UNKNOWN&quot;;&quot;CONTRADICTION&quot;);IF([.M104]=&quot;UNMATCHED&quot;;IF(AND([.L104]=&quot;&quot;;[.N104]=&quot;&quot;);&quot;CLEAR&quot;;&quot;CONTRADICTION&quot;);IF([.M104]=&quot;SINGLE_SALE_LINKED&quot;;IF(AND([.L104]&lt;&gt;&quot;&quot;;[.N104]=&quot;&quot;);&quot;CLEAR&quot;;&quot;CONTRADICTION&quot;);IF([.M104]=&quot;MULTI_SALE_PENDING_ALLOCATION&quot;;IF([.L104]=&quot;&quot;;&quot;CLEAR&quot;;&quot;CONTRADICTION&quot;);IF([.M104]=&quot;ALLOCATED&quot;;IF(AND([.L104]=&quot;&quot;;[.N104]&lt;&gt;&quot;&quot;);&quot;CLEAR&quot;;&quot;CONTRADICTION&quot;);&quot;CONTRADICTION&quot;)))))">
            <text:p>UNKNOWN</text:p>
          </table:table-cell>
          <table:table-cell office:value-type="string" table:formula="of:=IF([.S104]=&quot;UNKNOWN&quot;;&quot;NO ACTION — linkage status is UNKNOWN / not asserted&quot;;IF([.S104]=&quot;CLEAR&quot;;&quot;NO CONTRADICTION — preserve evidence as entered&quot;;IF([.M104]=&quot;&quot;;&quot;REVIEW LINKAGE STATUS — identifiers are present while status is UNKNOWN&quot;;IF([.M104]=&quot;UNMATCHED&quot;;&quot;REMOVE LINKAGE IDENTIFIERS OR CORRECT LINKAGE STATUS&quot;;IF([.M104]=&quot;SINGLE_SALE_LINKED&quot;;&quot;REQUIRE LINKED SALE ID AND NO ALLOCATION GROUP ID&quot;;IF([.M104]=&quot;MULTI_SALE_PENDING_ALLOCATION&quot;;&quot;REMOVE LINKED SALE ID OR CORRECT LINKAGE STATUS&quot;;IF([.M104]=&quot;ALLOCATED&quot;;&quot;REQUIRE ALLOCATION GROUP ID AND NO LINKED SALE ID&quot;;&quot;REVIEW LINKAGE EVIDENCE — NO AUTHORITY CREATED&quot;)))))))">
            <text:p>NO ACTION — linkage status is UNKNOWN / not asserted</text:p>
          </table:table-cell>
          <table:table-cell office:value-type="string" table:formula="of:=IF([.S104]=&quot;CONTRADICTION&quot;;&quot;BLOCKED&quot;;IF([.S104]=&quot;UNKNOWN&quot;;&quot;UNKNOWN&quot;;IF([.S104]=&quot;CLEAR&quot;;IF(OR([.O104]=&quot;&quot;;[.P104]=&quot;&quot;);&quot;UNKNOWN&quot;;&quot;READY FOR REVIEW&quot;);&quot;BLOCKED&quot;)))">
            <text:p>UNKNOWN</text:p>
          </table:table-cell>
          <table:table-cell office:value-type="string" table:formula="of:=IF([.U104]=&quot;UNKNOWN&quot;;&quot;COMPLETE OR ASSERT REQUIRED EVIDENCE BEFORE REVIEW&quot;;IF([.U104]=&quot;BLOCKED&quot;;&quot;RESOLVE CONTRADICTION BEFORE REVIEW — NO AUTHORITY CREATED&quot;;IF([.U1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4]=&quot;READY FOR REVIEW&quot;;&quot;REVIEW ELIGIBLE — NO AUTHORITY&quot;;IF(OR([.U104]=&quot;UNKNOWN&quot;;[.U10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5]=&quot;&quot;;IF(AND([.L105]=&quot;&quot;;[.N105]=&quot;&quot;);&quot;UNKNOWN&quot;;&quot;CONTRADICTION&quot;);IF([.M105]=&quot;UNMATCHED&quot;;IF(AND([.L105]=&quot;&quot;;[.N105]=&quot;&quot;);&quot;CLEAR&quot;;&quot;CONTRADICTION&quot;);IF([.M105]=&quot;SINGLE_SALE_LINKED&quot;;IF(AND([.L105]&lt;&gt;&quot;&quot;;[.N105]=&quot;&quot;);&quot;CLEAR&quot;;&quot;CONTRADICTION&quot;);IF([.M105]=&quot;MULTI_SALE_PENDING_ALLOCATION&quot;;IF([.L105]=&quot;&quot;;&quot;CLEAR&quot;;&quot;CONTRADICTION&quot;);IF([.M105]=&quot;ALLOCATED&quot;;IF(AND([.L105]=&quot;&quot;;[.N105]&lt;&gt;&quot;&quot;);&quot;CLEAR&quot;;&quot;CONTRADICTION&quot;);&quot;CONTRADICTION&quot;)))))">
            <text:p>UNKNOWN</text:p>
          </table:table-cell>
          <table:table-cell office:value-type="string" table:formula="of:=IF([.S105]=&quot;UNKNOWN&quot;;&quot;NO ACTION — linkage status is UNKNOWN / not asserted&quot;;IF([.S105]=&quot;CLEAR&quot;;&quot;NO CONTRADICTION — preserve evidence as entered&quot;;IF([.M105]=&quot;&quot;;&quot;REVIEW LINKAGE STATUS — identifiers are present while status is UNKNOWN&quot;;IF([.M105]=&quot;UNMATCHED&quot;;&quot;REMOVE LINKAGE IDENTIFIERS OR CORRECT LINKAGE STATUS&quot;;IF([.M105]=&quot;SINGLE_SALE_LINKED&quot;;&quot;REQUIRE LINKED SALE ID AND NO ALLOCATION GROUP ID&quot;;IF([.M105]=&quot;MULTI_SALE_PENDING_ALLOCATION&quot;;&quot;REMOVE LINKED SALE ID OR CORRECT LINKAGE STATUS&quot;;IF([.M105]=&quot;ALLOCATED&quot;;&quot;REQUIRE ALLOCATION GROUP ID AND NO LINKED SALE ID&quot;;&quot;REVIEW LINKAGE EVIDENCE — NO AUTHORITY CREATED&quot;)))))))">
            <text:p>NO ACTION — linkage status is UNKNOWN / not asserted</text:p>
          </table:table-cell>
          <table:table-cell office:value-type="string" table:formula="of:=IF([.S105]=&quot;CONTRADICTION&quot;;&quot;BLOCKED&quot;;IF([.S105]=&quot;UNKNOWN&quot;;&quot;UNKNOWN&quot;;IF([.S105]=&quot;CLEAR&quot;;IF(OR([.O105]=&quot;&quot;;[.P105]=&quot;&quot;);&quot;UNKNOWN&quot;;&quot;READY FOR REVIEW&quot;);&quot;BLOCKED&quot;)))">
            <text:p>UNKNOWN</text:p>
          </table:table-cell>
          <table:table-cell office:value-type="string" table:formula="of:=IF([.U105]=&quot;UNKNOWN&quot;;&quot;COMPLETE OR ASSERT REQUIRED EVIDENCE BEFORE REVIEW&quot;;IF([.U105]=&quot;BLOCKED&quot;;&quot;RESOLVE CONTRADICTION BEFORE REVIEW — NO AUTHORITY CREATED&quot;;IF([.U1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5]=&quot;READY FOR REVIEW&quot;;&quot;REVIEW ELIGIBLE — NO AUTHORITY&quot;;IF(OR([.U105]=&quot;UNKNOWN&quot;;[.U10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6]=&quot;&quot;;IF(AND([.L106]=&quot;&quot;;[.N106]=&quot;&quot;);&quot;UNKNOWN&quot;;&quot;CONTRADICTION&quot;);IF([.M106]=&quot;UNMATCHED&quot;;IF(AND([.L106]=&quot;&quot;;[.N106]=&quot;&quot;);&quot;CLEAR&quot;;&quot;CONTRADICTION&quot;);IF([.M106]=&quot;SINGLE_SALE_LINKED&quot;;IF(AND([.L106]&lt;&gt;&quot;&quot;;[.N106]=&quot;&quot;);&quot;CLEAR&quot;;&quot;CONTRADICTION&quot;);IF([.M106]=&quot;MULTI_SALE_PENDING_ALLOCATION&quot;;IF([.L106]=&quot;&quot;;&quot;CLEAR&quot;;&quot;CONTRADICTION&quot;);IF([.M106]=&quot;ALLOCATED&quot;;IF(AND([.L106]=&quot;&quot;;[.N106]&lt;&gt;&quot;&quot;);&quot;CLEAR&quot;;&quot;CONTRADICTION&quot;);&quot;CONTRADICTION&quot;)))))">
            <text:p>UNKNOWN</text:p>
          </table:table-cell>
          <table:table-cell office:value-type="string" table:formula="of:=IF([.S106]=&quot;UNKNOWN&quot;;&quot;NO ACTION — linkage status is UNKNOWN / not asserted&quot;;IF([.S106]=&quot;CLEAR&quot;;&quot;NO CONTRADICTION — preserve evidence as entered&quot;;IF([.M106]=&quot;&quot;;&quot;REVIEW LINKAGE STATUS — identifiers are present while status is UNKNOWN&quot;;IF([.M106]=&quot;UNMATCHED&quot;;&quot;REMOVE LINKAGE IDENTIFIERS OR CORRECT LINKAGE STATUS&quot;;IF([.M106]=&quot;SINGLE_SALE_LINKED&quot;;&quot;REQUIRE LINKED SALE ID AND NO ALLOCATION GROUP ID&quot;;IF([.M106]=&quot;MULTI_SALE_PENDING_ALLOCATION&quot;;&quot;REMOVE LINKED SALE ID OR CORRECT LINKAGE STATUS&quot;;IF([.M106]=&quot;ALLOCATED&quot;;&quot;REQUIRE ALLOCATION GROUP ID AND NO LINKED SALE ID&quot;;&quot;REVIEW LINKAGE EVIDENCE — NO AUTHORITY CREATED&quot;)))))))">
            <text:p>NO ACTION — linkage status is UNKNOWN / not asserted</text:p>
          </table:table-cell>
          <table:table-cell office:value-type="string" table:formula="of:=IF([.S106]=&quot;CONTRADICTION&quot;;&quot;BLOCKED&quot;;IF([.S106]=&quot;UNKNOWN&quot;;&quot;UNKNOWN&quot;;IF([.S106]=&quot;CLEAR&quot;;IF(OR([.O106]=&quot;&quot;;[.P106]=&quot;&quot;);&quot;UNKNOWN&quot;;&quot;READY FOR REVIEW&quot;);&quot;BLOCKED&quot;)))">
            <text:p>UNKNOWN</text:p>
          </table:table-cell>
          <table:table-cell office:value-type="string" table:formula="of:=IF([.U106]=&quot;UNKNOWN&quot;;&quot;COMPLETE OR ASSERT REQUIRED EVIDENCE BEFORE REVIEW&quot;;IF([.U106]=&quot;BLOCKED&quot;;&quot;RESOLVE CONTRADICTION BEFORE REVIEW — NO AUTHORITY CREATED&quot;;IF([.U1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6]=&quot;READY FOR REVIEW&quot;;&quot;REVIEW ELIGIBLE — NO AUTHORITY&quot;;IF(OR([.U106]=&quot;UNKNOWN&quot;;[.U10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7]=&quot;&quot;;IF(AND([.L107]=&quot;&quot;;[.N107]=&quot;&quot;);&quot;UNKNOWN&quot;;&quot;CONTRADICTION&quot;);IF([.M107]=&quot;UNMATCHED&quot;;IF(AND([.L107]=&quot;&quot;;[.N107]=&quot;&quot;);&quot;CLEAR&quot;;&quot;CONTRADICTION&quot;);IF([.M107]=&quot;SINGLE_SALE_LINKED&quot;;IF(AND([.L107]&lt;&gt;&quot;&quot;;[.N107]=&quot;&quot;);&quot;CLEAR&quot;;&quot;CONTRADICTION&quot;);IF([.M107]=&quot;MULTI_SALE_PENDING_ALLOCATION&quot;;IF([.L107]=&quot;&quot;;&quot;CLEAR&quot;;&quot;CONTRADICTION&quot;);IF([.M107]=&quot;ALLOCATED&quot;;IF(AND([.L107]=&quot;&quot;;[.N107]&lt;&gt;&quot;&quot;);&quot;CLEAR&quot;;&quot;CONTRADICTION&quot;);&quot;CONTRADICTION&quot;)))))">
            <text:p>UNKNOWN</text:p>
          </table:table-cell>
          <table:table-cell office:value-type="string" table:formula="of:=IF([.S107]=&quot;UNKNOWN&quot;;&quot;NO ACTION — linkage status is UNKNOWN / not asserted&quot;;IF([.S107]=&quot;CLEAR&quot;;&quot;NO CONTRADICTION — preserve evidence as entered&quot;;IF([.M107]=&quot;&quot;;&quot;REVIEW LINKAGE STATUS — identifiers are present while status is UNKNOWN&quot;;IF([.M107]=&quot;UNMATCHED&quot;;&quot;REMOVE LINKAGE IDENTIFIERS OR CORRECT LINKAGE STATUS&quot;;IF([.M107]=&quot;SINGLE_SALE_LINKED&quot;;&quot;REQUIRE LINKED SALE ID AND NO ALLOCATION GROUP ID&quot;;IF([.M107]=&quot;MULTI_SALE_PENDING_ALLOCATION&quot;;&quot;REMOVE LINKED SALE ID OR CORRECT LINKAGE STATUS&quot;;IF([.M107]=&quot;ALLOCATED&quot;;&quot;REQUIRE ALLOCATION GROUP ID AND NO LINKED SALE ID&quot;;&quot;REVIEW LINKAGE EVIDENCE — NO AUTHORITY CREATED&quot;)))))))">
            <text:p>NO ACTION — linkage status is UNKNOWN / not asserted</text:p>
          </table:table-cell>
          <table:table-cell office:value-type="string" table:formula="of:=IF([.S107]=&quot;CONTRADICTION&quot;;&quot;BLOCKED&quot;;IF([.S107]=&quot;UNKNOWN&quot;;&quot;UNKNOWN&quot;;IF([.S107]=&quot;CLEAR&quot;;IF(OR([.O107]=&quot;&quot;;[.P107]=&quot;&quot;);&quot;UNKNOWN&quot;;&quot;READY FOR REVIEW&quot;);&quot;BLOCKED&quot;)))">
            <text:p>UNKNOWN</text:p>
          </table:table-cell>
          <table:table-cell office:value-type="string" table:formula="of:=IF([.U107]=&quot;UNKNOWN&quot;;&quot;COMPLETE OR ASSERT REQUIRED EVIDENCE BEFORE REVIEW&quot;;IF([.U107]=&quot;BLOCKED&quot;;&quot;RESOLVE CONTRADICTION BEFORE REVIEW — NO AUTHORITY CREATED&quot;;IF([.U1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7]=&quot;READY FOR REVIEW&quot;;&quot;REVIEW ELIGIBLE — NO AUTHORITY&quot;;IF(OR([.U107]=&quot;UNKNOWN&quot;;[.U10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8]=&quot;&quot;;IF(AND([.L108]=&quot;&quot;;[.N108]=&quot;&quot;);&quot;UNKNOWN&quot;;&quot;CONTRADICTION&quot;);IF([.M108]=&quot;UNMATCHED&quot;;IF(AND([.L108]=&quot;&quot;;[.N108]=&quot;&quot;);&quot;CLEAR&quot;;&quot;CONTRADICTION&quot;);IF([.M108]=&quot;SINGLE_SALE_LINKED&quot;;IF(AND([.L108]&lt;&gt;&quot;&quot;;[.N108]=&quot;&quot;);&quot;CLEAR&quot;;&quot;CONTRADICTION&quot;);IF([.M108]=&quot;MULTI_SALE_PENDING_ALLOCATION&quot;;IF([.L108]=&quot;&quot;;&quot;CLEAR&quot;;&quot;CONTRADICTION&quot;);IF([.M108]=&quot;ALLOCATED&quot;;IF(AND([.L108]=&quot;&quot;;[.N108]&lt;&gt;&quot;&quot;);&quot;CLEAR&quot;;&quot;CONTRADICTION&quot;);&quot;CONTRADICTION&quot;)))))">
            <text:p>UNKNOWN</text:p>
          </table:table-cell>
          <table:table-cell office:value-type="string" table:formula="of:=IF([.S108]=&quot;UNKNOWN&quot;;&quot;NO ACTION — linkage status is UNKNOWN / not asserted&quot;;IF([.S108]=&quot;CLEAR&quot;;&quot;NO CONTRADICTION — preserve evidence as entered&quot;;IF([.M108]=&quot;&quot;;&quot;REVIEW LINKAGE STATUS — identifiers are present while status is UNKNOWN&quot;;IF([.M108]=&quot;UNMATCHED&quot;;&quot;REMOVE LINKAGE IDENTIFIERS OR CORRECT LINKAGE STATUS&quot;;IF([.M108]=&quot;SINGLE_SALE_LINKED&quot;;&quot;REQUIRE LINKED SALE ID AND NO ALLOCATION GROUP ID&quot;;IF([.M108]=&quot;MULTI_SALE_PENDING_ALLOCATION&quot;;&quot;REMOVE LINKED SALE ID OR CORRECT LINKAGE STATUS&quot;;IF([.M108]=&quot;ALLOCATED&quot;;&quot;REQUIRE ALLOCATION GROUP ID AND NO LINKED SALE ID&quot;;&quot;REVIEW LINKAGE EVIDENCE — NO AUTHORITY CREATED&quot;)))))))">
            <text:p>NO ACTION — linkage status is UNKNOWN / not asserted</text:p>
          </table:table-cell>
          <table:table-cell office:value-type="string" table:formula="of:=IF([.S108]=&quot;CONTRADICTION&quot;;&quot;BLOCKED&quot;;IF([.S108]=&quot;UNKNOWN&quot;;&quot;UNKNOWN&quot;;IF([.S108]=&quot;CLEAR&quot;;IF(OR([.O108]=&quot;&quot;;[.P108]=&quot;&quot;);&quot;UNKNOWN&quot;;&quot;READY FOR REVIEW&quot;);&quot;BLOCKED&quot;)))">
            <text:p>UNKNOWN</text:p>
          </table:table-cell>
          <table:table-cell office:value-type="string" table:formula="of:=IF([.U108]=&quot;UNKNOWN&quot;;&quot;COMPLETE OR ASSERT REQUIRED EVIDENCE BEFORE REVIEW&quot;;IF([.U108]=&quot;BLOCKED&quot;;&quot;RESOLVE CONTRADICTION BEFORE REVIEW — NO AUTHORITY CREATED&quot;;IF([.U1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8]=&quot;READY FOR REVIEW&quot;;&quot;REVIEW ELIGIBLE — NO AUTHORITY&quot;;IF(OR([.U108]=&quot;UNKNOWN&quot;;[.U10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9]=&quot;&quot;;IF(AND([.L109]=&quot;&quot;;[.N109]=&quot;&quot;);&quot;UNKNOWN&quot;;&quot;CONTRADICTION&quot;);IF([.M109]=&quot;UNMATCHED&quot;;IF(AND([.L109]=&quot;&quot;;[.N109]=&quot;&quot;);&quot;CLEAR&quot;;&quot;CONTRADICTION&quot;);IF([.M109]=&quot;SINGLE_SALE_LINKED&quot;;IF(AND([.L109]&lt;&gt;&quot;&quot;;[.N109]=&quot;&quot;);&quot;CLEAR&quot;;&quot;CONTRADICTION&quot;);IF([.M109]=&quot;MULTI_SALE_PENDING_ALLOCATION&quot;;IF([.L109]=&quot;&quot;;&quot;CLEAR&quot;;&quot;CONTRADICTION&quot;);IF([.M109]=&quot;ALLOCATED&quot;;IF(AND([.L109]=&quot;&quot;;[.N109]&lt;&gt;&quot;&quot;);&quot;CLEAR&quot;;&quot;CONTRADICTION&quot;);&quot;CONTRADICTION&quot;)))))">
            <text:p>UNKNOWN</text:p>
          </table:table-cell>
          <table:table-cell office:value-type="string" table:formula="of:=IF([.S109]=&quot;UNKNOWN&quot;;&quot;NO ACTION — linkage status is UNKNOWN / not asserted&quot;;IF([.S109]=&quot;CLEAR&quot;;&quot;NO CONTRADICTION — preserve evidence as entered&quot;;IF([.M109]=&quot;&quot;;&quot;REVIEW LINKAGE STATUS — identifiers are present while status is UNKNOWN&quot;;IF([.M109]=&quot;UNMATCHED&quot;;&quot;REMOVE LINKAGE IDENTIFIERS OR CORRECT LINKAGE STATUS&quot;;IF([.M109]=&quot;SINGLE_SALE_LINKED&quot;;&quot;REQUIRE LINKED SALE ID AND NO ALLOCATION GROUP ID&quot;;IF([.M109]=&quot;MULTI_SALE_PENDING_ALLOCATION&quot;;&quot;REMOVE LINKED SALE ID OR CORRECT LINKAGE STATUS&quot;;IF([.M109]=&quot;ALLOCATED&quot;;&quot;REQUIRE ALLOCATION GROUP ID AND NO LINKED SALE ID&quot;;&quot;REVIEW LINKAGE EVIDENCE — NO AUTHORITY CREATED&quot;)))))))">
            <text:p>NO ACTION — linkage status is UNKNOWN / not asserted</text:p>
          </table:table-cell>
          <table:table-cell office:value-type="string" table:formula="of:=IF([.S109]=&quot;CONTRADICTION&quot;;&quot;BLOCKED&quot;;IF([.S109]=&quot;UNKNOWN&quot;;&quot;UNKNOWN&quot;;IF([.S109]=&quot;CLEAR&quot;;IF(OR([.O109]=&quot;&quot;;[.P109]=&quot;&quot;);&quot;UNKNOWN&quot;;&quot;READY FOR REVIEW&quot;);&quot;BLOCKED&quot;)))">
            <text:p>UNKNOWN</text:p>
          </table:table-cell>
          <table:table-cell office:value-type="string" table:formula="of:=IF([.U109]=&quot;UNKNOWN&quot;;&quot;COMPLETE OR ASSERT REQUIRED EVIDENCE BEFORE REVIEW&quot;;IF([.U109]=&quot;BLOCKED&quot;;&quot;RESOLVE CONTRADICTION BEFORE REVIEW — NO AUTHORITY CREATED&quot;;IF([.U1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9]=&quot;READY FOR REVIEW&quot;;&quot;REVIEW ELIGIBLE — NO AUTHORITY&quot;;IF(OR([.U109]=&quot;UNKNOWN&quot;;[.U10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0]=&quot;&quot;;IF(AND([.L110]=&quot;&quot;;[.N110]=&quot;&quot;);&quot;UNKNOWN&quot;;&quot;CONTRADICTION&quot;);IF([.M110]=&quot;UNMATCHED&quot;;IF(AND([.L110]=&quot;&quot;;[.N110]=&quot;&quot;);&quot;CLEAR&quot;;&quot;CONTRADICTION&quot;);IF([.M110]=&quot;SINGLE_SALE_LINKED&quot;;IF(AND([.L110]&lt;&gt;&quot;&quot;;[.N110]=&quot;&quot;);&quot;CLEAR&quot;;&quot;CONTRADICTION&quot;);IF([.M110]=&quot;MULTI_SALE_PENDING_ALLOCATION&quot;;IF([.L110]=&quot;&quot;;&quot;CLEAR&quot;;&quot;CONTRADICTION&quot;);IF([.M110]=&quot;ALLOCATED&quot;;IF(AND([.L110]=&quot;&quot;;[.N110]&lt;&gt;&quot;&quot;);&quot;CLEAR&quot;;&quot;CONTRADICTION&quot;);&quot;CONTRADICTION&quot;)))))">
            <text:p>UNKNOWN</text:p>
          </table:table-cell>
          <table:table-cell office:value-type="string" table:formula="of:=IF([.S110]=&quot;UNKNOWN&quot;;&quot;NO ACTION — linkage status is UNKNOWN / not asserted&quot;;IF([.S110]=&quot;CLEAR&quot;;&quot;NO CONTRADICTION — preserve evidence as entered&quot;;IF([.M110]=&quot;&quot;;&quot;REVIEW LINKAGE STATUS — identifiers are present while status is UNKNOWN&quot;;IF([.M110]=&quot;UNMATCHED&quot;;&quot;REMOVE LINKAGE IDENTIFIERS OR CORRECT LINKAGE STATUS&quot;;IF([.M110]=&quot;SINGLE_SALE_LINKED&quot;;&quot;REQUIRE LINKED SALE ID AND NO ALLOCATION GROUP ID&quot;;IF([.M110]=&quot;MULTI_SALE_PENDING_ALLOCATION&quot;;&quot;REMOVE LINKED SALE ID OR CORRECT LINKAGE STATUS&quot;;IF([.M110]=&quot;ALLOCATED&quot;;&quot;REQUIRE ALLOCATION GROUP ID AND NO LINKED SALE ID&quot;;&quot;REVIEW LINKAGE EVIDENCE — NO AUTHORITY CREATED&quot;)))))))">
            <text:p>NO ACTION — linkage status is UNKNOWN / not asserted</text:p>
          </table:table-cell>
          <table:table-cell office:value-type="string" table:formula="of:=IF([.S110]=&quot;CONTRADICTION&quot;;&quot;BLOCKED&quot;;IF([.S110]=&quot;UNKNOWN&quot;;&quot;UNKNOWN&quot;;IF([.S110]=&quot;CLEAR&quot;;IF(OR([.O110]=&quot;&quot;;[.P110]=&quot;&quot;);&quot;UNKNOWN&quot;;&quot;READY FOR REVIEW&quot;);&quot;BLOCKED&quot;)))">
            <text:p>UNKNOWN</text:p>
          </table:table-cell>
          <table:table-cell office:value-type="string" table:formula="of:=IF([.U110]=&quot;UNKNOWN&quot;;&quot;COMPLETE OR ASSERT REQUIRED EVIDENCE BEFORE REVIEW&quot;;IF([.U110]=&quot;BLOCKED&quot;;&quot;RESOLVE CONTRADICTION BEFORE REVIEW — NO AUTHORITY CREATED&quot;;IF([.U1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0]=&quot;READY FOR REVIEW&quot;;&quot;REVIEW ELIGIBLE — NO AUTHORITY&quot;;IF(OR([.U110]=&quot;UNKNOWN&quot;;[.U11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1]=&quot;&quot;;IF(AND([.L111]=&quot;&quot;;[.N111]=&quot;&quot;);&quot;UNKNOWN&quot;;&quot;CONTRADICTION&quot;);IF([.M111]=&quot;UNMATCHED&quot;;IF(AND([.L111]=&quot;&quot;;[.N111]=&quot;&quot;);&quot;CLEAR&quot;;&quot;CONTRADICTION&quot;);IF([.M111]=&quot;SINGLE_SALE_LINKED&quot;;IF(AND([.L111]&lt;&gt;&quot;&quot;;[.N111]=&quot;&quot;);&quot;CLEAR&quot;;&quot;CONTRADICTION&quot;);IF([.M111]=&quot;MULTI_SALE_PENDING_ALLOCATION&quot;;IF([.L111]=&quot;&quot;;&quot;CLEAR&quot;;&quot;CONTRADICTION&quot;);IF([.M111]=&quot;ALLOCATED&quot;;IF(AND([.L111]=&quot;&quot;;[.N111]&lt;&gt;&quot;&quot;);&quot;CLEAR&quot;;&quot;CONTRADICTION&quot;);&quot;CONTRADICTION&quot;)))))">
            <text:p>UNKNOWN</text:p>
          </table:table-cell>
          <table:table-cell office:value-type="string" table:formula="of:=IF([.S111]=&quot;UNKNOWN&quot;;&quot;NO ACTION — linkage status is UNKNOWN / not asserted&quot;;IF([.S111]=&quot;CLEAR&quot;;&quot;NO CONTRADICTION — preserve evidence as entered&quot;;IF([.M111]=&quot;&quot;;&quot;REVIEW LINKAGE STATUS — identifiers are present while status is UNKNOWN&quot;;IF([.M111]=&quot;UNMATCHED&quot;;&quot;REMOVE LINKAGE IDENTIFIERS OR CORRECT LINKAGE STATUS&quot;;IF([.M111]=&quot;SINGLE_SALE_LINKED&quot;;&quot;REQUIRE LINKED SALE ID AND NO ALLOCATION GROUP ID&quot;;IF([.M111]=&quot;MULTI_SALE_PENDING_ALLOCATION&quot;;&quot;REMOVE LINKED SALE ID OR CORRECT LINKAGE STATUS&quot;;IF([.M111]=&quot;ALLOCATED&quot;;&quot;REQUIRE ALLOCATION GROUP ID AND NO LINKED SALE ID&quot;;&quot;REVIEW LINKAGE EVIDENCE — NO AUTHORITY CREATED&quot;)))))))">
            <text:p>NO ACTION — linkage status is UNKNOWN / not asserted</text:p>
          </table:table-cell>
          <table:table-cell office:value-type="string" table:formula="of:=IF([.S111]=&quot;CONTRADICTION&quot;;&quot;BLOCKED&quot;;IF([.S111]=&quot;UNKNOWN&quot;;&quot;UNKNOWN&quot;;IF([.S111]=&quot;CLEAR&quot;;IF(OR([.O111]=&quot;&quot;;[.P111]=&quot;&quot;);&quot;UNKNOWN&quot;;&quot;READY FOR REVIEW&quot;);&quot;BLOCKED&quot;)))">
            <text:p>UNKNOWN</text:p>
          </table:table-cell>
          <table:table-cell office:value-type="string" table:formula="of:=IF([.U111]=&quot;UNKNOWN&quot;;&quot;COMPLETE OR ASSERT REQUIRED EVIDENCE BEFORE REVIEW&quot;;IF([.U111]=&quot;BLOCKED&quot;;&quot;RESOLVE CONTRADICTION BEFORE REVIEW — NO AUTHORITY CREATED&quot;;IF([.U1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1]=&quot;READY FOR REVIEW&quot;;&quot;REVIEW ELIGIBLE — NO AUTHORITY&quot;;IF(OR([.U111]=&quot;UNKNOWN&quot;;[.U11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2]=&quot;&quot;;IF(AND([.L112]=&quot;&quot;;[.N112]=&quot;&quot;);&quot;UNKNOWN&quot;;&quot;CONTRADICTION&quot;);IF([.M112]=&quot;UNMATCHED&quot;;IF(AND([.L112]=&quot;&quot;;[.N112]=&quot;&quot;);&quot;CLEAR&quot;;&quot;CONTRADICTION&quot;);IF([.M112]=&quot;SINGLE_SALE_LINKED&quot;;IF(AND([.L112]&lt;&gt;&quot;&quot;;[.N112]=&quot;&quot;);&quot;CLEAR&quot;;&quot;CONTRADICTION&quot;);IF([.M112]=&quot;MULTI_SALE_PENDING_ALLOCATION&quot;;IF([.L112]=&quot;&quot;;&quot;CLEAR&quot;;&quot;CONTRADICTION&quot;);IF([.M112]=&quot;ALLOCATED&quot;;IF(AND([.L112]=&quot;&quot;;[.N112]&lt;&gt;&quot;&quot;);&quot;CLEAR&quot;;&quot;CONTRADICTION&quot;);&quot;CONTRADICTION&quot;)))))">
            <text:p>UNKNOWN</text:p>
          </table:table-cell>
          <table:table-cell office:value-type="string" table:formula="of:=IF([.S112]=&quot;UNKNOWN&quot;;&quot;NO ACTION — linkage status is UNKNOWN / not asserted&quot;;IF([.S112]=&quot;CLEAR&quot;;&quot;NO CONTRADICTION — preserve evidence as entered&quot;;IF([.M112]=&quot;&quot;;&quot;REVIEW LINKAGE STATUS — identifiers are present while status is UNKNOWN&quot;;IF([.M112]=&quot;UNMATCHED&quot;;&quot;REMOVE LINKAGE IDENTIFIERS OR CORRECT LINKAGE STATUS&quot;;IF([.M112]=&quot;SINGLE_SALE_LINKED&quot;;&quot;REQUIRE LINKED SALE ID AND NO ALLOCATION GROUP ID&quot;;IF([.M112]=&quot;MULTI_SALE_PENDING_ALLOCATION&quot;;&quot;REMOVE LINKED SALE ID OR CORRECT LINKAGE STATUS&quot;;IF([.M112]=&quot;ALLOCATED&quot;;&quot;REQUIRE ALLOCATION GROUP ID AND NO LINKED SALE ID&quot;;&quot;REVIEW LINKAGE EVIDENCE — NO AUTHORITY CREATED&quot;)))))))">
            <text:p>NO ACTION — linkage status is UNKNOWN / not asserted</text:p>
          </table:table-cell>
          <table:table-cell office:value-type="string" table:formula="of:=IF([.S112]=&quot;CONTRADICTION&quot;;&quot;BLOCKED&quot;;IF([.S112]=&quot;UNKNOWN&quot;;&quot;UNKNOWN&quot;;IF([.S112]=&quot;CLEAR&quot;;IF(OR([.O112]=&quot;&quot;;[.P112]=&quot;&quot;);&quot;UNKNOWN&quot;;&quot;READY FOR REVIEW&quot;);&quot;BLOCKED&quot;)))">
            <text:p>UNKNOWN</text:p>
          </table:table-cell>
          <table:table-cell office:value-type="string" table:formula="of:=IF([.U112]=&quot;UNKNOWN&quot;;&quot;COMPLETE OR ASSERT REQUIRED EVIDENCE BEFORE REVIEW&quot;;IF([.U112]=&quot;BLOCKED&quot;;&quot;RESOLVE CONTRADICTION BEFORE REVIEW — NO AUTHORITY CREATED&quot;;IF([.U1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2]=&quot;READY FOR REVIEW&quot;;&quot;REVIEW ELIGIBLE — NO AUTHORITY&quot;;IF(OR([.U112]=&quot;UNKNOWN&quot;;[.U11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3]=&quot;&quot;;IF(AND([.L113]=&quot;&quot;;[.N113]=&quot;&quot;);&quot;UNKNOWN&quot;;&quot;CONTRADICTION&quot;);IF([.M113]=&quot;UNMATCHED&quot;;IF(AND([.L113]=&quot;&quot;;[.N113]=&quot;&quot;);&quot;CLEAR&quot;;&quot;CONTRADICTION&quot;);IF([.M113]=&quot;SINGLE_SALE_LINKED&quot;;IF(AND([.L113]&lt;&gt;&quot;&quot;;[.N113]=&quot;&quot;);&quot;CLEAR&quot;;&quot;CONTRADICTION&quot;);IF([.M113]=&quot;MULTI_SALE_PENDING_ALLOCATION&quot;;IF([.L113]=&quot;&quot;;&quot;CLEAR&quot;;&quot;CONTRADICTION&quot;);IF([.M113]=&quot;ALLOCATED&quot;;IF(AND([.L113]=&quot;&quot;;[.N113]&lt;&gt;&quot;&quot;);&quot;CLEAR&quot;;&quot;CONTRADICTION&quot;);&quot;CONTRADICTION&quot;)))))">
            <text:p>UNKNOWN</text:p>
          </table:table-cell>
          <table:table-cell office:value-type="string" table:formula="of:=IF([.S113]=&quot;UNKNOWN&quot;;&quot;NO ACTION — linkage status is UNKNOWN / not asserted&quot;;IF([.S113]=&quot;CLEAR&quot;;&quot;NO CONTRADICTION — preserve evidence as entered&quot;;IF([.M113]=&quot;&quot;;&quot;REVIEW LINKAGE STATUS — identifiers are present while status is UNKNOWN&quot;;IF([.M113]=&quot;UNMATCHED&quot;;&quot;REMOVE LINKAGE IDENTIFIERS OR CORRECT LINKAGE STATUS&quot;;IF([.M113]=&quot;SINGLE_SALE_LINKED&quot;;&quot;REQUIRE LINKED SALE ID AND NO ALLOCATION GROUP ID&quot;;IF([.M113]=&quot;MULTI_SALE_PENDING_ALLOCATION&quot;;&quot;REMOVE LINKED SALE ID OR CORRECT LINKAGE STATUS&quot;;IF([.M113]=&quot;ALLOCATED&quot;;&quot;REQUIRE ALLOCATION GROUP ID AND NO LINKED SALE ID&quot;;&quot;REVIEW LINKAGE EVIDENCE — NO AUTHORITY CREATED&quot;)))))))">
            <text:p>NO ACTION — linkage status is UNKNOWN / not asserted</text:p>
          </table:table-cell>
          <table:table-cell office:value-type="string" table:formula="of:=IF([.S113]=&quot;CONTRADICTION&quot;;&quot;BLOCKED&quot;;IF([.S113]=&quot;UNKNOWN&quot;;&quot;UNKNOWN&quot;;IF([.S113]=&quot;CLEAR&quot;;IF(OR([.O113]=&quot;&quot;;[.P113]=&quot;&quot;);&quot;UNKNOWN&quot;;&quot;READY FOR REVIEW&quot;);&quot;BLOCKED&quot;)))">
            <text:p>UNKNOWN</text:p>
          </table:table-cell>
          <table:table-cell office:value-type="string" table:formula="of:=IF([.U113]=&quot;UNKNOWN&quot;;&quot;COMPLETE OR ASSERT REQUIRED EVIDENCE BEFORE REVIEW&quot;;IF([.U113]=&quot;BLOCKED&quot;;&quot;RESOLVE CONTRADICTION BEFORE REVIEW — NO AUTHORITY CREATED&quot;;IF([.U1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3]=&quot;READY FOR REVIEW&quot;;&quot;REVIEW ELIGIBLE — NO AUTHORITY&quot;;IF(OR([.U113]=&quot;UNKNOWN&quot;;[.U11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4]=&quot;&quot;;IF(AND([.L114]=&quot;&quot;;[.N114]=&quot;&quot;);&quot;UNKNOWN&quot;;&quot;CONTRADICTION&quot;);IF([.M114]=&quot;UNMATCHED&quot;;IF(AND([.L114]=&quot;&quot;;[.N114]=&quot;&quot;);&quot;CLEAR&quot;;&quot;CONTRADICTION&quot;);IF([.M114]=&quot;SINGLE_SALE_LINKED&quot;;IF(AND([.L114]&lt;&gt;&quot;&quot;;[.N114]=&quot;&quot;);&quot;CLEAR&quot;;&quot;CONTRADICTION&quot;);IF([.M114]=&quot;MULTI_SALE_PENDING_ALLOCATION&quot;;IF([.L114]=&quot;&quot;;&quot;CLEAR&quot;;&quot;CONTRADICTION&quot;);IF([.M114]=&quot;ALLOCATED&quot;;IF(AND([.L114]=&quot;&quot;;[.N114]&lt;&gt;&quot;&quot;);&quot;CLEAR&quot;;&quot;CONTRADICTION&quot;);&quot;CONTRADICTION&quot;)))))">
            <text:p>UNKNOWN</text:p>
          </table:table-cell>
          <table:table-cell office:value-type="string" table:formula="of:=IF([.S114]=&quot;UNKNOWN&quot;;&quot;NO ACTION — linkage status is UNKNOWN / not asserted&quot;;IF([.S114]=&quot;CLEAR&quot;;&quot;NO CONTRADICTION — preserve evidence as entered&quot;;IF([.M114]=&quot;&quot;;&quot;REVIEW LINKAGE STATUS — identifiers are present while status is UNKNOWN&quot;;IF([.M114]=&quot;UNMATCHED&quot;;&quot;REMOVE LINKAGE IDENTIFIERS OR CORRECT LINKAGE STATUS&quot;;IF([.M114]=&quot;SINGLE_SALE_LINKED&quot;;&quot;REQUIRE LINKED SALE ID AND NO ALLOCATION GROUP ID&quot;;IF([.M114]=&quot;MULTI_SALE_PENDING_ALLOCATION&quot;;&quot;REMOVE LINKED SALE ID OR CORRECT LINKAGE STATUS&quot;;IF([.M114]=&quot;ALLOCATED&quot;;&quot;REQUIRE ALLOCATION GROUP ID AND NO LINKED SALE ID&quot;;&quot;REVIEW LINKAGE EVIDENCE — NO AUTHORITY CREATED&quot;)))))))">
            <text:p>NO ACTION — linkage status is UNKNOWN / not asserted</text:p>
          </table:table-cell>
          <table:table-cell office:value-type="string" table:formula="of:=IF([.S114]=&quot;CONTRADICTION&quot;;&quot;BLOCKED&quot;;IF([.S114]=&quot;UNKNOWN&quot;;&quot;UNKNOWN&quot;;IF([.S114]=&quot;CLEAR&quot;;IF(OR([.O114]=&quot;&quot;;[.P114]=&quot;&quot;);&quot;UNKNOWN&quot;;&quot;READY FOR REVIEW&quot;);&quot;BLOCKED&quot;)))">
            <text:p>UNKNOWN</text:p>
          </table:table-cell>
          <table:table-cell office:value-type="string" table:formula="of:=IF([.U114]=&quot;UNKNOWN&quot;;&quot;COMPLETE OR ASSERT REQUIRED EVIDENCE BEFORE REVIEW&quot;;IF([.U114]=&quot;BLOCKED&quot;;&quot;RESOLVE CONTRADICTION BEFORE REVIEW — NO AUTHORITY CREATED&quot;;IF([.U1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4]=&quot;READY FOR REVIEW&quot;;&quot;REVIEW ELIGIBLE — NO AUTHORITY&quot;;IF(OR([.U114]=&quot;UNKNOWN&quot;;[.U11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5]=&quot;&quot;;IF(AND([.L115]=&quot;&quot;;[.N115]=&quot;&quot;);&quot;UNKNOWN&quot;;&quot;CONTRADICTION&quot;);IF([.M115]=&quot;UNMATCHED&quot;;IF(AND([.L115]=&quot;&quot;;[.N115]=&quot;&quot;);&quot;CLEAR&quot;;&quot;CONTRADICTION&quot;);IF([.M115]=&quot;SINGLE_SALE_LINKED&quot;;IF(AND([.L115]&lt;&gt;&quot;&quot;;[.N115]=&quot;&quot;);&quot;CLEAR&quot;;&quot;CONTRADICTION&quot;);IF([.M115]=&quot;MULTI_SALE_PENDING_ALLOCATION&quot;;IF([.L115]=&quot;&quot;;&quot;CLEAR&quot;;&quot;CONTRADICTION&quot;);IF([.M115]=&quot;ALLOCATED&quot;;IF(AND([.L115]=&quot;&quot;;[.N115]&lt;&gt;&quot;&quot;);&quot;CLEAR&quot;;&quot;CONTRADICTION&quot;);&quot;CONTRADICTION&quot;)))))">
            <text:p>UNKNOWN</text:p>
          </table:table-cell>
          <table:table-cell office:value-type="string" table:formula="of:=IF([.S115]=&quot;UNKNOWN&quot;;&quot;NO ACTION — linkage status is UNKNOWN / not asserted&quot;;IF([.S115]=&quot;CLEAR&quot;;&quot;NO CONTRADICTION — preserve evidence as entered&quot;;IF([.M115]=&quot;&quot;;&quot;REVIEW LINKAGE STATUS — identifiers are present while status is UNKNOWN&quot;;IF([.M115]=&quot;UNMATCHED&quot;;&quot;REMOVE LINKAGE IDENTIFIERS OR CORRECT LINKAGE STATUS&quot;;IF([.M115]=&quot;SINGLE_SALE_LINKED&quot;;&quot;REQUIRE LINKED SALE ID AND NO ALLOCATION GROUP ID&quot;;IF([.M115]=&quot;MULTI_SALE_PENDING_ALLOCATION&quot;;&quot;REMOVE LINKED SALE ID OR CORRECT LINKAGE STATUS&quot;;IF([.M115]=&quot;ALLOCATED&quot;;&quot;REQUIRE ALLOCATION GROUP ID AND NO LINKED SALE ID&quot;;&quot;REVIEW LINKAGE EVIDENCE — NO AUTHORITY CREATED&quot;)))))))">
            <text:p>NO ACTION — linkage status is UNKNOWN / not asserted</text:p>
          </table:table-cell>
          <table:table-cell office:value-type="string" table:formula="of:=IF([.S115]=&quot;CONTRADICTION&quot;;&quot;BLOCKED&quot;;IF([.S115]=&quot;UNKNOWN&quot;;&quot;UNKNOWN&quot;;IF([.S115]=&quot;CLEAR&quot;;IF(OR([.O115]=&quot;&quot;;[.P115]=&quot;&quot;);&quot;UNKNOWN&quot;;&quot;READY FOR REVIEW&quot;);&quot;BLOCKED&quot;)))">
            <text:p>UNKNOWN</text:p>
          </table:table-cell>
          <table:table-cell office:value-type="string" table:formula="of:=IF([.U115]=&quot;UNKNOWN&quot;;&quot;COMPLETE OR ASSERT REQUIRED EVIDENCE BEFORE REVIEW&quot;;IF([.U115]=&quot;BLOCKED&quot;;&quot;RESOLVE CONTRADICTION BEFORE REVIEW — NO AUTHORITY CREATED&quot;;IF([.U1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5]=&quot;READY FOR REVIEW&quot;;&quot;REVIEW ELIGIBLE — NO AUTHORITY&quot;;IF(OR([.U115]=&quot;UNKNOWN&quot;;[.U11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6]=&quot;&quot;;IF(AND([.L116]=&quot;&quot;;[.N116]=&quot;&quot;);&quot;UNKNOWN&quot;;&quot;CONTRADICTION&quot;);IF([.M116]=&quot;UNMATCHED&quot;;IF(AND([.L116]=&quot;&quot;;[.N116]=&quot;&quot;);&quot;CLEAR&quot;;&quot;CONTRADICTION&quot;);IF([.M116]=&quot;SINGLE_SALE_LINKED&quot;;IF(AND([.L116]&lt;&gt;&quot;&quot;;[.N116]=&quot;&quot;);&quot;CLEAR&quot;;&quot;CONTRADICTION&quot;);IF([.M116]=&quot;MULTI_SALE_PENDING_ALLOCATION&quot;;IF([.L116]=&quot;&quot;;&quot;CLEAR&quot;;&quot;CONTRADICTION&quot;);IF([.M116]=&quot;ALLOCATED&quot;;IF(AND([.L116]=&quot;&quot;;[.N116]&lt;&gt;&quot;&quot;);&quot;CLEAR&quot;;&quot;CONTRADICTION&quot;);&quot;CONTRADICTION&quot;)))))">
            <text:p>UNKNOWN</text:p>
          </table:table-cell>
          <table:table-cell office:value-type="string" table:formula="of:=IF([.S116]=&quot;UNKNOWN&quot;;&quot;NO ACTION — linkage status is UNKNOWN / not asserted&quot;;IF([.S116]=&quot;CLEAR&quot;;&quot;NO CONTRADICTION — preserve evidence as entered&quot;;IF([.M116]=&quot;&quot;;&quot;REVIEW LINKAGE STATUS — identifiers are present while status is UNKNOWN&quot;;IF([.M116]=&quot;UNMATCHED&quot;;&quot;REMOVE LINKAGE IDENTIFIERS OR CORRECT LINKAGE STATUS&quot;;IF([.M116]=&quot;SINGLE_SALE_LINKED&quot;;&quot;REQUIRE LINKED SALE ID AND NO ALLOCATION GROUP ID&quot;;IF([.M116]=&quot;MULTI_SALE_PENDING_ALLOCATION&quot;;&quot;REMOVE LINKED SALE ID OR CORRECT LINKAGE STATUS&quot;;IF([.M116]=&quot;ALLOCATED&quot;;&quot;REQUIRE ALLOCATION GROUP ID AND NO LINKED SALE ID&quot;;&quot;REVIEW LINKAGE EVIDENCE — NO AUTHORITY CREATED&quot;)))))))">
            <text:p>NO ACTION — linkage status is UNKNOWN / not asserted</text:p>
          </table:table-cell>
          <table:table-cell office:value-type="string" table:formula="of:=IF([.S116]=&quot;CONTRADICTION&quot;;&quot;BLOCKED&quot;;IF([.S116]=&quot;UNKNOWN&quot;;&quot;UNKNOWN&quot;;IF([.S116]=&quot;CLEAR&quot;;IF(OR([.O116]=&quot;&quot;;[.P116]=&quot;&quot;);&quot;UNKNOWN&quot;;&quot;READY FOR REVIEW&quot;);&quot;BLOCKED&quot;)))">
            <text:p>UNKNOWN</text:p>
          </table:table-cell>
          <table:table-cell office:value-type="string" table:formula="of:=IF([.U116]=&quot;UNKNOWN&quot;;&quot;COMPLETE OR ASSERT REQUIRED EVIDENCE BEFORE REVIEW&quot;;IF([.U116]=&quot;BLOCKED&quot;;&quot;RESOLVE CONTRADICTION BEFORE REVIEW — NO AUTHORITY CREATED&quot;;IF([.U1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6]=&quot;READY FOR REVIEW&quot;;&quot;REVIEW ELIGIBLE — NO AUTHORITY&quot;;IF(OR([.U116]=&quot;UNKNOWN&quot;;[.U11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7]=&quot;&quot;;IF(AND([.L117]=&quot;&quot;;[.N117]=&quot;&quot;);&quot;UNKNOWN&quot;;&quot;CONTRADICTION&quot;);IF([.M117]=&quot;UNMATCHED&quot;;IF(AND([.L117]=&quot;&quot;;[.N117]=&quot;&quot;);&quot;CLEAR&quot;;&quot;CONTRADICTION&quot;);IF([.M117]=&quot;SINGLE_SALE_LINKED&quot;;IF(AND([.L117]&lt;&gt;&quot;&quot;;[.N117]=&quot;&quot;);&quot;CLEAR&quot;;&quot;CONTRADICTION&quot;);IF([.M117]=&quot;MULTI_SALE_PENDING_ALLOCATION&quot;;IF([.L117]=&quot;&quot;;&quot;CLEAR&quot;;&quot;CONTRADICTION&quot;);IF([.M117]=&quot;ALLOCATED&quot;;IF(AND([.L117]=&quot;&quot;;[.N117]&lt;&gt;&quot;&quot;);&quot;CLEAR&quot;;&quot;CONTRADICTION&quot;);&quot;CONTRADICTION&quot;)))))">
            <text:p>UNKNOWN</text:p>
          </table:table-cell>
          <table:table-cell office:value-type="string" table:formula="of:=IF([.S117]=&quot;UNKNOWN&quot;;&quot;NO ACTION — linkage status is UNKNOWN / not asserted&quot;;IF([.S117]=&quot;CLEAR&quot;;&quot;NO CONTRADICTION — preserve evidence as entered&quot;;IF([.M117]=&quot;&quot;;&quot;REVIEW LINKAGE STATUS — identifiers are present while status is UNKNOWN&quot;;IF([.M117]=&quot;UNMATCHED&quot;;&quot;REMOVE LINKAGE IDENTIFIERS OR CORRECT LINKAGE STATUS&quot;;IF([.M117]=&quot;SINGLE_SALE_LINKED&quot;;&quot;REQUIRE LINKED SALE ID AND NO ALLOCATION GROUP ID&quot;;IF([.M117]=&quot;MULTI_SALE_PENDING_ALLOCATION&quot;;&quot;REMOVE LINKED SALE ID OR CORRECT LINKAGE STATUS&quot;;IF([.M117]=&quot;ALLOCATED&quot;;&quot;REQUIRE ALLOCATION GROUP ID AND NO LINKED SALE ID&quot;;&quot;REVIEW LINKAGE EVIDENCE — NO AUTHORITY CREATED&quot;)))))))">
            <text:p>NO ACTION — linkage status is UNKNOWN / not asserted</text:p>
          </table:table-cell>
          <table:table-cell office:value-type="string" table:formula="of:=IF([.S117]=&quot;CONTRADICTION&quot;;&quot;BLOCKED&quot;;IF([.S117]=&quot;UNKNOWN&quot;;&quot;UNKNOWN&quot;;IF([.S117]=&quot;CLEAR&quot;;IF(OR([.O117]=&quot;&quot;;[.P117]=&quot;&quot;);&quot;UNKNOWN&quot;;&quot;READY FOR REVIEW&quot;);&quot;BLOCKED&quot;)))">
            <text:p>UNKNOWN</text:p>
          </table:table-cell>
          <table:table-cell office:value-type="string" table:formula="of:=IF([.U117]=&quot;UNKNOWN&quot;;&quot;COMPLETE OR ASSERT REQUIRED EVIDENCE BEFORE REVIEW&quot;;IF([.U117]=&quot;BLOCKED&quot;;&quot;RESOLVE CONTRADICTION BEFORE REVIEW — NO AUTHORITY CREATED&quot;;IF([.U1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7]=&quot;READY FOR REVIEW&quot;;&quot;REVIEW ELIGIBLE — NO AUTHORITY&quot;;IF(OR([.U117]=&quot;UNKNOWN&quot;;[.U11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8]=&quot;&quot;;IF(AND([.L118]=&quot;&quot;;[.N118]=&quot;&quot;);&quot;UNKNOWN&quot;;&quot;CONTRADICTION&quot;);IF([.M118]=&quot;UNMATCHED&quot;;IF(AND([.L118]=&quot;&quot;;[.N118]=&quot;&quot;);&quot;CLEAR&quot;;&quot;CONTRADICTION&quot;);IF([.M118]=&quot;SINGLE_SALE_LINKED&quot;;IF(AND([.L118]&lt;&gt;&quot;&quot;;[.N118]=&quot;&quot;);&quot;CLEAR&quot;;&quot;CONTRADICTION&quot;);IF([.M118]=&quot;MULTI_SALE_PENDING_ALLOCATION&quot;;IF([.L118]=&quot;&quot;;&quot;CLEAR&quot;;&quot;CONTRADICTION&quot;);IF([.M118]=&quot;ALLOCATED&quot;;IF(AND([.L118]=&quot;&quot;;[.N118]&lt;&gt;&quot;&quot;);&quot;CLEAR&quot;;&quot;CONTRADICTION&quot;);&quot;CONTRADICTION&quot;)))))">
            <text:p>UNKNOWN</text:p>
          </table:table-cell>
          <table:table-cell office:value-type="string" table:formula="of:=IF([.S118]=&quot;UNKNOWN&quot;;&quot;NO ACTION — linkage status is UNKNOWN / not asserted&quot;;IF([.S118]=&quot;CLEAR&quot;;&quot;NO CONTRADICTION — preserve evidence as entered&quot;;IF([.M118]=&quot;&quot;;&quot;REVIEW LINKAGE STATUS — identifiers are present while status is UNKNOWN&quot;;IF([.M118]=&quot;UNMATCHED&quot;;&quot;REMOVE LINKAGE IDENTIFIERS OR CORRECT LINKAGE STATUS&quot;;IF([.M118]=&quot;SINGLE_SALE_LINKED&quot;;&quot;REQUIRE LINKED SALE ID AND NO ALLOCATION GROUP ID&quot;;IF([.M118]=&quot;MULTI_SALE_PENDING_ALLOCATION&quot;;&quot;REMOVE LINKED SALE ID OR CORRECT LINKAGE STATUS&quot;;IF([.M118]=&quot;ALLOCATED&quot;;&quot;REQUIRE ALLOCATION GROUP ID AND NO LINKED SALE ID&quot;;&quot;REVIEW LINKAGE EVIDENCE — NO AUTHORITY CREATED&quot;)))))))">
            <text:p>NO ACTION — linkage status is UNKNOWN / not asserted</text:p>
          </table:table-cell>
          <table:table-cell office:value-type="string" table:formula="of:=IF([.S118]=&quot;CONTRADICTION&quot;;&quot;BLOCKED&quot;;IF([.S118]=&quot;UNKNOWN&quot;;&quot;UNKNOWN&quot;;IF([.S118]=&quot;CLEAR&quot;;IF(OR([.O118]=&quot;&quot;;[.P118]=&quot;&quot;);&quot;UNKNOWN&quot;;&quot;READY FOR REVIEW&quot;);&quot;BLOCKED&quot;)))">
            <text:p>UNKNOWN</text:p>
          </table:table-cell>
          <table:table-cell office:value-type="string" table:formula="of:=IF([.U118]=&quot;UNKNOWN&quot;;&quot;COMPLETE OR ASSERT REQUIRED EVIDENCE BEFORE REVIEW&quot;;IF([.U118]=&quot;BLOCKED&quot;;&quot;RESOLVE CONTRADICTION BEFORE REVIEW — NO AUTHORITY CREATED&quot;;IF([.U1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8]=&quot;READY FOR REVIEW&quot;;&quot;REVIEW ELIGIBLE — NO AUTHORITY&quot;;IF(OR([.U118]=&quot;UNKNOWN&quot;;[.U11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9]=&quot;&quot;;IF(AND([.L119]=&quot;&quot;;[.N119]=&quot;&quot;);&quot;UNKNOWN&quot;;&quot;CONTRADICTION&quot;);IF([.M119]=&quot;UNMATCHED&quot;;IF(AND([.L119]=&quot;&quot;;[.N119]=&quot;&quot;);&quot;CLEAR&quot;;&quot;CONTRADICTION&quot;);IF([.M119]=&quot;SINGLE_SALE_LINKED&quot;;IF(AND([.L119]&lt;&gt;&quot;&quot;;[.N119]=&quot;&quot;);&quot;CLEAR&quot;;&quot;CONTRADICTION&quot;);IF([.M119]=&quot;MULTI_SALE_PENDING_ALLOCATION&quot;;IF([.L119]=&quot;&quot;;&quot;CLEAR&quot;;&quot;CONTRADICTION&quot;);IF([.M119]=&quot;ALLOCATED&quot;;IF(AND([.L119]=&quot;&quot;;[.N119]&lt;&gt;&quot;&quot;);&quot;CLEAR&quot;;&quot;CONTRADICTION&quot;);&quot;CONTRADICTION&quot;)))))">
            <text:p>UNKNOWN</text:p>
          </table:table-cell>
          <table:table-cell office:value-type="string" table:formula="of:=IF([.S119]=&quot;UNKNOWN&quot;;&quot;NO ACTION — linkage status is UNKNOWN / not asserted&quot;;IF([.S119]=&quot;CLEAR&quot;;&quot;NO CONTRADICTION — preserve evidence as entered&quot;;IF([.M119]=&quot;&quot;;&quot;REVIEW LINKAGE STATUS — identifiers are present while status is UNKNOWN&quot;;IF([.M119]=&quot;UNMATCHED&quot;;&quot;REMOVE LINKAGE IDENTIFIERS OR CORRECT LINKAGE STATUS&quot;;IF([.M119]=&quot;SINGLE_SALE_LINKED&quot;;&quot;REQUIRE LINKED SALE ID AND NO ALLOCATION GROUP ID&quot;;IF([.M119]=&quot;MULTI_SALE_PENDING_ALLOCATION&quot;;&quot;REMOVE LINKED SALE ID OR CORRECT LINKAGE STATUS&quot;;IF([.M119]=&quot;ALLOCATED&quot;;&quot;REQUIRE ALLOCATION GROUP ID AND NO LINKED SALE ID&quot;;&quot;REVIEW LINKAGE EVIDENCE — NO AUTHORITY CREATED&quot;)))))))">
            <text:p>NO ACTION — linkage status is UNKNOWN / not asserted</text:p>
          </table:table-cell>
          <table:table-cell office:value-type="string" table:formula="of:=IF([.S119]=&quot;CONTRADICTION&quot;;&quot;BLOCKED&quot;;IF([.S119]=&quot;UNKNOWN&quot;;&quot;UNKNOWN&quot;;IF([.S119]=&quot;CLEAR&quot;;IF(OR([.O119]=&quot;&quot;;[.P119]=&quot;&quot;);&quot;UNKNOWN&quot;;&quot;READY FOR REVIEW&quot;);&quot;BLOCKED&quot;)))">
            <text:p>UNKNOWN</text:p>
          </table:table-cell>
          <table:table-cell office:value-type="string" table:formula="of:=IF([.U119]=&quot;UNKNOWN&quot;;&quot;COMPLETE OR ASSERT REQUIRED EVIDENCE BEFORE REVIEW&quot;;IF([.U119]=&quot;BLOCKED&quot;;&quot;RESOLVE CONTRADICTION BEFORE REVIEW — NO AUTHORITY CREATED&quot;;IF([.U1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9]=&quot;READY FOR REVIEW&quot;;&quot;REVIEW ELIGIBLE — NO AUTHORITY&quot;;IF(OR([.U119]=&quot;UNKNOWN&quot;;[.U11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0]=&quot;&quot;;IF(AND([.L120]=&quot;&quot;;[.N120]=&quot;&quot;);&quot;UNKNOWN&quot;;&quot;CONTRADICTION&quot;);IF([.M120]=&quot;UNMATCHED&quot;;IF(AND([.L120]=&quot;&quot;;[.N120]=&quot;&quot;);&quot;CLEAR&quot;;&quot;CONTRADICTION&quot;);IF([.M120]=&quot;SINGLE_SALE_LINKED&quot;;IF(AND([.L120]&lt;&gt;&quot;&quot;;[.N120]=&quot;&quot;);&quot;CLEAR&quot;;&quot;CONTRADICTION&quot;);IF([.M120]=&quot;MULTI_SALE_PENDING_ALLOCATION&quot;;IF([.L120]=&quot;&quot;;&quot;CLEAR&quot;;&quot;CONTRADICTION&quot;);IF([.M120]=&quot;ALLOCATED&quot;;IF(AND([.L120]=&quot;&quot;;[.N120]&lt;&gt;&quot;&quot;);&quot;CLEAR&quot;;&quot;CONTRADICTION&quot;);&quot;CONTRADICTION&quot;)))))">
            <text:p>UNKNOWN</text:p>
          </table:table-cell>
          <table:table-cell office:value-type="string" table:formula="of:=IF([.S120]=&quot;UNKNOWN&quot;;&quot;NO ACTION — linkage status is UNKNOWN / not asserted&quot;;IF([.S120]=&quot;CLEAR&quot;;&quot;NO CONTRADICTION — preserve evidence as entered&quot;;IF([.M120]=&quot;&quot;;&quot;REVIEW LINKAGE STATUS — identifiers are present while status is UNKNOWN&quot;;IF([.M120]=&quot;UNMATCHED&quot;;&quot;REMOVE LINKAGE IDENTIFIERS OR CORRECT LINKAGE STATUS&quot;;IF([.M120]=&quot;SINGLE_SALE_LINKED&quot;;&quot;REQUIRE LINKED SALE ID AND NO ALLOCATION GROUP ID&quot;;IF([.M120]=&quot;MULTI_SALE_PENDING_ALLOCATION&quot;;&quot;REMOVE LINKED SALE ID OR CORRECT LINKAGE STATUS&quot;;IF([.M120]=&quot;ALLOCATED&quot;;&quot;REQUIRE ALLOCATION GROUP ID AND NO LINKED SALE ID&quot;;&quot;REVIEW LINKAGE EVIDENCE — NO AUTHORITY CREATED&quot;)))))))">
            <text:p>NO ACTION — linkage status is UNKNOWN / not asserted</text:p>
          </table:table-cell>
          <table:table-cell office:value-type="string" table:formula="of:=IF([.S120]=&quot;CONTRADICTION&quot;;&quot;BLOCKED&quot;;IF([.S120]=&quot;UNKNOWN&quot;;&quot;UNKNOWN&quot;;IF([.S120]=&quot;CLEAR&quot;;IF(OR([.O120]=&quot;&quot;;[.P120]=&quot;&quot;);&quot;UNKNOWN&quot;;&quot;READY FOR REVIEW&quot;);&quot;BLOCKED&quot;)))">
            <text:p>UNKNOWN</text:p>
          </table:table-cell>
          <table:table-cell office:value-type="string" table:formula="of:=IF([.U120]=&quot;UNKNOWN&quot;;&quot;COMPLETE OR ASSERT REQUIRED EVIDENCE BEFORE REVIEW&quot;;IF([.U120]=&quot;BLOCKED&quot;;&quot;RESOLVE CONTRADICTION BEFORE REVIEW — NO AUTHORITY CREATED&quot;;IF([.U1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0]=&quot;READY FOR REVIEW&quot;;&quot;REVIEW ELIGIBLE — NO AUTHORITY&quot;;IF(OR([.U120]=&quot;UNKNOWN&quot;;[.U12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1]=&quot;&quot;;IF(AND([.L121]=&quot;&quot;;[.N121]=&quot;&quot;);&quot;UNKNOWN&quot;;&quot;CONTRADICTION&quot;);IF([.M121]=&quot;UNMATCHED&quot;;IF(AND([.L121]=&quot;&quot;;[.N121]=&quot;&quot;);&quot;CLEAR&quot;;&quot;CONTRADICTION&quot;);IF([.M121]=&quot;SINGLE_SALE_LINKED&quot;;IF(AND([.L121]&lt;&gt;&quot;&quot;;[.N121]=&quot;&quot;);&quot;CLEAR&quot;;&quot;CONTRADICTION&quot;);IF([.M121]=&quot;MULTI_SALE_PENDING_ALLOCATION&quot;;IF([.L121]=&quot;&quot;;&quot;CLEAR&quot;;&quot;CONTRADICTION&quot;);IF([.M121]=&quot;ALLOCATED&quot;;IF(AND([.L121]=&quot;&quot;;[.N121]&lt;&gt;&quot;&quot;);&quot;CLEAR&quot;;&quot;CONTRADICTION&quot;);&quot;CONTRADICTION&quot;)))))">
            <text:p>UNKNOWN</text:p>
          </table:table-cell>
          <table:table-cell office:value-type="string" table:formula="of:=IF([.S121]=&quot;UNKNOWN&quot;;&quot;NO ACTION — linkage status is UNKNOWN / not asserted&quot;;IF([.S121]=&quot;CLEAR&quot;;&quot;NO CONTRADICTION — preserve evidence as entered&quot;;IF([.M121]=&quot;&quot;;&quot;REVIEW LINKAGE STATUS — identifiers are present while status is UNKNOWN&quot;;IF([.M121]=&quot;UNMATCHED&quot;;&quot;REMOVE LINKAGE IDENTIFIERS OR CORRECT LINKAGE STATUS&quot;;IF([.M121]=&quot;SINGLE_SALE_LINKED&quot;;&quot;REQUIRE LINKED SALE ID AND NO ALLOCATION GROUP ID&quot;;IF([.M121]=&quot;MULTI_SALE_PENDING_ALLOCATION&quot;;&quot;REMOVE LINKED SALE ID OR CORRECT LINKAGE STATUS&quot;;IF([.M121]=&quot;ALLOCATED&quot;;&quot;REQUIRE ALLOCATION GROUP ID AND NO LINKED SALE ID&quot;;&quot;REVIEW LINKAGE EVIDENCE — NO AUTHORITY CREATED&quot;)))))))">
            <text:p>NO ACTION — linkage status is UNKNOWN / not asserted</text:p>
          </table:table-cell>
          <table:table-cell office:value-type="string" table:formula="of:=IF([.S121]=&quot;CONTRADICTION&quot;;&quot;BLOCKED&quot;;IF([.S121]=&quot;UNKNOWN&quot;;&quot;UNKNOWN&quot;;IF([.S121]=&quot;CLEAR&quot;;IF(OR([.O121]=&quot;&quot;;[.P121]=&quot;&quot;);&quot;UNKNOWN&quot;;&quot;READY FOR REVIEW&quot;);&quot;BLOCKED&quot;)))">
            <text:p>UNKNOWN</text:p>
          </table:table-cell>
          <table:table-cell office:value-type="string" table:formula="of:=IF([.U121]=&quot;UNKNOWN&quot;;&quot;COMPLETE OR ASSERT REQUIRED EVIDENCE BEFORE REVIEW&quot;;IF([.U121]=&quot;BLOCKED&quot;;&quot;RESOLVE CONTRADICTION BEFORE REVIEW — NO AUTHORITY CREATED&quot;;IF([.U1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1]=&quot;READY FOR REVIEW&quot;;&quot;REVIEW ELIGIBLE — NO AUTHORITY&quot;;IF(OR([.U121]=&quot;UNKNOWN&quot;;[.U12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2]=&quot;&quot;;IF(AND([.L122]=&quot;&quot;;[.N122]=&quot;&quot;);&quot;UNKNOWN&quot;;&quot;CONTRADICTION&quot;);IF([.M122]=&quot;UNMATCHED&quot;;IF(AND([.L122]=&quot;&quot;;[.N122]=&quot;&quot;);&quot;CLEAR&quot;;&quot;CONTRADICTION&quot;);IF([.M122]=&quot;SINGLE_SALE_LINKED&quot;;IF(AND([.L122]&lt;&gt;&quot;&quot;;[.N122]=&quot;&quot;);&quot;CLEAR&quot;;&quot;CONTRADICTION&quot;);IF([.M122]=&quot;MULTI_SALE_PENDING_ALLOCATION&quot;;IF([.L122]=&quot;&quot;;&quot;CLEAR&quot;;&quot;CONTRADICTION&quot;);IF([.M122]=&quot;ALLOCATED&quot;;IF(AND([.L122]=&quot;&quot;;[.N122]&lt;&gt;&quot;&quot;);&quot;CLEAR&quot;;&quot;CONTRADICTION&quot;);&quot;CONTRADICTION&quot;)))))">
            <text:p>UNKNOWN</text:p>
          </table:table-cell>
          <table:table-cell office:value-type="string" table:formula="of:=IF([.S122]=&quot;UNKNOWN&quot;;&quot;NO ACTION — linkage status is UNKNOWN / not asserted&quot;;IF([.S122]=&quot;CLEAR&quot;;&quot;NO CONTRADICTION — preserve evidence as entered&quot;;IF([.M122]=&quot;&quot;;&quot;REVIEW LINKAGE STATUS — identifiers are present while status is UNKNOWN&quot;;IF([.M122]=&quot;UNMATCHED&quot;;&quot;REMOVE LINKAGE IDENTIFIERS OR CORRECT LINKAGE STATUS&quot;;IF([.M122]=&quot;SINGLE_SALE_LINKED&quot;;&quot;REQUIRE LINKED SALE ID AND NO ALLOCATION GROUP ID&quot;;IF([.M122]=&quot;MULTI_SALE_PENDING_ALLOCATION&quot;;&quot;REMOVE LINKED SALE ID OR CORRECT LINKAGE STATUS&quot;;IF([.M122]=&quot;ALLOCATED&quot;;&quot;REQUIRE ALLOCATION GROUP ID AND NO LINKED SALE ID&quot;;&quot;REVIEW LINKAGE EVIDENCE — NO AUTHORITY CREATED&quot;)))))))">
            <text:p>NO ACTION — linkage status is UNKNOWN / not asserted</text:p>
          </table:table-cell>
          <table:table-cell office:value-type="string" table:formula="of:=IF([.S122]=&quot;CONTRADICTION&quot;;&quot;BLOCKED&quot;;IF([.S122]=&quot;UNKNOWN&quot;;&quot;UNKNOWN&quot;;IF([.S122]=&quot;CLEAR&quot;;IF(OR([.O122]=&quot;&quot;;[.P122]=&quot;&quot;);&quot;UNKNOWN&quot;;&quot;READY FOR REVIEW&quot;);&quot;BLOCKED&quot;)))">
            <text:p>UNKNOWN</text:p>
          </table:table-cell>
          <table:table-cell office:value-type="string" table:formula="of:=IF([.U122]=&quot;UNKNOWN&quot;;&quot;COMPLETE OR ASSERT REQUIRED EVIDENCE BEFORE REVIEW&quot;;IF([.U122]=&quot;BLOCKED&quot;;&quot;RESOLVE CONTRADICTION BEFORE REVIEW — NO AUTHORITY CREATED&quot;;IF([.U1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2]=&quot;READY FOR REVIEW&quot;;&quot;REVIEW ELIGIBLE — NO AUTHORITY&quot;;IF(OR([.U122]=&quot;UNKNOWN&quot;;[.U12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3]=&quot;&quot;;IF(AND([.L123]=&quot;&quot;;[.N123]=&quot;&quot;);&quot;UNKNOWN&quot;;&quot;CONTRADICTION&quot;);IF([.M123]=&quot;UNMATCHED&quot;;IF(AND([.L123]=&quot;&quot;;[.N123]=&quot;&quot;);&quot;CLEAR&quot;;&quot;CONTRADICTION&quot;);IF([.M123]=&quot;SINGLE_SALE_LINKED&quot;;IF(AND([.L123]&lt;&gt;&quot;&quot;;[.N123]=&quot;&quot;);&quot;CLEAR&quot;;&quot;CONTRADICTION&quot;);IF([.M123]=&quot;MULTI_SALE_PENDING_ALLOCATION&quot;;IF([.L123]=&quot;&quot;;&quot;CLEAR&quot;;&quot;CONTRADICTION&quot;);IF([.M123]=&quot;ALLOCATED&quot;;IF(AND([.L123]=&quot;&quot;;[.N123]&lt;&gt;&quot;&quot;);&quot;CLEAR&quot;;&quot;CONTRADICTION&quot;);&quot;CONTRADICTION&quot;)))))">
            <text:p>UNKNOWN</text:p>
          </table:table-cell>
          <table:table-cell office:value-type="string" table:formula="of:=IF([.S123]=&quot;UNKNOWN&quot;;&quot;NO ACTION — linkage status is UNKNOWN / not asserted&quot;;IF([.S123]=&quot;CLEAR&quot;;&quot;NO CONTRADICTION — preserve evidence as entered&quot;;IF([.M123]=&quot;&quot;;&quot;REVIEW LINKAGE STATUS — identifiers are present while status is UNKNOWN&quot;;IF([.M123]=&quot;UNMATCHED&quot;;&quot;REMOVE LINKAGE IDENTIFIERS OR CORRECT LINKAGE STATUS&quot;;IF([.M123]=&quot;SINGLE_SALE_LINKED&quot;;&quot;REQUIRE LINKED SALE ID AND NO ALLOCATION GROUP ID&quot;;IF([.M123]=&quot;MULTI_SALE_PENDING_ALLOCATION&quot;;&quot;REMOVE LINKED SALE ID OR CORRECT LINKAGE STATUS&quot;;IF([.M123]=&quot;ALLOCATED&quot;;&quot;REQUIRE ALLOCATION GROUP ID AND NO LINKED SALE ID&quot;;&quot;REVIEW LINKAGE EVIDENCE — NO AUTHORITY CREATED&quot;)))))))">
            <text:p>NO ACTION — linkage status is UNKNOWN / not asserted</text:p>
          </table:table-cell>
          <table:table-cell office:value-type="string" table:formula="of:=IF([.S123]=&quot;CONTRADICTION&quot;;&quot;BLOCKED&quot;;IF([.S123]=&quot;UNKNOWN&quot;;&quot;UNKNOWN&quot;;IF([.S123]=&quot;CLEAR&quot;;IF(OR([.O123]=&quot;&quot;;[.P123]=&quot;&quot;);&quot;UNKNOWN&quot;;&quot;READY FOR REVIEW&quot;);&quot;BLOCKED&quot;)))">
            <text:p>UNKNOWN</text:p>
          </table:table-cell>
          <table:table-cell office:value-type="string" table:formula="of:=IF([.U123]=&quot;UNKNOWN&quot;;&quot;COMPLETE OR ASSERT REQUIRED EVIDENCE BEFORE REVIEW&quot;;IF([.U123]=&quot;BLOCKED&quot;;&quot;RESOLVE CONTRADICTION BEFORE REVIEW — NO AUTHORITY CREATED&quot;;IF([.U1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3]=&quot;READY FOR REVIEW&quot;;&quot;REVIEW ELIGIBLE — NO AUTHORITY&quot;;IF(OR([.U123]=&quot;UNKNOWN&quot;;[.U12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4]=&quot;&quot;;IF(AND([.L124]=&quot;&quot;;[.N124]=&quot;&quot;);&quot;UNKNOWN&quot;;&quot;CONTRADICTION&quot;);IF([.M124]=&quot;UNMATCHED&quot;;IF(AND([.L124]=&quot;&quot;;[.N124]=&quot;&quot;);&quot;CLEAR&quot;;&quot;CONTRADICTION&quot;);IF([.M124]=&quot;SINGLE_SALE_LINKED&quot;;IF(AND([.L124]&lt;&gt;&quot;&quot;;[.N124]=&quot;&quot;);&quot;CLEAR&quot;;&quot;CONTRADICTION&quot;);IF([.M124]=&quot;MULTI_SALE_PENDING_ALLOCATION&quot;;IF([.L124]=&quot;&quot;;&quot;CLEAR&quot;;&quot;CONTRADICTION&quot;);IF([.M124]=&quot;ALLOCATED&quot;;IF(AND([.L124]=&quot;&quot;;[.N124]&lt;&gt;&quot;&quot;);&quot;CLEAR&quot;;&quot;CONTRADICTION&quot;);&quot;CONTRADICTION&quot;)))))">
            <text:p>UNKNOWN</text:p>
          </table:table-cell>
          <table:table-cell office:value-type="string" table:formula="of:=IF([.S124]=&quot;UNKNOWN&quot;;&quot;NO ACTION — linkage status is UNKNOWN / not asserted&quot;;IF([.S124]=&quot;CLEAR&quot;;&quot;NO CONTRADICTION — preserve evidence as entered&quot;;IF([.M124]=&quot;&quot;;&quot;REVIEW LINKAGE STATUS — identifiers are present while status is UNKNOWN&quot;;IF([.M124]=&quot;UNMATCHED&quot;;&quot;REMOVE LINKAGE IDENTIFIERS OR CORRECT LINKAGE STATUS&quot;;IF([.M124]=&quot;SINGLE_SALE_LINKED&quot;;&quot;REQUIRE LINKED SALE ID AND NO ALLOCATION GROUP ID&quot;;IF([.M124]=&quot;MULTI_SALE_PENDING_ALLOCATION&quot;;&quot;REMOVE LINKED SALE ID OR CORRECT LINKAGE STATUS&quot;;IF([.M124]=&quot;ALLOCATED&quot;;&quot;REQUIRE ALLOCATION GROUP ID AND NO LINKED SALE ID&quot;;&quot;REVIEW LINKAGE EVIDENCE — NO AUTHORITY CREATED&quot;)))))))">
            <text:p>NO ACTION — linkage status is UNKNOWN / not asserted</text:p>
          </table:table-cell>
          <table:table-cell office:value-type="string" table:formula="of:=IF([.S124]=&quot;CONTRADICTION&quot;;&quot;BLOCKED&quot;;IF([.S124]=&quot;UNKNOWN&quot;;&quot;UNKNOWN&quot;;IF([.S124]=&quot;CLEAR&quot;;IF(OR([.O124]=&quot;&quot;;[.P124]=&quot;&quot;);&quot;UNKNOWN&quot;;&quot;READY FOR REVIEW&quot;);&quot;BLOCKED&quot;)))">
            <text:p>UNKNOWN</text:p>
          </table:table-cell>
          <table:table-cell office:value-type="string" table:formula="of:=IF([.U124]=&quot;UNKNOWN&quot;;&quot;COMPLETE OR ASSERT REQUIRED EVIDENCE BEFORE REVIEW&quot;;IF([.U124]=&quot;BLOCKED&quot;;&quot;RESOLVE CONTRADICTION BEFORE REVIEW — NO AUTHORITY CREATED&quot;;IF([.U1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4]=&quot;READY FOR REVIEW&quot;;&quot;REVIEW ELIGIBLE — NO AUTHORITY&quot;;IF(OR([.U124]=&quot;UNKNOWN&quot;;[.U12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5]=&quot;&quot;;IF(AND([.L125]=&quot;&quot;;[.N125]=&quot;&quot;);&quot;UNKNOWN&quot;;&quot;CONTRADICTION&quot;);IF([.M125]=&quot;UNMATCHED&quot;;IF(AND([.L125]=&quot;&quot;;[.N125]=&quot;&quot;);&quot;CLEAR&quot;;&quot;CONTRADICTION&quot;);IF([.M125]=&quot;SINGLE_SALE_LINKED&quot;;IF(AND([.L125]&lt;&gt;&quot;&quot;;[.N125]=&quot;&quot;);&quot;CLEAR&quot;;&quot;CONTRADICTION&quot;);IF([.M125]=&quot;MULTI_SALE_PENDING_ALLOCATION&quot;;IF([.L125]=&quot;&quot;;&quot;CLEAR&quot;;&quot;CONTRADICTION&quot;);IF([.M125]=&quot;ALLOCATED&quot;;IF(AND([.L125]=&quot;&quot;;[.N125]&lt;&gt;&quot;&quot;);&quot;CLEAR&quot;;&quot;CONTRADICTION&quot;);&quot;CONTRADICTION&quot;)))))">
            <text:p>UNKNOWN</text:p>
          </table:table-cell>
          <table:table-cell office:value-type="string" table:formula="of:=IF([.S125]=&quot;UNKNOWN&quot;;&quot;NO ACTION — linkage status is UNKNOWN / not asserted&quot;;IF([.S125]=&quot;CLEAR&quot;;&quot;NO CONTRADICTION — preserve evidence as entered&quot;;IF([.M125]=&quot;&quot;;&quot;REVIEW LINKAGE STATUS — identifiers are present while status is UNKNOWN&quot;;IF([.M125]=&quot;UNMATCHED&quot;;&quot;REMOVE LINKAGE IDENTIFIERS OR CORRECT LINKAGE STATUS&quot;;IF([.M125]=&quot;SINGLE_SALE_LINKED&quot;;&quot;REQUIRE LINKED SALE ID AND NO ALLOCATION GROUP ID&quot;;IF([.M125]=&quot;MULTI_SALE_PENDING_ALLOCATION&quot;;&quot;REMOVE LINKED SALE ID OR CORRECT LINKAGE STATUS&quot;;IF([.M125]=&quot;ALLOCATED&quot;;&quot;REQUIRE ALLOCATION GROUP ID AND NO LINKED SALE ID&quot;;&quot;REVIEW LINKAGE EVIDENCE — NO AUTHORITY CREATED&quot;)))))))">
            <text:p>NO ACTION — linkage status is UNKNOWN / not asserted</text:p>
          </table:table-cell>
          <table:table-cell office:value-type="string" table:formula="of:=IF([.S125]=&quot;CONTRADICTION&quot;;&quot;BLOCKED&quot;;IF([.S125]=&quot;UNKNOWN&quot;;&quot;UNKNOWN&quot;;IF([.S125]=&quot;CLEAR&quot;;IF(OR([.O125]=&quot;&quot;;[.P125]=&quot;&quot;);&quot;UNKNOWN&quot;;&quot;READY FOR REVIEW&quot;);&quot;BLOCKED&quot;)))">
            <text:p>UNKNOWN</text:p>
          </table:table-cell>
          <table:table-cell office:value-type="string" table:formula="of:=IF([.U125]=&quot;UNKNOWN&quot;;&quot;COMPLETE OR ASSERT REQUIRED EVIDENCE BEFORE REVIEW&quot;;IF([.U125]=&quot;BLOCKED&quot;;&quot;RESOLVE CONTRADICTION BEFORE REVIEW — NO AUTHORITY CREATED&quot;;IF([.U1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5]=&quot;READY FOR REVIEW&quot;;&quot;REVIEW ELIGIBLE — NO AUTHORITY&quot;;IF(OR([.U125]=&quot;UNKNOWN&quot;;[.U12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6]=&quot;&quot;;IF(AND([.L126]=&quot;&quot;;[.N126]=&quot;&quot;);&quot;UNKNOWN&quot;;&quot;CONTRADICTION&quot;);IF([.M126]=&quot;UNMATCHED&quot;;IF(AND([.L126]=&quot;&quot;;[.N126]=&quot;&quot;);&quot;CLEAR&quot;;&quot;CONTRADICTION&quot;);IF([.M126]=&quot;SINGLE_SALE_LINKED&quot;;IF(AND([.L126]&lt;&gt;&quot;&quot;;[.N126]=&quot;&quot;);&quot;CLEAR&quot;;&quot;CONTRADICTION&quot;);IF([.M126]=&quot;MULTI_SALE_PENDING_ALLOCATION&quot;;IF([.L126]=&quot;&quot;;&quot;CLEAR&quot;;&quot;CONTRADICTION&quot;);IF([.M126]=&quot;ALLOCATED&quot;;IF(AND([.L126]=&quot;&quot;;[.N126]&lt;&gt;&quot;&quot;);&quot;CLEAR&quot;;&quot;CONTRADICTION&quot;);&quot;CONTRADICTION&quot;)))))">
            <text:p>UNKNOWN</text:p>
          </table:table-cell>
          <table:table-cell office:value-type="string" table:formula="of:=IF([.S126]=&quot;UNKNOWN&quot;;&quot;NO ACTION — linkage status is UNKNOWN / not asserted&quot;;IF([.S126]=&quot;CLEAR&quot;;&quot;NO CONTRADICTION — preserve evidence as entered&quot;;IF([.M126]=&quot;&quot;;&quot;REVIEW LINKAGE STATUS — identifiers are present while status is UNKNOWN&quot;;IF([.M126]=&quot;UNMATCHED&quot;;&quot;REMOVE LINKAGE IDENTIFIERS OR CORRECT LINKAGE STATUS&quot;;IF([.M126]=&quot;SINGLE_SALE_LINKED&quot;;&quot;REQUIRE LINKED SALE ID AND NO ALLOCATION GROUP ID&quot;;IF([.M126]=&quot;MULTI_SALE_PENDING_ALLOCATION&quot;;&quot;REMOVE LINKED SALE ID OR CORRECT LINKAGE STATUS&quot;;IF([.M126]=&quot;ALLOCATED&quot;;&quot;REQUIRE ALLOCATION GROUP ID AND NO LINKED SALE ID&quot;;&quot;REVIEW LINKAGE EVIDENCE — NO AUTHORITY CREATED&quot;)))))))">
            <text:p>NO ACTION — linkage status is UNKNOWN / not asserted</text:p>
          </table:table-cell>
          <table:table-cell office:value-type="string" table:formula="of:=IF([.S126]=&quot;CONTRADICTION&quot;;&quot;BLOCKED&quot;;IF([.S126]=&quot;UNKNOWN&quot;;&quot;UNKNOWN&quot;;IF([.S126]=&quot;CLEAR&quot;;IF(OR([.O126]=&quot;&quot;;[.P126]=&quot;&quot;);&quot;UNKNOWN&quot;;&quot;READY FOR REVIEW&quot;);&quot;BLOCKED&quot;)))">
            <text:p>UNKNOWN</text:p>
          </table:table-cell>
          <table:table-cell office:value-type="string" table:formula="of:=IF([.U126]=&quot;UNKNOWN&quot;;&quot;COMPLETE OR ASSERT REQUIRED EVIDENCE BEFORE REVIEW&quot;;IF([.U126]=&quot;BLOCKED&quot;;&quot;RESOLVE CONTRADICTION BEFORE REVIEW — NO AUTHORITY CREATED&quot;;IF([.U1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6]=&quot;READY FOR REVIEW&quot;;&quot;REVIEW ELIGIBLE — NO AUTHORITY&quot;;IF(OR([.U126]=&quot;UNKNOWN&quot;;[.U12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7]=&quot;&quot;;IF(AND([.L127]=&quot;&quot;;[.N127]=&quot;&quot;);&quot;UNKNOWN&quot;;&quot;CONTRADICTION&quot;);IF([.M127]=&quot;UNMATCHED&quot;;IF(AND([.L127]=&quot;&quot;;[.N127]=&quot;&quot;);&quot;CLEAR&quot;;&quot;CONTRADICTION&quot;);IF([.M127]=&quot;SINGLE_SALE_LINKED&quot;;IF(AND([.L127]&lt;&gt;&quot;&quot;;[.N127]=&quot;&quot;);&quot;CLEAR&quot;;&quot;CONTRADICTION&quot;);IF([.M127]=&quot;MULTI_SALE_PENDING_ALLOCATION&quot;;IF([.L127]=&quot;&quot;;&quot;CLEAR&quot;;&quot;CONTRADICTION&quot;);IF([.M127]=&quot;ALLOCATED&quot;;IF(AND([.L127]=&quot;&quot;;[.N127]&lt;&gt;&quot;&quot;);&quot;CLEAR&quot;;&quot;CONTRADICTION&quot;);&quot;CONTRADICTION&quot;)))))">
            <text:p>UNKNOWN</text:p>
          </table:table-cell>
          <table:table-cell office:value-type="string" table:formula="of:=IF([.S127]=&quot;UNKNOWN&quot;;&quot;NO ACTION — linkage status is UNKNOWN / not asserted&quot;;IF([.S127]=&quot;CLEAR&quot;;&quot;NO CONTRADICTION — preserve evidence as entered&quot;;IF([.M127]=&quot;&quot;;&quot;REVIEW LINKAGE STATUS — identifiers are present while status is UNKNOWN&quot;;IF([.M127]=&quot;UNMATCHED&quot;;&quot;REMOVE LINKAGE IDENTIFIERS OR CORRECT LINKAGE STATUS&quot;;IF([.M127]=&quot;SINGLE_SALE_LINKED&quot;;&quot;REQUIRE LINKED SALE ID AND NO ALLOCATION GROUP ID&quot;;IF([.M127]=&quot;MULTI_SALE_PENDING_ALLOCATION&quot;;&quot;REMOVE LINKED SALE ID OR CORRECT LINKAGE STATUS&quot;;IF([.M127]=&quot;ALLOCATED&quot;;&quot;REQUIRE ALLOCATION GROUP ID AND NO LINKED SALE ID&quot;;&quot;REVIEW LINKAGE EVIDENCE — NO AUTHORITY CREATED&quot;)))))))">
            <text:p>NO ACTION — linkage status is UNKNOWN / not asserted</text:p>
          </table:table-cell>
          <table:table-cell office:value-type="string" table:formula="of:=IF([.S127]=&quot;CONTRADICTION&quot;;&quot;BLOCKED&quot;;IF([.S127]=&quot;UNKNOWN&quot;;&quot;UNKNOWN&quot;;IF([.S127]=&quot;CLEAR&quot;;IF(OR([.O127]=&quot;&quot;;[.P127]=&quot;&quot;);&quot;UNKNOWN&quot;;&quot;READY FOR REVIEW&quot;);&quot;BLOCKED&quot;)))">
            <text:p>UNKNOWN</text:p>
          </table:table-cell>
          <table:table-cell office:value-type="string" table:formula="of:=IF([.U127]=&quot;UNKNOWN&quot;;&quot;COMPLETE OR ASSERT REQUIRED EVIDENCE BEFORE REVIEW&quot;;IF([.U127]=&quot;BLOCKED&quot;;&quot;RESOLVE CONTRADICTION BEFORE REVIEW — NO AUTHORITY CREATED&quot;;IF([.U1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7]=&quot;READY FOR REVIEW&quot;;&quot;REVIEW ELIGIBLE — NO AUTHORITY&quot;;IF(OR([.U127]=&quot;UNKNOWN&quot;;[.U12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8]=&quot;&quot;;IF(AND([.L128]=&quot;&quot;;[.N128]=&quot;&quot;);&quot;UNKNOWN&quot;;&quot;CONTRADICTION&quot;);IF([.M128]=&quot;UNMATCHED&quot;;IF(AND([.L128]=&quot;&quot;;[.N128]=&quot;&quot;);&quot;CLEAR&quot;;&quot;CONTRADICTION&quot;);IF([.M128]=&quot;SINGLE_SALE_LINKED&quot;;IF(AND([.L128]&lt;&gt;&quot;&quot;;[.N128]=&quot;&quot;);&quot;CLEAR&quot;;&quot;CONTRADICTION&quot;);IF([.M128]=&quot;MULTI_SALE_PENDING_ALLOCATION&quot;;IF([.L128]=&quot;&quot;;&quot;CLEAR&quot;;&quot;CONTRADICTION&quot;);IF([.M128]=&quot;ALLOCATED&quot;;IF(AND([.L128]=&quot;&quot;;[.N128]&lt;&gt;&quot;&quot;);&quot;CLEAR&quot;;&quot;CONTRADICTION&quot;);&quot;CONTRADICTION&quot;)))))">
            <text:p>UNKNOWN</text:p>
          </table:table-cell>
          <table:table-cell office:value-type="string" table:formula="of:=IF([.S128]=&quot;UNKNOWN&quot;;&quot;NO ACTION — linkage status is UNKNOWN / not asserted&quot;;IF([.S128]=&quot;CLEAR&quot;;&quot;NO CONTRADICTION — preserve evidence as entered&quot;;IF([.M128]=&quot;&quot;;&quot;REVIEW LINKAGE STATUS — identifiers are present while status is UNKNOWN&quot;;IF([.M128]=&quot;UNMATCHED&quot;;&quot;REMOVE LINKAGE IDENTIFIERS OR CORRECT LINKAGE STATUS&quot;;IF([.M128]=&quot;SINGLE_SALE_LINKED&quot;;&quot;REQUIRE LINKED SALE ID AND NO ALLOCATION GROUP ID&quot;;IF([.M128]=&quot;MULTI_SALE_PENDING_ALLOCATION&quot;;&quot;REMOVE LINKED SALE ID OR CORRECT LINKAGE STATUS&quot;;IF([.M128]=&quot;ALLOCATED&quot;;&quot;REQUIRE ALLOCATION GROUP ID AND NO LINKED SALE ID&quot;;&quot;REVIEW LINKAGE EVIDENCE — NO AUTHORITY CREATED&quot;)))))))">
            <text:p>NO ACTION — linkage status is UNKNOWN / not asserted</text:p>
          </table:table-cell>
          <table:table-cell office:value-type="string" table:formula="of:=IF([.S128]=&quot;CONTRADICTION&quot;;&quot;BLOCKED&quot;;IF([.S128]=&quot;UNKNOWN&quot;;&quot;UNKNOWN&quot;;IF([.S128]=&quot;CLEAR&quot;;IF(OR([.O128]=&quot;&quot;;[.P128]=&quot;&quot;);&quot;UNKNOWN&quot;;&quot;READY FOR REVIEW&quot;);&quot;BLOCKED&quot;)))">
            <text:p>UNKNOWN</text:p>
          </table:table-cell>
          <table:table-cell office:value-type="string" table:formula="of:=IF([.U128]=&quot;UNKNOWN&quot;;&quot;COMPLETE OR ASSERT REQUIRED EVIDENCE BEFORE REVIEW&quot;;IF([.U128]=&quot;BLOCKED&quot;;&quot;RESOLVE CONTRADICTION BEFORE REVIEW — NO AUTHORITY CREATED&quot;;IF([.U1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8]=&quot;READY FOR REVIEW&quot;;&quot;REVIEW ELIGIBLE — NO AUTHORITY&quot;;IF(OR([.U128]=&quot;UNKNOWN&quot;;[.U12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9]=&quot;&quot;;IF(AND([.L129]=&quot;&quot;;[.N129]=&quot;&quot;);&quot;UNKNOWN&quot;;&quot;CONTRADICTION&quot;);IF([.M129]=&quot;UNMATCHED&quot;;IF(AND([.L129]=&quot;&quot;;[.N129]=&quot;&quot;);&quot;CLEAR&quot;;&quot;CONTRADICTION&quot;);IF([.M129]=&quot;SINGLE_SALE_LINKED&quot;;IF(AND([.L129]&lt;&gt;&quot;&quot;;[.N129]=&quot;&quot;);&quot;CLEAR&quot;;&quot;CONTRADICTION&quot;);IF([.M129]=&quot;MULTI_SALE_PENDING_ALLOCATION&quot;;IF([.L129]=&quot;&quot;;&quot;CLEAR&quot;;&quot;CONTRADICTION&quot;);IF([.M129]=&quot;ALLOCATED&quot;;IF(AND([.L129]=&quot;&quot;;[.N129]&lt;&gt;&quot;&quot;);&quot;CLEAR&quot;;&quot;CONTRADICTION&quot;);&quot;CONTRADICTION&quot;)))))">
            <text:p>UNKNOWN</text:p>
          </table:table-cell>
          <table:table-cell office:value-type="string" table:formula="of:=IF([.S129]=&quot;UNKNOWN&quot;;&quot;NO ACTION — linkage status is UNKNOWN / not asserted&quot;;IF([.S129]=&quot;CLEAR&quot;;&quot;NO CONTRADICTION — preserve evidence as entered&quot;;IF([.M129]=&quot;&quot;;&quot;REVIEW LINKAGE STATUS — identifiers are present while status is UNKNOWN&quot;;IF([.M129]=&quot;UNMATCHED&quot;;&quot;REMOVE LINKAGE IDENTIFIERS OR CORRECT LINKAGE STATUS&quot;;IF([.M129]=&quot;SINGLE_SALE_LINKED&quot;;&quot;REQUIRE LINKED SALE ID AND NO ALLOCATION GROUP ID&quot;;IF([.M129]=&quot;MULTI_SALE_PENDING_ALLOCATION&quot;;&quot;REMOVE LINKED SALE ID OR CORRECT LINKAGE STATUS&quot;;IF([.M129]=&quot;ALLOCATED&quot;;&quot;REQUIRE ALLOCATION GROUP ID AND NO LINKED SALE ID&quot;;&quot;REVIEW LINKAGE EVIDENCE — NO AUTHORITY CREATED&quot;)))))))">
            <text:p>NO ACTION — linkage status is UNKNOWN / not asserted</text:p>
          </table:table-cell>
          <table:table-cell office:value-type="string" table:formula="of:=IF([.S129]=&quot;CONTRADICTION&quot;;&quot;BLOCKED&quot;;IF([.S129]=&quot;UNKNOWN&quot;;&quot;UNKNOWN&quot;;IF([.S129]=&quot;CLEAR&quot;;IF(OR([.O129]=&quot;&quot;;[.P129]=&quot;&quot;);&quot;UNKNOWN&quot;;&quot;READY FOR REVIEW&quot;);&quot;BLOCKED&quot;)))">
            <text:p>UNKNOWN</text:p>
          </table:table-cell>
          <table:table-cell office:value-type="string" table:formula="of:=IF([.U129]=&quot;UNKNOWN&quot;;&quot;COMPLETE OR ASSERT REQUIRED EVIDENCE BEFORE REVIEW&quot;;IF([.U129]=&quot;BLOCKED&quot;;&quot;RESOLVE CONTRADICTION BEFORE REVIEW — NO AUTHORITY CREATED&quot;;IF([.U1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9]=&quot;READY FOR REVIEW&quot;;&quot;REVIEW ELIGIBLE — NO AUTHORITY&quot;;IF(OR([.U129]=&quot;UNKNOWN&quot;;[.U12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0]=&quot;&quot;;IF(AND([.L130]=&quot;&quot;;[.N130]=&quot;&quot;);&quot;UNKNOWN&quot;;&quot;CONTRADICTION&quot;);IF([.M130]=&quot;UNMATCHED&quot;;IF(AND([.L130]=&quot;&quot;;[.N130]=&quot;&quot;);&quot;CLEAR&quot;;&quot;CONTRADICTION&quot;);IF([.M130]=&quot;SINGLE_SALE_LINKED&quot;;IF(AND([.L130]&lt;&gt;&quot;&quot;;[.N130]=&quot;&quot;);&quot;CLEAR&quot;;&quot;CONTRADICTION&quot;);IF([.M130]=&quot;MULTI_SALE_PENDING_ALLOCATION&quot;;IF([.L130]=&quot;&quot;;&quot;CLEAR&quot;;&quot;CONTRADICTION&quot;);IF([.M130]=&quot;ALLOCATED&quot;;IF(AND([.L130]=&quot;&quot;;[.N130]&lt;&gt;&quot;&quot;);&quot;CLEAR&quot;;&quot;CONTRADICTION&quot;);&quot;CONTRADICTION&quot;)))))">
            <text:p>UNKNOWN</text:p>
          </table:table-cell>
          <table:table-cell office:value-type="string" table:formula="of:=IF([.S130]=&quot;UNKNOWN&quot;;&quot;NO ACTION — linkage status is UNKNOWN / not asserted&quot;;IF([.S130]=&quot;CLEAR&quot;;&quot;NO CONTRADICTION — preserve evidence as entered&quot;;IF([.M130]=&quot;&quot;;&quot;REVIEW LINKAGE STATUS — identifiers are present while status is UNKNOWN&quot;;IF([.M130]=&quot;UNMATCHED&quot;;&quot;REMOVE LINKAGE IDENTIFIERS OR CORRECT LINKAGE STATUS&quot;;IF([.M130]=&quot;SINGLE_SALE_LINKED&quot;;&quot;REQUIRE LINKED SALE ID AND NO ALLOCATION GROUP ID&quot;;IF([.M130]=&quot;MULTI_SALE_PENDING_ALLOCATION&quot;;&quot;REMOVE LINKED SALE ID OR CORRECT LINKAGE STATUS&quot;;IF([.M130]=&quot;ALLOCATED&quot;;&quot;REQUIRE ALLOCATION GROUP ID AND NO LINKED SALE ID&quot;;&quot;REVIEW LINKAGE EVIDENCE — NO AUTHORITY CREATED&quot;)))))))">
            <text:p>NO ACTION — linkage status is UNKNOWN / not asserted</text:p>
          </table:table-cell>
          <table:table-cell office:value-type="string" table:formula="of:=IF([.S130]=&quot;CONTRADICTION&quot;;&quot;BLOCKED&quot;;IF([.S130]=&quot;UNKNOWN&quot;;&quot;UNKNOWN&quot;;IF([.S130]=&quot;CLEAR&quot;;IF(OR([.O130]=&quot;&quot;;[.P130]=&quot;&quot;);&quot;UNKNOWN&quot;;&quot;READY FOR REVIEW&quot;);&quot;BLOCKED&quot;)))">
            <text:p>UNKNOWN</text:p>
          </table:table-cell>
          <table:table-cell office:value-type="string" table:formula="of:=IF([.U130]=&quot;UNKNOWN&quot;;&quot;COMPLETE OR ASSERT REQUIRED EVIDENCE BEFORE REVIEW&quot;;IF([.U130]=&quot;BLOCKED&quot;;&quot;RESOLVE CONTRADICTION BEFORE REVIEW — NO AUTHORITY CREATED&quot;;IF([.U1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0]=&quot;READY FOR REVIEW&quot;;&quot;REVIEW ELIGIBLE — NO AUTHORITY&quot;;IF(OR([.U130]=&quot;UNKNOWN&quot;;[.U13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1]=&quot;&quot;;IF(AND([.L131]=&quot;&quot;;[.N131]=&quot;&quot;);&quot;UNKNOWN&quot;;&quot;CONTRADICTION&quot;);IF([.M131]=&quot;UNMATCHED&quot;;IF(AND([.L131]=&quot;&quot;;[.N131]=&quot;&quot;);&quot;CLEAR&quot;;&quot;CONTRADICTION&quot;);IF([.M131]=&quot;SINGLE_SALE_LINKED&quot;;IF(AND([.L131]&lt;&gt;&quot;&quot;;[.N131]=&quot;&quot;);&quot;CLEAR&quot;;&quot;CONTRADICTION&quot;);IF([.M131]=&quot;MULTI_SALE_PENDING_ALLOCATION&quot;;IF([.L131]=&quot;&quot;;&quot;CLEAR&quot;;&quot;CONTRADICTION&quot;);IF([.M131]=&quot;ALLOCATED&quot;;IF(AND([.L131]=&quot;&quot;;[.N131]&lt;&gt;&quot;&quot;);&quot;CLEAR&quot;;&quot;CONTRADICTION&quot;);&quot;CONTRADICTION&quot;)))))">
            <text:p>UNKNOWN</text:p>
          </table:table-cell>
          <table:table-cell office:value-type="string" table:formula="of:=IF([.S131]=&quot;UNKNOWN&quot;;&quot;NO ACTION — linkage status is UNKNOWN / not asserted&quot;;IF([.S131]=&quot;CLEAR&quot;;&quot;NO CONTRADICTION — preserve evidence as entered&quot;;IF([.M131]=&quot;&quot;;&quot;REVIEW LINKAGE STATUS — identifiers are present while status is UNKNOWN&quot;;IF([.M131]=&quot;UNMATCHED&quot;;&quot;REMOVE LINKAGE IDENTIFIERS OR CORRECT LINKAGE STATUS&quot;;IF([.M131]=&quot;SINGLE_SALE_LINKED&quot;;&quot;REQUIRE LINKED SALE ID AND NO ALLOCATION GROUP ID&quot;;IF([.M131]=&quot;MULTI_SALE_PENDING_ALLOCATION&quot;;&quot;REMOVE LINKED SALE ID OR CORRECT LINKAGE STATUS&quot;;IF([.M131]=&quot;ALLOCATED&quot;;&quot;REQUIRE ALLOCATION GROUP ID AND NO LINKED SALE ID&quot;;&quot;REVIEW LINKAGE EVIDENCE — NO AUTHORITY CREATED&quot;)))))))">
            <text:p>NO ACTION — linkage status is UNKNOWN / not asserted</text:p>
          </table:table-cell>
          <table:table-cell office:value-type="string" table:formula="of:=IF([.S131]=&quot;CONTRADICTION&quot;;&quot;BLOCKED&quot;;IF([.S131]=&quot;UNKNOWN&quot;;&quot;UNKNOWN&quot;;IF([.S131]=&quot;CLEAR&quot;;IF(OR([.O131]=&quot;&quot;;[.P131]=&quot;&quot;);&quot;UNKNOWN&quot;;&quot;READY FOR REVIEW&quot;);&quot;BLOCKED&quot;)))">
            <text:p>UNKNOWN</text:p>
          </table:table-cell>
          <table:table-cell office:value-type="string" table:formula="of:=IF([.U131]=&quot;UNKNOWN&quot;;&quot;COMPLETE OR ASSERT REQUIRED EVIDENCE BEFORE REVIEW&quot;;IF([.U131]=&quot;BLOCKED&quot;;&quot;RESOLVE CONTRADICTION BEFORE REVIEW — NO AUTHORITY CREATED&quot;;IF([.U1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1]=&quot;READY FOR REVIEW&quot;;&quot;REVIEW ELIGIBLE — NO AUTHORITY&quot;;IF(OR([.U131]=&quot;UNKNOWN&quot;;[.U13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2]=&quot;&quot;;IF(AND([.L132]=&quot;&quot;;[.N132]=&quot;&quot;);&quot;UNKNOWN&quot;;&quot;CONTRADICTION&quot;);IF([.M132]=&quot;UNMATCHED&quot;;IF(AND([.L132]=&quot;&quot;;[.N132]=&quot;&quot;);&quot;CLEAR&quot;;&quot;CONTRADICTION&quot;);IF([.M132]=&quot;SINGLE_SALE_LINKED&quot;;IF(AND([.L132]&lt;&gt;&quot;&quot;;[.N132]=&quot;&quot;);&quot;CLEAR&quot;;&quot;CONTRADICTION&quot;);IF([.M132]=&quot;MULTI_SALE_PENDING_ALLOCATION&quot;;IF([.L132]=&quot;&quot;;&quot;CLEAR&quot;;&quot;CONTRADICTION&quot;);IF([.M132]=&quot;ALLOCATED&quot;;IF(AND([.L132]=&quot;&quot;;[.N132]&lt;&gt;&quot;&quot;);&quot;CLEAR&quot;;&quot;CONTRADICTION&quot;);&quot;CONTRADICTION&quot;)))))">
            <text:p>UNKNOWN</text:p>
          </table:table-cell>
          <table:table-cell office:value-type="string" table:formula="of:=IF([.S132]=&quot;UNKNOWN&quot;;&quot;NO ACTION — linkage status is UNKNOWN / not asserted&quot;;IF([.S132]=&quot;CLEAR&quot;;&quot;NO CONTRADICTION — preserve evidence as entered&quot;;IF([.M132]=&quot;&quot;;&quot;REVIEW LINKAGE STATUS — identifiers are present while status is UNKNOWN&quot;;IF([.M132]=&quot;UNMATCHED&quot;;&quot;REMOVE LINKAGE IDENTIFIERS OR CORRECT LINKAGE STATUS&quot;;IF([.M132]=&quot;SINGLE_SALE_LINKED&quot;;&quot;REQUIRE LINKED SALE ID AND NO ALLOCATION GROUP ID&quot;;IF([.M132]=&quot;MULTI_SALE_PENDING_ALLOCATION&quot;;&quot;REMOVE LINKED SALE ID OR CORRECT LINKAGE STATUS&quot;;IF([.M132]=&quot;ALLOCATED&quot;;&quot;REQUIRE ALLOCATION GROUP ID AND NO LINKED SALE ID&quot;;&quot;REVIEW LINKAGE EVIDENCE — NO AUTHORITY CREATED&quot;)))))))">
            <text:p>NO ACTION — linkage status is UNKNOWN / not asserted</text:p>
          </table:table-cell>
          <table:table-cell office:value-type="string" table:formula="of:=IF([.S132]=&quot;CONTRADICTION&quot;;&quot;BLOCKED&quot;;IF([.S132]=&quot;UNKNOWN&quot;;&quot;UNKNOWN&quot;;IF([.S132]=&quot;CLEAR&quot;;IF(OR([.O132]=&quot;&quot;;[.P132]=&quot;&quot;);&quot;UNKNOWN&quot;;&quot;READY FOR REVIEW&quot;);&quot;BLOCKED&quot;)))">
            <text:p>UNKNOWN</text:p>
          </table:table-cell>
          <table:table-cell office:value-type="string" table:formula="of:=IF([.U132]=&quot;UNKNOWN&quot;;&quot;COMPLETE OR ASSERT REQUIRED EVIDENCE BEFORE REVIEW&quot;;IF([.U132]=&quot;BLOCKED&quot;;&quot;RESOLVE CONTRADICTION BEFORE REVIEW — NO AUTHORITY CREATED&quot;;IF([.U1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2]=&quot;READY FOR REVIEW&quot;;&quot;REVIEW ELIGIBLE — NO AUTHORITY&quot;;IF(OR([.U132]=&quot;UNKNOWN&quot;;[.U13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3]=&quot;&quot;;IF(AND([.L133]=&quot;&quot;;[.N133]=&quot;&quot;);&quot;UNKNOWN&quot;;&quot;CONTRADICTION&quot;);IF([.M133]=&quot;UNMATCHED&quot;;IF(AND([.L133]=&quot;&quot;;[.N133]=&quot;&quot;);&quot;CLEAR&quot;;&quot;CONTRADICTION&quot;);IF([.M133]=&quot;SINGLE_SALE_LINKED&quot;;IF(AND([.L133]&lt;&gt;&quot;&quot;;[.N133]=&quot;&quot;);&quot;CLEAR&quot;;&quot;CONTRADICTION&quot;);IF([.M133]=&quot;MULTI_SALE_PENDING_ALLOCATION&quot;;IF([.L133]=&quot;&quot;;&quot;CLEAR&quot;;&quot;CONTRADICTION&quot;);IF([.M133]=&quot;ALLOCATED&quot;;IF(AND([.L133]=&quot;&quot;;[.N133]&lt;&gt;&quot;&quot;);&quot;CLEAR&quot;;&quot;CONTRADICTION&quot;);&quot;CONTRADICTION&quot;)))))">
            <text:p>UNKNOWN</text:p>
          </table:table-cell>
          <table:table-cell office:value-type="string" table:formula="of:=IF([.S133]=&quot;UNKNOWN&quot;;&quot;NO ACTION — linkage status is UNKNOWN / not asserted&quot;;IF([.S133]=&quot;CLEAR&quot;;&quot;NO CONTRADICTION — preserve evidence as entered&quot;;IF([.M133]=&quot;&quot;;&quot;REVIEW LINKAGE STATUS — identifiers are present while status is UNKNOWN&quot;;IF([.M133]=&quot;UNMATCHED&quot;;&quot;REMOVE LINKAGE IDENTIFIERS OR CORRECT LINKAGE STATUS&quot;;IF([.M133]=&quot;SINGLE_SALE_LINKED&quot;;&quot;REQUIRE LINKED SALE ID AND NO ALLOCATION GROUP ID&quot;;IF([.M133]=&quot;MULTI_SALE_PENDING_ALLOCATION&quot;;&quot;REMOVE LINKED SALE ID OR CORRECT LINKAGE STATUS&quot;;IF([.M133]=&quot;ALLOCATED&quot;;&quot;REQUIRE ALLOCATION GROUP ID AND NO LINKED SALE ID&quot;;&quot;REVIEW LINKAGE EVIDENCE — NO AUTHORITY CREATED&quot;)))))))">
            <text:p>NO ACTION — linkage status is UNKNOWN / not asserted</text:p>
          </table:table-cell>
          <table:table-cell office:value-type="string" table:formula="of:=IF([.S133]=&quot;CONTRADICTION&quot;;&quot;BLOCKED&quot;;IF([.S133]=&quot;UNKNOWN&quot;;&quot;UNKNOWN&quot;;IF([.S133]=&quot;CLEAR&quot;;IF(OR([.O133]=&quot;&quot;;[.P133]=&quot;&quot;);&quot;UNKNOWN&quot;;&quot;READY FOR REVIEW&quot;);&quot;BLOCKED&quot;)))">
            <text:p>UNKNOWN</text:p>
          </table:table-cell>
          <table:table-cell office:value-type="string" table:formula="of:=IF([.U133]=&quot;UNKNOWN&quot;;&quot;COMPLETE OR ASSERT REQUIRED EVIDENCE BEFORE REVIEW&quot;;IF([.U133]=&quot;BLOCKED&quot;;&quot;RESOLVE CONTRADICTION BEFORE REVIEW — NO AUTHORITY CREATED&quot;;IF([.U1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3]=&quot;READY FOR REVIEW&quot;;&quot;REVIEW ELIGIBLE — NO AUTHORITY&quot;;IF(OR([.U133]=&quot;UNKNOWN&quot;;[.U13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4]=&quot;&quot;;IF(AND([.L134]=&quot;&quot;;[.N134]=&quot;&quot;);&quot;UNKNOWN&quot;;&quot;CONTRADICTION&quot;);IF([.M134]=&quot;UNMATCHED&quot;;IF(AND([.L134]=&quot;&quot;;[.N134]=&quot;&quot;);&quot;CLEAR&quot;;&quot;CONTRADICTION&quot;);IF([.M134]=&quot;SINGLE_SALE_LINKED&quot;;IF(AND([.L134]&lt;&gt;&quot;&quot;;[.N134]=&quot;&quot;);&quot;CLEAR&quot;;&quot;CONTRADICTION&quot;);IF([.M134]=&quot;MULTI_SALE_PENDING_ALLOCATION&quot;;IF([.L134]=&quot;&quot;;&quot;CLEAR&quot;;&quot;CONTRADICTION&quot;);IF([.M134]=&quot;ALLOCATED&quot;;IF(AND([.L134]=&quot;&quot;;[.N134]&lt;&gt;&quot;&quot;);&quot;CLEAR&quot;;&quot;CONTRADICTION&quot;);&quot;CONTRADICTION&quot;)))))">
            <text:p>UNKNOWN</text:p>
          </table:table-cell>
          <table:table-cell office:value-type="string" table:formula="of:=IF([.S134]=&quot;UNKNOWN&quot;;&quot;NO ACTION — linkage status is UNKNOWN / not asserted&quot;;IF([.S134]=&quot;CLEAR&quot;;&quot;NO CONTRADICTION — preserve evidence as entered&quot;;IF([.M134]=&quot;&quot;;&quot;REVIEW LINKAGE STATUS — identifiers are present while status is UNKNOWN&quot;;IF([.M134]=&quot;UNMATCHED&quot;;&quot;REMOVE LINKAGE IDENTIFIERS OR CORRECT LINKAGE STATUS&quot;;IF([.M134]=&quot;SINGLE_SALE_LINKED&quot;;&quot;REQUIRE LINKED SALE ID AND NO ALLOCATION GROUP ID&quot;;IF([.M134]=&quot;MULTI_SALE_PENDING_ALLOCATION&quot;;&quot;REMOVE LINKED SALE ID OR CORRECT LINKAGE STATUS&quot;;IF([.M134]=&quot;ALLOCATED&quot;;&quot;REQUIRE ALLOCATION GROUP ID AND NO LINKED SALE ID&quot;;&quot;REVIEW LINKAGE EVIDENCE — NO AUTHORITY CREATED&quot;)))))))">
            <text:p>NO ACTION — linkage status is UNKNOWN / not asserted</text:p>
          </table:table-cell>
          <table:table-cell office:value-type="string" table:formula="of:=IF([.S134]=&quot;CONTRADICTION&quot;;&quot;BLOCKED&quot;;IF([.S134]=&quot;UNKNOWN&quot;;&quot;UNKNOWN&quot;;IF([.S134]=&quot;CLEAR&quot;;IF(OR([.O134]=&quot;&quot;;[.P134]=&quot;&quot;);&quot;UNKNOWN&quot;;&quot;READY FOR REVIEW&quot;);&quot;BLOCKED&quot;)))">
            <text:p>UNKNOWN</text:p>
          </table:table-cell>
          <table:table-cell office:value-type="string" table:formula="of:=IF([.U134]=&quot;UNKNOWN&quot;;&quot;COMPLETE OR ASSERT REQUIRED EVIDENCE BEFORE REVIEW&quot;;IF([.U134]=&quot;BLOCKED&quot;;&quot;RESOLVE CONTRADICTION BEFORE REVIEW — NO AUTHORITY CREATED&quot;;IF([.U1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4]=&quot;READY FOR REVIEW&quot;;&quot;REVIEW ELIGIBLE — NO AUTHORITY&quot;;IF(OR([.U134]=&quot;UNKNOWN&quot;;[.U13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5]=&quot;&quot;;IF(AND([.L135]=&quot;&quot;;[.N135]=&quot;&quot;);&quot;UNKNOWN&quot;;&quot;CONTRADICTION&quot;);IF([.M135]=&quot;UNMATCHED&quot;;IF(AND([.L135]=&quot;&quot;;[.N135]=&quot;&quot;);&quot;CLEAR&quot;;&quot;CONTRADICTION&quot;);IF([.M135]=&quot;SINGLE_SALE_LINKED&quot;;IF(AND([.L135]&lt;&gt;&quot;&quot;;[.N135]=&quot;&quot;);&quot;CLEAR&quot;;&quot;CONTRADICTION&quot;);IF([.M135]=&quot;MULTI_SALE_PENDING_ALLOCATION&quot;;IF([.L135]=&quot;&quot;;&quot;CLEAR&quot;;&quot;CONTRADICTION&quot;);IF([.M135]=&quot;ALLOCATED&quot;;IF(AND([.L135]=&quot;&quot;;[.N135]&lt;&gt;&quot;&quot;);&quot;CLEAR&quot;;&quot;CONTRADICTION&quot;);&quot;CONTRADICTION&quot;)))))">
            <text:p>UNKNOWN</text:p>
          </table:table-cell>
          <table:table-cell office:value-type="string" table:formula="of:=IF([.S135]=&quot;UNKNOWN&quot;;&quot;NO ACTION — linkage status is UNKNOWN / not asserted&quot;;IF([.S135]=&quot;CLEAR&quot;;&quot;NO CONTRADICTION — preserve evidence as entered&quot;;IF([.M135]=&quot;&quot;;&quot;REVIEW LINKAGE STATUS — identifiers are present while status is UNKNOWN&quot;;IF([.M135]=&quot;UNMATCHED&quot;;&quot;REMOVE LINKAGE IDENTIFIERS OR CORRECT LINKAGE STATUS&quot;;IF([.M135]=&quot;SINGLE_SALE_LINKED&quot;;&quot;REQUIRE LINKED SALE ID AND NO ALLOCATION GROUP ID&quot;;IF([.M135]=&quot;MULTI_SALE_PENDING_ALLOCATION&quot;;&quot;REMOVE LINKED SALE ID OR CORRECT LINKAGE STATUS&quot;;IF([.M135]=&quot;ALLOCATED&quot;;&quot;REQUIRE ALLOCATION GROUP ID AND NO LINKED SALE ID&quot;;&quot;REVIEW LINKAGE EVIDENCE — NO AUTHORITY CREATED&quot;)))))))">
            <text:p>NO ACTION — linkage status is UNKNOWN / not asserted</text:p>
          </table:table-cell>
          <table:table-cell office:value-type="string" table:formula="of:=IF([.S135]=&quot;CONTRADICTION&quot;;&quot;BLOCKED&quot;;IF([.S135]=&quot;UNKNOWN&quot;;&quot;UNKNOWN&quot;;IF([.S135]=&quot;CLEAR&quot;;IF(OR([.O135]=&quot;&quot;;[.P135]=&quot;&quot;);&quot;UNKNOWN&quot;;&quot;READY FOR REVIEW&quot;);&quot;BLOCKED&quot;)))">
            <text:p>UNKNOWN</text:p>
          </table:table-cell>
          <table:table-cell office:value-type="string" table:formula="of:=IF([.U135]=&quot;UNKNOWN&quot;;&quot;COMPLETE OR ASSERT REQUIRED EVIDENCE BEFORE REVIEW&quot;;IF([.U135]=&quot;BLOCKED&quot;;&quot;RESOLVE CONTRADICTION BEFORE REVIEW — NO AUTHORITY CREATED&quot;;IF([.U1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5]=&quot;READY FOR REVIEW&quot;;&quot;REVIEW ELIGIBLE — NO AUTHORITY&quot;;IF(OR([.U135]=&quot;UNKNOWN&quot;;[.U13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6]=&quot;&quot;;IF(AND([.L136]=&quot;&quot;;[.N136]=&quot;&quot;);&quot;UNKNOWN&quot;;&quot;CONTRADICTION&quot;);IF([.M136]=&quot;UNMATCHED&quot;;IF(AND([.L136]=&quot;&quot;;[.N136]=&quot;&quot;);&quot;CLEAR&quot;;&quot;CONTRADICTION&quot;);IF([.M136]=&quot;SINGLE_SALE_LINKED&quot;;IF(AND([.L136]&lt;&gt;&quot;&quot;;[.N136]=&quot;&quot;);&quot;CLEAR&quot;;&quot;CONTRADICTION&quot;);IF([.M136]=&quot;MULTI_SALE_PENDING_ALLOCATION&quot;;IF([.L136]=&quot;&quot;;&quot;CLEAR&quot;;&quot;CONTRADICTION&quot;);IF([.M136]=&quot;ALLOCATED&quot;;IF(AND([.L136]=&quot;&quot;;[.N136]&lt;&gt;&quot;&quot;);&quot;CLEAR&quot;;&quot;CONTRADICTION&quot;);&quot;CONTRADICTION&quot;)))))">
            <text:p>UNKNOWN</text:p>
          </table:table-cell>
          <table:table-cell office:value-type="string" table:formula="of:=IF([.S136]=&quot;UNKNOWN&quot;;&quot;NO ACTION — linkage status is UNKNOWN / not asserted&quot;;IF([.S136]=&quot;CLEAR&quot;;&quot;NO CONTRADICTION — preserve evidence as entered&quot;;IF([.M136]=&quot;&quot;;&quot;REVIEW LINKAGE STATUS — identifiers are present while status is UNKNOWN&quot;;IF([.M136]=&quot;UNMATCHED&quot;;&quot;REMOVE LINKAGE IDENTIFIERS OR CORRECT LINKAGE STATUS&quot;;IF([.M136]=&quot;SINGLE_SALE_LINKED&quot;;&quot;REQUIRE LINKED SALE ID AND NO ALLOCATION GROUP ID&quot;;IF([.M136]=&quot;MULTI_SALE_PENDING_ALLOCATION&quot;;&quot;REMOVE LINKED SALE ID OR CORRECT LINKAGE STATUS&quot;;IF([.M136]=&quot;ALLOCATED&quot;;&quot;REQUIRE ALLOCATION GROUP ID AND NO LINKED SALE ID&quot;;&quot;REVIEW LINKAGE EVIDENCE — NO AUTHORITY CREATED&quot;)))))))">
            <text:p>NO ACTION — linkage status is UNKNOWN / not asserted</text:p>
          </table:table-cell>
          <table:table-cell office:value-type="string" table:formula="of:=IF([.S136]=&quot;CONTRADICTION&quot;;&quot;BLOCKED&quot;;IF([.S136]=&quot;UNKNOWN&quot;;&quot;UNKNOWN&quot;;IF([.S136]=&quot;CLEAR&quot;;IF(OR([.O136]=&quot;&quot;;[.P136]=&quot;&quot;);&quot;UNKNOWN&quot;;&quot;READY FOR REVIEW&quot;);&quot;BLOCKED&quot;)))">
            <text:p>UNKNOWN</text:p>
          </table:table-cell>
          <table:table-cell office:value-type="string" table:formula="of:=IF([.U136]=&quot;UNKNOWN&quot;;&quot;COMPLETE OR ASSERT REQUIRED EVIDENCE BEFORE REVIEW&quot;;IF([.U136]=&quot;BLOCKED&quot;;&quot;RESOLVE CONTRADICTION BEFORE REVIEW — NO AUTHORITY CREATED&quot;;IF([.U1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6]=&quot;READY FOR REVIEW&quot;;&quot;REVIEW ELIGIBLE — NO AUTHORITY&quot;;IF(OR([.U136]=&quot;UNKNOWN&quot;;[.U13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7]=&quot;&quot;;IF(AND([.L137]=&quot;&quot;;[.N137]=&quot;&quot;);&quot;UNKNOWN&quot;;&quot;CONTRADICTION&quot;);IF([.M137]=&quot;UNMATCHED&quot;;IF(AND([.L137]=&quot;&quot;;[.N137]=&quot;&quot;);&quot;CLEAR&quot;;&quot;CONTRADICTION&quot;);IF([.M137]=&quot;SINGLE_SALE_LINKED&quot;;IF(AND([.L137]&lt;&gt;&quot;&quot;;[.N137]=&quot;&quot;);&quot;CLEAR&quot;;&quot;CONTRADICTION&quot;);IF([.M137]=&quot;MULTI_SALE_PENDING_ALLOCATION&quot;;IF([.L137]=&quot;&quot;;&quot;CLEAR&quot;;&quot;CONTRADICTION&quot;);IF([.M137]=&quot;ALLOCATED&quot;;IF(AND([.L137]=&quot;&quot;;[.N137]&lt;&gt;&quot;&quot;);&quot;CLEAR&quot;;&quot;CONTRADICTION&quot;);&quot;CONTRADICTION&quot;)))))">
            <text:p>UNKNOWN</text:p>
          </table:table-cell>
          <table:table-cell office:value-type="string" table:formula="of:=IF([.S137]=&quot;UNKNOWN&quot;;&quot;NO ACTION — linkage status is UNKNOWN / not asserted&quot;;IF([.S137]=&quot;CLEAR&quot;;&quot;NO CONTRADICTION — preserve evidence as entered&quot;;IF([.M137]=&quot;&quot;;&quot;REVIEW LINKAGE STATUS — identifiers are present while status is UNKNOWN&quot;;IF([.M137]=&quot;UNMATCHED&quot;;&quot;REMOVE LINKAGE IDENTIFIERS OR CORRECT LINKAGE STATUS&quot;;IF([.M137]=&quot;SINGLE_SALE_LINKED&quot;;&quot;REQUIRE LINKED SALE ID AND NO ALLOCATION GROUP ID&quot;;IF([.M137]=&quot;MULTI_SALE_PENDING_ALLOCATION&quot;;&quot;REMOVE LINKED SALE ID OR CORRECT LINKAGE STATUS&quot;;IF([.M137]=&quot;ALLOCATED&quot;;&quot;REQUIRE ALLOCATION GROUP ID AND NO LINKED SALE ID&quot;;&quot;REVIEW LINKAGE EVIDENCE — NO AUTHORITY CREATED&quot;)))))))">
            <text:p>NO ACTION — linkage status is UNKNOWN / not asserted</text:p>
          </table:table-cell>
          <table:table-cell office:value-type="string" table:formula="of:=IF([.S137]=&quot;CONTRADICTION&quot;;&quot;BLOCKED&quot;;IF([.S137]=&quot;UNKNOWN&quot;;&quot;UNKNOWN&quot;;IF([.S137]=&quot;CLEAR&quot;;IF(OR([.O137]=&quot;&quot;;[.P137]=&quot;&quot;);&quot;UNKNOWN&quot;;&quot;READY FOR REVIEW&quot;);&quot;BLOCKED&quot;)))">
            <text:p>UNKNOWN</text:p>
          </table:table-cell>
          <table:table-cell office:value-type="string" table:formula="of:=IF([.U137]=&quot;UNKNOWN&quot;;&quot;COMPLETE OR ASSERT REQUIRED EVIDENCE BEFORE REVIEW&quot;;IF([.U137]=&quot;BLOCKED&quot;;&quot;RESOLVE CONTRADICTION BEFORE REVIEW — NO AUTHORITY CREATED&quot;;IF([.U1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7]=&quot;READY FOR REVIEW&quot;;&quot;REVIEW ELIGIBLE — NO AUTHORITY&quot;;IF(OR([.U137]=&quot;UNKNOWN&quot;;[.U13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8]=&quot;&quot;;IF(AND([.L138]=&quot;&quot;;[.N138]=&quot;&quot;);&quot;UNKNOWN&quot;;&quot;CONTRADICTION&quot;);IF([.M138]=&quot;UNMATCHED&quot;;IF(AND([.L138]=&quot;&quot;;[.N138]=&quot;&quot;);&quot;CLEAR&quot;;&quot;CONTRADICTION&quot;);IF([.M138]=&quot;SINGLE_SALE_LINKED&quot;;IF(AND([.L138]&lt;&gt;&quot;&quot;;[.N138]=&quot;&quot;);&quot;CLEAR&quot;;&quot;CONTRADICTION&quot;);IF([.M138]=&quot;MULTI_SALE_PENDING_ALLOCATION&quot;;IF([.L138]=&quot;&quot;;&quot;CLEAR&quot;;&quot;CONTRADICTION&quot;);IF([.M138]=&quot;ALLOCATED&quot;;IF(AND([.L138]=&quot;&quot;;[.N138]&lt;&gt;&quot;&quot;);&quot;CLEAR&quot;;&quot;CONTRADICTION&quot;);&quot;CONTRADICTION&quot;)))))">
            <text:p>UNKNOWN</text:p>
          </table:table-cell>
          <table:table-cell office:value-type="string" table:formula="of:=IF([.S138]=&quot;UNKNOWN&quot;;&quot;NO ACTION — linkage status is UNKNOWN / not asserted&quot;;IF([.S138]=&quot;CLEAR&quot;;&quot;NO CONTRADICTION — preserve evidence as entered&quot;;IF([.M138]=&quot;&quot;;&quot;REVIEW LINKAGE STATUS — identifiers are present while status is UNKNOWN&quot;;IF([.M138]=&quot;UNMATCHED&quot;;&quot;REMOVE LINKAGE IDENTIFIERS OR CORRECT LINKAGE STATUS&quot;;IF([.M138]=&quot;SINGLE_SALE_LINKED&quot;;&quot;REQUIRE LINKED SALE ID AND NO ALLOCATION GROUP ID&quot;;IF([.M138]=&quot;MULTI_SALE_PENDING_ALLOCATION&quot;;&quot;REMOVE LINKED SALE ID OR CORRECT LINKAGE STATUS&quot;;IF([.M138]=&quot;ALLOCATED&quot;;&quot;REQUIRE ALLOCATION GROUP ID AND NO LINKED SALE ID&quot;;&quot;REVIEW LINKAGE EVIDENCE — NO AUTHORITY CREATED&quot;)))))))">
            <text:p>NO ACTION — linkage status is UNKNOWN / not asserted</text:p>
          </table:table-cell>
          <table:table-cell office:value-type="string" table:formula="of:=IF([.S138]=&quot;CONTRADICTION&quot;;&quot;BLOCKED&quot;;IF([.S138]=&quot;UNKNOWN&quot;;&quot;UNKNOWN&quot;;IF([.S138]=&quot;CLEAR&quot;;IF(OR([.O138]=&quot;&quot;;[.P138]=&quot;&quot;);&quot;UNKNOWN&quot;;&quot;READY FOR REVIEW&quot;);&quot;BLOCKED&quot;)))">
            <text:p>UNKNOWN</text:p>
          </table:table-cell>
          <table:table-cell office:value-type="string" table:formula="of:=IF([.U138]=&quot;UNKNOWN&quot;;&quot;COMPLETE OR ASSERT REQUIRED EVIDENCE BEFORE REVIEW&quot;;IF([.U138]=&quot;BLOCKED&quot;;&quot;RESOLVE CONTRADICTION BEFORE REVIEW — NO AUTHORITY CREATED&quot;;IF([.U1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8]=&quot;READY FOR REVIEW&quot;;&quot;REVIEW ELIGIBLE — NO AUTHORITY&quot;;IF(OR([.U138]=&quot;UNKNOWN&quot;;[.U13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9]=&quot;&quot;;IF(AND([.L139]=&quot;&quot;;[.N139]=&quot;&quot;);&quot;UNKNOWN&quot;;&quot;CONTRADICTION&quot;);IF([.M139]=&quot;UNMATCHED&quot;;IF(AND([.L139]=&quot;&quot;;[.N139]=&quot;&quot;);&quot;CLEAR&quot;;&quot;CONTRADICTION&quot;);IF([.M139]=&quot;SINGLE_SALE_LINKED&quot;;IF(AND([.L139]&lt;&gt;&quot;&quot;;[.N139]=&quot;&quot;);&quot;CLEAR&quot;;&quot;CONTRADICTION&quot;);IF([.M139]=&quot;MULTI_SALE_PENDING_ALLOCATION&quot;;IF([.L139]=&quot;&quot;;&quot;CLEAR&quot;;&quot;CONTRADICTION&quot;);IF([.M139]=&quot;ALLOCATED&quot;;IF(AND([.L139]=&quot;&quot;;[.N139]&lt;&gt;&quot;&quot;);&quot;CLEAR&quot;;&quot;CONTRADICTION&quot;);&quot;CONTRADICTION&quot;)))))">
            <text:p>UNKNOWN</text:p>
          </table:table-cell>
          <table:table-cell office:value-type="string" table:formula="of:=IF([.S139]=&quot;UNKNOWN&quot;;&quot;NO ACTION — linkage status is UNKNOWN / not asserted&quot;;IF([.S139]=&quot;CLEAR&quot;;&quot;NO CONTRADICTION — preserve evidence as entered&quot;;IF([.M139]=&quot;&quot;;&quot;REVIEW LINKAGE STATUS — identifiers are present while status is UNKNOWN&quot;;IF([.M139]=&quot;UNMATCHED&quot;;&quot;REMOVE LINKAGE IDENTIFIERS OR CORRECT LINKAGE STATUS&quot;;IF([.M139]=&quot;SINGLE_SALE_LINKED&quot;;&quot;REQUIRE LINKED SALE ID AND NO ALLOCATION GROUP ID&quot;;IF([.M139]=&quot;MULTI_SALE_PENDING_ALLOCATION&quot;;&quot;REMOVE LINKED SALE ID OR CORRECT LINKAGE STATUS&quot;;IF([.M139]=&quot;ALLOCATED&quot;;&quot;REQUIRE ALLOCATION GROUP ID AND NO LINKED SALE ID&quot;;&quot;REVIEW LINKAGE EVIDENCE — NO AUTHORITY CREATED&quot;)))))))">
            <text:p>NO ACTION — linkage status is UNKNOWN / not asserted</text:p>
          </table:table-cell>
          <table:table-cell office:value-type="string" table:formula="of:=IF([.S139]=&quot;CONTRADICTION&quot;;&quot;BLOCKED&quot;;IF([.S139]=&quot;UNKNOWN&quot;;&quot;UNKNOWN&quot;;IF([.S139]=&quot;CLEAR&quot;;IF(OR([.O139]=&quot;&quot;;[.P139]=&quot;&quot;);&quot;UNKNOWN&quot;;&quot;READY FOR REVIEW&quot;);&quot;BLOCKED&quot;)))">
            <text:p>UNKNOWN</text:p>
          </table:table-cell>
          <table:table-cell office:value-type="string" table:formula="of:=IF([.U139]=&quot;UNKNOWN&quot;;&quot;COMPLETE OR ASSERT REQUIRED EVIDENCE BEFORE REVIEW&quot;;IF([.U139]=&quot;BLOCKED&quot;;&quot;RESOLVE CONTRADICTION BEFORE REVIEW — NO AUTHORITY CREATED&quot;;IF([.U1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9]=&quot;READY FOR REVIEW&quot;;&quot;REVIEW ELIGIBLE — NO AUTHORITY&quot;;IF(OR([.U139]=&quot;UNKNOWN&quot;;[.U13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0]=&quot;&quot;;IF(AND([.L140]=&quot;&quot;;[.N140]=&quot;&quot;);&quot;UNKNOWN&quot;;&quot;CONTRADICTION&quot;);IF([.M140]=&quot;UNMATCHED&quot;;IF(AND([.L140]=&quot;&quot;;[.N140]=&quot;&quot;);&quot;CLEAR&quot;;&quot;CONTRADICTION&quot;);IF([.M140]=&quot;SINGLE_SALE_LINKED&quot;;IF(AND([.L140]&lt;&gt;&quot;&quot;;[.N140]=&quot;&quot;);&quot;CLEAR&quot;;&quot;CONTRADICTION&quot;);IF([.M140]=&quot;MULTI_SALE_PENDING_ALLOCATION&quot;;IF([.L140]=&quot;&quot;;&quot;CLEAR&quot;;&quot;CONTRADICTION&quot;);IF([.M140]=&quot;ALLOCATED&quot;;IF(AND([.L140]=&quot;&quot;;[.N140]&lt;&gt;&quot;&quot;);&quot;CLEAR&quot;;&quot;CONTRADICTION&quot;);&quot;CONTRADICTION&quot;)))))">
            <text:p>UNKNOWN</text:p>
          </table:table-cell>
          <table:table-cell office:value-type="string" table:formula="of:=IF([.S140]=&quot;UNKNOWN&quot;;&quot;NO ACTION — linkage status is UNKNOWN / not asserted&quot;;IF([.S140]=&quot;CLEAR&quot;;&quot;NO CONTRADICTION — preserve evidence as entered&quot;;IF([.M140]=&quot;&quot;;&quot;REVIEW LINKAGE STATUS — identifiers are present while status is UNKNOWN&quot;;IF([.M140]=&quot;UNMATCHED&quot;;&quot;REMOVE LINKAGE IDENTIFIERS OR CORRECT LINKAGE STATUS&quot;;IF([.M140]=&quot;SINGLE_SALE_LINKED&quot;;&quot;REQUIRE LINKED SALE ID AND NO ALLOCATION GROUP ID&quot;;IF([.M140]=&quot;MULTI_SALE_PENDING_ALLOCATION&quot;;&quot;REMOVE LINKED SALE ID OR CORRECT LINKAGE STATUS&quot;;IF([.M140]=&quot;ALLOCATED&quot;;&quot;REQUIRE ALLOCATION GROUP ID AND NO LINKED SALE ID&quot;;&quot;REVIEW LINKAGE EVIDENCE — NO AUTHORITY CREATED&quot;)))))))">
            <text:p>NO ACTION — linkage status is UNKNOWN / not asserted</text:p>
          </table:table-cell>
          <table:table-cell office:value-type="string" table:formula="of:=IF([.S140]=&quot;CONTRADICTION&quot;;&quot;BLOCKED&quot;;IF([.S140]=&quot;UNKNOWN&quot;;&quot;UNKNOWN&quot;;IF([.S140]=&quot;CLEAR&quot;;IF(OR([.O140]=&quot;&quot;;[.P140]=&quot;&quot;);&quot;UNKNOWN&quot;;&quot;READY FOR REVIEW&quot;);&quot;BLOCKED&quot;)))">
            <text:p>UNKNOWN</text:p>
          </table:table-cell>
          <table:table-cell office:value-type="string" table:formula="of:=IF([.U140]=&quot;UNKNOWN&quot;;&quot;COMPLETE OR ASSERT REQUIRED EVIDENCE BEFORE REVIEW&quot;;IF([.U140]=&quot;BLOCKED&quot;;&quot;RESOLVE CONTRADICTION BEFORE REVIEW — NO AUTHORITY CREATED&quot;;IF([.U1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0]=&quot;READY FOR REVIEW&quot;;&quot;REVIEW ELIGIBLE — NO AUTHORITY&quot;;IF(OR([.U140]=&quot;UNKNOWN&quot;;[.U14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1]=&quot;&quot;;IF(AND([.L141]=&quot;&quot;;[.N141]=&quot;&quot;);&quot;UNKNOWN&quot;;&quot;CONTRADICTION&quot;);IF([.M141]=&quot;UNMATCHED&quot;;IF(AND([.L141]=&quot;&quot;;[.N141]=&quot;&quot;);&quot;CLEAR&quot;;&quot;CONTRADICTION&quot;);IF([.M141]=&quot;SINGLE_SALE_LINKED&quot;;IF(AND([.L141]&lt;&gt;&quot;&quot;;[.N141]=&quot;&quot;);&quot;CLEAR&quot;;&quot;CONTRADICTION&quot;);IF([.M141]=&quot;MULTI_SALE_PENDING_ALLOCATION&quot;;IF([.L141]=&quot;&quot;;&quot;CLEAR&quot;;&quot;CONTRADICTION&quot;);IF([.M141]=&quot;ALLOCATED&quot;;IF(AND([.L141]=&quot;&quot;;[.N141]&lt;&gt;&quot;&quot;);&quot;CLEAR&quot;;&quot;CONTRADICTION&quot;);&quot;CONTRADICTION&quot;)))))">
            <text:p>UNKNOWN</text:p>
          </table:table-cell>
          <table:table-cell office:value-type="string" table:formula="of:=IF([.S141]=&quot;UNKNOWN&quot;;&quot;NO ACTION — linkage status is UNKNOWN / not asserted&quot;;IF([.S141]=&quot;CLEAR&quot;;&quot;NO CONTRADICTION — preserve evidence as entered&quot;;IF([.M141]=&quot;&quot;;&quot;REVIEW LINKAGE STATUS — identifiers are present while status is UNKNOWN&quot;;IF([.M141]=&quot;UNMATCHED&quot;;&quot;REMOVE LINKAGE IDENTIFIERS OR CORRECT LINKAGE STATUS&quot;;IF([.M141]=&quot;SINGLE_SALE_LINKED&quot;;&quot;REQUIRE LINKED SALE ID AND NO ALLOCATION GROUP ID&quot;;IF([.M141]=&quot;MULTI_SALE_PENDING_ALLOCATION&quot;;&quot;REMOVE LINKED SALE ID OR CORRECT LINKAGE STATUS&quot;;IF([.M141]=&quot;ALLOCATED&quot;;&quot;REQUIRE ALLOCATION GROUP ID AND NO LINKED SALE ID&quot;;&quot;REVIEW LINKAGE EVIDENCE — NO AUTHORITY CREATED&quot;)))))))">
            <text:p>NO ACTION — linkage status is UNKNOWN / not asserted</text:p>
          </table:table-cell>
          <table:table-cell office:value-type="string" table:formula="of:=IF([.S141]=&quot;CONTRADICTION&quot;;&quot;BLOCKED&quot;;IF([.S141]=&quot;UNKNOWN&quot;;&quot;UNKNOWN&quot;;IF([.S141]=&quot;CLEAR&quot;;IF(OR([.O141]=&quot;&quot;;[.P141]=&quot;&quot;);&quot;UNKNOWN&quot;;&quot;READY FOR REVIEW&quot;);&quot;BLOCKED&quot;)))">
            <text:p>UNKNOWN</text:p>
          </table:table-cell>
          <table:table-cell office:value-type="string" table:formula="of:=IF([.U141]=&quot;UNKNOWN&quot;;&quot;COMPLETE OR ASSERT REQUIRED EVIDENCE BEFORE REVIEW&quot;;IF([.U141]=&quot;BLOCKED&quot;;&quot;RESOLVE CONTRADICTION BEFORE REVIEW — NO AUTHORITY CREATED&quot;;IF([.U1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1]=&quot;READY FOR REVIEW&quot;;&quot;REVIEW ELIGIBLE — NO AUTHORITY&quot;;IF(OR([.U141]=&quot;UNKNOWN&quot;;[.U14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2]=&quot;&quot;;IF(AND([.L142]=&quot;&quot;;[.N142]=&quot;&quot;);&quot;UNKNOWN&quot;;&quot;CONTRADICTION&quot;);IF([.M142]=&quot;UNMATCHED&quot;;IF(AND([.L142]=&quot;&quot;;[.N142]=&quot;&quot;);&quot;CLEAR&quot;;&quot;CONTRADICTION&quot;);IF([.M142]=&quot;SINGLE_SALE_LINKED&quot;;IF(AND([.L142]&lt;&gt;&quot;&quot;;[.N142]=&quot;&quot;);&quot;CLEAR&quot;;&quot;CONTRADICTION&quot;);IF([.M142]=&quot;MULTI_SALE_PENDING_ALLOCATION&quot;;IF([.L142]=&quot;&quot;;&quot;CLEAR&quot;;&quot;CONTRADICTION&quot;);IF([.M142]=&quot;ALLOCATED&quot;;IF(AND([.L142]=&quot;&quot;;[.N142]&lt;&gt;&quot;&quot;);&quot;CLEAR&quot;;&quot;CONTRADICTION&quot;);&quot;CONTRADICTION&quot;)))))">
            <text:p>UNKNOWN</text:p>
          </table:table-cell>
          <table:table-cell office:value-type="string" table:formula="of:=IF([.S142]=&quot;UNKNOWN&quot;;&quot;NO ACTION — linkage status is UNKNOWN / not asserted&quot;;IF([.S142]=&quot;CLEAR&quot;;&quot;NO CONTRADICTION — preserve evidence as entered&quot;;IF([.M142]=&quot;&quot;;&quot;REVIEW LINKAGE STATUS — identifiers are present while status is UNKNOWN&quot;;IF([.M142]=&quot;UNMATCHED&quot;;&quot;REMOVE LINKAGE IDENTIFIERS OR CORRECT LINKAGE STATUS&quot;;IF([.M142]=&quot;SINGLE_SALE_LINKED&quot;;&quot;REQUIRE LINKED SALE ID AND NO ALLOCATION GROUP ID&quot;;IF([.M142]=&quot;MULTI_SALE_PENDING_ALLOCATION&quot;;&quot;REMOVE LINKED SALE ID OR CORRECT LINKAGE STATUS&quot;;IF([.M142]=&quot;ALLOCATED&quot;;&quot;REQUIRE ALLOCATION GROUP ID AND NO LINKED SALE ID&quot;;&quot;REVIEW LINKAGE EVIDENCE — NO AUTHORITY CREATED&quot;)))))))">
            <text:p>NO ACTION — linkage status is UNKNOWN / not asserted</text:p>
          </table:table-cell>
          <table:table-cell office:value-type="string" table:formula="of:=IF([.S142]=&quot;CONTRADICTION&quot;;&quot;BLOCKED&quot;;IF([.S142]=&quot;UNKNOWN&quot;;&quot;UNKNOWN&quot;;IF([.S142]=&quot;CLEAR&quot;;IF(OR([.O142]=&quot;&quot;;[.P142]=&quot;&quot;);&quot;UNKNOWN&quot;;&quot;READY FOR REVIEW&quot;);&quot;BLOCKED&quot;)))">
            <text:p>UNKNOWN</text:p>
          </table:table-cell>
          <table:table-cell office:value-type="string" table:formula="of:=IF([.U142]=&quot;UNKNOWN&quot;;&quot;COMPLETE OR ASSERT REQUIRED EVIDENCE BEFORE REVIEW&quot;;IF([.U142]=&quot;BLOCKED&quot;;&quot;RESOLVE CONTRADICTION BEFORE REVIEW — NO AUTHORITY CREATED&quot;;IF([.U1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2]=&quot;READY FOR REVIEW&quot;;&quot;REVIEW ELIGIBLE — NO AUTHORITY&quot;;IF(OR([.U142]=&quot;UNKNOWN&quot;;[.U14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3]=&quot;&quot;;IF(AND([.L143]=&quot;&quot;;[.N143]=&quot;&quot;);&quot;UNKNOWN&quot;;&quot;CONTRADICTION&quot;);IF([.M143]=&quot;UNMATCHED&quot;;IF(AND([.L143]=&quot;&quot;;[.N143]=&quot;&quot;);&quot;CLEAR&quot;;&quot;CONTRADICTION&quot;);IF([.M143]=&quot;SINGLE_SALE_LINKED&quot;;IF(AND([.L143]&lt;&gt;&quot;&quot;;[.N143]=&quot;&quot;);&quot;CLEAR&quot;;&quot;CONTRADICTION&quot;);IF([.M143]=&quot;MULTI_SALE_PENDING_ALLOCATION&quot;;IF([.L143]=&quot;&quot;;&quot;CLEAR&quot;;&quot;CONTRADICTION&quot;);IF([.M143]=&quot;ALLOCATED&quot;;IF(AND([.L143]=&quot;&quot;;[.N143]&lt;&gt;&quot;&quot;);&quot;CLEAR&quot;;&quot;CONTRADICTION&quot;);&quot;CONTRADICTION&quot;)))))">
            <text:p>UNKNOWN</text:p>
          </table:table-cell>
          <table:table-cell office:value-type="string" table:formula="of:=IF([.S143]=&quot;UNKNOWN&quot;;&quot;NO ACTION — linkage status is UNKNOWN / not asserted&quot;;IF([.S143]=&quot;CLEAR&quot;;&quot;NO CONTRADICTION — preserve evidence as entered&quot;;IF([.M143]=&quot;&quot;;&quot;REVIEW LINKAGE STATUS — identifiers are present while status is UNKNOWN&quot;;IF([.M143]=&quot;UNMATCHED&quot;;&quot;REMOVE LINKAGE IDENTIFIERS OR CORRECT LINKAGE STATUS&quot;;IF([.M143]=&quot;SINGLE_SALE_LINKED&quot;;&quot;REQUIRE LINKED SALE ID AND NO ALLOCATION GROUP ID&quot;;IF([.M143]=&quot;MULTI_SALE_PENDING_ALLOCATION&quot;;&quot;REMOVE LINKED SALE ID OR CORRECT LINKAGE STATUS&quot;;IF([.M143]=&quot;ALLOCATED&quot;;&quot;REQUIRE ALLOCATION GROUP ID AND NO LINKED SALE ID&quot;;&quot;REVIEW LINKAGE EVIDENCE — NO AUTHORITY CREATED&quot;)))))))">
            <text:p>NO ACTION — linkage status is UNKNOWN / not asserted</text:p>
          </table:table-cell>
          <table:table-cell office:value-type="string" table:formula="of:=IF([.S143]=&quot;CONTRADICTION&quot;;&quot;BLOCKED&quot;;IF([.S143]=&quot;UNKNOWN&quot;;&quot;UNKNOWN&quot;;IF([.S143]=&quot;CLEAR&quot;;IF(OR([.O143]=&quot;&quot;;[.P143]=&quot;&quot;);&quot;UNKNOWN&quot;;&quot;READY FOR REVIEW&quot;);&quot;BLOCKED&quot;)))">
            <text:p>UNKNOWN</text:p>
          </table:table-cell>
          <table:table-cell office:value-type="string" table:formula="of:=IF([.U143]=&quot;UNKNOWN&quot;;&quot;COMPLETE OR ASSERT REQUIRED EVIDENCE BEFORE REVIEW&quot;;IF([.U143]=&quot;BLOCKED&quot;;&quot;RESOLVE CONTRADICTION BEFORE REVIEW — NO AUTHORITY CREATED&quot;;IF([.U1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3]=&quot;READY FOR REVIEW&quot;;&quot;REVIEW ELIGIBLE — NO AUTHORITY&quot;;IF(OR([.U143]=&quot;UNKNOWN&quot;;[.U14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4]=&quot;&quot;;IF(AND([.L144]=&quot;&quot;;[.N144]=&quot;&quot;);&quot;UNKNOWN&quot;;&quot;CONTRADICTION&quot;);IF([.M144]=&quot;UNMATCHED&quot;;IF(AND([.L144]=&quot;&quot;;[.N144]=&quot;&quot;);&quot;CLEAR&quot;;&quot;CONTRADICTION&quot;);IF([.M144]=&quot;SINGLE_SALE_LINKED&quot;;IF(AND([.L144]&lt;&gt;&quot;&quot;;[.N144]=&quot;&quot;);&quot;CLEAR&quot;;&quot;CONTRADICTION&quot;);IF([.M144]=&quot;MULTI_SALE_PENDING_ALLOCATION&quot;;IF([.L144]=&quot;&quot;;&quot;CLEAR&quot;;&quot;CONTRADICTION&quot;);IF([.M144]=&quot;ALLOCATED&quot;;IF(AND([.L144]=&quot;&quot;;[.N144]&lt;&gt;&quot;&quot;);&quot;CLEAR&quot;;&quot;CONTRADICTION&quot;);&quot;CONTRADICTION&quot;)))))">
            <text:p>UNKNOWN</text:p>
          </table:table-cell>
          <table:table-cell office:value-type="string" table:formula="of:=IF([.S144]=&quot;UNKNOWN&quot;;&quot;NO ACTION — linkage status is UNKNOWN / not asserted&quot;;IF([.S144]=&quot;CLEAR&quot;;&quot;NO CONTRADICTION — preserve evidence as entered&quot;;IF([.M144]=&quot;&quot;;&quot;REVIEW LINKAGE STATUS — identifiers are present while status is UNKNOWN&quot;;IF([.M144]=&quot;UNMATCHED&quot;;&quot;REMOVE LINKAGE IDENTIFIERS OR CORRECT LINKAGE STATUS&quot;;IF([.M144]=&quot;SINGLE_SALE_LINKED&quot;;&quot;REQUIRE LINKED SALE ID AND NO ALLOCATION GROUP ID&quot;;IF([.M144]=&quot;MULTI_SALE_PENDING_ALLOCATION&quot;;&quot;REMOVE LINKED SALE ID OR CORRECT LINKAGE STATUS&quot;;IF([.M144]=&quot;ALLOCATED&quot;;&quot;REQUIRE ALLOCATION GROUP ID AND NO LINKED SALE ID&quot;;&quot;REVIEW LINKAGE EVIDENCE — NO AUTHORITY CREATED&quot;)))))))">
            <text:p>NO ACTION — linkage status is UNKNOWN / not asserted</text:p>
          </table:table-cell>
          <table:table-cell office:value-type="string" table:formula="of:=IF([.S144]=&quot;CONTRADICTION&quot;;&quot;BLOCKED&quot;;IF([.S144]=&quot;UNKNOWN&quot;;&quot;UNKNOWN&quot;;IF([.S144]=&quot;CLEAR&quot;;IF(OR([.O144]=&quot;&quot;;[.P144]=&quot;&quot;);&quot;UNKNOWN&quot;;&quot;READY FOR REVIEW&quot;);&quot;BLOCKED&quot;)))">
            <text:p>UNKNOWN</text:p>
          </table:table-cell>
          <table:table-cell office:value-type="string" table:formula="of:=IF([.U144]=&quot;UNKNOWN&quot;;&quot;COMPLETE OR ASSERT REQUIRED EVIDENCE BEFORE REVIEW&quot;;IF([.U144]=&quot;BLOCKED&quot;;&quot;RESOLVE CONTRADICTION BEFORE REVIEW — NO AUTHORITY CREATED&quot;;IF([.U1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4]=&quot;READY FOR REVIEW&quot;;&quot;REVIEW ELIGIBLE — NO AUTHORITY&quot;;IF(OR([.U144]=&quot;UNKNOWN&quot;;[.U14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5]=&quot;&quot;;IF(AND([.L145]=&quot;&quot;;[.N145]=&quot;&quot;);&quot;UNKNOWN&quot;;&quot;CONTRADICTION&quot;);IF([.M145]=&quot;UNMATCHED&quot;;IF(AND([.L145]=&quot;&quot;;[.N145]=&quot;&quot;);&quot;CLEAR&quot;;&quot;CONTRADICTION&quot;);IF([.M145]=&quot;SINGLE_SALE_LINKED&quot;;IF(AND([.L145]&lt;&gt;&quot;&quot;;[.N145]=&quot;&quot;);&quot;CLEAR&quot;;&quot;CONTRADICTION&quot;);IF([.M145]=&quot;MULTI_SALE_PENDING_ALLOCATION&quot;;IF([.L145]=&quot;&quot;;&quot;CLEAR&quot;;&quot;CONTRADICTION&quot;);IF([.M145]=&quot;ALLOCATED&quot;;IF(AND([.L145]=&quot;&quot;;[.N145]&lt;&gt;&quot;&quot;);&quot;CLEAR&quot;;&quot;CONTRADICTION&quot;);&quot;CONTRADICTION&quot;)))))">
            <text:p>UNKNOWN</text:p>
          </table:table-cell>
          <table:table-cell office:value-type="string" table:formula="of:=IF([.S145]=&quot;UNKNOWN&quot;;&quot;NO ACTION — linkage status is UNKNOWN / not asserted&quot;;IF([.S145]=&quot;CLEAR&quot;;&quot;NO CONTRADICTION — preserve evidence as entered&quot;;IF([.M145]=&quot;&quot;;&quot;REVIEW LINKAGE STATUS — identifiers are present while status is UNKNOWN&quot;;IF([.M145]=&quot;UNMATCHED&quot;;&quot;REMOVE LINKAGE IDENTIFIERS OR CORRECT LINKAGE STATUS&quot;;IF([.M145]=&quot;SINGLE_SALE_LINKED&quot;;&quot;REQUIRE LINKED SALE ID AND NO ALLOCATION GROUP ID&quot;;IF([.M145]=&quot;MULTI_SALE_PENDING_ALLOCATION&quot;;&quot;REMOVE LINKED SALE ID OR CORRECT LINKAGE STATUS&quot;;IF([.M145]=&quot;ALLOCATED&quot;;&quot;REQUIRE ALLOCATION GROUP ID AND NO LINKED SALE ID&quot;;&quot;REVIEW LINKAGE EVIDENCE — NO AUTHORITY CREATED&quot;)))))))">
            <text:p>NO ACTION — linkage status is UNKNOWN / not asserted</text:p>
          </table:table-cell>
          <table:table-cell office:value-type="string" table:formula="of:=IF([.S145]=&quot;CONTRADICTION&quot;;&quot;BLOCKED&quot;;IF([.S145]=&quot;UNKNOWN&quot;;&quot;UNKNOWN&quot;;IF([.S145]=&quot;CLEAR&quot;;IF(OR([.O145]=&quot;&quot;;[.P145]=&quot;&quot;);&quot;UNKNOWN&quot;;&quot;READY FOR REVIEW&quot;);&quot;BLOCKED&quot;)))">
            <text:p>UNKNOWN</text:p>
          </table:table-cell>
          <table:table-cell office:value-type="string" table:formula="of:=IF([.U145]=&quot;UNKNOWN&quot;;&quot;COMPLETE OR ASSERT REQUIRED EVIDENCE BEFORE REVIEW&quot;;IF([.U145]=&quot;BLOCKED&quot;;&quot;RESOLVE CONTRADICTION BEFORE REVIEW — NO AUTHORITY CREATED&quot;;IF([.U1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5]=&quot;READY FOR REVIEW&quot;;&quot;REVIEW ELIGIBLE — NO AUTHORITY&quot;;IF(OR([.U145]=&quot;UNKNOWN&quot;;[.U14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6]=&quot;&quot;;IF(AND([.L146]=&quot;&quot;;[.N146]=&quot;&quot;);&quot;UNKNOWN&quot;;&quot;CONTRADICTION&quot;);IF([.M146]=&quot;UNMATCHED&quot;;IF(AND([.L146]=&quot;&quot;;[.N146]=&quot;&quot;);&quot;CLEAR&quot;;&quot;CONTRADICTION&quot;);IF([.M146]=&quot;SINGLE_SALE_LINKED&quot;;IF(AND([.L146]&lt;&gt;&quot;&quot;;[.N146]=&quot;&quot;);&quot;CLEAR&quot;;&quot;CONTRADICTION&quot;);IF([.M146]=&quot;MULTI_SALE_PENDING_ALLOCATION&quot;;IF([.L146]=&quot;&quot;;&quot;CLEAR&quot;;&quot;CONTRADICTION&quot;);IF([.M146]=&quot;ALLOCATED&quot;;IF(AND([.L146]=&quot;&quot;;[.N146]&lt;&gt;&quot;&quot;);&quot;CLEAR&quot;;&quot;CONTRADICTION&quot;);&quot;CONTRADICTION&quot;)))))">
            <text:p>UNKNOWN</text:p>
          </table:table-cell>
          <table:table-cell office:value-type="string" table:formula="of:=IF([.S146]=&quot;UNKNOWN&quot;;&quot;NO ACTION — linkage status is UNKNOWN / not asserted&quot;;IF([.S146]=&quot;CLEAR&quot;;&quot;NO CONTRADICTION — preserve evidence as entered&quot;;IF([.M146]=&quot;&quot;;&quot;REVIEW LINKAGE STATUS — identifiers are present while status is UNKNOWN&quot;;IF([.M146]=&quot;UNMATCHED&quot;;&quot;REMOVE LINKAGE IDENTIFIERS OR CORRECT LINKAGE STATUS&quot;;IF([.M146]=&quot;SINGLE_SALE_LINKED&quot;;&quot;REQUIRE LINKED SALE ID AND NO ALLOCATION GROUP ID&quot;;IF([.M146]=&quot;MULTI_SALE_PENDING_ALLOCATION&quot;;&quot;REMOVE LINKED SALE ID OR CORRECT LINKAGE STATUS&quot;;IF([.M146]=&quot;ALLOCATED&quot;;&quot;REQUIRE ALLOCATION GROUP ID AND NO LINKED SALE ID&quot;;&quot;REVIEW LINKAGE EVIDENCE — NO AUTHORITY CREATED&quot;)))))))">
            <text:p>NO ACTION — linkage status is UNKNOWN / not asserted</text:p>
          </table:table-cell>
          <table:table-cell office:value-type="string" table:formula="of:=IF([.S146]=&quot;CONTRADICTION&quot;;&quot;BLOCKED&quot;;IF([.S146]=&quot;UNKNOWN&quot;;&quot;UNKNOWN&quot;;IF([.S146]=&quot;CLEAR&quot;;IF(OR([.O146]=&quot;&quot;;[.P146]=&quot;&quot;);&quot;UNKNOWN&quot;;&quot;READY FOR REVIEW&quot;);&quot;BLOCKED&quot;)))">
            <text:p>UNKNOWN</text:p>
          </table:table-cell>
          <table:table-cell office:value-type="string" table:formula="of:=IF([.U146]=&quot;UNKNOWN&quot;;&quot;COMPLETE OR ASSERT REQUIRED EVIDENCE BEFORE REVIEW&quot;;IF([.U146]=&quot;BLOCKED&quot;;&quot;RESOLVE CONTRADICTION BEFORE REVIEW — NO AUTHORITY CREATED&quot;;IF([.U1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6]=&quot;READY FOR REVIEW&quot;;&quot;REVIEW ELIGIBLE — NO AUTHORITY&quot;;IF(OR([.U146]=&quot;UNKNOWN&quot;;[.U14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7]=&quot;&quot;;IF(AND([.L147]=&quot;&quot;;[.N147]=&quot;&quot;);&quot;UNKNOWN&quot;;&quot;CONTRADICTION&quot;);IF([.M147]=&quot;UNMATCHED&quot;;IF(AND([.L147]=&quot;&quot;;[.N147]=&quot;&quot;);&quot;CLEAR&quot;;&quot;CONTRADICTION&quot;);IF([.M147]=&quot;SINGLE_SALE_LINKED&quot;;IF(AND([.L147]&lt;&gt;&quot;&quot;;[.N147]=&quot;&quot;);&quot;CLEAR&quot;;&quot;CONTRADICTION&quot;);IF([.M147]=&quot;MULTI_SALE_PENDING_ALLOCATION&quot;;IF([.L147]=&quot;&quot;;&quot;CLEAR&quot;;&quot;CONTRADICTION&quot;);IF([.M147]=&quot;ALLOCATED&quot;;IF(AND([.L147]=&quot;&quot;;[.N147]&lt;&gt;&quot;&quot;);&quot;CLEAR&quot;;&quot;CONTRADICTION&quot;);&quot;CONTRADICTION&quot;)))))">
            <text:p>UNKNOWN</text:p>
          </table:table-cell>
          <table:table-cell office:value-type="string" table:formula="of:=IF([.S147]=&quot;UNKNOWN&quot;;&quot;NO ACTION — linkage status is UNKNOWN / not asserted&quot;;IF([.S147]=&quot;CLEAR&quot;;&quot;NO CONTRADICTION — preserve evidence as entered&quot;;IF([.M147]=&quot;&quot;;&quot;REVIEW LINKAGE STATUS — identifiers are present while status is UNKNOWN&quot;;IF([.M147]=&quot;UNMATCHED&quot;;&quot;REMOVE LINKAGE IDENTIFIERS OR CORRECT LINKAGE STATUS&quot;;IF([.M147]=&quot;SINGLE_SALE_LINKED&quot;;&quot;REQUIRE LINKED SALE ID AND NO ALLOCATION GROUP ID&quot;;IF([.M147]=&quot;MULTI_SALE_PENDING_ALLOCATION&quot;;&quot;REMOVE LINKED SALE ID OR CORRECT LINKAGE STATUS&quot;;IF([.M147]=&quot;ALLOCATED&quot;;&quot;REQUIRE ALLOCATION GROUP ID AND NO LINKED SALE ID&quot;;&quot;REVIEW LINKAGE EVIDENCE — NO AUTHORITY CREATED&quot;)))))))">
            <text:p>NO ACTION — linkage status is UNKNOWN / not asserted</text:p>
          </table:table-cell>
          <table:table-cell office:value-type="string" table:formula="of:=IF([.S147]=&quot;CONTRADICTION&quot;;&quot;BLOCKED&quot;;IF([.S147]=&quot;UNKNOWN&quot;;&quot;UNKNOWN&quot;;IF([.S147]=&quot;CLEAR&quot;;IF(OR([.O147]=&quot;&quot;;[.P147]=&quot;&quot;);&quot;UNKNOWN&quot;;&quot;READY FOR REVIEW&quot;);&quot;BLOCKED&quot;)))">
            <text:p>UNKNOWN</text:p>
          </table:table-cell>
          <table:table-cell office:value-type="string" table:formula="of:=IF([.U147]=&quot;UNKNOWN&quot;;&quot;COMPLETE OR ASSERT REQUIRED EVIDENCE BEFORE REVIEW&quot;;IF([.U147]=&quot;BLOCKED&quot;;&quot;RESOLVE CONTRADICTION BEFORE REVIEW — NO AUTHORITY CREATED&quot;;IF([.U1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7]=&quot;READY FOR REVIEW&quot;;&quot;REVIEW ELIGIBLE — NO AUTHORITY&quot;;IF(OR([.U147]=&quot;UNKNOWN&quot;;[.U14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8]=&quot;&quot;;IF(AND([.L148]=&quot;&quot;;[.N148]=&quot;&quot;);&quot;UNKNOWN&quot;;&quot;CONTRADICTION&quot;);IF([.M148]=&quot;UNMATCHED&quot;;IF(AND([.L148]=&quot;&quot;;[.N148]=&quot;&quot;);&quot;CLEAR&quot;;&quot;CONTRADICTION&quot;);IF([.M148]=&quot;SINGLE_SALE_LINKED&quot;;IF(AND([.L148]&lt;&gt;&quot;&quot;;[.N148]=&quot;&quot;);&quot;CLEAR&quot;;&quot;CONTRADICTION&quot;);IF([.M148]=&quot;MULTI_SALE_PENDING_ALLOCATION&quot;;IF([.L148]=&quot;&quot;;&quot;CLEAR&quot;;&quot;CONTRADICTION&quot;);IF([.M148]=&quot;ALLOCATED&quot;;IF(AND([.L148]=&quot;&quot;;[.N148]&lt;&gt;&quot;&quot;);&quot;CLEAR&quot;;&quot;CONTRADICTION&quot;);&quot;CONTRADICTION&quot;)))))">
            <text:p>UNKNOWN</text:p>
          </table:table-cell>
          <table:table-cell office:value-type="string" table:formula="of:=IF([.S148]=&quot;UNKNOWN&quot;;&quot;NO ACTION — linkage status is UNKNOWN / not asserted&quot;;IF([.S148]=&quot;CLEAR&quot;;&quot;NO CONTRADICTION — preserve evidence as entered&quot;;IF([.M148]=&quot;&quot;;&quot;REVIEW LINKAGE STATUS — identifiers are present while status is UNKNOWN&quot;;IF([.M148]=&quot;UNMATCHED&quot;;&quot;REMOVE LINKAGE IDENTIFIERS OR CORRECT LINKAGE STATUS&quot;;IF([.M148]=&quot;SINGLE_SALE_LINKED&quot;;&quot;REQUIRE LINKED SALE ID AND NO ALLOCATION GROUP ID&quot;;IF([.M148]=&quot;MULTI_SALE_PENDING_ALLOCATION&quot;;&quot;REMOVE LINKED SALE ID OR CORRECT LINKAGE STATUS&quot;;IF([.M148]=&quot;ALLOCATED&quot;;&quot;REQUIRE ALLOCATION GROUP ID AND NO LINKED SALE ID&quot;;&quot;REVIEW LINKAGE EVIDENCE — NO AUTHORITY CREATED&quot;)))))))">
            <text:p>NO ACTION — linkage status is UNKNOWN / not asserted</text:p>
          </table:table-cell>
          <table:table-cell office:value-type="string" table:formula="of:=IF([.S148]=&quot;CONTRADICTION&quot;;&quot;BLOCKED&quot;;IF([.S148]=&quot;UNKNOWN&quot;;&quot;UNKNOWN&quot;;IF([.S148]=&quot;CLEAR&quot;;IF(OR([.O148]=&quot;&quot;;[.P148]=&quot;&quot;);&quot;UNKNOWN&quot;;&quot;READY FOR REVIEW&quot;);&quot;BLOCKED&quot;)))">
            <text:p>UNKNOWN</text:p>
          </table:table-cell>
          <table:table-cell office:value-type="string" table:formula="of:=IF([.U148]=&quot;UNKNOWN&quot;;&quot;COMPLETE OR ASSERT REQUIRED EVIDENCE BEFORE REVIEW&quot;;IF([.U148]=&quot;BLOCKED&quot;;&quot;RESOLVE CONTRADICTION BEFORE REVIEW — NO AUTHORITY CREATED&quot;;IF([.U1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8]=&quot;READY FOR REVIEW&quot;;&quot;REVIEW ELIGIBLE — NO AUTHORITY&quot;;IF(OR([.U148]=&quot;UNKNOWN&quot;;[.U14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9]=&quot;&quot;;IF(AND([.L149]=&quot;&quot;;[.N149]=&quot;&quot;);&quot;UNKNOWN&quot;;&quot;CONTRADICTION&quot;);IF([.M149]=&quot;UNMATCHED&quot;;IF(AND([.L149]=&quot;&quot;;[.N149]=&quot;&quot;);&quot;CLEAR&quot;;&quot;CONTRADICTION&quot;);IF([.M149]=&quot;SINGLE_SALE_LINKED&quot;;IF(AND([.L149]&lt;&gt;&quot;&quot;;[.N149]=&quot;&quot;);&quot;CLEAR&quot;;&quot;CONTRADICTION&quot;);IF([.M149]=&quot;MULTI_SALE_PENDING_ALLOCATION&quot;;IF([.L149]=&quot;&quot;;&quot;CLEAR&quot;;&quot;CONTRADICTION&quot;);IF([.M149]=&quot;ALLOCATED&quot;;IF(AND([.L149]=&quot;&quot;;[.N149]&lt;&gt;&quot;&quot;);&quot;CLEAR&quot;;&quot;CONTRADICTION&quot;);&quot;CONTRADICTION&quot;)))))">
            <text:p>UNKNOWN</text:p>
          </table:table-cell>
          <table:table-cell office:value-type="string" table:formula="of:=IF([.S149]=&quot;UNKNOWN&quot;;&quot;NO ACTION — linkage status is UNKNOWN / not asserted&quot;;IF([.S149]=&quot;CLEAR&quot;;&quot;NO CONTRADICTION — preserve evidence as entered&quot;;IF([.M149]=&quot;&quot;;&quot;REVIEW LINKAGE STATUS — identifiers are present while status is UNKNOWN&quot;;IF([.M149]=&quot;UNMATCHED&quot;;&quot;REMOVE LINKAGE IDENTIFIERS OR CORRECT LINKAGE STATUS&quot;;IF([.M149]=&quot;SINGLE_SALE_LINKED&quot;;&quot;REQUIRE LINKED SALE ID AND NO ALLOCATION GROUP ID&quot;;IF([.M149]=&quot;MULTI_SALE_PENDING_ALLOCATION&quot;;&quot;REMOVE LINKED SALE ID OR CORRECT LINKAGE STATUS&quot;;IF([.M149]=&quot;ALLOCATED&quot;;&quot;REQUIRE ALLOCATION GROUP ID AND NO LINKED SALE ID&quot;;&quot;REVIEW LINKAGE EVIDENCE — NO AUTHORITY CREATED&quot;)))))))">
            <text:p>NO ACTION — linkage status is UNKNOWN / not asserted</text:p>
          </table:table-cell>
          <table:table-cell office:value-type="string" table:formula="of:=IF([.S149]=&quot;CONTRADICTION&quot;;&quot;BLOCKED&quot;;IF([.S149]=&quot;UNKNOWN&quot;;&quot;UNKNOWN&quot;;IF([.S149]=&quot;CLEAR&quot;;IF(OR([.O149]=&quot;&quot;;[.P149]=&quot;&quot;);&quot;UNKNOWN&quot;;&quot;READY FOR REVIEW&quot;);&quot;BLOCKED&quot;)))">
            <text:p>UNKNOWN</text:p>
          </table:table-cell>
          <table:table-cell office:value-type="string" table:formula="of:=IF([.U149]=&quot;UNKNOWN&quot;;&quot;COMPLETE OR ASSERT REQUIRED EVIDENCE BEFORE REVIEW&quot;;IF([.U149]=&quot;BLOCKED&quot;;&quot;RESOLVE CONTRADICTION BEFORE REVIEW — NO AUTHORITY CREATED&quot;;IF([.U1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9]=&quot;READY FOR REVIEW&quot;;&quot;REVIEW ELIGIBLE — NO AUTHORITY&quot;;IF(OR([.U149]=&quot;UNKNOWN&quot;;[.U14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0]=&quot;&quot;;IF(AND([.L150]=&quot;&quot;;[.N150]=&quot;&quot;);&quot;UNKNOWN&quot;;&quot;CONTRADICTION&quot;);IF([.M150]=&quot;UNMATCHED&quot;;IF(AND([.L150]=&quot;&quot;;[.N150]=&quot;&quot;);&quot;CLEAR&quot;;&quot;CONTRADICTION&quot;);IF([.M150]=&quot;SINGLE_SALE_LINKED&quot;;IF(AND([.L150]&lt;&gt;&quot;&quot;;[.N150]=&quot;&quot;);&quot;CLEAR&quot;;&quot;CONTRADICTION&quot;);IF([.M150]=&quot;MULTI_SALE_PENDING_ALLOCATION&quot;;IF([.L150]=&quot;&quot;;&quot;CLEAR&quot;;&quot;CONTRADICTION&quot;);IF([.M150]=&quot;ALLOCATED&quot;;IF(AND([.L150]=&quot;&quot;;[.N150]&lt;&gt;&quot;&quot;);&quot;CLEAR&quot;;&quot;CONTRADICTION&quot;);&quot;CONTRADICTION&quot;)))))">
            <text:p>UNKNOWN</text:p>
          </table:table-cell>
          <table:table-cell office:value-type="string" table:formula="of:=IF([.S150]=&quot;UNKNOWN&quot;;&quot;NO ACTION — linkage status is UNKNOWN / not asserted&quot;;IF([.S150]=&quot;CLEAR&quot;;&quot;NO CONTRADICTION — preserve evidence as entered&quot;;IF([.M150]=&quot;&quot;;&quot;REVIEW LINKAGE STATUS — identifiers are present while status is UNKNOWN&quot;;IF([.M150]=&quot;UNMATCHED&quot;;&quot;REMOVE LINKAGE IDENTIFIERS OR CORRECT LINKAGE STATUS&quot;;IF([.M150]=&quot;SINGLE_SALE_LINKED&quot;;&quot;REQUIRE LINKED SALE ID AND NO ALLOCATION GROUP ID&quot;;IF([.M150]=&quot;MULTI_SALE_PENDING_ALLOCATION&quot;;&quot;REMOVE LINKED SALE ID OR CORRECT LINKAGE STATUS&quot;;IF([.M150]=&quot;ALLOCATED&quot;;&quot;REQUIRE ALLOCATION GROUP ID AND NO LINKED SALE ID&quot;;&quot;REVIEW LINKAGE EVIDENCE — NO AUTHORITY CREATED&quot;)))))))">
            <text:p>NO ACTION — linkage status is UNKNOWN / not asserted</text:p>
          </table:table-cell>
          <table:table-cell office:value-type="string" table:formula="of:=IF([.S150]=&quot;CONTRADICTION&quot;;&quot;BLOCKED&quot;;IF([.S150]=&quot;UNKNOWN&quot;;&quot;UNKNOWN&quot;;IF([.S150]=&quot;CLEAR&quot;;IF(OR([.O150]=&quot;&quot;;[.P150]=&quot;&quot;);&quot;UNKNOWN&quot;;&quot;READY FOR REVIEW&quot;);&quot;BLOCKED&quot;)))">
            <text:p>UNKNOWN</text:p>
          </table:table-cell>
          <table:table-cell office:value-type="string" table:formula="of:=IF([.U150]=&quot;UNKNOWN&quot;;&quot;COMPLETE OR ASSERT REQUIRED EVIDENCE BEFORE REVIEW&quot;;IF([.U150]=&quot;BLOCKED&quot;;&quot;RESOLVE CONTRADICTION BEFORE REVIEW — NO AUTHORITY CREATED&quot;;IF([.U1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0]=&quot;READY FOR REVIEW&quot;;&quot;REVIEW ELIGIBLE — NO AUTHORITY&quot;;IF(OR([.U150]=&quot;UNKNOWN&quot;;[.U15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1]=&quot;&quot;;IF(AND([.L151]=&quot;&quot;;[.N151]=&quot;&quot;);&quot;UNKNOWN&quot;;&quot;CONTRADICTION&quot;);IF([.M151]=&quot;UNMATCHED&quot;;IF(AND([.L151]=&quot;&quot;;[.N151]=&quot;&quot;);&quot;CLEAR&quot;;&quot;CONTRADICTION&quot;);IF([.M151]=&quot;SINGLE_SALE_LINKED&quot;;IF(AND([.L151]&lt;&gt;&quot;&quot;;[.N151]=&quot;&quot;);&quot;CLEAR&quot;;&quot;CONTRADICTION&quot;);IF([.M151]=&quot;MULTI_SALE_PENDING_ALLOCATION&quot;;IF([.L151]=&quot;&quot;;&quot;CLEAR&quot;;&quot;CONTRADICTION&quot;);IF([.M151]=&quot;ALLOCATED&quot;;IF(AND([.L151]=&quot;&quot;;[.N151]&lt;&gt;&quot;&quot;);&quot;CLEAR&quot;;&quot;CONTRADICTION&quot;);&quot;CONTRADICTION&quot;)))))">
            <text:p>UNKNOWN</text:p>
          </table:table-cell>
          <table:table-cell office:value-type="string" table:formula="of:=IF([.S151]=&quot;UNKNOWN&quot;;&quot;NO ACTION — linkage status is UNKNOWN / not asserted&quot;;IF([.S151]=&quot;CLEAR&quot;;&quot;NO CONTRADICTION — preserve evidence as entered&quot;;IF([.M151]=&quot;&quot;;&quot;REVIEW LINKAGE STATUS — identifiers are present while status is UNKNOWN&quot;;IF([.M151]=&quot;UNMATCHED&quot;;&quot;REMOVE LINKAGE IDENTIFIERS OR CORRECT LINKAGE STATUS&quot;;IF([.M151]=&quot;SINGLE_SALE_LINKED&quot;;&quot;REQUIRE LINKED SALE ID AND NO ALLOCATION GROUP ID&quot;;IF([.M151]=&quot;MULTI_SALE_PENDING_ALLOCATION&quot;;&quot;REMOVE LINKED SALE ID OR CORRECT LINKAGE STATUS&quot;;IF([.M151]=&quot;ALLOCATED&quot;;&quot;REQUIRE ALLOCATION GROUP ID AND NO LINKED SALE ID&quot;;&quot;REVIEW LINKAGE EVIDENCE — NO AUTHORITY CREATED&quot;)))))))">
            <text:p>NO ACTION — linkage status is UNKNOWN / not asserted</text:p>
          </table:table-cell>
          <table:table-cell office:value-type="string" table:formula="of:=IF([.S151]=&quot;CONTRADICTION&quot;;&quot;BLOCKED&quot;;IF([.S151]=&quot;UNKNOWN&quot;;&quot;UNKNOWN&quot;;IF([.S151]=&quot;CLEAR&quot;;IF(OR([.O151]=&quot;&quot;;[.P151]=&quot;&quot;);&quot;UNKNOWN&quot;;&quot;READY FOR REVIEW&quot;);&quot;BLOCKED&quot;)))">
            <text:p>UNKNOWN</text:p>
          </table:table-cell>
          <table:table-cell office:value-type="string" table:formula="of:=IF([.U151]=&quot;UNKNOWN&quot;;&quot;COMPLETE OR ASSERT REQUIRED EVIDENCE BEFORE REVIEW&quot;;IF([.U151]=&quot;BLOCKED&quot;;&quot;RESOLVE CONTRADICTION BEFORE REVIEW — NO AUTHORITY CREATED&quot;;IF([.U1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1]=&quot;READY FOR REVIEW&quot;;&quot;REVIEW ELIGIBLE — NO AUTHORITY&quot;;IF(OR([.U151]=&quot;UNKNOWN&quot;;[.U15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2]=&quot;&quot;;IF(AND([.L152]=&quot;&quot;;[.N152]=&quot;&quot;);&quot;UNKNOWN&quot;;&quot;CONTRADICTION&quot;);IF([.M152]=&quot;UNMATCHED&quot;;IF(AND([.L152]=&quot;&quot;;[.N152]=&quot;&quot;);&quot;CLEAR&quot;;&quot;CONTRADICTION&quot;);IF([.M152]=&quot;SINGLE_SALE_LINKED&quot;;IF(AND([.L152]&lt;&gt;&quot;&quot;;[.N152]=&quot;&quot;);&quot;CLEAR&quot;;&quot;CONTRADICTION&quot;);IF([.M152]=&quot;MULTI_SALE_PENDING_ALLOCATION&quot;;IF([.L152]=&quot;&quot;;&quot;CLEAR&quot;;&quot;CONTRADICTION&quot;);IF([.M152]=&quot;ALLOCATED&quot;;IF(AND([.L152]=&quot;&quot;;[.N152]&lt;&gt;&quot;&quot;);&quot;CLEAR&quot;;&quot;CONTRADICTION&quot;);&quot;CONTRADICTION&quot;)))))">
            <text:p>UNKNOWN</text:p>
          </table:table-cell>
          <table:table-cell office:value-type="string" table:formula="of:=IF([.S152]=&quot;UNKNOWN&quot;;&quot;NO ACTION — linkage status is UNKNOWN / not asserted&quot;;IF([.S152]=&quot;CLEAR&quot;;&quot;NO CONTRADICTION — preserve evidence as entered&quot;;IF([.M152]=&quot;&quot;;&quot;REVIEW LINKAGE STATUS — identifiers are present while status is UNKNOWN&quot;;IF([.M152]=&quot;UNMATCHED&quot;;&quot;REMOVE LINKAGE IDENTIFIERS OR CORRECT LINKAGE STATUS&quot;;IF([.M152]=&quot;SINGLE_SALE_LINKED&quot;;&quot;REQUIRE LINKED SALE ID AND NO ALLOCATION GROUP ID&quot;;IF([.M152]=&quot;MULTI_SALE_PENDING_ALLOCATION&quot;;&quot;REMOVE LINKED SALE ID OR CORRECT LINKAGE STATUS&quot;;IF([.M152]=&quot;ALLOCATED&quot;;&quot;REQUIRE ALLOCATION GROUP ID AND NO LINKED SALE ID&quot;;&quot;REVIEW LINKAGE EVIDENCE — NO AUTHORITY CREATED&quot;)))))))">
            <text:p>NO ACTION — linkage status is UNKNOWN / not asserted</text:p>
          </table:table-cell>
          <table:table-cell office:value-type="string" table:formula="of:=IF([.S152]=&quot;CONTRADICTION&quot;;&quot;BLOCKED&quot;;IF([.S152]=&quot;UNKNOWN&quot;;&quot;UNKNOWN&quot;;IF([.S152]=&quot;CLEAR&quot;;IF(OR([.O152]=&quot;&quot;;[.P152]=&quot;&quot;);&quot;UNKNOWN&quot;;&quot;READY FOR REVIEW&quot;);&quot;BLOCKED&quot;)))">
            <text:p>UNKNOWN</text:p>
          </table:table-cell>
          <table:table-cell office:value-type="string" table:formula="of:=IF([.U152]=&quot;UNKNOWN&quot;;&quot;COMPLETE OR ASSERT REQUIRED EVIDENCE BEFORE REVIEW&quot;;IF([.U152]=&quot;BLOCKED&quot;;&quot;RESOLVE CONTRADICTION BEFORE REVIEW — NO AUTHORITY CREATED&quot;;IF([.U1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2]=&quot;READY FOR REVIEW&quot;;&quot;REVIEW ELIGIBLE — NO AUTHORITY&quot;;IF(OR([.U152]=&quot;UNKNOWN&quot;;[.U15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3]=&quot;&quot;;IF(AND([.L153]=&quot;&quot;;[.N153]=&quot;&quot;);&quot;UNKNOWN&quot;;&quot;CONTRADICTION&quot;);IF([.M153]=&quot;UNMATCHED&quot;;IF(AND([.L153]=&quot;&quot;;[.N153]=&quot;&quot;);&quot;CLEAR&quot;;&quot;CONTRADICTION&quot;);IF([.M153]=&quot;SINGLE_SALE_LINKED&quot;;IF(AND([.L153]&lt;&gt;&quot;&quot;;[.N153]=&quot;&quot;);&quot;CLEAR&quot;;&quot;CONTRADICTION&quot;);IF([.M153]=&quot;MULTI_SALE_PENDING_ALLOCATION&quot;;IF([.L153]=&quot;&quot;;&quot;CLEAR&quot;;&quot;CONTRADICTION&quot;);IF([.M153]=&quot;ALLOCATED&quot;;IF(AND([.L153]=&quot;&quot;;[.N153]&lt;&gt;&quot;&quot;);&quot;CLEAR&quot;;&quot;CONTRADICTION&quot;);&quot;CONTRADICTION&quot;)))))">
            <text:p>UNKNOWN</text:p>
          </table:table-cell>
          <table:table-cell office:value-type="string" table:formula="of:=IF([.S153]=&quot;UNKNOWN&quot;;&quot;NO ACTION — linkage status is UNKNOWN / not asserted&quot;;IF([.S153]=&quot;CLEAR&quot;;&quot;NO CONTRADICTION — preserve evidence as entered&quot;;IF([.M153]=&quot;&quot;;&quot;REVIEW LINKAGE STATUS — identifiers are present while status is UNKNOWN&quot;;IF([.M153]=&quot;UNMATCHED&quot;;&quot;REMOVE LINKAGE IDENTIFIERS OR CORRECT LINKAGE STATUS&quot;;IF([.M153]=&quot;SINGLE_SALE_LINKED&quot;;&quot;REQUIRE LINKED SALE ID AND NO ALLOCATION GROUP ID&quot;;IF([.M153]=&quot;MULTI_SALE_PENDING_ALLOCATION&quot;;&quot;REMOVE LINKED SALE ID OR CORRECT LINKAGE STATUS&quot;;IF([.M153]=&quot;ALLOCATED&quot;;&quot;REQUIRE ALLOCATION GROUP ID AND NO LINKED SALE ID&quot;;&quot;REVIEW LINKAGE EVIDENCE — NO AUTHORITY CREATED&quot;)))))))">
            <text:p>NO ACTION — linkage status is UNKNOWN / not asserted</text:p>
          </table:table-cell>
          <table:table-cell office:value-type="string" table:formula="of:=IF([.S153]=&quot;CONTRADICTION&quot;;&quot;BLOCKED&quot;;IF([.S153]=&quot;UNKNOWN&quot;;&quot;UNKNOWN&quot;;IF([.S153]=&quot;CLEAR&quot;;IF(OR([.O153]=&quot;&quot;;[.P153]=&quot;&quot;);&quot;UNKNOWN&quot;;&quot;READY FOR REVIEW&quot;);&quot;BLOCKED&quot;)))">
            <text:p>UNKNOWN</text:p>
          </table:table-cell>
          <table:table-cell office:value-type="string" table:formula="of:=IF([.U153]=&quot;UNKNOWN&quot;;&quot;COMPLETE OR ASSERT REQUIRED EVIDENCE BEFORE REVIEW&quot;;IF([.U153]=&quot;BLOCKED&quot;;&quot;RESOLVE CONTRADICTION BEFORE REVIEW — NO AUTHORITY CREATED&quot;;IF([.U1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3]=&quot;READY FOR REVIEW&quot;;&quot;REVIEW ELIGIBLE — NO AUTHORITY&quot;;IF(OR([.U153]=&quot;UNKNOWN&quot;;[.U15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4]=&quot;&quot;;IF(AND([.L154]=&quot;&quot;;[.N154]=&quot;&quot;);&quot;UNKNOWN&quot;;&quot;CONTRADICTION&quot;);IF([.M154]=&quot;UNMATCHED&quot;;IF(AND([.L154]=&quot;&quot;;[.N154]=&quot;&quot;);&quot;CLEAR&quot;;&quot;CONTRADICTION&quot;);IF([.M154]=&quot;SINGLE_SALE_LINKED&quot;;IF(AND([.L154]&lt;&gt;&quot;&quot;;[.N154]=&quot;&quot;);&quot;CLEAR&quot;;&quot;CONTRADICTION&quot;);IF([.M154]=&quot;MULTI_SALE_PENDING_ALLOCATION&quot;;IF([.L154]=&quot;&quot;;&quot;CLEAR&quot;;&quot;CONTRADICTION&quot;);IF([.M154]=&quot;ALLOCATED&quot;;IF(AND([.L154]=&quot;&quot;;[.N154]&lt;&gt;&quot;&quot;);&quot;CLEAR&quot;;&quot;CONTRADICTION&quot;);&quot;CONTRADICTION&quot;)))))">
            <text:p>UNKNOWN</text:p>
          </table:table-cell>
          <table:table-cell office:value-type="string" table:formula="of:=IF([.S154]=&quot;UNKNOWN&quot;;&quot;NO ACTION — linkage status is UNKNOWN / not asserted&quot;;IF([.S154]=&quot;CLEAR&quot;;&quot;NO CONTRADICTION — preserve evidence as entered&quot;;IF([.M154]=&quot;&quot;;&quot;REVIEW LINKAGE STATUS — identifiers are present while status is UNKNOWN&quot;;IF([.M154]=&quot;UNMATCHED&quot;;&quot;REMOVE LINKAGE IDENTIFIERS OR CORRECT LINKAGE STATUS&quot;;IF([.M154]=&quot;SINGLE_SALE_LINKED&quot;;&quot;REQUIRE LINKED SALE ID AND NO ALLOCATION GROUP ID&quot;;IF([.M154]=&quot;MULTI_SALE_PENDING_ALLOCATION&quot;;&quot;REMOVE LINKED SALE ID OR CORRECT LINKAGE STATUS&quot;;IF([.M154]=&quot;ALLOCATED&quot;;&quot;REQUIRE ALLOCATION GROUP ID AND NO LINKED SALE ID&quot;;&quot;REVIEW LINKAGE EVIDENCE — NO AUTHORITY CREATED&quot;)))))))">
            <text:p>NO ACTION — linkage status is UNKNOWN / not asserted</text:p>
          </table:table-cell>
          <table:table-cell office:value-type="string" table:formula="of:=IF([.S154]=&quot;CONTRADICTION&quot;;&quot;BLOCKED&quot;;IF([.S154]=&quot;UNKNOWN&quot;;&quot;UNKNOWN&quot;;IF([.S154]=&quot;CLEAR&quot;;IF(OR([.O154]=&quot;&quot;;[.P154]=&quot;&quot;);&quot;UNKNOWN&quot;;&quot;READY FOR REVIEW&quot;);&quot;BLOCKED&quot;)))">
            <text:p>UNKNOWN</text:p>
          </table:table-cell>
          <table:table-cell office:value-type="string" table:formula="of:=IF([.U154]=&quot;UNKNOWN&quot;;&quot;COMPLETE OR ASSERT REQUIRED EVIDENCE BEFORE REVIEW&quot;;IF([.U154]=&quot;BLOCKED&quot;;&quot;RESOLVE CONTRADICTION BEFORE REVIEW — NO AUTHORITY CREATED&quot;;IF([.U1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4]=&quot;READY FOR REVIEW&quot;;&quot;REVIEW ELIGIBLE — NO AUTHORITY&quot;;IF(OR([.U154]=&quot;UNKNOWN&quot;;[.U15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5]=&quot;&quot;;IF(AND([.L155]=&quot;&quot;;[.N155]=&quot;&quot;);&quot;UNKNOWN&quot;;&quot;CONTRADICTION&quot;);IF([.M155]=&quot;UNMATCHED&quot;;IF(AND([.L155]=&quot;&quot;;[.N155]=&quot;&quot;);&quot;CLEAR&quot;;&quot;CONTRADICTION&quot;);IF([.M155]=&quot;SINGLE_SALE_LINKED&quot;;IF(AND([.L155]&lt;&gt;&quot;&quot;;[.N155]=&quot;&quot;);&quot;CLEAR&quot;;&quot;CONTRADICTION&quot;);IF([.M155]=&quot;MULTI_SALE_PENDING_ALLOCATION&quot;;IF([.L155]=&quot;&quot;;&quot;CLEAR&quot;;&quot;CONTRADICTION&quot;);IF([.M155]=&quot;ALLOCATED&quot;;IF(AND([.L155]=&quot;&quot;;[.N155]&lt;&gt;&quot;&quot;);&quot;CLEAR&quot;;&quot;CONTRADICTION&quot;);&quot;CONTRADICTION&quot;)))))">
            <text:p>UNKNOWN</text:p>
          </table:table-cell>
          <table:table-cell office:value-type="string" table:formula="of:=IF([.S155]=&quot;UNKNOWN&quot;;&quot;NO ACTION — linkage status is UNKNOWN / not asserted&quot;;IF([.S155]=&quot;CLEAR&quot;;&quot;NO CONTRADICTION — preserve evidence as entered&quot;;IF([.M155]=&quot;&quot;;&quot;REVIEW LINKAGE STATUS — identifiers are present while status is UNKNOWN&quot;;IF([.M155]=&quot;UNMATCHED&quot;;&quot;REMOVE LINKAGE IDENTIFIERS OR CORRECT LINKAGE STATUS&quot;;IF([.M155]=&quot;SINGLE_SALE_LINKED&quot;;&quot;REQUIRE LINKED SALE ID AND NO ALLOCATION GROUP ID&quot;;IF([.M155]=&quot;MULTI_SALE_PENDING_ALLOCATION&quot;;&quot;REMOVE LINKED SALE ID OR CORRECT LINKAGE STATUS&quot;;IF([.M155]=&quot;ALLOCATED&quot;;&quot;REQUIRE ALLOCATION GROUP ID AND NO LINKED SALE ID&quot;;&quot;REVIEW LINKAGE EVIDENCE — NO AUTHORITY CREATED&quot;)))))))">
            <text:p>NO ACTION — linkage status is UNKNOWN / not asserted</text:p>
          </table:table-cell>
          <table:table-cell office:value-type="string" table:formula="of:=IF([.S155]=&quot;CONTRADICTION&quot;;&quot;BLOCKED&quot;;IF([.S155]=&quot;UNKNOWN&quot;;&quot;UNKNOWN&quot;;IF([.S155]=&quot;CLEAR&quot;;IF(OR([.O155]=&quot;&quot;;[.P155]=&quot;&quot;);&quot;UNKNOWN&quot;;&quot;READY FOR REVIEW&quot;);&quot;BLOCKED&quot;)))">
            <text:p>UNKNOWN</text:p>
          </table:table-cell>
          <table:table-cell office:value-type="string" table:formula="of:=IF([.U155]=&quot;UNKNOWN&quot;;&quot;COMPLETE OR ASSERT REQUIRED EVIDENCE BEFORE REVIEW&quot;;IF([.U155]=&quot;BLOCKED&quot;;&quot;RESOLVE CONTRADICTION BEFORE REVIEW — NO AUTHORITY CREATED&quot;;IF([.U1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5]=&quot;READY FOR REVIEW&quot;;&quot;REVIEW ELIGIBLE — NO AUTHORITY&quot;;IF(OR([.U155]=&quot;UNKNOWN&quot;;[.U15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6]=&quot;&quot;;IF(AND([.L156]=&quot;&quot;;[.N156]=&quot;&quot;);&quot;UNKNOWN&quot;;&quot;CONTRADICTION&quot;);IF([.M156]=&quot;UNMATCHED&quot;;IF(AND([.L156]=&quot;&quot;;[.N156]=&quot;&quot;);&quot;CLEAR&quot;;&quot;CONTRADICTION&quot;);IF([.M156]=&quot;SINGLE_SALE_LINKED&quot;;IF(AND([.L156]&lt;&gt;&quot;&quot;;[.N156]=&quot;&quot;);&quot;CLEAR&quot;;&quot;CONTRADICTION&quot;);IF([.M156]=&quot;MULTI_SALE_PENDING_ALLOCATION&quot;;IF([.L156]=&quot;&quot;;&quot;CLEAR&quot;;&quot;CONTRADICTION&quot;);IF([.M156]=&quot;ALLOCATED&quot;;IF(AND([.L156]=&quot;&quot;;[.N156]&lt;&gt;&quot;&quot;);&quot;CLEAR&quot;;&quot;CONTRADICTION&quot;);&quot;CONTRADICTION&quot;)))))">
            <text:p>UNKNOWN</text:p>
          </table:table-cell>
          <table:table-cell office:value-type="string" table:formula="of:=IF([.S156]=&quot;UNKNOWN&quot;;&quot;NO ACTION — linkage status is UNKNOWN / not asserted&quot;;IF([.S156]=&quot;CLEAR&quot;;&quot;NO CONTRADICTION — preserve evidence as entered&quot;;IF([.M156]=&quot;&quot;;&quot;REVIEW LINKAGE STATUS — identifiers are present while status is UNKNOWN&quot;;IF([.M156]=&quot;UNMATCHED&quot;;&quot;REMOVE LINKAGE IDENTIFIERS OR CORRECT LINKAGE STATUS&quot;;IF([.M156]=&quot;SINGLE_SALE_LINKED&quot;;&quot;REQUIRE LINKED SALE ID AND NO ALLOCATION GROUP ID&quot;;IF([.M156]=&quot;MULTI_SALE_PENDING_ALLOCATION&quot;;&quot;REMOVE LINKED SALE ID OR CORRECT LINKAGE STATUS&quot;;IF([.M156]=&quot;ALLOCATED&quot;;&quot;REQUIRE ALLOCATION GROUP ID AND NO LINKED SALE ID&quot;;&quot;REVIEW LINKAGE EVIDENCE — NO AUTHORITY CREATED&quot;)))))))">
            <text:p>NO ACTION — linkage status is UNKNOWN / not asserted</text:p>
          </table:table-cell>
          <table:table-cell office:value-type="string" table:formula="of:=IF([.S156]=&quot;CONTRADICTION&quot;;&quot;BLOCKED&quot;;IF([.S156]=&quot;UNKNOWN&quot;;&quot;UNKNOWN&quot;;IF([.S156]=&quot;CLEAR&quot;;IF(OR([.O156]=&quot;&quot;;[.P156]=&quot;&quot;);&quot;UNKNOWN&quot;;&quot;READY FOR REVIEW&quot;);&quot;BLOCKED&quot;)))">
            <text:p>UNKNOWN</text:p>
          </table:table-cell>
          <table:table-cell office:value-type="string" table:formula="of:=IF([.U156]=&quot;UNKNOWN&quot;;&quot;COMPLETE OR ASSERT REQUIRED EVIDENCE BEFORE REVIEW&quot;;IF([.U156]=&quot;BLOCKED&quot;;&quot;RESOLVE CONTRADICTION BEFORE REVIEW — NO AUTHORITY CREATED&quot;;IF([.U1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6]=&quot;READY FOR REVIEW&quot;;&quot;REVIEW ELIGIBLE — NO AUTHORITY&quot;;IF(OR([.U156]=&quot;UNKNOWN&quot;;[.U15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7]=&quot;&quot;;IF(AND([.L157]=&quot;&quot;;[.N157]=&quot;&quot;);&quot;UNKNOWN&quot;;&quot;CONTRADICTION&quot;);IF([.M157]=&quot;UNMATCHED&quot;;IF(AND([.L157]=&quot;&quot;;[.N157]=&quot;&quot;);&quot;CLEAR&quot;;&quot;CONTRADICTION&quot;);IF([.M157]=&quot;SINGLE_SALE_LINKED&quot;;IF(AND([.L157]&lt;&gt;&quot;&quot;;[.N157]=&quot;&quot;);&quot;CLEAR&quot;;&quot;CONTRADICTION&quot;);IF([.M157]=&quot;MULTI_SALE_PENDING_ALLOCATION&quot;;IF([.L157]=&quot;&quot;;&quot;CLEAR&quot;;&quot;CONTRADICTION&quot;);IF([.M157]=&quot;ALLOCATED&quot;;IF(AND([.L157]=&quot;&quot;;[.N157]&lt;&gt;&quot;&quot;);&quot;CLEAR&quot;;&quot;CONTRADICTION&quot;);&quot;CONTRADICTION&quot;)))))">
            <text:p>UNKNOWN</text:p>
          </table:table-cell>
          <table:table-cell office:value-type="string" table:formula="of:=IF([.S157]=&quot;UNKNOWN&quot;;&quot;NO ACTION — linkage status is UNKNOWN / not asserted&quot;;IF([.S157]=&quot;CLEAR&quot;;&quot;NO CONTRADICTION — preserve evidence as entered&quot;;IF([.M157]=&quot;&quot;;&quot;REVIEW LINKAGE STATUS — identifiers are present while status is UNKNOWN&quot;;IF([.M157]=&quot;UNMATCHED&quot;;&quot;REMOVE LINKAGE IDENTIFIERS OR CORRECT LINKAGE STATUS&quot;;IF([.M157]=&quot;SINGLE_SALE_LINKED&quot;;&quot;REQUIRE LINKED SALE ID AND NO ALLOCATION GROUP ID&quot;;IF([.M157]=&quot;MULTI_SALE_PENDING_ALLOCATION&quot;;&quot;REMOVE LINKED SALE ID OR CORRECT LINKAGE STATUS&quot;;IF([.M157]=&quot;ALLOCATED&quot;;&quot;REQUIRE ALLOCATION GROUP ID AND NO LINKED SALE ID&quot;;&quot;REVIEW LINKAGE EVIDENCE — NO AUTHORITY CREATED&quot;)))))))">
            <text:p>NO ACTION — linkage status is UNKNOWN / not asserted</text:p>
          </table:table-cell>
          <table:table-cell office:value-type="string" table:formula="of:=IF([.S157]=&quot;CONTRADICTION&quot;;&quot;BLOCKED&quot;;IF([.S157]=&quot;UNKNOWN&quot;;&quot;UNKNOWN&quot;;IF([.S157]=&quot;CLEAR&quot;;IF(OR([.O157]=&quot;&quot;;[.P157]=&quot;&quot;);&quot;UNKNOWN&quot;;&quot;READY FOR REVIEW&quot;);&quot;BLOCKED&quot;)))">
            <text:p>UNKNOWN</text:p>
          </table:table-cell>
          <table:table-cell office:value-type="string" table:formula="of:=IF([.U157]=&quot;UNKNOWN&quot;;&quot;COMPLETE OR ASSERT REQUIRED EVIDENCE BEFORE REVIEW&quot;;IF([.U157]=&quot;BLOCKED&quot;;&quot;RESOLVE CONTRADICTION BEFORE REVIEW — NO AUTHORITY CREATED&quot;;IF([.U1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7]=&quot;READY FOR REVIEW&quot;;&quot;REVIEW ELIGIBLE — NO AUTHORITY&quot;;IF(OR([.U157]=&quot;UNKNOWN&quot;;[.U15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8]=&quot;&quot;;IF(AND([.L158]=&quot;&quot;;[.N158]=&quot;&quot;);&quot;UNKNOWN&quot;;&quot;CONTRADICTION&quot;);IF([.M158]=&quot;UNMATCHED&quot;;IF(AND([.L158]=&quot;&quot;;[.N158]=&quot;&quot;);&quot;CLEAR&quot;;&quot;CONTRADICTION&quot;);IF([.M158]=&quot;SINGLE_SALE_LINKED&quot;;IF(AND([.L158]&lt;&gt;&quot;&quot;;[.N158]=&quot;&quot;);&quot;CLEAR&quot;;&quot;CONTRADICTION&quot;);IF([.M158]=&quot;MULTI_SALE_PENDING_ALLOCATION&quot;;IF([.L158]=&quot;&quot;;&quot;CLEAR&quot;;&quot;CONTRADICTION&quot;);IF([.M158]=&quot;ALLOCATED&quot;;IF(AND([.L158]=&quot;&quot;;[.N158]&lt;&gt;&quot;&quot;);&quot;CLEAR&quot;;&quot;CONTRADICTION&quot;);&quot;CONTRADICTION&quot;)))))">
            <text:p>UNKNOWN</text:p>
          </table:table-cell>
          <table:table-cell office:value-type="string" table:formula="of:=IF([.S158]=&quot;UNKNOWN&quot;;&quot;NO ACTION — linkage status is UNKNOWN / not asserted&quot;;IF([.S158]=&quot;CLEAR&quot;;&quot;NO CONTRADICTION — preserve evidence as entered&quot;;IF([.M158]=&quot;&quot;;&quot;REVIEW LINKAGE STATUS — identifiers are present while status is UNKNOWN&quot;;IF([.M158]=&quot;UNMATCHED&quot;;&quot;REMOVE LINKAGE IDENTIFIERS OR CORRECT LINKAGE STATUS&quot;;IF([.M158]=&quot;SINGLE_SALE_LINKED&quot;;&quot;REQUIRE LINKED SALE ID AND NO ALLOCATION GROUP ID&quot;;IF([.M158]=&quot;MULTI_SALE_PENDING_ALLOCATION&quot;;&quot;REMOVE LINKED SALE ID OR CORRECT LINKAGE STATUS&quot;;IF([.M158]=&quot;ALLOCATED&quot;;&quot;REQUIRE ALLOCATION GROUP ID AND NO LINKED SALE ID&quot;;&quot;REVIEW LINKAGE EVIDENCE — NO AUTHORITY CREATED&quot;)))))))">
            <text:p>NO ACTION — linkage status is UNKNOWN / not asserted</text:p>
          </table:table-cell>
          <table:table-cell office:value-type="string" table:formula="of:=IF([.S158]=&quot;CONTRADICTION&quot;;&quot;BLOCKED&quot;;IF([.S158]=&quot;UNKNOWN&quot;;&quot;UNKNOWN&quot;;IF([.S158]=&quot;CLEAR&quot;;IF(OR([.O158]=&quot;&quot;;[.P158]=&quot;&quot;);&quot;UNKNOWN&quot;;&quot;READY FOR REVIEW&quot;);&quot;BLOCKED&quot;)))">
            <text:p>UNKNOWN</text:p>
          </table:table-cell>
          <table:table-cell office:value-type="string" table:formula="of:=IF([.U158]=&quot;UNKNOWN&quot;;&quot;COMPLETE OR ASSERT REQUIRED EVIDENCE BEFORE REVIEW&quot;;IF([.U158]=&quot;BLOCKED&quot;;&quot;RESOLVE CONTRADICTION BEFORE REVIEW — NO AUTHORITY CREATED&quot;;IF([.U1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8]=&quot;READY FOR REVIEW&quot;;&quot;REVIEW ELIGIBLE — NO AUTHORITY&quot;;IF(OR([.U158]=&quot;UNKNOWN&quot;;[.U15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9]=&quot;&quot;;IF(AND([.L159]=&quot;&quot;;[.N159]=&quot;&quot;);&quot;UNKNOWN&quot;;&quot;CONTRADICTION&quot;);IF([.M159]=&quot;UNMATCHED&quot;;IF(AND([.L159]=&quot;&quot;;[.N159]=&quot;&quot;);&quot;CLEAR&quot;;&quot;CONTRADICTION&quot;);IF([.M159]=&quot;SINGLE_SALE_LINKED&quot;;IF(AND([.L159]&lt;&gt;&quot;&quot;;[.N159]=&quot;&quot;);&quot;CLEAR&quot;;&quot;CONTRADICTION&quot;);IF([.M159]=&quot;MULTI_SALE_PENDING_ALLOCATION&quot;;IF([.L159]=&quot;&quot;;&quot;CLEAR&quot;;&quot;CONTRADICTION&quot;);IF([.M159]=&quot;ALLOCATED&quot;;IF(AND([.L159]=&quot;&quot;;[.N159]&lt;&gt;&quot;&quot;);&quot;CLEAR&quot;;&quot;CONTRADICTION&quot;);&quot;CONTRADICTION&quot;)))))">
            <text:p>UNKNOWN</text:p>
          </table:table-cell>
          <table:table-cell office:value-type="string" table:formula="of:=IF([.S159]=&quot;UNKNOWN&quot;;&quot;NO ACTION — linkage status is UNKNOWN / not asserted&quot;;IF([.S159]=&quot;CLEAR&quot;;&quot;NO CONTRADICTION — preserve evidence as entered&quot;;IF([.M159]=&quot;&quot;;&quot;REVIEW LINKAGE STATUS — identifiers are present while status is UNKNOWN&quot;;IF([.M159]=&quot;UNMATCHED&quot;;&quot;REMOVE LINKAGE IDENTIFIERS OR CORRECT LINKAGE STATUS&quot;;IF([.M159]=&quot;SINGLE_SALE_LINKED&quot;;&quot;REQUIRE LINKED SALE ID AND NO ALLOCATION GROUP ID&quot;;IF([.M159]=&quot;MULTI_SALE_PENDING_ALLOCATION&quot;;&quot;REMOVE LINKED SALE ID OR CORRECT LINKAGE STATUS&quot;;IF([.M159]=&quot;ALLOCATED&quot;;&quot;REQUIRE ALLOCATION GROUP ID AND NO LINKED SALE ID&quot;;&quot;REVIEW LINKAGE EVIDENCE — NO AUTHORITY CREATED&quot;)))))))">
            <text:p>NO ACTION — linkage status is UNKNOWN / not asserted</text:p>
          </table:table-cell>
          <table:table-cell office:value-type="string" table:formula="of:=IF([.S159]=&quot;CONTRADICTION&quot;;&quot;BLOCKED&quot;;IF([.S159]=&quot;UNKNOWN&quot;;&quot;UNKNOWN&quot;;IF([.S159]=&quot;CLEAR&quot;;IF(OR([.O159]=&quot;&quot;;[.P159]=&quot;&quot;);&quot;UNKNOWN&quot;;&quot;READY FOR REVIEW&quot;);&quot;BLOCKED&quot;)))">
            <text:p>UNKNOWN</text:p>
          </table:table-cell>
          <table:table-cell office:value-type="string" table:formula="of:=IF([.U159]=&quot;UNKNOWN&quot;;&quot;COMPLETE OR ASSERT REQUIRED EVIDENCE BEFORE REVIEW&quot;;IF([.U159]=&quot;BLOCKED&quot;;&quot;RESOLVE CONTRADICTION BEFORE REVIEW — NO AUTHORITY CREATED&quot;;IF([.U1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9]=&quot;READY FOR REVIEW&quot;;&quot;REVIEW ELIGIBLE — NO AUTHORITY&quot;;IF(OR([.U159]=&quot;UNKNOWN&quot;;[.U15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0]=&quot;&quot;;IF(AND([.L160]=&quot;&quot;;[.N160]=&quot;&quot;);&quot;UNKNOWN&quot;;&quot;CONTRADICTION&quot;);IF([.M160]=&quot;UNMATCHED&quot;;IF(AND([.L160]=&quot;&quot;;[.N160]=&quot;&quot;);&quot;CLEAR&quot;;&quot;CONTRADICTION&quot;);IF([.M160]=&quot;SINGLE_SALE_LINKED&quot;;IF(AND([.L160]&lt;&gt;&quot;&quot;;[.N160]=&quot;&quot;);&quot;CLEAR&quot;;&quot;CONTRADICTION&quot;);IF([.M160]=&quot;MULTI_SALE_PENDING_ALLOCATION&quot;;IF([.L160]=&quot;&quot;;&quot;CLEAR&quot;;&quot;CONTRADICTION&quot;);IF([.M160]=&quot;ALLOCATED&quot;;IF(AND([.L160]=&quot;&quot;;[.N160]&lt;&gt;&quot;&quot;);&quot;CLEAR&quot;;&quot;CONTRADICTION&quot;);&quot;CONTRADICTION&quot;)))))">
            <text:p>UNKNOWN</text:p>
          </table:table-cell>
          <table:table-cell office:value-type="string" table:formula="of:=IF([.S160]=&quot;UNKNOWN&quot;;&quot;NO ACTION — linkage status is UNKNOWN / not asserted&quot;;IF([.S160]=&quot;CLEAR&quot;;&quot;NO CONTRADICTION — preserve evidence as entered&quot;;IF([.M160]=&quot;&quot;;&quot;REVIEW LINKAGE STATUS — identifiers are present while status is UNKNOWN&quot;;IF([.M160]=&quot;UNMATCHED&quot;;&quot;REMOVE LINKAGE IDENTIFIERS OR CORRECT LINKAGE STATUS&quot;;IF([.M160]=&quot;SINGLE_SALE_LINKED&quot;;&quot;REQUIRE LINKED SALE ID AND NO ALLOCATION GROUP ID&quot;;IF([.M160]=&quot;MULTI_SALE_PENDING_ALLOCATION&quot;;&quot;REMOVE LINKED SALE ID OR CORRECT LINKAGE STATUS&quot;;IF([.M160]=&quot;ALLOCATED&quot;;&quot;REQUIRE ALLOCATION GROUP ID AND NO LINKED SALE ID&quot;;&quot;REVIEW LINKAGE EVIDENCE — NO AUTHORITY CREATED&quot;)))))))">
            <text:p>NO ACTION — linkage status is UNKNOWN / not asserted</text:p>
          </table:table-cell>
          <table:table-cell office:value-type="string" table:formula="of:=IF([.S160]=&quot;CONTRADICTION&quot;;&quot;BLOCKED&quot;;IF([.S160]=&quot;UNKNOWN&quot;;&quot;UNKNOWN&quot;;IF([.S160]=&quot;CLEAR&quot;;IF(OR([.O160]=&quot;&quot;;[.P160]=&quot;&quot;);&quot;UNKNOWN&quot;;&quot;READY FOR REVIEW&quot;);&quot;BLOCKED&quot;)))">
            <text:p>UNKNOWN</text:p>
          </table:table-cell>
          <table:table-cell office:value-type="string" table:formula="of:=IF([.U160]=&quot;UNKNOWN&quot;;&quot;COMPLETE OR ASSERT REQUIRED EVIDENCE BEFORE REVIEW&quot;;IF([.U160]=&quot;BLOCKED&quot;;&quot;RESOLVE CONTRADICTION BEFORE REVIEW — NO AUTHORITY CREATED&quot;;IF([.U1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0]=&quot;READY FOR REVIEW&quot;;&quot;REVIEW ELIGIBLE — NO AUTHORITY&quot;;IF(OR([.U160]=&quot;UNKNOWN&quot;;[.U16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1]=&quot;&quot;;IF(AND([.L161]=&quot;&quot;;[.N161]=&quot;&quot;);&quot;UNKNOWN&quot;;&quot;CONTRADICTION&quot;);IF([.M161]=&quot;UNMATCHED&quot;;IF(AND([.L161]=&quot;&quot;;[.N161]=&quot;&quot;);&quot;CLEAR&quot;;&quot;CONTRADICTION&quot;);IF([.M161]=&quot;SINGLE_SALE_LINKED&quot;;IF(AND([.L161]&lt;&gt;&quot;&quot;;[.N161]=&quot;&quot;);&quot;CLEAR&quot;;&quot;CONTRADICTION&quot;);IF([.M161]=&quot;MULTI_SALE_PENDING_ALLOCATION&quot;;IF([.L161]=&quot;&quot;;&quot;CLEAR&quot;;&quot;CONTRADICTION&quot;);IF([.M161]=&quot;ALLOCATED&quot;;IF(AND([.L161]=&quot;&quot;;[.N161]&lt;&gt;&quot;&quot;);&quot;CLEAR&quot;;&quot;CONTRADICTION&quot;);&quot;CONTRADICTION&quot;)))))">
            <text:p>UNKNOWN</text:p>
          </table:table-cell>
          <table:table-cell office:value-type="string" table:formula="of:=IF([.S161]=&quot;UNKNOWN&quot;;&quot;NO ACTION — linkage status is UNKNOWN / not asserted&quot;;IF([.S161]=&quot;CLEAR&quot;;&quot;NO CONTRADICTION — preserve evidence as entered&quot;;IF([.M161]=&quot;&quot;;&quot;REVIEW LINKAGE STATUS — identifiers are present while status is UNKNOWN&quot;;IF([.M161]=&quot;UNMATCHED&quot;;&quot;REMOVE LINKAGE IDENTIFIERS OR CORRECT LINKAGE STATUS&quot;;IF([.M161]=&quot;SINGLE_SALE_LINKED&quot;;&quot;REQUIRE LINKED SALE ID AND NO ALLOCATION GROUP ID&quot;;IF([.M161]=&quot;MULTI_SALE_PENDING_ALLOCATION&quot;;&quot;REMOVE LINKED SALE ID OR CORRECT LINKAGE STATUS&quot;;IF([.M161]=&quot;ALLOCATED&quot;;&quot;REQUIRE ALLOCATION GROUP ID AND NO LINKED SALE ID&quot;;&quot;REVIEW LINKAGE EVIDENCE — NO AUTHORITY CREATED&quot;)))))))">
            <text:p>NO ACTION — linkage status is UNKNOWN / not asserted</text:p>
          </table:table-cell>
          <table:table-cell office:value-type="string" table:formula="of:=IF([.S161]=&quot;CONTRADICTION&quot;;&quot;BLOCKED&quot;;IF([.S161]=&quot;UNKNOWN&quot;;&quot;UNKNOWN&quot;;IF([.S161]=&quot;CLEAR&quot;;IF(OR([.O161]=&quot;&quot;;[.P161]=&quot;&quot;);&quot;UNKNOWN&quot;;&quot;READY FOR REVIEW&quot;);&quot;BLOCKED&quot;)))">
            <text:p>UNKNOWN</text:p>
          </table:table-cell>
          <table:table-cell office:value-type="string" table:formula="of:=IF([.U161]=&quot;UNKNOWN&quot;;&quot;COMPLETE OR ASSERT REQUIRED EVIDENCE BEFORE REVIEW&quot;;IF([.U161]=&quot;BLOCKED&quot;;&quot;RESOLVE CONTRADICTION BEFORE REVIEW — NO AUTHORITY CREATED&quot;;IF([.U1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1]=&quot;READY FOR REVIEW&quot;;&quot;REVIEW ELIGIBLE — NO AUTHORITY&quot;;IF(OR([.U161]=&quot;UNKNOWN&quot;;[.U16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2]=&quot;&quot;;IF(AND([.L162]=&quot;&quot;;[.N162]=&quot;&quot;);&quot;UNKNOWN&quot;;&quot;CONTRADICTION&quot;);IF([.M162]=&quot;UNMATCHED&quot;;IF(AND([.L162]=&quot;&quot;;[.N162]=&quot;&quot;);&quot;CLEAR&quot;;&quot;CONTRADICTION&quot;);IF([.M162]=&quot;SINGLE_SALE_LINKED&quot;;IF(AND([.L162]&lt;&gt;&quot;&quot;;[.N162]=&quot;&quot;);&quot;CLEAR&quot;;&quot;CONTRADICTION&quot;);IF([.M162]=&quot;MULTI_SALE_PENDING_ALLOCATION&quot;;IF([.L162]=&quot;&quot;;&quot;CLEAR&quot;;&quot;CONTRADICTION&quot;);IF([.M162]=&quot;ALLOCATED&quot;;IF(AND([.L162]=&quot;&quot;;[.N162]&lt;&gt;&quot;&quot;);&quot;CLEAR&quot;;&quot;CONTRADICTION&quot;);&quot;CONTRADICTION&quot;)))))">
            <text:p>UNKNOWN</text:p>
          </table:table-cell>
          <table:table-cell office:value-type="string" table:formula="of:=IF([.S162]=&quot;UNKNOWN&quot;;&quot;NO ACTION — linkage status is UNKNOWN / not asserted&quot;;IF([.S162]=&quot;CLEAR&quot;;&quot;NO CONTRADICTION — preserve evidence as entered&quot;;IF([.M162]=&quot;&quot;;&quot;REVIEW LINKAGE STATUS — identifiers are present while status is UNKNOWN&quot;;IF([.M162]=&quot;UNMATCHED&quot;;&quot;REMOVE LINKAGE IDENTIFIERS OR CORRECT LINKAGE STATUS&quot;;IF([.M162]=&quot;SINGLE_SALE_LINKED&quot;;&quot;REQUIRE LINKED SALE ID AND NO ALLOCATION GROUP ID&quot;;IF([.M162]=&quot;MULTI_SALE_PENDING_ALLOCATION&quot;;&quot;REMOVE LINKED SALE ID OR CORRECT LINKAGE STATUS&quot;;IF([.M162]=&quot;ALLOCATED&quot;;&quot;REQUIRE ALLOCATION GROUP ID AND NO LINKED SALE ID&quot;;&quot;REVIEW LINKAGE EVIDENCE — NO AUTHORITY CREATED&quot;)))))))">
            <text:p>NO ACTION — linkage status is UNKNOWN / not asserted</text:p>
          </table:table-cell>
          <table:table-cell office:value-type="string" table:formula="of:=IF([.S162]=&quot;CONTRADICTION&quot;;&quot;BLOCKED&quot;;IF([.S162]=&quot;UNKNOWN&quot;;&quot;UNKNOWN&quot;;IF([.S162]=&quot;CLEAR&quot;;IF(OR([.O162]=&quot;&quot;;[.P162]=&quot;&quot;);&quot;UNKNOWN&quot;;&quot;READY FOR REVIEW&quot;);&quot;BLOCKED&quot;)))">
            <text:p>UNKNOWN</text:p>
          </table:table-cell>
          <table:table-cell office:value-type="string" table:formula="of:=IF([.U162]=&quot;UNKNOWN&quot;;&quot;COMPLETE OR ASSERT REQUIRED EVIDENCE BEFORE REVIEW&quot;;IF([.U162]=&quot;BLOCKED&quot;;&quot;RESOLVE CONTRADICTION BEFORE REVIEW — NO AUTHORITY CREATED&quot;;IF([.U1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2]=&quot;READY FOR REVIEW&quot;;&quot;REVIEW ELIGIBLE — NO AUTHORITY&quot;;IF(OR([.U162]=&quot;UNKNOWN&quot;;[.U16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3]=&quot;&quot;;IF(AND([.L163]=&quot;&quot;;[.N163]=&quot;&quot;);&quot;UNKNOWN&quot;;&quot;CONTRADICTION&quot;);IF([.M163]=&quot;UNMATCHED&quot;;IF(AND([.L163]=&quot;&quot;;[.N163]=&quot;&quot;);&quot;CLEAR&quot;;&quot;CONTRADICTION&quot;);IF([.M163]=&quot;SINGLE_SALE_LINKED&quot;;IF(AND([.L163]&lt;&gt;&quot;&quot;;[.N163]=&quot;&quot;);&quot;CLEAR&quot;;&quot;CONTRADICTION&quot;);IF([.M163]=&quot;MULTI_SALE_PENDING_ALLOCATION&quot;;IF([.L163]=&quot;&quot;;&quot;CLEAR&quot;;&quot;CONTRADICTION&quot;);IF([.M163]=&quot;ALLOCATED&quot;;IF(AND([.L163]=&quot;&quot;;[.N163]&lt;&gt;&quot;&quot;);&quot;CLEAR&quot;;&quot;CONTRADICTION&quot;);&quot;CONTRADICTION&quot;)))))">
            <text:p>UNKNOWN</text:p>
          </table:table-cell>
          <table:table-cell office:value-type="string" table:formula="of:=IF([.S163]=&quot;UNKNOWN&quot;;&quot;NO ACTION — linkage status is UNKNOWN / not asserted&quot;;IF([.S163]=&quot;CLEAR&quot;;&quot;NO CONTRADICTION — preserve evidence as entered&quot;;IF([.M163]=&quot;&quot;;&quot;REVIEW LINKAGE STATUS — identifiers are present while status is UNKNOWN&quot;;IF([.M163]=&quot;UNMATCHED&quot;;&quot;REMOVE LINKAGE IDENTIFIERS OR CORRECT LINKAGE STATUS&quot;;IF([.M163]=&quot;SINGLE_SALE_LINKED&quot;;&quot;REQUIRE LINKED SALE ID AND NO ALLOCATION GROUP ID&quot;;IF([.M163]=&quot;MULTI_SALE_PENDING_ALLOCATION&quot;;&quot;REMOVE LINKED SALE ID OR CORRECT LINKAGE STATUS&quot;;IF([.M163]=&quot;ALLOCATED&quot;;&quot;REQUIRE ALLOCATION GROUP ID AND NO LINKED SALE ID&quot;;&quot;REVIEW LINKAGE EVIDENCE — NO AUTHORITY CREATED&quot;)))))))">
            <text:p>NO ACTION — linkage status is UNKNOWN / not asserted</text:p>
          </table:table-cell>
          <table:table-cell office:value-type="string" table:formula="of:=IF([.S163]=&quot;CONTRADICTION&quot;;&quot;BLOCKED&quot;;IF([.S163]=&quot;UNKNOWN&quot;;&quot;UNKNOWN&quot;;IF([.S163]=&quot;CLEAR&quot;;IF(OR([.O163]=&quot;&quot;;[.P163]=&quot;&quot;);&quot;UNKNOWN&quot;;&quot;READY FOR REVIEW&quot;);&quot;BLOCKED&quot;)))">
            <text:p>UNKNOWN</text:p>
          </table:table-cell>
          <table:table-cell office:value-type="string" table:formula="of:=IF([.U163]=&quot;UNKNOWN&quot;;&quot;COMPLETE OR ASSERT REQUIRED EVIDENCE BEFORE REVIEW&quot;;IF([.U163]=&quot;BLOCKED&quot;;&quot;RESOLVE CONTRADICTION BEFORE REVIEW — NO AUTHORITY CREATED&quot;;IF([.U1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3]=&quot;READY FOR REVIEW&quot;;&quot;REVIEW ELIGIBLE — NO AUTHORITY&quot;;IF(OR([.U163]=&quot;UNKNOWN&quot;;[.U16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4]=&quot;&quot;;IF(AND([.L164]=&quot;&quot;;[.N164]=&quot;&quot;);&quot;UNKNOWN&quot;;&quot;CONTRADICTION&quot;);IF([.M164]=&quot;UNMATCHED&quot;;IF(AND([.L164]=&quot;&quot;;[.N164]=&quot;&quot;);&quot;CLEAR&quot;;&quot;CONTRADICTION&quot;);IF([.M164]=&quot;SINGLE_SALE_LINKED&quot;;IF(AND([.L164]&lt;&gt;&quot;&quot;;[.N164]=&quot;&quot;);&quot;CLEAR&quot;;&quot;CONTRADICTION&quot;);IF([.M164]=&quot;MULTI_SALE_PENDING_ALLOCATION&quot;;IF([.L164]=&quot;&quot;;&quot;CLEAR&quot;;&quot;CONTRADICTION&quot;);IF([.M164]=&quot;ALLOCATED&quot;;IF(AND([.L164]=&quot;&quot;;[.N164]&lt;&gt;&quot;&quot;);&quot;CLEAR&quot;;&quot;CONTRADICTION&quot;);&quot;CONTRADICTION&quot;)))))">
            <text:p>UNKNOWN</text:p>
          </table:table-cell>
          <table:table-cell office:value-type="string" table:formula="of:=IF([.S164]=&quot;UNKNOWN&quot;;&quot;NO ACTION — linkage status is UNKNOWN / not asserted&quot;;IF([.S164]=&quot;CLEAR&quot;;&quot;NO CONTRADICTION — preserve evidence as entered&quot;;IF([.M164]=&quot;&quot;;&quot;REVIEW LINKAGE STATUS — identifiers are present while status is UNKNOWN&quot;;IF([.M164]=&quot;UNMATCHED&quot;;&quot;REMOVE LINKAGE IDENTIFIERS OR CORRECT LINKAGE STATUS&quot;;IF([.M164]=&quot;SINGLE_SALE_LINKED&quot;;&quot;REQUIRE LINKED SALE ID AND NO ALLOCATION GROUP ID&quot;;IF([.M164]=&quot;MULTI_SALE_PENDING_ALLOCATION&quot;;&quot;REMOVE LINKED SALE ID OR CORRECT LINKAGE STATUS&quot;;IF([.M164]=&quot;ALLOCATED&quot;;&quot;REQUIRE ALLOCATION GROUP ID AND NO LINKED SALE ID&quot;;&quot;REVIEW LINKAGE EVIDENCE — NO AUTHORITY CREATED&quot;)))))))">
            <text:p>NO ACTION — linkage status is UNKNOWN / not asserted</text:p>
          </table:table-cell>
          <table:table-cell office:value-type="string" table:formula="of:=IF([.S164]=&quot;CONTRADICTION&quot;;&quot;BLOCKED&quot;;IF([.S164]=&quot;UNKNOWN&quot;;&quot;UNKNOWN&quot;;IF([.S164]=&quot;CLEAR&quot;;IF(OR([.O164]=&quot;&quot;;[.P164]=&quot;&quot;);&quot;UNKNOWN&quot;;&quot;READY FOR REVIEW&quot;);&quot;BLOCKED&quot;)))">
            <text:p>UNKNOWN</text:p>
          </table:table-cell>
          <table:table-cell office:value-type="string" table:formula="of:=IF([.U164]=&quot;UNKNOWN&quot;;&quot;COMPLETE OR ASSERT REQUIRED EVIDENCE BEFORE REVIEW&quot;;IF([.U164]=&quot;BLOCKED&quot;;&quot;RESOLVE CONTRADICTION BEFORE REVIEW — NO AUTHORITY CREATED&quot;;IF([.U1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4]=&quot;READY FOR REVIEW&quot;;&quot;REVIEW ELIGIBLE — NO AUTHORITY&quot;;IF(OR([.U164]=&quot;UNKNOWN&quot;;[.U16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5]=&quot;&quot;;IF(AND([.L165]=&quot;&quot;;[.N165]=&quot;&quot;);&quot;UNKNOWN&quot;;&quot;CONTRADICTION&quot;);IF([.M165]=&quot;UNMATCHED&quot;;IF(AND([.L165]=&quot;&quot;;[.N165]=&quot;&quot;);&quot;CLEAR&quot;;&quot;CONTRADICTION&quot;);IF([.M165]=&quot;SINGLE_SALE_LINKED&quot;;IF(AND([.L165]&lt;&gt;&quot;&quot;;[.N165]=&quot;&quot;);&quot;CLEAR&quot;;&quot;CONTRADICTION&quot;);IF([.M165]=&quot;MULTI_SALE_PENDING_ALLOCATION&quot;;IF([.L165]=&quot;&quot;;&quot;CLEAR&quot;;&quot;CONTRADICTION&quot;);IF([.M165]=&quot;ALLOCATED&quot;;IF(AND([.L165]=&quot;&quot;;[.N165]&lt;&gt;&quot;&quot;);&quot;CLEAR&quot;;&quot;CONTRADICTION&quot;);&quot;CONTRADICTION&quot;)))))">
            <text:p>UNKNOWN</text:p>
          </table:table-cell>
          <table:table-cell office:value-type="string" table:formula="of:=IF([.S165]=&quot;UNKNOWN&quot;;&quot;NO ACTION — linkage status is UNKNOWN / not asserted&quot;;IF([.S165]=&quot;CLEAR&quot;;&quot;NO CONTRADICTION — preserve evidence as entered&quot;;IF([.M165]=&quot;&quot;;&quot;REVIEW LINKAGE STATUS — identifiers are present while status is UNKNOWN&quot;;IF([.M165]=&quot;UNMATCHED&quot;;&quot;REMOVE LINKAGE IDENTIFIERS OR CORRECT LINKAGE STATUS&quot;;IF([.M165]=&quot;SINGLE_SALE_LINKED&quot;;&quot;REQUIRE LINKED SALE ID AND NO ALLOCATION GROUP ID&quot;;IF([.M165]=&quot;MULTI_SALE_PENDING_ALLOCATION&quot;;&quot;REMOVE LINKED SALE ID OR CORRECT LINKAGE STATUS&quot;;IF([.M165]=&quot;ALLOCATED&quot;;&quot;REQUIRE ALLOCATION GROUP ID AND NO LINKED SALE ID&quot;;&quot;REVIEW LINKAGE EVIDENCE — NO AUTHORITY CREATED&quot;)))))))">
            <text:p>NO ACTION — linkage status is UNKNOWN / not asserted</text:p>
          </table:table-cell>
          <table:table-cell office:value-type="string" table:formula="of:=IF([.S165]=&quot;CONTRADICTION&quot;;&quot;BLOCKED&quot;;IF([.S165]=&quot;UNKNOWN&quot;;&quot;UNKNOWN&quot;;IF([.S165]=&quot;CLEAR&quot;;IF(OR([.O165]=&quot;&quot;;[.P165]=&quot;&quot;);&quot;UNKNOWN&quot;;&quot;READY FOR REVIEW&quot;);&quot;BLOCKED&quot;)))">
            <text:p>UNKNOWN</text:p>
          </table:table-cell>
          <table:table-cell office:value-type="string" table:formula="of:=IF([.U165]=&quot;UNKNOWN&quot;;&quot;COMPLETE OR ASSERT REQUIRED EVIDENCE BEFORE REVIEW&quot;;IF([.U165]=&quot;BLOCKED&quot;;&quot;RESOLVE CONTRADICTION BEFORE REVIEW — NO AUTHORITY CREATED&quot;;IF([.U1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5]=&quot;READY FOR REVIEW&quot;;&quot;REVIEW ELIGIBLE — NO AUTHORITY&quot;;IF(OR([.U165]=&quot;UNKNOWN&quot;;[.U16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6]=&quot;&quot;;IF(AND([.L166]=&quot;&quot;;[.N166]=&quot;&quot;);&quot;UNKNOWN&quot;;&quot;CONTRADICTION&quot;);IF([.M166]=&quot;UNMATCHED&quot;;IF(AND([.L166]=&quot;&quot;;[.N166]=&quot;&quot;);&quot;CLEAR&quot;;&quot;CONTRADICTION&quot;);IF([.M166]=&quot;SINGLE_SALE_LINKED&quot;;IF(AND([.L166]&lt;&gt;&quot;&quot;;[.N166]=&quot;&quot;);&quot;CLEAR&quot;;&quot;CONTRADICTION&quot;);IF([.M166]=&quot;MULTI_SALE_PENDING_ALLOCATION&quot;;IF([.L166]=&quot;&quot;;&quot;CLEAR&quot;;&quot;CONTRADICTION&quot;);IF([.M166]=&quot;ALLOCATED&quot;;IF(AND([.L166]=&quot;&quot;;[.N166]&lt;&gt;&quot;&quot;);&quot;CLEAR&quot;;&quot;CONTRADICTION&quot;);&quot;CONTRADICTION&quot;)))))">
            <text:p>UNKNOWN</text:p>
          </table:table-cell>
          <table:table-cell office:value-type="string" table:formula="of:=IF([.S166]=&quot;UNKNOWN&quot;;&quot;NO ACTION — linkage status is UNKNOWN / not asserted&quot;;IF([.S166]=&quot;CLEAR&quot;;&quot;NO CONTRADICTION — preserve evidence as entered&quot;;IF([.M166]=&quot;&quot;;&quot;REVIEW LINKAGE STATUS — identifiers are present while status is UNKNOWN&quot;;IF([.M166]=&quot;UNMATCHED&quot;;&quot;REMOVE LINKAGE IDENTIFIERS OR CORRECT LINKAGE STATUS&quot;;IF([.M166]=&quot;SINGLE_SALE_LINKED&quot;;&quot;REQUIRE LINKED SALE ID AND NO ALLOCATION GROUP ID&quot;;IF([.M166]=&quot;MULTI_SALE_PENDING_ALLOCATION&quot;;&quot;REMOVE LINKED SALE ID OR CORRECT LINKAGE STATUS&quot;;IF([.M166]=&quot;ALLOCATED&quot;;&quot;REQUIRE ALLOCATION GROUP ID AND NO LINKED SALE ID&quot;;&quot;REVIEW LINKAGE EVIDENCE — NO AUTHORITY CREATED&quot;)))))))">
            <text:p>NO ACTION — linkage status is UNKNOWN / not asserted</text:p>
          </table:table-cell>
          <table:table-cell office:value-type="string" table:formula="of:=IF([.S166]=&quot;CONTRADICTION&quot;;&quot;BLOCKED&quot;;IF([.S166]=&quot;UNKNOWN&quot;;&quot;UNKNOWN&quot;;IF([.S166]=&quot;CLEAR&quot;;IF(OR([.O166]=&quot;&quot;;[.P166]=&quot;&quot;);&quot;UNKNOWN&quot;;&quot;READY FOR REVIEW&quot;);&quot;BLOCKED&quot;)))">
            <text:p>UNKNOWN</text:p>
          </table:table-cell>
          <table:table-cell office:value-type="string" table:formula="of:=IF([.U166]=&quot;UNKNOWN&quot;;&quot;COMPLETE OR ASSERT REQUIRED EVIDENCE BEFORE REVIEW&quot;;IF([.U166]=&quot;BLOCKED&quot;;&quot;RESOLVE CONTRADICTION BEFORE REVIEW — NO AUTHORITY CREATED&quot;;IF([.U1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6]=&quot;READY FOR REVIEW&quot;;&quot;REVIEW ELIGIBLE — NO AUTHORITY&quot;;IF(OR([.U166]=&quot;UNKNOWN&quot;;[.U16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7]=&quot;&quot;;IF(AND([.L167]=&quot;&quot;;[.N167]=&quot;&quot;);&quot;UNKNOWN&quot;;&quot;CONTRADICTION&quot;);IF([.M167]=&quot;UNMATCHED&quot;;IF(AND([.L167]=&quot;&quot;;[.N167]=&quot;&quot;);&quot;CLEAR&quot;;&quot;CONTRADICTION&quot;);IF([.M167]=&quot;SINGLE_SALE_LINKED&quot;;IF(AND([.L167]&lt;&gt;&quot;&quot;;[.N167]=&quot;&quot;);&quot;CLEAR&quot;;&quot;CONTRADICTION&quot;);IF([.M167]=&quot;MULTI_SALE_PENDING_ALLOCATION&quot;;IF([.L167]=&quot;&quot;;&quot;CLEAR&quot;;&quot;CONTRADICTION&quot;);IF([.M167]=&quot;ALLOCATED&quot;;IF(AND([.L167]=&quot;&quot;;[.N167]&lt;&gt;&quot;&quot;);&quot;CLEAR&quot;;&quot;CONTRADICTION&quot;);&quot;CONTRADICTION&quot;)))))">
            <text:p>UNKNOWN</text:p>
          </table:table-cell>
          <table:table-cell office:value-type="string" table:formula="of:=IF([.S167]=&quot;UNKNOWN&quot;;&quot;NO ACTION — linkage status is UNKNOWN / not asserted&quot;;IF([.S167]=&quot;CLEAR&quot;;&quot;NO CONTRADICTION — preserve evidence as entered&quot;;IF([.M167]=&quot;&quot;;&quot;REVIEW LINKAGE STATUS — identifiers are present while status is UNKNOWN&quot;;IF([.M167]=&quot;UNMATCHED&quot;;&quot;REMOVE LINKAGE IDENTIFIERS OR CORRECT LINKAGE STATUS&quot;;IF([.M167]=&quot;SINGLE_SALE_LINKED&quot;;&quot;REQUIRE LINKED SALE ID AND NO ALLOCATION GROUP ID&quot;;IF([.M167]=&quot;MULTI_SALE_PENDING_ALLOCATION&quot;;&quot;REMOVE LINKED SALE ID OR CORRECT LINKAGE STATUS&quot;;IF([.M167]=&quot;ALLOCATED&quot;;&quot;REQUIRE ALLOCATION GROUP ID AND NO LINKED SALE ID&quot;;&quot;REVIEW LINKAGE EVIDENCE — NO AUTHORITY CREATED&quot;)))))))">
            <text:p>NO ACTION — linkage status is UNKNOWN / not asserted</text:p>
          </table:table-cell>
          <table:table-cell office:value-type="string" table:formula="of:=IF([.S167]=&quot;CONTRADICTION&quot;;&quot;BLOCKED&quot;;IF([.S167]=&quot;UNKNOWN&quot;;&quot;UNKNOWN&quot;;IF([.S167]=&quot;CLEAR&quot;;IF(OR([.O167]=&quot;&quot;;[.P167]=&quot;&quot;);&quot;UNKNOWN&quot;;&quot;READY FOR REVIEW&quot;);&quot;BLOCKED&quot;)))">
            <text:p>UNKNOWN</text:p>
          </table:table-cell>
          <table:table-cell office:value-type="string" table:formula="of:=IF([.U167]=&quot;UNKNOWN&quot;;&quot;COMPLETE OR ASSERT REQUIRED EVIDENCE BEFORE REVIEW&quot;;IF([.U167]=&quot;BLOCKED&quot;;&quot;RESOLVE CONTRADICTION BEFORE REVIEW — NO AUTHORITY CREATED&quot;;IF([.U1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7]=&quot;READY FOR REVIEW&quot;;&quot;REVIEW ELIGIBLE — NO AUTHORITY&quot;;IF(OR([.U167]=&quot;UNKNOWN&quot;;[.U16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8]=&quot;&quot;;IF(AND([.L168]=&quot;&quot;;[.N168]=&quot;&quot;);&quot;UNKNOWN&quot;;&quot;CONTRADICTION&quot;);IF([.M168]=&quot;UNMATCHED&quot;;IF(AND([.L168]=&quot;&quot;;[.N168]=&quot;&quot;);&quot;CLEAR&quot;;&quot;CONTRADICTION&quot;);IF([.M168]=&quot;SINGLE_SALE_LINKED&quot;;IF(AND([.L168]&lt;&gt;&quot;&quot;;[.N168]=&quot;&quot;);&quot;CLEAR&quot;;&quot;CONTRADICTION&quot;);IF([.M168]=&quot;MULTI_SALE_PENDING_ALLOCATION&quot;;IF([.L168]=&quot;&quot;;&quot;CLEAR&quot;;&quot;CONTRADICTION&quot;);IF([.M168]=&quot;ALLOCATED&quot;;IF(AND([.L168]=&quot;&quot;;[.N168]&lt;&gt;&quot;&quot;);&quot;CLEAR&quot;;&quot;CONTRADICTION&quot;);&quot;CONTRADICTION&quot;)))))">
            <text:p>UNKNOWN</text:p>
          </table:table-cell>
          <table:table-cell office:value-type="string" table:formula="of:=IF([.S168]=&quot;UNKNOWN&quot;;&quot;NO ACTION — linkage status is UNKNOWN / not asserted&quot;;IF([.S168]=&quot;CLEAR&quot;;&quot;NO CONTRADICTION — preserve evidence as entered&quot;;IF([.M168]=&quot;&quot;;&quot;REVIEW LINKAGE STATUS — identifiers are present while status is UNKNOWN&quot;;IF([.M168]=&quot;UNMATCHED&quot;;&quot;REMOVE LINKAGE IDENTIFIERS OR CORRECT LINKAGE STATUS&quot;;IF([.M168]=&quot;SINGLE_SALE_LINKED&quot;;&quot;REQUIRE LINKED SALE ID AND NO ALLOCATION GROUP ID&quot;;IF([.M168]=&quot;MULTI_SALE_PENDING_ALLOCATION&quot;;&quot;REMOVE LINKED SALE ID OR CORRECT LINKAGE STATUS&quot;;IF([.M168]=&quot;ALLOCATED&quot;;&quot;REQUIRE ALLOCATION GROUP ID AND NO LINKED SALE ID&quot;;&quot;REVIEW LINKAGE EVIDENCE — NO AUTHORITY CREATED&quot;)))))))">
            <text:p>NO ACTION — linkage status is UNKNOWN / not asserted</text:p>
          </table:table-cell>
          <table:table-cell office:value-type="string" table:formula="of:=IF([.S168]=&quot;CONTRADICTION&quot;;&quot;BLOCKED&quot;;IF([.S168]=&quot;UNKNOWN&quot;;&quot;UNKNOWN&quot;;IF([.S168]=&quot;CLEAR&quot;;IF(OR([.O168]=&quot;&quot;;[.P168]=&quot;&quot;);&quot;UNKNOWN&quot;;&quot;READY FOR REVIEW&quot;);&quot;BLOCKED&quot;)))">
            <text:p>UNKNOWN</text:p>
          </table:table-cell>
          <table:table-cell office:value-type="string" table:formula="of:=IF([.U168]=&quot;UNKNOWN&quot;;&quot;COMPLETE OR ASSERT REQUIRED EVIDENCE BEFORE REVIEW&quot;;IF([.U168]=&quot;BLOCKED&quot;;&quot;RESOLVE CONTRADICTION BEFORE REVIEW — NO AUTHORITY CREATED&quot;;IF([.U1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8]=&quot;READY FOR REVIEW&quot;;&quot;REVIEW ELIGIBLE — NO AUTHORITY&quot;;IF(OR([.U168]=&quot;UNKNOWN&quot;;[.U16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9]=&quot;&quot;;IF(AND([.L169]=&quot;&quot;;[.N169]=&quot;&quot;);&quot;UNKNOWN&quot;;&quot;CONTRADICTION&quot;);IF([.M169]=&quot;UNMATCHED&quot;;IF(AND([.L169]=&quot;&quot;;[.N169]=&quot;&quot;);&quot;CLEAR&quot;;&quot;CONTRADICTION&quot;);IF([.M169]=&quot;SINGLE_SALE_LINKED&quot;;IF(AND([.L169]&lt;&gt;&quot;&quot;;[.N169]=&quot;&quot;);&quot;CLEAR&quot;;&quot;CONTRADICTION&quot;);IF([.M169]=&quot;MULTI_SALE_PENDING_ALLOCATION&quot;;IF([.L169]=&quot;&quot;;&quot;CLEAR&quot;;&quot;CONTRADICTION&quot;);IF([.M169]=&quot;ALLOCATED&quot;;IF(AND([.L169]=&quot;&quot;;[.N169]&lt;&gt;&quot;&quot;);&quot;CLEAR&quot;;&quot;CONTRADICTION&quot;);&quot;CONTRADICTION&quot;)))))">
            <text:p>UNKNOWN</text:p>
          </table:table-cell>
          <table:table-cell office:value-type="string" table:formula="of:=IF([.S169]=&quot;UNKNOWN&quot;;&quot;NO ACTION — linkage status is UNKNOWN / not asserted&quot;;IF([.S169]=&quot;CLEAR&quot;;&quot;NO CONTRADICTION — preserve evidence as entered&quot;;IF([.M169]=&quot;&quot;;&quot;REVIEW LINKAGE STATUS — identifiers are present while status is UNKNOWN&quot;;IF([.M169]=&quot;UNMATCHED&quot;;&quot;REMOVE LINKAGE IDENTIFIERS OR CORRECT LINKAGE STATUS&quot;;IF([.M169]=&quot;SINGLE_SALE_LINKED&quot;;&quot;REQUIRE LINKED SALE ID AND NO ALLOCATION GROUP ID&quot;;IF([.M169]=&quot;MULTI_SALE_PENDING_ALLOCATION&quot;;&quot;REMOVE LINKED SALE ID OR CORRECT LINKAGE STATUS&quot;;IF([.M169]=&quot;ALLOCATED&quot;;&quot;REQUIRE ALLOCATION GROUP ID AND NO LINKED SALE ID&quot;;&quot;REVIEW LINKAGE EVIDENCE — NO AUTHORITY CREATED&quot;)))))))">
            <text:p>NO ACTION — linkage status is UNKNOWN / not asserted</text:p>
          </table:table-cell>
          <table:table-cell office:value-type="string" table:formula="of:=IF([.S169]=&quot;CONTRADICTION&quot;;&quot;BLOCKED&quot;;IF([.S169]=&quot;UNKNOWN&quot;;&quot;UNKNOWN&quot;;IF([.S169]=&quot;CLEAR&quot;;IF(OR([.O169]=&quot;&quot;;[.P169]=&quot;&quot;);&quot;UNKNOWN&quot;;&quot;READY FOR REVIEW&quot;);&quot;BLOCKED&quot;)))">
            <text:p>UNKNOWN</text:p>
          </table:table-cell>
          <table:table-cell office:value-type="string" table:formula="of:=IF([.U169]=&quot;UNKNOWN&quot;;&quot;COMPLETE OR ASSERT REQUIRED EVIDENCE BEFORE REVIEW&quot;;IF([.U169]=&quot;BLOCKED&quot;;&quot;RESOLVE CONTRADICTION BEFORE REVIEW — NO AUTHORITY CREATED&quot;;IF([.U1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9]=&quot;READY FOR REVIEW&quot;;&quot;REVIEW ELIGIBLE — NO AUTHORITY&quot;;IF(OR([.U169]=&quot;UNKNOWN&quot;;[.U16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0]=&quot;&quot;;IF(AND([.L170]=&quot;&quot;;[.N170]=&quot;&quot;);&quot;UNKNOWN&quot;;&quot;CONTRADICTION&quot;);IF([.M170]=&quot;UNMATCHED&quot;;IF(AND([.L170]=&quot;&quot;;[.N170]=&quot;&quot;);&quot;CLEAR&quot;;&quot;CONTRADICTION&quot;);IF([.M170]=&quot;SINGLE_SALE_LINKED&quot;;IF(AND([.L170]&lt;&gt;&quot;&quot;;[.N170]=&quot;&quot;);&quot;CLEAR&quot;;&quot;CONTRADICTION&quot;);IF([.M170]=&quot;MULTI_SALE_PENDING_ALLOCATION&quot;;IF([.L170]=&quot;&quot;;&quot;CLEAR&quot;;&quot;CONTRADICTION&quot;);IF([.M170]=&quot;ALLOCATED&quot;;IF(AND([.L170]=&quot;&quot;;[.N170]&lt;&gt;&quot;&quot;);&quot;CLEAR&quot;;&quot;CONTRADICTION&quot;);&quot;CONTRADICTION&quot;)))))">
            <text:p>UNKNOWN</text:p>
          </table:table-cell>
          <table:table-cell office:value-type="string" table:formula="of:=IF([.S170]=&quot;UNKNOWN&quot;;&quot;NO ACTION — linkage status is UNKNOWN / not asserted&quot;;IF([.S170]=&quot;CLEAR&quot;;&quot;NO CONTRADICTION — preserve evidence as entered&quot;;IF([.M170]=&quot;&quot;;&quot;REVIEW LINKAGE STATUS — identifiers are present while status is UNKNOWN&quot;;IF([.M170]=&quot;UNMATCHED&quot;;&quot;REMOVE LINKAGE IDENTIFIERS OR CORRECT LINKAGE STATUS&quot;;IF([.M170]=&quot;SINGLE_SALE_LINKED&quot;;&quot;REQUIRE LINKED SALE ID AND NO ALLOCATION GROUP ID&quot;;IF([.M170]=&quot;MULTI_SALE_PENDING_ALLOCATION&quot;;&quot;REMOVE LINKED SALE ID OR CORRECT LINKAGE STATUS&quot;;IF([.M170]=&quot;ALLOCATED&quot;;&quot;REQUIRE ALLOCATION GROUP ID AND NO LINKED SALE ID&quot;;&quot;REVIEW LINKAGE EVIDENCE — NO AUTHORITY CREATED&quot;)))))))">
            <text:p>NO ACTION — linkage status is UNKNOWN / not asserted</text:p>
          </table:table-cell>
          <table:table-cell office:value-type="string" table:formula="of:=IF([.S170]=&quot;CONTRADICTION&quot;;&quot;BLOCKED&quot;;IF([.S170]=&quot;UNKNOWN&quot;;&quot;UNKNOWN&quot;;IF([.S170]=&quot;CLEAR&quot;;IF(OR([.O170]=&quot;&quot;;[.P170]=&quot;&quot;);&quot;UNKNOWN&quot;;&quot;READY FOR REVIEW&quot;);&quot;BLOCKED&quot;)))">
            <text:p>UNKNOWN</text:p>
          </table:table-cell>
          <table:table-cell office:value-type="string" table:formula="of:=IF([.U170]=&quot;UNKNOWN&quot;;&quot;COMPLETE OR ASSERT REQUIRED EVIDENCE BEFORE REVIEW&quot;;IF([.U170]=&quot;BLOCKED&quot;;&quot;RESOLVE CONTRADICTION BEFORE REVIEW — NO AUTHORITY CREATED&quot;;IF([.U1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0]=&quot;READY FOR REVIEW&quot;;&quot;REVIEW ELIGIBLE — NO AUTHORITY&quot;;IF(OR([.U170]=&quot;UNKNOWN&quot;;[.U17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1]=&quot;&quot;;IF(AND([.L171]=&quot;&quot;;[.N171]=&quot;&quot;);&quot;UNKNOWN&quot;;&quot;CONTRADICTION&quot;);IF([.M171]=&quot;UNMATCHED&quot;;IF(AND([.L171]=&quot;&quot;;[.N171]=&quot;&quot;);&quot;CLEAR&quot;;&quot;CONTRADICTION&quot;);IF([.M171]=&quot;SINGLE_SALE_LINKED&quot;;IF(AND([.L171]&lt;&gt;&quot;&quot;;[.N171]=&quot;&quot;);&quot;CLEAR&quot;;&quot;CONTRADICTION&quot;);IF([.M171]=&quot;MULTI_SALE_PENDING_ALLOCATION&quot;;IF([.L171]=&quot;&quot;;&quot;CLEAR&quot;;&quot;CONTRADICTION&quot;);IF([.M171]=&quot;ALLOCATED&quot;;IF(AND([.L171]=&quot;&quot;;[.N171]&lt;&gt;&quot;&quot;);&quot;CLEAR&quot;;&quot;CONTRADICTION&quot;);&quot;CONTRADICTION&quot;)))))">
            <text:p>UNKNOWN</text:p>
          </table:table-cell>
          <table:table-cell office:value-type="string" table:formula="of:=IF([.S171]=&quot;UNKNOWN&quot;;&quot;NO ACTION — linkage status is UNKNOWN / not asserted&quot;;IF([.S171]=&quot;CLEAR&quot;;&quot;NO CONTRADICTION — preserve evidence as entered&quot;;IF([.M171]=&quot;&quot;;&quot;REVIEW LINKAGE STATUS — identifiers are present while status is UNKNOWN&quot;;IF([.M171]=&quot;UNMATCHED&quot;;&quot;REMOVE LINKAGE IDENTIFIERS OR CORRECT LINKAGE STATUS&quot;;IF([.M171]=&quot;SINGLE_SALE_LINKED&quot;;&quot;REQUIRE LINKED SALE ID AND NO ALLOCATION GROUP ID&quot;;IF([.M171]=&quot;MULTI_SALE_PENDING_ALLOCATION&quot;;&quot;REMOVE LINKED SALE ID OR CORRECT LINKAGE STATUS&quot;;IF([.M171]=&quot;ALLOCATED&quot;;&quot;REQUIRE ALLOCATION GROUP ID AND NO LINKED SALE ID&quot;;&quot;REVIEW LINKAGE EVIDENCE — NO AUTHORITY CREATED&quot;)))))))">
            <text:p>NO ACTION — linkage status is UNKNOWN / not asserted</text:p>
          </table:table-cell>
          <table:table-cell office:value-type="string" table:formula="of:=IF([.S171]=&quot;CONTRADICTION&quot;;&quot;BLOCKED&quot;;IF([.S171]=&quot;UNKNOWN&quot;;&quot;UNKNOWN&quot;;IF([.S171]=&quot;CLEAR&quot;;IF(OR([.O171]=&quot;&quot;;[.P171]=&quot;&quot;);&quot;UNKNOWN&quot;;&quot;READY FOR REVIEW&quot;);&quot;BLOCKED&quot;)))">
            <text:p>UNKNOWN</text:p>
          </table:table-cell>
          <table:table-cell office:value-type="string" table:formula="of:=IF([.U171]=&quot;UNKNOWN&quot;;&quot;COMPLETE OR ASSERT REQUIRED EVIDENCE BEFORE REVIEW&quot;;IF([.U171]=&quot;BLOCKED&quot;;&quot;RESOLVE CONTRADICTION BEFORE REVIEW — NO AUTHORITY CREATED&quot;;IF([.U1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1]=&quot;READY FOR REVIEW&quot;;&quot;REVIEW ELIGIBLE — NO AUTHORITY&quot;;IF(OR([.U171]=&quot;UNKNOWN&quot;;[.U17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2]=&quot;&quot;;IF(AND([.L172]=&quot;&quot;;[.N172]=&quot;&quot;);&quot;UNKNOWN&quot;;&quot;CONTRADICTION&quot;);IF([.M172]=&quot;UNMATCHED&quot;;IF(AND([.L172]=&quot;&quot;;[.N172]=&quot;&quot;);&quot;CLEAR&quot;;&quot;CONTRADICTION&quot;);IF([.M172]=&quot;SINGLE_SALE_LINKED&quot;;IF(AND([.L172]&lt;&gt;&quot;&quot;;[.N172]=&quot;&quot;);&quot;CLEAR&quot;;&quot;CONTRADICTION&quot;);IF([.M172]=&quot;MULTI_SALE_PENDING_ALLOCATION&quot;;IF([.L172]=&quot;&quot;;&quot;CLEAR&quot;;&quot;CONTRADICTION&quot;);IF([.M172]=&quot;ALLOCATED&quot;;IF(AND([.L172]=&quot;&quot;;[.N172]&lt;&gt;&quot;&quot;);&quot;CLEAR&quot;;&quot;CONTRADICTION&quot;);&quot;CONTRADICTION&quot;)))))">
            <text:p>UNKNOWN</text:p>
          </table:table-cell>
          <table:table-cell office:value-type="string" table:formula="of:=IF([.S172]=&quot;UNKNOWN&quot;;&quot;NO ACTION — linkage status is UNKNOWN / not asserted&quot;;IF([.S172]=&quot;CLEAR&quot;;&quot;NO CONTRADICTION — preserve evidence as entered&quot;;IF([.M172]=&quot;&quot;;&quot;REVIEW LINKAGE STATUS — identifiers are present while status is UNKNOWN&quot;;IF([.M172]=&quot;UNMATCHED&quot;;&quot;REMOVE LINKAGE IDENTIFIERS OR CORRECT LINKAGE STATUS&quot;;IF([.M172]=&quot;SINGLE_SALE_LINKED&quot;;&quot;REQUIRE LINKED SALE ID AND NO ALLOCATION GROUP ID&quot;;IF([.M172]=&quot;MULTI_SALE_PENDING_ALLOCATION&quot;;&quot;REMOVE LINKED SALE ID OR CORRECT LINKAGE STATUS&quot;;IF([.M172]=&quot;ALLOCATED&quot;;&quot;REQUIRE ALLOCATION GROUP ID AND NO LINKED SALE ID&quot;;&quot;REVIEW LINKAGE EVIDENCE — NO AUTHORITY CREATED&quot;)))))))">
            <text:p>NO ACTION — linkage status is UNKNOWN / not asserted</text:p>
          </table:table-cell>
          <table:table-cell office:value-type="string" table:formula="of:=IF([.S172]=&quot;CONTRADICTION&quot;;&quot;BLOCKED&quot;;IF([.S172]=&quot;UNKNOWN&quot;;&quot;UNKNOWN&quot;;IF([.S172]=&quot;CLEAR&quot;;IF(OR([.O172]=&quot;&quot;;[.P172]=&quot;&quot;);&quot;UNKNOWN&quot;;&quot;READY FOR REVIEW&quot;);&quot;BLOCKED&quot;)))">
            <text:p>UNKNOWN</text:p>
          </table:table-cell>
          <table:table-cell office:value-type="string" table:formula="of:=IF([.U172]=&quot;UNKNOWN&quot;;&quot;COMPLETE OR ASSERT REQUIRED EVIDENCE BEFORE REVIEW&quot;;IF([.U172]=&quot;BLOCKED&quot;;&quot;RESOLVE CONTRADICTION BEFORE REVIEW — NO AUTHORITY CREATED&quot;;IF([.U1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2]=&quot;READY FOR REVIEW&quot;;&quot;REVIEW ELIGIBLE — NO AUTHORITY&quot;;IF(OR([.U172]=&quot;UNKNOWN&quot;;[.U17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3]=&quot;&quot;;IF(AND([.L173]=&quot;&quot;;[.N173]=&quot;&quot;);&quot;UNKNOWN&quot;;&quot;CONTRADICTION&quot;);IF([.M173]=&quot;UNMATCHED&quot;;IF(AND([.L173]=&quot;&quot;;[.N173]=&quot;&quot;);&quot;CLEAR&quot;;&quot;CONTRADICTION&quot;);IF([.M173]=&quot;SINGLE_SALE_LINKED&quot;;IF(AND([.L173]&lt;&gt;&quot;&quot;;[.N173]=&quot;&quot;);&quot;CLEAR&quot;;&quot;CONTRADICTION&quot;);IF([.M173]=&quot;MULTI_SALE_PENDING_ALLOCATION&quot;;IF([.L173]=&quot;&quot;;&quot;CLEAR&quot;;&quot;CONTRADICTION&quot;);IF([.M173]=&quot;ALLOCATED&quot;;IF(AND([.L173]=&quot;&quot;;[.N173]&lt;&gt;&quot;&quot;);&quot;CLEAR&quot;;&quot;CONTRADICTION&quot;);&quot;CONTRADICTION&quot;)))))">
            <text:p>UNKNOWN</text:p>
          </table:table-cell>
          <table:table-cell office:value-type="string" table:formula="of:=IF([.S173]=&quot;UNKNOWN&quot;;&quot;NO ACTION — linkage status is UNKNOWN / not asserted&quot;;IF([.S173]=&quot;CLEAR&quot;;&quot;NO CONTRADICTION — preserve evidence as entered&quot;;IF([.M173]=&quot;&quot;;&quot;REVIEW LINKAGE STATUS — identifiers are present while status is UNKNOWN&quot;;IF([.M173]=&quot;UNMATCHED&quot;;&quot;REMOVE LINKAGE IDENTIFIERS OR CORRECT LINKAGE STATUS&quot;;IF([.M173]=&quot;SINGLE_SALE_LINKED&quot;;&quot;REQUIRE LINKED SALE ID AND NO ALLOCATION GROUP ID&quot;;IF([.M173]=&quot;MULTI_SALE_PENDING_ALLOCATION&quot;;&quot;REMOVE LINKED SALE ID OR CORRECT LINKAGE STATUS&quot;;IF([.M173]=&quot;ALLOCATED&quot;;&quot;REQUIRE ALLOCATION GROUP ID AND NO LINKED SALE ID&quot;;&quot;REVIEW LINKAGE EVIDENCE — NO AUTHORITY CREATED&quot;)))))))">
            <text:p>NO ACTION — linkage status is UNKNOWN / not asserted</text:p>
          </table:table-cell>
          <table:table-cell office:value-type="string" table:formula="of:=IF([.S173]=&quot;CONTRADICTION&quot;;&quot;BLOCKED&quot;;IF([.S173]=&quot;UNKNOWN&quot;;&quot;UNKNOWN&quot;;IF([.S173]=&quot;CLEAR&quot;;IF(OR([.O173]=&quot;&quot;;[.P173]=&quot;&quot;);&quot;UNKNOWN&quot;;&quot;READY FOR REVIEW&quot;);&quot;BLOCKED&quot;)))">
            <text:p>UNKNOWN</text:p>
          </table:table-cell>
          <table:table-cell office:value-type="string" table:formula="of:=IF([.U173]=&quot;UNKNOWN&quot;;&quot;COMPLETE OR ASSERT REQUIRED EVIDENCE BEFORE REVIEW&quot;;IF([.U173]=&quot;BLOCKED&quot;;&quot;RESOLVE CONTRADICTION BEFORE REVIEW — NO AUTHORITY CREATED&quot;;IF([.U1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3]=&quot;READY FOR REVIEW&quot;;&quot;REVIEW ELIGIBLE — NO AUTHORITY&quot;;IF(OR([.U173]=&quot;UNKNOWN&quot;;[.U17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4]=&quot;&quot;;IF(AND([.L174]=&quot;&quot;;[.N174]=&quot;&quot;);&quot;UNKNOWN&quot;;&quot;CONTRADICTION&quot;);IF([.M174]=&quot;UNMATCHED&quot;;IF(AND([.L174]=&quot;&quot;;[.N174]=&quot;&quot;);&quot;CLEAR&quot;;&quot;CONTRADICTION&quot;);IF([.M174]=&quot;SINGLE_SALE_LINKED&quot;;IF(AND([.L174]&lt;&gt;&quot;&quot;;[.N174]=&quot;&quot;);&quot;CLEAR&quot;;&quot;CONTRADICTION&quot;);IF([.M174]=&quot;MULTI_SALE_PENDING_ALLOCATION&quot;;IF([.L174]=&quot;&quot;;&quot;CLEAR&quot;;&quot;CONTRADICTION&quot;);IF([.M174]=&quot;ALLOCATED&quot;;IF(AND([.L174]=&quot;&quot;;[.N174]&lt;&gt;&quot;&quot;);&quot;CLEAR&quot;;&quot;CONTRADICTION&quot;);&quot;CONTRADICTION&quot;)))))">
            <text:p>UNKNOWN</text:p>
          </table:table-cell>
          <table:table-cell office:value-type="string" table:formula="of:=IF([.S174]=&quot;UNKNOWN&quot;;&quot;NO ACTION — linkage status is UNKNOWN / not asserted&quot;;IF([.S174]=&quot;CLEAR&quot;;&quot;NO CONTRADICTION — preserve evidence as entered&quot;;IF([.M174]=&quot;&quot;;&quot;REVIEW LINKAGE STATUS — identifiers are present while status is UNKNOWN&quot;;IF([.M174]=&quot;UNMATCHED&quot;;&quot;REMOVE LINKAGE IDENTIFIERS OR CORRECT LINKAGE STATUS&quot;;IF([.M174]=&quot;SINGLE_SALE_LINKED&quot;;&quot;REQUIRE LINKED SALE ID AND NO ALLOCATION GROUP ID&quot;;IF([.M174]=&quot;MULTI_SALE_PENDING_ALLOCATION&quot;;&quot;REMOVE LINKED SALE ID OR CORRECT LINKAGE STATUS&quot;;IF([.M174]=&quot;ALLOCATED&quot;;&quot;REQUIRE ALLOCATION GROUP ID AND NO LINKED SALE ID&quot;;&quot;REVIEW LINKAGE EVIDENCE — NO AUTHORITY CREATED&quot;)))))))">
            <text:p>NO ACTION — linkage status is UNKNOWN / not asserted</text:p>
          </table:table-cell>
          <table:table-cell office:value-type="string" table:formula="of:=IF([.S174]=&quot;CONTRADICTION&quot;;&quot;BLOCKED&quot;;IF([.S174]=&quot;UNKNOWN&quot;;&quot;UNKNOWN&quot;;IF([.S174]=&quot;CLEAR&quot;;IF(OR([.O174]=&quot;&quot;;[.P174]=&quot;&quot;);&quot;UNKNOWN&quot;;&quot;READY FOR REVIEW&quot;);&quot;BLOCKED&quot;)))">
            <text:p>UNKNOWN</text:p>
          </table:table-cell>
          <table:table-cell office:value-type="string" table:formula="of:=IF([.U174]=&quot;UNKNOWN&quot;;&quot;COMPLETE OR ASSERT REQUIRED EVIDENCE BEFORE REVIEW&quot;;IF([.U174]=&quot;BLOCKED&quot;;&quot;RESOLVE CONTRADICTION BEFORE REVIEW — NO AUTHORITY CREATED&quot;;IF([.U1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4]=&quot;READY FOR REVIEW&quot;;&quot;REVIEW ELIGIBLE — NO AUTHORITY&quot;;IF(OR([.U174]=&quot;UNKNOWN&quot;;[.U17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5]=&quot;&quot;;IF(AND([.L175]=&quot;&quot;;[.N175]=&quot;&quot;);&quot;UNKNOWN&quot;;&quot;CONTRADICTION&quot;);IF([.M175]=&quot;UNMATCHED&quot;;IF(AND([.L175]=&quot;&quot;;[.N175]=&quot;&quot;);&quot;CLEAR&quot;;&quot;CONTRADICTION&quot;);IF([.M175]=&quot;SINGLE_SALE_LINKED&quot;;IF(AND([.L175]&lt;&gt;&quot;&quot;;[.N175]=&quot;&quot;);&quot;CLEAR&quot;;&quot;CONTRADICTION&quot;);IF([.M175]=&quot;MULTI_SALE_PENDING_ALLOCATION&quot;;IF([.L175]=&quot;&quot;;&quot;CLEAR&quot;;&quot;CONTRADICTION&quot;);IF([.M175]=&quot;ALLOCATED&quot;;IF(AND([.L175]=&quot;&quot;;[.N175]&lt;&gt;&quot;&quot;);&quot;CLEAR&quot;;&quot;CONTRADICTION&quot;);&quot;CONTRADICTION&quot;)))))">
            <text:p>UNKNOWN</text:p>
          </table:table-cell>
          <table:table-cell office:value-type="string" table:formula="of:=IF([.S175]=&quot;UNKNOWN&quot;;&quot;NO ACTION — linkage status is UNKNOWN / not asserted&quot;;IF([.S175]=&quot;CLEAR&quot;;&quot;NO CONTRADICTION — preserve evidence as entered&quot;;IF([.M175]=&quot;&quot;;&quot;REVIEW LINKAGE STATUS — identifiers are present while status is UNKNOWN&quot;;IF([.M175]=&quot;UNMATCHED&quot;;&quot;REMOVE LINKAGE IDENTIFIERS OR CORRECT LINKAGE STATUS&quot;;IF([.M175]=&quot;SINGLE_SALE_LINKED&quot;;&quot;REQUIRE LINKED SALE ID AND NO ALLOCATION GROUP ID&quot;;IF([.M175]=&quot;MULTI_SALE_PENDING_ALLOCATION&quot;;&quot;REMOVE LINKED SALE ID OR CORRECT LINKAGE STATUS&quot;;IF([.M175]=&quot;ALLOCATED&quot;;&quot;REQUIRE ALLOCATION GROUP ID AND NO LINKED SALE ID&quot;;&quot;REVIEW LINKAGE EVIDENCE — NO AUTHORITY CREATED&quot;)))))))">
            <text:p>NO ACTION — linkage status is UNKNOWN / not asserted</text:p>
          </table:table-cell>
          <table:table-cell office:value-type="string" table:formula="of:=IF([.S175]=&quot;CONTRADICTION&quot;;&quot;BLOCKED&quot;;IF([.S175]=&quot;UNKNOWN&quot;;&quot;UNKNOWN&quot;;IF([.S175]=&quot;CLEAR&quot;;IF(OR([.O175]=&quot;&quot;;[.P175]=&quot;&quot;);&quot;UNKNOWN&quot;;&quot;READY FOR REVIEW&quot;);&quot;BLOCKED&quot;)))">
            <text:p>UNKNOWN</text:p>
          </table:table-cell>
          <table:table-cell office:value-type="string" table:formula="of:=IF([.U175]=&quot;UNKNOWN&quot;;&quot;COMPLETE OR ASSERT REQUIRED EVIDENCE BEFORE REVIEW&quot;;IF([.U175]=&quot;BLOCKED&quot;;&quot;RESOLVE CONTRADICTION BEFORE REVIEW — NO AUTHORITY CREATED&quot;;IF([.U1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5]=&quot;READY FOR REVIEW&quot;;&quot;REVIEW ELIGIBLE — NO AUTHORITY&quot;;IF(OR([.U175]=&quot;UNKNOWN&quot;;[.U17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6]=&quot;&quot;;IF(AND([.L176]=&quot;&quot;;[.N176]=&quot;&quot;);&quot;UNKNOWN&quot;;&quot;CONTRADICTION&quot;);IF([.M176]=&quot;UNMATCHED&quot;;IF(AND([.L176]=&quot;&quot;;[.N176]=&quot;&quot;);&quot;CLEAR&quot;;&quot;CONTRADICTION&quot;);IF([.M176]=&quot;SINGLE_SALE_LINKED&quot;;IF(AND([.L176]&lt;&gt;&quot;&quot;;[.N176]=&quot;&quot;);&quot;CLEAR&quot;;&quot;CONTRADICTION&quot;);IF([.M176]=&quot;MULTI_SALE_PENDING_ALLOCATION&quot;;IF([.L176]=&quot;&quot;;&quot;CLEAR&quot;;&quot;CONTRADICTION&quot;);IF([.M176]=&quot;ALLOCATED&quot;;IF(AND([.L176]=&quot;&quot;;[.N176]&lt;&gt;&quot;&quot;);&quot;CLEAR&quot;;&quot;CONTRADICTION&quot;);&quot;CONTRADICTION&quot;)))))">
            <text:p>UNKNOWN</text:p>
          </table:table-cell>
          <table:table-cell office:value-type="string" table:formula="of:=IF([.S176]=&quot;UNKNOWN&quot;;&quot;NO ACTION — linkage status is UNKNOWN / not asserted&quot;;IF([.S176]=&quot;CLEAR&quot;;&quot;NO CONTRADICTION — preserve evidence as entered&quot;;IF([.M176]=&quot;&quot;;&quot;REVIEW LINKAGE STATUS — identifiers are present while status is UNKNOWN&quot;;IF([.M176]=&quot;UNMATCHED&quot;;&quot;REMOVE LINKAGE IDENTIFIERS OR CORRECT LINKAGE STATUS&quot;;IF([.M176]=&quot;SINGLE_SALE_LINKED&quot;;&quot;REQUIRE LINKED SALE ID AND NO ALLOCATION GROUP ID&quot;;IF([.M176]=&quot;MULTI_SALE_PENDING_ALLOCATION&quot;;&quot;REMOVE LINKED SALE ID OR CORRECT LINKAGE STATUS&quot;;IF([.M176]=&quot;ALLOCATED&quot;;&quot;REQUIRE ALLOCATION GROUP ID AND NO LINKED SALE ID&quot;;&quot;REVIEW LINKAGE EVIDENCE — NO AUTHORITY CREATED&quot;)))))))">
            <text:p>NO ACTION — linkage status is UNKNOWN / not asserted</text:p>
          </table:table-cell>
          <table:table-cell office:value-type="string" table:formula="of:=IF([.S176]=&quot;CONTRADICTION&quot;;&quot;BLOCKED&quot;;IF([.S176]=&quot;UNKNOWN&quot;;&quot;UNKNOWN&quot;;IF([.S176]=&quot;CLEAR&quot;;IF(OR([.O176]=&quot;&quot;;[.P176]=&quot;&quot;);&quot;UNKNOWN&quot;;&quot;READY FOR REVIEW&quot;);&quot;BLOCKED&quot;)))">
            <text:p>UNKNOWN</text:p>
          </table:table-cell>
          <table:table-cell office:value-type="string" table:formula="of:=IF([.U176]=&quot;UNKNOWN&quot;;&quot;COMPLETE OR ASSERT REQUIRED EVIDENCE BEFORE REVIEW&quot;;IF([.U176]=&quot;BLOCKED&quot;;&quot;RESOLVE CONTRADICTION BEFORE REVIEW — NO AUTHORITY CREATED&quot;;IF([.U1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6]=&quot;READY FOR REVIEW&quot;;&quot;REVIEW ELIGIBLE — NO AUTHORITY&quot;;IF(OR([.U176]=&quot;UNKNOWN&quot;;[.U17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7]=&quot;&quot;;IF(AND([.L177]=&quot;&quot;;[.N177]=&quot;&quot;);&quot;UNKNOWN&quot;;&quot;CONTRADICTION&quot;);IF([.M177]=&quot;UNMATCHED&quot;;IF(AND([.L177]=&quot;&quot;;[.N177]=&quot;&quot;);&quot;CLEAR&quot;;&quot;CONTRADICTION&quot;);IF([.M177]=&quot;SINGLE_SALE_LINKED&quot;;IF(AND([.L177]&lt;&gt;&quot;&quot;;[.N177]=&quot;&quot;);&quot;CLEAR&quot;;&quot;CONTRADICTION&quot;);IF([.M177]=&quot;MULTI_SALE_PENDING_ALLOCATION&quot;;IF([.L177]=&quot;&quot;;&quot;CLEAR&quot;;&quot;CONTRADICTION&quot;);IF([.M177]=&quot;ALLOCATED&quot;;IF(AND([.L177]=&quot;&quot;;[.N177]&lt;&gt;&quot;&quot;);&quot;CLEAR&quot;;&quot;CONTRADICTION&quot;);&quot;CONTRADICTION&quot;)))))">
            <text:p>UNKNOWN</text:p>
          </table:table-cell>
          <table:table-cell office:value-type="string" table:formula="of:=IF([.S177]=&quot;UNKNOWN&quot;;&quot;NO ACTION — linkage status is UNKNOWN / not asserted&quot;;IF([.S177]=&quot;CLEAR&quot;;&quot;NO CONTRADICTION — preserve evidence as entered&quot;;IF([.M177]=&quot;&quot;;&quot;REVIEW LINKAGE STATUS — identifiers are present while status is UNKNOWN&quot;;IF([.M177]=&quot;UNMATCHED&quot;;&quot;REMOVE LINKAGE IDENTIFIERS OR CORRECT LINKAGE STATUS&quot;;IF([.M177]=&quot;SINGLE_SALE_LINKED&quot;;&quot;REQUIRE LINKED SALE ID AND NO ALLOCATION GROUP ID&quot;;IF([.M177]=&quot;MULTI_SALE_PENDING_ALLOCATION&quot;;&quot;REMOVE LINKED SALE ID OR CORRECT LINKAGE STATUS&quot;;IF([.M177]=&quot;ALLOCATED&quot;;&quot;REQUIRE ALLOCATION GROUP ID AND NO LINKED SALE ID&quot;;&quot;REVIEW LINKAGE EVIDENCE — NO AUTHORITY CREATED&quot;)))))))">
            <text:p>NO ACTION — linkage status is UNKNOWN / not asserted</text:p>
          </table:table-cell>
          <table:table-cell office:value-type="string" table:formula="of:=IF([.S177]=&quot;CONTRADICTION&quot;;&quot;BLOCKED&quot;;IF([.S177]=&quot;UNKNOWN&quot;;&quot;UNKNOWN&quot;;IF([.S177]=&quot;CLEAR&quot;;IF(OR([.O177]=&quot;&quot;;[.P177]=&quot;&quot;);&quot;UNKNOWN&quot;;&quot;READY FOR REVIEW&quot;);&quot;BLOCKED&quot;)))">
            <text:p>UNKNOWN</text:p>
          </table:table-cell>
          <table:table-cell office:value-type="string" table:formula="of:=IF([.U177]=&quot;UNKNOWN&quot;;&quot;COMPLETE OR ASSERT REQUIRED EVIDENCE BEFORE REVIEW&quot;;IF([.U177]=&quot;BLOCKED&quot;;&quot;RESOLVE CONTRADICTION BEFORE REVIEW — NO AUTHORITY CREATED&quot;;IF([.U1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7]=&quot;READY FOR REVIEW&quot;;&quot;REVIEW ELIGIBLE — NO AUTHORITY&quot;;IF(OR([.U177]=&quot;UNKNOWN&quot;;[.U17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8]=&quot;&quot;;IF(AND([.L178]=&quot;&quot;;[.N178]=&quot;&quot;);&quot;UNKNOWN&quot;;&quot;CONTRADICTION&quot;);IF([.M178]=&quot;UNMATCHED&quot;;IF(AND([.L178]=&quot;&quot;;[.N178]=&quot;&quot;);&quot;CLEAR&quot;;&quot;CONTRADICTION&quot;);IF([.M178]=&quot;SINGLE_SALE_LINKED&quot;;IF(AND([.L178]&lt;&gt;&quot;&quot;;[.N178]=&quot;&quot;);&quot;CLEAR&quot;;&quot;CONTRADICTION&quot;);IF([.M178]=&quot;MULTI_SALE_PENDING_ALLOCATION&quot;;IF([.L178]=&quot;&quot;;&quot;CLEAR&quot;;&quot;CONTRADICTION&quot;);IF([.M178]=&quot;ALLOCATED&quot;;IF(AND([.L178]=&quot;&quot;;[.N178]&lt;&gt;&quot;&quot;);&quot;CLEAR&quot;;&quot;CONTRADICTION&quot;);&quot;CONTRADICTION&quot;)))))">
            <text:p>UNKNOWN</text:p>
          </table:table-cell>
          <table:table-cell office:value-type="string" table:formula="of:=IF([.S178]=&quot;UNKNOWN&quot;;&quot;NO ACTION — linkage status is UNKNOWN / not asserted&quot;;IF([.S178]=&quot;CLEAR&quot;;&quot;NO CONTRADICTION — preserve evidence as entered&quot;;IF([.M178]=&quot;&quot;;&quot;REVIEW LINKAGE STATUS — identifiers are present while status is UNKNOWN&quot;;IF([.M178]=&quot;UNMATCHED&quot;;&quot;REMOVE LINKAGE IDENTIFIERS OR CORRECT LINKAGE STATUS&quot;;IF([.M178]=&quot;SINGLE_SALE_LINKED&quot;;&quot;REQUIRE LINKED SALE ID AND NO ALLOCATION GROUP ID&quot;;IF([.M178]=&quot;MULTI_SALE_PENDING_ALLOCATION&quot;;&quot;REMOVE LINKED SALE ID OR CORRECT LINKAGE STATUS&quot;;IF([.M178]=&quot;ALLOCATED&quot;;&quot;REQUIRE ALLOCATION GROUP ID AND NO LINKED SALE ID&quot;;&quot;REVIEW LINKAGE EVIDENCE — NO AUTHORITY CREATED&quot;)))))))">
            <text:p>NO ACTION — linkage status is UNKNOWN / not asserted</text:p>
          </table:table-cell>
          <table:table-cell office:value-type="string" table:formula="of:=IF([.S178]=&quot;CONTRADICTION&quot;;&quot;BLOCKED&quot;;IF([.S178]=&quot;UNKNOWN&quot;;&quot;UNKNOWN&quot;;IF([.S178]=&quot;CLEAR&quot;;IF(OR([.O178]=&quot;&quot;;[.P178]=&quot;&quot;);&quot;UNKNOWN&quot;;&quot;READY FOR REVIEW&quot;);&quot;BLOCKED&quot;)))">
            <text:p>UNKNOWN</text:p>
          </table:table-cell>
          <table:table-cell office:value-type="string" table:formula="of:=IF([.U178]=&quot;UNKNOWN&quot;;&quot;COMPLETE OR ASSERT REQUIRED EVIDENCE BEFORE REVIEW&quot;;IF([.U178]=&quot;BLOCKED&quot;;&quot;RESOLVE CONTRADICTION BEFORE REVIEW — NO AUTHORITY CREATED&quot;;IF([.U1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8]=&quot;READY FOR REVIEW&quot;;&quot;REVIEW ELIGIBLE — NO AUTHORITY&quot;;IF(OR([.U178]=&quot;UNKNOWN&quot;;[.U17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9]=&quot;&quot;;IF(AND([.L179]=&quot;&quot;;[.N179]=&quot;&quot;);&quot;UNKNOWN&quot;;&quot;CONTRADICTION&quot;);IF([.M179]=&quot;UNMATCHED&quot;;IF(AND([.L179]=&quot;&quot;;[.N179]=&quot;&quot;);&quot;CLEAR&quot;;&quot;CONTRADICTION&quot;);IF([.M179]=&quot;SINGLE_SALE_LINKED&quot;;IF(AND([.L179]&lt;&gt;&quot;&quot;;[.N179]=&quot;&quot;);&quot;CLEAR&quot;;&quot;CONTRADICTION&quot;);IF([.M179]=&quot;MULTI_SALE_PENDING_ALLOCATION&quot;;IF([.L179]=&quot;&quot;;&quot;CLEAR&quot;;&quot;CONTRADICTION&quot;);IF([.M179]=&quot;ALLOCATED&quot;;IF(AND([.L179]=&quot;&quot;;[.N179]&lt;&gt;&quot;&quot;);&quot;CLEAR&quot;;&quot;CONTRADICTION&quot;);&quot;CONTRADICTION&quot;)))))">
            <text:p>UNKNOWN</text:p>
          </table:table-cell>
          <table:table-cell office:value-type="string" table:formula="of:=IF([.S179]=&quot;UNKNOWN&quot;;&quot;NO ACTION — linkage status is UNKNOWN / not asserted&quot;;IF([.S179]=&quot;CLEAR&quot;;&quot;NO CONTRADICTION — preserve evidence as entered&quot;;IF([.M179]=&quot;&quot;;&quot;REVIEW LINKAGE STATUS — identifiers are present while status is UNKNOWN&quot;;IF([.M179]=&quot;UNMATCHED&quot;;&quot;REMOVE LINKAGE IDENTIFIERS OR CORRECT LINKAGE STATUS&quot;;IF([.M179]=&quot;SINGLE_SALE_LINKED&quot;;&quot;REQUIRE LINKED SALE ID AND NO ALLOCATION GROUP ID&quot;;IF([.M179]=&quot;MULTI_SALE_PENDING_ALLOCATION&quot;;&quot;REMOVE LINKED SALE ID OR CORRECT LINKAGE STATUS&quot;;IF([.M179]=&quot;ALLOCATED&quot;;&quot;REQUIRE ALLOCATION GROUP ID AND NO LINKED SALE ID&quot;;&quot;REVIEW LINKAGE EVIDENCE — NO AUTHORITY CREATED&quot;)))))))">
            <text:p>NO ACTION — linkage status is UNKNOWN / not asserted</text:p>
          </table:table-cell>
          <table:table-cell office:value-type="string" table:formula="of:=IF([.S179]=&quot;CONTRADICTION&quot;;&quot;BLOCKED&quot;;IF([.S179]=&quot;UNKNOWN&quot;;&quot;UNKNOWN&quot;;IF([.S179]=&quot;CLEAR&quot;;IF(OR([.O179]=&quot;&quot;;[.P179]=&quot;&quot;);&quot;UNKNOWN&quot;;&quot;READY FOR REVIEW&quot;);&quot;BLOCKED&quot;)))">
            <text:p>UNKNOWN</text:p>
          </table:table-cell>
          <table:table-cell office:value-type="string" table:formula="of:=IF([.U179]=&quot;UNKNOWN&quot;;&quot;COMPLETE OR ASSERT REQUIRED EVIDENCE BEFORE REVIEW&quot;;IF([.U179]=&quot;BLOCKED&quot;;&quot;RESOLVE CONTRADICTION BEFORE REVIEW — NO AUTHORITY CREATED&quot;;IF([.U1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9]=&quot;READY FOR REVIEW&quot;;&quot;REVIEW ELIGIBLE — NO AUTHORITY&quot;;IF(OR([.U179]=&quot;UNKNOWN&quot;;[.U17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0]=&quot;&quot;;IF(AND([.L180]=&quot;&quot;;[.N180]=&quot;&quot;);&quot;UNKNOWN&quot;;&quot;CONTRADICTION&quot;);IF([.M180]=&quot;UNMATCHED&quot;;IF(AND([.L180]=&quot;&quot;;[.N180]=&quot;&quot;);&quot;CLEAR&quot;;&quot;CONTRADICTION&quot;);IF([.M180]=&quot;SINGLE_SALE_LINKED&quot;;IF(AND([.L180]&lt;&gt;&quot;&quot;;[.N180]=&quot;&quot;);&quot;CLEAR&quot;;&quot;CONTRADICTION&quot;);IF([.M180]=&quot;MULTI_SALE_PENDING_ALLOCATION&quot;;IF([.L180]=&quot;&quot;;&quot;CLEAR&quot;;&quot;CONTRADICTION&quot;);IF([.M180]=&quot;ALLOCATED&quot;;IF(AND([.L180]=&quot;&quot;;[.N180]&lt;&gt;&quot;&quot;);&quot;CLEAR&quot;;&quot;CONTRADICTION&quot;);&quot;CONTRADICTION&quot;)))))">
            <text:p>UNKNOWN</text:p>
          </table:table-cell>
          <table:table-cell office:value-type="string" table:formula="of:=IF([.S180]=&quot;UNKNOWN&quot;;&quot;NO ACTION — linkage status is UNKNOWN / not asserted&quot;;IF([.S180]=&quot;CLEAR&quot;;&quot;NO CONTRADICTION — preserve evidence as entered&quot;;IF([.M180]=&quot;&quot;;&quot;REVIEW LINKAGE STATUS — identifiers are present while status is UNKNOWN&quot;;IF([.M180]=&quot;UNMATCHED&quot;;&quot;REMOVE LINKAGE IDENTIFIERS OR CORRECT LINKAGE STATUS&quot;;IF([.M180]=&quot;SINGLE_SALE_LINKED&quot;;&quot;REQUIRE LINKED SALE ID AND NO ALLOCATION GROUP ID&quot;;IF([.M180]=&quot;MULTI_SALE_PENDING_ALLOCATION&quot;;&quot;REMOVE LINKED SALE ID OR CORRECT LINKAGE STATUS&quot;;IF([.M180]=&quot;ALLOCATED&quot;;&quot;REQUIRE ALLOCATION GROUP ID AND NO LINKED SALE ID&quot;;&quot;REVIEW LINKAGE EVIDENCE — NO AUTHORITY CREATED&quot;)))))))">
            <text:p>NO ACTION — linkage status is UNKNOWN / not asserted</text:p>
          </table:table-cell>
          <table:table-cell office:value-type="string" table:formula="of:=IF([.S180]=&quot;CONTRADICTION&quot;;&quot;BLOCKED&quot;;IF([.S180]=&quot;UNKNOWN&quot;;&quot;UNKNOWN&quot;;IF([.S180]=&quot;CLEAR&quot;;IF(OR([.O180]=&quot;&quot;;[.P180]=&quot;&quot;);&quot;UNKNOWN&quot;;&quot;READY FOR REVIEW&quot;);&quot;BLOCKED&quot;)))">
            <text:p>UNKNOWN</text:p>
          </table:table-cell>
          <table:table-cell office:value-type="string" table:formula="of:=IF([.U180]=&quot;UNKNOWN&quot;;&quot;COMPLETE OR ASSERT REQUIRED EVIDENCE BEFORE REVIEW&quot;;IF([.U180]=&quot;BLOCKED&quot;;&quot;RESOLVE CONTRADICTION BEFORE REVIEW — NO AUTHORITY CREATED&quot;;IF([.U1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0]=&quot;READY FOR REVIEW&quot;;&quot;REVIEW ELIGIBLE — NO AUTHORITY&quot;;IF(OR([.U180]=&quot;UNKNOWN&quot;;[.U18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1]=&quot;&quot;;IF(AND([.L181]=&quot;&quot;;[.N181]=&quot;&quot;);&quot;UNKNOWN&quot;;&quot;CONTRADICTION&quot;);IF([.M181]=&quot;UNMATCHED&quot;;IF(AND([.L181]=&quot;&quot;;[.N181]=&quot;&quot;);&quot;CLEAR&quot;;&quot;CONTRADICTION&quot;);IF([.M181]=&quot;SINGLE_SALE_LINKED&quot;;IF(AND([.L181]&lt;&gt;&quot;&quot;;[.N181]=&quot;&quot;);&quot;CLEAR&quot;;&quot;CONTRADICTION&quot;);IF([.M181]=&quot;MULTI_SALE_PENDING_ALLOCATION&quot;;IF([.L181]=&quot;&quot;;&quot;CLEAR&quot;;&quot;CONTRADICTION&quot;);IF([.M181]=&quot;ALLOCATED&quot;;IF(AND([.L181]=&quot;&quot;;[.N181]&lt;&gt;&quot;&quot;);&quot;CLEAR&quot;;&quot;CONTRADICTION&quot;);&quot;CONTRADICTION&quot;)))))">
            <text:p>UNKNOWN</text:p>
          </table:table-cell>
          <table:table-cell office:value-type="string" table:formula="of:=IF([.S181]=&quot;UNKNOWN&quot;;&quot;NO ACTION — linkage status is UNKNOWN / not asserted&quot;;IF([.S181]=&quot;CLEAR&quot;;&quot;NO CONTRADICTION — preserve evidence as entered&quot;;IF([.M181]=&quot;&quot;;&quot;REVIEW LINKAGE STATUS — identifiers are present while status is UNKNOWN&quot;;IF([.M181]=&quot;UNMATCHED&quot;;&quot;REMOVE LINKAGE IDENTIFIERS OR CORRECT LINKAGE STATUS&quot;;IF([.M181]=&quot;SINGLE_SALE_LINKED&quot;;&quot;REQUIRE LINKED SALE ID AND NO ALLOCATION GROUP ID&quot;;IF([.M181]=&quot;MULTI_SALE_PENDING_ALLOCATION&quot;;&quot;REMOVE LINKED SALE ID OR CORRECT LINKAGE STATUS&quot;;IF([.M181]=&quot;ALLOCATED&quot;;&quot;REQUIRE ALLOCATION GROUP ID AND NO LINKED SALE ID&quot;;&quot;REVIEW LINKAGE EVIDENCE — NO AUTHORITY CREATED&quot;)))))))">
            <text:p>NO ACTION — linkage status is UNKNOWN / not asserted</text:p>
          </table:table-cell>
          <table:table-cell office:value-type="string" table:formula="of:=IF([.S181]=&quot;CONTRADICTION&quot;;&quot;BLOCKED&quot;;IF([.S181]=&quot;UNKNOWN&quot;;&quot;UNKNOWN&quot;;IF([.S181]=&quot;CLEAR&quot;;IF(OR([.O181]=&quot;&quot;;[.P181]=&quot;&quot;);&quot;UNKNOWN&quot;;&quot;READY FOR REVIEW&quot;);&quot;BLOCKED&quot;)))">
            <text:p>UNKNOWN</text:p>
          </table:table-cell>
          <table:table-cell office:value-type="string" table:formula="of:=IF([.U181]=&quot;UNKNOWN&quot;;&quot;COMPLETE OR ASSERT REQUIRED EVIDENCE BEFORE REVIEW&quot;;IF([.U181]=&quot;BLOCKED&quot;;&quot;RESOLVE CONTRADICTION BEFORE REVIEW — NO AUTHORITY CREATED&quot;;IF([.U1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1]=&quot;READY FOR REVIEW&quot;;&quot;REVIEW ELIGIBLE — NO AUTHORITY&quot;;IF(OR([.U181]=&quot;UNKNOWN&quot;;[.U18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2]=&quot;&quot;;IF(AND([.L182]=&quot;&quot;;[.N182]=&quot;&quot;);&quot;UNKNOWN&quot;;&quot;CONTRADICTION&quot;);IF([.M182]=&quot;UNMATCHED&quot;;IF(AND([.L182]=&quot;&quot;;[.N182]=&quot;&quot;);&quot;CLEAR&quot;;&quot;CONTRADICTION&quot;);IF([.M182]=&quot;SINGLE_SALE_LINKED&quot;;IF(AND([.L182]&lt;&gt;&quot;&quot;;[.N182]=&quot;&quot;);&quot;CLEAR&quot;;&quot;CONTRADICTION&quot;);IF([.M182]=&quot;MULTI_SALE_PENDING_ALLOCATION&quot;;IF([.L182]=&quot;&quot;;&quot;CLEAR&quot;;&quot;CONTRADICTION&quot;);IF([.M182]=&quot;ALLOCATED&quot;;IF(AND([.L182]=&quot;&quot;;[.N182]&lt;&gt;&quot;&quot;);&quot;CLEAR&quot;;&quot;CONTRADICTION&quot;);&quot;CONTRADICTION&quot;)))))">
            <text:p>UNKNOWN</text:p>
          </table:table-cell>
          <table:table-cell office:value-type="string" table:formula="of:=IF([.S182]=&quot;UNKNOWN&quot;;&quot;NO ACTION — linkage status is UNKNOWN / not asserted&quot;;IF([.S182]=&quot;CLEAR&quot;;&quot;NO CONTRADICTION — preserve evidence as entered&quot;;IF([.M182]=&quot;&quot;;&quot;REVIEW LINKAGE STATUS — identifiers are present while status is UNKNOWN&quot;;IF([.M182]=&quot;UNMATCHED&quot;;&quot;REMOVE LINKAGE IDENTIFIERS OR CORRECT LINKAGE STATUS&quot;;IF([.M182]=&quot;SINGLE_SALE_LINKED&quot;;&quot;REQUIRE LINKED SALE ID AND NO ALLOCATION GROUP ID&quot;;IF([.M182]=&quot;MULTI_SALE_PENDING_ALLOCATION&quot;;&quot;REMOVE LINKED SALE ID OR CORRECT LINKAGE STATUS&quot;;IF([.M182]=&quot;ALLOCATED&quot;;&quot;REQUIRE ALLOCATION GROUP ID AND NO LINKED SALE ID&quot;;&quot;REVIEW LINKAGE EVIDENCE — NO AUTHORITY CREATED&quot;)))))))">
            <text:p>NO ACTION — linkage status is UNKNOWN / not asserted</text:p>
          </table:table-cell>
          <table:table-cell office:value-type="string" table:formula="of:=IF([.S182]=&quot;CONTRADICTION&quot;;&quot;BLOCKED&quot;;IF([.S182]=&quot;UNKNOWN&quot;;&quot;UNKNOWN&quot;;IF([.S182]=&quot;CLEAR&quot;;IF(OR([.O182]=&quot;&quot;;[.P182]=&quot;&quot;);&quot;UNKNOWN&quot;;&quot;READY FOR REVIEW&quot;);&quot;BLOCKED&quot;)))">
            <text:p>UNKNOWN</text:p>
          </table:table-cell>
          <table:table-cell office:value-type="string" table:formula="of:=IF([.U182]=&quot;UNKNOWN&quot;;&quot;COMPLETE OR ASSERT REQUIRED EVIDENCE BEFORE REVIEW&quot;;IF([.U182]=&quot;BLOCKED&quot;;&quot;RESOLVE CONTRADICTION BEFORE REVIEW — NO AUTHORITY CREATED&quot;;IF([.U1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2]=&quot;READY FOR REVIEW&quot;;&quot;REVIEW ELIGIBLE — NO AUTHORITY&quot;;IF(OR([.U182]=&quot;UNKNOWN&quot;;[.U18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3]=&quot;&quot;;IF(AND([.L183]=&quot;&quot;;[.N183]=&quot;&quot;);&quot;UNKNOWN&quot;;&quot;CONTRADICTION&quot;);IF([.M183]=&quot;UNMATCHED&quot;;IF(AND([.L183]=&quot;&quot;;[.N183]=&quot;&quot;);&quot;CLEAR&quot;;&quot;CONTRADICTION&quot;);IF([.M183]=&quot;SINGLE_SALE_LINKED&quot;;IF(AND([.L183]&lt;&gt;&quot;&quot;;[.N183]=&quot;&quot;);&quot;CLEAR&quot;;&quot;CONTRADICTION&quot;);IF([.M183]=&quot;MULTI_SALE_PENDING_ALLOCATION&quot;;IF([.L183]=&quot;&quot;;&quot;CLEAR&quot;;&quot;CONTRADICTION&quot;);IF([.M183]=&quot;ALLOCATED&quot;;IF(AND([.L183]=&quot;&quot;;[.N183]&lt;&gt;&quot;&quot;);&quot;CLEAR&quot;;&quot;CONTRADICTION&quot;);&quot;CONTRADICTION&quot;)))))">
            <text:p>UNKNOWN</text:p>
          </table:table-cell>
          <table:table-cell office:value-type="string" table:formula="of:=IF([.S183]=&quot;UNKNOWN&quot;;&quot;NO ACTION — linkage status is UNKNOWN / not asserted&quot;;IF([.S183]=&quot;CLEAR&quot;;&quot;NO CONTRADICTION — preserve evidence as entered&quot;;IF([.M183]=&quot;&quot;;&quot;REVIEW LINKAGE STATUS — identifiers are present while status is UNKNOWN&quot;;IF([.M183]=&quot;UNMATCHED&quot;;&quot;REMOVE LINKAGE IDENTIFIERS OR CORRECT LINKAGE STATUS&quot;;IF([.M183]=&quot;SINGLE_SALE_LINKED&quot;;&quot;REQUIRE LINKED SALE ID AND NO ALLOCATION GROUP ID&quot;;IF([.M183]=&quot;MULTI_SALE_PENDING_ALLOCATION&quot;;&quot;REMOVE LINKED SALE ID OR CORRECT LINKAGE STATUS&quot;;IF([.M183]=&quot;ALLOCATED&quot;;&quot;REQUIRE ALLOCATION GROUP ID AND NO LINKED SALE ID&quot;;&quot;REVIEW LINKAGE EVIDENCE — NO AUTHORITY CREATED&quot;)))))))">
            <text:p>NO ACTION — linkage status is UNKNOWN / not asserted</text:p>
          </table:table-cell>
          <table:table-cell office:value-type="string" table:formula="of:=IF([.S183]=&quot;CONTRADICTION&quot;;&quot;BLOCKED&quot;;IF([.S183]=&quot;UNKNOWN&quot;;&quot;UNKNOWN&quot;;IF([.S183]=&quot;CLEAR&quot;;IF(OR([.O183]=&quot;&quot;;[.P183]=&quot;&quot;);&quot;UNKNOWN&quot;;&quot;READY FOR REVIEW&quot;);&quot;BLOCKED&quot;)))">
            <text:p>UNKNOWN</text:p>
          </table:table-cell>
          <table:table-cell office:value-type="string" table:formula="of:=IF([.U183]=&quot;UNKNOWN&quot;;&quot;COMPLETE OR ASSERT REQUIRED EVIDENCE BEFORE REVIEW&quot;;IF([.U183]=&quot;BLOCKED&quot;;&quot;RESOLVE CONTRADICTION BEFORE REVIEW — NO AUTHORITY CREATED&quot;;IF([.U1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3]=&quot;READY FOR REVIEW&quot;;&quot;REVIEW ELIGIBLE — NO AUTHORITY&quot;;IF(OR([.U183]=&quot;UNKNOWN&quot;;[.U18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4]=&quot;&quot;;IF(AND([.L184]=&quot;&quot;;[.N184]=&quot;&quot;);&quot;UNKNOWN&quot;;&quot;CONTRADICTION&quot;);IF([.M184]=&quot;UNMATCHED&quot;;IF(AND([.L184]=&quot;&quot;;[.N184]=&quot;&quot;);&quot;CLEAR&quot;;&quot;CONTRADICTION&quot;);IF([.M184]=&quot;SINGLE_SALE_LINKED&quot;;IF(AND([.L184]&lt;&gt;&quot;&quot;;[.N184]=&quot;&quot;);&quot;CLEAR&quot;;&quot;CONTRADICTION&quot;);IF([.M184]=&quot;MULTI_SALE_PENDING_ALLOCATION&quot;;IF([.L184]=&quot;&quot;;&quot;CLEAR&quot;;&quot;CONTRADICTION&quot;);IF([.M184]=&quot;ALLOCATED&quot;;IF(AND([.L184]=&quot;&quot;;[.N184]&lt;&gt;&quot;&quot;);&quot;CLEAR&quot;;&quot;CONTRADICTION&quot;);&quot;CONTRADICTION&quot;)))))">
            <text:p>UNKNOWN</text:p>
          </table:table-cell>
          <table:table-cell office:value-type="string" table:formula="of:=IF([.S184]=&quot;UNKNOWN&quot;;&quot;NO ACTION — linkage status is UNKNOWN / not asserted&quot;;IF([.S184]=&quot;CLEAR&quot;;&quot;NO CONTRADICTION — preserve evidence as entered&quot;;IF([.M184]=&quot;&quot;;&quot;REVIEW LINKAGE STATUS — identifiers are present while status is UNKNOWN&quot;;IF([.M184]=&quot;UNMATCHED&quot;;&quot;REMOVE LINKAGE IDENTIFIERS OR CORRECT LINKAGE STATUS&quot;;IF([.M184]=&quot;SINGLE_SALE_LINKED&quot;;&quot;REQUIRE LINKED SALE ID AND NO ALLOCATION GROUP ID&quot;;IF([.M184]=&quot;MULTI_SALE_PENDING_ALLOCATION&quot;;&quot;REMOVE LINKED SALE ID OR CORRECT LINKAGE STATUS&quot;;IF([.M184]=&quot;ALLOCATED&quot;;&quot;REQUIRE ALLOCATION GROUP ID AND NO LINKED SALE ID&quot;;&quot;REVIEW LINKAGE EVIDENCE — NO AUTHORITY CREATED&quot;)))))))">
            <text:p>NO ACTION — linkage status is UNKNOWN / not asserted</text:p>
          </table:table-cell>
          <table:table-cell office:value-type="string" table:formula="of:=IF([.S184]=&quot;CONTRADICTION&quot;;&quot;BLOCKED&quot;;IF([.S184]=&quot;UNKNOWN&quot;;&quot;UNKNOWN&quot;;IF([.S184]=&quot;CLEAR&quot;;IF(OR([.O184]=&quot;&quot;;[.P184]=&quot;&quot;);&quot;UNKNOWN&quot;;&quot;READY FOR REVIEW&quot;);&quot;BLOCKED&quot;)))">
            <text:p>UNKNOWN</text:p>
          </table:table-cell>
          <table:table-cell office:value-type="string" table:formula="of:=IF([.U184]=&quot;UNKNOWN&quot;;&quot;COMPLETE OR ASSERT REQUIRED EVIDENCE BEFORE REVIEW&quot;;IF([.U184]=&quot;BLOCKED&quot;;&quot;RESOLVE CONTRADICTION BEFORE REVIEW — NO AUTHORITY CREATED&quot;;IF([.U1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4]=&quot;READY FOR REVIEW&quot;;&quot;REVIEW ELIGIBLE — NO AUTHORITY&quot;;IF(OR([.U184]=&quot;UNKNOWN&quot;;[.U18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5]=&quot;&quot;;IF(AND([.L185]=&quot;&quot;;[.N185]=&quot;&quot;);&quot;UNKNOWN&quot;;&quot;CONTRADICTION&quot;);IF([.M185]=&quot;UNMATCHED&quot;;IF(AND([.L185]=&quot;&quot;;[.N185]=&quot;&quot;);&quot;CLEAR&quot;;&quot;CONTRADICTION&quot;);IF([.M185]=&quot;SINGLE_SALE_LINKED&quot;;IF(AND([.L185]&lt;&gt;&quot;&quot;;[.N185]=&quot;&quot;);&quot;CLEAR&quot;;&quot;CONTRADICTION&quot;);IF([.M185]=&quot;MULTI_SALE_PENDING_ALLOCATION&quot;;IF([.L185]=&quot;&quot;;&quot;CLEAR&quot;;&quot;CONTRADICTION&quot;);IF([.M185]=&quot;ALLOCATED&quot;;IF(AND([.L185]=&quot;&quot;;[.N185]&lt;&gt;&quot;&quot;);&quot;CLEAR&quot;;&quot;CONTRADICTION&quot;);&quot;CONTRADICTION&quot;)))))">
            <text:p>UNKNOWN</text:p>
          </table:table-cell>
          <table:table-cell office:value-type="string" table:formula="of:=IF([.S185]=&quot;UNKNOWN&quot;;&quot;NO ACTION — linkage status is UNKNOWN / not asserted&quot;;IF([.S185]=&quot;CLEAR&quot;;&quot;NO CONTRADICTION — preserve evidence as entered&quot;;IF([.M185]=&quot;&quot;;&quot;REVIEW LINKAGE STATUS — identifiers are present while status is UNKNOWN&quot;;IF([.M185]=&quot;UNMATCHED&quot;;&quot;REMOVE LINKAGE IDENTIFIERS OR CORRECT LINKAGE STATUS&quot;;IF([.M185]=&quot;SINGLE_SALE_LINKED&quot;;&quot;REQUIRE LINKED SALE ID AND NO ALLOCATION GROUP ID&quot;;IF([.M185]=&quot;MULTI_SALE_PENDING_ALLOCATION&quot;;&quot;REMOVE LINKED SALE ID OR CORRECT LINKAGE STATUS&quot;;IF([.M185]=&quot;ALLOCATED&quot;;&quot;REQUIRE ALLOCATION GROUP ID AND NO LINKED SALE ID&quot;;&quot;REVIEW LINKAGE EVIDENCE — NO AUTHORITY CREATED&quot;)))))))">
            <text:p>NO ACTION — linkage status is UNKNOWN / not asserted</text:p>
          </table:table-cell>
          <table:table-cell office:value-type="string" table:formula="of:=IF([.S185]=&quot;CONTRADICTION&quot;;&quot;BLOCKED&quot;;IF([.S185]=&quot;UNKNOWN&quot;;&quot;UNKNOWN&quot;;IF([.S185]=&quot;CLEAR&quot;;IF(OR([.O185]=&quot;&quot;;[.P185]=&quot;&quot;);&quot;UNKNOWN&quot;;&quot;READY FOR REVIEW&quot;);&quot;BLOCKED&quot;)))">
            <text:p>UNKNOWN</text:p>
          </table:table-cell>
          <table:table-cell office:value-type="string" table:formula="of:=IF([.U185]=&quot;UNKNOWN&quot;;&quot;COMPLETE OR ASSERT REQUIRED EVIDENCE BEFORE REVIEW&quot;;IF([.U185]=&quot;BLOCKED&quot;;&quot;RESOLVE CONTRADICTION BEFORE REVIEW — NO AUTHORITY CREATED&quot;;IF([.U1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5]=&quot;READY FOR REVIEW&quot;;&quot;REVIEW ELIGIBLE — NO AUTHORITY&quot;;IF(OR([.U185]=&quot;UNKNOWN&quot;;[.U18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6]=&quot;&quot;;IF(AND([.L186]=&quot;&quot;;[.N186]=&quot;&quot;);&quot;UNKNOWN&quot;;&quot;CONTRADICTION&quot;);IF([.M186]=&quot;UNMATCHED&quot;;IF(AND([.L186]=&quot;&quot;;[.N186]=&quot;&quot;);&quot;CLEAR&quot;;&quot;CONTRADICTION&quot;);IF([.M186]=&quot;SINGLE_SALE_LINKED&quot;;IF(AND([.L186]&lt;&gt;&quot;&quot;;[.N186]=&quot;&quot;);&quot;CLEAR&quot;;&quot;CONTRADICTION&quot;);IF([.M186]=&quot;MULTI_SALE_PENDING_ALLOCATION&quot;;IF([.L186]=&quot;&quot;;&quot;CLEAR&quot;;&quot;CONTRADICTION&quot;);IF([.M186]=&quot;ALLOCATED&quot;;IF(AND([.L186]=&quot;&quot;;[.N186]&lt;&gt;&quot;&quot;);&quot;CLEAR&quot;;&quot;CONTRADICTION&quot;);&quot;CONTRADICTION&quot;)))))">
            <text:p>UNKNOWN</text:p>
          </table:table-cell>
          <table:table-cell office:value-type="string" table:formula="of:=IF([.S186]=&quot;UNKNOWN&quot;;&quot;NO ACTION — linkage status is UNKNOWN / not asserted&quot;;IF([.S186]=&quot;CLEAR&quot;;&quot;NO CONTRADICTION — preserve evidence as entered&quot;;IF([.M186]=&quot;&quot;;&quot;REVIEW LINKAGE STATUS — identifiers are present while status is UNKNOWN&quot;;IF([.M186]=&quot;UNMATCHED&quot;;&quot;REMOVE LINKAGE IDENTIFIERS OR CORRECT LINKAGE STATUS&quot;;IF([.M186]=&quot;SINGLE_SALE_LINKED&quot;;&quot;REQUIRE LINKED SALE ID AND NO ALLOCATION GROUP ID&quot;;IF([.M186]=&quot;MULTI_SALE_PENDING_ALLOCATION&quot;;&quot;REMOVE LINKED SALE ID OR CORRECT LINKAGE STATUS&quot;;IF([.M186]=&quot;ALLOCATED&quot;;&quot;REQUIRE ALLOCATION GROUP ID AND NO LINKED SALE ID&quot;;&quot;REVIEW LINKAGE EVIDENCE — NO AUTHORITY CREATED&quot;)))))))">
            <text:p>NO ACTION — linkage status is UNKNOWN / not asserted</text:p>
          </table:table-cell>
          <table:table-cell office:value-type="string" table:formula="of:=IF([.S186]=&quot;CONTRADICTION&quot;;&quot;BLOCKED&quot;;IF([.S186]=&quot;UNKNOWN&quot;;&quot;UNKNOWN&quot;;IF([.S186]=&quot;CLEAR&quot;;IF(OR([.O186]=&quot;&quot;;[.P186]=&quot;&quot;);&quot;UNKNOWN&quot;;&quot;READY FOR REVIEW&quot;);&quot;BLOCKED&quot;)))">
            <text:p>UNKNOWN</text:p>
          </table:table-cell>
          <table:table-cell office:value-type="string" table:formula="of:=IF([.U186]=&quot;UNKNOWN&quot;;&quot;COMPLETE OR ASSERT REQUIRED EVIDENCE BEFORE REVIEW&quot;;IF([.U186]=&quot;BLOCKED&quot;;&quot;RESOLVE CONTRADICTION BEFORE REVIEW — NO AUTHORITY CREATED&quot;;IF([.U1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6]=&quot;READY FOR REVIEW&quot;;&quot;REVIEW ELIGIBLE — NO AUTHORITY&quot;;IF(OR([.U186]=&quot;UNKNOWN&quot;;[.U18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7]=&quot;&quot;;IF(AND([.L187]=&quot;&quot;;[.N187]=&quot;&quot;);&quot;UNKNOWN&quot;;&quot;CONTRADICTION&quot;);IF([.M187]=&quot;UNMATCHED&quot;;IF(AND([.L187]=&quot;&quot;;[.N187]=&quot;&quot;);&quot;CLEAR&quot;;&quot;CONTRADICTION&quot;);IF([.M187]=&quot;SINGLE_SALE_LINKED&quot;;IF(AND([.L187]&lt;&gt;&quot;&quot;;[.N187]=&quot;&quot;);&quot;CLEAR&quot;;&quot;CONTRADICTION&quot;);IF([.M187]=&quot;MULTI_SALE_PENDING_ALLOCATION&quot;;IF([.L187]=&quot;&quot;;&quot;CLEAR&quot;;&quot;CONTRADICTION&quot;);IF([.M187]=&quot;ALLOCATED&quot;;IF(AND([.L187]=&quot;&quot;;[.N187]&lt;&gt;&quot;&quot;);&quot;CLEAR&quot;;&quot;CONTRADICTION&quot;);&quot;CONTRADICTION&quot;)))))">
            <text:p>UNKNOWN</text:p>
          </table:table-cell>
          <table:table-cell office:value-type="string" table:formula="of:=IF([.S187]=&quot;UNKNOWN&quot;;&quot;NO ACTION — linkage status is UNKNOWN / not asserted&quot;;IF([.S187]=&quot;CLEAR&quot;;&quot;NO CONTRADICTION — preserve evidence as entered&quot;;IF([.M187]=&quot;&quot;;&quot;REVIEW LINKAGE STATUS — identifiers are present while status is UNKNOWN&quot;;IF([.M187]=&quot;UNMATCHED&quot;;&quot;REMOVE LINKAGE IDENTIFIERS OR CORRECT LINKAGE STATUS&quot;;IF([.M187]=&quot;SINGLE_SALE_LINKED&quot;;&quot;REQUIRE LINKED SALE ID AND NO ALLOCATION GROUP ID&quot;;IF([.M187]=&quot;MULTI_SALE_PENDING_ALLOCATION&quot;;&quot;REMOVE LINKED SALE ID OR CORRECT LINKAGE STATUS&quot;;IF([.M187]=&quot;ALLOCATED&quot;;&quot;REQUIRE ALLOCATION GROUP ID AND NO LINKED SALE ID&quot;;&quot;REVIEW LINKAGE EVIDENCE — NO AUTHORITY CREATED&quot;)))))))">
            <text:p>NO ACTION — linkage status is UNKNOWN / not asserted</text:p>
          </table:table-cell>
          <table:table-cell office:value-type="string" table:formula="of:=IF([.S187]=&quot;CONTRADICTION&quot;;&quot;BLOCKED&quot;;IF([.S187]=&quot;UNKNOWN&quot;;&quot;UNKNOWN&quot;;IF([.S187]=&quot;CLEAR&quot;;IF(OR([.O187]=&quot;&quot;;[.P187]=&quot;&quot;);&quot;UNKNOWN&quot;;&quot;READY FOR REVIEW&quot;);&quot;BLOCKED&quot;)))">
            <text:p>UNKNOWN</text:p>
          </table:table-cell>
          <table:table-cell office:value-type="string" table:formula="of:=IF([.U187]=&quot;UNKNOWN&quot;;&quot;COMPLETE OR ASSERT REQUIRED EVIDENCE BEFORE REVIEW&quot;;IF([.U187]=&quot;BLOCKED&quot;;&quot;RESOLVE CONTRADICTION BEFORE REVIEW — NO AUTHORITY CREATED&quot;;IF([.U1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7]=&quot;READY FOR REVIEW&quot;;&quot;REVIEW ELIGIBLE — NO AUTHORITY&quot;;IF(OR([.U187]=&quot;UNKNOWN&quot;;[.U18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8]=&quot;&quot;;IF(AND([.L188]=&quot;&quot;;[.N188]=&quot;&quot;);&quot;UNKNOWN&quot;;&quot;CONTRADICTION&quot;);IF([.M188]=&quot;UNMATCHED&quot;;IF(AND([.L188]=&quot;&quot;;[.N188]=&quot;&quot;);&quot;CLEAR&quot;;&quot;CONTRADICTION&quot;);IF([.M188]=&quot;SINGLE_SALE_LINKED&quot;;IF(AND([.L188]&lt;&gt;&quot;&quot;;[.N188]=&quot;&quot;);&quot;CLEAR&quot;;&quot;CONTRADICTION&quot;);IF([.M188]=&quot;MULTI_SALE_PENDING_ALLOCATION&quot;;IF([.L188]=&quot;&quot;;&quot;CLEAR&quot;;&quot;CONTRADICTION&quot;);IF([.M188]=&quot;ALLOCATED&quot;;IF(AND([.L188]=&quot;&quot;;[.N188]&lt;&gt;&quot;&quot;);&quot;CLEAR&quot;;&quot;CONTRADICTION&quot;);&quot;CONTRADICTION&quot;)))))">
            <text:p>UNKNOWN</text:p>
          </table:table-cell>
          <table:table-cell office:value-type="string" table:formula="of:=IF([.S188]=&quot;UNKNOWN&quot;;&quot;NO ACTION — linkage status is UNKNOWN / not asserted&quot;;IF([.S188]=&quot;CLEAR&quot;;&quot;NO CONTRADICTION — preserve evidence as entered&quot;;IF([.M188]=&quot;&quot;;&quot;REVIEW LINKAGE STATUS — identifiers are present while status is UNKNOWN&quot;;IF([.M188]=&quot;UNMATCHED&quot;;&quot;REMOVE LINKAGE IDENTIFIERS OR CORRECT LINKAGE STATUS&quot;;IF([.M188]=&quot;SINGLE_SALE_LINKED&quot;;&quot;REQUIRE LINKED SALE ID AND NO ALLOCATION GROUP ID&quot;;IF([.M188]=&quot;MULTI_SALE_PENDING_ALLOCATION&quot;;&quot;REMOVE LINKED SALE ID OR CORRECT LINKAGE STATUS&quot;;IF([.M188]=&quot;ALLOCATED&quot;;&quot;REQUIRE ALLOCATION GROUP ID AND NO LINKED SALE ID&quot;;&quot;REVIEW LINKAGE EVIDENCE — NO AUTHORITY CREATED&quot;)))))))">
            <text:p>NO ACTION — linkage status is UNKNOWN / not asserted</text:p>
          </table:table-cell>
          <table:table-cell office:value-type="string" table:formula="of:=IF([.S188]=&quot;CONTRADICTION&quot;;&quot;BLOCKED&quot;;IF([.S188]=&quot;UNKNOWN&quot;;&quot;UNKNOWN&quot;;IF([.S188]=&quot;CLEAR&quot;;IF(OR([.O188]=&quot;&quot;;[.P188]=&quot;&quot;);&quot;UNKNOWN&quot;;&quot;READY FOR REVIEW&quot;);&quot;BLOCKED&quot;)))">
            <text:p>UNKNOWN</text:p>
          </table:table-cell>
          <table:table-cell office:value-type="string" table:formula="of:=IF([.U188]=&quot;UNKNOWN&quot;;&quot;COMPLETE OR ASSERT REQUIRED EVIDENCE BEFORE REVIEW&quot;;IF([.U188]=&quot;BLOCKED&quot;;&quot;RESOLVE CONTRADICTION BEFORE REVIEW — NO AUTHORITY CREATED&quot;;IF([.U1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8]=&quot;READY FOR REVIEW&quot;;&quot;REVIEW ELIGIBLE — NO AUTHORITY&quot;;IF(OR([.U188]=&quot;UNKNOWN&quot;;[.U18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9]=&quot;&quot;;IF(AND([.L189]=&quot;&quot;;[.N189]=&quot;&quot;);&quot;UNKNOWN&quot;;&quot;CONTRADICTION&quot;);IF([.M189]=&quot;UNMATCHED&quot;;IF(AND([.L189]=&quot;&quot;;[.N189]=&quot;&quot;);&quot;CLEAR&quot;;&quot;CONTRADICTION&quot;);IF([.M189]=&quot;SINGLE_SALE_LINKED&quot;;IF(AND([.L189]&lt;&gt;&quot;&quot;;[.N189]=&quot;&quot;);&quot;CLEAR&quot;;&quot;CONTRADICTION&quot;);IF([.M189]=&quot;MULTI_SALE_PENDING_ALLOCATION&quot;;IF([.L189]=&quot;&quot;;&quot;CLEAR&quot;;&quot;CONTRADICTION&quot;);IF([.M189]=&quot;ALLOCATED&quot;;IF(AND([.L189]=&quot;&quot;;[.N189]&lt;&gt;&quot;&quot;);&quot;CLEAR&quot;;&quot;CONTRADICTION&quot;);&quot;CONTRADICTION&quot;)))))">
            <text:p>UNKNOWN</text:p>
          </table:table-cell>
          <table:table-cell office:value-type="string" table:formula="of:=IF([.S189]=&quot;UNKNOWN&quot;;&quot;NO ACTION — linkage status is UNKNOWN / not asserted&quot;;IF([.S189]=&quot;CLEAR&quot;;&quot;NO CONTRADICTION — preserve evidence as entered&quot;;IF([.M189]=&quot;&quot;;&quot;REVIEW LINKAGE STATUS — identifiers are present while status is UNKNOWN&quot;;IF([.M189]=&quot;UNMATCHED&quot;;&quot;REMOVE LINKAGE IDENTIFIERS OR CORRECT LINKAGE STATUS&quot;;IF([.M189]=&quot;SINGLE_SALE_LINKED&quot;;&quot;REQUIRE LINKED SALE ID AND NO ALLOCATION GROUP ID&quot;;IF([.M189]=&quot;MULTI_SALE_PENDING_ALLOCATION&quot;;&quot;REMOVE LINKED SALE ID OR CORRECT LINKAGE STATUS&quot;;IF([.M189]=&quot;ALLOCATED&quot;;&quot;REQUIRE ALLOCATION GROUP ID AND NO LINKED SALE ID&quot;;&quot;REVIEW LINKAGE EVIDENCE — NO AUTHORITY CREATED&quot;)))))))">
            <text:p>NO ACTION — linkage status is UNKNOWN / not asserted</text:p>
          </table:table-cell>
          <table:table-cell office:value-type="string" table:formula="of:=IF([.S189]=&quot;CONTRADICTION&quot;;&quot;BLOCKED&quot;;IF([.S189]=&quot;UNKNOWN&quot;;&quot;UNKNOWN&quot;;IF([.S189]=&quot;CLEAR&quot;;IF(OR([.O189]=&quot;&quot;;[.P189]=&quot;&quot;);&quot;UNKNOWN&quot;;&quot;READY FOR REVIEW&quot;);&quot;BLOCKED&quot;)))">
            <text:p>UNKNOWN</text:p>
          </table:table-cell>
          <table:table-cell office:value-type="string" table:formula="of:=IF([.U189]=&quot;UNKNOWN&quot;;&quot;COMPLETE OR ASSERT REQUIRED EVIDENCE BEFORE REVIEW&quot;;IF([.U189]=&quot;BLOCKED&quot;;&quot;RESOLVE CONTRADICTION BEFORE REVIEW — NO AUTHORITY CREATED&quot;;IF([.U1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9]=&quot;READY FOR REVIEW&quot;;&quot;REVIEW ELIGIBLE — NO AUTHORITY&quot;;IF(OR([.U189]=&quot;UNKNOWN&quot;;[.U18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0]=&quot;&quot;;IF(AND([.L190]=&quot;&quot;;[.N190]=&quot;&quot;);&quot;UNKNOWN&quot;;&quot;CONTRADICTION&quot;);IF([.M190]=&quot;UNMATCHED&quot;;IF(AND([.L190]=&quot;&quot;;[.N190]=&quot;&quot;);&quot;CLEAR&quot;;&quot;CONTRADICTION&quot;);IF([.M190]=&quot;SINGLE_SALE_LINKED&quot;;IF(AND([.L190]&lt;&gt;&quot;&quot;;[.N190]=&quot;&quot;);&quot;CLEAR&quot;;&quot;CONTRADICTION&quot;);IF([.M190]=&quot;MULTI_SALE_PENDING_ALLOCATION&quot;;IF([.L190]=&quot;&quot;;&quot;CLEAR&quot;;&quot;CONTRADICTION&quot;);IF([.M190]=&quot;ALLOCATED&quot;;IF(AND([.L190]=&quot;&quot;;[.N190]&lt;&gt;&quot;&quot;);&quot;CLEAR&quot;;&quot;CONTRADICTION&quot;);&quot;CONTRADICTION&quot;)))))">
            <text:p>UNKNOWN</text:p>
          </table:table-cell>
          <table:table-cell office:value-type="string" table:formula="of:=IF([.S190]=&quot;UNKNOWN&quot;;&quot;NO ACTION — linkage status is UNKNOWN / not asserted&quot;;IF([.S190]=&quot;CLEAR&quot;;&quot;NO CONTRADICTION — preserve evidence as entered&quot;;IF([.M190]=&quot;&quot;;&quot;REVIEW LINKAGE STATUS — identifiers are present while status is UNKNOWN&quot;;IF([.M190]=&quot;UNMATCHED&quot;;&quot;REMOVE LINKAGE IDENTIFIERS OR CORRECT LINKAGE STATUS&quot;;IF([.M190]=&quot;SINGLE_SALE_LINKED&quot;;&quot;REQUIRE LINKED SALE ID AND NO ALLOCATION GROUP ID&quot;;IF([.M190]=&quot;MULTI_SALE_PENDING_ALLOCATION&quot;;&quot;REMOVE LINKED SALE ID OR CORRECT LINKAGE STATUS&quot;;IF([.M190]=&quot;ALLOCATED&quot;;&quot;REQUIRE ALLOCATION GROUP ID AND NO LINKED SALE ID&quot;;&quot;REVIEW LINKAGE EVIDENCE — NO AUTHORITY CREATED&quot;)))))))">
            <text:p>NO ACTION — linkage status is UNKNOWN / not asserted</text:p>
          </table:table-cell>
          <table:table-cell office:value-type="string" table:formula="of:=IF([.S190]=&quot;CONTRADICTION&quot;;&quot;BLOCKED&quot;;IF([.S190]=&quot;UNKNOWN&quot;;&quot;UNKNOWN&quot;;IF([.S190]=&quot;CLEAR&quot;;IF(OR([.O190]=&quot;&quot;;[.P190]=&quot;&quot;);&quot;UNKNOWN&quot;;&quot;READY FOR REVIEW&quot;);&quot;BLOCKED&quot;)))">
            <text:p>UNKNOWN</text:p>
          </table:table-cell>
          <table:table-cell office:value-type="string" table:formula="of:=IF([.U190]=&quot;UNKNOWN&quot;;&quot;COMPLETE OR ASSERT REQUIRED EVIDENCE BEFORE REVIEW&quot;;IF([.U190]=&quot;BLOCKED&quot;;&quot;RESOLVE CONTRADICTION BEFORE REVIEW — NO AUTHORITY CREATED&quot;;IF([.U1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0]=&quot;READY FOR REVIEW&quot;;&quot;REVIEW ELIGIBLE — NO AUTHORITY&quot;;IF(OR([.U190]=&quot;UNKNOWN&quot;;[.U19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1]=&quot;&quot;;IF(AND([.L191]=&quot;&quot;;[.N191]=&quot;&quot;);&quot;UNKNOWN&quot;;&quot;CONTRADICTION&quot;);IF([.M191]=&quot;UNMATCHED&quot;;IF(AND([.L191]=&quot;&quot;;[.N191]=&quot;&quot;);&quot;CLEAR&quot;;&quot;CONTRADICTION&quot;);IF([.M191]=&quot;SINGLE_SALE_LINKED&quot;;IF(AND([.L191]&lt;&gt;&quot;&quot;;[.N191]=&quot;&quot;);&quot;CLEAR&quot;;&quot;CONTRADICTION&quot;);IF([.M191]=&quot;MULTI_SALE_PENDING_ALLOCATION&quot;;IF([.L191]=&quot;&quot;;&quot;CLEAR&quot;;&quot;CONTRADICTION&quot;);IF([.M191]=&quot;ALLOCATED&quot;;IF(AND([.L191]=&quot;&quot;;[.N191]&lt;&gt;&quot;&quot;);&quot;CLEAR&quot;;&quot;CONTRADICTION&quot;);&quot;CONTRADICTION&quot;)))))">
            <text:p>UNKNOWN</text:p>
          </table:table-cell>
          <table:table-cell office:value-type="string" table:formula="of:=IF([.S191]=&quot;UNKNOWN&quot;;&quot;NO ACTION — linkage status is UNKNOWN / not asserted&quot;;IF([.S191]=&quot;CLEAR&quot;;&quot;NO CONTRADICTION — preserve evidence as entered&quot;;IF([.M191]=&quot;&quot;;&quot;REVIEW LINKAGE STATUS — identifiers are present while status is UNKNOWN&quot;;IF([.M191]=&quot;UNMATCHED&quot;;&quot;REMOVE LINKAGE IDENTIFIERS OR CORRECT LINKAGE STATUS&quot;;IF([.M191]=&quot;SINGLE_SALE_LINKED&quot;;&quot;REQUIRE LINKED SALE ID AND NO ALLOCATION GROUP ID&quot;;IF([.M191]=&quot;MULTI_SALE_PENDING_ALLOCATION&quot;;&quot;REMOVE LINKED SALE ID OR CORRECT LINKAGE STATUS&quot;;IF([.M191]=&quot;ALLOCATED&quot;;&quot;REQUIRE ALLOCATION GROUP ID AND NO LINKED SALE ID&quot;;&quot;REVIEW LINKAGE EVIDENCE — NO AUTHORITY CREATED&quot;)))))))">
            <text:p>NO ACTION — linkage status is UNKNOWN / not asserted</text:p>
          </table:table-cell>
          <table:table-cell office:value-type="string" table:formula="of:=IF([.S191]=&quot;CONTRADICTION&quot;;&quot;BLOCKED&quot;;IF([.S191]=&quot;UNKNOWN&quot;;&quot;UNKNOWN&quot;;IF([.S191]=&quot;CLEAR&quot;;IF(OR([.O191]=&quot;&quot;;[.P191]=&quot;&quot;);&quot;UNKNOWN&quot;;&quot;READY FOR REVIEW&quot;);&quot;BLOCKED&quot;)))">
            <text:p>UNKNOWN</text:p>
          </table:table-cell>
          <table:table-cell office:value-type="string" table:formula="of:=IF([.U191]=&quot;UNKNOWN&quot;;&quot;COMPLETE OR ASSERT REQUIRED EVIDENCE BEFORE REVIEW&quot;;IF([.U191]=&quot;BLOCKED&quot;;&quot;RESOLVE CONTRADICTION BEFORE REVIEW — NO AUTHORITY CREATED&quot;;IF([.U1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1]=&quot;READY FOR REVIEW&quot;;&quot;REVIEW ELIGIBLE — NO AUTHORITY&quot;;IF(OR([.U191]=&quot;UNKNOWN&quot;;[.U19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2]=&quot;&quot;;IF(AND([.L192]=&quot;&quot;;[.N192]=&quot;&quot;);&quot;UNKNOWN&quot;;&quot;CONTRADICTION&quot;);IF([.M192]=&quot;UNMATCHED&quot;;IF(AND([.L192]=&quot;&quot;;[.N192]=&quot;&quot;);&quot;CLEAR&quot;;&quot;CONTRADICTION&quot;);IF([.M192]=&quot;SINGLE_SALE_LINKED&quot;;IF(AND([.L192]&lt;&gt;&quot;&quot;;[.N192]=&quot;&quot;);&quot;CLEAR&quot;;&quot;CONTRADICTION&quot;);IF([.M192]=&quot;MULTI_SALE_PENDING_ALLOCATION&quot;;IF([.L192]=&quot;&quot;;&quot;CLEAR&quot;;&quot;CONTRADICTION&quot;);IF([.M192]=&quot;ALLOCATED&quot;;IF(AND([.L192]=&quot;&quot;;[.N192]&lt;&gt;&quot;&quot;);&quot;CLEAR&quot;;&quot;CONTRADICTION&quot;);&quot;CONTRADICTION&quot;)))))">
            <text:p>UNKNOWN</text:p>
          </table:table-cell>
          <table:table-cell office:value-type="string" table:formula="of:=IF([.S192]=&quot;UNKNOWN&quot;;&quot;NO ACTION — linkage status is UNKNOWN / not asserted&quot;;IF([.S192]=&quot;CLEAR&quot;;&quot;NO CONTRADICTION — preserve evidence as entered&quot;;IF([.M192]=&quot;&quot;;&quot;REVIEW LINKAGE STATUS — identifiers are present while status is UNKNOWN&quot;;IF([.M192]=&quot;UNMATCHED&quot;;&quot;REMOVE LINKAGE IDENTIFIERS OR CORRECT LINKAGE STATUS&quot;;IF([.M192]=&quot;SINGLE_SALE_LINKED&quot;;&quot;REQUIRE LINKED SALE ID AND NO ALLOCATION GROUP ID&quot;;IF([.M192]=&quot;MULTI_SALE_PENDING_ALLOCATION&quot;;&quot;REMOVE LINKED SALE ID OR CORRECT LINKAGE STATUS&quot;;IF([.M192]=&quot;ALLOCATED&quot;;&quot;REQUIRE ALLOCATION GROUP ID AND NO LINKED SALE ID&quot;;&quot;REVIEW LINKAGE EVIDENCE — NO AUTHORITY CREATED&quot;)))))))">
            <text:p>NO ACTION — linkage status is UNKNOWN / not asserted</text:p>
          </table:table-cell>
          <table:table-cell office:value-type="string" table:formula="of:=IF([.S192]=&quot;CONTRADICTION&quot;;&quot;BLOCKED&quot;;IF([.S192]=&quot;UNKNOWN&quot;;&quot;UNKNOWN&quot;;IF([.S192]=&quot;CLEAR&quot;;IF(OR([.O192]=&quot;&quot;;[.P192]=&quot;&quot;);&quot;UNKNOWN&quot;;&quot;READY FOR REVIEW&quot;);&quot;BLOCKED&quot;)))">
            <text:p>UNKNOWN</text:p>
          </table:table-cell>
          <table:table-cell office:value-type="string" table:formula="of:=IF([.U192]=&quot;UNKNOWN&quot;;&quot;COMPLETE OR ASSERT REQUIRED EVIDENCE BEFORE REVIEW&quot;;IF([.U192]=&quot;BLOCKED&quot;;&quot;RESOLVE CONTRADICTION BEFORE REVIEW — NO AUTHORITY CREATED&quot;;IF([.U1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2]=&quot;READY FOR REVIEW&quot;;&quot;REVIEW ELIGIBLE — NO AUTHORITY&quot;;IF(OR([.U192]=&quot;UNKNOWN&quot;;[.U19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3]=&quot;&quot;;IF(AND([.L193]=&quot;&quot;;[.N193]=&quot;&quot;);&quot;UNKNOWN&quot;;&quot;CONTRADICTION&quot;);IF([.M193]=&quot;UNMATCHED&quot;;IF(AND([.L193]=&quot;&quot;;[.N193]=&quot;&quot;);&quot;CLEAR&quot;;&quot;CONTRADICTION&quot;);IF([.M193]=&quot;SINGLE_SALE_LINKED&quot;;IF(AND([.L193]&lt;&gt;&quot;&quot;;[.N193]=&quot;&quot;);&quot;CLEAR&quot;;&quot;CONTRADICTION&quot;);IF([.M193]=&quot;MULTI_SALE_PENDING_ALLOCATION&quot;;IF([.L193]=&quot;&quot;;&quot;CLEAR&quot;;&quot;CONTRADICTION&quot;);IF([.M193]=&quot;ALLOCATED&quot;;IF(AND([.L193]=&quot;&quot;;[.N193]&lt;&gt;&quot;&quot;);&quot;CLEAR&quot;;&quot;CONTRADICTION&quot;);&quot;CONTRADICTION&quot;)))))">
            <text:p>UNKNOWN</text:p>
          </table:table-cell>
          <table:table-cell office:value-type="string" table:formula="of:=IF([.S193]=&quot;UNKNOWN&quot;;&quot;NO ACTION — linkage status is UNKNOWN / not asserted&quot;;IF([.S193]=&quot;CLEAR&quot;;&quot;NO CONTRADICTION — preserve evidence as entered&quot;;IF([.M193]=&quot;&quot;;&quot;REVIEW LINKAGE STATUS — identifiers are present while status is UNKNOWN&quot;;IF([.M193]=&quot;UNMATCHED&quot;;&quot;REMOVE LINKAGE IDENTIFIERS OR CORRECT LINKAGE STATUS&quot;;IF([.M193]=&quot;SINGLE_SALE_LINKED&quot;;&quot;REQUIRE LINKED SALE ID AND NO ALLOCATION GROUP ID&quot;;IF([.M193]=&quot;MULTI_SALE_PENDING_ALLOCATION&quot;;&quot;REMOVE LINKED SALE ID OR CORRECT LINKAGE STATUS&quot;;IF([.M193]=&quot;ALLOCATED&quot;;&quot;REQUIRE ALLOCATION GROUP ID AND NO LINKED SALE ID&quot;;&quot;REVIEW LINKAGE EVIDENCE — NO AUTHORITY CREATED&quot;)))))))">
            <text:p>NO ACTION — linkage status is UNKNOWN / not asserted</text:p>
          </table:table-cell>
          <table:table-cell office:value-type="string" table:formula="of:=IF([.S193]=&quot;CONTRADICTION&quot;;&quot;BLOCKED&quot;;IF([.S193]=&quot;UNKNOWN&quot;;&quot;UNKNOWN&quot;;IF([.S193]=&quot;CLEAR&quot;;IF(OR([.O193]=&quot;&quot;;[.P193]=&quot;&quot;);&quot;UNKNOWN&quot;;&quot;READY FOR REVIEW&quot;);&quot;BLOCKED&quot;)))">
            <text:p>UNKNOWN</text:p>
          </table:table-cell>
          <table:table-cell office:value-type="string" table:formula="of:=IF([.U193]=&quot;UNKNOWN&quot;;&quot;COMPLETE OR ASSERT REQUIRED EVIDENCE BEFORE REVIEW&quot;;IF([.U193]=&quot;BLOCKED&quot;;&quot;RESOLVE CONTRADICTION BEFORE REVIEW — NO AUTHORITY CREATED&quot;;IF([.U1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3]=&quot;READY FOR REVIEW&quot;;&quot;REVIEW ELIGIBLE — NO AUTHORITY&quot;;IF(OR([.U193]=&quot;UNKNOWN&quot;;[.U19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4]=&quot;&quot;;IF(AND([.L194]=&quot;&quot;;[.N194]=&quot;&quot;);&quot;UNKNOWN&quot;;&quot;CONTRADICTION&quot;);IF([.M194]=&quot;UNMATCHED&quot;;IF(AND([.L194]=&quot;&quot;;[.N194]=&quot;&quot;);&quot;CLEAR&quot;;&quot;CONTRADICTION&quot;);IF([.M194]=&quot;SINGLE_SALE_LINKED&quot;;IF(AND([.L194]&lt;&gt;&quot;&quot;;[.N194]=&quot;&quot;);&quot;CLEAR&quot;;&quot;CONTRADICTION&quot;);IF([.M194]=&quot;MULTI_SALE_PENDING_ALLOCATION&quot;;IF([.L194]=&quot;&quot;;&quot;CLEAR&quot;;&quot;CONTRADICTION&quot;);IF([.M194]=&quot;ALLOCATED&quot;;IF(AND([.L194]=&quot;&quot;;[.N194]&lt;&gt;&quot;&quot;);&quot;CLEAR&quot;;&quot;CONTRADICTION&quot;);&quot;CONTRADICTION&quot;)))))">
            <text:p>UNKNOWN</text:p>
          </table:table-cell>
          <table:table-cell office:value-type="string" table:formula="of:=IF([.S194]=&quot;UNKNOWN&quot;;&quot;NO ACTION — linkage status is UNKNOWN / not asserted&quot;;IF([.S194]=&quot;CLEAR&quot;;&quot;NO CONTRADICTION — preserve evidence as entered&quot;;IF([.M194]=&quot;&quot;;&quot;REVIEW LINKAGE STATUS — identifiers are present while status is UNKNOWN&quot;;IF([.M194]=&quot;UNMATCHED&quot;;&quot;REMOVE LINKAGE IDENTIFIERS OR CORRECT LINKAGE STATUS&quot;;IF([.M194]=&quot;SINGLE_SALE_LINKED&quot;;&quot;REQUIRE LINKED SALE ID AND NO ALLOCATION GROUP ID&quot;;IF([.M194]=&quot;MULTI_SALE_PENDING_ALLOCATION&quot;;&quot;REMOVE LINKED SALE ID OR CORRECT LINKAGE STATUS&quot;;IF([.M194]=&quot;ALLOCATED&quot;;&quot;REQUIRE ALLOCATION GROUP ID AND NO LINKED SALE ID&quot;;&quot;REVIEW LINKAGE EVIDENCE — NO AUTHORITY CREATED&quot;)))))))">
            <text:p>NO ACTION — linkage status is UNKNOWN / not asserted</text:p>
          </table:table-cell>
          <table:table-cell office:value-type="string" table:formula="of:=IF([.S194]=&quot;CONTRADICTION&quot;;&quot;BLOCKED&quot;;IF([.S194]=&quot;UNKNOWN&quot;;&quot;UNKNOWN&quot;;IF([.S194]=&quot;CLEAR&quot;;IF(OR([.O194]=&quot;&quot;;[.P194]=&quot;&quot;);&quot;UNKNOWN&quot;;&quot;READY FOR REVIEW&quot;);&quot;BLOCKED&quot;)))">
            <text:p>UNKNOWN</text:p>
          </table:table-cell>
          <table:table-cell office:value-type="string" table:formula="of:=IF([.U194]=&quot;UNKNOWN&quot;;&quot;COMPLETE OR ASSERT REQUIRED EVIDENCE BEFORE REVIEW&quot;;IF([.U194]=&quot;BLOCKED&quot;;&quot;RESOLVE CONTRADICTION BEFORE REVIEW — NO AUTHORITY CREATED&quot;;IF([.U1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4]=&quot;READY FOR REVIEW&quot;;&quot;REVIEW ELIGIBLE — NO AUTHORITY&quot;;IF(OR([.U194]=&quot;UNKNOWN&quot;;[.U19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5]=&quot;&quot;;IF(AND([.L195]=&quot;&quot;;[.N195]=&quot;&quot;);&quot;UNKNOWN&quot;;&quot;CONTRADICTION&quot;);IF([.M195]=&quot;UNMATCHED&quot;;IF(AND([.L195]=&quot;&quot;;[.N195]=&quot;&quot;);&quot;CLEAR&quot;;&quot;CONTRADICTION&quot;);IF([.M195]=&quot;SINGLE_SALE_LINKED&quot;;IF(AND([.L195]&lt;&gt;&quot;&quot;;[.N195]=&quot;&quot;);&quot;CLEAR&quot;;&quot;CONTRADICTION&quot;);IF([.M195]=&quot;MULTI_SALE_PENDING_ALLOCATION&quot;;IF([.L195]=&quot;&quot;;&quot;CLEAR&quot;;&quot;CONTRADICTION&quot;);IF([.M195]=&quot;ALLOCATED&quot;;IF(AND([.L195]=&quot;&quot;;[.N195]&lt;&gt;&quot;&quot;);&quot;CLEAR&quot;;&quot;CONTRADICTION&quot;);&quot;CONTRADICTION&quot;)))))">
            <text:p>UNKNOWN</text:p>
          </table:table-cell>
          <table:table-cell office:value-type="string" table:formula="of:=IF([.S195]=&quot;UNKNOWN&quot;;&quot;NO ACTION — linkage status is UNKNOWN / not asserted&quot;;IF([.S195]=&quot;CLEAR&quot;;&quot;NO CONTRADICTION — preserve evidence as entered&quot;;IF([.M195]=&quot;&quot;;&quot;REVIEW LINKAGE STATUS — identifiers are present while status is UNKNOWN&quot;;IF([.M195]=&quot;UNMATCHED&quot;;&quot;REMOVE LINKAGE IDENTIFIERS OR CORRECT LINKAGE STATUS&quot;;IF([.M195]=&quot;SINGLE_SALE_LINKED&quot;;&quot;REQUIRE LINKED SALE ID AND NO ALLOCATION GROUP ID&quot;;IF([.M195]=&quot;MULTI_SALE_PENDING_ALLOCATION&quot;;&quot;REMOVE LINKED SALE ID OR CORRECT LINKAGE STATUS&quot;;IF([.M195]=&quot;ALLOCATED&quot;;&quot;REQUIRE ALLOCATION GROUP ID AND NO LINKED SALE ID&quot;;&quot;REVIEW LINKAGE EVIDENCE — NO AUTHORITY CREATED&quot;)))))))">
            <text:p>NO ACTION — linkage status is UNKNOWN / not asserted</text:p>
          </table:table-cell>
          <table:table-cell office:value-type="string" table:formula="of:=IF([.S195]=&quot;CONTRADICTION&quot;;&quot;BLOCKED&quot;;IF([.S195]=&quot;UNKNOWN&quot;;&quot;UNKNOWN&quot;;IF([.S195]=&quot;CLEAR&quot;;IF(OR([.O195]=&quot;&quot;;[.P195]=&quot;&quot;);&quot;UNKNOWN&quot;;&quot;READY FOR REVIEW&quot;);&quot;BLOCKED&quot;)))">
            <text:p>UNKNOWN</text:p>
          </table:table-cell>
          <table:table-cell office:value-type="string" table:formula="of:=IF([.U195]=&quot;UNKNOWN&quot;;&quot;COMPLETE OR ASSERT REQUIRED EVIDENCE BEFORE REVIEW&quot;;IF([.U195]=&quot;BLOCKED&quot;;&quot;RESOLVE CONTRADICTION BEFORE REVIEW — NO AUTHORITY CREATED&quot;;IF([.U1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5]=&quot;READY FOR REVIEW&quot;;&quot;REVIEW ELIGIBLE — NO AUTHORITY&quot;;IF(OR([.U195]=&quot;UNKNOWN&quot;;[.U19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6]=&quot;&quot;;IF(AND([.L196]=&quot;&quot;;[.N196]=&quot;&quot;);&quot;UNKNOWN&quot;;&quot;CONTRADICTION&quot;);IF([.M196]=&quot;UNMATCHED&quot;;IF(AND([.L196]=&quot;&quot;;[.N196]=&quot;&quot;);&quot;CLEAR&quot;;&quot;CONTRADICTION&quot;);IF([.M196]=&quot;SINGLE_SALE_LINKED&quot;;IF(AND([.L196]&lt;&gt;&quot;&quot;;[.N196]=&quot;&quot;);&quot;CLEAR&quot;;&quot;CONTRADICTION&quot;);IF([.M196]=&quot;MULTI_SALE_PENDING_ALLOCATION&quot;;IF([.L196]=&quot;&quot;;&quot;CLEAR&quot;;&quot;CONTRADICTION&quot;);IF([.M196]=&quot;ALLOCATED&quot;;IF(AND([.L196]=&quot;&quot;;[.N196]&lt;&gt;&quot;&quot;);&quot;CLEAR&quot;;&quot;CONTRADICTION&quot;);&quot;CONTRADICTION&quot;)))))">
            <text:p>UNKNOWN</text:p>
          </table:table-cell>
          <table:table-cell office:value-type="string" table:formula="of:=IF([.S196]=&quot;UNKNOWN&quot;;&quot;NO ACTION — linkage status is UNKNOWN / not asserted&quot;;IF([.S196]=&quot;CLEAR&quot;;&quot;NO CONTRADICTION — preserve evidence as entered&quot;;IF([.M196]=&quot;&quot;;&quot;REVIEW LINKAGE STATUS — identifiers are present while status is UNKNOWN&quot;;IF([.M196]=&quot;UNMATCHED&quot;;&quot;REMOVE LINKAGE IDENTIFIERS OR CORRECT LINKAGE STATUS&quot;;IF([.M196]=&quot;SINGLE_SALE_LINKED&quot;;&quot;REQUIRE LINKED SALE ID AND NO ALLOCATION GROUP ID&quot;;IF([.M196]=&quot;MULTI_SALE_PENDING_ALLOCATION&quot;;&quot;REMOVE LINKED SALE ID OR CORRECT LINKAGE STATUS&quot;;IF([.M196]=&quot;ALLOCATED&quot;;&quot;REQUIRE ALLOCATION GROUP ID AND NO LINKED SALE ID&quot;;&quot;REVIEW LINKAGE EVIDENCE — NO AUTHORITY CREATED&quot;)))))))">
            <text:p>NO ACTION — linkage status is UNKNOWN / not asserted</text:p>
          </table:table-cell>
          <table:table-cell office:value-type="string" table:formula="of:=IF([.S196]=&quot;CONTRADICTION&quot;;&quot;BLOCKED&quot;;IF([.S196]=&quot;UNKNOWN&quot;;&quot;UNKNOWN&quot;;IF([.S196]=&quot;CLEAR&quot;;IF(OR([.O196]=&quot;&quot;;[.P196]=&quot;&quot;);&quot;UNKNOWN&quot;;&quot;READY FOR REVIEW&quot;);&quot;BLOCKED&quot;)))">
            <text:p>UNKNOWN</text:p>
          </table:table-cell>
          <table:table-cell office:value-type="string" table:formula="of:=IF([.U196]=&quot;UNKNOWN&quot;;&quot;COMPLETE OR ASSERT REQUIRED EVIDENCE BEFORE REVIEW&quot;;IF([.U196]=&quot;BLOCKED&quot;;&quot;RESOLVE CONTRADICTION BEFORE REVIEW — NO AUTHORITY CREATED&quot;;IF([.U1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6]=&quot;READY FOR REVIEW&quot;;&quot;REVIEW ELIGIBLE — NO AUTHORITY&quot;;IF(OR([.U196]=&quot;UNKNOWN&quot;;[.U19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7]=&quot;&quot;;IF(AND([.L197]=&quot;&quot;;[.N197]=&quot;&quot;);&quot;UNKNOWN&quot;;&quot;CONTRADICTION&quot;);IF([.M197]=&quot;UNMATCHED&quot;;IF(AND([.L197]=&quot;&quot;;[.N197]=&quot;&quot;);&quot;CLEAR&quot;;&quot;CONTRADICTION&quot;);IF([.M197]=&quot;SINGLE_SALE_LINKED&quot;;IF(AND([.L197]&lt;&gt;&quot;&quot;;[.N197]=&quot;&quot;);&quot;CLEAR&quot;;&quot;CONTRADICTION&quot;);IF([.M197]=&quot;MULTI_SALE_PENDING_ALLOCATION&quot;;IF([.L197]=&quot;&quot;;&quot;CLEAR&quot;;&quot;CONTRADICTION&quot;);IF([.M197]=&quot;ALLOCATED&quot;;IF(AND([.L197]=&quot;&quot;;[.N197]&lt;&gt;&quot;&quot;);&quot;CLEAR&quot;;&quot;CONTRADICTION&quot;);&quot;CONTRADICTION&quot;)))))">
            <text:p>UNKNOWN</text:p>
          </table:table-cell>
          <table:table-cell office:value-type="string" table:formula="of:=IF([.S197]=&quot;UNKNOWN&quot;;&quot;NO ACTION — linkage status is UNKNOWN / not asserted&quot;;IF([.S197]=&quot;CLEAR&quot;;&quot;NO CONTRADICTION — preserve evidence as entered&quot;;IF([.M197]=&quot;&quot;;&quot;REVIEW LINKAGE STATUS — identifiers are present while status is UNKNOWN&quot;;IF([.M197]=&quot;UNMATCHED&quot;;&quot;REMOVE LINKAGE IDENTIFIERS OR CORRECT LINKAGE STATUS&quot;;IF([.M197]=&quot;SINGLE_SALE_LINKED&quot;;&quot;REQUIRE LINKED SALE ID AND NO ALLOCATION GROUP ID&quot;;IF([.M197]=&quot;MULTI_SALE_PENDING_ALLOCATION&quot;;&quot;REMOVE LINKED SALE ID OR CORRECT LINKAGE STATUS&quot;;IF([.M197]=&quot;ALLOCATED&quot;;&quot;REQUIRE ALLOCATION GROUP ID AND NO LINKED SALE ID&quot;;&quot;REVIEW LINKAGE EVIDENCE — NO AUTHORITY CREATED&quot;)))))))">
            <text:p>NO ACTION — linkage status is UNKNOWN / not asserted</text:p>
          </table:table-cell>
          <table:table-cell office:value-type="string" table:formula="of:=IF([.S197]=&quot;CONTRADICTION&quot;;&quot;BLOCKED&quot;;IF([.S197]=&quot;UNKNOWN&quot;;&quot;UNKNOWN&quot;;IF([.S197]=&quot;CLEAR&quot;;IF(OR([.O197]=&quot;&quot;;[.P197]=&quot;&quot;);&quot;UNKNOWN&quot;;&quot;READY FOR REVIEW&quot;);&quot;BLOCKED&quot;)))">
            <text:p>UNKNOWN</text:p>
          </table:table-cell>
          <table:table-cell office:value-type="string" table:formula="of:=IF([.U197]=&quot;UNKNOWN&quot;;&quot;COMPLETE OR ASSERT REQUIRED EVIDENCE BEFORE REVIEW&quot;;IF([.U197]=&quot;BLOCKED&quot;;&quot;RESOLVE CONTRADICTION BEFORE REVIEW — NO AUTHORITY CREATED&quot;;IF([.U1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7]=&quot;READY FOR REVIEW&quot;;&quot;REVIEW ELIGIBLE — NO AUTHORITY&quot;;IF(OR([.U197]=&quot;UNKNOWN&quot;;[.U19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8]=&quot;&quot;;IF(AND([.L198]=&quot;&quot;;[.N198]=&quot;&quot;);&quot;UNKNOWN&quot;;&quot;CONTRADICTION&quot;);IF([.M198]=&quot;UNMATCHED&quot;;IF(AND([.L198]=&quot;&quot;;[.N198]=&quot;&quot;);&quot;CLEAR&quot;;&quot;CONTRADICTION&quot;);IF([.M198]=&quot;SINGLE_SALE_LINKED&quot;;IF(AND([.L198]&lt;&gt;&quot;&quot;;[.N198]=&quot;&quot;);&quot;CLEAR&quot;;&quot;CONTRADICTION&quot;);IF([.M198]=&quot;MULTI_SALE_PENDING_ALLOCATION&quot;;IF([.L198]=&quot;&quot;;&quot;CLEAR&quot;;&quot;CONTRADICTION&quot;);IF([.M198]=&quot;ALLOCATED&quot;;IF(AND([.L198]=&quot;&quot;;[.N198]&lt;&gt;&quot;&quot;);&quot;CLEAR&quot;;&quot;CONTRADICTION&quot;);&quot;CONTRADICTION&quot;)))))">
            <text:p>UNKNOWN</text:p>
          </table:table-cell>
          <table:table-cell office:value-type="string" table:formula="of:=IF([.S198]=&quot;UNKNOWN&quot;;&quot;NO ACTION — linkage status is UNKNOWN / not asserted&quot;;IF([.S198]=&quot;CLEAR&quot;;&quot;NO CONTRADICTION — preserve evidence as entered&quot;;IF([.M198]=&quot;&quot;;&quot;REVIEW LINKAGE STATUS — identifiers are present while status is UNKNOWN&quot;;IF([.M198]=&quot;UNMATCHED&quot;;&quot;REMOVE LINKAGE IDENTIFIERS OR CORRECT LINKAGE STATUS&quot;;IF([.M198]=&quot;SINGLE_SALE_LINKED&quot;;&quot;REQUIRE LINKED SALE ID AND NO ALLOCATION GROUP ID&quot;;IF([.M198]=&quot;MULTI_SALE_PENDING_ALLOCATION&quot;;&quot;REMOVE LINKED SALE ID OR CORRECT LINKAGE STATUS&quot;;IF([.M198]=&quot;ALLOCATED&quot;;&quot;REQUIRE ALLOCATION GROUP ID AND NO LINKED SALE ID&quot;;&quot;REVIEW LINKAGE EVIDENCE — NO AUTHORITY CREATED&quot;)))))))">
            <text:p>NO ACTION — linkage status is UNKNOWN / not asserted</text:p>
          </table:table-cell>
          <table:table-cell office:value-type="string" table:formula="of:=IF([.S198]=&quot;CONTRADICTION&quot;;&quot;BLOCKED&quot;;IF([.S198]=&quot;UNKNOWN&quot;;&quot;UNKNOWN&quot;;IF([.S198]=&quot;CLEAR&quot;;IF(OR([.O198]=&quot;&quot;;[.P198]=&quot;&quot;);&quot;UNKNOWN&quot;;&quot;READY FOR REVIEW&quot;);&quot;BLOCKED&quot;)))">
            <text:p>UNKNOWN</text:p>
          </table:table-cell>
          <table:table-cell office:value-type="string" table:formula="of:=IF([.U198]=&quot;UNKNOWN&quot;;&quot;COMPLETE OR ASSERT REQUIRED EVIDENCE BEFORE REVIEW&quot;;IF([.U198]=&quot;BLOCKED&quot;;&quot;RESOLVE CONTRADICTION BEFORE REVIEW — NO AUTHORITY CREATED&quot;;IF([.U1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8]=&quot;READY FOR REVIEW&quot;;&quot;REVIEW ELIGIBLE — NO AUTHORITY&quot;;IF(OR([.U198]=&quot;UNKNOWN&quot;;[.U19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9]=&quot;&quot;;IF(AND([.L199]=&quot;&quot;;[.N199]=&quot;&quot;);&quot;UNKNOWN&quot;;&quot;CONTRADICTION&quot;);IF([.M199]=&quot;UNMATCHED&quot;;IF(AND([.L199]=&quot;&quot;;[.N199]=&quot;&quot;);&quot;CLEAR&quot;;&quot;CONTRADICTION&quot;);IF([.M199]=&quot;SINGLE_SALE_LINKED&quot;;IF(AND([.L199]&lt;&gt;&quot;&quot;;[.N199]=&quot;&quot;);&quot;CLEAR&quot;;&quot;CONTRADICTION&quot;);IF([.M199]=&quot;MULTI_SALE_PENDING_ALLOCATION&quot;;IF([.L199]=&quot;&quot;;&quot;CLEAR&quot;;&quot;CONTRADICTION&quot;);IF([.M199]=&quot;ALLOCATED&quot;;IF(AND([.L199]=&quot;&quot;;[.N199]&lt;&gt;&quot;&quot;);&quot;CLEAR&quot;;&quot;CONTRADICTION&quot;);&quot;CONTRADICTION&quot;)))))">
            <text:p>UNKNOWN</text:p>
          </table:table-cell>
          <table:table-cell office:value-type="string" table:formula="of:=IF([.S199]=&quot;UNKNOWN&quot;;&quot;NO ACTION — linkage status is UNKNOWN / not asserted&quot;;IF([.S199]=&quot;CLEAR&quot;;&quot;NO CONTRADICTION — preserve evidence as entered&quot;;IF([.M199]=&quot;&quot;;&quot;REVIEW LINKAGE STATUS — identifiers are present while status is UNKNOWN&quot;;IF([.M199]=&quot;UNMATCHED&quot;;&quot;REMOVE LINKAGE IDENTIFIERS OR CORRECT LINKAGE STATUS&quot;;IF([.M199]=&quot;SINGLE_SALE_LINKED&quot;;&quot;REQUIRE LINKED SALE ID AND NO ALLOCATION GROUP ID&quot;;IF([.M199]=&quot;MULTI_SALE_PENDING_ALLOCATION&quot;;&quot;REMOVE LINKED SALE ID OR CORRECT LINKAGE STATUS&quot;;IF([.M199]=&quot;ALLOCATED&quot;;&quot;REQUIRE ALLOCATION GROUP ID AND NO LINKED SALE ID&quot;;&quot;REVIEW LINKAGE EVIDENCE — NO AUTHORITY CREATED&quot;)))))))">
            <text:p>NO ACTION — linkage status is UNKNOWN / not asserted</text:p>
          </table:table-cell>
          <table:table-cell office:value-type="string" table:formula="of:=IF([.S199]=&quot;CONTRADICTION&quot;;&quot;BLOCKED&quot;;IF([.S199]=&quot;UNKNOWN&quot;;&quot;UNKNOWN&quot;;IF([.S199]=&quot;CLEAR&quot;;IF(OR([.O199]=&quot;&quot;;[.P199]=&quot;&quot;);&quot;UNKNOWN&quot;;&quot;READY FOR REVIEW&quot;);&quot;BLOCKED&quot;)))">
            <text:p>UNKNOWN</text:p>
          </table:table-cell>
          <table:table-cell office:value-type="string" table:formula="of:=IF([.U199]=&quot;UNKNOWN&quot;;&quot;COMPLETE OR ASSERT REQUIRED EVIDENCE BEFORE REVIEW&quot;;IF([.U199]=&quot;BLOCKED&quot;;&quot;RESOLVE CONTRADICTION BEFORE REVIEW — NO AUTHORITY CREATED&quot;;IF([.U1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9]=&quot;READY FOR REVIEW&quot;;&quot;REVIEW ELIGIBLE — NO AUTHORITY&quot;;IF(OR([.U199]=&quot;UNKNOWN&quot;;[.U19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0]=&quot;&quot;;IF(AND([.L200]=&quot;&quot;;[.N200]=&quot;&quot;);&quot;UNKNOWN&quot;;&quot;CONTRADICTION&quot;);IF([.M200]=&quot;UNMATCHED&quot;;IF(AND([.L200]=&quot;&quot;;[.N200]=&quot;&quot;);&quot;CLEAR&quot;;&quot;CONTRADICTION&quot;);IF([.M200]=&quot;SINGLE_SALE_LINKED&quot;;IF(AND([.L200]&lt;&gt;&quot;&quot;;[.N200]=&quot;&quot;);&quot;CLEAR&quot;;&quot;CONTRADICTION&quot;);IF([.M200]=&quot;MULTI_SALE_PENDING_ALLOCATION&quot;;IF([.L200]=&quot;&quot;;&quot;CLEAR&quot;;&quot;CONTRADICTION&quot;);IF([.M200]=&quot;ALLOCATED&quot;;IF(AND([.L200]=&quot;&quot;;[.N200]&lt;&gt;&quot;&quot;);&quot;CLEAR&quot;;&quot;CONTRADICTION&quot;);&quot;CONTRADICTION&quot;)))))">
            <text:p>UNKNOWN</text:p>
          </table:table-cell>
          <table:table-cell office:value-type="string" table:formula="of:=IF([.S200]=&quot;UNKNOWN&quot;;&quot;NO ACTION — linkage status is UNKNOWN / not asserted&quot;;IF([.S200]=&quot;CLEAR&quot;;&quot;NO CONTRADICTION — preserve evidence as entered&quot;;IF([.M200]=&quot;&quot;;&quot;REVIEW LINKAGE STATUS — identifiers are present while status is UNKNOWN&quot;;IF([.M200]=&quot;UNMATCHED&quot;;&quot;REMOVE LINKAGE IDENTIFIERS OR CORRECT LINKAGE STATUS&quot;;IF([.M200]=&quot;SINGLE_SALE_LINKED&quot;;&quot;REQUIRE LINKED SALE ID AND NO ALLOCATION GROUP ID&quot;;IF([.M200]=&quot;MULTI_SALE_PENDING_ALLOCATION&quot;;&quot;REMOVE LINKED SALE ID OR CORRECT LINKAGE STATUS&quot;;IF([.M200]=&quot;ALLOCATED&quot;;&quot;REQUIRE ALLOCATION GROUP ID AND NO LINKED SALE ID&quot;;&quot;REVIEW LINKAGE EVIDENCE — NO AUTHORITY CREATED&quot;)))))))">
            <text:p>NO ACTION — linkage status is UNKNOWN / not asserted</text:p>
          </table:table-cell>
          <table:table-cell office:value-type="string" table:formula="of:=IF([.S200]=&quot;CONTRADICTION&quot;;&quot;BLOCKED&quot;;IF([.S200]=&quot;UNKNOWN&quot;;&quot;UNKNOWN&quot;;IF([.S200]=&quot;CLEAR&quot;;IF(OR([.O200]=&quot;&quot;;[.P200]=&quot;&quot;);&quot;UNKNOWN&quot;;&quot;READY FOR REVIEW&quot;);&quot;BLOCKED&quot;)))">
            <text:p>UNKNOWN</text:p>
          </table:table-cell>
          <table:table-cell office:value-type="string" table:formula="of:=IF([.U200]=&quot;UNKNOWN&quot;;&quot;COMPLETE OR ASSERT REQUIRED EVIDENCE BEFORE REVIEW&quot;;IF([.U200]=&quot;BLOCKED&quot;;&quot;RESOLVE CONTRADICTION BEFORE REVIEW — NO AUTHORITY CREATED&quot;;IF([.U2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0]=&quot;READY FOR REVIEW&quot;;&quot;REVIEW ELIGIBLE — NO AUTHORITY&quot;;IF(OR([.U200]=&quot;UNKNOWN&quot;;[.U20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1]=&quot;&quot;;IF(AND([.L201]=&quot;&quot;;[.N201]=&quot;&quot;);&quot;UNKNOWN&quot;;&quot;CONTRADICTION&quot;);IF([.M201]=&quot;UNMATCHED&quot;;IF(AND([.L201]=&quot;&quot;;[.N201]=&quot;&quot;);&quot;CLEAR&quot;;&quot;CONTRADICTION&quot;);IF([.M201]=&quot;SINGLE_SALE_LINKED&quot;;IF(AND([.L201]&lt;&gt;&quot;&quot;;[.N201]=&quot;&quot;);&quot;CLEAR&quot;;&quot;CONTRADICTION&quot;);IF([.M201]=&quot;MULTI_SALE_PENDING_ALLOCATION&quot;;IF([.L201]=&quot;&quot;;&quot;CLEAR&quot;;&quot;CONTRADICTION&quot;);IF([.M201]=&quot;ALLOCATED&quot;;IF(AND([.L201]=&quot;&quot;;[.N201]&lt;&gt;&quot;&quot;);&quot;CLEAR&quot;;&quot;CONTRADICTION&quot;);&quot;CONTRADICTION&quot;)))))">
            <text:p>UNKNOWN</text:p>
          </table:table-cell>
          <table:table-cell office:value-type="string" table:formula="of:=IF([.S201]=&quot;UNKNOWN&quot;;&quot;NO ACTION — linkage status is UNKNOWN / not asserted&quot;;IF([.S201]=&quot;CLEAR&quot;;&quot;NO CONTRADICTION — preserve evidence as entered&quot;;IF([.M201]=&quot;&quot;;&quot;REVIEW LINKAGE STATUS — identifiers are present while status is UNKNOWN&quot;;IF([.M201]=&quot;UNMATCHED&quot;;&quot;REMOVE LINKAGE IDENTIFIERS OR CORRECT LINKAGE STATUS&quot;;IF([.M201]=&quot;SINGLE_SALE_LINKED&quot;;&quot;REQUIRE LINKED SALE ID AND NO ALLOCATION GROUP ID&quot;;IF([.M201]=&quot;MULTI_SALE_PENDING_ALLOCATION&quot;;&quot;REMOVE LINKED SALE ID OR CORRECT LINKAGE STATUS&quot;;IF([.M201]=&quot;ALLOCATED&quot;;&quot;REQUIRE ALLOCATION GROUP ID AND NO LINKED SALE ID&quot;;&quot;REVIEW LINKAGE EVIDENCE — NO AUTHORITY CREATED&quot;)))))))">
            <text:p>NO ACTION — linkage status is UNKNOWN / not asserted</text:p>
          </table:table-cell>
          <table:table-cell office:value-type="string" table:formula="of:=IF([.S201]=&quot;CONTRADICTION&quot;;&quot;BLOCKED&quot;;IF([.S201]=&quot;UNKNOWN&quot;;&quot;UNKNOWN&quot;;IF([.S201]=&quot;CLEAR&quot;;IF(OR([.O201]=&quot;&quot;;[.P201]=&quot;&quot;);&quot;UNKNOWN&quot;;&quot;READY FOR REVIEW&quot;);&quot;BLOCKED&quot;)))">
            <text:p>UNKNOWN</text:p>
          </table:table-cell>
          <table:table-cell office:value-type="string" table:formula="of:=IF([.U201]=&quot;UNKNOWN&quot;;&quot;COMPLETE OR ASSERT REQUIRED EVIDENCE BEFORE REVIEW&quot;;IF([.U201]=&quot;BLOCKED&quot;;&quot;RESOLVE CONTRADICTION BEFORE REVIEW — NO AUTHORITY CREATED&quot;;IF([.U2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1]=&quot;READY FOR REVIEW&quot;;&quot;REVIEW ELIGIBLE — NO AUTHORITY&quot;;IF(OR([.U201]=&quot;UNKNOWN&quot;;[.U20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2]=&quot;&quot;;IF(AND([.L202]=&quot;&quot;;[.N202]=&quot;&quot;);&quot;UNKNOWN&quot;;&quot;CONTRADICTION&quot;);IF([.M202]=&quot;UNMATCHED&quot;;IF(AND([.L202]=&quot;&quot;;[.N202]=&quot;&quot;);&quot;CLEAR&quot;;&quot;CONTRADICTION&quot;);IF([.M202]=&quot;SINGLE_SALE_LINKED&quot;;IF(AND([.L202]&lt;&gt;&quot;&quot;;[.N202]=&quot;&quot;);&quot;CLEAR&quot;;&quot;CONTRADICTION&quot;);IF([.M202]=&quot;MULTI_SALE_PENDING_ALLOCATION&quot;;IF([.L202]=&quot;&quot;;&quot;CLEAR&quot;;&quot;CONTRADICTION&quot;);IF([.M202]=&quot;ALLOCATED&quot;;IF(AND([.L202]=&quot;&quot;;[.N202]&lt;&gt;&quot;&quot;);&quot;CLEAR&quot;;&quot;CONTRADICTION&quot;);&quot;CONTRADICTION&quot;)))))">
            <text:p>UNKNOWN</text:p>
          </table:table-cell>
          <table:table-cell office:value-type="string" table:formula="of:=IF([.S202]=&quot;UNKNOWN&quot;;&quot;NO ACTION — linkage status is UNKNOWN / not asserted&quot;;IF([.S202]=&quot;CLEAR&quot;;&quot;NO CONTRADICTION — preserve evidence as entered&quot;;IF([.M202]=&quot;&quot;;&quot;REVIEW LINKAGE STATUS — identifiers are present while status is UNKNOWN&quot;;IF([.M202]=&quot;UNMATCHED&quot;;&quot;REMOVE LINKAGE IDENTIFIERS OR CORRECT LINKAGE STATUS&quot;;IF([.M202]=&quot;SINGLE_SALE_LINKED&quot;;&quot;REQUIRE LINKED SALE ID AND NO ALLOCATION GROUP ID&quot;;IF([.M202]=&quot;MULTI_SALE_PENDING_ALLOCATION&quot;;&quot;REMOVE LINKED SALE ID OR CORRECT LINKAGE STATUS&quot;;IF([.M202]=&quot;ALLOCATED&quot;;&quot;REQUIRE ALLOCATION GROUP ID AND NO LINKED SALE ID&quot;;&quot;REVIEW LINKAGE EVIDENCE — NO AUTHORITY CREATED&quot;)))))))">
            <text:p>NO ACTION — linkage status is UNKNOWN / not asserted</text:p>
          </table:table-cell>
          <table:table-cell office:value-type="string" table:formula="of:=IF([.S202]=&quot;CONTRADICTION&quot;;&quot;BLOCKED&quot;;IF([.S202]=&quot;UNKNOWN&quot;;&quot;UNKNOWN&quot;;IF([.S202]=&quot;CLEAR&quot;;IF(OR([.O202]=&quot;&quot;;[.P202]=&quot;&quot;);&quot;UNKNOWN&quot;;&quot;READY FOR REVIEW&quot;);&quot;BLOCKED&quot;)))">
            <text:p>UNKNOWN</text:p>
          </table:table-cell>
          <table:table-cell office:value-type="string" table:formula="of:=IF([.U202]=&quot;UNKNOWN&quot;;&quot;COMPLETE OR ASSERT REQUIRED EVIDENCE BEFORE REVIEW&quot;;IF([.U202]=&quot;BLOCKED&quot;;&quot;RESOLVE CONTRADICTION BEFORE REVIEW — NO AUTHORITY CREATED&quot;;IF([.U2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2]=&quot;READY FOR REVIEW&quot;;&quot;REVIEW ELIGIBLE — NO AUTHORITY&quot;;IF(OR([.U202]=&quot;UNKNOWN&quot;;[.U20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3]=&quot;&quot;;IF(AND([.L203]=&quot;&quot;;[.N203]=&quot;&quot;);&quot;UNKNOWN&quot;;&quot;CONTRADICTION&quot;);IF([.M203]=&quot;UNMATCHED&quot;;IF(AND([.L203]=&quot;&quot;;[.N203]=&quot;&quot;);&quot;CLEAR&quot;;&quot;CONTRADICTION&quot;);IF([.M203]=&quot;SINGLE_SALE_LINKED&quot;;IF(AND([.L203]&lt;&gt;&quot;&quot;;[.N203]=&quot;&quot;);&quot;CLEAR&quot;;&quot;CONTRADICTION&quot;);IF([.M203]=&quot;MULTI_SALE_PENDING_ALLOCATION&quot;;IF([.L203]=&quot;&quot;;&quot;CLEAR&quot;;&quot;CONTRADICTION&quot;);IF([.M203]=&quot;ALLOCATED&quot;;IF(AND([.L203]=&quot;&quot;;[.N203]&lt;&gt;&quot;&quot;);&quot;CLEAR&quot;;&quot;CONTRADICTION&quot;);&quot;CONTRADICTION&quot;)))))">
            <text:p>UNKNOWN</text:p>
          </table:table-cell>
          <table:table-cell office:value-type="string" table:formula="of:=IF([.S203]=&quot;UNKNOWN&quot;;&quot;NO ACTION — linkage status is UNKNOWN / not asserted&quot;;IF([.S203]=&quot;CLEAR&quot;;&quot;NO CONTRADICTION — preserve evidence as entered&quot;;IF([.M203]=&quot;&quot;;&quot;REVIEW LINKAGE STATUS — identifiers are present while status is UNKNOWN&quot;;IF([.M203]=&quot;UNMATCHED&quot;;&quot;REMOVE LINKAGE IDENTIFIERS OR CORRECT LINKAGE STATUS&quot;;IF([.M203]=&quot;SINGLE_SALE_LINKED&quot;;&quot;REQUIRE LINKED SALE ID AND NO ALLOCATION GROUP ID&quot;;IF([.M203]=&quot;MULTI_SALE_PENDING_ALLOCATION&quot;;&quot;REMOVE LINKED SALE ID OR CORRECT LINKAGE STATUS&quot;;IF([.M203]=&quot;ALLOCATED&quot;;&quot;REQUIRE ALLOCATION GROUP ID AND NO LINKED SALE ID&quot;;&quot;REVIEW LINKAGE EVIDENCE — NO AUTHORITY CREATED&quot;)))))))">
            <text:p>NO ACTION — linkage status is UNKNOWN / not asserted</text:p>
          </table:table-cell>
          <table:table-cell office:value-type="string" table:formula="of:=IF([.S203]=&quot;CONTRADICTION&quot;;&quot;BLOCKED&quot;;IF([.S203]=&quot;UNKNOWN&quot;;&quot;UNKNOWN&quot;;IF([.S203]=&quot;CLEAR&quot;;IF(OR([.O203]=&quot;&quot;;[.P203]=&quot;&quot;);&quot;UNKNOWN&quot;;&quot;READY FOR REVIEW&quot;);&quot;BLOCKED&quot;)))">
            <text:p>UNKNOWN</text:p>
          </table:table-cell>
          <table:table-cell office:value-type="string" table:formula="of:=IF([.U203]=&quot;UNKNOWN&quot;;&quot;COMPLETE OR ASSERT REQUIRED EVIDENCE BEFORE REVIEW&quot;;IF([.U203]=&quot;BLOCKED&quot;;&quot;RESOLVE CONTRADICTION BEFORE REVIEW — NO AUTHORITY CREATED&quot;;IF([.U2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3]=&quot;READY FOR REVIEW&quot;;&quot;REVIEW ELIGIBLE — NO AUTHORITY&quot;;IF(OR([.U203]=&quot;UNKNOWN&quot;;[.U20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4]=&quot;&quot;;IF(AND([.L204]=&quot;&quot;;[.N204]=&quot;&quot;);&quot;UNKNOWN&quot;;&quot;CONTRADICTION&quot;);IF([.M204]=&quot;UNMATCHED&quot;;IF(AND([.L204]=&quot;&quot;;[.N204]=&quot;&quot;);&quot;CLEAR&quot;;&quot;CONTRADICTION&quot;);IF([.M204]=&quot;SINGLE_SALE_LINKED&quot;;IF(AND([.L204]&lt;&gt;&quot;&quot;;[.N204]=&quot;&quot;);&quot;CLEAR&quot;;&quot;CONTRADICTION&quot;);IF([.M204]=&quot;MULTI_SALE_PENDING_ALLOCATION&quot;;IF([.L204]=&quot;&quot;;&quot;CLEAR&quot;;&quot;CONTRADICTION&quot;);IF([.M204]=&quot;ALLOCATED&quot;;IF(AND([.L204]=&quot;&quot;;[.N204]&lt;&gt;&quot;&quot;);&quot;CLEAR&quot;;&quot;CONTRADICTION&quot;);&quot;CONTRADICTION&quot;)))))">
            <text:p>UNKNOWN</text:p>
          </table:table-cell>
          <table:table-cell office:value-type="string" table:formula="of:=IF([.S204]=&quot;UNKNOWN&quot;;&quot;NO ACTION — linkage status is UNKNOWN / not asserted&quot;;IF([.S204]=&quot;CLEAR&quot;;&quot;NO CONTRADICTION — preserve evidence as entered&quot;;IF([.M204]=&quot;&quot;;&quot;REVIEW LINKAGE STATUS — identifiers are present while status is UNKNOWN&quot;;IF([.M204]=&quot;UNMATCHED&quot;;&quot;REMOVE LINKAGE IDENTIFIERS OR CORRECT LINKAGE STATUS&quot;;IF([.M204]=&quot;SINGLE_SALE_LINKED&quot;;&quot;REQUIRE LINKED SALE ID AND NO ALLOCATION GROUP ID&quot;;IF([.M204]=&quot;MULTI_SALE_PENDING_ALLOCATION&quot;;&quot;REMOVE LINKED SALE ID OR CORRECT LINKAGE STATUS&quot;;IF([.M204]=&quot;ALLOCATED&quot;;&quot;REQUIRE ALLOCATION GROUP ID AND NO LINKED SALE ID&quot;;&quot;REVIEW LINKAGE EVIDENCE — NO AUTHORITY CREATED&quot;)))))))">
            <text:p>NO ACTION — linkage status is UNKNOWN / not asserted</text:p>
          </table:table-cell>
          <table:table-cell office:value-type="string" table:formula="of:=IF([.S204]=&quot;CONTRADICTION&quot;;&quot;BLOCKED&quot;;IF([.S204]=&quot;UNKNOWN&quot;;&quot;UNKNOWN&quot;;IF([.S204]=&quot;CLEAR&quot;;IF(OR([.O204]=&quot;&quot;;[.P204]=&quot;&quot;);&quot;UNKNOWN&quot;;&quot;READY FOR REVIEW&quot;);&quot;BLOCKED&quot;)))">
            <text:p>UNKNOWN</text:p>
          </table:table-cell>
          <table:table-cell office:value-type="string" table:formula="of:=IF([.U204]=&quot;UNKNOWN&quot;;&quot;COMPLETE OR ASSERT REQUIRED EVIDENCE BEFORE REVIEW&quot;;IF([.U204]=&quot;BLOCKED&quot;;&quot;RESOLVE CONTRADICTION BEFORE REVIEW — NO AUTHORITY CREATED&quot;;IF([.U2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4]=&quot;READY FOR REVIEW&quot;;&quot;REVIEW ELIGIBLE — NO AUTHORITY&quot;;IF(OR([.U204]=&quot;UNKNOWN&quot;;[.U20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5]=&quot;&quot;;IF(AND([.L205]=&quot;&quot;;[.N205]=&quot;&quot;);&quot;UNKNOWN&quot;;&quot;CONTRADICTION&quot;);IF([.M205]=&quot;UNMATCHED&quot;;IF(AND([.L205]=&quot;&quot;;[.N205]=&quot;&quot;);&quot;CLEAR&quot;;&quot;CONTRADICTION&quot;);IF([.M205]=&quot;SINGLE_SALE_LINKED&quot;;IF(AND([.L205]&lt;&gt;&quot;&quot;;[.N205]=&quot;&quot;);&quot;CLEAR&quot;;&quot;CONTRADICTION&quot;);IF([.M205]=&quot;MULTI_SALE_PENDING_ALLOCATION&quot;;IF([.L205]=&quot;&quot;;&quot;CLEAR&quot;;&quot;CONTRADICTION&quot;);IF([.M205]=&quot;ALLOCATED&quot;;IF(AND([.L205]=&quot;&quot;;[.N205]&lt;&gt;&quot;&quot;);&quot;CLEAR&quot;;&quot;CONTRADICTION&quot;);&quot;CONTRADICTION&quot;)))))">
            <text:p>UNKNOWN</text:p>
          </table:table-cell>
          <table:table-cell office:value-type="string" table:formula="of:=IF([.S205]=&quot;UNKNOWN&quot;;&quot;NO ACTION — linkage status is UNKNOWN / not asserted&quot;;IF([.S205]=&quot;CLEAR&quot;;&quot;NO CONTRADICTION — preserve evidence as entered&quot;;IF([.M205]=&quot;&quot;;&quot;REVIEW LINKAGE STATUS — identifiers are present while status is UNKNOWN&quot;;IF([.M205]=&quot;UNMATCHED&quot;;&quot;REMOVE LINKAGE IDENTIFIERS OR CORRECT LINKAGE STATUS&quot;;IF([.M205]=&quot;SINGLE_SALE_LINKED&quot;;&quot;REQUIRE LINKED SALE ID AND NO ALLOCATION GROUP ID&quot;;IF([.M205]=&quot;MULTI_SALE_PENDING_ALLOCATION&quot;;&quot;REMOVE LINKED SALE ID OR CORRECT LINKAGE STATUS&quot;;IF([.M205]=&quot;ALLOCATED&quot;;&quot;REQUIRE ALLOCATION GROUP ID AND NO LINKED SALE ID&quot;;&quot;REVIEW LINKAGE EVIDENCE — NO AUTHORITY CREATED&quot;)))))))">
            <text:p>NO ACTION — linkage status is UNKNOWN / not asserted</text:p>
          </table:table-cell>
          <table:table-cell office:value-type="string" table:formula="of:=IF([.S205]=&quot;CONTRADICTION&quot;;&quot;BLOCKED&quot;;IF([.S205]=&quot;UNKNOWN&quot;;&quot;UNKNOWN&quot;;IF([.S205]=&quot;CLEAR&quot;;IF(OR([.O205]=&quot;&quot;;[.P205]=&quot;&quot;);&quot;UNKNOWN&quot;;&quot;READY FOR REVIEW&quot;);&quot;BLOCKED&quot;)))">
            <text:p>UNKNOWN</text:p>
          </table:table-cell>
          <table:table-cell office:value-type="string" table:formula="of:=IF([.U205]=&quot;UNKNOWN&quot;;&quot;COMPLETE OR ASSERT REQUIRED EVIDENCE BEFORE REVIEW&quot;;IF([.U205]=&quot;BLOCKED&quot;;&quot;RESOLVE CONTRADICTION BEFORE REVIEW — NO AUTHORITY CREATED&quot;;IF([.U2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5]=&quot;READY FOR REVIEW&quot;;&quot;REVIEW ELIGIBLE — NO AUTHORITY&quot;;IF(OR([.U205]=&quot;UNKNOWN&quot;;[.U20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6]=&quot;&quot;;IF(AND([.L206]=&quot;&quot;;[.N206]=&quot;&quot;);&quot;UNKNOWN&quot;;&quot;CONTRADICTION&quot;);IF([.M206]=&quot;UNMATCHED&quot;;IF(AND([.L206]=&quot;&quot;;[.N206]=&quot;&quot;);&quot;CLEAR&quot;;&quot;CONTRADICTION&quot;);IF([.M206]=&quot;SINGLE_SALE_LINKED&quot;;IF(AND([.L206]&lt;&gt;&quot;&quot;;[.N206]=&quot;&quot;);&quot;CLEAR&quot;;&quot;CONTRADICTION&quot;);IF([.M206]=&quot;MULTI_SALE_PENDING_ALLOCATION&quot;;IF([.L206]=&quot;&quot;;&quot;CLEAR&quot;;&quot;CONTRADICTION&quot;);IF([.M206]=&quot;ALLOCATED&quot;;IF(AND([.L206]=&quot;&quot;;[.N206]&lt;&gt;&quot;&quot;);&quot;CLEAR&quot;;&quot;CONTRADICTION&quot;);&quot;CONTRADICTION&quot;)))))">
            <text:p>UNKNOWN</text:p>
          </table:table-cell>
          <table:table-cell office:value-type="string" table:formula="of:=IF([.S206]=&quot;UNKNOWN&quot;;&quot;NO ACTION — linkage status is UNKNOWN / not asserted&quot;;IF([.S206]=&quot;CLEAR&quot;;&quot;NO CONTRADICTION — preserve evidence as entered&quot;;IF([.M206]=&quot;&quot;;&quot;REVIEW LINKAGE STATUS — identifiers are present while status is UNKNOWN&quot;;IF([.M206]=&quot;UNMATCHED&quot;;&quot;REMOVE LINKAGE IDENTIFIERS OR CORRECT LINKAGE STATUS&quot;;IF([.M206]=&quot;SINGLE_SALE_LINKED&quot;;&quot;REQUIRE LINKED SALE ID AND NO ALLOCATION GROUP ID&quot;;IF([.M206]=&quot;MULTI_SALE_PENDING_ALLOCATION&quot;;&quot;REMOVE LINKED SALE ID OR CORRECT LINKAGE STATUS&quot;;IF([.M206]=&quot;ALLOCATED&quot;;&quot;REQUIRE ALLOCATION GROUP ID AND NO LINKED SALE ID&quot;;&quot;REVIEW LINKAGE EVIDENCE — NO AUTHORITY CREATED&quot;)))))))">
            <text:p>NO ACTION — linkage status is UNKNOWN / not asserted</text:p>
          </table:table-cell>
          <table:table-cell office:value-type="string" table:formula="of:=IF([.S206]=&quot;CONTRADICTION&quot;;&quot;BLOCKED&quot;;IF([.S206]=&quot;UNKNOWN&quot;;&quot;UNKNOWN&quot;;IF([.S206]=&quot;CLEAR&quot;;IF(OR([.O206]=&quot;&quot;;[.P206]=&quot;&quot;);&quot;UNKNOWN&quot;;&quot;READY FOR REVIEW&quot;);&quot;BLOCKED&quot;)))">
            <text:p>UNKNOWN</text:p>
          </table:table-cell>
          <table:table-cell office:value-type="string" table:formula="of:=IF([.U206]=&quot;UNKNOWN&quot;;&quot;COMPLETE OR ASSERT REQUIRED EVIDENCE BEFORE REVIEW&quot;;IF([.U206]=&quot;BLOCKED&quot;;&quot;RESOLVE CONTRADICTION BEFORE REVIEW — NO AUTHORITY CREATED&quot;;IF([.U2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6]=&quot;READY FOR REVIEW&quot;;&quot;REVIEW ELIGIBLE — NO AUTHORITY&quot;;IF(OR([.U206]=&quot;UNKNOWN&quot;;[.U20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7]=&quot;&quot;;IF(AND([.L207]=&quot;&quot;;[.N207]=&quot;&quot;);&quot;UNKNOWN&quot;;&quot;CONTRADICTION&quot;);IF([.M207]=&quot;UNMATCHED&quot;;IF(AND([.L207]=&quot;&quot;;[.N207]=&quot;&quot;);&quot;CLEAR&quot;;&quot;CONTRADICTION&quot;);IF([.M207]=&quot;SINGLE_SALE_LINKED&quot;;IF(AND([.L207]&lt;&gt;&quot;&quot;;[.N207]=&quot;&quot;);&quot;CLEAR&quot;;&quot;CONTRADICTION&quot;);IF([.M207]=&quot;MULTI_SALE_PENDING_ALLOCATION&quot;;IF([.L207]=&quot;&quot;;&quot;CLEAR&quot;;&quot;CONTRADICTION&quot;);IF([.M207]=&quot;ALLOCATED&quot;;IF(AND([.L207]=&quot;&quot;;[.N207]&lt;&gt;&quot;&quot;);&quot;CLEAR&quot;;&quot;CONTRADICTION&quot;);&quot;CONTRADICTION&quot;)))))">
            <text:p>UNKNOWN</text:p>
          </table:table-cell>
          <table:table-cell office:value-type="string" table:formula="of:=IF([.S207]=&quot;UNKNOWN&quot;;&quot;NO ACTION — linkage status is UNKNOWN / not asserted&quot;;IF([.S207]=&quot;CLEAR&quot;;&quot;NO CONTRADICTION — preserve evidence as entered&quot;;IF([.M207]=&quot;&quot;;&quot;REVIEW LINKAGE STATUS — identifiers are present while status is UNKNOWN&quot;;IF([.M207]=&quot;UNMATCHED&quot;;&quot;REMOVE LINKAGE IDENTIFIERS OR CORRECT LINKAGE STATUS&quot;;IF([.M207]=&quot;SINGLE_SALE_LINKED&quot;;&quot;REQUIRE LINKED SALE ID AND NO ALLOCATION GROUP ID&quot;;IF([.M207]=&quot;MULTI_SALE_PENDING_ALLOCATION&quot;;&quot;REMOVE LINKED SALE ID OR CORRECT LINKAGE STATUS&quot;;IF([.M207]=&quot;ALLOCATED&quot;;&quot;REQUIRE ALLOCATION GROUP ID AND NO LINKED SALE ID&quot;;&quot;REVIEW LINKAGE EVIDENCE — NO AUTHORITY CREATED&quot;)))))))">
            <text:p>NO ACTION — linkage status is UNKNOWN / not asserted</text:p>
          </table:table-cell>
          <table:table-cell office:value-type="string" table:formula="of:=IF([.S207]=&quot;CONTRADICTION&quot;;&quot;BLOCKED&quot;;IF([.S207]=&quot;UNKNOWN&quot;;&quot;UNKNOWN&quot;;IF([.S207]=&quot;CLEAR&quot;;IF(OR([.O207]=&quot;&quot;;[.P207]=&quot;&quot;);&quot;UNKNOWN&quot;;&quot;READY FOR REVIEW&quot;);&quot;BLOCKED&quot;)))">
            <text:p>UNKNOWN</text:p>
          </table:table-cell>
          <table:table-cell office:value-type="string" table:formula="of:=IF([.U207]=&quot;UNKNOWN&quot;;&quot;COMPLETE OR ASSERT REQUIRED EVIDENCE BEFORE REVIEW&quot;;IF([.U207]=&quot;BLOCKED&quot;;&quot;RESOLVE CONTRADICTION BEFORE REVIEW — NO AUTHORITY CREATED&quot;;IF([.U2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7]=&quot;READY FOR REVIEW&quot;;&quot;REVIEW ELIGIBLE — NO AUTHORITY&quot;;IF(OR([.U207]=&quot;UNKNOWN&quot;;[.U20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8]=&quot;&quot;;IF(AND([.L208]=&quot;&quot;;[.N208]=&quot;&quot;);&quot;UNKNOWN&quot;;&quot;CONTRADICTION&quot;);IF([.M208]=&quot;UNMATCHED&quot;;IF(AND([.L208]=&quot;&quot;;[.N208]=&quot;&quot;);&quot;CLEAR&quot;;&quot;CONTRADICTION&quot;);IF([.M208]=&quot;SINGLE_SALE_LINKED&quot;;IF(AND([.L208]&lt;&gt;&quot;&quot;;[.N208]=&quot;&quot;);&quot;CLEAR&quot;;&quot;CONTRADICTION&quot;);IF([.M208]=&quot;MULTI_SALE_PENDING_ALLOCATION&quot;;IF([.L208]=&quot;&quot;;&quot;CLEAR&quot;;&quot;CONTRADICTION&quot;);IF([.M208]=&quot;ALLOCATED&quot;;IF(AND([.L208]=&quot;&quot;;[.N208]&lt;&gt;&quot;&quot;);&quot;CLEAR&quot;;&quot;CONTRADICTION&quot;);&quot;CONTRADICTION&quot;)))))">
            <text:p>UNKNOWN</text:p>
          </table:table-cell>
          <table:table-cell office:value-type="string" table:formula="of:=IF([.S208]=&quot;UNKNOWN&quot;;&quot;NO ACTION — linkage status is UNKNOWN / not asserted&quot;;IF([.S208]=&quot;CLEAR&quot;;&quot;NO CONTRADICTION — preserve evidence as entered&quot;;IF([.M208]=&quot;&quot;;&quot;REVIEW LINKAGE STATUS — identifiers are present while status is UNKNOWN&quot;;IF([.M208]=&quot;UNMATCHED&quot;;&quot;REMOVE LINKAGE IDENTIFIERS OR CORRECT LINKAGE STATUS&quot;;IF([.M208]=&quot;SINGLE_SALE_LINKED&quot;;&quot;REQUIRE LINKED SALE ID AND NO ALLOCATION GROUP ID&quot;;IF([.M208]=&quot;MULTI_SALE_PENDING_ALLOCATION&quot;;&quot;REMOVE LINKED SALE ID OR CORRECT LINKAGE STATUS&quot;;IF([.M208]=&quot;ALLOCATED&quot;;&quot;REQUIRE ALLOCATION GROUP ID AND NO LINKED SALE ID&quot;;&quot;REVIEW LINKAGE EVIDENCE — NO AUTHORITY CREATED&quot;)))))))">
            <text:p>NO ACTION — linkage status is UNKNOWN / not asserted</text:p>
          </table:table-cell>
          <table:table-cell office:value-type="string" table:formula="of:=IF([.S208]=&quot;CONTRADICTION&quot;;&quot;BLOCKED&quot;;IF([.S208]=&quot;UNKNOWN&quot;;&quot;UNKNOWN&quot;;IF([.S208]=&quot;CLEAR&quot;;IF(OR([.O208]=&quot;&quot;;[.P208]=&quot;&quot;);&quot;UNKNOWN&quot;;&quot;READY FOR REVIEW&quot;);&quot;BLOCKED&quot;)))">
            <text:p>UNKNOWN</text:p>
          </table:table-cell>
          <table:table-cell office:value-type="string" table:formula="of:=IF([.U208]=&quot;UNKNOWN&quot;;&quot;COMPLETE OR ASSERT REQUIRED EVIDENCE BEFORE REVIEW&quot;;IF([.U208]=&quot;BLOCKED&quot;;&quot;RESOLVE CONTRADICTION BEFORE REVIEW — NO AUTHORITY CREATED&quot;;IF([.U2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8]=&quot;READY FOR REVIEW&quot;;&quot;REVIEW ELIGIBLE — NO AUTHORITY&quot;;IF(OR([.U208]=&quot;UNKNOWN&quot;;[.U20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9]=&quot;&quot;;IF(AND([.L209]=&quot;&quot;;[.N209]=&quot;&quot;);&quot;UNKNOWN&quot;;&quot;CONTRADICTION&quot;);IF([.M209]=&quot;UNMATCHED&quot;;IF(AND([.L209]=&quot;&quot;;[.N209]=&quot;&quot;);&quot;CLEAR&quot;;&quot;CONTRADICTION&quot;);IF([.M209]=&quot;SINGLE_SALE_LINKED&quot;;IF(AND([.L209]&lt;&gt;&quot;&quot;;[.N209]=&quot;&quot;);&quot;CLEAR&quot;;&quot;CONTRADICTION&quot;);IF([.M209]=&quot;MULTI_SALE_PENDING_ALLOCATION&quot;;IF([.L209]=&quot;&quot;;&quot;CLEAR&quot;;&quot;CONTRADICTION&quot;);IF([.M209]=&quot;ALLOCATED&quot;;IF(AND([.L209]=&quot;&quot;;[.N209]&lt;&gt;&quot;&quot;);&quot;CLEAR&quot;;&quot;CONTRADICTION&quot;);&quot;CONTRADICTION&quot;)))))">
            <text:p>UNKNOWN</text:p>
          </table:table-cell>
          <table:table-cell office:value-type="string" table:formula="of:=IF([.S209]=&quot;UNKNOWN&quot;;&quot;NO ACTION — linkage status is UNKNOWN / not asserted&quot;;IF([.S209]=&quot;CLEAR&quot;;&quot;NO CONTRADICTION — preserve evidence as entered&quot;;IF([.M209]=&quot;&quot;;&quot;REVIEW LINKAGE STATUS — identifiers are present while status is UNKNOWN&quot;;IF([.M209]=&quot;UNMATCHED&quot;;&quot;REMOVE LINKAGE IDENTIFIERS OR CORRECT LINKAGE STATUS&quot;;IF([.M209]=&quot;SINGLE_SALE_LINKED&quot;;&quot;REQUIRE LINKED SALE ID AND NO ALLOCATION GROUP ID&quot;;IF([.M209]=&quot;MULTI_SALE_PENDING_ALLOCATION&quot;;&quot;REMOVE LINKED SALE ID OR CORRECT LINKAGE STATUS&quot;;IF([.M209]=&quot;ALLOCATED&quot;;&quot;REQUIRE ALLOCATION GROUP ID AND NO LINKED SALE ID&quot;;&quot;REVIEW LINKAGE EVIDENCE — NO AUTHORITY CREATED&quot;)))))))">
            <text:p>NO ACTION — linkage status is UNKNOWN / not asserted</text:p>
          </table:table-cell>
          <table:table-cell office:value-type="string" table:formula="of:=IF([.S209]=&quot;CONTRADICTION&quot;;&quot;BLOCKED&quot;;IF([.S209]=&quot;UNKNOWN&quot;;&quot;UNKNOWN&quot;;IF([.S209]=&quot;CLEAR&quot;;IF(OR([.O209]=&quot;&quot;;[.P209]=&quot;&quot;);&quot;UNKNOWN&quot;;&quot;READY FOR REVIEW&quot;);&quot;BLOCKED&quot;)))">
            <text:p>UNKNOWN</text:p>
          </table:table-cell>
          <table:table-cell office:value-type="string" table:formula="of:=IF([.U209]=&quot;UNKNOWN&quot;;&quot;COMPLETE OR ASSERT REQUIRED EVIDENCE BEFORE REVIEW&quot;;IF([.U209]=&quot;BLOCKED&quot;;&quot;RESOLVE CONTRADICTION BEFORE REVIEW — NO AUTHORITY CREATED&quot;;IF([.U2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9]=&quot;READY FOR REVIEW&quot;;&quot;REVIEW ELIGIBLE — NO AUTHORITY&quot;;IF(OR([.U209]=&quot;UNKNOWN&quot;;[.U20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0]=&quot;&quot;;IF(AND([.L210]=&quot;&quot;;[.N210]=&quot;&quot;);&quot;UNKNOWN&quot;;&quot;CONTRADICTION&quot;);IF([.M210]=&quot;UNMATCHED&quot;;IF(AND([.L210]=&quot;&quot;;[.N210]=&quot;&quot;);&quot;CLEAR&quot;;&quot;CONTRADICTION&quot;);IF([.M210]=&quot;SINGLE_SALE_LINKED&quot;;IF(AND([.L210]&lt;&gt;&quot;&quot;;[.N210]=&quot;&quot;);&quot;CLEAR&quot;;&quot;CONTRADICTION&quot;);IF([.M210]=&quot;MULTI_SALE_PENDING_ALLOCATION&quot;;IF([.L210]=&quot;&quot;;&quot;CLEAR&quot;;&quot;CONTRADICTION&quot;);IF([.M210]=&quot;ALLOCATED&quot;;IF(AND([.L210]=&quot;&quot;;[.N210]&lt;&gt;&quot;&quot;);&quot;CLEAR&quot;;&quot;CONTRADICTION&quot;);&quot;CONTRADICTION&quot;)))))">
            <text:p>UNKNOWN</text:p>
          </table:table-cell>
          <table:table-cell office:value-type="string" table:formula="of:=IF([.S210]=&quot;UNKNOWN&quot;;&quot;NO ACTION — linkage status is UNKNOWN / not asserted&quot;;IF([.S210]=&quot;CLEAR&quot;;&quot;NO CONTRADICTION — preserve evidence as entered&quot;;IF([.M210]=&quot;&quot;;&quot;REVIEW LINKAGE STATUS — identifiers are present while status is UNKNOWN&quot;;IF([.M210]=&quot;UNMATCHED&quot;;&quot;REMOVE LINKAGE IDENTIFIERS OR CORRECT LINKAGE STATUS&quot;;IF([.M210]=&quot;SINGLE_SALE_LINKED&quot;;&quot;REQUIRE LINKED SALE ID AND NO ALLOCATION GROUP ID&quot;;IF([.M210]=&quot;MULTI_SALE_PENDING_ALLOCATION&quot;;&quot;REMOVE LINKED SALE ID OR CORRECT LINKAGE STATUS&quot;;IF([.M210]=&quot;ALLOCATED&quot;;&quot;REQUIRE ALLOCATION GROUP ID AND NO LINKED SALE ID&quot;;&quot;REVIEW LINKAGE EVIDENCE — NO AUTHORITY CREATED&quot;)))))))">
            <text:p>NO ACTION — linkage status is UNKNOWN / not asserted</text:p>
          </table:table-cell>
          <table:table-cell office:value-type="string" table:formula="of:=IF([.S210]=&quot;CONTRADICTION&quot;;&quot;BLOCKED&quot;;IF([.S210]=&quot;UNKNOWN&quot;;&quot;UNKNOWN&quot;;IF([.S210]=&quot;CLEAR&quot;;IF(OR([.O210]=&quot;&quot;;[.P210]=&quot;&quot;);&quot;UNKNOWN&quot;;&quot;READY FOR REVIEW&quot;);&quot;BLOCKED&quot;)))">
            <text:p>UNKNOWN</text:p>
          </table:table-cell>
          <table:table-cell office:value-type="string" table:formula="of:=IF([.U210]=&quot;UNKNOWN&quot;;&quot;COMPLETE OR ASSERT REQUIRED EVIDENCE BEFORE REVIEW&quot;;IF([.U210]=&quot;BLOCKED&quot;;&quot;RESOLVE CONTRADICTION BEFORE REVIEW — NO AUTHORITY CREATED&quot;;IF([.U2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0]=&quot;READY FOR REVIEW&quot;;&quot;REVIEW ELIGIBLE — NO AUTHORITY&quot;;IF(OR([.U210]=&quot;UNKNOWN&quot;;[.U21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1]=&quot;&quot;;IF(AND([.L211]=&quot;&quot;;[.N211]=&quot;&quot;);&quot;UNKNOWN&quot;;&quot;CONTRADICTION&quot;);IF([.M211]=&quot;UNMATCHED&quot;;IF(AND([.L211]=&quot;&quot;;[.N211]=&quot;&quot;);&quot;CLEAR&quot;;&quot;CONTRADICTION&quot;);IF([.M211]=&quot;SINGLE_SALE_LINKED&quot;;IF(AND([.L211]&lt;&gt;&quot;&quot;;[.N211]=&quot;&quot;);&quot;CLEAR&quot;;&quot;CONTRADICTION&quot;);IF([.M211]=&quot;MULTI_SALE_PENDING_ALLOCATION&quot;;IF([.L211]=&quot;&quot;;&quot;CLEAR&quot;;&quot;CONTRADICTION&quot;);IF([.M211]=&quot;ALLOCATED&quot;;IF(AND([.L211]=&quot;&quot;;[.N211]&lt;&gt;&quot;&quot;);&quot;CLEAR&quot;;&quot;CONTRADICTION&quot;);&quot;CONTRADICTION&quot;)))))">
            <text:p>UNKNOWN</text:p>
          </table:table-cell>
          <table:table-cell office:value-type="string" table:formula="of:=IF([.S211]=&quot;UNKNOWN&quot;;&quot;NO ACTION — linkage status is UNKNOWN / not asserted&quot;;IF([.S211]=&quot;CLEAR&quot;;&quot;NO CONTRADICTION — preserve evidence as entered&quot;;IF([.M211]=&quot;&quot;;&quot;REVIEW LINKAGE STATUS — identifiers are present while status is UNKNOWN&quot;;IF([.M211]=&quot;UNMATCHED&quot;;&quot;REMOVE LINKAGE IDENTIFIERS OR CORRECT LINKAGE STATUS&quot;;IF([.M211]=&quot;SINGLE_SALE_LINKED&quot;;&quot;REQUIRE LINKED SALE ID AND NO ALLOCATION GROUP ID&quot;;IF([.M211]=&quot;MULTI_SALE_PENDING_ALLOCATION&quot;;&quot;REMOVE LINKED SALE ID OR CORRECT LINKAGE STATUS&quot;;IF([.M211]=&quot;ALLOCATED&quot;;&quot;REQUIRE ALLOCATION GROUP ID AND NO LINKED SALE ID&quot;;&quot;REVIEW LINKAGE EVIDENCE — NO AUTHORITY CREATED&quot;)))))))">
            <text:p>NO ACTION — linkage status is UNKNOWN / not asserted</text:p>
          </table:table-cell>
          <table:table-cell office:value-type="string" table:formula="of:=IF([.S211]=&quot;CONTRADICTION&quot;;&quot;BLOCKED&quot;;IF([.S211]=&quot;UNKNOWN&quot;;&quot;UNKNOWN&quot;;IF([.S211]=&quot;CLEAR&quot;;IF(OR([.O211]=&quot;&quot;;[.P211]=&quot;&quot;);&quot;UNKNOWN&quot;;&quot;READY FOR REVIEW&quot;);&quot;BLOCKED&quot;)))">
            <text:p>UNKNOWN</text:p>
          </table:table-cell>
          <table:table-cell office:value-type="string" table:formula="of:=IF([.U211]=&quot;UNKNOWN&quot;;&quot;COMPLETE OR ASSERT REQUIRED EVIDENCE BEFORE REVIEW&quot;;IF([.U211]=&quot;BLOCKED&quot;;&quot;RESOLVE CONTRADICTION BEFORE REVIEW — NO AUTHORITY CREATED&quot;;IF([.U2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1]=&quot;READY FOR REVIEW&quot;;&quot;REVIEW ELIGIBLE — NO AUTHORITY&quot;;IF(OR([.U211]=&quot;UNKNOWN&quot;;[.U21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2]=&quot;&quot;;IF(AND([.L212]=&quot;&quot;;[.N212]=&quot;&quot;);&quot;UNKNOWN&quot;;&quot;CONTRADICTION&quot;);IF([.M212]=&quot;UNMATCHED&quot;;IF(AND([.L212]=&quot;&quot;;[.N212]=&quot;&quot;);&quot;CLEAR&quot;;&quot;CONTRADICTION&quot;);IF([.M212]=&quot;SINGLE_SALE_LINKED&quot;;IF(AND([.L212]&lt;&gt;&quot;&quot;;[.N212]=&quot;&quot;);&quot;CLEAR&quot;;&quot;CONTRADICTION&quot;);IF([.M212]=&quot;MULTI_SALE_PENDING_ALLOCATION&quot;;IF([.L212]=&quot;&quot;;&quot;CLEAR&quot;;&quot;CONTRADICTION&quot;);IF([.M212]=&quot;ALLOCATED&quot;;IF(AND([.L212]=&quot;&quot;;[.N212]&lt;&gt;&quot;&quot;);&quot;CLEAR&quot;;&quot;CONTRADICTION&quot;);&quot;CONTRADICTION&quot;)))))">
            <text:p>UNKNOWN</text:p>
          </table:table-cell>
          <table:table-cell office:value-type="string" table:formula="of:=IF([.S212]=&quot;UNKNOWN&quot;;&quot;NO ACTION — linkage status is UNKNOWN / not asserted&quot;;IF([.S212]=&quot;CLEAR&quot;;&quot;NO CONTRADICTION — preserve evidence as entered&quot;;IF([.M212]=&quot;&quot;;&quot;REVIEW LINKAGE STATUS — identifiers are present while status is UNKNOWN&quot;;IF([.M212]=&quot;UNMATCHED&quot;;&quot;REMOVE LINKAGE IDENTIFIERS OR CORRECT LINKAGE STATUS&quot;;IF([.M212]=&quot;SINGLE_SALE_LINKED&quot;;&quot;REQUIRE LINKED SALE ID AND NO ALLOCATION GROUP ID&quot;;IF([.M212]=&quot;MULTI_SALE_PENDING_ALLOCATION&quot;;&quot;REMOVE LINKED SALE ID OR CORRECT LINKAGE STATUS&quot;;IF([.M212]=&quot;ALLOCATED&quot;;&quot;REQUIRE ALLOCATION GROUP ID AND NO LINKED SALE ID&quot;;&quot;REVIEW LINKAGE EVIDENCE — NO AUTHORITY CREATED&quot;)))))))">
            <text:p>NO ACTION — linkage status is UNKNOWN / not asserted</text:p>
          </table:table-cell>
          <table:table-cell office:value-type="string" table:formula="of:=IF([.S212]=&quot;CONTRADICTION&quot;;&quot;BLOCKED&quot;;IF([.S212]=&quot;UNKNOWN&quot;;&quot;UNKNOWN&quot;;IF([.S212]=&quot;CLEAR&quot;;IF(OR([.O212]=&quot;&quot;;[.P212]=&quot;&quot;);&quot;UNKNOWN&quot;;&quot;READY FOR REVIEW&quot;);&quot;BLOCKED&quot;)))">
            <text:p>UNKNOWN</text:p>
          </table:table-cell>
          <table:table-cell office:value-type="string" table:formula="of:=IF([.U212]=&quot;UNKNOWN&quot;;&quot;COMPLETE OR ASSERT REQUIRED EVIDENCE BEFORE REVIEW&quot;;IF([.U212]=&quot;BLOCKED&quot;;&quot;RESOLVE CONTRADICTION BEFORE REVIEW — NO AUTHORITY CREATED&quot;;IF([.U2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2]=&quot;READY FOR REVIEW&quot;;&quot;REVIEW ELIGIBLE — NO AUTHORITY&quot;;IF(OR([.U212]=&quot;UNKNOWN&quot;;[.U21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3]=&quot;&quot;;IF(AND([.L213]=&quot;&quot;;[.N213]=&quot;&quot;);&quot;UNKNOWN&quot;;&quot;CONTRADICTION&quot;);IF([.M213]=&quot;UNMATCHED&quot;;IF(AND([.L213]=&quot;&quot;;[.N213]=&quot;&quot;);&quot;CLEAR&quot;;&quot;CONTRADICTION&quot;);IF([.M213]=&quot;SINGLE_SALE_LINKED&quot;;IF(AND([.L213]&lt;&gt;&quot;&quot;;[.N213]=&quot;&quot;);&quot;CLEAR&quot;;&quot;CONTRADICTION&quot;);IF([.M213]=&quot;MULTI_SALE_PENDING_ALLOCATION&quot;;IF([.L213]=&quot;&quot;;&quot;CLEAR&quot;;&quot;CONTRADICTION&quot;);IF([.M213]=&quot;ALLOCATED&quot;;IF(AND([.L213]=&quot;&quot;;[.N213]&lt;&gt;&quot;&quot;);&quot;CLEAR&quot;;&quot;CONTRADICTION&quot;);&quot;CONTRADICTION&quot;)))))">
            <text:p>UNKNOWN</text:p>
          </table:table-cell>
          <table:table-cell office:value-type="string" table:formula="of:=IF([.S213]=&quot;UNKNOWN&quot;;&quot;NO ACTION — linkage status is UNKNOWN / not asserted&quot;;IF([.S213]=&quot;CLEAR&quot;;&quot;NO CONTRADICTION — preserve evidence as entered&quot;;IF([.M213]=&quot;&quot;;&quot;REVIEW LINKAGE STATUS — identifiers are present while status is UNKNOWN&quot;;IF([.M213]=&quot;UNMATCHED&quot;;&quot;REMOVE LINKAGE IDENTIFIERS OR CORRECT LINKAGE STATUS&quot;;IF([.M213]=&quot;SINGLE_SALE_LINKED&quot;;&quot;REQUIRE LINKED SALE ID AND NO ALLOCATION GROUP ID&quot;;IF([.M213]=&quot;MULTI_SALE_PENDING_ALLOCATION&quot;;&quot;REMOVE LINKED SALE ID OR CORRECT LINKAGE STATUS&quot;;IF([.M213]=&quot;ALLOCATED&quot;;&quot;REQUIRE ALLOCATION GROUP ID AND NO LINKED SALE ID&quot;;&quot;REVIEW LINKAGE EVIDENCE — NO AUTHORITY CREATED&quot;)))))))">
            <text:p>NO ACTION — linkage status is UNKNOWN / not asserted</text:p>
          </table:table-cell>
          <table:table-cell office:value-type="string" table:formula="of:=IF([.S213]=&quot;CONTRADICTION&quot;;&quot;BLOCKED&quot;;IF([.S213]=&quot;UNKNOWN&quot;;&quot;UNKNOWN&quot;;IF([.S213]=&quot;CLEAR&quot;;IF(OR([.O213]=&quot;&quot;;[.P213]=&quot;&quot;);&quot;UNKNOWN&quot;;&quot;READY FOR REVIEW&quot;);&quot;BLOCKED&quot;)))">
            <text:p>UNKNOWN</text:p>
          </table:table-cell>
          <table:table-cell office:value-type="string" table:formula="of:=IF([.U213]=&quot;UNKNOWN&quot;;&quot;COMPLETE OR ASSERT REQUIRED EVIDENCE BEFORE REVIEW&quot;;IF([.U213]=&quot;BLOCKED&quot;;&quot;RESOLVE CONTRADICTION BEFORE REVIEW — NO AUTHORITY CREATED&quot;;IF([.U2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3]=&quot;READY FOR REVIEW&quot;;&quot;REVIEW ELIGIBLE — NO AUTHORITY&quot;;IF(OR([.U213]=&quot;UNKNOWN&quot;;[.U21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4]=&quot;&quot;;IF(AND([.L214]=&quot;&quot;;[.N214]=&quot;&quot;);&quot;UNKNOWN&quot;;&quot;CONTRADICTION&quot;);IF([.M214]=&quot;UNMATCHED&quot;;IF(AND([.L214]=&quot;&quot;;[.N214]=&quot;&quot;);&quot;CLEAR&quot;;&quot;CONTRADICTION&quot;);IF([.M214]=&quot;SINGLE_SALE_LINKED&quot;;IF(AND([.L214]&lt;&gt;&quot;&quot;;[.N214]=&quot;&quot;);&quot;CLEAR&quot;;&quot;CONTRADICTION&quot;);IF([.M214]=&quot;MULTI_SALE_PENDING_ALLOCATION&quot;;IF([.L214]=&quot;&quot;;&quot;CLEAR&quot;;&quot;CONTRADICTION&quot;);IF([.M214]=&quot;ALLOCATED&quot;;IF(AND([.L214]=&quot;&quot;;[.N214]&lt;&gt;&quot;&quot;);&quot;CLEAR&quot;;&quot;CONTRADICTION&quot;);&quot;CONTRADICTION&quot;)))))">
            <text:p>UNKNOWN</text:p>
          </table:table-cell>
          <table:table-cell office:value-type="string" table:formula="of:=IF([.S214]=&quot;UNKNOWN&quot;;&quot;NO ACTION — linkage status is UNKNOWN / not asserted&quot;;IF([.S214]=&quot;CLEAR&quot;;&quot;NO CONTRADICTION — preserve evidence as entered&quot;;IF([.M214]=&quot;&quot;;&quot;REVIEW LINKAGE STATUS — identifiers are present while status is UNKNOWN&quot;;IF([.M214]=&quot;UNMATCHED&quot;;&quot;REMOVE LINKAGE IDENTIFIERS OR CORRECT LINKAGE STATUS&quot;;IF([.M214]=&quot;SINGLE_SALE_LINKED&quot;;&quot;REQUIRE LINKED SALE ID AND NO ALLOCATION GROUP ID&quot;;IF([.M214]=&quot;MULTI_SALE_PENDING_ALLOCATION&quot;;&quot;REMOVE LINKED SALE ID OR CORRECT LINKAGE STATUS&quot;;IF([.M214]=&quot;ALLOCATED&quot;;&quot;REQUIRE ALLOCATION GROUP ID AND NO LINKED SALE ID&quot;;&quot;REVIEW LINKAGE EVIDENCE — NO AUTHORITY CREATED&quot;)))))))">
            <text:p>NO ACTION — linkage status is UNKNOWN / not asserted</text:p>
          </table:table-cell>
          <table:table-cell office:value-type="string" table:formula="of:=IF([.S214]=&quot;CONTRADICTION&quot;;&quot;BLOCKED&quot;;IF([.S214]=&quot;UNKNOWN&quot;;&quot;UNKNOWN&quot;;IF([.S214]=&quot;CLEAR&quot;;IF(OR([.O214]=&quot;&quot;;[.P214]=&quot;&quot;);&quot;UNKNOWN&quot;;&quot;READY FOR REVIEW&quot;);&quot;BLOCKED&quot;)))">
            <text:p>UNKNOWN</text:p>
          </table:table-cell>
          <table:table-cell office:value-type="string" table:formula="of:=IF([.U214]=&quot;UNKNOWN&quot;;&quot;COMPLETE OR ASSERT REQUIRED EVIDENCE BEFORE REVIEW&quot;;IF([.U214]=&quot;BLOCKED&quot;;&quot;RESOLVE CONTRADICTION BEFORE REVIEW — NO AUTHORITY CREATED&quot;;IF([.U2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4]=&quot;READY FOR REVIEW&quot;;&quot;REVIEW ELIGIBLE — NO AUTHORITY&quot;;IF(OR([.U214]=&quot;UNKNOWN&quot;;[.U21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5]=&quot;&quot;;IF(AND([.L215]=&quot;&quot;;[.N215]=&quot;&quot;);&quot;UNKNOWN&quot;;&quot;CONTRADICTION&quot;);IF([.M215]=&quot;UNMATCHED&quot;;IF(AND([.L215]=&quot;&quot;;[.N215]=&quot;&quot;);&quot;CLEAR&quot;;&quot;CONTRADICTION&quot;);IF([.M215]=&quot;SINGLE_SALE_LINKED&quot;;IF(AND([.L215]&lt;&gt;&quot;&quot;;[.N215]=&quot;&quot;);&quot;CLEAR&quot;;&quot;CONTRADICTION&quot;);IF([.M215]=&quot;MULTI_SALE_PENDING_ALLOCATION&quot;;IF([.L215]=&quot;&quot;;&quot;CLEAR&quot;;&quot;CONTRADICTION&quot;);IF([.M215]=&quot;ALLOCATED&quot;;IF(AND([.L215]=&quot;&quot;;[.N215]&lt;&gt;&quot;&quot;);&quot;CLEAR&quot;;&quot;CONTRADICTION&quot;);&quot;CONTRADICTION&quot;)))))">
            <text:p>UNKNOWN</text:p>
          </table:table-cell>
          <table:table-cell office:value-type="string" table:formula="of:=IF([.S215]=&quot;UNKNOWN&quot;;&quot;NO ACTION — linkage status is UNKNOWN / not asserted&quot;;IF([.S215]=&quot;CLEAR&quot;;&quot;NO CONTRADICTION — preserve evidence as entered&quot;;IF([.M215]=&quot;&quot;;&quot;REVIEW LINKAGE STATUS — identifiers are present while status is UNKNOWN&quot;;IF([.M215]=&quot;UNMATCHED&quot;;&quot;REMOVE LINKAGE IDENTIFIERS OR CORRECT LINKAGE STATUS&quot;;IF([.M215]=&quot;SINGLE_SALE_LINKED&quot;;&quot;REQUIRE LINKED SALE ID AND NO ALLOCATION GROUP ID&quot;;IF([.M215]=&quot;MULTI_SALE_PENDING_ALLOCATION&quot;;&quot;REMOVE LINKED SALE ID OR CORRECT LINKAGE STATUS&quot;;IF([.M215]=&quot;ALLOCATED&quot;;&quot;REQUIRE ALLOCATION GROUP ID AND NO LINKED SALE ID&quot;;&quot;REVIEW LINKAGE EVIDENCE — NO AUTHORITY CREATED&quot;)))))))">
            <text:p>NO ACTION — linkage status is UNKNOWN / not asserted</text:p>
          </table:table-cell>
          <table:table-cell office:value-type="string" table:formula="of:=IF([.S215]=&quot;CONTRADICTION&quot;;&quot;BLOCKED&quot;;IF([.S215]=&quot;UNKNOWN&quot;;&quot;UNKNOWN&quot;;IF([.S215]=&quot;CLEAR&quot;;IF(OR([.O215]=&quot;&quot;;[.P215]=&quot;&quot;);&quot;UNKNOWN&quot;;&quot;READY FOR REVIEW&quot;);&quot;BLOCKED&quot;)))">
            <text:p>UNKNOWN</text:p>
          </table:table-cell>
          <table:table-cell office:value-type="string" table:formula="of:=IF([.U215]=&quot;UNKNOWN&quot;;&quot;COMPLETE OR ASSERT REQUIRED EVIDENCE BEFORE REVIEW&quot;;IF([.U215]=&quot;BLOCKED&quot;;&quot;RESOLVE CONTRADICTION BEFORE REVIEW — NO AUTHORITY CREATED&quot;;IF([.U2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5]=&quot;READY FOR REVIEW&quot;;&quot;REVIEW ELIGIBLE — NO AUTHORITY&quot;;IF(OR([.U215]=&quot;UNKNOWN&quot;;[.U21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6]=&quot;&quot;;IF(AND([.L216]=&quot;&quot;;[.N216]=&quot;&quot;);&quot;UNKNOWN&quot;;&quot;CONTRADICTION&quot;);IF([.M216]=&quot;UNMATCHED&quot;;IF(AND([.L216]=&quot;&quot;;[.N216]=&quot;&quot;);&quot;CLEAR&quot;;&quot;CONTRADICTION&quot;);IF([.M216]=&quot;SINGLE_SALE_LINKED&quot;;IF(AND([.L216]&lt;&gt;&quot;&quot;;[.N216]=&quot;&quot;);&quot;CLEAR&quot;;&quot;CONTRADICTION&quot;);IF([.M216]=&quot;MULTI_SALE_PENDING_ALLOCATION&quot;;IF([.L216]=&quot;&quot;;&quot;CLEAR&quot;;&quot;CONTRADICTION&quot;);IF([.M216]=&quot;ALLOCATED&quot;;IF(AND([.L216]=&quot;&quot;;[.N216]&lt;&gt;&quot;&quot;);&quot;CLEAR&quot;;&quot;CONTRADICTION&quot;);&quot;CONTRADICTION&quot;)))))">
            <text:p>UNKNOWN</text:p>
          </table:table-cell>
          <table:table-cell office:value-type="string" table:formula="of:=IF([.S216]=&quot;UNKNOWN&quot;;&quot;NO ACTION — linkage status is UNKNOWN / not asserted&quot;;IF([.S216]=&quot;CLEAR&quot;;&quot;NO CONTRADICTION — preserve evidence as entered&quot;;IF([.M216]=&quot;&quot;;&quot;REVIEW LINKAGE STATUS — identifiers are present while status is UNKNOWN&quot;;IF([.M216]=&quot;UNMATCHED&quot;;&quot;REMOVE LINKAGE IDENTIFIERS OR CORRECT LINKAGE STATUS&quot;;IF([.M216]=&quot;SINGLE_SALE_LINKED&quot;;&quot;REQUIRE LINKED SALE ID AND NO ALLOCATION GROUP ID&quot;;IF([.M216]=&quot;MULTI_SALE_PENDING_ALLOCATION&quot;;&quot;REMOVE LINKED SALE ID OR CORRECT LINKAGE STATUS&quot;;IF([.M216]=&quot;ALLOCATED&quot;;&quot;REQUIRE ALLOCATION GROUP ID AND NO LINKED SALE ID&quot;;&quot;REVIEW LINKAGE EVIDENCE — NO AUTHORITY CREATED&quot;)))))))">
            <text:p>NO ACTION — linkage status is UNKNOWN / not asserted</text:p>
          </table:table-cell>
          <table:table-cell office:value-type="string" table:formula="of:=IF([.S216]=&quot;CONTRADICTION&quot;;&quot;BLOCKED&quot;;IF([.S216]=&quot;UNKNOWN&quot;;&quot;UNKNOWN&quot;;IF([.S216]=&quot;CLEAR&quot;;IF(OR([.O216]=&quot;&quot;;[.P216]=&quot;&quot;);&quot;UNKNOWN&quot;;&quot;READY FOR REVIEW&quot;);&quot;BLOCKED&quot;)))">
            <text:p>UNKNOWN</text:p>
          </table:table-cell>
          <table:table-cell office:value-type="string" table:formula="of:=IF([.U216]=&quot;UNKNOWN&quot;;&quot;COMPLETE OR ASSERT REQUIRED EVIDENCE BEFORE REVIEW&quot;;IF([.U216]=&quot;BLOCKED&quot;;&quot;RESOLVE CONTRADICTION BEFORE REVIEW — NO AUTHORITY CREATED&quot;;IF([.U2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6]=&quot;READY FOR REVIEW&quot;;&quot;REVIEW ELIGIBLE — NO AUTHORITY&quot;;IF(OR([.U216]=&quot;UNKNOWN&quot;;[.U21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7]=&quot;&quot;;IF(AND([.L217]=&quot;&quot;;[.N217]=&quot;&quot;);&quot;UNKNOWN&quot;;&quot;CONTRADICTION&quot;);IF([.M217]=&quot;UNMATCHED&quot;;IF(AND([.L217]=&quot;&quot;;[.N217]=&quot;&quot;);&quot;CLEAR&quot;;&quot;CONTRADICTION&quot;);IF([.M217]=&quot;SINGLE_SALE_LINKED&quot;;IF(AND([.L217]&lt;&gt;&quot;&quot;;[.N217]=&quot;&quot;);&quot;CLEAR&quot;;&quot;CONTRADICTION&quot;);IF([.M217]=&quot;MULTI_SALE_PENDING_ALLOCATION&quot;;IF([.L217]=&quot;&quot;;&quot;CLEAR&quot;;&quot;CONTRADICTION&quot;);IF([.M217]=&quot;ALLOCATED&quot;;IF(AND([.L217]=&quot;&quot;;[.N217]&lt;&gt;&quot;&quot;);&quot;CLEAR&quot;;&quot;CONTRADICTION&quot;);&quot;CONTRADICTION&quot;)))))">
            <text:p>UNKNOWN</text:p>
          </table:table-cell>
          <table:table-cell office:value-type="string" table:formula="of:=IF([.S217]=&quot;UNKNOWN&quot;;&quot;NO ACTION — linkage status is UNKNOWN / not asserted&quot;;IF([.S217]=&quot;CLEAR&quot;;&quot;NO CONTRADICTION — preserve evidence as entered&quot;;IF([.M217]=&quot;&quot;;&quot;REVIEW LINKAGE STATUS — identifiers are present while status is UNKNOWN&quot;;IF([.M217]=&quot;UNMATCHED&quot;;&quot;REMOVE LINKAGE IDENTIFIERS OR CORRECT LINKAGE STATUS&quot;;IF([.M217]=&quot;SINGLE_SALE_LINKED&quot;;&quot;REQUIRE LINKED SALE ID AND NO ALLOCATION GROUP ID&quot;;IF([.M217]=&quot;MULTI_SALE_PENDING_ALLOCATION&quot;;&quot;REMOVE LINKED SALE ID OR CORRECT LINKAGE STATUS&quot;;IF([.M217]=&quot;ALLOCATED&quot;;&quot;REQUIRE ALLOCATION GROUP ID AND NO LINKED SALE ID&quot;;&quot;REVIEW LINKAGE EVIDENCE — NO AUTHORITY CREATED&quot;)))))))">
            <text:p>NO ACTION — linkage status is UNKNOWN / not asserted</text:p>
          </table:table-cell>
          <table:table-cell office:value-type="string" table:formula="of:=IF([.S217]=&quot;CONTRADICTION&quot;;&quot;BLOCKED&quot;;IF([.S217]=&quot;UNKNOWN&quot;;&quot;UNKNOWN&quot;;IF([.S217]=&quot;CLEAR&quot;;IF(OR([.O217]=&quot;&quot;;[.P217]=&quot;&quot;);&quot;UNKNOWN&quot;;&quot;READY FOR REVIEW&quot;);&quot;BLOCKED&quot;)))">
            <text:p>UNKNOWN</text:p>
          </table:table-cell>
          <table:table-cell office:value-type="string" table:formula="of:=IF([.U217]=&quot;UNKNOWN&quot;;&quot;COMPLETE OR ASSERT REQUIRED EVIDENCE BEFORE REVIEW&quot;;IF([.U217]=&quot;BLOCKED&quot;;&quot;RESOLVE CONTRADICTION BEFORE REVIEW — NO AUTHORITY CREATED&quot;;IF([.U2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7]=&quot;READY FOR REVIEW&quot;;&quot;REVIEW ELIGIBLE — NO AUTHORITY&quot;;IF(OR([.U217]=&quot;UNKNOWN&quot;;[.U21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8]=&quot;&quot;;IF(AND([.L218]=&quot;&quot;;[.N218]=&quot;&quot;);&quot;UNKNOWN&quot;;&quot;CONTRADICTION&quot;);IF([.M218]=&quot;UNMATCHED&quot;;IF(AND([.L218]=&quot;&quot;;[.N218]=&quot;&quot;);&quot;CLEAR&quot;;&quot;CONTRADICTION&quot;);IF([.M218]=&quot;SINGLE_SALE_LINKED&quot;;IF(AND([.L218]&lt;&gt;&quot;&quot;;[.N218]=&quot;&quot;);&quot;CLEAR&quot;;&quot;CONTRADICTION&quot;);IF([.M218]=&quot;MULTI_SALE_PENDING_ALLOCATION&quot;;IF([.L218]=&quot;&quot;;&quot;CLEAR&quot;;&quot;CONTRADICTION&quot;);IF([.M218]=&quot;ALLOCATED&quot;;IF(AND([.L218]=&quot;&quot;;[.N218]&lt;&gt;&quot;&quot;);&quot;CLEAR&quot;;&quot;CONTRADICTION&quot;);&quot;CONTRADICTION&quot;)))))">
            <text:p>UNKNOWN</text:p>
          </table:table-cell>
          <table:table-cell office:value-type="string" table:formula="of:=IF([.S218]=&quot;UNKNOWN&quot;;&quot;NO ACTION — linkage status is UNKNOWN / not asserted&quot;;IF([.S218]=&quot;CLEAR&quot;;&quot;NO CONTRADICTION — preserve evidence as entered&quot;;IF([.M218]=&quot;&quot;;&quot;REVIEW LINKAGE STATUS — identifiers are present while status is UNKNOWN&quot;;IF([.M218]=&quot;UNMATCHED&quot;;&quot;REMOVE LINKAGE IDENTIFIERS OR CORRECT LINKAGE STATUS&quot;;IF([.M218]=&quot;SINGLE_SALE_LINKED&quot;;&quot;REQUIRE LINKED SALE ID AND NO ALLOCATION GROUP ID&quot;;IF([.M218]=&quot;MULTI_SALE_PENDING_ALLOCATION&quot;;&quot;REMOVE LINKED SALE ID OR CORRECT LINKAGE STATUS&quot;;IF([.M218]=&quot;ALLOCATED&quot;;&quot;REQUIRE ALLOCATION GROUP ID AND NO LINKED SALE ID&quot;;&quot;REVIEW LINKAGE EVIDENCE — NO AUTHORITY CREATED&quot;)))))))">
            <text:p>NO ACTION — linkage status is UNKNOWN / not asserted</text:p>
          </table:table-cell>
          <table:table-cell office:value-type="string" table:formula="of:=IF([.S218]=&quot;CONTRADICTION&quot;;&quot;BLOCKED&quot;;IF([.S218]=&quot;UNKNOWN&quot;;&quot;UNKNOWN&quot;;IF([.S218]=&quot;CLEAR&quot;;IF(OR([.O218]=&quot;&quot;;[.P218]=&quot;&quot;);&quot;UNKNOWN&quot;;&quot;READY FOR REVIEW&quot;);&quot;BLOCKED&quot;)))">
            <text:p>UNKNOWN</text:p>
          </table:table-cell>
          <table:table-cell office:value-type="string" table:formula="of:=IF([.U218]=&quot;UNKNOWN&quot;;&quot;COMPLETE OR ASSERT REQUIRED EVIDENCE BEFORE REVIEW&quot;;IF([.U218]=&quot;BLOCKED&quot;;&quot;RESOLVE CONTRADICTION BEFORE REVIEW — NO AUTHORITY CREATED&quot;;IF([.U2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8]=&quot;READY FOR REVIEW&quot;;&quot;REVIEW ELIGIBLE — NO AUTHORITY&quot;;IF(OR([.U218]=&quot;UNKNOWN&quot;;[.U21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9]=&quot;&quot;;IF(AND([.L219]=&quot;&quot;;[.N219]=&quot;&quot;);&quot;UNKNOWN&quot;;&quot;CONTRADICTION&quot;);IF([.M219]=&quot;UNMATCHED&quot;;IF(AND([.L219]=&quot;&quot;;[.N219]=&quot;&quot;);&quot;CLEAR&quot;;&quot;CONTRADICTION&quot;);IF([.M219]=&quot;SINGLE_SALE_LINKED&quot;;IF(AND([.L219]&lt;&gt;&quot;&quot;;[.N219]=&quot;&quot;);&quot;CLEAR&quot;;&quot;CONTRADICTION&quot;);IF([.M219]=&quot;MULTI_SALE_PENDING_ALLOCATION&quot;;IF([.L219]=&quot;&quot;;&quot;CLEAR&quot;;&quot;CONTRADICTION&quot;);IF([.M219]=&quot;ALLOCATED&quot;;IF(AND([.L219]=&quot;&quot;;[.N219]&lt;&gt;&quot;&quot;);&quot;CLEAR&quot;;&quot;CONTRADICTION&quot;);&quot;CONTRADICTION&quot;)))))">
            <text:p>UNKNOWN</text:p>
          </table:table-cell>
          <table:table-cell office:value-type="string" table:formula="of:=IF([.S219]=&quot;UNKNOWN&quot;;&quot;NO ACTION — linkage status is UNKNOWN / not asserted&quot;;IF([.S219]=&quot;CLEAR&quot;;&quot;NO CONTRADICTION — preserve evidence as entered&quot;;IF([.M219]=&quot;&quot;;&quot;REVIEW LINKAGE STATUS — identifiers are present while status is UNKNOWN&quot;;IF([.M219]=&quot;UNMATCHED&quot;;&quot;REMOVE LINKAGE IDENTIFIERS OR CORRECT LINKAGE STATUS&quot;;IF([.M219]=&quot;SINGLE_SALE_LINKED&quot;;&quot;REQUIRE LINKED SALE ID AND NO ALLOCATION GROUP ID&quot;;IF([.M219]=&quot;MULTI_SALE_PENDING_ALLOCATION&quot;;&quot;REMOVE LINKED SALE ID OR CORRECT LINKAGE STATUS&quot;;IF([.M219]=&quot;ALLOCATED&quot;;&quot;REQUIRE ALLOCATION GROUP ID AND NO LINKED SALE ID&quot;;&quot;REVIEW LINKAGE EVIDENCE — NO AUTHORITY CREATED&quot;)))))))">
            <text:p>NO ACTION — linkage status is UNKNOWN / not asserted</text:p>
          </table:table-cell>
          <table:table-cell office:value-type="string" table:formula="of:=IF([.S219]=&quot;CONTRADICTION&quot;;&quot;BLOCKED&quot;;IF([.S219]=&quot;UNKNOWN&quot;;&quot;UNKNOWN&quot;;IF([.S219]=&quot;CLEAR&quot;;IF(OR([.O219]=&quot;&quot;;[.P219]=&quot;&quot;);&quot;UNKNOWN&quot;;&quot;READY FOR REVIEW&quot;);&quot;BLOCKED&quot;)))">
            <text:p>UNKNOWN</text:p>
          </table:table-cell>
          <table:table-cell office:value-type="string" table:formula="of:=IF([.U219]=&quot;UNKNOWN&quot;;&quot;COMPLETE OR ASSERT REQUIRED EVIDENCE BEFORE REVIEW&quot;;IF([.U219]=&quot;BLOCKED&quot;;&quot;RESOLVE CONTRADICTION BEFORE REVIEW — NO AUTHORITY CREATED&quot;;IF([.U2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9]=&quot;READY FOR REVIEW&quot;;&quot;REVIEW ELIGIBLE — NO AUTHORITY&quot;;IF(OR([.U219]=&quot;UNKNOWN&quot;;[.U21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0]=&quot;&quot;;IF(AND([.L220]=&quot;&quot;;[.N220]=&quot;&quot;);&quot;UNKNOWN&quot;;&quot;CONTRADICTION&quot;);IF([.M220]=&quot;UNMATCHED&quot;;IF(AND([.L220]=&quot;&quot;;[.N220]=&quot;&quot;);&quot;CLEAR&quot;;&quot;CONTRADICTION&quot;);IF([.M220]=&quot;SINGLE_SALE_LINKED&quot;;IF(AND([.L220]&lt;&gt;&quot;&quot;;[.N220]=&quot;&quot;);&quot;CLEAR&quot;;&quot;CONTRADICTION&quot;);IF([.M220]=&quot;MULTI_SALE_PENDING_ALLOCATION&quot;;IF([.L220]=&quot;&quot;;&quot;CLEAR&quot;;&quot;CONTRADICTION&quot;);IF([.M220]=&quot;ALLOCATED&quot;;IF(AND([.L220]=&quot;&quot;;[.N220]&lt;&gt;&quot;&quot;);&quot;CLEAR&quot;;&quot;CONTRADICTION&quot;);&quot;CONTRADICTION&quot;)))))">
            <text:p>UNKNOWN</text:p>
          </table:table-cell>
          <table:table-cell office:value-type="string" table:formula="of:=IF([.S220]=&quot;UNKNOWN&quot;;&quot;NO ACTION — linkage status is UNKNOWN / not asserted&quot;;IF([.S220]=&quot;CLEAR&quot;;&quot;NO CONTRADICTION — preserve evidence as entered&quot;;IF([.M220]=&quot;&quot;;&quot;REVIEW LINKAGE STATUS — identifiers are present while status is UNKNOWN&quot;;IF([.M220]=&quot;UNMATCHED&quot;;&quot;REMOVE LINKAGE IDENTIFIERS OR CORRECT LINKAGE STATUS&quot;;IF([.M220]=&quot;SINGLE_SALE_LINKED&quot;;&quot;REQUIRE LINKED SALE ID AND NO ALLOCATION GROUP ID&quot;;IF([.M220]=&quot;MULTI_SALE_PENDING_ALLOCATION&quot;;&quot;REMOVE LINKED SALE ID OR CORRECT LINKAGE STATUS&quot;;IF([.M220]=&quot;ALLOCATED&quot;;&quot;REQUIRE ALLOCATION GROUP ID AND NO LINKED SALE ID&quot;;&quot;REVIEW LINKAGE EVIDENCE — NO AUTHORITY CREATED&quot;)))))))">
            <text:p>NO ACTION — linkage status is UNKNOWN / not asserted</text:p>
          </table:table-cell>
          <table:table-cell office:value-type="string" table:formula="of:=IF([.S220]=&quot;CONTRADICTION&quot;;&quot;BLOCKED&quot;;IF([.S220]=&quot;UNKNOWN&quot;;&quot;UNKNOWN&quot;;IF([.S220]=&quot;CLEAR&quot;;IF(OR([.O220]=&quot;&quot;;[.P220]=&quot;&quot;);&quot;UNKNOWN&quot;;&quot;READY FOR REVIEW&quot;);&quot;BLOCKED&quot;)))">
            <text:p>UNKNOWN</text:p>
          </table:table-cell>
          <table:table-cell office:value-type="string" table:formula="of:=IF([.U220]=&quot;UNKNOWN&quot;;&quot;COMPLETE OR ASSERT REQUIRED EVIDENCE BEFORE REVIEW&quot;;IF([.U220]=&quot;BLOCKED&quot;;&quot;RESOLVE CONTRADICTION BEFORE REVIEW — NO AUTHORITY CREATED&quot;;IF([.U2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0]=&quot;READY FOR REVIEW&quot;;&quot;REVIEW ELIGIBLE — NO AUTHORITY&quot;;IF(OR([.U220]=&quot;UNKNOWN&quot;;[.U22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1]=&quot;&quot;;IF(AND([.L221]=&quot;&quot;;[.N221]=&quot;&quot;);&quot;UNKNOWN&quot;;&quot;CONTRADICTION&quot;);IF([.M221]=&quot;UNMATCHED&quot;;IF(AND([.L221]=&quot;&quot;;[.N221]=&quot;&quot;);&quot;CLEAR&quot;;&quot;CONTRADICTION&quot;);IF([.M221]=&quot;SINGLE_SALE_LINKED&quot;;IF(AND([.L221]&lt;&gt;&quot;&quot;;[.N221]=&quot;&quot;);&quot;CLEAR&quot;;&quot;CONTRADICTION&quot;);IF([.M221]=&quot;MULTI_SALE_PENDING_ALLOCATION&quot;;IF([.L221]=&quot;&quot;;&quot;CLEAR&quot;;&quot;CONTRADICTION&quot;);IF([.M221]=&quot;ALLOCATED&quot;;IF(AND([.L221]=&quot;&quot;;[.N221]&lt;&gt;&quot;&quot;);&quot;CLEAR&quot;;&quot;CONTRADICTION&quot;);&quot;CONTRADICTION&quot;)))))">
            <text:p>UNKNOWN</text:p>
          </table:table-cell>
          <table:table-cell office:value-type="string" table:formula="of:=IF([.S221]=&quot;UNKNOWN&quot;;&quot;NO ACTION — linkage status is UNKNOWN / not asserted&quot;;IF([.S221]=&quot;CLEAR&quot;;&quot;NO CONTRADICTION — preserve evidence as entered&quot;;IF([.M221]=&quot;&quot;;&quot;REVIEW LINKAGE STATUS — identifiers are present while status is UNKNOWN&quot;;IF([.M221]=&quot;UNMATCHED&quot;;&quot;REMOVE LINKAGE IDENTIFIERS OR CORRECT LINKAGE STATUS&quot;;IF([.M221]=&quot;SINGLE_SALE_LINKED&quot;;&quot;REQUIRE LINKED SALE ID AND NO ALLOCATION GROUP ID&quot;;IF([.M221]=&quot;MULTI_SALE_PENDING_ALLOCATION&quot;;&quot;REMOVE LINKED SALE ID OR CORRECT LINKAGE STATUS&quot;;IF([.M221]=&quot;ALLOCATED&quot;;&quot;REQUIRE ALLOCATION GROUP ID AND NO LINKED SALE ID&quot;;&quot;REVIEW LINKAGE EVIDENCE — NO AUTHORITY CREATED&quot;)))))))">
            <text:p>NO ACTION — linkage status is UNKNOWN / not asserted</text:p>
          </table:table-cell>
          <table:table-cell office:value-type="string" table:formula="of:=IF([.S221]=&quot;CONTRADICTION&quot;;&quot;BLOCKED&quot;;IF([.S221]=&quot;UNKNOWN&quot;;&quot;UNKNOWN&quot;;IF([.S221]=&quot;CLEAR&quot;;IF(OR([.O221]=&quot;&quot;;[.P221]=&quot;&quot;);&quot;UNKNOWN&quot;;&quot;READY FOR REVIEW&quot;);&quot;BLOCKED&quot;)))">
            <text:p>UNKNOWN</text:p>
          </table:table-cell>
          <table:table-cell office:value-type="string" table:formula="of:=IF([.U221]=&quot;UNKNOWN&quot;;&quot;COMPLETE OR ASSERT REQUIRED EVIDENCE BEFORE REVIEW&quot;;IF([.U221]=&quot;BLOCKED&quot;;&quot;RESOLVE CONTRADICTION BEFORE REVIEW — NO AUTHORITY CREATED&quot;;IF([.U2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1]=&quot;READY FOR REVIEW&quot;;&quot;REVIEW ELIGIBLE — NO AUTHORITY&quot;;IF(OR([.U221]=&quot;UNKNOWN&quot;;[.U22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2]=&quot;&quot;;IF(AND([.L222]=&quot;&quot;;[.N222]=&quot;&quot;);&quot;UNKNOWN&quot;;&quot;CONTRADICTION&quot;);IF([.M222]=&quot;UNMATCHED&quot;;IF(AND([.L222]=&quot;&quot;;[.N222]=&quot;&quot;);&quot;CLEAR&quot;;&quot;CONTRADICTION&quot;);IF([.M222]=&quot;SINGLE_SALE_LINKED&quot;;IF(AND([.L222]&lt;&gt;&quot;&quot;;[.N222]=&quot;&quot;);&quot;CLEAR&quot;;&quot;CONTRADICTION&quot;);IF([.M222]=&quot;MULTI_SALE_PENDING_ALLOCATION&quot;;IF([.L222]=&quot;&quot;;&quot;CLEAR&quot;;&quot;CONTRADICTION&quot;);IF([.M222]=&quot;ALLOCATED&quot;;IF(AND([.L222]=&quot;&quot;;[.N222]&lt;&gt;&quot;&quot;);&quot;CLEAR&quot;;&quot;CONTRADICTION&quot;);&quot;CONTRADICTION&quot;)))))">
            <text:p>UNKNOWN</text:p>
          </table:table-cell>
          <table:table-cell office:value-type="string" table:formula="of:=IF([.S222]=&quot;UNKNOWN&quot;;&quot;NO ACTION — linkage status is UNKNOWN / not asserted&quot;;IF([.S222]=&quot;CLEAR&quot;;&quot;NO CONTRADICTION — preserve evidence as entered&quot;;IF([.M222]=&quot;&quot;;&quot;REVIEW LINKAGE STATUS — identifiers are present while status is UNKNOWN&quot;;IF([.M222]=&quot;UNMATCHED&quot;;&quot;REMOVE LINKAGE IDENTIFIERS OR CORRECT LINKAGE STATUS&quot;;IF([.M222]=&quot;SINGLE_SALE_LINKED&quot;;&quot;REQUIRE LINKED SALE ID AND NO ALLOCATION GROUP ID&quot;;IF([.M222]=&quot;MULTI_SALE_PENDING_ALLOCATION&quot;;&quot;REMOVE LINKED SALE ID OR CORRECT LINKAGE STATUS&quot;;IF([.M222]=&quot;ALLOCATED&quot;;&quot;REQUIRE ALLOCATION GROUP ID AND NO LINKED SALE ID&quot;;&quot;REVIEW LINKAGE EVIDENCE — NO AUTHORITY CREATED&quot;)))))))">
            <text:p>NO ACTION — linkage status is UNKNOWN / not asserted</text:p>
          </table:table-cell>
          <table:table-cell office:value-type="string" table:formula="of:=IF([.S222]=&quot;CONTRADICTION&quot;;&quot;BLOCKED&quot;;IF([.S222]=&quot;UNKNOWN&quot;;&quot;UNKNOWN&quot;;IF([.S222]=&quot;CLEAR&quot;;IF(OR([.O222]=&quot;&quot;;[.P222]=&quot;&quot;);&quot;UNKNOWN&quot;;&quot;READY FOR REVIEW&quot;);&quot;BLOCKED&quot;)))">
            <text:p>UNKNOWN</text:p>
          </table:table-cell>
          <table:table-cell office:value-type="string" table:formula="of:=IF([.U222]=&quot;UNKNOWN&quot;;&quot;COMPLETE OR ASSERT REQUIRED EVIDENCE BEFORE REVIEW&quot;;IF([.U222]=&quot;BLOCKED&quot;;&quot;RESOLVE CONTRADICTION BEFORE REVIEW — NO AUTHORITY CREATED&quot;;IF([.U2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2]=&quot;READY FOR REVIEW&quot;;&quot;REVIEW ELIGIBLE — NO AUTHORITY&quot;;IF(OR([.U222]=&quot;UNKNOWN&quot;;[.U22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3]=&quot;&quot;;IF(AND([.L223]=&quot;&quot;;[.N223]=&quot;&quot;);&quot;UNKNOWN&quot;;&quot;CONTRADICTION&quot;);IF([.M223]=&quot;UNMATCHED&quot;;IF(AND([.L223]=&quot;&quot;;[.N223]=&quot;&quot;);&quot;CLEAR&quot;;&quot;CONTRADICTION&quot;);IF([.M223]=&quot;SINGLE_SALE_LINKED&quot;;IF(AND([.L223]&lt;&gt;&quot;&quot;;[.N223]=&quot;&quot;);&quot;CLEAR&quot;;&quot;CONTRADICTION&quot;);IF([.M223]=&quot;MULTI_SALE_PENDING_ALLOCATION&quot;;IF([.L223]=&quot;&quot;;&quot;CLEAR&quot;;&quot;CONTRADICTION&quot;);IF([.M223]=&quot;ALLOCATED&quot;;IF(AND([.L223]=&quot;&quot;;[.N223]&lt;&gt;&quot;&quot;);&quot;CLEAR&quot;;&quot;CONTRADICTION&quot;);&quot;CONTRADICTION&quot;)))))">
            <text:p>UNKNOWN</text:p>
          </table:table-cell>
          <table:table-cell office:value-type="string" table:formula="of:=IF([.S223]=&quot;UNKNOWN&quot;;&quot;NO ACTION — linkage status is UNKNOWN / not asserted&quot;;IF([.S223]=&quot;CLEAR&quot;;&quot;NO CONTRADICTION — preserve evidence as entered&quot;;IF([.M223]=&quot;&quot;;&quot;REVIEW LINKAGE STATUS — identifiers are present while status is UNKNOWN&quot;;IF([.M223]=&quot;UNMATCHED&quot;;&quot;REMOVE LINKAGE IDENTIFIERS OR CORRECT LINKAGE STATUS&quot;;IF([.M223]=&quot;SINGLE_SALE_LINKED&quot;;&quot;REQUIRE LINKED SALE ID AND NO ALLOCATION GROUP ID&quot;;IF([.M223]=&quot;MULTI_SALE_PENDING_ALLOCATION&quot;;&quot;REMOVE LINKED SALE ID OR CORRECT LINKAGE STATUS&quot;;IF([.M223]=&quot;ALLOCATED&quot;;&quot;REQUIRE ALLOCATION GROUP ID AND NO LINKED SALE ID&quot;;&quot;REVIEW LINKAGE EVIDENCE — NO AUTHORITY CREATED&quot;)))))))">
            <text:p>NO ACTION — linkage status is UNKNOWN / not asserted</text:p>
          </table:table-cell>
          <table:table-cell office:value-type="string" table:formula="of:=IF([.S223]=&quot;CONTRADICTION&quot;;&quot;BLOCKED&quot;;IF([.S223]=&quot;UNKNOWN&quot;;&quot;UNKNOWN&quot;;IF([.S223]=&quot;CLEAR&quot;;IF(OR([.O223]=&quot;&quot;;[.P223]=&quot;&quot;);&quot;UNKNOWN&quot;;&quot;READY FOR REVIEW&quot;);&quot;BLOCKED&quot;)))">
            <text:p>UNKNOWN</text:p>
          </table:table-cell>
          <table:table-cell office:value-type="string" table:formula="of:=IF([.U223]=&quot;UNKNOWN&quot;;&quot;COMPLETE OR ASSERT REQUIRED EVIDENCE BEFORE REVIEW&quot;;IF([.U223]=&quot;BLOCKED&quot;;&quot;RESOLVE CONTRADICTION BEFORE REVIEW — NO AUTHORITY CREATED&quot;;IF([.U2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3]=&quot;READY FOR REVIEW&quot;;&quot;REVIEW ELIGIBLE — NO AUTHORITY&quot;;IF(OR([.U223]=&quot;UNKNOWN&quot;;[.U22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4]=&quot;&quot;;IF(AND([.L224]=&quot;&quot;;[.N224]=&quot;&quot;);&quot;UNKNOWN&quot;;&quot;CONTRADICTION&quot;);IF([.M224]=&quot;UNMATCHED&quot;;IF(AND([.L224]=&quot;&quot;;[.N224]=&quot;&quot;);&quot;CLEAR&quot;;&quot;CONTRADICTION&quot;);IF([.M224]=&quot;SINGLE_SALE_LINKED&quot;;IF(AND([.L224]&lt;&gt;&quot;&quot;;[.N224]=&quot;&quot;);&quot;CLEAR&quot;;&quot;CONTRADICTION&quot;);IF([.M224]=&quot;MULTI_SALE_PENDING_ALLOCATION&quot;;IF([.L224]=&quot;&quot;;&quot;CLEAR&quot;;&quot;CONTRADICTION&quot;);IF([.M224]=&quot;ALLOCATED&quot;;IF(AND([.L224]=&quot;&quot;;[.N224]&lt;&gt;&quot;&quot;);&quot;CLEAR&quot;;&quot;CONTRADICTION&quot;);&quot;CONTRADICTION&quot;)))))">
            <text:p>UNKNOWN</text:p>
          </table:table-cell>
          <table:table-cell office:value-type="string" table:formula="of:=IF([.S224]=&quot;UNKNOWN&quot;;&quot;NO ACTION — linkage status is UNKNOWN / not asserted&quot;;IF([.S224]=&quot;CLEAR&quot;;&quot;NO CONTRADICTION — preserve evidence as entered&quot;;IF([.M224]=&quot;&quot;;&quot;REVIEW LINKAGE STATUS — identifiers are present while status is UNKNOWN&quot;;IF([.M224]=&quot;UNMATCHED&quot;;&quot;REMOVE LINKAGE IDENTIFIERS OR CORRECT LINKAGE STATUS&quot;;IF([.M224]=&quot;SINGLE_SALE_LINKED&quot;;&quot;REQUIRE LINKED SALE ID AND NO ALLOCATION GROUP ID&quot;;IF([.M224]=&quot;MULTI_SALE_PENDING_ALLOCATION&quot;;&quot;REMOVE LINKED SALE ID OR CORRECT LINKAGE STATUS&quot;;IF([.M224]=&quot;ALLOCATED&quot;;&quot;REQUIRE ALLOCATION GROUP ID AND NO LINKED SALE ID&quot;;&quot;REVIEW LINKAGE EVIDENCE — NO AUTHORITY CREATED&quot;)))))))">
            <text:p>NO ACTION — linkage status is UNKNOWN / not asserted</text:p>
          </table:table-cell>
          <table:table-cell office:value-type="string" table:formula="of:=IF([.S224]=&quot;CONTRADICTION&quot;;&quot;BLOCKED&quot;;IF([.S224]=&quot;UNKNOWN&quot;;&quot;UNKNOWN&quot;;IF([.S224]=&quot;CLEAR&quot;;IF(OR([.O224]=&quot;&quot;;[.P224]=&quot;&quot;);&quot;UNKNOWN&quot;;&quot;READY FOR REVIEW&quot;);&quot;BLOCKED&quot;)))">
            <text:p>UNKNOWN</text:p>
          </table:table-cell>
          <table:table-cell office:value-type="string" table:formula="of:=IF([.U224]=&quot;UNKNOWN&quot;;&quot;COMPLETE OR ASSERT REQUIRED EVIDENCE BEFORE REVIEW&quot;;IF([.U224]=&quot;BLOCKED&quot;;&quot;RESOLVE CONTRADICTION BEFORE REVIEW — NO AUTHORITY CREATED&quot;;IF([.U2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4]=&quot;READY FOR REVIEW&quot;;&quot;REVIEW ELIGIBLE — NO AUTHORITY&quot;;IF(OR([.U224]=&quot;UNKNOWN&quot;;[.U22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5]=&quot;&quot;;IF(AND([.L225]=&quot;&quot;;[.N225]=&quot;&quot;);&quot;UNKNOWN&quot;;&quot;CONTRADICTION&quot;);IF([.M225]=&quot;UNMATCHED&quot;;IF(AND([.L225]=&quot;&quot;;[.N225]=&quot;&quot;);&quot;CLEAR&quot;;&quot;CONTRADICTION&quot;);IF([.M225]=&quot;SINGLE_SALE_LINKED&quot;;IF(AND([.L225]&lt;&gt;&quot;&quot;;[.N225]=&quot;&quot;);&quot;CLEAR&quot;;&quot;CONTRADICTION&quot;);IF([.M225]=&quot;MULTI_SALE_PENDING_ALLOCATION&quot;;IF([.L225]=&quot;&quot;;&quot;CLEAR&quot;;&quot;CONTRADICTION&quot;);IF([.M225]=&quot;ALLOCATED&quot;;IF(AND([.L225]=&quot;&quot;;[.N225]&lt;&gt;&quot;&quot;);&quot;CLEAR&quot;;&quot;CONTRADICTION&quot;);&quot;CONTRADICTION&quot;)))))">
            <text:p>UNKNOWN</text:p>
          </table:table-cell>
          <table:table-cell office:value-type="string" table:formula="of:=IF([.S225]=&quot;UNKNOWN&quot;;&quot;NO ACTION — linkage status is UNKNOWN / not asserted&quot;;IF([.S225]=&quot;CLEAR&quot;;&quot;NO CONTRADICTION — preserve evidence as entered&quot;;IF([.M225]=&quot;&quot;;&quot;REVIEW LINKAGE STATUS — identifiers are present while status is UNKNOWN&quot;;IF([.M225]=&quot;UNMATCHED&quot;;&quot;REMOVE LINKAGE IDENTIFIERS OR CORRECT LINKAGE STATUS&quot;;IF([.M225]=&quot;SINGLE_SALE_LINKED&quot;;&quot;REQUIRE LINKED SALE ID AND NO ALLOCATION GROUP ID&quot;;IF([.M225]=&quot;MULTI_SALE_PENDING_ALLOCATION&quot;;&quot;REMOVE LINKED SALE ID OR CORRECT LINKAGE STATUS&quot;;IF([.M225]=&quot;ALLOCATED&quot;;&quot;REQUIRE ALLOCATION GROUP ID AND NO LINKED SALE ID&quot;;&quot;REVIEW LINKAGE EVIDENCE — NO AUTHORITY CREATED&quot;)))))))">
            <text:p>NO ACTION — linkage status is UNKNOWN / not asserted</text:p>
          </table:table-cell>
          <table:table-cell office:value-type="string" table:formula="of:=IF([.S225]=&quot;CONTRADICTION&quot;;&quot;BLOCKED&quot;;IF([.S225]=&quot;UNKNOWN&quot;;&quot;UNKNOWN&quot;;IF([.S225]=&quot;CLEAR&quot;;IF(OR([.O225]=&quot;&quot;;[.P225]=&quot;&quot;);&quot;UNKNOWN&quot;;&quot;READY FOR REVIEW&quot;);&quot;BLOCKED&quot;)))">
            <text:p>UNKNOWN</text:p>
          </table:table-cell>
          <table:table-cell office:value-type="string" table:formula="of:=IF([.U225]=&quot;UNKNOWN&quot;;&quot;COMPLETE OR ASSERT REQUIRED EVIDENCE BEFORE REVIEW&quot;;IF([.U225]=&quot;BLOCKED&quot;;&quot;RESOLVE CONTRADICTION BEFORE REVIEW — NO AUTHORITY CREATED&quot;;IF([.U2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5]=&quot;READY FOR REVIEW&quot;;&quot;REVIEW ELIGIBLE — NO AUTHORITY&quot;;IF(OR([.U225]=&quot;UNKNOWN&quot;;[.U22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6]=&quot;&quot;;IF(AND([.L226]=&quot;&quot;;[.N226]=&quot;&quot;);&quot;UNKNOWN&quot;;&quot;CONTRADICTION&quot;);IF([.M226]=&quot;UNMATCHED&quot;;IF(AND([.L226]=&quot;&quot;;[.N226]=&quot;&quot;);&quot;CLEAR&quot;;&quot;CONTRADICTION&quot;);IF([.M226]=&quot;SINGLE_SALE_LINKED&quot;;IF(AND([.L226]&lt;&gt;&quot;&quot;;[.N226]=&quot;&quot;);&quot;CLEAR&quot;;&quot;CONTRADICTION&quot;);IF([.M226]=&quot;MULTI_SALE_PENDING_ALLOCATION&quot;;IF([.L226]=&quot;&quot;;&quot;CLEAR&quot;;&quot;CONTRADICTION&quot;);IF([.M226]=&quot;ALLOCATED&quot;;IF(AND([.L226]=&quot;&quot;;[.N226]&lt;&gt;&quot;&quot;);&quot;CLEAR&quot;;&quot;CONTRADICTION&quot;);&quot;CONTRADICTION&quot;)))))">
            <text:p>UNKNOWN</text:p>
          </table:table-cell>
          <table:table-cell office:value-type="string" table:formula="of:=IF([.S226]=&quot;UNKNOWN&quot;;&quot;NO ACTION — linkage status is UNKNOWN / not asserted&quot;;IF([.S226]=&quot;CLEAR&quot;;&quot;NO CONTRADICTION — preserve evidence as entered&quot;;IF([.M226]=&quot;&quot;;&quot;REVIEW LINKAGE STATUS — identifiers are present while status is UNKNOWN&quot;;IF([.M226]=&quot;UNMATCHED&quot;;&quot;REMOVE LINKAGE IDENTIFIERS OR CORRECT LINKAGE STATUS&quot;;IF([.M226]=&quot;SINGLE_SALE_LINKED&quot;;&quot;REQUIRE LINKED SALE ID AND NO ALLOCATION GROUP ID&quot;;IF([.M226]=&quot;MULTI_SALE_PENDING_ALLOCATION&quot;;&quot;REMOVE LINKED SALE ID OR CORRECT LINKAGE STATUS&quot;;IF([.M226]=&quot;ALLOCATED&quot;;&quot;REQUIRE ALLOCATION GROUP ID AND NO LINKED SALE ID&quot;;&quot;REVIEW LINKAGE EVIDENCE — NO AUTHORITY CREATED&quot;)))))))">
            <text:p>NO ACTION — linkage status is UNKNOWN / not asserted</text:p>
          </table:table-cell>
          <table:table-cell office:value-type="string" table:formula="of:=IF([.S226]=&quot;CONTRADICTION&quot;;&quot;BLOCKED&quot;;IF([.S226]=&quot;UNKNOWN&quot;;&quot;UNKNOWN&quot;;IF([.S226]=&quot;CLEAR&quot;;IF(OR([.O226]=&quot;&quot;;[.P226]=&quot;&quot;);&quot;UNKNOWN&quot;;&quot;READY FOR REVIEW&quot;);&quot;BLOCKED&quot;)))">
            <text:p>UNKNOWN</text:p>
          </table:table-cell>
          <table:table-cell office:value-type="string" table:formula="of:=IF([.U226]=&quot;UNKNOWN&quot;;&quot;COMPLETE OR ASSERT REQUIRED EVIDENCE BEFORE REVIEW&quot;;IF([.U226]=&quot;BLOCKED&quot;;&quot;RESOLVE CONTRADICTION BEFORE REVIEW — NO AUTHORITY CREATED&quot;;IF([.U2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6]=&quot;READY FOR REVIEW&quot;;&quot;REVIEW ELIGIBLE — NO AUTHORITY&quot;;IF(OR([.U226]=&quot;UNKNOWN&quot;;[.U22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7]=&quot;&quot;;IF(AND([.L227]=&quot;&quot;;[.N227]=&quot;&quot;);&quot;UNKNOWN&quot;;&quot;CONTRADICTION&quot;);IF([.M227]=&quot;UNMATCHED&quot;;IF(AND([.L227]=&quot;&quot;;[.N227]=&quot;&quot;);&quot;CLEAR&quot;;&quot;CONTRADICTION&quot;);IF([.M227]=&quot;SINGLE_SALE_LINKED&quot;;IF(AND([.L227]&lt;&gt;&quot;&quot;;[.N227]=&quot;&quot;);&quot;CLEAR&quot;;&quot;CONTRADICTION&quot;);IF([.M227]=&quot;MULTI_SALE_PENDING_ALLOCATION&quot;;IF([.L227]=&quot;&quot;;&quot;CLEAR&quot;;&quot;CONTRADICTION&quot;);IF([.M227]=&quot;ALLOCATED&quot;;IF(AND([.L227]=&quot;&quot;;[.N227]&lt;&gt;&quot;&quot;);&quot;CLEAR&quot;;&quot;CONTRADICTION&quot;);&quot;CONTRADICTION&quot;)))))">
            <text:p>UNKNOWN</text:p>
          </table:table-cell>
          <table:table-cell office:value-type="string" table:formula="of:=IF([.S227]=&quot;UNKNOWN&quot;;&quot;NO ACTION — linkage status is UNKNOWN / not asserted&quot;;IF([.S227]=&quot;CLEAR&quot;;&quot;NO CONTRADICTION — preserve evidence as entered&quot;;IF([.M227]=&quot;&quot;;&quot;REVIEW LINKAGE STATUS — identifiers are present while status is UNKNOWN&quot;;IF([.M227]=&quot;UNMATCHED&quot;;&quot;REMOVE LINKAGE IDENTIFIERS OR CORRECT LINKAGE STATUS&quot;;IF([.M227]=&quot;SINGLE_SALE_LINKED&quot;;&quot;REQUIRE LINKED SALE ID AND NO ALLOCATION GROUP ID&quot;;IF([.M227]=&quot;MULTI_SALE_PENDING_ALLOCATION&quot;;&quot;REMOVE LINKED SALE ID OR CORRECT LINKAGE STATUS&quot;;IF([.M227]=&quot;ALLOCATED&quot;;&quot;REQUIRE ALLOCATION GROUP ID AND NO LINKED SALE ID&quot;;&quot;REVIEW LINKAGE EVIDENCE — NO AUTHORITY CREATED&quot;)))))))">
            <text:p>NO ACTION — linkage status is UNKNOWN / not asserted</text:p>
          </table:table-cell>
          <table:table-cell office:value-type="string" table:formula="of:=IF([.S227]=&quot;CONTRADICTION&quot;;&quot;BLOCKED&quot;;IF([.S227]=&quot;UNKNOWN&quot;;&quot;UNKNOWN&quot;;IF([.S227]=&quot;CLEAR&quot;;IF(OR([.O227]=&quot;&quot;;[.P227]=&quot;&quot;);&quot;UNKNOWN&quot;;&quot;READY FOR REVIEW&quot;);&quot;BLOCKED&quot;)))">
            <text:p>UNKNOWN</text:p>
          </table:table-cell>
          <table:table-cell office:value-type="string" table:formula="of:=IF([.U227]=&quot;UNKNOWN&quot;;&quot;COMPLETE OR ASSERT REQUIRED EVIDENCE BEFORE REVIEW&quot;;IF([.U227]=&quot;BLOCKED&quot;;&quot;RESOLVE CONTRADICTION BEFORE REVIEW — NO AUTHORITY CREATED&quot;;IF([.U2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7]=&quot;READY FOR REVIEW&quot;;&quot;REVIEW ELIGIBLE — NO AUTHORITY&quot;;IF(OR([.U227]=&quot;UNKNOWN&quot;;[.U22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8]=&quot;&quot;;IF(AND([.L228]=&quot;&quot;;[.N228]=&quot;&quot;);&quot;UNKNOWN&quot;;&quot;CONTRADICTION&quot;);IF([.M228]=&quot;UNMATCHED&quot;;IF(AND([.L228]=&quot;&quot;;[.N228]=&quot;&quot;);&quot;CLEAR&quot;;&quot;CONTRADICTION&quot;);IF([.M228]=&quot;SINGLE_SALE_LINKED&quot;;IF(AND([.L228]&lt;&gt;&quot;&quot;;[.N228]=&quot;&quot;);&quot;CLEAR&quot;;&quot;CONTRADICTION&quot;);IF([.M228]=&quot;MULTI_SALE_PENDING_ALLOCATION&quot;;IF([.L228]=&quot;&quot;;&quot;CLEAR&quot;;&quot;CONTRADICTION&quot;);IF([.M228]=&quot;ALLOCATED&quot;;IF(AND([.L228]=&quot;&quot;;[.N228]&lt;&gt;&quot;&quot;);&quot;CLEAR&quot;;&quot;CONTRADICTION&quot;);&quot;CONTRADICTION&quot;)))))">
            <text:p>UNKNOWN</text:p>
          </table:table-cell>
          <table:table-cell office:value-type="string" table:formula="of:=IF([.S228]=&quot;UNKNOWN&quot;;&quot;NO ACTION — linkage status is UNKNOWN / not asserted&quot;;IF([.S228]=&quot;CLEAR&quot;;&quot;NO CONTRADICTION — preserve evidence as entered&quot;;IF([.M228]=&quot;&quot;;&quot;REVIEW LINKAGE STATUS — identifiers are present while status is UNKNOWN&quot;;IF([.M228]=&quot;UNMATCHED&quot;;&quot;REMOVE LINKAGE IDENTIFIERS OR CORRECT LINKAGE STATUS&quot;;IF([.M228]=&quot;SINGLE_SALE_LINKED&quot;;&quot;REQUIRE LINKED SALE ID AND NO ALLOCATION GROUP ID&quot;;IF([.M228]=&quot;MULTI_SALE_PENDING_ALLOCATION&quot;;&quot;REMOVE LINKED SALE ID OR CORRECT LINKAGE STATUS&quot;;IF([.M228]=&quot;ALLOCATED&quot;;&quot;REQUIRE ALLOCATION GROUP ID AND NO LINKED SALE ID&quot;;&quot;REVIEW LINKAGE EVIDENCE — NO AUTHORITY CREATED&quot;)))))))">
            <text:p>NO ACTION — linkage status is UNKNOWN / not asserted</text:p>
          </table:table-cell>
          <table:table-cell office:value-type="string" table:formula="of:=IF([.S228]=&quot;CONTRADICTION&quot;;&quot;BLOCKED&quot;;IF([.S228]=&quot;UNKNOWN&quot;;&quot;UNKNOWN&quot;;IF([.S228]=&quot;CLEAR&quot;;IF(OR([.O228]=&quot;&quot;;[.P228]=&quot;&quot;);&quot;UNKNOWN&quot;;&quot;READY FOR REVIEW&quot;);&quot;BLOCKED&quot;)))">
            <text:p>UNKNOWN</text:p>
          </table:table-cell>
          <table:table-cell office:value-type="string" table:formula="of:=IF([.U228]=&quot;UNKNOWN&quot;;&quot;COMPLETE OR ASSERT REQUIRED EVIDENCE BEFORE REVIEW&quot;;IF([.U228]=&quot;BLOCKED&quot;;&quot;RESOLVE CONTRADICTION BEFORE REVIEW — NO AUTHORITY CREATED&quot;;IF([.U2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8]=&quot;READY FOR REVIEW&quot;;&quot;REVIEW ELIGIBLE — NO AUTHORITY&quot;;IF(OR([.U228]=&quot;UNKNOWN&quot;;[.U22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9]=&quot;&quot;;IF(AND([.L229]=&quot;&quot;;[.N229]=&quot;&quot;);&quot;UNKNOWN&quot;;&quot;CONTRADICTION&quot;);IF([.M229]=&quot;UNMATCHED&quot;;IF(AND([.L229]=&quot;&quot;;[.N229]=&quot;&quot;);&quot;CLEAR&quot;;&quot;CONTRADICTION&quot;);IF([.M229]=&quot;SINGLE_SALE_LINKED&quot;;IF(AND([.L229]&lt;&gt;&quot;&quot;;[.N229]=&quot;&quot;);&quot;CLEAR&quot;;&quot;CONTRADICTION&quot;);IF([.M229]=&quot;MULTI_SALE_PENDING_ALLOCATION&quot;;IF([.L229]=&quot;&quot;;&quot;CLEAR&quot;;&quot;CONTRADICTION&quot;);IF([.M229]=&quot;ALLOCATED&quot;;IF(AND([.L229]=&quot;&quot;;[.N229]&lt;&gt;&quot;&quot;);&quot;CLEAR&quot;;&quot;CONTRADICTION&quot;);&quot;CONTRADICTION&quot;)))))">
            <text:p>UNKNOWN</text:p>
          </table:table-cell>
          <table:table-cell office:value-type="string" table:formula="of:=IF([.S229]=&quot;UNKNOWN&quot;;&quot;NO ACTION — linkage status is UNKNOWN / not asserted&quot;;IF([.S229]=&quot;CLEAR&quot;;&quot;NO CONTRADICTION — preserve evidence as entered&quot;;IF([.M229]=&quot;&quot;;&quot;REVIEW LINKAGE STATUS — identifiers are present while status is UNKNOWN&quot;;IF([.M229]=&quot;UNMATCHED&quot;;&quot;REMOVE LINKAGE IDENTIFIERS OR CORRECT LINKAGE STATUS&quot;;IF([.M229]=&quot;SINGLE_SALE_LINKED&quot;;&quot;REQUIRE LINKED SALE ID AND NO ALLOCATION GROUP ID&quot;;IF([.M229]=&quot;MULTI_SALE_PENDING_ALLOCATION&quot;;&quot;REMOVE LINKED SALE ID OR CORRECT LINKAGE STATUS&quot;;IF([.M229]=&quot;ALLOCATED&quot;;&quot;REQUIRE ALLOCATION GROUP ID AND NO LINKED SALE ID&quot;;&quot;REVIEW LINKAGE EVIDENCE — NO AUTHORITY CREATED&quot;)))))))">
            <text:p>NO ACTION — linkage status is UNKNOWN / not asserted</text:p>
          </table:table-cell>
          <table:table-cell office:value-type="string" table:formula="of:=IF([.S229]=&quot;CONTRADICTION&quot;;&quot;BLOCKED&quot;;IF([.S229]=&quot;UNKNOWN&quot;;&quot;UNKNOWN&quot;;IF([.S229]=&quot;CLEAR&quot;;IF(OR([.O229]=&quot;&quot;;[.P229]=&quot;&quot;);&quot;UNKNOWN&quot;;&quot;READY FOR REVIEW&quot;);&quot;BLOCKED&quot;)))">
            <text:p>UNKNOWN</text:p>
          </table:table-cell>
          <table:table-cell office:value-type="string" table:formula="of:=IF([.U229]=&quot;UNKNOWN&quot;;&quot;COMPLETE OR ASSERT REQUIRED EVIDENCE BEFORE REVIEW&quot;;IF([.U229]=&quot;BLOCKED&quot;;&quot;RESOLVE CONTRADICTION BEFORE REVIEW — NO AUTHORITY CREATED&quot;;IF([.U2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9]=&quot;READY FOR REVIEW&quot;;&quot;REVIEW ELIGIBLE — NO AUTHORITY&quot;;IF(OR([.U229]=&quot;UNKNOWN&quot;;[.U22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0]=&quot;&quot;;IF(AND([.L230]=&quot;&quot;;[.N230]=&quot;&quot;);&quot;UNKNOWN&quot;;&quot;CONTRADICTION&quot;);IF([.M230]=&quot;UNMATCHED&quot;;IF(AND([.L230]=&quot;&quot;;[.N230]=&quot;&quot;);&quot;CLEAR&quot;;&quot;CONTRADICTION&quot;);IF([.M230]=&quot;SINGLE_SALE_LINKED&quot;;IF(AND([.L230]&lt;&gt;&quot;&quot;;[.N230]=&quot;&quot;);&quot;CLEAR&quot;;&quot;CONTRADICTION&quot;);IF([.M230]=&quot;MULTI_SALE_PENDING_ALLOCATION&quot;;IF([.L230]=&quot;&quot;;&quot;CLEAR&quot;;&quot;CONTRADICTION&quot;);IF([.M230]=&quot;ALLOCATED&quot;;IF(AND([.L230]=&quot;&quot;;[.N230]&lt;&gt;&quot;&quot;);&quot;CLEAR&quot;;&quot;CONTRADICTION&quot;);&quot;CONTRADICTION&quot;)))))">
            <text:p>UNKNOWN</text:p>
          </table:table-cell>
          <table:table-cell office:value-type="string" table:formula="of:=IF([.S230]=&quot;UNKNOWN&quot;;&quot;NO ACTION — linkage status is UNKNOWN / not asserted&quot;;IF([.S230]=&quot;CLEAR&quot;;&quot;NO CONTRADICTION — preserve evidence as entered&quot;;IF([.M230]=&quot;&quot;;&quot;REVIEW LINKAGE STATUS — identifiers are present while status is UNKNOWN&quot;;IF([.M230]=&quot;UNMATCHED&quot;;&quot;REMOVE LINKAGE IDENTIFIERS OR CORRECT LINKAGE STATUS&quot;;IF([.M230]=&quot;SINGLE_SALE_LINKED&quot;;&quot;REQUIRE LINKED SALE ID AND NO ALLOCATION GROUP ID&quot;;IF([.M230]=&quot;MULTI_SALE_PENDING_ALLOCATION&quot;;&quot;REMOVE LINKED SALE ID OR CORRECT LINKAGE STATUS&quot;;IF([.M230]=&quot;ALLOCATED&quot;;&quot;REQUIRE ALLOCATION GROUP ID AND NO LINKED SALE ID&quot;;&quot;REVIEW LINKAGE EVIDENCE — NO AUTHORITY CREATED&quot;)))))))">
            <text:p>NO ACTION — linkage status is UNKNOWN / not asserted</text:p>
          </table:table-cell>
          <table:table-cell office:value-type="string" table:formula="of:=IF([.S230]=&quot;CONTRADICTION&quot;;&quot;BLOCKED&quot;;IF([.S230]=&quot;UNKNOWN&quot;;&quot;UNKNOWN&quot;;IF([.S230]=&quot;CLEAR&quot;;IF(OR([.O230]=&quot;&quot;;[.P230]=&quot;&quot;);&quot;UNKNOWN&quot;;&quot;READY FOR REVIEW&quot;);&quot;BLOCKED&quot;)))">
            <text:p>UNKNOWN</text:p>
          </table:table-cell>
          <table:table-cell office:value-type="string" table:formula="of:=IF([.U230]=&quot;UNKNOWN&quot;;&quot;COMPLETE OR ASSERT REQUIRED EVIDENCE BEFORE REVIEW&quot;;IF([.U230]=&quot;BLOCKED&quot;;&quot;RESOLVE CONTRADICTION BEFORE REVIEW — NO AUTHORITY CREATED&quot;;IF([.U2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0]=&quot;READY FOR REVIEW&quot;;&quot;REVIEW ELIGIBLE — NO AUTHORITY&quot;;IF(OR([.U230]=&quot;UNKNOWN&quot;;[.U23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1]=&quot;&quot;;IF(AND([.L231]=&quot;&quot;;[.N231]=&quot;&quot;);&quot;UNKNOWN&quot;;&quot;CONTRADICTION&quot;);IF([.M231]=&quot;UNMATCHED&quot;;IF(AND([.L231]=&quot;&quot;;[.N231]=&quot;&quot;);&quot;CLEAR&quot;;&quot;CONTRADICTION&quot;);IF([.M231]=&quot;SINGLE_SALE_LINKED&quot;;IF(AND([.L231]&lt;&gt;&quot;&quot;;[.N231]=&quot;&quot;);&quot;CLEAR&quot;;&quot;CONTRADICTION&quot;);IF([.M231]=&quot;MULTI_SALE_PENDING_ALLOCATION&quot;;IF([.L231]=&quot;&quot;;&quot;CLEAR&quot;;&quot;CONTRADICTION&quot;);IF([.M231]=&quot;ALLOCATED&quot;;IF(AND([.L231]=&quot;&quot;;[.N231]&lt;&gt;&quot;&quot;);&quot;CLEAR&quot;;&quot;CONTRADICTION&quot;);&quot;CONTRADICTION&quot;)))))">
            <text:p>UNKNOWN</text:p>
          </table:table-cell>
          <table:table-cell office:value-type="string" table:formula="of:=IF([.S231]=&quot;UNKNOWN&quot;;&quot;NO ACTION — linkage status is UNKNOWN / not asserted&quot;;IF([.S231]=&quot;CLEAR&quot;;&quot;NO CONTRADICTION — preserve evidence as entered&quot;;IF([.M231]=&quot;&quot;;&quot;REVIEW LINKAGE STATUS — identifiers are present while status is UNKNOWN&quot;;IF([.M231]=&quot;UNMATCHED&quot;;&quot;REMOVE LINKAGE IDENTIFIERS OR CORRECT LINKAGE STATUS&quot;;IF([.M231]=&quot;SINGLE_SALE_LINKED&quot;;&quot;REQUIRE LINKED SALE ID AND NO ALLOCATION GROUP ID&quot;;IF([.M231]=&quot;MULTI_SALE_PENDING_ALLOCATION&quot;;&quot;REMOVE LINKED SALE ID OR CORRECT LINKAGE STATUS&quot;;IF([.M231]=&quot;ALLOCATED&quot;;&quot;REQUIRE ALLOCATION GROUP ID AND NO LINKED SALE ID&quot;;&quot;REVIEW LINKAGE EVIDENCE — NO AUTHORITY CREATED&quot;)))))))">
            <text:p>NO ACTION — linkage status is UNKNOWN / not asserted</text:p>
          </table:table-cell>
          <table:table-cell office:value-type="string" table:formula="of:=IF([.S231]=&quot;CONTRADICTION&quot;;&quot;BLOCKED&quot;;IF([.S231]=&quot;UNKNOWN&quot;;&quot;UNKNOWN&quot;;IF([.S231]=&quot;CLEAR&quot;;IF(OR([.O231]=&quot;&quot;;[.P231]=&quot;&quot;);&quot;UNKNOWN&quot;;&quot;READY FOR REVIEW&quot;);&quot;BLOCKED&quot;)))">
            <text:p>UNKNOWN</text:p>
          </table:table-cell>
          <table:table-cell office:value-type="string" table:formula="of:=IF([.U231]=&quot;UNKNOWN&quot;;&quot;COMPLETE OR ASSERT REQUIRED EVIDENCE BEFORE REVIEW&quot;;IF([.U231]=&quot;BLOCKED&quot;;&quot;RESOLVE CONTRADICTION BEFORE REVIEW — NO AUTHORITY CREATED&quot;;IF([.U2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1]=&quot;READY FOR REVIEW&quot;;&quot;REVIEW ELIGIBLE — NO AUTHORITY&quot;;IF(OR([.U231]=&quot;UNKNOWN&quot;;[.U23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2]=&quot;&quot;;IF(AND([.L232]=&quot;&quot;;[.N232]=&quot;&quot;);&quot;UNKNOWN&quot;;&quot;CONTRADICTION&quot;);IF([.M232]=&quot;UNMATCHED&quot;;IF(AND([.L232]=&quot;&quot;;[.N232]=&quot;&quot;);&quot;CLEAR&quot;;&quot;CONTRADICTION&quot;);IF([.M232]=&quot;SINGLE_SALE_LINKED&quot;;IF(AND([.L232]&lt;&gt;&quot;&quot;;[.N232]=&quot;&quot;);&quot;CLEAR&quot;;&quot;CONTRADICTION&quot;);IF([.M232]=&quot;MULTI_SALE_PENDING_ALLOCATION&quot;;IF([.L232]=&quot;&quot;;&quot;CLEAR&quot;;&quot;CONTRADICTION&quot;);IF([.M232]=&quot;ALLOCATED&quot;;IF(AND([.L232]=&quot;&quot;;[.N232]&lt;&gt;&quot;&quot;);&quot;CLEAR&quot;;&quot;CONTRADICTION&quot;);&quot;CONTRADICTION&quot;)))))">
            <text:p>UNKNOWN</text:p>
          </table:table-cell>
          <table:table-cell office:value-type="string" table:formula="of:=IF([.S232]=&quot;UNKNOWN&quot;;&quot;NO ACTION — linkage status is UNKNOWN / not asserted&quot;;IF([.S232]=&quot;CLEAR&quot;;&quot;NO CONTRADICTION — preserve evidence as entered&quot;;IF([.M232]=&quot;&quot;;&quot;REVIEW LINKAGE STATUS — identifiers are present while status is UNKNOWN&quot;;IF([.M232]=&quot;UNMATCHED&quot;;&quot;REMOVE LINKAGE IDENTIFIERS OR CORRECT LINKAGE STATUS&quot;;IF([.M232]=&quot;SINGLE_SALE_LINKED&quot;;&quot;REQUIRE LINKED SALE ID AND NO ALLOCATION GROUP ID&quot;;IF([.M232]=&quot;MULTI_SALE_PENDING_ALLOCATION&quot;;&quot;REMOVE LINKED SALE ID OR CORRECT LINKAGE STATUS&quot;;IF([.M232]=&quot;ALLOCATED&quot;;&quot;REQUIRE ALLOCATION GROUP ID AND NO LINKED SALE ID&quot;;&quot;REVIEW LINKAGE EVIDENCE — NO AUTHORITY CREATED&quot;)))))))">
            <text:p>NO ACTION — linkage status is UNKNOWN / not asserted</text:p>
          </table:table-cell>
          <table:table-cell office:value-type="string" table:formula="of:=IF([.S232]=&quot;CONTRADICTION&quot;;&quot;BLOCKED&quot;;IF([.S232]=&quot;UNKNOWN&quot;;&quot;UNKNOWN&quot;;IF([.S232]=&quot;CLEAR&quot;;IF(OR([.O232]=&quot;&quot;;[.P232]=&quot;&quot;);&quot;UNKNOWN&quot;;&quot;READY FOR REVIEW&quot;);&quot;BLOCKED&quot;)))">
            <text:p>UNKNOWN</text:p>
          </table:table-cell>
          <table:table-cell office:value-type="string" table:formula="of:=IF([.U232]=&quot;UNKNOWN&quot;;&quot;COMPLETE OR ASSERT REQUIRED EVIDENCE BEFORE REVIEW&quot;;IF([.U232]=&quot;BLOCKED&quot;;&quot;RESOLVE CONTRADICTION BEFORE REVIEW — NO AUTHORITY CREATED&quot;;IF([.U2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2]=&quot;READY FOR REVIEW&quot;;&quot;REVIEW ELIGIBLE — NO AUTHORITY&quot;;IF(OR([.U232]=&quot;UNKNOWN&quot;;[.U23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3]=&quot;&quot;;IF(AND([.L233]=&quot;&quot;;[.N233]=&quot;&quot;);&quot;UNKNOWN&quot;;&quot;CONTRADICTION&quot;);IF([.M233]=&quot;UNMATCHED&quot;;IF(AND([.L233]=&quot;&quot;;[.N233]=&quot;&quot;);&quot;CLEAR&quot;;&quot;CONTRADICTION&quot;);IF([.M233]=&quot;SINGLE_SALE_LINKED&quot;;IF(AND([.L233]&lt;&gt;&quot;&quot;;[.N233]=&quot;&quot;);&quot;CLEAR&quot;;&quot;CONTRADICTION&quot;);IF([.M233]=&quot;MULTI_SALE_PENDING_ALLOCATION&quot;;IF([.L233]=&quot;&quot;;&quot;CLEAR&quot;;&quot;CONTRADICTION&quot;);IF([.M233]=&quot;ALLOCATED&quot;;IF(AND([.L233]=&quot;&quot;;[.N233]&lt;&gt;&quot;&quot;);&quot;CLEAR&quot;;&quot;CONTRADICTION&quot;);&quot;CONTRADICTION&quot;)))))">
            <text:p>UNKNOWN</text:p>
          </table:table-cell>
          <table:table-cell office:value-type="string" table:formula="of:=IF([.S233]=&quot;UNKNOWN&quot;;&quot;NO ACTION — linkage status is UNKNOWN / not asserted&quot;;IF([.S233]=&quot;CLEAR&quot;;&quot;NO CONTRADICTION — preserve evidence as entered&quot;;IF([.M233]=&quot;&quot;;&quot;REVIEW LINKAGE STATUS — identifiers are present while status is UNKNOWN&quot;;IF([.M233]=&quot;UNMATCHED&quot;;&quot;REMOVE LINKAGE IDENTIFIERS OR CORRECT LINKAGE STATUS&quot;;IF([.M233]=&quot;SINGLE_SALE_LINKED&quot;;&quot;REQUIRE LINKED SALE ID AND NO ALLOCATION GROUP ID&quot;;IF([.M233]=&quot;MULTI_SALE_PENDING_ALLOCATION&quot;;&quot;REMOVE LINKED SALE ID OR CORRECT LINKAGE STATUS&quot;;IF([.M233]=&quot;ALLOCATED&quot;;&quot;REQUIRE ALLOCATION GROUP ID AND NO LINKED SALE ID&quot;;&quot;REVIEW LINKAGE EVIDENCE — NO AUTHORITY CREATED&quot;)))))))">
            <text:p>NO ACTION — linkage status is UNKNOWN / not asserted</text:p>
          </table:table-cell>
          <table:table-cell office:value-type="string" table:formula="of:=IF([.S233]=&quot;CONTRADICTION&quot;;&quot;BLOCKED&quot;;IF([.S233]=&quot;UNKNOWN&quot;;&quot;UNKNOWN&quot;;IF([.S233]=&quot;CLEAR&quot;;IF(OR([.O233]=&quot;&quot;;[.P233]=&quot;&quot;);&quot;UNKNOWN&quot;;&quot;READY FOR REVIEW&quot;);&quot;BLOCKED&quot;)))">
            <text:p>UNKNOWN</text:p>
          </table:table-cell>
          <table:table-cell office:value-type="string" table:formula="of:=IF([.U233]=&quot;UNKNOWN&quot;;&quot;COMPLETE OR ASSERT REQUIRED EVIDENCE BEFORE REVIEW&quot;;IF([.U233]=&quot;BLOCKED&quot;;&quot;RESOLVE CONTRADICTION BEFORE REVIEW — NO AUTHORITY CREATED&quot;;IF([.U2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3]=&quot;READY FOR REVIEW&quot;;&quot;REVIEW ELIGIBLE — NO AUTHORITY&quot;;IF(OR([.U233]=&quot;UNKNOWN&quot;;[.U23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4]=&quot;&quot;;IF(AND([.L234]=&quot;&quot;;[.N234]=&quot;&quot;);&quot;UNKNOWN&quot;;&quot;CONTRADICTION&quot;);IF([.M234]=&quot;UNMATCHED&quot;;IF(AND([.L234]=&quot;&quot;;[.N234]=&quot;&quot;);&quot;CLEAR&quot;;&quot;CONTRADICTION&quot;);IF([.M234]=&quot;SINGLE_SALE_LINKED&quot;;IF(AND([.L234]&lt;&gt;&quot;&quot;;[.N234]=&quot;&quot;);&quot;CLEAR&quot;;&quot;CONTRADICTION&quot;);IF([.M234]=&quot;MULTI_SALE_PENDING_ALLOCATION&quot;;IF([.L234]=&quot;&quot;;&quot;CLEAR&quot;;&quot;CONTRADICTION&quot;);IF([.M234]=&quot;ALLOCATED&quot;;IF(AND([.L234]=&quot;&quot;;[.N234]&lt;&gt;&quot;&quot;);&quot;CLEAR&quot;;&quot;CONTRADICTION&quot;);&quot;CONTRADICTION&quot;)))))">
            <text:p>UNKNOWN</text:p>
          </table:table-cell>
          <table:table-cell office:value-type="string" table:formula="of:=IF([.S234]=&quot;UNKNOWN&quot;;&quot;NO ACTION — linkage status is UNKNOWN / not asserted&quot;;IF([.S234]=&quot;CLEAR&quot;;&quot;NO CONTRADICTION — preserve evidence as entered&quot;;IF([.M234]=&quot;&quot;;&quot;REVIEW LINKAGE STATUS — identifiers are present while status is UNKNOWN&quot;;IF([.M234]=&quot;UNMATCHED&quot;;&quot;REMOVE LINKAGE IDENTIFIERS OR CORRECT LINKAGE STATUS&quot;;IF([.M234]=&quot;SINGLE_SALE_LINKED&quot;;&quot;REQUIRE LINKED SALE ID AND NO ALLOCATION GROUP ID&quot;;IF([.M234]=&quot;MULTI_SALE_PENDING_ALLOCATION&quot;;&quot;REMOVE LINKED SALE ID OR CORRECT LINKAGE STATUS&quot;;IF([.M234]=&quot;ALLOCATED&quot;;&quot;REQUIRE ALLOCATION GROUP ID AND NO LINKED SALE ID&quot;;&quot;REVIEW LINKAGE EVIDENCE — NO AUTHORITY CREATED&quot;)))))))">
            <text:p>NO ACTION — linkage status is UNKNOWN / not asserted</text:p>
          </table:table-cell>
          <table:table-cell office:value-type="string" table:formula="of:=IF([.S234]=&quot;CONTRADICTION&quot;;&quot;BLOCKED&quot;;IF([.S234]=&quot;UNKNOWN&quot;;&quot;UNKNOWN&quot;;IF([.S234]=&quot;CLEAR&quot;;IF(OR([.O234]=&quot;&quot;;[.P234]=&quot;&quot;);&quot;UNKNOWN&quot;;&quot;READY FOR REVIEW&quot;);&quot;BLOCKED&quot;)))">
            <text:p>UNKNOWN</text:p>
          </table:table-cell>
          <table:table-cell office:value-type="string" table:formula="of:=IF([.U234]=&quot;UNKNOWN&quot;;&quot;COMPLETE OR ASSERT REQUIRED EVIDENCE BEFORE REVIEW&quot;;IF([.U234]=&quot;BLOCKED&quot;;&quot;RESOLVE CONTRADICTION BEFORE REVIEW — NO AUTHORITY CREATED&quot;;IF([.U2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4]=&quot;READY FOR REVIEW&quot;;&quot;REVIEW ELIGIBLE — NO AUTHORITY&quot;;IF(OR([.U234]=&quot;UNKNOWN&quot;;[.U23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5]=&quot;&quot;;IF(AND([.L235]=&quot;&quot;;[.N235]=&quot;&quot;);&quot;UNKNOWN&quot;;&quot;CONTRADICTION&quot;);IF([.M235]=&quot;UNMATCHED&quot;;IF(AND([.L235]=&quot;&quot;;[.N235]=&quot;&quot;);&quot;CLEAR&quot;;&quot;CONTRADICTION&quot;);IF([.M235]=&quot;SINGLE_SALE_LINKED&quot;;IF(AND([.L235]&lt;&gt;&quot;&quot;;[.N235]=&quot;&quot;);&quot;CLEAR&quot;;&quot;CONTRADICTION&quot;);IF([.M235]=&quot;MULTI_SALE_PENDING_ALLOCATION&quot;;IF([.L235]=&quot;&quot;;&quot;CLEAR&quot;;&quot;CONTRADICTION&quot;);IF([.M235]=&quot;ALLOCATED&quot;;IF(AND([.L235]=&quot;&quot;;[.N235]&lt;&gt;&quot;&quot;);&quot;CLEAR&quot;;&quot;CONTRADICTION&quot;);&quot;CONTRADICTION&quot;)))))">
            <text:p>UNKNOWN</text:p>
          </table:table-cell>
          <table:table-cell office:value-type="string" table:formula="of:=IF([.S235]=&quot;UNKNOWN&quot;;&quot;NO ACTION — linkage status is UNKNOWN / not asserted&quot;;IF([.S235]=&quot;CLEAR&quot;;&quot;NO CONTRADICTION — preserve evidence as entered&quot;;IF([.M235]=&quot;&quot;;&quot;REVIEW LINKAGE STATUS — identifiers are present while status is UNKNOWN&quot;;IF([.M235]=&quot;UNMATCHED&quot;;&quot;REMOVE LINKAGE IDENTIFIERS OR CORRECT LINKAGE STATUS&quot;;IF([.M235]=&quot;SINGLE_SALE_LINKED&quot;;&quot;REQUIRE LINKED SALE ID AND NO ALLOCATION GROUP ID&quot;;IF([.M235]=&quot;MULTI_SALE_PENDING_ALLOCATION&quot;;&quot;REMOVE LINKED SALE ID OR CORRECT LINKAGE STATUS&quot;;IF([.M235]=&quot;ALLOCATED&quot;;&quot;REQUIRE ALLOCATION GROUP ID AND NO LINKED SALE ID&quot;;&quot;REVIEW LINKAGE EVIDENCE — NO AUTHORITY CREATED&quot;)))))))">
            <text:p>NO ACTION — linkage status is UNKNOWN / not asserted</text:p>
          </table:table-cell>
          <table:table-cell office:value-type="string" table:formula="of:=IF([.S235]=&quot;CONTRADICTION&quot;;&quot;BLOCKED&quot;;IF([.S235]=&quot;UNKNOWN&quot;;&quot;UNKNOWN&quot;;IF([.S235]=&quot;CLEAR&quot;;IF(OR([.O235]=&quot;&quot;;[.P235]=&quot;&quot;);&quot;UNKNOWN&quot;;&quot;READY FOR REVIEW&quot;);&quot;BLOCKED&quot;)))">
            <text:p>UNKNOWN</text:p>
          </table:table-cell>
          <table:table-cell office:value-type="string" table:formula="of:=IF([.U235]=&quot;UNKNOWN&quot;;&quot;COMPLETE OR ASSERT REQUIRED EVIDENCE BEFORE REVIEW&quot;;IF([.U235]=&quot;BLOCKED&quot;;&quot;RESOLVE CONTRADICTION BEFORE REVIEW — NO AUTHORITY CREATED&quot;;IF([.U2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5]=&quot;READY FOR REVIEW&quot;;&quot;REVIEW ELIGIBLE — NO AUTHORITY&quot;;IF(OR([.U235]=&quot;UNKNOWN&quot;;[.U23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6]=&quot;&quot;;IF(AND([.L236]=&quot;&quot;;[.N236]=&quot;&quot;);&quot;UNKNOWN&quot;;&quot;CONTRADICTION&quot;);IF([.M236]=&quot;UNMATCHED&quot;;IF(AND([.L236]=&quot;&quot;;[.N236]=&quot;&quot;);&quot;CLEAR&quot;;&quot;CONTRADICTION&quot;);IF([.M236]=&quot;SINGLE_SALE_LINKED&quot;;IF(AND([.L236]&lt;&gt;&quot;&quot;;[.N236]=&quot;&quot;);&quot;CLEAR&quot;;&quot;CONTRADICTION&quot;);IF([.M236]=&quot;MULTI_SALE_PENDING_ALLOCATION&quot;;IF([.L236]=&quot;&quot;;&quot;CLEAR&quot;;&quot;CONTRADICTION&quot;);IF([.M236]=&quot;ALLOCATED&quot;;IF(AND([.L236]=&quot;&quot;;[.N236]&lt;&gt;&quot;&quot;);&quot;CLEAR&quot;;&quot;CONTRADICTION&quot;);&quot;CONTRADICTION&quot;)))))">
            <text:p>UNKNOWN</text:p>
          </table:table-cell>
          <table:table-cell office:value-type="string" table:formula="of:=IF([.S236]=&quot;UNKNOWN&quot;;&quot;NO ACTION — linkage status is UNKNOWN / not asserted&quot;;IF([.S236]=&quot;CLEAR&quot;;&quot;NO CONTRADICTION — preserve evidence as entered&quot;;IF([.M236]=&quot;&quot;;&quot;REVIEW LINKAGE STATUS — identifiers are present while status is UNKNOWN&quot;;IF([.M236]=&quot;UNMATCHED&quot;;&quot;REMOVE LINKAGE IDENTIFIERS OR CORRECT LINKAGE STATUS&quot;;IF([.M236]=&quot;SINGLE_SALE_LINKED&quot;;&quot;REQUIRE LINKED SALE ID AND NO ALLOCATION GROUP ID&quot;;IF([.M236]=&quot;MULTI_SALE_PENDING_ALLOCATION&quot;;&quot;REMOVE LINKED SALE ID OR CORRECT LINKAGE STATUS&quot;;IF([.M236]=&quot;ALLOCATED&quot;;&quot;REQUIRE ALLOCATION GROUP ID AND NO LINKED SALE ID&quot;;&quot;REVIEW LINKAGE EVIDENCE — NO AUTHORITY CREATED&quot;)))))))">
            <text:p>NO ACTION — linkage status is UNKNOWN / not asserted</text:p>
          </table:table-cell>
          <table:table-cell office:value-type="string" table:formula="of:=IF([.S236]=&quot;CONTRADICTION&quot;;&quot;BLOCKED&quot;;IF([.S236]=&quot;UNKNOWN&quot;;&quot;UNKNOWN&quot;;IF([.S236]=&quot;CLEAR&quot;;IF(OR([.O236]=&quot;&quot;;[.P236]=&quot;&quot;);&quot;UNKNOWN&quot;;&quot;READY FOR REVIEW&quot;);&quot;BLOCKED&quot;)))">
            <text:p>UNKNOWN</text:p>
          </table:table-cell>
          <table:table-cell office:value-type="string" table:formula="of:=IF([.U236]=&quot;UNKNOWN&quot;;&quot;COMPLETE OR ASSERT REQUIRED EVIDENCE BEFORE REVIEW&quot;;IF([.U236]=&quot;BLOCKED&quot;;&quot;RESOLVE CONTRADICTION BEFORE REVIEW — NO AUTHORITY CREATED&quot;;IF([.U2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6]=&quot;READY FOR REVIEW&quot;;&quot;REVIEW ELIGIBLE — NO AUTHORITY&quot;;IF(OR([.U236]=&quot;UNKNOWN&quot;;[.U23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7]=&quot;&quot;;IF(AND([.L237]=&quot;&quot;;[.N237]=&quot;&quot;);&quot;UNKNOWN&quot;;&quot;CONTRADICTION&quot;);IF([.M237]=&quot;UNMATCHED&quot;;IF(AND([.L237]=&quot;&quot;;[.N237]=&quot;&quot;);&quot;CLEAR&quot;;&quot;CONTRADICTION&quot;);IF([.M237]=&quot;SINGLE_SALE_LINKED&quot;;IF(AND([.L237]&lt;&gt;&quot;&quot;;[.N237]=&quot;&quot;);&quot;CLEAR&quot;;&quot;CONTRADICTION&quot;);IF([.M237]=&quot;MULTI_SALE_PENDING_ALLOCATION&quot;;IF([.L237]=&quot;&quot;;&quot;CLEAR&quot;;&quot;CONTRADICTION&quot;);IF([.M237]=&quot;ALLOCATED&quot;;IF(AND([.L237]=&quot;&quot;;[.N237]&lt;&gt;&quot;&quot;);&quot;CLEAR&quot;;&quot;CONTRADICTION&quot;);&quot;CONTRADICTION&quot;)))))">
            <text:p>UNKNOWN</text:p>
          </table:table-cell>
          <table:table-cell office:value-type="string" table:formula="of:=IF([.S237]=&quot;UNKNOWN&quot;;&quot;NO ACTION — linkage status is UNKNOWN / not asserted&quot;;IF([.S237]=&quot;CLEAR&quot;;&quot;NO CONTRADICTION — preserve evidence as entered&quot;;IF([.M237]=&quot;&quot;;&quot;REVIEW LINKAGE STATUS — identifiers are present while status is UNKNOWN&quot;;IF([.M237]=&quot;UNMATCHED&quot;;&quot;REMOVE LINKAGE IDENTIFIERS OR CORRECT LINKAGE STATUS&quot;;IF([.M237]=&quot;SINGLE_SALE_LINKED&quot;;&quot;REQUIRE LINKED SALE ID AND NO ALLOCATION GROUP ID&quot;;IF([.M237]=&quot;MULTI_SALE_PENDING_ALLOCATION&quot;;&quot;REMOVE LINKED SALE ID OR CORRECT LINKAGE STATUS&quot;;IF([.M237]=&quot;ALLOCATED&quot;;&quot;REQUIRE ALLOCATION GROUP ID AND NO LINKED SALE ID&quot;;&quot;REVIEW LINKAGE EVIDENCE — NO AUTHORITY CREATED&quot;)))))))">
            <text:p>NO ACTION — linkage status is UNKNOWN / not asserted</text:p>
          </table:table-cell>
          <table:table-cell office:value-type="string" table:formula="of:=IF([.S237]=&quot;CONTRADICTION&quot;;&quot;BLOCKED&quot;;IF([.S237]=&quot;UNKNOWN&quot;;&quot;UNKNOWN&quot;;IF([.S237]=&quot;CLEAR&quot;;IF(OR([.O237]=&quot;&quot;;[.P237]=&quot;&quot;);&quot;UNKNOWN&quot;;&quot;READY FOR REVIEW&quot;);&quot;BLOCKED&quot;)))">
            <text:p>UNKNOWN</text:p>
          </table:table-cell>
          <table:table-cell office:value-type="string" table:formula="of:=IF([.U237]=&quot;UNKNOWN&quot;;&quot;COMPLETE OR ASSERT REQUIRED EVIDENCE BEFORE REVIEW&quot;;IF([.U237]=&quot;BLOCKED&quot;;&quot;RESOLVE CONTRADICTION BEFORE REVIEW — NO AUTHORITY CREATED&quot;;IF([.U2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7]=&quot;READY FOR REVIEW&quot;;&quot;REVIEW ELIGIBLE — NO AUTHORITY&quot;;IF(OR([.U237]=&quot;UNKNOWN&quot;;[.U23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8]=&quot;&quot;;IF(AND([.L238]=&quot;&quot;;[.N238]=&quot;&quot;);&quot;UNKNOWN&quot;;&quot;CONTRADICTION&quot;);IF([.M238]=&quot;UNMATCHED&quot;;IF(AND([.L238]=&quot;&quot;;[.N238]=&quot;&quot;);&quot;CLEAR&quot;;&quot;CONTRADICTION&quot;);IF([.M238]=&quot;SINGLE_SALE_LINKED&quot;;IF(AND([.L238]&lt;&gt;&quot;&quot;;[.N238]=&quot;&quot;);&quot;CLEAR&quot;;&quot;CONTRADICTION&quot;);IF([.M238]=&quot;MULTI_SALE_PENDING_ALLOCATION&quot;;IF([.L238]=&quot;&quot;;&quot;CLEAR&quot;;&quot;CONTRADICTION&quot;);IF([.M238]=&quot;ALLOCATED&quot;;IF(AND([.L238]=&quot;&quot;;[.N238]&lt;&gt;&quot;&quot;);&quot;CLEAR&quot;;&quot;CONTRADICTION&quot;);&quot;CONTRADICTION&quot;)))))">
            <text:p>UNKNOWN</text:p>
          </table:table-cell>
          <table:table-cell office:value-type="string" table:formula="of:=IF([.S238]=&quot;UNKNOWN&quot;;&quot;NO ACTION — linkage status is UNKNOWN / not asserted&quot;;IF([.S238]=&quot;CLEAR&quot;;&quot;NO CONTRADICTION — preserve evidence as entered&quot;;IF([.M238]=&quot;&quot;;&quot;REVIEW LINKAGE STATUS — identifiers are present while status is UNKNOWN&quot;;IF([.M238]=&quot;UNMATCHED&quot;;&quot;REMOVE LINKAGE IDENTIFIERS OR CORRECT LINKAGE STATUS&quot;;IF([.M238]=&quot;SINGLE_SALE_LINKED&quot;;&quot;REQUIRE LINKED SALE ID AND NO ALLOCATION GROUP ID&quot;;IF([.M238]=&quot;MULTI_SALE_PENDING_ALLOCATION&quot;;&quot;REMOVE LINKED SALE ID OR CORRECT LINKAGE STATUS&quot;;IF([.M238]=&quot;ALLOCATED&quot;;&quot;REQUIRE ALLOCATION GROUP ID AND NO LINKED SALE ID&quot;;&quot;REVIEW LINKAGE EVIDENCE — NO AUTHORITY CREATED&quot;)))))))">
            <text:p>NO ACTION — linkage status is UNKNOWN / not asserted</text:p>
          </table:table-cell>
          <table:table-cell office:value-type="string" table:formula="of:=IF([.S238]=&quot;CONTRADICTION&quot;;&quot;BLOCKED&quot;;IF([.S238]=&quot;UNKNOWN&quot;;&quot;UNKNOWN&quot;;IF([.S238]=&quot;CLEAR&quot;;IF(OR([.O238]=&quot;&quot;;[.P238]=&quot;&quot;);&quot;UNKNOWN&quot;;&quot;READY FOR REVIEW&quot;);&quot;BLOCKED&quot;)))">
            <text:p>UNKNOWN</text:p>
          </table:table-cell>
          <table:table-cell office:value-type="string" table:formula="of:=IF([.U238]=&quot;UNKNOWN&quot;;&quot;COMPLETE OR ASSERT REQUIRED EVIDENCE BEFORE REVIEW&quot;;IF([.U238]=&quot;BLOCKED&quot;;&quot;RESOLVE CONTRADICTION BEFORE REVIEW — NO AUTHORITY CREATED&quot;;IF([.U2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8]=&quot;READY FOR REVIEW&quot;;&quot;REVIEW ELIGIBLE — NO AUTHORITY&quot;;IF(OR([.U238]=&quot;UNKNOWN&quot;;[.U23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9]=&quot;&quot;;IF(AND([.L239]=&quot;&quot;;[.N239]=&quot;&quot;);&quot;UNKNOWN&quot;;&quot;CONTRADICTION&quot;);IF([.M239]=&quot;UNMATCHED&quot;;IF(AND([.L239]=&quot;&quot;;[.N239]=&quot;&quot;);&quot;CLEAR&quot;;&quot;CONTRADICTION&quot;);IF([.M239]=&quot;SINGLE_SALE_LINKED&quot;;IF(AND([.L239]&lt;&gt;&quot;&quot;;[.N239]=&quot;&quot;);&quot;CLEAR&quot;;&quot;CONTRADICTION&quot;);IF([.M239]=&quot;MULTI_SALE_PENDING_ALLOCATION&quot;;IF([.L239]=&quot;&quot;;&quot;CLEAR&quot;;&quot;CONTRADICTION&quot;);IF([.M239]=&quot;ALLOCATED&quot;;IF(AND([.L239]=&quot;&quot;;[.N239]&lt;&gt;&quot;&quot;);&quot;CLEAR&quot;;&quot;CONTRADICTION&quot;);&quot;CONTRADICTION&quot;)))))">
            <text:p>UNKNOWN</text:p>
          </table:table-cell>
          <table:table-cell office:value-type="string" table:formula="of:=IF([.S239]=&quot;UNKNOWN&quot;;&quot;NO ACTION — linkage status is UNKNOWN / not asserted&quot;;IF([.S239]=&quot;CLEAR&quot;;&quot;NO CONTRADICTION — preserve evidence as entered&quot;;IF([.M239]=&quot;&quot;;&quot;REVIEW LINKAGE STATUS — identifiers are present while status is UNKNOWN&quot;;IF([.M239]=&quot;UNMATCHED&quot;;&quot;REMOVE LINKAGE IDENTIFIERS OR CORRECT LINKAGE STATUS&quot;;IF([.M239]=&quot;SINGLE_SALE_LINKED&quot;;&quot;REQUIRE LINKED SALE ID AND NO ALLOCATION GROUP ID&quot;;IF([.M239]=&quot;MULTI_SALE_PENDING_ALLOCATION&quot;;&quot;REMOVE LINKED SALE ID OR CORRECT LINKAGE STATUS&quot;;IF([.M239]=&quot;ALLOCATED&quot;;&quot;REQUIRE ALLOCATION GROUP ID AND NO LINKED SALE ID&quot;;&quot;REVIEW LINKAGE EVIDENCE — NO AUTHORITY CREATED&quot;)))))))">
            <text:p>NO ACTION — linkage status is UNKNOWN / not asserted</text:p>
          </table:table-cell>
          <table:table-cell office:value-type="string" table:formula="of:=IF([.S239]=&quot;CONTRADICTION&quot;;&quot;BLOCKED&quot;;IF([.S239]=&quot;UNKNOWN&quot;;&quot;UNKNOWN&quot;;IF([.S239]=&quot;CLEAR&quot;;IF(OR([.O239]=&quot;&quot;;[.P239]=&quot;&quot;);&quot;UNKNOWN&quot;;&quot;READY FOR REVIEW&quot;);&quot;BLOCKED&quot;)))">
            <text:p>UNKNOWN</text:p>
          </table:table-cell>
          <table:table-cell office:value-type="string" table:formula="of:=IF([.U239]=&quot;UNKNOWN&quot;;&quot;COMPLETE OR ASSERT REQUIRED EVIDENCE BEFORE REVIEW&quot;;IF([.U239]=&quot;BLOCKED&quot;;&quot;RESOLVE CONTRADICTION BEFORE REVIEW — NO AUTHORITY CREATED&quot;;IF([.U2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9]=&quot;READY FOR REVIEW&quot;;&quot;REVIEW ELIGIBLE — NO AUTHORITY&quot;;IF(OR([.U239]=&quot;UNKNOWN&quot;;[.U23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0]=&quot;&quot;;IF(AND([.L240]=&quot;&quot;;[.N240]=&quot;&quot;);&quot;UNKNOWN&quot;;&quot;CONTRADICTION&quot;);IF([.M240]=&quot;UNMATCHED&quot;;IF(AND([.L240]=&quot;&quot;;[.N240]=&quot;&quot;);&quot;CLEAR&quot;;&quot;CONTRADICTION&quot;);IF([.M240]=&quot;SINGLE_SALE_LINKED&quot;;IF(AND([.L240]&lt;&gt;&quot;&quot;;[.N240]=&quot;&quot;);&quot;CLEAR&quot;;&quot;CONTRADICTION&quot;);IF([.M240]=&quot;MULTI_SALE_PENDING_ALLOCATION&quot;;IF([.L240]=&quot;&quot;;&quot;CLEAR&quot;;&quot;CONTRADICTION&quot;);IF([.M240]=&quot;ALLOCATED&quot;;IF(AND([.L240]=&quot;&quot;;[.N240]&lt;&gt;&quot;&quot;);&quot;CLEAR&quot;;&quot;CONTRADICTION&quot;);&quot;CONTRADICTION&quot;)))))">
            <text:p>UNKNOWN</text:p>
          </table:table-cell>
          <table:table-cell office:value-type="string" table:formula="of:=IF([.S240]=&quot;UNKNOWN&quot;;&quot;NO ACTION — linkage status is UNKNOWN / not asserted&quot;;IF([.S240]=&quot;CLEAR&quot;;&quot;NO CONTRADICTION — preserve evidence as entered&quot;;IF([.M240]=&quot;&quot;;&quot;REVIEW LINKAGE STATUS — identifiers are present while status is UNKNOWN&quot;;IF([.M240]=&quot;UNMATCHED&quot;;&quot;REMOVE LINKAGE IDENTIFIERS OR CORRECT LINKAGE STATUS&quot;;IF([.M240]=&quot;SINGLE_SALE_LINKED&quot;;&quot;REQUIRE LINKED SALE ID AND NO ALLOCATION GROUP ID&quot;;IF([.M240]=&quot;MULTI_SALE_PENDING_ALLOCATION&quot;;&quot;REMOVE LINKED SALE ID OR CORRECT LINKAGE STATUS&quot;;IF([.M240]=&quot;ALLOCATED&quot;;&quot;REQUIRE ALLOCATION GROUP ID AND NO LINKED SALE ID&quot;;&quot;REVIEW LINKAGE EVIDENCE — NO AUTHORITY CREATED&quot;)))))))">
            <text:p>NO ACTION — linkage status is UNKNOWN / not asserted</text:p>
          </table:table-cell>
          <table:table-cell office:value-type="string" table:formula="of:=IF([.S240]=&quot;CONTRADICTION&quot;;&quot;BLOCKED&quot;;IF([.S240]=&quot;UNKNOWN&quot;;&quot;UNKNOWN&quot;;IF([.S240]=&quot;CLEAR&quot;;IF(OR([.O240]=&quot;&quot;;[.P240]=&quot;&quot;);&quot;UNKNOWN&quot;;&quot;READY FOR REVIEW&quot;);&quot;BLOCKED&quot;)))">
            <text:p>UNKNOWN</text:p>
          </table:table-cell>
          <table:table-cell office:value-type="string" table:formula="of:=IF([.U240]=&quot;UNKNOWN&quot;;&quot;COMPLETE OR ASSERT REQUIRED EVIDENCE BEFORE REVIEW&quot;;IF([.U240]=&quot;BLOCKED&quot;;&quot;RESOLVE CONTRADICTION BEFORE REVIEW — NO AUTHORITY CREATED&quot;;IF([.U2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0]=&quot;READY FOR REVIEW&quot;;&quot;REVIEW ELIGIBLE — NO AUTHORITY&quot;;IF(OR([.U240]=&quot;UNKNOWN&quot;;[.U24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1]=&quot;&quot;;IF(AND([.L241]=&quot;&quot;;[.N241]=&quot;&quot;);&quot;UNKNOWN&quot;;&quot;CONTRADICTION&quot;);IF([.M241]=&quot;UNMATCHED&quot;;IF(AND([.L241]=&quot;&quot;;[.N241]=&quot;&quot;);&quot;CLEAR&quot;;&quot;CONTRADICTION&quot;);IF([.M241]=&quot;SINGLE_SALE_LINKED&quot;;IF(AND([.L241]&lt;&gt;&quot;&quot;;[.N241]=&quot;&quot;);&quot;CLEAR&quot;;&quot;CONTRADICTION&quot;);IF([.M241]=&quot;MULTI_SALE_PENDING_ALLOCATION&quot;;IF([.L241]=&quot;&quot;;&quot;CLEAR&quot;;&quot;CONTRADICTION&quot;);IF([.M241]=&quot;ALLOCATED&quot;;IF(AND([.L241]=&quot;&quot;;[.N241]&lt;&gt;&quot;&quot;);&quot;CLEAR&quot;;&quot;CONTRADICTION&quot;);&quot;CONTRADICTION&quot;)))))">
            <text:p>UNKNOWN</text:p>
          </table:table-cell>
          <table:table-cell office:value-type="string" table:formula="of:=IF([.S241]=&quot;UNKNOWN&quot;;&quot;NO ACTION — linkage status is UNKNOWN / not asserted&quot;;IF([.S241]=&quot;CLEAR&quot;;&quot;NO CONTRADICTION — preserve evidence as entered&quot;;IF([.M241]=&quot;&quot;;&quot;REVIEW LINKAGE STATUS — identifiers are present while status is UNKNOWN&quot;;IF([.M241]=&quot;UNMATCHED&quot;;&quot;REMOVE LINKAGE IDENTIFIERS OR CORRECT LINKAGE STATUS&quot;;IF([.M241]=&quot;SINGLE_SALE_LINKED&quot;;&quot;REQUIRE LINKED SALE ID AND NO ALLOCATION GROUP ID&quot;;IF([.M241]=&quot;MULTI_SALE_PENDING_ALLOCATION&quot;;&quot;REMOVE LINKED SALE ID OR CORRECT LINKAGE STATUS&quot;;IF([.M241]=&quot;ALLOCATED&quot;;&quot;REQUIRE ALLOCATION GROUP ID AND NO LINKED SALE ID&quot;;&quot;REVIEW LINKAGE EVIDENCE — NO AUTHORITY CREATED&quot;)))))))">
            <text:p>NO ACTION — linkage status is UNKNOWN / not asserted</text:p>
          </table:table-cell>
          <table:table-cell office:value-type="string" table:formula="of:=IF([.S241]=&quot;CONTRADICTION&quot;;&quot;BLOCKED&quot;;IF([.S241]=&quot;UNKNOWN&quot;;&quot;UNKNOWN&quot;;IF([.S241]=&quot;CLEAR&quot;;IF(OR([.O241]=&quot;&quot;;[.P241]=&quot;&quot;);&quot;UNKNOWN&quot;;&quot;READY FOR REVIEW&quot;);&quot;BLOCKED&quot;)))">
            <text:p>UNKNOWN</text:p>
          </table:table-cell>
          <table:table-cell office:value-type="string" table:formula="of:=IF([.U241]=&quot;UNKNOWN&quot;;&quot;COMPLETE OR ASSERT REQUIRED EVIDENCE BEFORE REVIEW&quot;;IF([.U241]=&quot;BLOCKED&quot;;&quot;RESOLVE CONTRADICTION BEFORE REVIEW — NO AUTHORITY CREATED&quot;;IF([.U2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1]=&quot;READY FOR REVIEW&quot;;&quot;REVIEW ELIGIBLE — NO AUTHORITY&quot;;IF(OR([.U241]=&quot;UNKNOWN&quot;;[.U241]=&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2]=&quot;&quot;;IF(AND([.L242]=&quot;&quot;;[.N242]=&quot;&quot;);&quot;UNKNOWN&quot;;&quot;CONTRADICTION&quot;);IF([.M242]=&quot;UNMATCHED&quot;;IF(AND([.L242]=&quot;&quot;;[.N242]=&quot;&quot;);&quot;CLEAR&quot;;&quot;CONTRADICTION&quot;);IF([.M242]=&quot;SINGLE_SALE_LINKED&quot;;IF(AND([.L242]&lt;&gt;&quot;&quot;;[.N242]=&quot;&quot;);&quot;CLEAR&quot;;&quot;CONTRADICTION&quot;);IF([.M242]=&quot;MULTI_SALE_PENDING_ALLOCATION&quot;;IF([.L242]=&quot;&quot;;&quot;CLEAR&quot;;&quot;CONTRADICTION&quot;);IF([.M242]=&quot;ALLOCATED&quot;;IF(AND([.L242]=&quot;&quot;;[.N242]&lt;&gt;&quot;&quot;);&quot;CLEAR&quot;;&quot;CONTRADICTION&quot;);&quot;CONTRADICTION&quot;)))))">
            <text:p>UNKNOWN</text:p>
          </table:table-cell>
          <table:table-cell office:value-type="string" table:formula="of:=IF([.S242]=&quot;UNKNOWN&quot;;&quot;NO ACTION — linkage status is UNKNOWN / not asserted&quot;;IF([.S242]=&quot;CLEAR&quot;;&quot;NO CONTRADICTION — preserve evidence as entered&quot;;IF([.M242]=&quot;&quot;;&quot;REVIEW LINKAGE STATUS — identifiers are present while status is UNKNOWN&quot;;IF([.M242]=&quot;UNMATCHED&quot;;&quot;REMOVE LINKAGE IDENTIFIERS OR CORRECT LINKAGE STATUS&quot;;IF([.M242]=&quot;SINGLE_SALE_LINKED&quot;;&quot;REQUIRE LINKED SALE ID AND NO ALLOCATION GROUP ID&quot;;IF([.M242]=&quot;MULTI_SALE_PENDING_ALLOCATION&quot;;&quot;REMOVE LINKED SALE ID OR CORRECT LINKAGE STATUS&quot;;IF([.M242]=&quot;ALLOCATED&quot;;&quot;REQUIRE ALLOCATION GROUP ID AND NO LINKED SALE ID&quot;;&quot;REVIEW LINKAGE EVIDENCE — NO AUTHORITY CREATED&quot;)))))))">
            <text:p>NO ACTION — linkage status is UNKNOWN / not asserted</text:p>
          </table:table-cell>
          <table:table-cell office:value-type="string" table:formula="of:=IF([.S242]=&quot;CONTRADICTION&quot;;&quot;BLOCKED&quot;;IF([.S242]=&quot;UNKNOWN&quot;;&quot;UNKNOWN&quot;;IF([.S242]=&quot;CLEAR&quot;;IF(OR([.O242]=&quot;&quot;;[.P242]=&quot;&quot;);&quot;UNKNOWN&quot;;&quot;READY FOR REVIEW&quot;);&quot;BLOCKED&quot;)))">
            <text:p>UNKNOWN</text:p>
          </table:table-cell>
          <table:table-cell office:value-type="string" table:formula="of:=IF([.U242]=&quot;UNKNOWN&quot;;&quot;COMPLETE OR ASSERT REQUIRED EVIDENCE BEFORE REVIEW&quot;;IF([.U242]=&quot;BLOCKED&quot;;&quot;RESOLVE CONTRADICTION BEFORE REVIEW — NO AUTHORITY CREATED&quot;;IF([.U2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2]=&quot;READY FOR REVIEW&quot;;&quot;REVIEW ELIGIBLE — NO AUTHORITY&quot;;IF(OR([.U242]=&quot;UNKNOWN&quot;;[.U242]=&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3]=&quot;&quot;;IF(AND([.L243]=&quot;&quot;;[.N243]=&quot;&quot;);&quot;UNKNOWN&quot;;&quot;CONTRADICTION&quot;);IF([.M243]=&quot;UNMATCHED&quot;;IF(AND([.L243]=&quot;&quot;;[.N243]=&quot;&quot;);&quot;CLEAR&quot;;&quot;CONTRADICTION&quot;);IF([.M243]=&quot;SINGLE_SALE_LINKED&quot;;IF(AND([.L243]&lt;&gt;&quot;&quot;;[.N243]=&quot;&quot;);&quot;CLEAR&quot;;&quot;CONTRADICTION&quot;);IF([.M243]=&quot;MULTI_SALE_PENDING_ALLOCATION&quot;;IF([.L243]=&quot;&quot;;&quot;CLEAR&quot;;&quot;CONTRADICTION&quot;);IF([.M243]=&quot;ALLOCATED&quot;;IF(AND([.L243]=&quot;&quot;;[.N243]&lt;&gt;&quot;&quot;);&quot;CLEAR&quot;;&quot;CONTRADICTION&quot;);&quot;CONTRADICTION&quot;)))))">
            <text:p>UNKNOWN</text:p>
          </table:table-cell>
          <table:table-cell office:value-type="string" table:formula="of:=IF([.S243]=&quot;UNKNOWN&quot;;&quot;NO ACTION — linkage status is UNKNOWN / not asserted&quot;;IF([.S243]=&quot;CLEAR&quot;;&quot;NO CONTRADICTION — preserve evidence as entered&quot;;IF([.M243]=&quot;&quot;;&quot;REVIEW LINKAGE STATUS — identifiers are present while status is UNKNOWN&quot;;IF([.M243]=&quot;UNMATCHED&quot;;&quot;REMOVE LINKAGE IDENTIFIERS OR CORRECT LINKAGE STATUS&quot;;IF([.M243]=&quot;SINGLE_SALE_LINKED&quot;;&quot;REQUIRE LINKED SALE ID AND NO ALLOCATION GROUP ID&quot;;IF([.M243]=&quot;MULTI_SALE_PENDING_ALLOCATION&quot;;&quot;REMOVE LINKED SALE ID OR CORRECT LINKAGE STATUS&quot;;IF([.M243]=&quot;ALLOCATED&quot;;&quot;REQUIRE ALLOCATION GROUP ID AND NO LINKED SALE ID&quot;;&quot;REVIEW LINKAGE EVIDENCE — NO AUTHORITY CREATED&quot;)))))))">
            <text:p>NO ACTION — linkage status is UNKNOWN / not asserted</text:p>
          </table:table-cell>
          <table:table-cell office:value-type="string" table:formula="of:=IF([.S243]=&quot;CONTRADICTION&quot;;&quot;BLOCKED&quot;;IF([.S243]=&quot;UNKNOWN&quot;;&quot;UNKNOWN&quot;;IF([.S243]=&quot;CLEAR&quot;;IF(OR([.O243]=&quot;&quot;;[.P243]=&quot;&quot;);&quot;UNKNOWN&quot;;&quot;READY FOR REVIEW&quot;);&quot;BLOCKED&quot;)))">
            <text:p>UNKNOWN</text:p>
          </table:table-cell>
          <table:table-cell office:value-type="string" table:formula="of:=IF([.U243]=&quot;UNKNOWN&quot;;&quot;COMPLETE OR ASSERT REQUIRED EVIDENCE BEFORE REVIEW&quot;;IF([.U243]=&quot;BLOCKED&quot;;&quot;RESOLVE CONTRADICTION BEFORE REVIEW — NO AUTHORITY CREATED&quot;;IF([.U2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3]=&quot;READY FOR REVIEW&quot;;&quot;REVIEW ELIGIBLE — NO AUTHORITY&quot;;IF(OR([.U243]=&quot;UNKNOWN&quot;;[.U243]=&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4]=&quot;&quot;;IF(AND([.L244]=&quot;&quot;;[.N244]=&quot;&quot;);&quot;UNKNOWN&quot;;&quot;CONTRADICTION&quot;);IF([.M244]=&quot;UNMATCHED&quot;;IF(AND([.L244]=&quot;&quot;;[.N244]=&quot;&quot;);&quot;CLEAR&quot;;&quot;CONTRADICTION&quot;);IF([.M244]=&quot;SINGLE_SALE_LINKED&quot;;IF(AND([.L244]&lt;&gt;&quot;&quot;;[.N244]=&quot;&quot;);&quot;CLEAR&quot;;&quot;CONTRADICTION&quot;);IF([.M244]=&quot;MULTI_SALE_PENDING_ALLOCATION&quot;;IF([.L244]=&quot;&quot;;&quot;CLEAR&quot;;&quot;CONTRADICTION&quot;);IF([.M244]=&quot;ALLOCATED&quot;;IF(AND([.L244]=&quot;&quot;;[.N244]&lt;&gt;&quot;&quot;);&quot;CLEAR&quot;;&quot;CONTRADICTION&quot;);&quot;CONTRADICTION&quot;)))))">
            <text:p>UNKNOWN</text:p>
          </table:table-cell>
          <table:table-cell office:value-type="string" table:formula="of:=IF([.S244]=&quot;UNKNOWN&quot;;&quot;NO ACTION — linkage status is UNKNOWN / not asserted&quot;;IF([.S244]=&quot;CLEAR&quot;;&quot;NO CONTRADICTION — preserve evidence as entered&quot;;IF([.M244]=&quot;&quot;;&quot;REVIEW LINKAGE STATUS — identifiers are present while status is UNKNOWN&quot;;IF([.M244]=&quot;UNMATCHED&quot;;&quot;REMOVE LINKAGE IDENTIFIERS OR CORRECT LINKAGE STATUS&quot;;IF([.M244]=&quot;SINGLE_SALE_LINKED&quot;;&quot;REQUIRE LINKED SALE ID AND NO ALLOCATION GROUP ID&quot;;IF([.M244]=&quot;MULTI_SALE_PENDING_ALLOCATION&quot;;&quot;REMOVE LINKED SALE ID OR CORRECT LINKAGE STATUS&quot;;IF([.M244]=&quot;ALLOCATED&quot;;&quot;REQUIRE ALLOCATION GROUP ID AND NO LINKED SALE ID&quot;;&quot;REVIEW LINKAGE EVIDENCE — NO AUTHORITY CREATED&quot;)))))))">
            <text:p>NO ACTION — linkage status is UNKNOWN / not asserted</text:p>
          </table:table-cell>
          <table:table-cell office:value-type="string" table:formula="of:=IF([.S244]=&quot;CONTRADICTION&quot;;&quot;BLOCKED&quot;;IF([.S244]=&quot;UNKNOWN&quot;;&quot;UNKNOWN&quot;;IF([.S244]=&quot;CLEAR&quot;;IF(OR([.O244]=&quot;&quot;;[.P244]=&quot;&quot;);&quot;UNKNOWN&quot;;&quot;READY FOR REVIEW&quot;);&quot;BLOCKED&quot;)))">
            <text:p>UNKNOWN</text:p>
          </table:table-cell>
          <table:table-cell office:value-type="string" table:formula="of:=IF([.U244]=&quot;UNKNOWN&quot;;&quot;COMPLETE OR ASSERT REQUIRED EVIDENCE BEFORE REVIEW&quot;;IF([.U244]=&quot;BLOCKED&quot;;&quot;RESOLVE CONTRADICTION BEFORE REVIEW — NO AUTHORITY CREATED&quot;;IF([.U2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4]=&quot;READY FOR REVIEW&quot;;&quot;REVIEW ELIGIBLE — NO AUTHORITY&quot;;IF(OR([.U244]=&quot;UNKNOWN&quot;;[.U244]=&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5]=&quot;&quot;;IF(AND([.L245]=&quot;&quot;;[.N245]=&quot;&quot;);&quot;UNKNOWN&quot;;&quot;CONTRADICTION&quot;);IF([.M245]=&quot;UNMATCHED&quot;;IF(AND([.L245]=&quot;&quot;;[.N245]=&quot;&quot;);&quot;CLEAR&quot;;&quot;CONTRADICTION&quot;);IF([.M245]=&quot;SINGLE_SALE_LINKED&quot;;IF(AND([.L245]&lt;&gt;&quot;&quot;;[.N245]=&quot;&quot;);&quot;CLEAR&quot;;&quot;CONTRADICTION&quot;);IF([.M245]=&quot;MULTI_SALE_PENDING_ALLOCATION&quot;;IF([.L245]=&quot;&quot;;&quot;CLEAR&quot;;&quot;CONTRADICTION&quot;);IF([.M245]=&quot;ALLOCATED&quot;;IF(AND([.L245]=&quot;&quot;;[.N245]&lt;&gt;&quot;&quot;);&quot;CLEAR&quot;;&quot;CONTRADICTION&quot;);&quot;CONTRADICTION&quot;)))))">
            <text:p>UNKNOWN</text:p>
          </table:table-cell>
          <table:table-cell office:value-type="string" table:formula="of:=IF([.S245]=&quot;UNKNOWN&quot;;&quot;NO ACTION — linkage status is UNKNOWN / not asserted&quot;;IF([.S245]=&quot;CLEAR&quot;;&quot;NO CONTRADICTION — preserve evidence as entered&quot;;IF([.M245]=&quot;&quot;;&quot;REVIEW LINKAGE STATUS — identifiers are present while status is UNKNOWN&quot;;IF([.M245]=&quot;UNMATCHED&quot;;&quot;REMOVE LINKAGE IDENTIFIERS OR CORRECT LINKAGE STATUS&quot;;IF([.M245]=&quot;SINGLE_SALE_LINKED&quot;;&quot;REQUIRE LINKED SALE ID AND NO ALLOCATION GROUP ID&quot;;IF([.M245]=&quot;MULTI_SALE_PENDING_ALLOCATION&quot;;&quot;REMOVE LINKED SALE ID OR CORRECT LINKAGE STATUS&quot;;IF([.M245]=&quot;ALLOCATED&quot;;&quot;REQUIRE ALLOCATION GROUP ID AND NO LINKED SALE ID&quot;;&quot;REVIEW LINKAGE EVIDENCE — NO AUTHORITY CREATED&quot;)))))))">
            <text:p>NO ACTION — linkage status is UNKNOWN / not asserted</text:p>
          </table:table-cell>
          <table:table-cell office:value-type="string" table:formula="of:=IF([.S245]=&quot;CONTRADICTION&quot;;&quot;BLOCKED&quot;;IF([.S245]=&quot;UNKNOWN&quot;;&quot;UNKNOWN&quot;;IF([.S245]=&quot;CLEAR&quot;;IF(OR([.O245]=&quot;&quot;;[.P245]=&quot;&quot;);&quot;UNKNOWN&quot;;&quot;READY FOR REVIEW&quot;);&quot;BLOCKED&quot;)))">
            <text:p>UNKNOWN</text:p>
          </table:table-cell>
          <table:table-cell office:value-type="string" table:formula="of:=IF([.U245]=&quot;UNKNOWN&quot;;&quot;COMPLETE OR ASSERT REQUIRED EVIDENCE BEFORE REVIEW&quot;;IF([.U245]=&quot;BLOCKED&quot;;&quot;RESOLVE CONTRADICTION BEFORE REVIEW — NO AUTHORITY CREATED&quot;;IF([.U2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5]=&quot;READY FOR REVIEW&quot;;&quot;REVIEW ELIGIBLE — NO AUTHORITY&quot;;IF(OR([.U245]=&quot;UNKNOWN&quot;;[.U245]=&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6]=&quot;&quot;;IF(AND([.L246]=&quot;&quot;;[.N246]=&quot;&quot;);&quot;UNKNOWN&quot;;&quot;CONTRADICTION&quot;);IF([.M246]=&quot;UNMATCHED&quot;;IF(AND([.L246]=&quot;&quot;;[.N246]=&quot;&quot;);&quot;CLEAR&quot;;&quot;CONTRADICTION&quot;);IF([.M246]=&quot;SINGLE_SALE_LINKED&quot;;IF(AND([.L246]&lt;&gt;&quot;&quot;;[.N246]=&quot;&quot;);&quot;CLEAR&quot;;&quot;CONTRADICTION&quot;);IF([.M246]=&quot;MULTI_SALE_PENDING_ALLOCATION&quot;;IF([.L246]=&quot;&quot;;&quot;CLEAR&quot;;&quot;CONTRADICTION&quot;);IF([.M246]=&quot;ALLOCATED&quot;;IF(AND([.L246]=&quot;&quot;;[.N246]&lt;&gt;&quot;&quot;);&quot;CLEAR&quot;;&quot;CONTRADICTION&quot;);&quot;CONTRADICTION&quot;)))))">
            <text:p>UNKNOWN</text:p>
          </table:table-cell>
          <table:table-cell office:value-type="string" table:formula="of:=IF([.S246]=&quot;UNKNOWN&quot;;&quot;NO ACTION — linkage status is UNKNOWN / not asserted&quot;;IF([.S246]=&quot;CLEAR&quot;;&quot;NO CONTRADICTION — preserve evidence as entered&quot;;IF([.M246]=&quot;&quot;;&quot;REVIEW LINKAGE STATUS — identifiers are present while status is UNKNOWN&quot;;IF([.M246]=&quot;UNMATCHED&quot;;&quot;REMOVE LINKAGE IDENTIFIERS OR CORRECT LINKAGE STATUS&quot;;IF([.M246]=&quot;SINGLE_SALE_LINKED&quot;;&quot;REQUIRE LINKED SALE ID AND NO ALLOCATION GROUP ID&quot;;IF([.M246]=&quot;MULTI_SALE_PENDING_ALLOCATION&quot;;&quot;REMOVE LINKED SALE ID OR CORRECT LINKAGE STATUS&quot;;IF([.M246]=&quot;ALLOCATED&quot;;&quot;REQUIRE ALLOCATION GROUP ID AND NO LINKED SALE ID&quot;;&quot;REVIEW LINKAGE EVIDENCE — NO AUTHORITY CREATED&quot;)))))))">
            <text:p>NO ACTION — linkage status is UNKNOWN / not asserted</text:p>
          </table:table-cell>
          <table:table-cell office:value-type="string" table:formula="of:=IF([.S246]=&quot;CONTRADICTION&quot;;&quot;BLOCKED&quot;;IF([.S246]=&quot;UNKNOWN&quot;;&quot;UNKNOWN&quot;;IF([.S246]=&quot;CLEAR&quot;;IF(OR([.O246]=&quot;&quot;;[.P246]=&quot;&quot;);&quot;UNKNOWN&quot;;&quot;READY FOR REVIEW&quot;);&quot;BLOCKED&quot;)))">
            <text:p>UNKNOWN</text:p>
          </table:table-cell>
          <table:table-cell office:value-type="string" table:formula="of:=IF([.U246]=&quot;UNKNOWN&quot;;&quot;COMPLETE OR ASSERT REQUIRED EVIDENCE BEFORE REVIEW&quot;;IF([.U246]=&quot;BLOCKED&quot;;&quot;RESOLVE CONTRADICTION BEFORE REVIEW — NO AUTHORITY CREATED&quot;;IF([.U2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6]=&quot;READY FOR REVIEW&quot;;&quot;REVIEW ELIGIBLE — NO AUTHORITY&quot;;IF(OR([.U246]=&quot;UNKNOWN&quot;;[.U246]=&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7]=&quot;&quot;;IF(AND([.L247]=&quot;&quot;;[.N247]=&quot;&quot;);&quot;UNKNOWN&quot;;&quot;CONTRADICTION&quot;);IF([.M247]=&quot;UNMATCHED&quot;;IF(AND([.L247]=&quot;&quot;;[.N247]=&quot;&quot;);&quot;CLEAR&quot;;&quot;CONTRADICTION&quot;);IF([.M247]=&quot;SINGLE_SALE_LINKED&quot;;IF(AND([.L247]&lt;&gt;&quot;&quot;;[.N247]=&quot;&quot;);&quot;CLEAR&quot;;&quot;CONTRADICTION&quot;);IF([.M247]=&quot;MULTI_SALE_PENDING_ALLOCATION&quot;;IF([.L247]=&quot;&quot;;&quot;CLEAR&quot;;&quot;CONTRADICTION&quot;);IF([.M247]=&quot;ALLOCATED&quot;;IF(AND([.L247]=&quot;&quot;;[.N247]&lt;&gt;&quot;&quot;);&quot;CLEAR&quot;;&quot;CONTRADICTION&quot;);&quot;CONTRADICTION&quot;)))))">
            <text:p>UNKNOWN</text:p>
          </table:table-cell>
          <table:table-cell office:value-type="string" table:formula="of:=IF([.S247]=&quot;UNKNOWN&quot;;&quot;NO ACTION — linkage status is UNKNOWN / not asserted&quot;;IF([.S247]=&quot;CLEAR&quot;;&quot;NO CONTRADICTION — preserve evidence as entered&quot;;IF([.M247]=&quot;&quot;;&quot;REVIEW LINKAGE STATUS — identifiers are present while status is UNKNOWN&quot;;IF([.M247]=&quot;UNMATCHED&quot;;&quot;REMOVE LINKAGE IDENTIFIERS OR CORRECT LINKAGE STATUS&quot;;IF([.M247]=&quot;SINGLE_SALE_LINKED&quot;;&quot;REQUIRE LINKED SALE ID AND NO ALLOCATION GROUP ID&quot;;IF([.M247]=&quot;MULTI_SALE_PENDING_ALLOCATION&quot;;&quot;REMOVE LINKED SALE ID OR CORRECT LINKAGE STATUS&quot;;IF([.M247]=&quot;ALLOCATED&quot;;&quot;REQUIRE ALLOCATION GROUP ID AND NO LINKED SALE ID&quot;;&quot;REVIEW LINKAGE EVIDENCE — NO AUTHORITY CREATED&quot;)))))))">
            <text:p>NO ACTION — linkage status is UNKNOWN / not asserted</text:p>
          </table:table-cell>
          <table:table-cell office:value-type="string" table:formula="of:=IF([.S247]=&quot;CONTRADICTION&quot;;&quot;BLOCKED&quot;;IF([.S247]=&quot;UNKNOWN&quot;;&quot;UNKNOWN&quot;;IF([.S247]=&quot;CLEAR&quot;;IF(OR([.O247]=&quot;&quot;;[.P247]=&quot;&quot;);&quot;UNKNOWN&quot;;&quot;READY FOR REVIEW&quot;);&quot;BLOCKED&quot;)))">
            <text:p>UNKNOWN</text:p>
          </table:table-cell>
          <table:table-cell office:value-type="string" table:formula="of:=IF([.U247]=&quot;UNKNOWN&quot;;&quot;COMPLETE OR ASSERT REQUIRED EVIDENCE BEFORE REVIEW&quot;;IF([.U247]=&quot;BLOCKED&quot;;&quot;RESOLVE CONTRADICTION BEFORE REVIEW — NO AUTHORITY CREATED&quot;;IF([.U2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7]=&quot;READY FOR REVIEW&quot;;&quot;REVIEW ELIGIBLE — NO AUTHORITY&quot;;IF(OR([.U247]=&quot;UNKNOWN&quot;;[.U247]=&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8]=&quot;&quot;;IF(AND([.L248]=&quot;&quot;;[.N248]=&quot;&quot;);&quot;UNKNOWN&quot;;&quot;CONTRADICTION&quot;);IF([.M248]=&quot;UNMATCHED&quot;;IF(AND([.L248]=&quot;&quot;;[.N248]=&quot;&quot;);&quot;CLEAR&quot;;&quot;CONTRADICTION&quot;);IF([.M248]=&quot;SINGLE_SALE_LINKED&quot;;IF(AND([.L248]&lt;&gt;&quot;&quot;;[.N248]=&quot;&quot;);&quot;CLEAR&quot;;&quot;CONTRADICTION&quot;);IF([.M248]=&quot;MULTI_SALE_PENDING_ALLOCATION&quot;;IF([.L248]=&quot;&quot;;&quot;CLEAR&quot;;&quot;CONTRADICTION&quot;);IF([.M248]=&quot;ALLOCATED&quot;;IF(AND([.L248]=&quot;&quot;;[.N248]&lt;&gt;&quot;&quot;);&quot;CLEAR&quot;;&quot;CONTRADICTION&quot;);&quot;CONTRADICTION&quot;)))))">
            <text:p>UNKNOWN</text:p>
          </table:table-cell>
          <table:table-cell office:value-type="string" table:formula="of:=IF([.S248]=&quot;UNKNOWN&quot;;&quot;NO ACTION — linkage status is UNKNOWN / not asserted&quot;;IF([.S248]=&quot;CLEAR&quot;;&quot;NO CONTRADICTION — preserve evidence as entered&quot;;IF([.M248]=&quot;&quot;;&quot;REVIEW LINKAGE STATUS — identifiers are present while status is UNKNOWN&quot;;IF([.M248]=&quot;UNMATCHED&quot;;&quot;REMOVE LINKAGE IDENTIFIERS OR CORRECT LINKAGE STATUS&quot;;IF([.M248]=&quot;SINGLE_SALE_LINKED&quot;;&quot;REQUIRE LINKED SALE ID AND NO ALLOCATION GROUP ID&quot;;IF([.M248]=&quot;MULTI_SALE_PENDING_ALLOCATION&quot;;&quot;REMOVE LINKED SALE ID OR CORRECT LINKAGE STATUS&quot;;IF([.M248]=&quot;ALLOCATED&quot;;&quot;REQUIRE ALLOCATION GROUP ID AND NO LINKED SALE ID&quot;;&quot;REVIEW LINKAGE EVIDENCE — NO AUTHORITY CREATED&quot;)))))))">
            <text:p>NO ACTION — linkage status is UNKNOWN / not asserted</text:p>
          </table:table-cell>
          <table:table-cell office:value-type="string" table:formula="of:=IF([.S248]=&quot;CONTRADICTION&quot;;&quot;BLOCKED&quot;;IF([.S248]=&quot;UNKNOWN&quot;;&quot;UNKNOWN&quot;;IF([.S248]=&quot;CLEAR&quot;;IF(OR([.O248]=&quot;&quot;;[.P248]=&quot;&quot;);&quot;UNKNOWN&quot;;&quot;READY FOR REVIEW&quot;);&quot;BLOCKED&quot;)))">
            <text:p>UNKNOWN</text:p>
          </table:table-cell>
          <table:table-cell office:value-type="string" table:formula="of:=IF([.U248]=&quot;UNKNOWN&quot;;&quot;COMPLETE OR ASSERT REQUIRED EVIDENCE BEFORE REVIEW&quot;;IF([.U248]=&quot;BLOCKED&quot;;&quot;RESOLVE CONTRADICTION BEFORE REVIEW — NO AUTHORITY CREATED&quot;;IF([.U2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8]=&quot;READY FOR REVIEW&quot;;&quot;REVIEW ELIGIBLE — NO AUTHORITY&quot;;IF(OR([.U248]=&quot;UNKNOWN&quot;;[.U248]=&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9]=&quot;&quot;;IF(AND([.L249]=&quot;&quot;;[.N249]=&quot;&quot;);&quot;UNKNOWN&quot;;&quot;CONTRADICTION&quot;);IF([.M249]=&quot;UNMATCHED&quot;;IF(AND([.L249]=&quot;&quot;;[.N249]=&quot;&quot;);&quot;CLEAR&quot;;&quot;CONTRADICTION&quot;);IF([.M249]=&quot;SINGLE_SALE_LINKED&quot;;IF(AND([.L249]&lt;&gt;&quot;&quot;;[.N249]=&quot;&quot;);&quot;CLEAR&quot;;&quot;CONTRADICTION&quot;);IF([.M249]=&quot;MULTI_SALE_PENDING_ALLOCATION&quot;;IF([.L249]=&quot;&quot;;&quot;CLEAR&quot;;&quot;CONTRADICTION&quot;);IF([.M249]=&quot;ALLOCATED&quot;;IF(AND([.L249]=&quot;&quot;;[.N249]&lt;&gt;&quot;&quot;);&quot;CLEAR&quot;;&quot;CONTRADICTION&quot;);&quot;CONTRADICTION&quot;)))))">
            <text:p>UNKNOWN</text:p>
          </table:table-cell>
          <table:table-cell office:value-type="string" table:formula="of:=IF([.S249]=&quot;UNKNOWN&quot;;&quot;NO ACTION — linkage status is UNKNOWN / not asserted&quot;;IF([.S249]=&quot;CLEAR&quot;;&quot;NO CONTRADICTION — preserve evidence as entered&quot;;IF([.M249]=&quot;&quot;;&quot;REVIEW LINKAGE STATUS — identifiers are present while status is UNKNOWN&quot;;IF([.M249]=&quot;UNMATCHED&quot;;&quot;REMOVE LINKAGE IDENTIFIERS OR CORRECT LINKAGE STATUS&quot;;IF([.M249]=&quot;SINGLE_SALE_LINKED&quot;;&quot;REQUIRE LINKED SALE ID AND NO ALLOCATION GROUP ID&quot;;IF([.M249]=&quot;MULTI_SALE_PENDING_ALLOCATION&quot;;&quot;REMOVE LINKED SALE ID OR CORRECT LINKAGE STATUS&quot;;IF([.M249]=&quot;ALLOCATED&quot;;&quot;REQUIRE ALLOCATION GROUP ID AND NO LINKED SALE ID&quot;;&quot;REVIEW LINKAGE EVIDENCE — NO AUTHORITY CREATED&quot;)))))))">
            <text:p>NO ACTION — linkage status is UNKNOWN / not asserted</text:p>
          </table:table-cell>
          <table:table-cell office:value-type="string" table:formula="of:=IF([.S249]=&quot;CONTRADICTION&quot;;&quot;BLOCKED&quot;;IF([.S249]=&quot;UNKNOWN&quot;;&quot;UNKNOWN&quot;;IF([.S249]=&quot;CLEAR&quot;;IF(OR([.O249]=&quot;&quot;;[.P249]=&quot;&quot;);&quot;UNKNOWN&quot;;&quot;READY FOR REVIEW&quot;);&quot;BLOCKED&quot;)))">
            <text:p>UNKNOWN</text:p>
          </table:table-cell>
          <table:table-cell office:value-type="string" table:formula="of:=IF([.U249]=&quot;UNKNOWN&quot;;&quot;COMPLETE OR ASSERT REQUIRED EVIDENCE BEFORE REVIEW&quot;;IF([.U249]=&quot;BLOCKED&quot;;&quot;RESOLVE CONTRADICTION BEFORE REVIEW — NO AUTHORITY CREATED&quot;;IF([.U2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9]=&quot;READY FOR REVIEW&quot;;&quot;REVIEW ELIGIBLE — NO AUTHORITY&quot;;IF(OR([.U249]=&quot;UNKNOWN&quot;;[.U249]=&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0]=&quot;&quot;;IF(AND([.L250]=&quot;&quot;;[.N250]=&quot;&quot;);&quot;UNKNOWN&quot;;&quot;CONTRADICTION&quot;);IF([.M250]=&quot;UNMATCHED&quot;;IF(AND([.L250]=&quot;&quot;;[.N250]=&quot;&quot;);&quot;CLEAR&quot;;&quot;CONTRADICTION&quot;);IF([.M250]=&quot;SINGLE_SALE_LINKED&quot;;IF(AND([.L250]&lt;&gt;&quot;&quot;;[.N250]=&quot;&quot;);&quot;CLEAR&quot;;&quot;CONTRADICTION&quot;);IF([.M250]=&quot;MULTI_SALE_PENDING_ALLOCATION&quot;;IF([.L250]=&quot;&quot;;&quot;CLEAR&quot;;&quot;CONTRADICTION&quot;);IF([.M250]=&quot;ALLOCATED&quot;;IF(AND([.L250]=&quot;&quot;;[.N250]&lt;&gt;&quot;&quot;);&quot;CLEAR&quot;;&quot;CONTRADICTION&quot;);&quot;CONTRADICTION&quot;)))))">
            <text:p>UNKNOWN</text:p>
          </table:table-cell>
          <table:table-cell office:value-type="string" table:formula="of:=IF([.S250]=&quot;UNKNOWN&quot;;&quot;NO ACTION — linkage status is UNKNOWN / not asserted&quot;;IF([.S250]=&quot;CLEAR&quot;;&quot;NO CONTRADICTION — preserve evidence as entered&quot;;IF([.M250]=&quot;&quot;;&quot;REVIEW LINKAGE STATUS — identifiers are present while status is UNKNOWN&quot;;IF([.M250]=&quot;UNMATCHED&quot;;&quot;REMOVE LINKAGE IDENTIFIERS OR CORRECT LINKAGE STATUS&quot;;IF([.M250]=&quot;SINGLE_SALE_LINKED&quot;;&quot;REQUIRE LINKED SALE ID AND NO ALLOCATION GROUP ID&quot;;IF([.M250]=&quot;MULTI_SALE_PENDING_ALLOCATION&quot;;&quot;REMOVE LINKED SALE ID OR CORRECT LINKAGE STATUS&quot;;IF([.M250]=&quot;ALLOCATED&quot;;&quot;REQUIRE ALLOCATION GROUP ID AND NO LINKED SALE ID&quot;;&quot;REVIEW LINKAGE EVIDENCE — NO AUTHORITY CREATED&quot;)))))))">
            <text:p>NO ACTION — linkage status is UNKNOWN / not asserted</text:p>
          </table:table-cell>
          <table:table-cell office:value-type="string" table:formula="of:=IF([.S250]=&quot;CONTRADICTION&quot;;&quot;BLOCKED&quot;;IF([.S250]=&quot;UNKNOWN&quot;;&quot;UNKNOWN&quot;;IF([.S250]=&quot;CLEAR&quot;;IF(OR([.O250]=&quot;&quot;;[.P250]=&quot;&quot;);&quot;UNKNOWN&quot;;&quot;READY FOR REVIEW&quot;);&quot;BLOCKED&quot;)))">
            <text:p>UNKNOWN</text:p>
          </table:table-cell>
          <table:table-cell office:value-type="string" table:formula="of:=IF([.U250]=&quot;UNKNOWN&quot;;&quot;COMPLETE OR ASSERT REQUIRED EVIDENCE BEFORE REVIEW&quot;;IF([.U250]=&quot;BLOCKED&quot;;&quot;RESOLVE CONTRADICTION BEFORE REVIEW — NO AUTHORITY CREATED&quot;;IF([.U2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0]=&quot;READY FOR REVIEW&quot;;&quot;REVIEW ELIGIBLE — NO AUTHORITY&quot;;IF(OR([.U250]=&quot;UNKNOWN&quot;;[.U250]=&quot;BLOCKED&quot;);&quot;NOT REVIEW ELIGIBLE&quot;;&quot;NOT REVIEW ELIGIBLE&quot;))">
            <text:p>NOT REVIEW ELIGIBL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1]=&quot;&quot;;IF(AND([.L251]=&quot;&quot;;[.N251]=&quot;&quot;);&quot;UNKNOWN&quot;;&quot;CONTRADICTION&quot;);IF([.M251]=&quot;UNMATCHED&quot;;IF(AND([.L251]=&quot;&quot;;[.N251]=&quot;&quot;);&quot;CLEAR&quot;;&quot;CONTRADICTION&quot;);IF([.M251]=&quot;SINGLE_SALE_LINKED&quot;;IF(AND([.L251]&lt;&gt;&quot;&quot;;[.N251]=&quot;&quot;);&quot;CLEAR&quot;;&quot;CONTRADICTION&quot;);IF([.M251]=&quot;MULTI_SALE_PENDING_ALLOCATION&quot;;IF([.L251]=&quot;&quot;;&quot;CLEAR&quot;;&quot;CONTRADICTION&quot;);IF([.M251]=&quot;ALLOCATED&quot;;IF(AND([.L251]=&quot;&quot;;[.N251]&lt;&gt;&quot;&quot;);&quot;CLEAR&quot;;&quot;CONTRADICTION&quot;);&quot;CONTRADICTION&quot;)))))">
            <text:p>UNKNOWN</text:p>
          </table:table-cell>
          <table:table-cell office:value-type="string" table:formula="of:=IF([.S251]=&quot;UNKNOWN&quot;;&quot;NO ACTION — linkage status is UNKNOWN / not asserted&quot;;IF([.S251]=&quot;CLEAR&quot;;&quot;NO CONTRADICTION — preserve evidence as entered&quot;;IF([.M251]=&quot;&quot;;&quot;REVIEW LINKAGE STATUS — identifiers are present while status is UNKNOWN&quot;;IF([.M251]=&quot;UNMATCHED&quot;;&quot;REMOVE LINKAGE IDENTIFIERS OR CORRECT LINKAGE STATUS&quot;;IF([.M251]=&quot;SINGLE_SALE_LINKED&quot;;&quot;REQUIRE LINKED SALE ID AND NO ALLOCATION GROUP ID&quot;;IF([.M251]=&quot;MULTI_SALE_PENDING_ALLOCATION&quot;;&quot;REMOVE LINKED SALE ID OR CORRECT LINKAGE STATUS&quot;;IF([.M251]=&quot;ALLOCATED&quot;;&quot;REQUIRE ALLOCATION GROUP ID AND NO LINKED SALE ID&quot;;&quot;REVIEW LINKAGE EVIDENCE — NO AUTHORITY CREATED&quot;)))))))">
            <text:p>NO ACTION — linkage status is UNKNOWN / not asserted</text:p>
          </table:table-cell>
          <table:table-cell office:value-type="string" table:formula="of:=IF([.S251]=&quot;CONTRADICTION&quot;;&quot;BLOCKED&quot;;IF([.S251]=&quot;UNKNOWN&quot;;&quot;UNKNOWN&quot;;IF([.S251]=&quot;CLEAR&quot;;IF(OR([.O251]=&quot;&quot;;[.P251]=&quot;&quot;);&quot;UNKNOWN&quot;;&quot;READY FOR REVIEW&quot;);&quot;BLOCKED&quot;)))">
            <text:p>UNKNOWN</text:p>
          </table:table-cell>
          <table:table-cell office:value-type="string" table:formula="of:=IF([.U251]=&quot;UNKNOWN&quot;;&quot;COMPLETE OR ASSERT REQUIRED EVIDENCE BEFORE REVIEW&quot;;IF([.U251]=&quot;BLOCKED&quot;;&quot;RESOLVE CONTRADICTION BEFORE REVIEW — NO AUTHORITY CREATED&quot;;IF([.U2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1]=&quot;READY FOR REVIEW&quot;;&quot;REVIEW ELIGIBLE — NO AUTHORITY&quot;;IF(OR([.U251]=&quot;UNKNOWN&quot;;[.U251]=&quot;BLOCKED&quot;);&quot;NOT REVIEW ELIGIBLE&quot;;&quot;NOT REVIEW ELIGIBLE&quot;))">
            <text:p>NOT REVIEW ELIGIBLE</text:p>
          </table:table-cell>
        </table:table-row>
      </table:table>
      <table:table table:name="Settlement Linkage Rules">
        <table:table-row>
          <table:table-cell office:value-type="string">
            <text:p>Build 484 — Unmatched Settlement Handling</text:p>
          </table:table-cell>
        </table:table-row>
        <table:table-row>
          <table:table-cell office:value-type="string">
            <text:p>Authority boundary</text:p>
          </table:table-cell>
          <table:table-cell office:value-type="string">
            <text:p>No automatic sale matching. No allocation engine. No settlement verification authority.</text:p>
          </table:table-cell>
        </table:table-row>
        <table:table-row>
          <table:table-cell office:value-type="string">
            <text:p>UNMATCHED</text:p>
          </table:table-cell>
          <table:table-cell office:value-type="string">
            <text:p>Linked Sale ID must remain blank. Allocation Group ID must remain blank. Preserve settlement evidence for later resolution.</text:p>
          </table:table-cell>
        </table:table-row>
        <table:table-row>
          <table:table-cell office:value-type="string">
            <text:p>SINGLE_SALE_LINKED</text:p>
          </table:table-cell>
          <table:table-cell office:value-type="string">
            <text:p>Linked Sale ID is required and must identify one authoritative SALE-###### record. Allocation Group ID remains blank.</text:p>
          </table:table-cell>
        </table:table-row>
        <table:table-row>
          <table:table-cell office:value-type="string">
            <text:p>MULTI_SALE_PENDING_ALLOCATION</text:p>
          </table:table-cell>
          <table:table-cell office:value-type="string">
            <text:p>Linked Sale ID remains blank. Allocation Group ID may remain blank until a controlled allocation group is established. No sale-level settlement authority.</text:p>
          </table:table-cell>
        </table:table-row>
        <table:table-row>
          <table:table-cell office:value-type="string">
            <text:p>ALLOCATED</text:p>
          </table:table-cell>
          <table:table-cell office:value-type="string">
            <text:p>Linked Sale ID remains blank for a multi-sale settlement record. Allocation Group ID is required and must identify the controlled ALG-###### allocation group.</text:p>
          </table:table-cell>
        </table:table-row>
        <table:table-row>
          <table:table-cell office:value-type="string">
            <text:p>Blank Linkage Status</text:p>
          </table:table-cell>
          <table:table-cell office:value-type="string">
            <text:p>UNKNOWN / not asserted. Never infer UNMATCHED, linked, or allocated.</text:p>
          </table:table-cell>
        </table:table-row>
        <table:table-row>
          <table:table-cell office:value-type="string">
            <text:p>Fail-closed rule</text:p>
          </table:table-cell>
          <table:table-cell office:value-type="string">
            <text:p>Unsupported or contradictory linkage combinations do not create settlement authorit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