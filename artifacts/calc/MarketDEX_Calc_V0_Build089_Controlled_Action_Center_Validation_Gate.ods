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5" table:number-rows-spanned="1">
            <text:p>MISSION CONTROL</text:p>
          </table:table-cell>
          <table:covered-table-cell table:number-columns-repeated="4"/>
          <table:table-cell table:style-name="Blue" office:value-type="string" ns42:value-type="string" table:number-columns-spanned="3" table:number-rows-spanned="1">
            <text:p>PERIOD</text:p>
            <text:p>90 Days (Default)</text:p>
          </table:table-cell>
          <table:covered-table-cell table:number-columns-repeated="2"/>
          <table:table-cell table:style-name="Red" office:value-type="string" ns42:value-type="string" table:number-columns-spanned="2" table:number-rows-spanned="1">
            <text:p>DATE</text:p>
            <text:p>Workbook Local</text:p>
          </table:table-cell>
          <table:covered-table-cell/>
          <table:table-cell table:style-name="Yellow" office:value-type="string" ns42:value-type="string" table:number-columns-spanned="2" table:number-rows-spanned="1">
            <text:p>DATA FRESHNESS</text:p>
            <text:p>Awaiting Data</text:p>
          </table:table-cell>
          <table:covered-table-cell/>
          <table:table-cell table:style-name="Blue" office:value-type="string" ns42:value-type="string" table:number-columns-spanned="2" table:number-rows-spanned="1">
            <text:p>WORKBOOK HEALTH</text:p>
            <text:p>Not Evaluated</text:p>
          </table:table-cell>
          <table:covered-table-cell/>
        </table:table-row>
        <table:table-row table:style-name="ro2">
          <table:table-cell table:style-name="Red" office:value-type="string" ns42:value-type="string" table:number-columns-spanned="3" table:number-rows-spanned="1">
            <text:p>🏠 MISSION CONTROL</text:p>
          </table:table-cell>
          <table:covered-table-cell table:number-columns-repeated="2"/>
          <table:table-cell table:style-name="Tag" office:value-type="string" ns42: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ns42:value-type="string" table:number-columns-spanned="5" table:number-rows-spanned="1">
            <text:p>🎯 TODAY'S TOP 3 <text:s/>· <text:s/>3 ACTIONS</text:p>
          </table:table-cell>
          <table:covered-table-cell table:number-columns-repeated="4"/>
          <table:table-cell table:style-name="Red" office:value-type="string" ns42:value-type="string" table:number-columns-spanned="6" table:number-rows-spanned="1">
            <text:p>💰 CAPITAL HEALTH</text:p>
          </table:table-cell>
          <table:covered-table-cell table:number-columns-repeated="5"/>
          <table:table-cell table:style-name="Yellow" office:value-type="string" ns42:value-type="string" table:number-columns-spanned="4" table:number-rows-spanned="1">
            <text:p>⚠️ OPPORTUNITY + RISK</text:p>
          </table:table-cell>
          <table:covered-table-cell table:number-columns-repeated="3"/>
          <table:table-cell table:style-name="Blue" office:value-type="string" ns42:value-type="string" table:number-columns-spanned="3" table:number-rows-spanned="1">
            <text:p>🏆 BUSINESS SCOREBOARD</text:p>
          </table:table-cell>
          <table:covered-table-cell table:number-columns-repeated="2"/>
        </table:table-row>
        <table:table-row table:style-name="ro3">
          <table:table-cell table:style-name="Red" office:value-type="string" ns42:value-type="string">
            <text:p>1</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WhiteB" office:value-type="string" ns42:value-type="string" table:number-columns-spanned="2" table:number-rows-spanned="1">
            <text:p>AVAILABLE CASH</text:p>
          </table:table-cell>
          <table:covered-table-cell/>
          <table:table-cell table:style-name="WhiteB" office:value-type="string" ns42:value-type="string" table:number-columns-spanned="2" table:number-rows-spanned="1">
            <text:p>REDEPLOYMENT</text:p>
          </table:table-cell>
          <table:covered-table-cell/>
          <table:table-cell table:style-name="WhiteB" office:value-type="string" ns42:value-type="string" table:number-columns-spanned="2" table:number-rows-spanned="1">
            <text:p>RECYCLING RATE</text:p>
          </table:table-cell>
          <table:covered-table-cell/>
          <table:table-cell table:style-name="WhiteB" office:value-type="string" ns42:value-type="string" table:number-columns-spanned="2" table:number-rows-spanned="1">
            <text:p>🟢 OPPORTUNITY</text:p>
          </table:table-cell>
          <table:covered-table-cell/>
          <table:table-cell table:style-name="WhiteB" office:value-type="string" ns42:value-type="string" table:number-columns-spanned="2" table:number-rows-spanned="1">
            <text:p>🔴 RISK</text:p>
          </table:table-cell>
          <table:covered-table-cell/>
          <table:table-cell table:style-name="WhiteB" office:value-type="string" ns42:value-type="string">
            <text:p>SALES</text:p>
          </table:table-cell>
          <table:table-cell table:style-name="WhiteB" office:value-type="string" ns42:value-type="string">
            <text:p>GAIN</text:p>
          </table:table-cell>
          <table:table-cell table:style-name="WhiteB" office:value-type="string" ns42:value-type="string">
            <text:p>RECYCLED</text:p>
          </table:table-cell>
        </table:table-row>
        <table:table-row table:style-name="ro3">
          <table:table-cell table:style-name="Orange" office:value-type="string" ns42:value-type="string">
            <text:p>2</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Yellow" office:value-type="string" ns42:value-type="string" table:number-columns-spanned="2" table:number-rows-spanned="1">
            <text:p>—</text:p>
          </table:table-cell>
          <table:covered-table-cell/>
          <table:table-cell table:style-name="Yellow" office:value-type="string" ns42:value-type="string" table:number-columns-spanned="2" table:number-rows-spanned="1">
            <text:p>—</text:p>
          </table:table-cell>
          <table:covered-table-cell/>
          <table:table-cell table:style-name="Yellow" office:value-type="string" ns42:value-type="string" table:number-columns-spanned="2" table:number-rows-spanned="1">
            <text:p>— · 90D</text:p>
          </table:table-cell>
          <table:covered-table-cell/>
          <table:table-cell table:style-name="Pale" office:value-type="string" ns42:value-type="string" table:number-columns-spanned="2" table:number-rows-spanned="1">
            <text:p>Awaiting evidence</text:p>
          </table:table-cell>
          <table:covered-table-cell/>
          <table:table-cell table:style-name="Pale" office:value-type="string" ns42:value-type="string" table:number-columns-spanned="2" table:number-rows-spanned="1">
            <text:p>Awaiting evidence</text:p>
          </table:table-cell>
          <table:covered-table-cell/>
          <table:table-cell table:number-columns-repeated="3" table:style-name="Yellow" office:value-type="string" ns42:value-type="string">
            <text:p>—</text:p>
          </table:table-cell>
        </table:table-row>
        <table:table-row table:style-name="ro3">
          <table:table-cell table:style-name="Green" office:value-type="string" ns42:value-type="string">
            <text:p>3</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Navy2" office:value-type="string" ns42:value-type="string" table:number-columns-spanned="3" table:number-rows-spanned="1">
            <text:p>📊 CAPITAL LOCATION</text:p>
          </table:table-cell>
          <table:covered-table-cell table:number-columns-repeated="2"/>
          <table:table-cell table:style-name="Navy2" office:value-type="string" ns42:value-type="string" table:number-columns-spanned="3" table:number-rows-spanned="1">
            <text:p>📈 REUSABLE CAPITAL TREND</text:p>
          </table:table-cell>
          <table:covered-table-cell table:number-columns-repeated="2"/>
          <table:table-cell table:style-name="Pale" office:value-type="string" ns42:value-type="string" table:number-columns-spanned="4" table:number-rows-spanned="1">
            <text:p>No promoted signal without identifiable support.</text:p>
          </table:table-cell>
          <table:covered-table-cell table:number-columns-repeated="3"/>
          <table:table-cell table:style-name="WhiteB" office:value-type="string" ns42:value-type="string">
            <text:p>ORDERS</text:p>
          </table:table-cell>
          <table:table-cell table:style-name="WhiteB" office:value-type="string" ns42:value-type="string">
            <text:p>ITEMS</text:p>
          </table:table-cell>
          <table:table-cell table:style-name="WhiteB" office:value-type="string" ns42:value-type="string">
            <text:p>DAYS</text:p>
          </table:table-cell>
        </table:table-row>
        <table:table-row table:style-name="ro4">
          <table:table-cell table:style-name="Yellow" office:value-type="string" ns42:value-type="string" table:number-columns-spanned="5" table:number-rows-spanned="1">
            <text:p>⭐ Ranked only when Force Rank evidence exists</text:p>
          </table:table-cell>
          <table:covered-table-cell table:number-columns-repeated="4"/>
          <table:table-cell table:style-name="Pale" office:value-type="string" ns42:value-type="string" table:number-columns-spanned="3" table:number-rows-spanned="1">
            <text:p>Visual reserved</text:p>
            <text:p>Event-derived capital state</text:p>
          </table:table-cell>
          <table:covered-table-cell table:number-columns-repeated="2"/>
          <table:table-cell table:style-name="Pale" office:value-type="string" ns42:value-type="string" table:number-columns-spanned="3" table:number-rows-spanned="1">
            <text:p>Trend reserved</text:p>
            <text:p>Historical evidence required</text:p>
          </table:table-cell>
          <table:covered-table-cell table:number-columns-repeated="2"/>
          <table:table-cell table:style-name="Yellow" office:value-type="string" ns42:value-type="string" table:number-columns-spanned="4" table:number-rows-spanned="1">
            <text:p>WATCH CLOSELY · AUTHORITATIVE DATA ONLY</text:p>
          </table:table-cell>
          <table:covered-table-cell table:number-columns-repeated="3"/>
          <table:table-cell table:number-columns-repeated="3" table:style-name="Yellow" office:value-type="string" ns42:value-type="string">
            <text:p>—</text:p>
          </table:table-cell>
        </table:table-row>
        <table:table-row table:style-name="ro2">
          <table:table-cell table:style-name="Navy" office:value-type="string" ns42: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ns42:value-type="string" table:number-columns-spanned="4" table:number-rows-spanned="1">
            <text:p>🏪 PLATFORM PERFORMANCE</text:p>
          </table:table-cell>
          <table:covered-table-cell table:number-columns-repeated="3"/>
          <table:table-cell table:style-name="WhiteB" office:value-type="string" ns42:value-type="string" table:number-columns-spanned="4" table:number-rows-spanned="1">
            <text:p>📈 MARKET ATTENTION TREND</text:p>
          </table:table-cell>
          <table:covered-table-cell table:number-columns-repeated="3"/>
          <table:table-cell table:style-name="WhiteB" office:value-type="string" ns42:value-type="string" table:number-columns-spanned="3" table:number-rows-spanned="1">
            <text:p>🔥 ATTENTION HEAT MAP</text:p>
          </table:table-cell>
          <table:covered-table-cell table:number-columns-repeated="2"/>
          <table:table-cell table:style-name="WhiteB" office:value-type="string" ns42:value-type="string" table:number-columns-spanned="3" table:number-rows-spanned="1">
            <text:p>📦 INVENTORY MOVEMENT</text:p>
          </table:table-cell>
          <table:covered-table-cell table:number-columns-repeated="2"/>
          <table:table-cell table:style-name="WhiteB" office:value-type="string" ns42:value-type="string" table:number-columns-spanned="4" table:number-rows-spanned="1">
            <text:p>🎯 TOP INVENTORY CONCENTRATIONS</text:p>
          </table:table-cell>
          <table:covered-table-cell table:number-columns-repeated="3"/>
        </table:table-row>
        <table:table-row table:style-name="ro4">
          <table:table-cell table:style-name="Pale" office:value-type="string" ns42:value-type="string" table:number-columns-spanned="4" table:number-rows-spanned="1">
            <text:p>VISUAL RESERVED</text:p>
            <text:p>Authoritative platform evidence only</text:p>
          </table:table-cell>
          <table:covered-table-cell table:number-columns-repeated="3"/>
          <table:table-cell table:style-name="Pale" office:value-type="string" ns42:value-type="string" table:number-columns-spanned="4" table:number-rows-spanned="1">
            <text:p>VISUAL RESERVED</text:p>
            <text:p>Authoritative attention history only</text:p>
          </table:table-cell>
          <table:covered-table-cell table:number-columns-repeated="3"/>
          <table:table-cell table:style-name="Pale" office:value-type="string" ns42:value-type="string" table:number-columns-spanned="3" table:number-rows-spanned="1">
            <text:p>VISUAL RESERVED</text:p>
            <text:p>Evidence-backed category attention</text:p>
          </table:table-cell>
          <table:covered-table-cell table:number-columns-repeated="2"/>
          <table:table-cell table:style-name="Pale" office:value-type="string" ns42:value-type="string" table:number-columns-spanned="3" table:number-rows-spanned="1">
            <text:p>VISUAL RESERVED</text:p>
            <text:p>Inventory event movement</text:p>
          </table:table-cell>
          <table:covered-table-cell table:number-columns-repeated="2"/>
          <table:table-cell table:style-name="Pale" office:value-type="string" ns42: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ns42:value-type="string" table:number-columns-spanned="4" table:number-rows-spanned="1">
            <text:p>⚡ FORCE RANK: AWAITING DATA</text:p>
          </table:table-cell>
          <table:covered-table-cell table:number-columns-repeated="3"/>
          <table:table-cell table:style-name="Navy2" office:value-type="string" ns42:value-type="string" table:number-columns-spanned="4" table:number-rows-spanned="1">
            <text:p>📊 DATA COVERAGE: NOT EVALUATED</text:p>
          </table:table-cell>
          <table:covered-table-cell table:number-columns-repeated="3"/>
          <table:table-cell table:style-name="Navy2" office:value-type="string" ns42:value-type="string" table:number-columns-spanned="3" table:number-rows-spanned="1">
            <text:p>✅ DATA QUALITY: NOT EVALUATED</text:p>
          </table:table-cell>
          <table:covered-table-cell table:number-columns-repeated="2"/>
          <table:table-cell table:style-name="Navy2" office:value-type="string" ns42:value-type="string" table:number-columns-spanned="3" table:number-rows-spanned="1">
            <text:p>☁ BACKUP: NOT EVALUATED</text:p>
          </table:table-cell>
          <table:covered-table-cell table:number-columns-repeated="2"/>
          <table:table-cell table:style-name="Navy2" office:value-type="string" ns42: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2" table:default-cell-style-name="ce13"/>
        <table:table-column table:style-name="co8" table:default-cell-style-name="ce23"/>
        <table:table-column table:style-name="co8" table:number-columns-repeated="3" table:default-cell-style-name="ce13"/>
        <table:table-column table:style-name="co7" table:number-columns-repeated="2" table:default-cell-style-name="ce13"/>
        <table:table-row table:style-name="ro6">
          <table:table-cell table:style-name="ce1" office:value-type="string" ns42:value-type="string" table:number-columns-spanned="3" table:number-rows-spanned="1">
            <text:p>MarketDEX</text:p>
          </table:table-cell>
          <table:covered-table-cell table:number-columns-repeated="2" table:style-name="ce1"/>
          <table:table-cell table:style-name="ce39" office:value-type="string" ns42:value-type="string" table:number-columns-spanned="6" table:number-rows-spanned="1">
            <text:p>📦 INVENTORY COMMAND CENTER</text:p>
          </table:table-cell>
          <table:covered-table-cell table:number-columns-repeated="5" table:style-name="ce39"/>
          <table:table-cell table:style-name="ce26" office:value-type="string" ns42:value-type="string" table:number-columns-spanned="3" table:number-rows-spanned="1">
            <text:p>OWNED INVENTORY</text:p>
            <text:p>Authoritative Summary</text:p>
          </table:table-cell>
          <table:covered-table-cell table:number-columns-repeated="2" table:style-name="ce26"/>
          <table:table-cell table:style-name="ce53" office:value-type="string" ns42:value-type="string" table:number-columns-spanned="3" table:number-rows-spanned="1">
            <text:p>LISTING READINESS</text:p>
            <text:p>Derived</text:p>
          </table:table-cell>
          <table:covered-table-cell table:number-columns-repeated="2" table:style-name="ce53"/>
          <table:table-cell table:style-name="ce55" office:value-type="string" ns42: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ns42: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ns42: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ns42:value-type="string" table:number-columns-spanned="3" table:number-rows-spanned="1">
            <text:p>OWNED POSITIONS</text:p>
          </table:table-cell>
          <table:covered-table-cell table:number-columns-repeated="2" table:style-name="ce4"/>
          <table:table-cell table:style-name="ce4" office:value-type="string" ns42:value-type="string" table:number-columns-spanned="3" table:number-rows-spanned="1">
            <text:p>CURRENT UNITS</text:p>
          </table:table-cell>
          <table:covered-table-cell table:number-columns-repeated="2" table:style-name="ce4"/>
          <table:table-cell table:style-name="ce4" office:value-type="string" ns42:value-type="string" table:number-columns-spanned="3" table:number-rows-spanned="1">
            <text:p>LANDED COST</text:p>
          </table:table-cell>
          <table:covered-table-cell table:number-columns-repeated="2" table:style-name="ce4"/>
          <table:table-cell table:style-name="ce4" office:value-type="string" ns42:value-type="string" table:number-columns-spanned="3" table:number-rows-spanned="1">
            <text:p>READY TO LIST</text:p>
          </table:table-cell>
          <table:covered-table-cell table:number-columns-repeated="2" table:style-name="ce4"/>
          <table:table-cell table:style-name="ce4" office:value-type="string" ns42:value-type="string" table:number-columns-spanned="3" table:number-rows-spanned="1">
            <text:p>INVENTORY AGE</text:p>
          </table:table-cell>
          <table:covered-table-cell table:number-columns-repeated="2" table:style-name="ce4"/>
          <table:table-cell table:style-name="ce4" office:value-type="string" ns42:value-type="string" table:number-columns-spanned="3" table:number-rows-spanned="1">
            <text:p>REVIEW REQUIRED</text:p>
          </table:table-cell>
          <table:covered-table-cell table:number-columns-repeated="2" table:style-name="ce4"/>
        </table:table-row>
        <table:table-row table:style-name="ro8">
          <table:table-cell table:style-name="ce5" office:value-type="string" ns42:value-type="string" table:number-columns-spanned="3" table:number-rows-spanned="1">
            <text:p>—</text:p>
          </table:table-cell>
          <table:covered-table-cell table:number-columns-repeated="2" table:style-name="ce5"/>
          <table:table-cell table:style-name="ce5" office:value-type="string" ns42:value-type="string" table:number-columns-spanned="3" table:number-rows-spanned="1">
            <text:p>—</text:p>
          </table:table-cell>
          <table:covered-table-cell table:number-columns-repeated="2" table:style-name="ce5"/>
          <table:table-cell table:style-name="ce5" office:value-type="string" ns42:value-type="string" table:number-columns-spanned="3" table:number-rows-spanned="1">
            <text:p>—</text:p>
          </table:table-cell>
          <table:covered-table-cell table:number-columns-repeated="2" table:style-name="ce5"/>
          <table:table-cell table:style-name="ce33" office:value-type="string" ns42:value-type="string" table:number-columns-spanned="3" table:number-rows-spanned="1">
            <text:p>0</text:p>
          </table:table-cell>
          <table:covered-table-cell table:number-columns-repeated="2" table:style-name="ce5"/>
          <table:table-cell table:style-name="ce8" office:value-type="string" ns42:value-type="string" table:number-columns-spanned="3" table:number-rows-spanned="1">
            <text:p>1 HOLD</text:p>
            <text:p>REVIEW PLANNED</text:p>
          </table:table-cell>
          <table:covered-table-cell table:number-columns-repeated="2" table:style-name="ce8"/>
          <table:table-cell table:style-name="ce5" office:value-type="string" ns42:value-type="string" table:number-columns-spanned="3" table:number-rows-spanned="1">
            <text:p>—</text:p>
          </table:table-cell>
          <table:covered-table-cell table:number-columns-repeated="2" table:style-name="ce5"/>
        </table:table-row>
        <table:table-row table:style-name="ro9">
          <table:table-cell table:style-name="ce6" office:value-type="string" ns42: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ns42: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ns42:value-type="string" table:number-columns-spanned="3" table:number-rows-spanned="1">
            <text:p>DATE</text:p>
          </table:table-cell>
          <table:covered-table-cell table:number-columns-repeated="2" table:style-name="ce8"/>
          <table:table-cell table:style-name="ce8" office:value-type="string" ns42:value-type="string" table:number-columns-spanned="5" table:number-rows-spanned="1">
            <text:p>PRODUCT</text:p>
          </table:table-cell>
          <table:covered-table-cell table:number-columns-repeated="4" table:style-name="ce8"/>
          <table:table-cell table:style-name="ce8" office:value-type="string" ns42:value-type="string" table:number-columns-spanned="2" table:number-rows-spanned="1">
            <text:p>QUANTITY</text:p>
          </table:table-cell>
          <table:covered-table-cell table:style-name="ce8"/>
          <table:table-cell table:style-name="ce8" office:value-type="string" ns42:value-type="string" table:number-columns-spanned="3" table:number-rows-spanned="1">
            <text:p>TOTAL PAID</text:p>
          </table:table-cell>
          <table:covered-table-cell table:number-columns-repeated="2" table:style-name="ce8"/>
          <table:table-cell table:style-name="ce8" office:value-type="string" ns42:value-type="string" table:number-columns-spanned="3" table:number-rows-spanned="1">
            <text:p>SOURCE</text:p>
          </table:table-cell>
          <table:covered-table-cell table:number-columns-repeated="2" table:style-name="ce8"/>
          <table:table-cell table:style-name="ce12" office:value-type="string" ns42:value-type="string" table:number-columns-spanned="2" table:number-rows-spanned="1">
            <text:p>CAPTURE</text:p>
            <text:p>STATUS</text:p>
          </table:table-cell>
          <table:covered-table-cell table:style-name="ce12"/>
        </table:table-row>
        <table:table-row table:style-name="ro8">
          <table:table-cell table:style-name="ce9" office:value-type="string" ns42:value-type="string" table:number-columns-spanned="3" table:number-rows-spanned="1">
            <text:p>06-25-2026</text:p>
          </table:table-cell>
          <table:covered-table-cell table:number-columns-repeated="2" table:style-name="ce9"/>
          <table:table-cell table:style-name="ce9" office:value-type="string" ns42:value-type="string" table:number-columns-spanned="5" table:number-rows-spanned="1">
            <text:p>Mega Greninja ex Premium Collection</text:p>
          </table:table-cell>
          <table:covered-table-cell table:number-columns-repeated="4" table:style-name="ce9"/>
          <table:table-cell table:style-name="ce47" office:value-type="float" office:value="2" ns42:value-type="float" table:number-columns-spanned="2" table:number-rows-spanned="1">
            <text:p>2</text:p>
          </table:table-cell>
          <table:covered-table-cell table:style-name="ce20"/>
          <table:table-cell table:style-name="ce47" office:value-type="float" office:value="97.97" ns42:value-type="float" table:number-columns-spanned="3" table:number-rows-spanned="1">
            <text:p>97.97</text:p>
          </table:table-cell>
          <table:covered-table-cell table:number-columns-repeated="2" table:style-name="ce20"/>
          <table:table-cell table:style-name="ce9" office:value-type="string" ns42: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1"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ns42: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2" table:number-rows-spanned="1">
            <text:p>FORM</text:p>
          </table:table-cell>
          <table:covered-table-cell table:style-name="ce12"/>
          <table:table-cell table:style-name="ce12" office:value-type="string" ns42:value-type="string" table:number-columns-spanned="2" table:number-rows-spanned="1">
            <text:p>QTY</text:p>
          </table:table-cell>
          <table:covered-table-cell table:style-name="ce12"/>
          <table:table-cell table:style-name="ce12" office:value-type="string" ns42:value-type="string" table:number-columns-spanned="2" table:number-rows-spanned="1">
            <text:p>BUSINESS STATE</text:p>
          </table:table-cell>
          <table:covered-table-cell table:style-name="ce12"/>
          <table:table-cell table:style-name="ce12" office:value-type="string" ns42:value-type="string" table:number-columns-spanned="2" table:number-rows-spanned="1">
            <text:p>LOCATION</text:p>
          </table:table-cell>
          <table:covered-table-cell table:style-name="ce12"/>
          <table:table-cell table:style-name="ce54" office:value-type="string" ns42:value-type="string" table:number-columns-spanned="2" table:number-rows-spanned="1">
            <text:p>AVG UNIT COST</text:p>
          </table:table-cell>
          <table:covered-table-cell table:style-name="ce54"/>
          <table:table-cell table:style-name="ce12" office:value-type="string" ns42:value-type="string" table:number-columns-spanned="2" table:number-rows-spanned="1">
            <text:p>DAYS HELD</text:p>
          </table:table-cell>
          <table:covered-table-cell table:style-name="ce12"/>
          <table:table-cell table:style-name="ce54" office:value-type="string" ns42:value-type="string">
            <text:p>LISTING</text:p>
            <text:p>READY</text:p>
          </table:table-cell>
          <table:table-cell table:style-name="ce12" office:value-type="string" ns42: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25"/>
          <table:table-cell table:style-name="ce18" table:formula="of:=IF([.$P$24]=&quot;APPROVED FOR PROMOTION&quot;;[.$I$9];&quot;—&quot;)" office:value-type="float" office:value="2" ns42: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ns42: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ns42: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ns42:value-type="float" table:number-columns-spanned="2" table:number-rows-spanned="1">
            <text:p>11</text:p>
          </table:table-cell>
          <table:covered-table-cell table:style-name="ce31"/>
          <table:table-cell table:style-name="ce43" office:value-type="string" ns42:value-type="string">
            <text:p>SHORT-TERM</text:p>
            <text:p>HOLD</text:p>
          </table:table-cell>
          <table:table-cell table:style-name="ce21" office:value-type="string" ns42:value-type="string">
            <text:p>REVIEW</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14" office:value-type="string" ns42:value-type="string" table:number-columns-spanned="9" table:number-rows-spanned="1">
            <text:p>📦 INVENTORY COMPOSITION</text:p>
          </table:table-cell>
          <table:covered-table-cell table:number-columns-repeated="8" table:style-name="ce14"/>
          <table:table-cell table:style-name="ce24" office:value-type="string" ns42: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ns42:value-type="string" table:number-columns-spanned="3" table:number-rows-spanned="1">
            <text:p>CAPTURE ROW</text:p>
          </table:table-cell>
          <table:covered-table-cell table:number-columns-repeated="2" table:style-name="ce12"/>
          <table:table-cell table:style-name="ce12" office:value-type="string" ns42:value-type="string" table:number-columns-spanned="3" table:number-rows-spanned="1">
            <text:p>REVIEW DECISION</text:p>
          </table:table-cell>
          <table:covered-table-cell table:number-columns-repeated="2" table:style-name="ce12"/>
          <table:table-cell table:style-name="ce12" office:value-type="string" ns42: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ns42:value-type="string" table:number-columns-spanned="3" table:number-rows-spanned="1">
            <text:p>9</text:p>
          </table:table-cell>
          <table:covered-table-cell table:number-columns-repeated="2" table:style-name="ce22"/>
          <table:table-cell table:style-name="ce4" office:value-type="string" ns42: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ns42:value-type="string">
            <text:p>💰 COST LAYERS · PROTECTED</text:p>
          </table:covered-table-cell>
          <table:covered-table-cell table:number-columns-repeated="3" table:style-name="ce15"/>
          <table:covered-table-cell table:style-name="ce15" office:value-type="string" ns42:value-type="string">
            <text:p>📍 LOCATION HISTORY · PROTECTED</text:p>
          </table:covered-table-cell>
          <table:covered-table-cell table:number-columns-repeated="3" table:style-name="ce15"/>
          <table:covered-table-cell table:style-name="ce15" office:value-type="string" ns42:value-type="string">
            <text:p>🔨 TRANSFORMATIONS</text:p>
            <text:p>SEPARATE HISTORY</text:p>
          </table:covered-table-cell>
          <table:covered-table-cell table:number-columns-repeated="2" table:style-name="ce15"/>
          <table:covered-table-cell table:style-name="ce15" office:value-type="string" ns42:value-type="string">
            <text:p>🔍 RECONCILIATION</text:p>
            <text:p>EVENT-BASED</text:p>
          </table:covered-table-cell>
          <table:covered-table-cell table:number-columns-repeated="2" table:style-name="ce15"/>
        </table:table-row>
        <table:table-row table:style-name="ro8">
          <table:table-cell table:style-name="ce16" office:value-type="string" ns42: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LOCATION TYPE</text:p>
          </table:table-cell>
          <table:covered-table-cell table:number-columns-repeated="2" table:style-name="ce12"/>
          <table:table-cell table:style-name="ce12" office:value-type="string" ns42:value-type="string" table:number-columns-spanned="6" table:number-rows-spanned="1">
            <text:p>PHYSICAL STORAGE POSITION</text:p>
          </table:table-cell>
          <table:covered-table-cell table:number-columns-repeated="5" table:style-name="ce12"/>
          <table:table-cell table:style-name="ce12" office:value-type="string" ns42: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STORAGE</text:p>
          </table:table-cell>
          <table:covered-table-cell table:number-columns-repeated="2" table:style-name="ce27"/>
          <table:table-cell table:style-name="ce9" office:value-type="string" ns42: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40"/>
        </table:table-row>
        <table:table-row table:style-name="ro11">
          <table:table-cell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3">
          <table:table-cell table:style-name="ce24" office:value-type="string" ns42: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CURRENT POSITION</text:p>
          </table:table-cell>
          <table:covered-table-cell table:number-columns-repeated="2" table:style-name="ce12"/>
          <table:table-cell table:style-name="ce12" office:value-type="string" ns42:value-type="string" table:number-columns-spanned="6" table:number-rows-spanned="1">
            <text:p>MOVE TO POSITION</text:p>
          </table:table-cell>
          <table:covered-table-cell table:number-columns-repeated="5" table:style-name="ce12"/>
          <table:table-cell table:style-name="ce12" office:value-type="string" ns42:value-type="string" table:number-columns-spanned="5" table:number-rows-spanned="1">
            <text:p>MOVE STATUS</text:p>
          </table:table-cell>
          <table:covered-table-cell table:number-columns-repeated="4" table:style-name="ce12"/>
        </table:table-row>
        <table:table-row table:style-name="ro13">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Light Box Storage</text:p>
          </table:table-cell>
          <table:covered-table-cell table:number-columns-repeated="2" table:style-name="ce27"/>
          <table:table-cell table:style-name="ce9" office:value-type="string" ns42:value-type="string" table:number-columns-spanned="6" table:number-rows-spanned="1">
            <text:p>Aquarium Stand</text:p>
          </table:table-cell>
          <table:covered-table-cell table:number-columns-repeated="5" table:style-name="ce9"/>
          <table:table-cell table:style-name="ce40" office:value-type="string" ns42:value-type="string" table:number-columns-spanned="5" table:number-rows-spanned="1">
            <text:p>MOVE EXECUTED · QTY 2</text:p>
          </table:table-cell>
          <table:covered-table-cell table:number-columns-repeated="4" table:style-name="ce40"/>
        </table:table-row>
        <table:table-row table:style-name="ro12">
          <table:table-cell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3">
          <table:table-cell table:style-name="Default" table:number-columns-repeated="18"/>
        </table:table-row>
        <table:table-row table:style-name="ro13">
          <table:table-cell table:style-name="ce16" office:value-type="string" ns42: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ns42:value-type="string" table:number-columns-spanned="3" table:number-rows-spanned="1">
            <text:p>MOVE DATE</text:p>
          </table:table-cell>
          <table:covered-table-cell table:number-columns-repeated="2" table:style-name="ce12"/>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FROM</text:p>
          </table:table-cell>
          <table:covered-table-cell table:number-columns-repeated="2" table:style-name="ce12"/>
          <table:table-cell table:style-name="ce12" office:value-type="string" ns42:value-type="string" table:number-columns-spanned="3" table:number-rows-spanned="1">
            <text:p>TO</text:p>
          </table:table-cell>
          <table:covered-table-cell table:number-columns-repeated="2" table:style-name="ce12"/>
          <table:table-cell table:style-name="ce12" office:value-type="string" ns42:value-type="string" table:number-columns-spanned="5" table:number-rows-spanned="1">
            <text:p>EVENT STATE</text:p>
          </table:table-cell>
          <table:covered-table-cell table:number-columns-repeated="4" table:style-name="ce12"/>
        </table:table-row>
        <table:table-row table:style-name="ro13">
          <table:table-cell table:style-name="ce25" office:value-type="string" ns42:value-type="string" table:number-columns-spanned="3" table:number-rows-spanned="1">
            <text:p>07-05-2026</text:p>
          </table:table-cell>
          <table:covered-table-cell table:number-columns-repeated="2" table:style-name="ce25"/>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Light Box Storage</text:p>
          </table:table-cell>
          <table:covered-table-cell table:number-columns-repeated="2" table:style-name="ce27"/>
          <table:table-cell table:style-name="ce27" office:value-type="string" ns42:value-type="string" table:number-columns-spanned="3" table:number-rows-spanned="1">
            <text:p>Aquarium Stand</text:p>
          </table:table-cell>
          <table:covered-table-cell table:number-columns-repeated="2" table:style-name="ce27"/>
          <table:table-cell table:style-name="ce27" office:value-type="string" ns42:value-type="string" table:number-columns-spanned="5" table:number-rows-spanned="1">
            <text:p>COMPLETED · QTY 2</text:p>
          </table:table-cell>
          <table:covered-table-cell table:number-columns-repeated="4" table:style-name="ce27"/>
        </table:table-row>
        <table:table-row table:style-name="ro12">
          <table:table-cell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4">
          <table:table-cell table:style-name="ce16" office:value-type="string" ns42: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HOLD PLAN</text:p>
          </table:table-cell>
          <table:covered-table-cell table:number-columns-repeated="2" table:style-name="ce12"/>
          <table:table-cell table:style-name="ce12" office:value-type="string" ns42:value-type="string" table:number-columns-spanned="3" table:number-rows-spanned="1">
            <text:p>REVIEW WINDOW</text:p>
          </table:table-cell>
          <table:covered-table-cell table:number-columns-repeated="2" table:style-name="ce12"/>
          <table:table-cell table:style-name="ce12" office:value-type="string" ns42:value-type="string" table:number-columns-spanned="3" table:number-rows-spanned="1">
            <text:p>PRIMARY DECISION DRIVER</text:p>
          </table:table-cell>
          <table:covered-table-cell table:number-columns-repeated="2" table:style-name="ce12"/>
          <table:table-cell table:style-name="ce12" office:value-type="string" ns42:value-type="string" table:number-columns-spanned="5" table:number-rows-spanned="1">
            <text:p>REVIEW STATE</text:p>
          </table:table-cell>
          <table:covered-table-cell table:number-columns-repeated="4" table:style-name="ce12"/>
        </table:table-row>
        <table:table-row table:style-name="ro14">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SHORT-TERM HOLD</text:p>
          </table:table-cell>
          <table:covered-table-cell table:number-columns-repeated="2" table:style-name="ce27"/>
          <table:table-cell table:style-name="ce27" office:value-type="string" ns42:value-type="string" table:number-columns-spanned="3" table:number-rows-spanned="1">
            <text:p>EARLY DEC 2026</text:p>
          </table:table-cell>
          <table:covered-table-cell table:number-columns-repeated="2" table:style-name="ce27"/>
          <table:table-cell table:style-name="ce27" office:value-type="string" ns42:value-type="string" table:number-columns-spanned="3" table:number-rows-spanned="1">
            <text:p>PROFIT POTENTIAL</text:p>
          </table:table-cell>
          <table:covered-table-cell table:number-columns-repeated="2" table:style-name="ce27"/>
          <table:table-cell table:style-name="ce40" office:value-type="string" ns42:value-type="string" table:number-columns-spanned="5" table:number-rows-spanned="1">
            <text:p>PLANNED REVIEW</text:p>
          </table:table-cell>
          <table:covered-table-cell table:number-columns-repeated="4" table:style-name="ce40"/>
        </table:table-row>
        <table:table-row table:style-name="ro10">
          <table:table-cell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ns42:value-type="string" table:number-columns-spanned="3" table:number-rows-spanned="1">
            <text:p>MARKETPLACE</text:p>
          </table:table-cell>
          <table:covered-table-cell table:number-columns-repeated="2" table:style-name="ce12"/>
          <table:table-cell table:style-name="ce12" office:value-type="string" ns42:value-type="string" table:number-columns-spanned="3" table:number-rows-spanned="1">
            <text:p>PROFIT TARGET / BOX</text:p>
          </table:table-cell>
          <table:covered-table-cell table:number-columns-repeated="2" table:style-name="ce12"/>
          <table:table-cell table:style-name="ce12" office:value-type="string" ns42:value-type="string" table:number-columns-spanned="3" table:number-rows-spanned="1">
            <text:p>QUANTITY</text:p>
          </table:table-cell>
          <table:covered-table-cell table:number-columns-repeated="2" table:style-name="ce12"/>
          <table:table-cell table:style-name="ce12" office:value-type="string" ns42:value-type="string" table:number-columns-spanned="3" table:number-rows-spanned="1">
            <text:p>TOTAL PROFIT TARGET</text:p>
          </table:table-cell>
          <table:covered-table-cell table:number-columns-repeated="2" table:style-name="ce12"/>
          <table:table-cell table:style-name="ce12" office:value-type="string" ns42:value-type="string" table:number-columns-spanned="3" table:number-rows-spanned="1">
            <text:p>FEE ASSUMPTION</text:p>
          </table:table-cell>
          <table:covered-table-cell table:number-columns-repeated="2" table:style-name="ce12"/>
          <table:table-cell table:style-name="ce12" office:value-type="string" ns42:value-type="string" table:number-columns-spanned="3" table:number-rows-spanned="1">
            <text:p>TARGET STATE</text:p>
          </table:table-cell>
          <table:covered-table-cell table:number-columns-repeated="2" table:style-name="ce12"/>
        </table:table-row>
        <table:table-row table:style-name="ro12">
          <table:table-cell table:style-name="ce4" office:value-type="string" ns42:value-type="string" table:number-columns-spanned="3" table:number-rows-spanned="1">
            <text:p>eBay</text:p>
          </table:table-cell>
          <table:covered-table-cell table:number-columns-repeated="2" table:style-name="ce4"/>
          <table:table-cell table:style-name="ce28" office:value-type="string" ns42:value-type="string" table:number-columns-spanned="3" table:number-rows-spanned="1">
            <text:p>$100.00</text:p>
          </table:table-cell>
          <table:covered-table-cell table:number-columns-repeated="2" table:style-name="ce32"/>
          <table:table-cell table:style-name="ce28" office:value-type="string" ns42:value-type="string" table:number-columns-spanned="3" table:number-rows-spanned="1">
            <text:p>2</text:p>
          </table:table-cell>
          <table:covered-table-cell table:number-columns-repeated="2" table:style-name="ce32"/>
          <table:table-cell table:style-name="ce28" office:value-type="string" ns42:value-type="string" table:number-columns-spanned="3" table:number-rows-spanned="1">
            <text:p>$200.00</text:p>
          </table:table-cell>
          <table:covered-table-cell table:number-columns-repeated="2" table:style-name="ce32"/>
          <table:table-cell table:style-name="ce46" office:value-type="string" ns42:value-type="string" table:number-columns-spanned="3" table:number-rows-spanned="1">
            <text:p>REVIEW REQUIRED</text:p>
          </table:table-cell>
          <table:covered-table-cell table:number-columns-repeated="2" table:style-name="ce46"/>
          <table:table-cell table:style-name="ce40" office:value-type="string" ns42: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ns42:value-type="string" table:number-columns-spanned="6" table:number-rows-spanned="1">
            <text:p>SELLER PROFILE</text:p>
          </table:table-cell>
          <table:covered-table-cell table:number-columns-repeated="5" table:style-name="ce26"/>
          <table:table-cell table:style-name="ce26" office:value-type="string" ns42:value-type="string" table:number-columns-spanned="6" table:number-rows-spanned="1">
            <text:p>TARGET DEFINITION</text:p>
          </table:table-cell>
          <table:covered-table-cell table:number-columns-repeated="5" table:style-name="ce26"/>
          <table:table-cell table:style-name="ce26" office:value-type="string" ns42:value-type="string" table:number-columns-spanned="6" table:number-rows-spanned="1">
            <text:p>FEE CONTROL</text:p>
          </table:table-cell>
          <table:covered-table-cell table:number-columns-repeated="5" table:style-name="ce26"/>
        </table:table-row>
        <table:table-row table:style-name="ro15">
          <table:table-cell office:value-type="string" ns42:value-type="string" table:number-columns-spanned="6" table:number-rows-spanned="1">
            <text:p>NO STORE SUBSCRIPTION · NO PROMOTED LISTINGS</text:p>
          </table:table-cell>
          <table:covered-table-cell table:number-columns-repeated="5"/>
          <table:table-cell office:value-type="string" ns42: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ns42:value-type="string" table:number-columns-spanned="3" table:number-rows-spanned="1">
            <text:p>SALE FORMAT</text:p>
          </table:table-cell>
          <table:covered-table-cell table:number-columns-repeated="2" table:style-name="ce12"/>
          <table:table-cell table:style-name="ce12" office:value-type="string" ns42:value-type="string" table:number-columns-spanned="3" table:number-rows-spanned="1">
            <text:p>MARKET PRICE / BOX</text:p>
          </table:table-cell>
          <table:covered-table-cell table:number-columns-repeated="2" table:style-name="ce12"/>
          <table:table-cell table:style-name="ce12" office:value-type="string" ns42:value-type="string" table:number-columns-spanned="3" table:number-rows-spanned="1">
            <text:p>LISTING PRICE / BOX</text:p>
          </table:table-cell>
          <table:covered-table-cell table:number-columns-repeated="2" table:style-name="ce12"/>
          <table:table-cell table:style-name="ce12" office:value-type="string" ns42:value-type="string" table:number-columns-spanned="3" table:number-rows-spanned="1">
            <text:p>DEMO FEE RATE</text:p>
          </table:table-cell>
          <table:covered-table-cell table:number-columns-repeated="2" table:style-name="ce12"/>
          <table:table-cell table:style-name="ce12" office:value-type="string" ns42:value-type="string" table:number-columns-spanned="3" table:number-rows-spanned="1">
            <text:p>SHIPPING ASSUMPTION</text:p>
          </table:table-cell>
          <table:covered-table-cell table:number-columns-repeated="2" table:style-name="ce12"/>
          <table:table-cell table:style-name="ce12" office:value-type="string" ns42:value-type="string" table:number-columns-spanned="3" table:number-rows-spanned="1">
            <text:p>DECISION</text:p>
          </table:table-cell>
          <table:covered-table-cell table:number-columns-repeated="2" table:style-name="ce12"/>
        </table:table-row>
        <table:table-row table:style-name="ro12">
          <table:table-cell table:style-name="ce27" office:value-type="string" ns42:value-type="string" table:number-columns-spanned="3" table:number-rows-spanned="1">
            <text:p>INDIVIDUALLY</text:p>
          </table:table-cell>
          <table:covered-table-cell table:number-columns-repeated="2" table:style-name="ce27"/>
          <table:table-cell table:style-name="ce40" office:value-type="string" ns42:value-type="string" table:number-columns-spanned="3" table:number-rows-spanned="1">
            <text:p>$175.00 · DEMO</text:p>
          </table:table-cell>
          <table:covered-table-cell table:number-columns-repeated="2" table:style-name="ce40"/>
          <table:table-cell table:style-name="ce40" office:value-type="string" ns42:value-type="string" table:number-columns-spanned="3" table:number-rows-spanned="1">
            <text:p>$185.00 · DEMO</text:p>
          </table:table-cell>
          <table:covered-table-cell table:number-columns-repeated="2" table:style-name="ce40"/>
          <table:table-cell table:style-name="ce46" office:value-type="string" ns42:value-type="string" table:number-columns-spanned="3" table:number-rows-spanned="1">
            <text:p>13.25% · DEMO</text:p>
          </table:table-cell>
          <table:covered-table-cell table:number-columns-repeated="2" table:style-name="ce46"/>
          <table:table-cell table:style-name="ce46" office:value-type="string" ns42:value-type="string" table:number-columns-spanned="3" table:number-rows-spanned="1">
            <text:p>BUYER PAYS · DEMO</text:p>
          </table:table-cell>
          <table:covered-table-cell table:number-columns-repeated="2" table:style-name="ce46"/>
          <table:table-cell table:style-name="ce40" office:value-type="string" ns42:value-type="string" table:number-columns-spanned="3" table:number-rows-spanned="1">
            <text:p>TESTING</text:p>
          </table:table-cell>
          <table:covered-table-cell table:number-columns-repeated="2" table:style-name="ce40"/>
        </table:table-row>
        <table:table-row table:style-name="ro12">
          <table:table-cell table:style-name="ce29" office:value-type="string" ns42:value-type="string" table:number-columns-spanned="3" table:number-rows-spanned="1">
            <text:p>AVG UNIT COST</text:p>
          </table:table-cell>
          <table:covered-table-cell table:number-columns-repeated="2" table:style-name="ce29"/>
          <table:table-cell table:style-name="ce29" office:value-type="string" ns42:value-type="string" table:number-columns-spanned="3" table:number-rows-spanned="1">
            <text:p>TARGET PROFIT / BOX</text:p>
          </table:table-cell>
          <table:covered-table-cell table:number-columns-repeated="2" table:style-name="ce29"/>
          <table:table-cell table:style-name="ce29" office:value-type="string" ns42:value-type="string" table:number-columns-spanned="3" table:number-rows-spanned="1">
            <text:p>REQUIRED NET / BOX</text:p>
          </table:table-cell>
          <table:covered-table-cell table:number-columns-repeated="2" table:style-name="ce29"/>
          <table:table-cell table:style-name="ce29" office:value-type="string" ns42:value-type="string" table:number-columns-spanned="3" table:number-rows-spanned="1">
            <text:p>DEMO NET @ LIST PRICE</text:p>
          </table:table-cell>
          <table:covered-table-cell table:number-columns-repeated="2" table:style-name="ce29"/>
          <table:table-cell table:style-name="ce29" office:value-type="string" ns42:value-type="string" table:number-columns-spanned="3" table:number-rows-spanned="1">
            <text:p>DEMO PROFIT / BOX</text:p>
          </table:table-cell>
          <table:covered-table-cell table:number-columns-repeated="2" table:style-name="ce29"/>
          <table:table-cell table:style-name="ce29" office:value-type="string" ns42:value-type="string" table:number-columns-spanned="3" table:number-rows-spanned="1">
            <text:p>TARGET RESULT</text:p>
          </table:table-cell>
          <table:covered-table-cell table:number-columns-repeated="2" table:style-name="ce29"/>
        </table:table-row>
        <table:table-row table:style-name="ro12">
          <table:table-cell table:style-name="ce28" office:value-type="string" ns42:value-type="string" table:number-columns-spanned="3" table:number-rows-spanned="1">
            <text:p>$48.985</text:p>
          </table:table-cell>
          <table:covered-table-cell table:number-columns-repeated="2" table:style-name="ce32"/>
          <table:table-cell table:style-name="ce28" office:value-type="string" ns42:value-type="string" table:number-columns-spanned="3" table:number-rows-spanned="1">
            <text:p>$100.00</text:p>
          </table:table-cell>
          <table:covered-table-cell table:number-columns-repeated="2" table:style-name="ce32"/>
          <table:table-cell table:style-name="ce28" office:value-type="string" ns42:value-type="string" table:number-columns-spanned="3" table:number-rows-spanned="1">
            <text:p>$148.985</text:p>
          </table:table-cell>
          <table:covered-table-cell table:number-columns-repeated="2" table:style-name="ce32"/>
          <table:table-cell table:style-name="ce28" office:value-type="string" ns42:value-type="string" table:number-columns-spanned="3" table:number-rows-spanned="1">
            <text:p>$160.49</text:p>
          </table:table-cell>
          <table:covered-table-cell table:number-columns-repeated="2" table:style-name="ce32"/>
          <table:table-cell table:style-name="ce28" office:value-type="string" ns42:value-type="string" table:number-columns-spanned="3" table:number-rows-spanned="1">
            <text:p>$111.50</text:p>
          </table:table-cell>
          <table:covered-table-cell table:number-columns-repeated="2" table:style-name="ce32"/>
          <table:table-cell table:style-name="ce12" office:value-type="string" ns42:value-type="string" table:number-columns-spanned="3" table:number-rows-spanned="1">
            <text:p>READY TO SELL · DEMO</text:p>
          </table:table-cell>
          <table:covered-table-cell table:number-columns-repeated="2" table:style-name="ce12"/>
        </table:table-row>
        <table:table-row table:style-name="ro15">
          <table:table-cell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ns42:value-type="string" table:number-columns-spanned="3" table:number-rows-spanned="1">
            <text:p>COST / BOX</text:p>
          </table:table-cell>
          <table:covered-table-cell table:number-columns-repeated="2" table:style-name="ce12"/>
          <table:table-cell table:style-name="ce12" office:value-type="string" ns42:value-type="string" table:number-columns-spanned="3" table:number-rows-spanned="1">
            <text:p>PROFIT TARGET / BOX</text:p>
          </table:table-cell>
          <table:covered-table-cell table:number-columns-repeated="2" table:style-name="ce12"/>
          <table:table-cell table:style-name="ce12" office:value-type="string" ns42:value-type="string" table:number-columns-spanned="3" table:number-rows-spanned="1">
            <text:p>DEMO FEE BASIS</text:p>
          </table:table-cell>
          <table:covered-table-cell table:number-columns-repeated="2" table:style-name="ce12"/>
          <table:table-cell table:style-name="ce12" office:value-type="string" ns42:value-type="string" table:number-columns-spanned="3" table:number-rows-spanned="1">
            <text:p>MINIMUM SALE PRICE</text:p>
          </table:table-cell>
          <table:covered-table-cell table:number-columns-repeated="2" table:style-name="ce12"/>
          <table:table-cell table:style-name="ce12" office:value-type="string" ns42:value-type="string" table:number-columns-spanned="3" table:number-rows-spanned="1">
            <text:p>DEMO MARKET PRICE</text:p>
          </table:table-cell>
          <table:covered-table-cell table:number-columns-repeated="2" table:style-name="ce12"/>
          <table:table-cell table:style-name="ce12" office:value-type="string" ns42:value-type="string" table:number-columns-spanned="3" table:number-rows-spanned="1">
            <text:p>MARKET TEST</text:p>
          </table:table-cell>
          <table:covered-table-cell table:number-columns-repeated="2" table:style-name="ce12"/>
        </table:table-row>
        <table:table-row table:style-name="ro12">
          <table:table-cell table:style-name="ce28" office:value-type="string" ns42:value-type="string" table:number-columns-spanned="3" table:number-rows-spanned="1">
            <text:p>$48.985</text:p>
          </table:table-cell>
          <table:covered-table-cell table:number-columns-repeated="2" table:style-name="ce32"/>
          <table:table-cell table:style-name="ce28" office:value-type="string" ns42:value-type="string" table:number-columns-spanned="3" table:number-rows-spanned="1">
            <text:p>$100.00</text:p>
          </table:table-cell>
          <table:covered-table-cell table:number-columns-repeated="2" table:style-name="ce32"/>
          <table:table-cell table:style-name="ce46" office:value-type="string" ns42:value-type="string" table:number-columns-spanned="3" table:number-rows-spanned="1">
            <text:p>13.25% · DEMO</text:p>
          </table:table-cell>
          <table:covered-table-cell table:number-columns-repeated="2" table:style-name="ce46"/>
          <table:table-cell table:style-name="ce4" office:value-type="string" ns42:value-type="string" table:number-columns-spanned="3" table:number-rows-spanned="1">
            <text:p>$171.74 · DEMO</text:p>
          </table:table-cell>
          <table:covered-table-cell table:number-columns-repeated="2" table:style-name="ce4"/>
          <table:table-cell table:style-name="ce4" office:value-type="string" ns42:value-type="string" table:number-columns-spanned="3" table:number-rows-spanned="1">
            <text:p>$175.00 · DEMO</text:p>
          </table:table-cell>
          <table:covered-table-cell table:number-columns-repeated="2" table:style-name="ce4"/>
          <table:table-cell table:style-name="ce12" office:value-type="string" ns42: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ns42:value-type="string" table:number-columns-spanned="3" table:number-rows-spanned="1">
            <text:p>DEMO LISTING PRICE</text:p>
          </table:table-cell>
          <table:covered-table-cell table:number-columns-repeated="2" table:style-name="ce35"/>
          <table:table-cell table:style-name="ce35" office:value-type="string" ns42:value-type="string" table:number-columns-spanned="3" table:number-rows-spanned="1">
            <text:p>NET AFTER DEMO FEE</text:p>
          </table:table-cell>
          <table:covered-table-cell table:number-columns-repeated="2" table:style-name="ce35"/>
          <table:table-cell table:style-name="ce35" office:value-type="string" ns42:value-type="string" table:number-columns-spanned="3" table:number-rows-spanned="1">
            <text:p>PROFIT / BOX</text:p>
          </table:table-cell>
          <table:covered-table-cell table:number-columns-repeated="2" table:style-name="ce35"/>
          <table:table-cell table:style-name="ce35" office:value-type="string" ns42:value-type="string" table:number-columns-spanned="3" table:number-rows-spanned="1">
            <text:p>ABOVE MINIMUM</text:p>
          </table:table-cell>
          <table:covered-table-cell table:number-columns-repeated="2" table:style-name="ce35"/>
          <table:table-cell table:style-name="ce35" office:value-type="string" ns42:value-type="string" table:number-columns-spanned="3" table:number-rows-spanned="1">
            <text:p>QUANTITY</text:p>
          </table:table-cell>
          <table:covered-table-cell table:number-columns-repeated="2" table:style-name="ce35"/>
          <table:table-cell table:style-name="ce35" office:value-type="string" ns42:value-type="string" table:number-columns-spanned="3" table:number-rows-spanned="1">
            <text:p>DECISION STATE</text:p>
          </table:table-cell>
          <table:covered-table-cell table:number-columns-repeated="2" table:style-name="ce35"/>
        </table:table-row>
        <table:table-row table:style-name="ro12">
          <table:table-cell table:style-name="ce36" office:value-type="string" ns42:value-type="string" table:number-columns-spanned="3" table:number-rows-spanned="1">
            <text:p>$185.00 · DEMO</text:p>
          </table:table-cell>
          <table:covered-table-cell table:number-columns-repeated="2" table:style-name="ce32"/>
          <table:table-cell table:style-name="ce36" office:value-type="string" ns42:value-type="string" table:number-columns-spanned="3" table:number-rows-spanned="1">
            <text:p>$160.49 · DEMO</text:p>
          </table:table-cell>
          <table:covered-table-cell table:number-columns-repeated="2" table:style-name="ce32"/>
          <table:table-cell table:style-name="ce36" office:value-type="string" ns42:value-type="string" table:number-columns-spanned="3" table:number-rows-spanned="1">
            <text:p>$111.50 · DEMO</text:p>
          </table:table-cell>
          <table:covered-table-cell table:number-columns-repeated="2" table:style-name="ce32"/>
          <table:table-cell table:style-name="ce36" office:value-type="string" ns42:value-type="string" table:number-columns-spanned="3" table:number-rows-spanned="1">
            <text:p>+$13.26 · DEMO</text:p>
          </table:table-cell>
          <table:covered-table-cell table:number-columns-repeated="2" table:style-name="ce32"/>
          <table:table-cell table:style-name="ce28" office:value-type="string" ns42:value-type="string" table:number-columns-spanned="3" table:number-rows-spanned="1">
            <text:p>2</text:p>
          </table:table-cell>
          <table:covered-table-cell table:number-columns-repeated="2" table:style-name="ce32"/>
          <table:table-cell table:style-name="ce12" office:value-type="string" ns42:value-type="string" table:number-columns-spanned="3" table:number-rows-spanned="1">
            <text:p>READY TO SELL · DEMO</text:p>
          </table:table-cell>
          <table:covered-table-cell table:number-columns-repeated="2" table:style-name="ce12"/>
        </table:table-row>
        <table:table-row table:style-name="ro16">
          <table:table-cell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7">
          <table:table-cell table:style-name="ce34"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ns42:value-type="string" table:number-columns-spanned="4" table:number-rows-spanned="1">
            <text:p>PRICE CONDITION</text:p>
          </table:table-cell>
          <table:covered-table-cell table:number-columns-repeated="3" table:style-name="ce12"/>
          <table:table-cell table:style-name="ce12" office:value-type="string" ns42:value-type="string" table:number-columns-spanned="4" table:number-rows-spanned="1">
            <text:p>PROFIT SIGNAL</text:p>
          </table:table-cell>
          <table:covered-table-cell table:number-columns-repeated="3" table:style-name="ce12"/>
          <table:table-cell table:style-name="ce12" office:value-type="string" ns42:value-type="string" table:number-columns-spanned="4" table:number-rows-spanned="1">
            <text:p>MARKETDEX ACTION</text:p>
          </table:table-cell>
          <table:covered-table-cell table:number-columns-repeated="3" table:style-name="ce12"/>
          <table:table-cell table:style-name="ce12" office:value-type="string" ns42: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ns42:value-type="string" table:number-columns-spanned="4" table:number-rows-spanned="1">
            <text:p>BELOW $171.74 · DEMO</text:p>
          </table:table-cell>
          <table:covered-table-cell table:number-columns-repeated="3" table:style-name="ce27"/>
          <table:table-cell table:style-name="ce42" office:value-type="string" ns42:value-type="string" table:number-columns-spanned="4" table:number-rows-spanned="1">
            <text:p>TARGET NOT MET</text:p>
          </table:table-cell>
          <table:covered-table-cell table:number-columns-repeated="3" table:style-name="ce42"/>
          <table:table-cell table:style-name="ce36" office:value-type="string" ns42:value-type="string" table:number-columns-spanned="4" table:number-rows-spanned="1">
            <text:p>HOLD</text:p>
          </table:table-cell>
          <table:covered-table-cell table:number-columns-repeated="3" table:style-name="ce32"/>
          <table:table-cell table:style-name="ce13" office:value-type="string" ns42: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ns42:value-type="string" table:number-columns-spanned="4" table:number-rows-spanned="1">
            <text:p>$171.74–$184.99 · DEMO</text:p>
          </table:table-cell>
          <table:covered-table-cell table:number-columns-repeated="3" table:style-name="ce27"/>
          <table:table-cell table:style-name="ce27" office:value-type="string" ns42:value-type="string" table:number-columns-spanned="4" table:number-rows-spanned="1">
            <text:p>TARGET MET</text:p>
          </table:table-cell>
          <table:covered-table-cell table:number-columns-repeated="3" table:style-name="ce27"/>
          <table:table-cell table:style-name="ce8" office:value-type="string" ns42:value-type="string" table:number-columns-spanned="4" table:number-rows-spanned="1">
            <text:p>READY TO SELL</text:p>
          </table:table-cell>
          <table:covered-table-cell table:number-columns-repeated="3" table:style-name="ce8"/>
          <table:table-cell table:style-name="ce13" office:value-type="string" ns42: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ns42:value-type="string" table:number-columns-spanned="4" table:number-rows-spanned="1">
            <text:p>$185.00+ · DEMO</text:p>
          </table:table-cell>
          <table:covered-table-cell table:number-columns-repeated="3" table:style-name="ce27"/>
          <table:table-cell table:style-name="ce44" office:value-type="string" ns42:value-type="string" table:number-columns-spanned="4" table:number-rows-spanned="1">
            <text:p>TARGET EXCEEDED</text:p>
          </table:table-cell>
          <table:covered-table-cell table:number-columns-repeated="3" table:style-name="ce44"/>
          <table:table-cell table:style-name="ce8" office:value-type="string" ns42:value-type="string" table:number-columns-spanned="4" table:number-rows-spanned="1">
            <text:p>SELL OPPORTUNITY</text:p>
          </table:table-cell>
          <table:covered-table-cell table:number-columns-repeated="3" table:style-name="ce8"/>
          <table:table-cell table:style-name="ce13" office:value-type="string" ns42: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ns42:value-type="string" table:number-columns-spanned="6" table:number-rows-spanned="1">
            <text:p>CURRENT DEMO MARKET CONTEXT</text:p>
          </table:table-cell>
          <table:covered-table-cell table:number-columns-repeated="5" table:style-name="ce29"/>
          <table:table-cell table:style-name="ce29" office:value-type="string" ns42:value-type="string" table:number-columns-spanned="6" table:number-rows-spanned="1">
            <text:p>CURRENT DEMO LISTING CONTEXT</text:p>
          </table:table-cell>
          <table:covered-table-cell table:number-columns-repeated="5" table:style-name="ce29"/>
          <table:table-cell table:style-name="ce29" office:value-type="string" ns42: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ns42:value-type="string" table:number-columns-spanned="6" table:number-rows-spanned="1">
            <text:p>$175.00 · READY TO SELL</text:p>
          </table:table-cell>
          <table:covered-table-cell table:number-columns-repeated="5" table:style-name="ce32"/>
          <table:table-cell table:style-name="ce36" office:value-type="string" ns42:value-type="string" table:number-columns-spanned="6" table:number-rows-spanned="1">
            <text:p>$185.00 · SELL OPPORTUNITY</text:p>
          </table:table-cell>
          <table:covered-table-cell table:number-columns-repeated="5" table:style-name="ce32"/>
          <table:table-cell table:style-name="ce12" office:value-type="string" ns42:value-type="string" table:number-columns-spanned="6" table:number-rows-spanned="1">
            <text:p>TARGET CLEARED · ACTION VISIBLE</text:p>
          </table:table-cell>
          <table:covered-table-cell table:number-columns-repeated="5" table:style-name="ce12"/>
        </table:table-row>
        <table:table-row table:style-name="ro16">
          <table:table-cell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ns42:value-type="string" table:number-columns-spanned="3" table:number-rows-spanned="1">
            <text:p>PROFIT SIGNAL</text:p>
          </table:table-cell>
          <table:covered-table-cell table:number-columns-repeated="2" table:style-name="ce12"/>
          <table:table-cell table:style-name="ce12" office:value-type="string" ns42:value-type="string" table:number-columns-spanned="3" table:number-rows-spanned="1">
            <text:p>DAYS HELD</text:p>
          </table:table-cell>
          <table:covered-table-cell table:number-columns-repeated="2" table:style-name="ce12"/>
          <table:table-cell table:style-name="ce12" office:value-type="string" ns42:value-type="string" table:number-columns-spanned="3" table:number-rows-spanned="1">
            <text:p>LISTING READINESS</text:p>
          </table:table-cell>
          <table:covered-table-cell table:number-columns-repeated="2" table:style-name="ce12"/>
          <table:table-cell table:style-name="ce12" office:value-type="string" ns42:value-type="string" table:number-columns-spanned="3" table:number-rows-spanned="1">
            <text:p>REVIEW TIMING</text:p>
          </table:table-cell>
          <table:covered-table-cell table:number-columns-repeated="2" table:style-name="ce12"/>
          <table:table-cell table:style-name="ce12" office:value-type="string" ns42:value-type="string" table:number-columns-spanned="3" table:number-rows-spanned="1">
            <text:p>PRIORITY</text:p>
          </table:table-cell>
          <table:covered-table-cell table:number-columns-repeated="2" table:style-name="ce12"/>
          <table:table-cell table:style-name="ce12" office:value-type="string" ns42:value-type="string" table:number-columns-spanned="3" table:number-rows-spanned="1">
            <text:p>ACTION FOCUS</text:p>
          </table:table-cell>
          <table:covered-table-cell table:number-columns-repeated="2" table:style-name="ce12"/>
        </table:table-row>
        <table:table-row table:style-name="ro12">
          <table:table-cell table:style-name="ce27" office:value-type="string" ns42:value-type="string" table:number-columns-spanned="3" table:number-rows-spanned="1">
            <text:p>SELL OPPORTUNITY · DEMO</text:p>
          </table:table-cell>
          <table:covered-table-cell table:number-columns-repeated="2" table:style-name="ce27"/>
          <table:table-cell table:style-name="ce36" office:value-type="string" ns42:value-type="string" table:number-columns-spanned="3" table:number-rows-spanned="1">
            <text:p>10 DAYS</text:p>
          </table:table-cell>
          <table:covered-table-cell table:number-columns-repeated="2" table:style-name="ce32"/>
          <table:table-cell table:style-name="ce42" office:value-type="string" ns42:value-type="string" table:number-columns-spanned="3" table:number-rows-spanned="1">
            <text:p>PREPARATION NEEDED</text:p>
          </table:table-cell>
          <table:covered-table-cell table:number-columns-repeated="2" table:style-name="ce42"/>
          <table:table-cell table:style-name="ce27" office:value-type="string" ns42:value-type="string" table:number-columns-spanned="3" table:number-rows-spanned="1">
            <text:p>EARLY DEC 2026</text:p>
          </table:table-cell>
          <table:covered-table-cell table:number-columns-repeated="2" table:style-name="ce27"/>
          <table:table-cell table:style-name="ce8" office:value-type="string" ns42:value-type="string" table:number-columns-spanned="3" table:number-rows-spanned="1">
            <text:p>NORMAL · DEMO</text:p>
          </table:table-cell>
          <table:covered-table-cell table:number-columns-repeated="2" table:style-name="ce8"/>
          <table:table-cell table:style-name="ce27" office:value-type="string" ns42: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ns42:value-type="string" table:number-columns-spanned="6" table:number-rows-spanned="1">
            <text:p>PRIORITY RULE</text:p>
          </table:table-cell>
          <table:covered-table-cell table:number-columns-repeated="5" table:style-name="ce29"/>
          <table:table-cell table:style-name="ce29" office:value-type="string" ns42:value-type="string" table:number-columns-spanned="6" table:number-rows-spanned="1">
            <text:p>WHY NORMAL?</text:p>
          </table:table-cell>
          <table:covered-table-cell table:number-columns-repeated="5" table:style-name="ce29"/>
          <table:table-cell table:style-name="ce29" office:value-type="string" ns42:value-type="string" table:number-columns-spanned="6" table:number-rows-spanned="1">
            <text:p>WHAT WOULD MAKE IT HIGH?</text:p>
          </table:table-cell>
          <table:covered-table-cell table:number-columns-repeated="5" table:style-name="ce29"/>
        </table:table-row>
        <table:table-row table:style-name="ro16">
          <table:table-cell office:value-type="string" ns42:value-type="string" table:number-columns-spanned="6" table:number-rows-spanned="1">
            <text:p>Profit signal + inventory age + listing readiness + planned review timing</text:p>
          </table:table-cell>
          <table:covered-table-cell table:number-columns-repeated="5"/>
          <table:table-cell table:style-name="ce13"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table:style-name="ce13"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ns42:value-type="string" table:number-columns-spanned="4" table:number-rows-spanned="1">
            <text:p>LOW</text:p>
          </table:table-cell>
          <table:covered-table-cell table:number-columns-repeated="3" table:style-name="ce37"/>
          <table:table-cell table:style-name="ce8" office:value-type="string" ns42:value-type="string" table:number-columns-spanned="4" table:number-rows-spanned="1">
            <text:p>NORMAL</text:p>
          </table:table-cell>
          <table:covered-table-cell table:number-columns-repeated="3" table:style-name="ce8"/>
          <table:table-cell table:style-name="ce48" office:value-type="string" ns42:value-type="string" table:number-columns-spanned="4" table:number-rows-spanned="1">
            <text:p>HIGH</text:p>
          </table:table-cell>
          <table:covered-table-cell table:number-columns-repeated="3" table:style-name="ce48"/>
          <table:table-cell table:style-name="ce8" office:value-type="string" ns42: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ns42:value-type="string" table:number-columns-spanned="4" table:number-rows-spanned="1">
            <text:p>No meaningful sell attention needed.</text:p>
          </table:table-cell>
          <table:covered-table-cell table:number-columns-repeated="3" table:style-name="ce13"/>
          <table:table-cell table:style-name="ce13" office:value-type="string" ns42: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ns42:value-type="string" table:number-columns-spanned="4" table:number-rows-spanned="1">
            <text:p>Needs near-term seller attention.</text:p>
          </table:table-cell>
          <table:covered-table-cell table:number-columns-repeated="3"/>
          <table:table-cell table:style-name="ce13" office:value-type="string" ns42: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ns42: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ns42:value-type="string" table:number-columns-spanned="4" table:number-rows-spanned="1">
            <text:p>READINESS FACTOR</text:p>
          </table:table-cell>
          <table:covered-table-cell table:number-columns-repeated="3" table:style-name="ce37"/>
          <table:table-cell table:style-name="ce8" office:value-type="string" ns42:value-type="string" table:number-columns-spanned="4" table:number-rows-spanned="1">
            <text:p>FACTOR STATUS</text:p>
          </table:table-cell>
          <table:covered-table-cell table:number-columns-repeated="3" table:style-name="ce8"/>
          <table:table-cell table:style-name="ce48" office:value-type="string" ns42:value-type="string" table:number-columns-spanned="4" table:number-rows-spanned="1">
            <text:p>CURRENT EVIDENCE</text:p>
          </table:table-cell>
          <table:covered-table-cell table:number-columns-repeated="3" table:style-name="ce48"/>
          <table:table-cell table:style-name="ce8" office:value-type="string" ns42:value-type="string" table:number-columns-spanned="6" table:number-rows-spanned="1">
            <text:p>BLOCKER / MEANING</text:p>
          </table:table-cell>
          <table:covered-table-cell table:number-columns-repeated="5" table:style-name="ce8"/>
        </table:table-row>
        <table:table-row table:style-name="ro5">
          <table:table-cell table:style-name="ce13" office:value-type="string" ns42:value-type="string" table:number-columns-spanned="4" table:number-rows-spanned="1">
            <text:p>PRODUCT MATCH</text:p>
          </table:table-cell>
          <table:covered-table-cell table:number-columns-repeated="3" table:style-name="ce13"/>
          <table:table-cell table:style-name="ce13" office:value-type="string" ns42:value-type="string" table:number-columns-spanned="4" table:number-rows-spanned="1">
            <text:p>COMPLETE</text:p>
          </table:table-cell>
          <table:covered-table-cell table:number-columns-repeated="2" table:style-name="ce13"/>
          <table:covered-table-cell/>
          <table:table-cell table:style-name="ce13" office:value-type="string" ns42:value-type="string" table:number-columns-spanned="4" table:number-rows-spanned="1">
            <text:p>Promoted position identified</text:p>
          </table:table-cell>
          <table:covered-table-cell table:number-columns-repeated="3"/>
          <table:table-cell table:style-name="ce13" office:value-type="string" ns42:value-type="string" table:number-columns-spanned="6" table:number-rows-spanned="1">
            <text:p>No blocker in this demo state.</text:p>
          </table:table-cell>
          <table:covered-table-cell table:number-columns-repeated="5"/>
        </table:table-row>
        <table:table-row table:style-name="ro5">
          <table:table-cell table:style-name="ce13" office:value-type="string" ns42:value-type="string" table:number-columns-spanned="4" table:number-rows-spanned="1">
            <text:p>QUANTITY VERIFICATION</text:p>
          </table:table-cell>
          <table:covered-table-cell table:number-columns-repeated="3" table:style-name="ce13"/>
          <table:table-cell table:style-name="ce13" office:value-type="string" ns42:value-type="string" table:number-columns-spanned="4" table:number-rows-spanned="1">
            <text:p>COMPLETE</text:p>
          </table:table-cell>
          <table:covered-table-cell table:number-columns-repeated="2" table:style-name="ce13"/>
          <table:covered-table-cell/>
          <table:table-cell table:style-name="ce13" office:value-type="string" ns42:value-type="string" table:number-columns-spanned="4" table:number-rows-spanned="1">
            <text:p>Promoted quantity: 2</text:p>
          </table:table-cell>
          <table:covered-table-cell table:number-columns-repeated="3"/>
          <table:table-cell table:style-name="ce13" office:value-type="string" ns42:value-type="string" table:number-columns-spanned="6" table:number-rows-spanned="1">
            <text:p>No blocker in this demo state.</text:p>
          </table:table-cell>
          <table:covered-table-cell table:number-columns-repeated="5"/>
        </table:table-row>
        <table:table-row table:style-name="ro5">
          <table:table-cell table:style-name="ce13" office:value-type="string" ns42:value-type="string" table:number-columns-spanned="4" table:number-rows-spanned="1">
            <text:p>CONDITION</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No condition evidence</text:p>
          </table:table-cell>
          <table:covered-table-cell table:number-columns-repeated="3"/>
          <table:table-cell table:style-name="ce13" office:value-type="string" ns42:value-type="string" table:number-columns-spanned="6" table:number-rows-spanned="1">
            <text:p>Condition review is still required.</text:p>
          </table:table-cell>
          <table:covered-table-cell table:number-columns-repeated="5"/>
        </table:table-row>
        <table:table-row table:style-name="ro5">
          <table:table-cell table:style-name="ce13" office:value-type="string" ns42:value-type="string" table:number-columns-spanned="4" table:number-rows-spanned="1">
            <text:p>PHOTOS</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No photo-ready evidence</text:p>
          </table:table-cell>
          <table:covered-table-cell table:number-columns-repeated="3"/>
          <table:table-cell table:style-name="ce13" office:value-type="string" ns42:value-type="string" table:number-columns-spanned="6" table:number-rows-spanned="1">
            <text:p>Product photos must be prepared.</text:p>
          </table:table-cell>
          <table:covered-table-cell table:number-columns-repeated="5"/>
        </table:table-row>
        <table:table-row table:style-name="ro5">
          <table:table-cell table:style-name="ce13" office:value-type="string" ns42:value-type="string" table:number-columns-spanned="4" table:number-rows-spanned="1">
            <text:p>LISTING CONTENT</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No listing draft evidence</text:p>
          </table:table-cell>
          <table:covered-table-cell table:number-columns-repeated="3"/>
          <table:table-cell table:style-name="ce13" office:value-type="string" ns42: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ns42:value-type="string" table:number-columns-spanned="4" table:number-rows-spanned="1">
            <text:p>PRICE DECISION</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Only fictional price tests exist</text:p>
          </table:table-cell>
          <table:covered-table-cell table:number-columns-repeated="3"/>
          <table:table-cell table:style-name="ce13" office:value-type="string" ns42: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ns42:value-type="string" table:number-columns-spanned="4" table:number-rows-spanned="1">
            <text:p>PLATFORM</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eBay is test context only</text:p>
          </table:table-cell>
          <table:covered-table-cell table:number-columns-repeated="3"/>
          <table:table-cell table:style-name="ce13" office:value-type="string" ns42: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ns42:value-type="string" table:number-columns-spanned="4" table:number-rows-spanned="1">
            <text:p>SHIPPING REVIEW</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No reviewed shipping path</text:p>
          </table:table-cell>
          <table:covered-table-cell table:number-columns-repeated="3"/>
          <table:table-cell table:style-name="ce13" office:value-type="string" ns42:value-type="string" table:number-columns-spanned="6" table:number-rows-spanned="1">
            <text:p>Review packaging and shipping path.</text:p>
          </table:table-cell>
          <table:covered-table-cell table:number-columns-repeated="5"/>
        </table:table-row>
        <table:table-row table:style-name="ro5">
          <table:table-cell table:style-name="ce13" office:value-type="string" ns42:value-type="string" table:number-columns-spanned="4" table:number-rows-spanned="1">
            <text:p>DATA-QUALITY CLEARANCE</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Clearance not performed</text:p>
          </table:table-cell>
          <table:covered-table-cell table:number-columns-repeated="3"/>
          <table:table-cell table:style-name="ce13" office:value-type="string" ns42: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ns42:value-type="string" table:number-columns-spanned="6" table:number-rows-spanned="1">
            <text:p>OVERALL LISTING READINESS</text:p>
          </table:table-cell>
          <table:covered-table-cell table:number-columns-repeated="5" table:style-name="ce29"/>
          <table:table-cell table:style-name="ce29" office:value-type="string" ns42:value-type="string" table:number-columns-spanned="6" table:number-rows-spanned="1">
            <text:p>VISIBLE BLOCKING REASONS</text:p>
          </table:table-cell>
          <table:covered-table-cell table:number-columns-repeated="5" table:style-name="ce29"/>
          <table:table-cell table:style-name="ce29" office:value-type="string" ns42: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ns42:value-type="string" table:number-columns-spanned="6" table:number-rows-spanned="1">
            <text:p>PREPARATION NEEDED</text:p>
          </table:table-cell>
          <table:covered-table-cell table:number-columns-repeated="5"/>
          <table:table-cell table:style-name="ce13" office:value-type="string" ns42: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table:style-name="ce13" office:value-type="string" ns42:value-type="string" table:number-columns-spanned="6" table:number-rows-spanned="1">
            <text:p>PREPARE PRODUCT PHOTOS · DEMO NEXT ACTION</text:p>
          </table:table-cell>
          <table:covered-table-cell table:number-columns-repeated="5"/>
        </table:table-row>
        <table:table-row table:style-name="ro19">
          <table:table-cell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37" office:value-type="string" ns42:value-type="string" table:number-columns-spanned="4" table:number-rows-spanned="1">
            <text:p>READY TO LIST</text:p>
          </table:table-cell>
          <table:covered-table-cell table:number-columns-repeated="3" table:style-name="ce37"/>
          <table:table-cell table:style-name="ce8" office:value-type="string" ns42:value-type="string" table:number-columns-spanned="4" table:number-rows-spanned="1">
            <text:p>PREPARATION NEEDED</text:p>
          </table:table-cell>
          <table:covered-table-cell table:number-columns-repeated="3" table:style-name="ce8"/>
          <table:table-cell table:style-name="ce48" office:value-type="string" ns42:value-type="string" table:number-columns-spanned="4" table:number-rows-spanned="1">
            <text:p>BLOCKED</text:p>
          </table:table-cell>
          <table:covered-table-cell table:number-columns-repeated="3" table:style-name="ce48"/>
          <table:table-cell table:style-name="ce8" office:value-type="string" ns42:value-type="string" table:number-columns-spanned="6" table:number-rows-spanned="1">
            <text:p>NOT EVALUATED</text:p>
          </table:table-cell>
          <table:covered-table-cell table:number-columns-repeated="5" table:style-name="ce8"/>
        </table:table-row>
        <table:table-row table:style-name="ro20">
          <table:table-cell table:style-name="ce34"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ns42: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BLOCKER AFFECTED</text:p>
          </table:table-cell>
          <table:covered-table-cell table:number-columns-repeated="3" table:style-name="ce48"/>
          <table:table-cell table:style-name="ce8" office:value-type="string" ns42: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ns42:value-type="string" table:number-columns-spanned="4" table:number-rows-spanned="1">
            <text:p>PREPARE PRODUCT PHOTOS</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HOTOS</text:p>
          </table:table-cell>
          <table:covered-table-cell table:number-columns-repeated="3"/>
          <table:table-cell table:style-name="ce13" office:value-type="string" ns42:value-type="string" table:number-columns-spanned="6" table:number-rows-spanned="1">
            <text:p>PHOTOS CLEARED · DEMO</text:p>
          </table:table-cell>
          <table:covered-table-cell table:number-columns-repeated="5"/>
        </table:table-row>
        <table:table-row table:style-name="ro5">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cell table:style-name="ce29" office:value-type="string" ns42:value-type="string" table:number-columns-spanned="6" table:number-rows-spanned="1">
            <text:p>PROTECTED BLOCKERS</text:p>
          </table:table-cell>
          <table:covered-table-cell table:number-columns-repeated="5" table:style-name="ce29"/>
        </table:table-row>
        <table:table-row table:style-name="ro20">
          <table:table-cell office:value-type="string" ns42:value-type="string" table:number-columns-spanned="6" table:number-rows-spanned="1">
            <text:p>PREPARATION NEEDED</text:p>
          </table:table-cell>
          <table:covered-table-cell table:number-columns-repeated="5"/>
          <table:table-cell table:style-name="ce13" office:value-type="string" ns42:value-type="string" table:number-columns-spanned="6" table:number-rows-spanned="1">
            <text:p>CONDITION</text:p>
          </table:table-cell>
          <table:covered-table-cell/>
          <table:covered-table-cell table:style-name="ce13"/>
          <table:covered-table-cell table:number-columns-repeated="3"/>
          <table:table-cell table:style-name="ce13"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CONDITION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PRODUCT COND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EALED · ACCEPTABLE FOR LISTING · DEMO</text:p>
          </table:table-cell>
          <table:covered-table-cell table:number-columns-repeated="3"/>
          <table:table-cell table:style-name="ce13" office:value-type="string" ns42:value-type="string" table:number-columns-spanned="6" table:number-rows-spanned="1">
            <text:p>CONDIT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CONDITION REVIEW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LISTING CONTENT</text:p>
          </table:table-cell>
          <table:covered-table-cell table:number-columns-repeated="5"/>
        </table:table-row>
        <table:table-row table:style-name="ro5">
          <table:table-cell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CONTENT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PREPARE LISTING CONTEN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TITLE + BASIC DESCRIPTION PREPARED · DEMO</text:p>
          </table:table-cell>
          <table:covered-table-cell table:number-columns-repeated="3"/>
          <table:table-cell table:style-name="ce13" office:value-type="string" ns42:value-type="string" table:number-columns-spanned="6" table:number-rows-spanned="1">
            <text:p>LISTING CONTENT</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LISTING CONTENT PREPAR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PRICE DECISION</text:p>
          </table:table-cell>
          <table:covered-table-cell table:number-columns-repeated="5"/>
        </table:table-row>
        <table:table-row table:style-name="ro5">
          <table:table-cell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REVIEWED PRICE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LISTING PRI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102.00 · REVIEWED FOR LISTING · DEMO</text:p>
          </table:table-cell>
          <table:covered-table-cell table:number-columns-repeated="3"/>
          <table:table-cell table:style-name="ce13" office:value-type="string" ns42:value-type="string" table:number-columns-spanned="6" table:number-rows-spanned="1">
            <text:p>PRICE DECIS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REVIEWED LISTING PRICE RECORD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PLATFORM</text:p>
          </table:table-cell>
          <table:covered-table-cell table:number-columns-repeated="5"/>
        </table:table-row>
        <table:table-row table:style-name="ro5">
          <table:table-cell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PLATFORM SELECTION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5">
          <table:table-cell table:style-name="ce13" office:value-type="string" ns42:value-type="string" table:number-columns-spanned="4" table:number-rows-spanned="1">
            <text:p>SELECT LISTING PLATFORM</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EBAY · SELECTED FOR LISTING · DEMO</text:p>
          </table:table-cell>
          <table:covered-table-cell table:number-columns-repeated="3"/>
          <table:table-cell table:style-name="ce13" office:value-type="string" ns42:value-type="string" table:number-columns-spanned="6" table:number-rows-spanned="1">
            <text:p>PLATFORM</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LISTING PLATFORM SELECT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SHIPPING REVIEW</text:p>
          </table:table-cell>
          <table:covered-table-cell table:number-columns-repeated="5"/>
        </table:table-row>
        <table:table-row table:style-name="ro5">
          <table:table-cell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HIPPING REVIEW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SHIPPING PATH</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CKAGING + SHIPPING PATH REVIEWED · DEMO</text:p>
          </table:table-cell>
          <table:covered-table-cell table:number-columns-repeated="3"/>
          <table:table-cell table:style-name="ce13" office:value-type="string" ns42:value-type="string" table:number-columns-spanned="6" table:number-rows-spanned="1">
            <text:p>SHIPPING REVIEW</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SHIPPING PATH REVIEW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DATA-QUALITY CLEARANCE</text:p>
          </table:table-cell>
          <table:covered-table-cell table:number-columns-repeated="5"/>
        </table:table-row>
        <table:table-row table:style-name="ro19">
          <table:table-cell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ATA-QUALITY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DATA QUALITY</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NO KNOWN UNRESOLVED DATA-QUALITY ISSUE · DEMO</text:p>
          </table:table-cell>
          <table:covered-table-cell table:number-columns-repeated="3"/>
          <table:table-cell table:style-name="ce13" office:value-type="string" ns42:value-type="string" table:number-columns-spanned="6" table:number-rows-spanned="1">
            <text:p>DATA-QUALITY CLEARA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FULL READINESS CROSS-CHECK</text:p>
          </table:table-cell>
          <table:covered-table-cell table:number-columns-repeated="5" table:style-name="ce29"/>
          <table:table-cell table:style-name="ce29" office:value-type="string" ns42:value-type="string" table:number-columns-spanned="6" table:number-rows-spanned="1">
            <text:p>READINESS AFTER CROSS-CHECK</text:p>
          </table:table-cell>
          <table:covered-table-cell table:number-columns-repeated="5" table:style-name="ce29"/>
        </table:table-row>
        <table:table-row table:style-name="ro5">
          <table:table-cell office:value-type="string" ns42:value-type="string" table:number-columns-spanned="6" table:number-rows-spanned="1">
            <text:p>DATA-QUALITY CLEARED · DEMO</text:p>
          </table:table-cell>
          <table:covered-table-cell table:number-columns-repeated="5"/>
          <table:table-cell table:style-name="ce13" office:value-type="string" ns42:value-type="string" table:number-columns-spanned="6" table:number-rows-spanned="1">
            <text:p>7 OF 7 LISTING READINESS FACTORS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READY TO LIST · DEMO</text:p>
          </table:table-cell>
          <table:covered-table-cell table:number-columns-repeated="5"/>
        </table:table-row>
        <table:table-row table:style-name="ro19">
          <table:table-cell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INTENT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CONFIRM LISTING INTEN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REPARE LISTING · DEMO</text:p>
          </table:table-cell>
          <table:covered-table-cell table:number-columns-repeated="3"/>
          <table:table-cell table:style-name="ce13" office:value-type="string" ns42:value-type="string" table:number-columns-spanned="6" table:number-rows-spanned="1">
            <text:p>NO PUBLICAT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BUSINESS STATE AFTER ACTION</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LISTING INTENT CONFIRMED · DEMO</text:p>
          </table:table-cell>
          <table:covered-table-cell table:number-columns-repeated="5"/>
          <table:table-cell table:style-name="ce13" office:value-type="string" ns42:value-type="string" table:number-columns-spanned="6" table:number-rows-spanned="1">
            <text:p>READY TO LIST · DEMO</text:p>
          </table:table-cell>
          <table:covered-table-cell/>
          <table:covered-table-cell table:style-name="ce13"/>
          <table:covered-table-cell table:number-columns-repeated="3"/>
          <table:table-cell table:style-name="ce13" office:value-type="string" ns42:value-type="string" table:number-columns-spanned="6" table:number-rows-spanned="1">
            <text:p>LISTING RECORD PREPARATION</text:p>
          </table:table-cell>
          <table:covered-table-cell table:number-columns-repeated="5"/>
        </table:table-row>
        <table:table-row table:style-name="ro5">
          <table:table-cell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RAFT RESULT</text:p>
          </table:table-cell>
          <table:covered-table-cell table:number-columns-repeated="3" table:style-name="ce48"/>
          <table:table-cell table:style-name="ce8" office:value-type="string" ns42: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ns42:value-type="string" table:number-columns-spanned="4" table:number-rows-spanned="1">
            <text:p>PREPARE LISTING RECORD</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LISTING RECORD DRAFT PREPARED · DEMO</text:p>
          </table:table-cell>
          <table:covered-table-cell table:number-columns-repeated="3"/>
          <table:table-cell table:style-name="ce13" office:value-type="string" ns42: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LISTING RECORD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LISTING DRAFT PREPARED · DEMO</text:p>
          </table:table-cell>
          <table:covered-table-cell table:number-columns-repeated="5"/>
          <table:table-cell table:style-name="ce13" office:value-type="string" ns42:value-type="string" table:number-columns-spanned="6" table:number-rows-spanned="1">
            <text:p>DRAFT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READINESS GATE</text:p>
          </table:table-cell>
          <table:covered-table-cell table:number-columns-repeated="5"/>
        </table:table-row>
        <table:table-row table:style-name="ro19">
          <table:table-cell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5">
          <table:table-cell table:style-name="ce13" office:value-type="string" ns42:value-type="string" table:number-columns-spanned="4" table:number-rows-spanned="1">
            <text:p>REVIEW PUBLICATION READINESS</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PUBLICATION · DEMO</text:p>
          </table:table-cell>
          <table:covered-table-cell table:number-columns-repeated="3"/>
          <table:table-cell table:style-name="ce13" office:value-type="string" ns42:value-type="string" table:number-columns-spanned="6" table:number-rows-spanned="1">
            <text:p>PUBLICATION READINESS</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UBLICATION STATE</text:p>
          </table:table-cell>
          <table:covered-table-cell table:number-columns-repeated="5" table:style-name="ce29"/>
          <table:table-cell table:style-name="ce29" office:value-type="string" ns42:value-type="string" table:number-columns-spanned="6" table:number-rows-spanned="1">
            <text:p>NEXT BUSINESS BOUNDARY</text:p>
          </table:table-cell>
          <table:covered-table-cell table:number-columns-repeated="5" table:style-name="ce29"/>
        </table:table-row>
        <table:table-row table:style-name="ro5">
          <table:table-cell office:value-type="string" ns42:value-type="string" table:number-columns-spanned="6" table:number-rows-spanned="1">
            <text:p>READY FOR PUBLICATION · DEMO</text:p>
          </table:table-cell>
          <table:covered-table-cell table:number-columns-repeated="5"/>
          <table:table-cell table:style-name="ce13" office:value-type="string" ns42:value-type="string" table:number-columns-spanned="6" table:number-rows-spanned="1">
            <text:p>NOT PUBLISHED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 MARKETPLACE EXPOSURE</text:p>
          </table:table-cell>
          <table:covered-table-cell table:number-columns-repeated="5"/>
        </table:table-row>
        <table:table-row table:style-name="ro5">
          <table:table-cell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AUTHORIZATION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19">
          <table:table-cell table:style-name="ce13" office:value-type="string" ns42:value-type="string" table:number-columns-spanned="4" table:number-rows-spanned="1">
            <text:p>AUTHORIZE PUBLICA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ELLER AUTHORIZED PUBLICATION · DEMO</text:p>
          </table:table-cell>
          <table:covered-table-cell table:number-columns-repeated="3"/>
          <table:table-cell table:style-name="ce13" office:value-type="string" ns42:value-type="string" table:number-columns-spanned="6" table:number-rows-spanned="1">
            <text:p>NOT YET PUBLISHED</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UBLICATION AUTHORITY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PUBLICATION AUTHORIZED · DEMO</text:p>
          </table:table-cell>
          <table:covered-table-cell table:number-columns-repeated="5"/>
          <table:table-cell table:style-name="ce13" office:value-type="string" ns42:value-type="string" table:number-columns-spanned="6" table:number-rows-spanned="1">
            <text:p>AUTHORIZED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RESULT EVIDENCE</text:p>
          </table:table-cell>
          <table:covered-table-cell table:number-columns-repeated="5"/>
        </table:table-row>
        <table:table-row table:style-name="ro5">
          <table:table-cell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PUBLICATION RESULT</text:p>
          </table:table-cell>
          <table:covered-table-cell table:number-columns-repeated="3" table:style-name="ce48"/>
          <table:table-cell table:style-name="ce8" office:value-type="string" ns42:value-type="string" table:number-columns-spanned="6" table:number-rows-spanned="1">
            <text:p>PLATFORM CONTEXT</text:p>
          </table:table-cell>
          <table:covered-table-cell table:number-columns-repeated="5" table:style-name="ce8"/>
        </table:table-row>
        <table:table-row table:style-name="ro5">
          <table:table-cell table:style-name="ce13" office:value-type="string" ns42:value-type="string" table:number-columns-spanned="4" table:number-rows-spanned="1">
            <text:p>RECORD PUBLICATION RESUL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UBLISHED · DEMO</text:p>
          </table:table-cell>
          <table:covered-table-cell table:number-columns-repeated="3"/>
          <table:table-cell table:style-name="ce13" office:value-type="string" ns42:value-type="string" table:number-columns-spanned="6" table:number-rows-spanned="1">
            <text:p>EBAY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EV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PUBLICATION EVENT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PLATFORM EXPOSURE REVIEW</text:p>
          </table:table-cell>
          <table:covered-table-cell table:number-columns-repeated="5"/>
        </table:table-row>
        <table:table-row table:style-name="ro5">
          <table:table-cell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EXPOSURE RESULT</text:p>
          </table:table-cell>
          <table:covered-table-cell table:number-columns-repeated="3" table:style-name="ce48"/>
          <table:table-cell table:style-name="ce8" office:value-type="string" ns42: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ns42:value-type="string" table:number-columns-spanned="4" table:number-rows-spanned="1">
            <text:p>REVIEW PLATFORM EXPOSUR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ACTIVE · DEMO</text:p>
          </table:table-cell>
          <table:covered-table-cell table:number-columns-repeated="3"/>
          <table:table-cell table:style-name="ce13" office:value-type="string" ns42:value-type="string" table:number-columns-spanned="6" table:number-rows-spanned="1">
            <text:p>PUBLISHED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LATFORM EXPOSURE STATE</text:p>
          </table:table-cell>
          <table:covered-table-cell table:number-columns-repeated="5" table:style-name="ce29"/>
          <table:table-cell table:style-name="ce29" office:value-type="string" ns42:value-type="string" table:number-columns-spanned="6" table:number-rows-spanned="1">
            <text:p>NEXT BUSINESS BOUNDARY</text:p>
          </table:table-cell>
          <table:covered-table-cell table:number-columns-repeated="5" table:style-name="ce29"/>
        </table:table-row>
        <table:table-row table:style-name="ro5">
          <table:table-cell office:value-type="string" ns42:value-type="string" table:number-columns-spanned="6" table:number-rows-spanned="1">
            <text:p>PLATFORM EXPOSURE ACTIVATED · DEMO</text:p>
          </table:table-cell>
          <table:covered-table-cell table:number-columns-repeated="5"/>
          <table:table-cell table:style-name="ce13" office:value-type="string" ns42:value-type="string" table:number-columns-spanned="6" table:number-rows-spanned="1">
            <text:p>ACTIVE · DEMO</text:p>
          </table:table-cell>
          <table:covered-table-cell/>
          <table:covered-table-cell table:style-name="ce13"/>
          <table:covered-table-cell table:number-columns-repeated="3"/>
          <table:table-cell table:style-name="ce13" office:value-type="string" ns42:value-type="string" table:number-columns-spanned="6" table:number-rows-spanned="1">
            <text:p>POST-PUBLICATION / SALE BOUNDARY</text:p>
          </table:table-cell>
          <table:covered-table-cell table:number-columns-repeated="5"/>
        </table:table-row>
        <table:table-row table:style-name="ro5">
          <table:table-cell office:value-type="string" ns42: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ALE OBSERVATION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SALE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ALE OBSERVED · DEMO</text:p>
          </table:table-cell>
          <table:covered-table-cell table:number-columns-repeated="3"/>
          <table:table-cell table:style-name="ce13" office:value-type="string" ns42:value-type="string" table:number-columns-spanned="6" table:number-rows-spanned="1">
            <text:p>ACTIVE EXPOSURE IS NOT A SAL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ALE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SALE EVIDENCE OBSERVED · DEMO</text:p>
          </table:table-cell>
          <table:covered-table-cell table:number-columns-repeated="5"/>
          <table:table-cell table:style-name="ce13" office:value-type="string" ns42:value-type="string" table:number-columns-spanned="6" table:number-rows-spanned="1">
            <text:p>FACTUAL OBSERVATION · DEMO</text:p>
          </table:table-cell>
          <table:covered-table-cell/>
          <table:covered-table-cell table:style-name="ce13"/>
          <table:covered-table-cell table:number-columns-repeated="3"/>
          <table:table-cell table:style-name="ce13" office:value-type="string" ns42:value-type="string" table:number-columns-spanned="6" table:number-rows-spanned="1">
            <text:p>SALE RELATIONSHIP RECORD</text:p>
          </table:table-cell>
          <table:covered-table-cell table:number-columns-repeated="5"/>
        </table:table-row>
        <table:table-row table:style-name="ro5">
          <table:table-cell office:value-type="string" ns42: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RELATIONSHIP RESULT</text:p>
          </table:table-cell>
          <table:covered-table-cell table:number-columns-repeated="3" table:style-name="ce48"/>
          <table:table-cell table:style-name="ce8" office:value-type="string" ns42: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ns42:value-type="string" table:number-columns-spanned="4" table:number-rows-spanned="1">
            <text:p>RECORD SALE RELATIONSHIP</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ALE RELATIONSHIP RECORDED · DEMO</text:p>
          </table:table-cell>
          <table:covered-table-cell table:number-columns-repeated="3"/>
          <table:table-cell table:style-name="ce13" office:value-type="string" ns42:value-type="string" table:number-columns-spanned="6" table:number-rows-spanned="1">
            <text:p>1 UNIT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ALE RELATIONSHIP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INVENTORY ↔ SALE RELATIONSHIP RECORDED · DEMO</text:p>
          </table:table-cell>
          <table:covered-table-cell table:number-columns-repeated="5"/>
          <table:table-cell table:style-name="ce13" office:value-type="string" ns42:value-type="string" table:number-columns-spanned="6" table:number-rows-spanned="1">
            <text:p>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OLD INVENTORY TRANSITION GATE</text:p>
          </table:table-cell>
          <table:covered-table-cell table:number-columns-repeated="5"/>
        </table:table-row>
        <table:table-row table:style-name="ro5">
          <table:table-cell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QUANTITY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SOLD TRANS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SOLD TRANSITION · DEMO</text:p>
          </table:table-cell>
          <table:covered-table-cell table:number-columns-repeated="3"/>
          <table:table-cell table:style-name="ce13" office:value-type="string" ns42:value-type="string" table:number-columns-spanned="6" table:number-rows-spanned="1">
            <text:p>1 UNIT SOLD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OLD INVENTORY STATE</text:p>
          </table:table-cell>
          <table:covered-table-cell table:number-columns-repeated="5" table:style-name="ce29"/>
          <table:table-cell table:style-name="ce29" office:value-type="string" ns42:value-type="string" table:number-columns-spanned="6" table:number-rows-spanned="1">
            <text:p>REMAINING INVENTORY RULE</text:p>
          </table:table-cell>
          <table:covered-table-cell table:number-columns-repeated="5" table:style-name="ce29"/>
        </table:table-row>
        <table:table-row table:style-name="ro20">
          <table:table-cell office:value-type="string" ns42:value-type="string" table:number-columns-spanned="6" table:number-rows-spanned="1">
            <text:p>SOLD TRANSITION SUPPORTED · DEMO</text:p>
          </table:table-cell>
          <table:covered-table-cell table:number-columns-repeated="5"/>
          <table:table-cell table:style-name="ce13" office:value-type="string" ns42:value-type="string" table:number-columns-spanned="6" table:number-rows-spanned="1">
            <text:p>SOLD · DEMO</text:p>
          </table:table-cell>
          <table:covered-table-cell/>
          <table:covered-table-cell table:style-name="ce13"/>
          <table:covered-table-cell table:number-columns-repeated="3"/>
          <table:table-cell table:style-name="ce13" office:value-type="string" ns42:value-type="string" table:number-columns-spanned="6" table:number-rows-spanned="1">
            <text:p>UNSOLD QUANTITY RETAINS CORRECT STATE</text:p>
          </table:table-cell>
          <table:covered-table-cell table:number-columns-repeated="5"/>
        </table:table-row>
        <table:table-row table:style-name="ro5">
          <table:table-cell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FULFILLMENT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FULFILLMENT PREPARA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CKAGING + SHIPMENT PATH REVIEWED · DEMO</text:p>
          </table:table-cell>
          <table:covered-table-cell table:number-columns-repeated="3"/>
          <table:table-cell table:style-name="ce13" office:value-type="string" ns42:value-type="string" table:number-columns-spanned="6" table:number-rows-spanned="1">
            <text:p>NOT YET SHIPPED</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FULFILLMENT PREPARATION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READY FOR SHIPMENT · DEMO</text:p>
          </table:table-cell>
          <table:covered-table-cell table:number-columns-repeated="5"/>
          <table:table-cell table:style-name="ce13" office:value-type="string" ns42:value-type="string" table:number-columns-spanned="6" table:number-rows-spanned="1">
            <text:p>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SHIPMENT EVENT EVIDENCE</text:p>
          </table:table-cell>
          <table:covered-table-cell table:number-columns-repeated="5"/>
        </table:table-row>
        <table:table-row table:style-name="ro5">
          <table:table-cell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HIPMENT RESULT</text:p>
          </table:table-cell>
          <table:covered-table-cell table:number-columns-repeated="3" table:style-name="ce48"/>
          <table:table-cell table:style-name="ce8" office:value-type="string" ns42:value-type="string" table:number-columns-spanned="6" table:number-rows-spanned="1">
            <text:p>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CORD SHIPMENT RESUL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HIPPED · DEMO</text:p>
          </table:table-cell>
          <table:covered-table-cell table:number-columns-repeated="3"/>
          <table:table-cell table:style-name="ce13" office:value-type="string" ns42:value-type="string" table:number-columns-spanned="6" table:number-rows-spanned="1">
            <text:p>FACTUAL SHIPMENT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HIPM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SHIPMENT EVENT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HIPPED INVENTORY TRANSITION GATE</text:p>
          </table:table-cell>
          <table:covered-table-cell table:number-columns-repeated="5"/>
        </table:table-row>
        <table:table-row table:style-name="ro5">
          <table:table-cell office:value-type="string" ns42: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QUANTITY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SHIPPED TRANS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SHIPPED TRANSITION · DEMO</text:p>
          </table:table-cell>
          <table:covered-table-cell table:number-columns-repeated="3"/>
          <table:table-cell table:style-name="ce13" office:value-type="string" ns42:value-type="string" table:number-columns-spanned="6" table:number-rows-spanned="1">
            <text:p>1 SOLD UNIT SHIPPED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HIPPED INVENTORY STAT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SHIPPED TRANSITION SUPPORTED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SALE + PLATFORM EXPOSURE PRESERVED</text:p>
          </table:table-cell>
          <table:covered-table-cell table:number-columns-repeated="5"/>
        </table:table-row>
        <table:table-row table:style-name="ro5">
          <table:table-cell office:value-type="string" ns42: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ELIVERY RESULT</text:p>
          </table:table-cell>
          <table:covered-table-cell table:number-columns-repeated="3" table:style-name="ce48"/>
          <table:table-cell table:style-name="ce8" office:value-type="string" ns42:value-type="string" table:number-columns-spanned="6" table:number-rows-spanned="1">
            <text:p>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VIEW DELIVERY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DELIVERED · DEMO</text:p>
          </table:table-cell>
          <table:covered-table-cell table:number-columns-repeated="3"/>
          <table:table-cell table:style-name="ce13" office:value-type="string" ns42:value-type="string" table:number-columns-spanned="6" table:number-rows-spanned="1">
            <text:p>FACTUAL DELIVERY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DELIVERY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DELIVERY EVENT OBSERV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ETTLEMENT / PAYOUT EVIDENCE</text:p>
          </table:table-cell>
          <table:covered-table-cell table:number-columns-repeated="5"/>
        </table:table-row>
        <table:table-row table:style-name="ro5">
          <table:table-cell office:value-type="string" ns42: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ETTLEMENT RESULT</text:p>
          </table:table-cell>
          <table:covered-table-cell table:number-columns-repeated="3" table:style-name="ce48"/>
          <table:table-cell table:style-name="ce8" office:value-type="string" ns42: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VIEW SETTLEMENT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ID OUT · DEMO</text:p>
          </table:table-cell>
          <table:covered-table-cell table:number-columns-repeated="3"/>
          <table:table-cell table:style-name="ce13" office:value-type="string" ns42:value-type="string" table:number-columns-spanned="6" table:number-rows-spanned="1">
            <text:p>FACTUAL SETTLEMENT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ETTLEM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PAYOUT EVIDENCE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LIFECYCLE COMPLETION GATE</text:p>
          </table:table-cell>
          <table:covered-table-cell table:number-columns-repeated="5"/>
        </table:table-row>
        <table:table-row table:style-name="ro5">
          <table:table-cell office:value-type="string" ns42: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LIFECYCLE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LIFECYCLE COMPLE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COMPLETION · DEMO</text:p>
          </table:table-cell>
          <table:covered-table-cell table:number-columns-repeated="3"/>
          <table:table-cell table:style-name="ce13" office:value-type="string" ns42:value-type="string" table:number-columns-spanned="6" table:number-rows-spanned="1">
            <text:p>COMPLETE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LIFECYCLE STAT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LIFECYCLE COMPLETION SUPPORTED · DEMO</text:p>
          </table:table-cell>
          <table:covered-table-cell table:number-columns-repeated="5"/>
          <table:table-cell table:style-name="ce13" office:value-type="string" ns42:value-type="string" table:number-columns-spanned="6" table:number-rows-spanned="1">
            <text:p>COMPLETE · DEMO</text:p>
          </table:table-cell>
          <table:covered-table-cell/>
          <table:covered-table-cell table:style-name="ce13"/>
          <table:covered-table-cell table:number-columns-repeated="3"/>
          <table:table-cell table:style-name="ce13" office:value-type="string" ns42: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OPERATOR RESPONSIBILITY</text:p>
          </table:table-cell>
          <table:covered-table-cell table:number-columns-repeated="3" table:style-name="ce37"/>
          <table:table-cell table:style-name="ce8" office:value-type="string" ns42:value-type="string" table:number-columns-spanned="4" table:number-rows-spanned="1">
            <text:p>SELECTION STATE</text:p>
          </table:table-cell>
          <table:covered-table-cell table:number-columns-repeated="3" table:style-name="ce8"/>
          <table:table-cell table:style-name="ce48" office:value-type="string" ns42:value-type="string" table:number-columns-spanned="4" table:number-rows-spanned="1">
            <text:p>SELECTED RECORD</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ELECT INVENTORY RECORD</text:p>
          </table:table-cell>
          <table:covered-table-cell table:number-columns-repeated="3" table:style-name="ce13"/>
          <table:table-cell table:style-name="ce13" office:value-type="string" ns42:value-type="string" table:number-columns-spanned="4" table:number-rows-spanned="1">
            <text:p>SELECTED · DEMO</text:p>
          </table:table-cell>
          <table:covered-table-cell table:number-columns-repeated="2" table:style-name="ce13"/>
          <table:covered-table-cell/>
          <table:table-cell table:style-name="ce13" office:value-type="string" ns42:value-type="string" table:number-columns-spanned="4" table:number-rows-spanned="1">
            <text:p>INVENTORY RECORD · DEMO</text:p>
          </table:table-cell>
          <table:covered-table-cell table:number-columns-repeated="3"/>
          <table:table-cell table:style-name="ce13" office:value-type="string" ns42:value-type="string" table:number-columns-spanned="6" table:number-rows-spanned="1">
            <text:p>ONE WORKING RECORD CONTEXT</text:p>
          </table:table-cell>
          <table:covered-table-cell table:number-columns-repeated="5"/>
        </table:table-row>
        <table:table-row table:style-name="ro5">
          <table:table-cell table:style-name="ce29" office:value-type="string" ns42:value-type="string" table:number-columns-spanned="6" table:number-rows-spanned="1">
            <text:p>RESULT AFTER SELECTION</text:p>
          </table:table-cell>
          <table:covered-table-cell table:number-columns-repeated="5" table:style-name="ce29"/>
          <table:table-cell table:style-name="ce29" office:value-type="string" ns42:value-type="string" table:number-columns-spanned="6" table:number-rows-spanned="1">
            <text:p>WORKING CONTEXT</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ECORD CONTEXT ESTABLISHED · DEMO</text:p>
          </table:table-cell>
          <table:covered-table-cell table:number-columns-repeated="5"/>
          <table:table-cell table:style-name="ce13" office:value-type="string" ns42:value-type="string" table:number-columns-spanned="6" table:number-rows-spanned="1">
            <text:p>ACTIVE · DEMO</text:p>
          </table:table-cell>
          <table:covered-table-cell/>
          <table:covered-table-cell table:style-name="ce13"/>
          <table:covered-table-cell table:number-columns-repeated="3"/>
          <table:table-cell table:style-name="ce13" office:value-type="string" ns42:value-type="string" table:number-columns-spanned="6" table:number-rows-spanned="1">
            <text:p>CURRENT LIFECYCLE STATE</text:p>
          </table:table-cell>
          <table:covered-table-cell table:number-columns-repeated="5"/>
        </table:table-row>
        <table:table-row table:style-name="ro5">
          <table:table-cell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RECORD</text:p>
          </table:table-cell>
          <table:covered-table-cell table:number-columns-repeated="3" table:style-name="ce37"/>
          <table:table-cell table:style-name="ce8" office:value-type="string" ns42:value-type="string" table:number-columns-spanned="4" table:number-rows-spanned="1">
            <text:p>SUPPORTED STATE</text:p>
          </table:table-cell>
          <table:covered-table-cell table:number-columns-repeated="3" table:style-name="ce8"/>
          <table:table-cell table:style-name="ce48" office:value-type="string" ns42:value-type="string" table:number-columns-spanned="4" table:number-rows-spanned="1">
            <text:p>STATE SOURC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SUPPORTED LIFECYCLE EVIDENCE</text:p>
          </table:table-cell>
          <table:covered-table-cell table:number-columns-repeated="3"/>
          <table:table-cell table:style-name="ce13" office:value-type="string" ns42:value-type="string" table:number-columns-spanned="6" table:number-rows-spanned="1">
            <text:p>READ-ORIENTED STATE</text:p>
          </table:table-cell>
          <table:covered-table-cell table:number-columns-repeated="5"/>
        </table:table-row>
        <table:table-row table:style-name="ro5">
          <table:table-cell table:style-name="ce29" office:value-type="string" ns42:value-type="string" table:number-columns-spanned="6" table:number-rows-spanned="1">
            <text:p>STATE SURFACE RESULT</text:p>
          </table:table-cell>
          <table:covered-table-cell table:number-columns-repeated="5" table:style-name="ce29"/>
          <table:table-cell table:style-name="ce29" office:value-type="string" ns42:value-type="string" table:number-columns-spanned="6" table:number-rows-spanned="1">
            <text:p>CURRENT BUSINESS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CURRENT STATE SHOWN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NEXT REQUIRED ACTION</text:p>
          </table:table-cell>
          <table:covered-table-cell table:number-columns-repeated="5"/>
        </table:table-row>
        <table:table-row table:style-name="ro5">
          <table:table-cell office:value-type="string" ns42: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STATE</text:p>
          </table:table-cell>
          <table:covered-table-cell table:number-columns-repeated="3" table:style-name="ce37"/>
          <table:table-cell table:style-name="ce8" office:value-type="string" ns42:value-type="string" table:number-columns-spanned="4" table:number-rows-spanned="1">
            <text:p>DERIVED NEXT ACTION</text:p>
          </table:table-cell>
          <table:covered-table-cell table:number-columns-repeated="3" table:style-name="ce8"/>
          <table:table-cell table:style-name="ce48" office:value-type="string" ns42:value-type="string" table:number-columns-spanned="4" table:number-rows-spanned="1">
            <text:p>ACTION BASIS</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DELIVERY EVIDENCE</text:p>
          </table:table-cell>
          <table:covered-table-cell table:number-columns-repeated="2" table:style-name="ce13"/>
          <table:covered-table-cell/>
          <table:table-cell table:style-name="ce13" office:value-type="string" ns42:value-type="string" table:number-columns-spanned="4" table:number-rows-spanned="1">
            <text:p>LOCKED LIFECYCLE CONTRACT</text:p>
          </table:table-cell>
          <table:covered-table-cell table:number-columns-repeated="3"/>
          <table:table-cell table:style-name="ce13" office:value-type="string" ns42:value-type="string" table:number-columns-spanned="6" table:number-rows-spanned="1">
            <text:p>GUIDANCE ONLY</text:p>
          </table:table-cell>
          <table:covered-table-cell table:number-columns-repeated="5"/>
        </table:table-row>
        <table:table-row table:style-name="ro5">
          <table:table-cell table:style-name="ce29" office:value-type="string" ns42:value-type="string" table:number-columns-spanned="6" table:number-rows-spanned="1">
            <text:p>ACTION SURFACE RESULT</text:p>
          </table:table-cell>
          <table:covered-table-cell table:number-columns-repeated="5" table:style-name="ce29"/>
          <table:table-cell table:style-name="ce29" office:value-type="string" ns42:value-type="string" table:number-columns-spanned="6" table:number-rows-spanned="1">
            <text:p>OPERATOR GUIDAN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NEXT ACTION SHOWN · DEMO</text:p>
          </table:table-cell>
          <table:covered-table-cell table:number-columns-repeated="5"/>
          <table:table-cell table:style-name="ce13" office:value-type="string" ns42:value-type="string" table:number-columns-spanned="6" table:number-rows-spanned="1">
            <text:p>REVIEW DELIVERY EVIDENCE</text:p>
          </table:table-cell>
          <table:covered-table-cell/>
          <table:covered-table-cell table:style-name="ce13"/>
          <table:covered-table-cell table:number-columns-repeated="3"/>
          <table:table-cell table:style-name="ce13" office:value-type="string" ns42:value-type="string" table:number-columns-spanned="6" table:number-rows-spanned="1">
            <text:p>ACTIVE BLOCKER</text:p>
          </table:table-cell>
          <table:covered-table-cell table:number-columns-repeated="5"/>
        </table:table-row>
        <table:table-row table:style-name="ro5">
          <table:table-cell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ACTION</text:p>
          </table:table-cell>
          <table:covered-table-cell table:number-columns-repeated="3" table:style-name="ce37"/>
          <table:table-cell table:style-name="ce8" office:value-type="string" ns42:value-type="string" table:number-columns-spanned="4" table:number-rows-spanned="1">
            <text:p>ACTIVE BLOCKER</text:p>
          </table:table-cell>
          <table:covered-table-cell table:number-columns-repeated="3" table:style-name="ce8"/>
          <table:table-cell table:style-name="ce48" office:value-type="string" ns42:value-type="string" table:number-columns-spanned="4" table:number-rows-spanned="1">
            <text:p>BLOCKER STAT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DELIVERY EVIDENCE</text:p>
          </table:table-cell>
          <table:covered-table-cell table:number-columns-repeated="3" table:style-name="ce13"/>
          <table:table-cell table:style-name="ce13" office:value-type="string" ns42:value-type="string" table:number-columns-spanned="4" table:number-rows-spanned="1">
            <text:p>DELIVERY EVIDENCE</text:p>
          </table:table-cell>
          <table:covered-table-cell table:number-columns-repeated="2" table:style-name="ce13"/>
          <table:covered-table-cell/>
          <table:table-cell table:style-name="ce13" office:value-type="string" ns42:value-type="string" table:number-columns-spanned="4" table:number-rows-spanned="1">
            <text:p>UNRESOLVED · DEMO</text:p>
          </table:table-cell>
          <table:covered-table-cell table:number-columns-repeated="3"/>
          <table:table-cell table:style-name="ce13" office:value-type="string" ns42:value-type="string" table:number-columns-spanned="6" table:number-rows-spanned="1">
            <text:p>ONE EXPLICIT BLOCKER</text:p>
          </table:table-cell>
          <table:covered-table-cell table:number-columns-repeated="5"/>
        </table:table-row>
        <table:table-row table:style-name="ro5">
          <table:table-cell table:style-name="ce29" office:value-type="string" ns42:value-type="string" table:number-columns-spanned="6" table:number-rows-spanned="1">
            <text:p>BLOCKER SURFACE RESULT</text:p>
          </table:table-cell>
          <table:covered-table-cell table:number-columns-repeated="5" table:style-name="ce29"/>
          <table:table-cell table:style-name="ce29" office:value-type="string" ns42:value-type="string" table:number-columns-spanned="6" table:number-rows-spanned="1">
            <text:p>ADVANCEMENT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BLOCKER EXPOSED · DEMO</text:p>
          </table:table-cell>
          <table:covered-table-cell table:number-columns-repeated="5"/>
          <table:table-cell table:style-name="ce13" office:value-type="string" ns42:value-type="string" table:number-columns-spanned="6" table:number-rows-spanned="1">
            <text:p>ADVANCEMENT BLOCKED · DEMO</text:p>
          </table:table-cell>
          <table:covered-table-cell/>
          <table:covered-table-cell table:style-name="ce13"/>
          <table:covered-table-cell table:number-columns-repeated="3"/>
          <table:table-cell table:style-name="ce13" office:value-type="string" ns42:value-type="string" table:number-columns-spanned="6" table:number-rows-spanned="1">
            <text:p>EVIDENCE NEEDED</text:p>
          </table:table-cell>
          <table:covered-table-cell table:number-columns-repeated="5"/>
        </table:table-row>
        <table:table-row table:style-name="ro5">
          <table:table-cell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ACTIVE BLOCKER</text:p>
          </table:table-cell>
          <table:covered-table-cell table:number-columns-repeated="3" table:style-name="ce37"/>
          <table:table-cell table:style-name="ce8" office:value-type="string" ns42:value-type="string" table:number-columns-spanned="4" table:number-rows-spanned="1">
            <text:p>EVIDENCE NEEDED</text:p>
          </table:table-cell>
          <table:covered-table-cell table:number-columns-repeated="3" table:style-name="ce8"/>
          <table:table-cell table:style-name="ce48" office:value-type="string" ns42:value-type="string" table:number-columns-spanned="4" table:number-rows-spanned="1">
            <text:p>EVIDENCE STANDARD</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DELIVERY EVIDENCE</text:p>
          </table:table-cell>
          <table:covered-table-cell table:number-columns-repeated="3" table:style-name="ce13"/>
          <table:table-cell table:style-name="ce13" office:value-type="string" ns42:value-type="string" table:number-columns-spanned="4" table:number-rows-spanned="1">
            <text:p>FACTUAL DELIVERY RESULT</text:p>
          </table:table-cell>
          <table:covered-table-cell table:number-columns-repeated="2" table:style-name="ce13"/>
          <table:covered-table-cell/>
          <table:table-cell table:style-name="ce13" office:value-type="string" ns42:value-type="string" table:number-columns-spanned="4" table:number-rows-spanned="1">
            <text:p>SUPPORTED FACT ONLY</text:p>
          </table:table-cell>
          <table:covered-table-cell table:number-columns-repeated="3"/>
          <table:table-cell table:style-name="ce13" office:value-type="string" ns42:value-type="string" table:number-columns-spanned="6" table:number-rows-spanned="1">
            <text:p>NO INVENTED FACTS</text:p>
          </table:table-cell>
          <table:covered-table-cell table:number-columns-repeated="5"/>
        </table:table-row>
        <table:table-row table:style-name="ro5">
          <table:table-cell table:style-name="ce29" office:value-type="string" ns42:value-type="string" table:number-columns-spanned="6" table:number-rows-spanned="1">
            <text:p>EVIDENCE SURFACE RESULT</text:p>
          </table:table-cell>
          <table:covered-table-cell table:number-columns-repeated="5" table:style-name="ce29"/>
          <table:table-cell table:style-name="ce29" office:value-type="string" ns42:value-type="string" table:number-columns-spanned="6" table:number-rows-spanned="1">
            <text:p>OPERATOR QUESTION</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EQUIRED EVIDENCE SHOWN · DEMO</text:p>
          </table:table-cell>
          <table:covered-table-cell table:number-columns-repeated="5"/>
          <table:table-cell table:style-name="ce13" office:value-type="string" ns42:value-type="string" table:number-columns-spanned="6" table:number-rows-spanned="1">
            <text:p>WHAT FACTUAL DELIVERY RESULT IS SUPPORTED?</text:p>
          </table:table-cell>
          <table:covered-table-cell/>
          <table:covered-table-cell table:style-name="ce13"/>
          <table:covered-table-cell table:number-columns-repeated="3"/>
          <table:table-cell table:style-name="ce13" office:value-type="string" ns42:value-type="string" table:number-columns-spanned="6" table:number-rows-spanned="1">
            <text:p>CONTROLLED OPERATOR INPUT</text:p>
          </table:table-cell>
          <table:covered-table-cell table:number-columns-repeated="5"/>
        </table:table-row>
        <table:table-row table:style-name="ro5">
          <table:table-cell office:value-type="string" ns42: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RESPONSIBILITY</text:p>
          </table:table-cell>
          <table:covered-table-cell table:number-columns-repeated="3" table:style-name="ce37"/>
          <table:table-cell table:style-name="ce8" office:value-type="string" ns42:value-type="string" table:number-columns-spanned="4" table:number-rows-spanned="1">
            <text:p>CONTROLLED INPUT</text:p>
          </table:table-cell>
          <table:covered-table-cell table:number-columns-repeated="3" table:style-name="ce8"/>
          <table:table-cell table:style-name="ce48" office:value-type="string" ns42:value-type="string" table:number-columns-spanned="4" table:number-rows-spanned="1">
            <text:p>DEMO ENTRY</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CORD SUPPORTED EVIDENCE</text:p>
          </table:table-cell>
          <table:covered-table-cell table:number-columns-repeated="3" table:style-name="ce13"/>
          <table:table-cell table:style-name="ce13" office:value-type="string" ns42: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ns42:value-type="string" table:number-columns-spanned="4" table:number-rows-spanned="1">
            <text:p>DELIVERED · DEMO</text:p>
          </table:table-cell>
          <table:covered-table-cell table:number-columns-repeated="3"/>
          <table:table-cell table:style-name="ce13" office:value-type="string" ns42:value-type="string" table:number-columns-spanned="6" table:number-rows-spanned="1">
            <text:p>CONTROLLED VOCABULARY</text:p>
          </table:table-cell>
          <table:covered-table-cell table:number-columns-repeated="5"/>
        </table:table-row>
        <table:table-row table:style-name="ro5">
          <table:table-cell table:style-name="ce29" office:value-type="string" ns42:value-type="string" table:number-columns-spanned="6" table:number-rows-spanned="1">
            <text:p>INPUT SURFACE RESULT</text:p>
          </table:table-cell>
          <table:covered-table-cell table:number-columns-repeated="5" table:style-name="ce29"/>
          <table:table-cell table:style-name="ce29" office:value-type="string" ns42:value-type="string" table:number-columns-spanned="6" table:number-rows-spanned="1">
            <text:p>RECORDED EVIDEN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OPERATOR EVIDENCE RECORDED · DEMO</text:p>
          </table:table-cell>
          <table:covered-table-cell table:number-columns-repeated="5"/>
          <table:table-cell table:style-name="ce13" office:value-type="string" ns42:value-type="string" table:number-columns-spanned="6" table:number-rows-spanned="1">
            <text:p>DELIVERED · DEMO</text:p>
          </table:table-cell>
          <table:covered-table-cell/>
          <table:covered-table-cell table:style-name="ce13"/>
          <table:covered-table-cell table:number-columns-repeated="3"/>
          <table:table-cell table:style-name="ce13" office:value-type="string" ns42:value-type="string" table:number-columns-spanned="6" table:number-rows-spanned="1">
            <text:p>EVIDENCE REVIEW RESULT</text:p>
          </table:table-cell>
          <table:covered-table-cell table:number-columns-repeated="5"/>
        </table:table-row>
        <table:table-row table:style-name="ro5">
          <table:table-cell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RECORDED EVIDENCE</text:p>
          </table:table-cell>
          <table:covered-table-cell table:number-columns-repeated="3" table:style-name="ce37"/>
          <table:table-cell table:style-name="ce8" office:value-type="string" ns42:value-type="string" table:number-columns-spanned="4" table:number-rows-spanned="1">
            <text:p>REVIEW RESULT</text:p>
          </table:table-cell>
          <table:covered-table-cell table:number-columns-repeated="3" table:style-name="ce8"/>
          <table:table-cell table:style-name="ce48" office:value-type="string" ns42:value-type="string" table:number-columns-spanned="4" table:number-rows-spanned="1">
            <text:p>CONTROLLED REVIEW STATES</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DELIVERED · DEMO</text:p>
          </table:table-cell>
          <table:covered-table-cell table:number-columns-repeated="3" table:style-name="ce13"/>
          <table:table-cell table:style-name="ce13" office:value-type="string" ns42:value-type="string" table:number-columns-spanned="4" table:number-rows-spanned="1">
            <text:p>SUPPORTED · DEMO</text:p>
          </table:table-cell>
          <table:covered-table-cell table:number-columns-repeated="2" table:style-name="ce13"/>
          <table:covered-table-cell/>
          <table:table-cell table:style-name="ce13" office:value-type="string" ns42:value-type="string" table:number-columns-spanned="4" table:number-rows-spanned="1">
            <text:p>SUPPORTED / UNSUPPORTED / PENDING REVIEW / UNKNOWN</text:p>
          </table:table-cell>
          <table:covered-table-cell table:number-columns-repeated="3"/>
          <table:table-cell table:style-name="ce13" office:value-type="string" ns42:value-type="string" table:number-columns-spanned="6" table:number-rows-spanned="1">
            <text:p>REVIEW BEFORE TRANSITION</text:p>
          </table:table-cell>
          <table:covered-table-cell table:number-columns-repeated="5"/>
        </table:table-row>
        <table:table-row table:style-name="ro5">
          <table:table-cell table:style-name="ce29" office:value-type="string" ns42:value-type="string" table:number-columns-spanned="6" table:number-rows-spanned="1">
            <text:p>REVIEW SURFACE RESULT</text:p>
          </table:table-cell>
          <table:covered-table-cell table:number-columns-repeated="5" table:style-name="ce29"/>
          <table:table-cell table:style-name="ce29" office:value-type="string" ns42:value-type="string" table:number-columns-spanned="6" table:number-rows-spanned="1">
            <text:p>EVIDENCE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EVIDENCE REVIEWED · DEMO</text:p>
          </table:table-cell>
          <table:covered-table-cell table:number-columns-repeated="5"/>
          <table:table-cell table:style-name="ce13" office:value-type="string" ns42:value-type="string" table:number-columns-spanned="6" table:number-rows-spanned="1">
            <text:p>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DERIVED TRANSITION PREVIEW</text:p>
          </table:table-cell>
          <table:covered-table-cell table:number-columns-repeated="5"/>
        </table:table-row>
        <table:table-row table:style-name="ro5">
          <table:table-cell office:value-type="string" ns42: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STATE</text:p>
          </table:table-cell>
          <table:covered-table-cell table:number-columns-repeated="3" table:style-name="ce37"/>
          <table:table-cell table:style-name="ce8" office:value-type="string" ns42:value-type="string" table:number-columns-spanned="4" table:number-rows-spanned="1">
            <text:p>SUPPORTED EVIDENCE</text:p>
          </table:table-cell>
          <table:covered-table-cell table:number-columns-repeated="3" table:style-name="ce8"/>
          <table:table-cell table:style-name="ce48" office:value-type="string" ns42:value-type="string" table:number-columns-spanned="4" table:number-rows-spanned="1">
            <text:p>TRANSITION PREVIEW</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DELIVERED · SUPPORTED · DEMO</text:p>
          </table:table-cell>
          <table:covered-table-cell table:number-columns-repeated="2" table:style-name="ce13"/>
          <table:covered-table-cell/>
          <table:table-cell table:style-name="ce13" office:value-type="string" ns42:value-type="string" table:number-columns-spanned="4" table:number-rows-spanned="1">
            <text:p>SHIPPED → DELIVERED · DEMO PREVIEW</text:p>
          </table:table-cell>
          <table:covered-table-cell table:number-columns-repeated="3"/>
          <table:table-cell table:style-name="ce13" office:value-type="string" ns42:value-type="string" table:number-columns-spanned="6" table:number-rows-spanned="1">
            <text:p>PREVIEW ONLY</text:p>
          </table:table-cell>
          <table:covered-table-cell table:number-columns-repeated="5"/>
        </table:table-row>
        <table:table-row table:style-name="ro5">
          <table:table-cell table:style-name="ce29" office:value-type="string" ns42:value-type="string" table:number-columns-spanned="6" table:number-rows-spanned="1">
            <text:p>PREVIEW SURFACE RESULT</text:p>
          </table:table-cell>
          <table:covered-table-cell table:number-columns-repeated="5" table:style-name="ce29"/>
          <table:table-cell table:style-name="ce29" office:value-type="string" ns42:value-type="string" table:number-columns-spanned="6" table:number-rows-spanned="1">
            <text:p>STATE CHANGE STATUS</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SUPPORTED TRANSITION SHOWN · DEMO</text:p>
          </table:table-cell>
          <table:covered-table-cell table:number-columns-repeated="5"/>
          <table:table-cell table:style-name="ce13" office:value-type="string" ns42:value-type="string" table:number-columns-spanned="6" table:number-rows-spanned="1">
            <text:p>NOT APPLIED · DEMO</text:p>
          </table:table-cell>
          <table:covered-table-cell/>
          <table:covered-table-cell table:style-name="ce13"/>
          <table:covered-table-cell table:number-columns-repeated="3"/>
          <table:table-cell table:style-name="ce13" office:value-type="string" ns42:value-type="string" table:number-columns-spanned="6" table:number-rows-spanned="1">
            <text:p>INVENTORY ACTION CENTER GATE</text:p>
          </table:table-cell>
          <table:covered-table-cell table:number-columns-repeated="5"/>
        </table:table-row>
        <table:table-row table:style-name="ro5">
          <table:table-cell office:value-type="string" ns42: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RECORD</text:p>
          </table:table-cell>
          <table:covered-table-cell table:number-columns-repeated="3" table:style-name="ce37"/>
          <table:table-cell table:style-name="ce8" office:value-type="string" ns42:value-type="string" table:number-columns-spanned="4" table:number-rows-spanned="1">
            <text:p>CURRENT STATE</text:p>
          </table:table-cell>
          <table:covered-table-cell table:number-columns-repeated="3" table:style-name="ce8"/>
          <table:table-cell table:style-name="ce48" office:value-type="string" ns42:value-type="string" table:number-columns-spanned="4" table:number-rows-spanned="1">
            <text:p>NEXT ACTION</text:p>
          </table:table-cell>
          <table:covered-table-cell table:number-columns-repeated="3" table:style-name="ce48"/>
          <table:table-cell table:style-name="ce8" office:value-type="string" ns42:value-type="string" table:number-columns-spanned="6" table:number-rows-spanned="1">
            <text:p>ACTIVE BLOCKER</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LIVERY EVIDENCE</text:p>
          </table:table-cell>
          <table:covered-table-cell table:number-columns-repeated="5"/>
        </table:table-row>
        <table:table-row table:style-name="ro5">
          <table:table-cell table:style-name="ce29" office:value-type="string" ns42:value-type="string" table:number-columns-spanned="6" table:number-rows-spanned="1">
            <text:p>EVIDENCE → REVIEW → PREVIEW</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OPERATING BOUNDARY</text:p>
          </table:table-cell>
          <table:covered-table-cell table:number-columns-repeated="5" table:style-name="ce29"/>
        </table:table-row>
        <table:table-row table:style-name="ro20">
          <table:table-cell office:value-type="string" ns42:value-type="string" table:number-columns-spanned="6" table:number-rows-spanned="1">
            <text:p>DELIVERED · DEMO → SUPPORTED · DEMO → SHIPPED → DELIVERED PREVIEW</text:p>
          </table:table-cell>
          <table:covered-table-cell table:number-columns-repeated="5"/>
          <table:table-cell table:style-name="ce13" office:value-type="string" ns42:value-type="string" table:number-columns-spanned="6" table:number-rows-spanned="1">
            <text:p>OPERATOR PATH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ROUTING INPUT</text:p>
          </table:table-cell>
          <table:covered-table-cell table:number-columns-repeated="3" table:style-name="ce37"/>
          <table:table-cell table:style-name="ce8" office:value-type="string" ns42:value-type="string" table:number-columns-spanned="4" table:number-rows-spanned="1">
            <text:p>ROUTING BASIS</text:p>
          </table:table-cell>
          <table:covered-table-cell table:number-columns-repeated="3" table:style-name="ce8"/>
          <table:table-cell table:style-name="ce48" office:value-type="string" ns42:value-type="string" table:number-columns-spanned="4" table:number-rows-spanned="1">
            <text:p>ROUTING OUTPU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UPPORTED CURRENT STATE</text:p>
          </table:table-cell>
          <table:covered-table-cell table:number-columns-repeated="3" table:style-name="ce13"/>
          <table:table-cell table:style-name="ce13" office:value-type="string" ns42:value-type="string" table:number-columns-spanned="4" table:number-rows-spanned="1">
            <text:p>LOCKED LIFECYCLE CONTRACT</text:p>
          </table:table-cell>
          <table:covered-table-cell table:number-columns-repeated="2" table:style-name="ce13"/>
          <table:covered-table-cell/>
          <table:table-cell table:style-name="ce13" office:value-type="string" ns42:value-type="string" table:number-columns-spanned="4" table:number-rows-spanned="1">
            <text:p>NEXT ACTION + BLOCKER + EVIDENCE</text:p>
          </table:table-cell>
          <table:covered-table-cell table:number-columns-repeated="3"/>
          <table:table-cell table:style-name="ce13" office:value-type="string" ns42:value-type="string" table:number-columns-spanned="6" table:number-rows-spanned="1">
            <text:p>NO STATE MUTATION</text:p>
          </table:table-cell>
          <table:covered-table-cell table:number-columns-repeated="5"/>
        </table:table-row>
        <table:table-row table:style-name="ro5">
          <table:table-cell table:style-name="ce29" office:value-type="string" ns42:value-type="string" table:number-columns-spanned="6" table:number-rows-spanned="1">
            <text:p>MAP RESULT</text:p>
          </table:table-cell>
          <table:covered-table-cell table:number-columns-repeated="5" table:style-name="ce29"/>
          <table:table-cell table:style-name="ce29" office:value-type="string" ns42:value-type="string" table:number-columns-spanned="6" table:number-rows-spanned="1">
            <text:p>CONTROLLED ROUTING STATES</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OUTING MAP ESTABLISHED · DEMO</text:p>
          </table:table-cell>
          <table:covered-table-cell table:number-columns-repeated="5"/>
          <table:table-cell table:style-name="ce13" office:value-type="string" ns42:value-type="string" table:number-columns-spanned="6" table:number-rows-spanned="1">
            <text:p>PREPARATION NEEDED → COMPLETE</text:p>
          </table:table-cell>
          <table:covered-table-cell/>
          <table:covered-table-cell table:style-name="ce13"/>
          <table:covered-table-cell table:number-columns-repeated="3"/>
          <table:table-cell table:style-name="ce13" office:value-type="string" ns42:value-type="string" table:number-columns-spanned="6" table:number-rows-spanned="1">
            <text:p>STATE-SPECIFIC ROUTING</text:p>
          </table:table-cell>
          <table:covered-table-cell table:number-columns-repeated="5"/>
        </table:table-row>
        <table:table-row table:style-name="ro5">
          <table:table-cell office:value-type="string" ns42: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PREPARATION NEEDED · DEMO</text:p>
          </table:table-cell>
          <table:covered-table-cell table:number-columns-repeated="3" table:style-name="ce13"/>
          <table:table-cell table:style-name="ce13" office:value-type="string" ns42: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ns42:value-type="string" table:number-columns-spanned="4" table:number-rows-spanned="1">
            <text:p>NEXT READINESS BLOCKER</text:p>
          </table:table-cell>
          <table:covered-table-cell table:number-columns-repeated="3"/>
          <table:table-cell table:style-name="ce13" office:value-type="string" ns42:value-type="string" table:number-columns-spanned="6" table:number-rows-spanned="1">
            <text:p>SUPPORTED PREPARATION EVIDENCE</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PREPARATION ADVANCEMENT PREVIEW · DEMO</text:p>
          </table:table-cell>
          <table:covered-table-cell table:number-columns-repeated="5"/>
        </table:table-row>
        <table:table-row table:style-name="ro5">
          <table:table-cell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READY TO LIST / READY FOR PUBLICATION · DEMO</text:p>
          </table:table-cell>
          <table:covered-table-cell table:number-columns-repeated="3" table:style-name="ce13"/>
          <table:table-cell table:style-name="ce13" office:value-type="string" ns42: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ns42:value-type="string" table:number-columns-spanned="4" table:number-rows-spanned="1">
            <text:p>LISTING RECORD / PUBLICATION AUTHORITY</text:p>
          </table:table-cell>
          <table:covered-table-cell table:number-columns-repeated="3"/>
          <table:table-cell table:style-name="ce13" office:value-type="string" ns42: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NEXT PUBLICATION RESPONSIBILITY PREVIEW · DEMO</text:p>
          </table:table-cell>
          <table:covered-table-cell table:number-columns-repeated="5"/>
        </table:table-row>
        <table:table-row table:style-name="ro5">
          <table:table-cell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PUBLISHED / ACTIVE PLATFORM EXPOSURE · DEMO</text:p>
          </table:table-cell>
          <table:covered-table-cell table:number-columns-repeated="3" table:style-name="ce13"/>
          <table:table-cell table:style-name="ce13" office:value-type="string" ns42:value-type="string" table:number-columns-spanned="4" table:number-rows-spanned="1">
            <text:p>REVIEW PLATFORM EXPOSURE / OBSERVE SALE</text:p>
          </table:table-cell>
          <table:covered-table-cell table:number-columns-repeated="2" table:style-name="ce13"/>
          <table:covered-table-cell/>
          <table:table-cell table:style-name="ce13" office:value-type="string" ns42:value-type="string" table:number-columns-spanned="4" table:number-rows-spanned="1">
            <text:p>SALE EVIDENCE</text:p>
          </table:table-cell>
          <table:covered-table-cell table:number-columns-repeated="3"/>
          <table:table-cell table:style-name="ce13" office:value-type="string" ns42: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SALE-RESPONSIBILITY PREVIEW · DEMO</text:p>
          </table:table-cell>
          <table:covered-table-cell table:number-columns-repeated="5"/>
        </table:table-row>
        <table:table-row table:style-name="ro5">
          <table:table-cell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SOLD · DEMO</text:p>
          </table:table-cell>
          <table:covered-table-cell table:number-columns-repeated="3" table:style-name="ce13"/>
          <table:table-cell table:style-name="ce13" office:value-type="string" ns42:value-type="string" table:number-columns-spanned="4" table:number-rows-spanned="1">
            <text:p>REVIEW FULFILLMENT PREPARATION</text:p>
          </table:table-cell>
          <table:covered-table-cell table:number-columns-repeated="2" table:style-name="ce13"/>
          <table:covered-table-cell/>
          <table:table-cell table:style-name="ce13" office:value-type="string" ns42:value-type="string" table:number-columns-spanned="4" table:number-rows-spanned="1">
            <text:p>FULFILLMENT PREPARATION</text:p>
          </table:table-cell>
          <table:covered-table-cell table:number-columns-repeated="3"/>
          <table:table-cell table:style-name="ce13" office:value-type="string" ns42: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READY FOR SHIPMENT PREVIEW · DEMO</text:p>
          </table:table-cell>
          <table:covered-table-cell table:number-columns-repeated="5"/>
        </table:table-row>
        <table:table-row table:style-name="ro5">
          <table:table-cell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READY FOR SHIPMENT / SHIPPED · DEMO</text:p>
          </table:table-cell>
          <table:covered-table-cell table:number-columns-repeated="3" table:style-name="ce13"/>
          <table:table-cell table:style-name="ce13" office:value-type="string" ns42: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ns42:value-type="string" table:number-columns-spanned="4" table:number-rows-spanned="1">
            <text:p>SHIPMENT OR DELIVERY EVIDENCE</text:p>
          </table:table-cell>
          <table:covered-table-cell table:number-columns-repeated="3"/>
          <table:table-cell table:style-name="ce13" office:value-type="string" ns42: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SHIPPED OR DELIVERED PREVIEW · DEMO</text:p>
          </table:table-cell>
          <table:covered-table-cell table:number-columns-repeated="5"/>
        </table:table-row>
        <table:table-row table:style-name="ro5">
          <table:table-cell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DELIVERED / PAID OUT · DEMO</text:p>
          </table:table-cell>
          <table:covered-table-cell table:number-columns-repeated="3" table:style-name="ce13"/>
          <table:table-cell table:style-name="ce13" office:value-type="string" ns42: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ns42:value-type="string" table:number-columns-spanned="4" table:number-rows-spanned="1">
            <text:p>SETTLEMENT OR COMPLETION CROSS-CHECK</text:p>
          </table:table-cell>
          <table:covered-table-cell table:number-columns-repeated="3"/>
          <table:table-cell table:style-name="ce13" office:value-type="string" ns42: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PAID OUT OR COMPLETE PREVIEW · DEMO</text:p>
          </table:table-cell>
          <table:covered-table-cell table:number-columns-repeated="5"/>
        </table:table-row>
        <table:table-row table:style-name="ro5">
          <table:table-cell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ACTIVE BLOCKER</text:p>
          </table:table-cell>
          <table:covered-table-cell table:number-columns-repeated="3" table:style-name="ce48"/>
          <table:table-cell table:style-name="ce8" office:value-type="string" ns42: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ns42:value-type="string" table:number-columns-spanned="4" table:number-rows-spanned="1">
            <text:p>COMPLETE · DEMO</text:p>
          </table:table-cell>
          <table:covered-table-cell table:number-columns-repeated="3" table:style-name="ce13"/>
          <table:table-cell table:style-name="ce13" office:value-type="string" ns42:value-type="string" table:number-columns-spanned="4" table:number-rows-spanned="1">
            <text:p>NO NEXT LIFECYCLE ACTION</text:p>
          </table:table-cell>
          <table:covered-table-cell table:number-columns-repeated="2" table:style-name="ce13"/>
          <table:covered-table-cell/>
          <table:table-cell table:style-name="ce13" office:value-type="string" ns42:value-type="string" table:number-columns-spanned="4" table:number-rows-spanned="1">
            <text:p>NONE · TERMINAL STATE</text:p>
          </table:table-cell>
          <table:covered-table-cell table:number-columns-repeated="3"/>
          <table:table-cell table:style-name="ce13" office:value-type="string" ns42:value-type="string" table:number-columns-spanned="6" table:number-rows-spanned="1">
            <text:p>NONE · TERMINAL STATE</text:p>
          </table:table-cell>
          <table:covered-table-cell table:number-columns-repeated="5"/>
        </table:table-row>
        <table:table-row table:style-name="ro5">
          <table:table-cell table:style-name="ce29" office:value-type="string" ns42:value-type="string" table:number-columns-spanned="6" table:number-rows-spanned="1">
            <text:p>TERMINAL ROUTE RESULT</text:p>
          </table:table-cell>
          <table:covered-table-cell table:number-columns-repeated="5" table:style-name="ce29"/>
          <table:table-cell table:style-name="ce29" office:value-type="string" ns42:value-type="string" table:number-columns-spanned="6" table:number-rows-spanned="1">
            <text:p>OPERATOR GUIDANC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COMPLETE ROUTE PROTECTED · DEMO</text:p>
          </table:table-cell>
          <table:covered-table-cell table:number-columns-repeated="5"/>
          <table:table-cell table:style-name="ce13" office:value-type="string" ns42:value-type="string" table:number-columns-spanned="6" table:number-rows-spanned="1">
            <text:p>LIFECYCLE COMPLETE · NO INVENTED NEXT ACTION</text:p>
          </table:table-cell>
          <table:covered-table-cell/>
          <table:covered-table-cell table:style-name="ce13"/>
          <table:covered-table-cell table:number-columns-repeated="3"/>
          <table:table-cell table:style-name="ce13" office:value-type="string" ns42:value-type="string" table:number-columns-spanned="6" table:number-rows-spanned="1">
            <text:p>ALL SUPPORTED HISTORY PRESERVED</text:p>
          </table:table-cell>
          <table:covered-table-cell table:number-columns-repeated="5"/>
        </table:table-row>
        <table:table-row table:style-name="ro5">
          <table:table-cell office:value-type="string" ns42: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RECORD</text:p>
          </table:table-cell>
          <table:covered-table-cell table:number-columns-repeated="3" table:style-name="ce37"/>
          <table:table-cell table:style-name="ce8" office:value-type="string" ns42:value-type="string" table:number-columns-spanned="4" table:number-rows-spanned="1">
            <text:p>SUPPORTED CURRENT STATE</text:p>
          </table:table-cell>
          <table:covered-table-cell table:number-columns-repeated="3" table:style-name="ce8"/>
          <table:table-cell table:style-name="ce48" office:value-type="string" ns42:value-type="string" table:number-columns-spanned="4" table:number-rows-spanned="1">
            <text:p>ROUTED OPERATOR PATH</text:p>
          </table:table-cell>
          <table:covered-table-cell table:number-columns-repeated="3" table:style-name="ce48"/>
          <table:table-cell table:style-name="ce8" office:value-type="string" ns42: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REVIEW DELIVERY EVIDENCE → DELIVERY EVIDENCE → FACTUAL DELIVERY RESULT</text:p>
          </table:table-cell>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table:style-name="ce29" office:value-type="string" ns42:value-type="string" table:number-columns-spanned="6" table:number-rows-spanned="1">
            <text:p>STATE-DRIVEN CROSS-CHECK</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TERMINAL PROTECTION</text:p>
          </table:table-cell>
          <table:covered-table-cell table:number-columns-repeated="5" table:style-name="ce29"/>
        </table:table-row>
        <table:table-row table:style-name="ro20">
          <table:table-cell office:value-type="string" ns42:value-type="string" table:number-columns-spanned="6" table:number-rows-spanned="1">
            <text:p>STATE → ACTION → BLOCKER → EVIDENCE → REVIEW → PREVIEW · SUPPORTED</text:p>
          </table:table-cell>
          <table:covered-table-cell table:number-columns-repeated="5"/>
          <table:table-cell table:style-name="ce13" office:value-type="string" ns42:value-type="string" table:number-columns-spanned="6" table:number-rows-spanned="1">
            <text:p>STATE-DRIVEN OPERATOR ROUTING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COMPLETE → NO INVENTED NEXT ACTION</text:p>
          </table:table-cell>
          <table:covered-table-cell table:number-columns-repeated="5"/>
        </table:table-row>
        <table:table-row table:style-name="ro5">
          <table:table-cell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RESPONSIBILITY</text:p>
          </table:table-cell>
          <table:covered-table-cell table:number-columns-repeated="3" table:style-name="ce37"/>
          <table:table-cell table:style-name="ce8" office:value-type="string" ns42:value-type="string" table:number-columns-spanned="4" table:number-rows-spanned="1">
            <text:p>CONTROLLED SELECTED STATE</text:p>
          </table:table-cell>
          <table:covered-table-cell table:number-columns-repeated="3" table:style-name="ce8"/>
          <table:table-cell table:style-name="ce48" office:value-type="string" ns42:value-type="string" table:number-columns-spanned="4" table:number-rows-spanned="1">
            <text:p>SOURCE ROL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ELECT CURRENT SUPPORTED STATE</text:p>
          </table:table-cell>
          <table:covered-table-cell table:number-columns-repeated="3" table:style-name="ce13"/>
          <table:table-cell table:style-name="ce13" table:content-validation-name="val1" office:value-type="string" ns42:value-type="string" table:number-columns-spanned="4" table:number-rows-spanned="1">
            <text:p>SHIPPED</text:p>
          </table:table-cell>
          <table:covered-table-cell table:number-columns-repeated="2" table:style-name="ce13"/>
          <table:covered-table-cell/>
          <table:table-cell table:style-name="ce13" office:value-type="string" ns42:value-type="string" table:number-columns-spanned="4" table:number-rows-spanned="1">
            <text:p>ACTION CENTER ROUTING SOURCE</text:p>
          </table:table-cell>
          <table:covered-table-cell table:number-columns-repeated="3"/>
          <table:table-cell table:style-name="ce13" office:value-type="string" ns42:value-type="string" table:number-columns-spanned="6" table:number-rows-spanned="1">
            <text:p>ONE CONTROLLED INPUT</text:p>
          </table:table-cell>
          <table:covered-table-cell table:number-columns-repeated="5"/>
        </table:table-row>
        <table:table-row table:style-name="ro5">
          <table:table-cell table:style-name="ce29" office:value-type="string" ns42:value-type="string" table:number-columns-spanned="6" table:number-rows-spanned="1">
            <text:p>INPUT RESULT</text:p>
          </table:table-cell>
          <table:covered-table-cell table:number-columns-repeated="5" table:style-name="ce29"/>
          <table:table-cell table:style-name="ce29" office:value-type="string" ns42:value-type="string" table:number-columns-spanned="6" table:number-rows-spanned="1">
            <text:p>SELECTED STATE SOUR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5">
          <table:table-cell office:value-type="string" ns42:value-type="string" table:number-columns-spanned="6" table:number-rows-spanned="1">
            <text:p>STATE INPUT RECORDED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STATE NORMALIZATION</text:p>
          </table:table-cell>
          <table:covered-table-cell table:number-columns-repeated="5"/>
        </table:table-row>
        <table:table-row table:style-name="ro5">
          <table:table-cell table:style-name="ce13" office:value-type="string" ns42: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OURCE INPUT</text:p>
          </table:table-cell>
          <table:covered-table-cell table:number-columns-repeated="3" table:style-name="ce37"/>
          <table:table-cell table:style-name="ce8" office:value-type="string" ns42:value-type="string" table:number-columns-spanned="4" table:number-rows-spanned="1">
            <text:p>NORMALIZATION RULE</text:p>
          </table:table-cell>
          <table:covered-table-cell table:number-columns-repeated="3" table:style-name="ce8"/>
          <table:table-cell table:style-name="ce48" office:value-type="string" ns42:value-type="string" table:number-columns-spanned="4" table:number-rows-spanned="1">
            <text:p>NORMALIZED STATE</text:p>
          </table:table-cell>
          <table:covered-table-cell table:number-columns-repeated="3" table:style-name="ce48"/>
          <table:table-cell table:style-name="ce8" office:value-type="string" ns42:value-type="string" table:number-columns-spanned="6" table:number-rows-spanned="1">
            <text:p>FAIL-SAFE</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TRIM + UPPERCASE + CONTROLLED MAP</text:p>
          </table:table-cell>
          <table:covered-table-cell table:number-columns-repeated="2" table:style-name="ce13"/>
          <table:covered-table-cell/>
          <table:table-cell table:style-name="ce13" office:value-type="string" ns42:value-type="string" table:number-columns-spanned="4" table:number-rows-spanned="1">
            <text:p>SHIPPED · DEMO</text:p>
          </table:table-cell>
          <table:covered-table-cell table:number-columns-repeated="3"/>
          <table:table-cell table:style-name="ce13" office:value-type="string" ns42:value-type="string" table:number-columns-spanned="6" table:number-rows-spanned="1">
            <text:p>UNMAPPED → REVIEW REQUIRED</text:p>
          </table:table-cell>
          <table:covered-table-cell table:number-columns-repeated="5"/>
        </table:table-row>
        <table:table-row table:style-name="ro5">
          <table:table-cell table:style-name="ce29" office:value-type="string" ns42:value-type="string" table:number-columns-spanned="6" table:number-rows-spanned="1">
            <text:p>NORMALIZATION RESULT</text:p>
          </table:table-cell>
          <table:covered-table-cell table:number-columns-repeated="5" table:style-name="ce29"/>
          <table:table-cell table:style-name="ce29" office:value-type="string" ns42:value-type="string" table:number-columns-spanned="6" table:number-rows-spanned="1">
            <text:p>FORMULA ROL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SHIPPED" ns42:value-type="string" table:number-columns-spanned="9" table:number-rows-spanned="1">
            <text:p>SHIPPED</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NEXT ACTION</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ns42: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ACTIVE BLOCKER</text:p>
          </table:table-cell>
          <table:covered-table-cell table:number-columns-repeated="2" table:style-name="ce13"/>
          <table:covered-table-cell/>
          <table:table-cell table:style-name="ce13" office:value-type="string" ns42:value-type="string" table:number-columns-spanned="4" table:number-rows-spanned="1">
            <text:p>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DELIVERY EVIDENCE" ns42:value-type="string" table:number-columns-spanned="9" table:number-rows-spanned="1">
            <text:p>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EVIDENCE NEEDED</text:p>
          </table:table-cell>
          <table:covered-table-cell table:number-columns-repeated="2" table:style-name="ce13"/>
          <table:covered-table-cell/>
          <table:table-cell table:style-name="ce13" office:value-type="string" ns42:value-type="string" table:number-columns-spanned="4" table:number-rows-spanned="1">
            <text:p>FACTUAL DELIVERY RESULT</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ns42:value-type="string" table:number-columns-spanned="9" table:number-rows-spanned="1">
            <text:p>FACTUAL DELIVERY RESULT</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RESPONSIBILITY</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ns42: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TRANSITION PREVIEW</text:p>
          </table:table-cell>
          <table:covered-table-cell table:number-columns-repeated="2" table:style-name="ce13"/>
          <table:covered-table-cell/>
          <table:table-cell table:style-name="ce13" office:value-type="string" ns42:value-type="string" table:number-columns-spanned="4" table:number-rows-spanned="1">
            <text:p>SHIPPED → DELIVERED · PREVIEW</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ns42:value-type="string" table:number-columns-spanned="9" table:number-rows-spanned="1">
            <text:p>SHIPPED → DELIVERED · PREVIEW</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CONDITION</text:p>
          </table:table-cell>
          <table:covered-table-cell table:number-columns-repeated="3" table:style-name="ce37"/>
          <table:table-cell table:style-name="ce8" office:value-type="string" ns42:value-type="string" table:number-columns-spanned="4" table:number-rows-spanned="1">
            <text:p>ROUTING RESULT</text:p>
          </table:table-cell>
          <table:covered-table-cell table:number-columns-repeated="3" table:style-name="ce8"/>
          <table:table-cell table:style-name="ce48" office:value-type="string" ns42:value-type="string" table:number-columns-spanned="4" table:number-rows-spanned="1">
            <text:p>OPERATOR GUIDANCE</text:p>
          </table:table-cell>
          <table:covered-table-cell table:number-columns-repeated="3" table:style-name="ce48"/>
          <table:table-cell table:style-name="ce8" office:value-type="string" ns42: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ns42:value-type="string" table:number-columns-spanned="4" table:number-rows-spanned="1">
            <text:p>BLANK / UNKNOWN / UNSUPPORTED / UNMAPPED</text:p>
          </table:table-cell>
          <table:covered-table-cell table:number-columns-repeated="3" table:style-name="ce13"/>
          <table:table-cell table:style-name="ce13" office:value-type="string" ns42:value-type="string" table:number-columns-spanned="4" table:number-rows-spanned="1">
            <text:p>REVIEW REQUIRED</text:p>
          </table:table-cell>
          <table:covered-table-cell table:number-columns-repeated="2" table:style-name="ce13"/>
          <table:covered-table-cell/>
          <table:table-cell table:style-name="ce13" office:value-type="string" ns42:value-type="string" table:number-columns-spanned="4" table:number-rows-spanned="1">
            <text:p>REVIEW SELECTED STATE</text:p>
          </table:table-cell>
          <table:covered-table-cell table:number-columns-repeated="3"/>
          <table:table-cell table:style-name="ce13" office:value-type="string" ns42:value-type="string" table:number-columns-spanned="6" table:number-rows-spanned="1">
            <text:p>NO TRANSITION PREVIEW</text:p>
          </table:table-cell>
          <table:covered-table-cell table:number-columns-repeated="5"/>
        </table:table-row>
        <table:table-row table:style-name="ro5">
          <table:table-cell table:style-name="ce29" office:value-type="string" ns42:value-type="string" table:number-columns-spanned="6" table:number-rows-spanned="1">
            <text:p>FAIL-CLOSED RESULT</text:p>
          </table:table-cell>
          <table:covered-table-cell table:number-columns-repeated="5" table:style-name="ce29"/>
          <table:table-cell table:style-name="ce29" office:value-type="string" ns42:value-type="string" table:number-columns-spanned="6" table:number-rows-spanned="1">
            <text:p>INVENTED ROUTE</text:p>
          </table:table-cell>
          <table:covered-table-cell table:number-columns-repeated="5" table:style-name="ce29"/>
          <table:table-cell table:style-name="ce29" office:value-type="string" ns42:value-type="string" table:number-columns-spanned="6" table:number-rows-spanned="1">
            <text:p>STATE MUTATION</text:p>
          </table:table-cell>
          <table:covered-table-cell table:number-columns-repeated="5" table:style-name="ce29"/>
        </table:table-row>
        <table:table-row table:style-name="ro5">
          <table:table-cell office:value-type="string" ns42:value-type="string" table:number-columns-spanned="6" table:number-rows-spanned="1">
            <text:p>SAFE REVIEW BOUNDARY · DEMO</text:p>
          </table:table-cell>
          <table:covered-table-cell table:number-columns-repeated="5"/>
          <table:table-cell table:style-name="ce13" office:value-type="string" ns42:value-type="string" table:number-columns-spanned="6" table:number-rows-spanned="1">
            <text:p>PROHIBITED</text:p>
          </table:table-cell>
          <table:covered-table-cell/>
          <table:covered-table-cell table:style-name="ce13"/>
          <table:covered-table-cell table:number-columns-repeated="3"/>
          <table:table-cell table:style-name="ce13" office:value-type="string" ns42:value-type="string" table:number-columns-spanned="6" table:number-rows-spanned="1">
            <text:p>PROHIBITED</text:p>
          </table:table-cell>
          <table:covered-table-cell table:number-columns-repeated="5"/>
        </table:table-row>
        <table:table-row table:style-name="ro5">
          <table:table-cell table:style-name="ce13"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ED NEXT ACTION</text:p>
          </table:table-cell>
          <table:covered-table-cell table:number-columns-repeated="3" table:style-name="ce8"/>
          <table:table-cell table:style-name="ce48" office:value-type="string" ns42:value-type="string" table:number-columns-spanned="4" table:number-rows-spanned="1">
            <text:p>DERIVED ACTIVE BLOCKER</text:p>
          </table:table-cell>
          <table:covered-table-cell table:number-columns-repeated="3" table:style-name="ce48"/>
          <table:table-cell table:style-name="ce8" office:value-type="string" ns42: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DELIVERY EVIDENCE</text:p>
          </table:table-cell>
          <table:covered-table-cell table:number-columns-repeated="2" table:style-name="ce13"/>
          <table:covered-table-cell/>
          <table:table-cell table:style-name="ce13" office:value-type="string" ns42:value-type="string" table:number-columns-spanned="4" table:number-rows-spanned="1">
            <text:p>DELIVERY EVIDENCE</text:p>
          </table:table-cell>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table:style-name="ce29" office:value-type="string" ns42:value-type="string" table:number-columns-spanned="6" table:number-rows-spanned="1">
            <text:p>DERIVED EVIDENCE + REVIEW + PREVIEW</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FAIL-CLOSED PROTECTION</text:p>
          </table:table-cell>
          <table:covered-table-cell table:number-columns-repeated="5" table:style-name="ce29"/>
        </table:table-row>
        <table:table-row table:style-name="ro5">
          <table:table-cell office:value-type="string" ns42:value-type="string" table:number-columns-spanned="6" table:number-rows-spanned="1">
            <text:p>FACTUAL DELIVERY RESULT → REVIEW DELIVERY EVIDENCE → SHIPPED → DELIVERED PREVIEW</text:p>
          </table:table-cell>
          <table:covered-table-cell table:number-columns-repeated="5"/>
          <table:table-cell table:style-name="ce13" office:value-type="string" ns42:value-type="string" table:number-columns-spanned="6" table:number-rows-spanned="1">
            <text:p>FORMULA-DRIVEN ROUTING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UNMAPPED → REVIEW REQUIRED</text:p>
          </table:table-cell>
          <table:covered-table-cell table:number-columns-repeated="5"/>
        </table:table-row>
        <table:table-row table:style-name="ro5">
          <table:table-cell table:style-name="ce13"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ns42:value-type="string" table:number-columns-spanned="3" table:number-rows-spanned="1">
            <text:p>TEST INPUT</text:p>
          </table:table-cell>
          <table:covered-table-cell table:number-columns-repeated="2" table:style-name="ce12"/>
          <table:table-cell table:style-name="ce12" office:value-type="string" ns42:value-type="string" table:number-columns-spanned="3" table:number-rows-spanned="1">
            <text:p>DERIVED NEXT ACTION</text:p>
          </table:table-cell>
          <table:covered-table-cell table:number-columns-repeated="2" table:style-name="ce12"/>
          <table:table-cell table:style-name="ce12" office:value-type="string" ns42:value-type="string" table:number-columns-spanned="3" table:number-rows-spanned="1">
            <text:p>DERIVED BLOCKER</text:p>
          </table:table-cell>
          <table:covered-table-cell table:number-columns-repeated="2" table:style-name="ce12"/>
          <table:table-cell table:style-name="ce12" office:value-type="string" ns42:value-type="string" table:number-columns-spanned="3" table:number-rows-spanned="1">
            <text:p>DERIVED EVIDENCE</text:p>
          </table:table-cell>
          <table:covered-table-cell table:number-columns-repeated="2" table:style-name="ce12"/>
          <table:table-cell table:style-name="ce12" office:value-type="string" ns42:value-type="string" table:number-columns-spanned="3" table:number-rows-spanned="1">
            <text:p>DERIVED REVIEW</text:p>
          </table:table-cell>
          <table:covered-table-cell table:number-columns-repeated="2" table:style-name="ce12"/>
          <table:table-cell table:style-name="ce12" office:value-type="string" ns42:value-type="string" table:number-columns-spanned="3" table:number-rows-spanned="1">
            <text:p>DERIVED PREVIEW</text:p>
          </table:table-cell>
          <table:covered-table-cell table:number-columns-repeated="2" table:style-name="ce12"/>
        </table:table-row>
        <table:table-row table:style-name="ro5">
          <table:table-cell table:style-name="ce13" office:value-type="string" ns42: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REVIEW REQUIRED" ns42: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UNMAPPED STATE" ns42: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STATE REVIEW" ns42:value-type="string" table:number-columns-spanned="3" table:number-rows-spanned="1">
            <text:p>SUPPORTED PREPARATION EVIDENCE</text:p>
          </table:table-cell>
          <table:covered-table-cell table:number-columns-repeated="2"/>
          <table:table-cell table:style-name="ce13"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SELECTED STATE" ns42: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NO TRANSITION PREVIEW" ns42:value-type="string" table:number-columns-spanned="3" table:number-rows-spanned="1">
            <text:p>PREPARATION ADVANCEMENT · PREVIEW</text:p>
          </table:table-cell>
          <table:covered-table-cell table:number-columns-repeated="2"/>
        </table:table-row>
        <table:table-row table:style-name="ro5">
          <table:table-cell table:style-name="ce13" office:value-type="string" ns42: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REVIEW REQUIRED" ns42: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UNMAPPED STATE" ns42: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STATE REVIEW" ns42:value-type="string" table:number-columns-spanned="3" table:number-rows-spanned="1">
            <text:p>SUPPORTED LISTING INTENT EVIDENCE</text:p>
          </table:table-cell>
          <table:covered-table-cell table:number-columns-repeated="2"/>
          <table:table-cell table:style-name="ce13"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SELECTED STATE" ns42: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NO TRANSITION PREVIEW" ns42: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ns42: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REQUIRED" ns42: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UNMAPPED STATE" ns42: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STATE REVIEW" ns42:value-type="string" table:number-columns-spanned="3" table:number-rows-spanned="1">
            <text:p>SUPPORTED PACKAGING + SHIPMENT PATH REVIEW</text:p>
          </table:table-cell>
          <table:covered-table-cell table:number-columns-repeated="2"/>
          <table:table-cell table:style-name="ce13"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SELECTED STATE" ns42: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NO TRANSITION PREVIEW" ns42:value-type="string" table:number-columns-spanned="3" table:number-rows-spanned="1">
            <text:p>SOLD → READY FOR SHIPMENT · PREVIEW</text:p>
          </table:table-cell>
          <table:covered-table-cell table:number-columns-repeated="2"/>
        </table:table-row>
        <table:table-row table:style-name="ro5">
          <table:table-cell table:style-name="ce13" office:value-type="string" ns42: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REQUIRED" ns42: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UNMAPPED STATE" ns42: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SUPPORTED STATE REVIEW" ns42:value-type="string" table:number-columns-spanned="3" table:number-rows-spanned="1">
            <text:p>FACTUAL DELIVERY RESULT</text:p>
          </table:table-cell>
          <table:covered-table-cell table:number-columns-repeated="2"/>
          <table:table-cell table:style-name="ce13"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SELECTED STATE" ns42: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NO TRANSITION PREVIEW" ns42:value-type="string" table:number-columns-spanned="3" table:number-rows-spanned="1">
            <text:p>SHIPPED → DELIVERED · PREVIEW</text:p>
          </table:table-cell>
          <table:covered-table-cell table:number-columns-repeated="2"/>
        </table:table-row>
        <table:table-row table:style-name="ro5">
          <table:table-cell table:style-name="ce13" office:value-type="string" ns42: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REQUIRED" ns42: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UNMAPPED STATE" ns42: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SUPPORTED STATE REVIEW" ns42:value-type="string" table:number-columns-spanned="3" table:number-rows-spanned="1">
            <text:p>FACTUAL SETTLEMENT EVIDENCE</text:p>
          </table:table-cell>
          <table:covered-table-cell table:number-columns-repeated="2"/>
          <table:table-cell table:style-name="ce13"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LECTED STATE" ns42: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NO TRANSITION PREVIEW" ns42:value-type="string" table:number-columns-spanned="3" table:number-rows-spanned="1">
            <text:p>DELIVERED → PAID OUT · PREVIEW</text:p>
          </table:table-cell>
          <table:covered-table-cell table:number-columns-repeated="2"/>
        </table:table-row>
        <table:table-row table:style-name="ro5">
          <table:table-cell table:style-name="ce13" office:value-type="string" ns42: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REQUIRED" ns42: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UNMAPPED STATE" ns42: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STATE REVIEW" ns42:value-type="string" table:number-columns-spanned="3" table:number-rows-spanned="1">
            <text:p>SUPPORTED COMPLETION FACTS</text:p>
          </table:table-cell>
          <table:covered-table-cell table:number-columns-repeated="2"/>
          <table:table-cell table:style-name="ce13"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SELECTED STATE" ns42: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NO TRANSITION PREVIEW" ns42:value-type="string" table:number-columns-spanned="3" table:number-rows-spanned="1">
            <text:p>PAID OUT → COMPLETE · PREVIEW</text:p>
          </table:table-cell>
          <table:covered-table-cell table:number-columns-repeated="2"/>
        </table:table-row>
        <table:table-row table:style-name="ro5">
          <table:table-cell table:style-name="ce13" office:value-type="string" ns42: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REVIEW REQUIRED" ns42: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UNMAPPED STATE" ns42: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SUPPORTED STATE REVIEW" ns42:value-type="string" table:number-columns-spanned="3" table:number-rows-spanned="1">
            <text:p>NONE · TERMINAL STATE</text:p>
          </table:table-cell>
          <table:covered-table-cell table:number-columns-repeated="2"/>
          <table:table-cell table:style-name="ce13"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REVIEW SELECTED STATE" ns42: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 TRANSITION PREVIEW" ns42:value-type="string" table:number-columns-spanned="3" table:number-rows-spanned="1">
            <text:p>NONE · TERMINAL STATE</text:p>
          </table:table-cell>
          <table:covered-table-cell table:number-columns-repeated="2"/>
        </table:table-row>
        <table:table-row table:style-name="ro5">
          <table:table-cell table:style-name="ce13" office:value-type="string" ns42: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ns42:value-type="string" table:number-columns-spanned="4" table:number-rows-spanned="1">
            <text:p>ONE OPERATOR SELECTION</text:p>
          </table:table-cell>
          <table:covered-table-cell table:number-columns-repeated="3" table:style-name="ce12"/>
          <table:table-cell table:style-name="ce12" office:value-type="string" ns42:value-type="string" table:number-columns-spanned="5" table:number-rows-spanned="1">
            <text:p>ACTION + BLOCKER + EVIDENCE + REVIEW + PREVIEW</text:p>
          </table:table-cell>
          <table:covered-table-cell table:number-columns-repeated="4" table:style-name="ce12"/>
          <table:table-cell table:style-name="ce12" office:value-type="string" ns42:value-type="string" table:number-columns-spanned="4" table:number-rows-spanned="1">
            <text:p>TERMINAL PROTECTION</text:p>
          </table:table-cell>
          <table:covered-table-cell table:number-columns-repeated="3" table:style-name="ce12"/>
          <table:table-cell table:style-name="ce12" office:value-type="string" ns42: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ns42:value-type="string" table:number-columns-spanned="4" table:number-rows-spanned="1">
            <text:p>CONTROLLED STATE LIST</text:p>
          </table:table-cell>
          <table:covered-table-cell table:number-columns-repeated="3" table:style-name="ce13"/>
          <table:table-cell table:style-name="ce13" office:value-type="string" ns42: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ns42:value-type="string" table:number-columns-spanned="4" table:number-rows-spanned="1">
            <text:p>COMPLETE → NO INVENTED NEXT ACTION</text:p>
          </table:table-cell>
          <table:covered-table-cell table:number-columns-repeated="2"/>
          <table:covered-table-cell table:style-name="ce13"/>
          <table:table-cell office:value-type="string" ns42:value-type="string" table:number-columns-spanned="5" table:number-rows-spanned="1">
            <text:p>INVALID / UNMAPPED → REVIEW REQUIRED</text:p>
          </table:table-cell>
          <table:covered-table-cell table:number-columns-repeated="4"/>
        </table:table-row>
        <table:table-row table:style-name="ro5">
          <table:table-cell table:style-name="ce13"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COLLECTION</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ATTENTION QUEUE</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CAPITAL DEPLOYMENT</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OPULATION INTELLIGENCE</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RODUCT CONTENT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LATFORM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MARKET CALENDAR</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RODUCT REGISTRY</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GRADING</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DECISION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DATA QUALITY</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1:21:05.7408487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date>2026-07-05T02:39:31.147613200</dc:date>
    <meta:editing-duration>PT4S</meta:editing-duration>
    <meta:editing-cycles>18</meta:editing-cycles>
    <meta:document-statistic meta:table-count="13" meta:cell-count="1436" meta:object-count="1"/>
    <meta:generator>ODFPY/1.4.1</meta:generator>
  </office:meta>
</office:document-meta>
</file>