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8"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Build481Column" style:family="table-column" style:display-name="Build481Column">
      <style:table-column-properties style:column-width="1.45in"/>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5" office:value-type="string" ns42:value-type="string" table:number-columns-spanned="6" table:number-rows-spanned="1">
            <text:p>📦 INVENTORY COMMAND CENTER</text:p>
          </table:table-cell>
          <table:covered-table-cell table:number-columns-repeated="5" table:style-name="ce75"/>
          <table:table-cell table:style-name="ce65" office:value-type="string" ns42:value-type="string" table:number-columns-spanned="3" table:number-rows-spanned="1">
            <text:p>OWNED INVENTORY</text:p>
            <text:p>Authoritative Summary</text:p>
          </table:table-cell>
          <table:covered-table-cell table:number-columns-repeated="2" table:style-name="ce65"/>
          <table:table-cell table:style-name="ce86" office:value-type="string" ns42:value-type="string" table:number-columns-spanned="3" table:number-rows-spanned="1">
            <text:p>LISTING READINESS</text:p>
            <text:p>Derived</text:p>
          </table:table-cell>
          <table:covered-table-cell table:number-columns-repeated="2" table:style-name="ce86"/>
          <table:table-cell table:style-name="ce88" office:value-type="string" ns42:value-type="string" table:number-columns-spanned="3" table:number-rows-spanned="1">
            <text:p>DATA TRUST</text:p>
            <text:p>Not Evaluated</text:p>
          </table:table-cell>
          <table:covered-table-cell table:number-columns-repeated="2" table:style-name="ce88"/>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3" office:value-type="string" ns42:value-type="string" table:number-columns-spanned="3" table:number-rows-spanned="1">
            <text:p>0</text:p>
          </table:table-cell>
          <table:covered-table-cell table:number-columns-repeated="2" table:style-name="ce83"/>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1" office:value-type="float" office:value="2" ns42:value-type="float" table:number-columns-spanned="2" table:number-rows-spanned="1">
            <text:p>2</text:p>
          </table:table-cell>
          <table:covered-table-cell table:style-name="ce59"/>
          <table:table-cell table:style-name="ce81"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6"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6"/>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7" office:value-type="string" ns42:value-type="string" table:number-columns-spanned="2" table:number-rows-spanned="1">
            <text:p>AVG UNIT COST</text:p>
          </table:table-cell>
          <table:covered-table-cell table:style-name="ce87"/>
          <table:table-cell table:style-name="ce53" office:value-type="string" ns42:value-type="string" table:number-columns-spanned="2" table:number-rows-spanned="1">
            <text:p>DAYS HELD</text:p>
          </table:table-cell>
          <table:covered-table-cell table:style-name="ce53"/>
          <table:table-cell table:style-name="ce87"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4"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4"/>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8" table:formula="of:=IF([.$P$24]=&quot;APPROVED FOR PROMOTION&quot;;&quot;OWNED&quot;;&quot;—&quot;)" office:value-type="string" office:string-value="OWNED" ns42:value-type="string" table:number-columns-spanned="2" table:number-rows-spanned="1">
            <text:p>OWNED</text:p>
          </table:table-cell>
          <table:covered-table-cell table:style-name="ce68"/>
          <table:table-cell table:style-name="ce68"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8"/>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7" office:value-type="string" ns42:value-type="string" table:number-columns-spanned="9" table:number-rows-spanned="1">
            <text:p>📦 INVENTORY COMPOSITION</text:p>
          </table:table-cell>
          <table:covered-table-cell table:number-columns-repeated="8" table:style-name="ce57"/>
          <table:table-cell table:style-name="ce63" office:value-type="string" ns42:value-type="string" table:number-columns-spanned="9" table:number-rows-spanned="1">
            <text:p>⚠ INVENTORY REVIEW GATE</text:p>
          </table:table-cell>
          <table:covered-table-cell table:number-columns-repeated="8" table:style-name="ce63"/>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5" office:value-type="string" ns42:value-type="string" table:number-columns-spanned="3" table:number-rows-spanned="1">
            <text:p>9</text:p>
          </table:table-cell>
          <table:covered-table-cell table:number-columns-repeated="2" table:style-name="ce85"/>
          <table:table-cell table:style-name="ce45" office:value-type="string" ns42:value-type="string" table:number-columns-spanned="3" table:number-rows-spanned="1">
            <text:p>APPROVE</text:p>
          </table:table-cell>
          <table:covered-table-cell table:number-columns-repeated="2" table:style-name="ce45"/>
          <table:table-cell table:style-name="ce76"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6"/>
        </table:table-row>
        <table:table-row table:style-name="ro12">
          <table:covered-table-cell table:number-columns-repeated="9" table:style-name="ce47"/>
          <table:table-cell table:style-name="ce71"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1"/>
        </table:table-row>
        <table:table-row table:style-name="ro13">
          <table:table-cell table:style-name="ce58"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8"/>
          <table:covered-table-cell table:style-name="ce58" office:value-type="string" ns42:value-type="string">
            <text:p>💰 COST LAYERS · PROTECTED</text:p>
          </table:covered-table-cell>
          <table:covered-table-cell table:number-columns-repeated="3" table:style-name="ce58"/>
          <table:covered-table-cell table:style-name="ce58" office:value-type="string" ns42:value-type="string">
            <text:p>📍 LOCATION HISTORY · PROTECTED</text:p>
          </table:covered-table-cell>
          <table:covered-table-cell table:number-columns-repeated="3" table:style-name="ce58"/>
          <table:covered-table-cell table:style-name="ce58" office:value-type="string" ns42:value-type="string">
            <text:p>🔨 TRANSFORMATIONS</text:p>
            <text:p>SEPARATE HISTORY</text:p>
          </table:covered-table-cell>
          <table:covered-table-cell table:number-columns-repeated="2" table:style-name="ce58"/>
          <table:covered-table-cell table:style-name="ce58" office:value-type="string" ns42:value-type="string">
            <text:p>🔍 RECONCILIATION</text:p>
            <text:p>EVENT-BASED</text:p>
          </table:covered-table-cell>
          <table:covered-table-cell table:number-columns-repeated="2" table:style-name="ce58"/>
        </table:table-row>
        <table:table-row table:style-name="ro8">
          <table:table-cell table:style-name="ce60" office:value-type="string" ns42:value-type="string" table:number-columns-spanned="18" table:number-rows-spanned="1">
            <text:p>📍 STORAGE POSITION ASSIGNMENT · CURRENT INVENTORY POSITION</text:p>
          </table:table-cell>
          <table:covered-table-cell table:number-columns-repeated="17" table:style-name="ce60"/>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6"/>
        </table:table-row>
        <table:table-row table:style-name="ro11">
          <table:table-cell table:style-name="ce62"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2"/>
        </table:table-row>
        <table:table-row table:style-name="ro5">
          <table:table-cell table:number-columns-repeated="18"/>
        </table:table-row>
        <table:table-row table:style-name="ro13">
          <table:table-cell table:style-name="ce63" office:value-type="string" ns42:value-type="string" table:number-columns-spanned="18" table:number-rows-spanned="1">
            <text:p>🚚 INVENTORY LOCATION MOVE · CONTROLLED MOVEMENT</text:p>
          </table:table-cell>
          <table:covered-table-cell table:number-columns-repeated="17" table:style-name="ce63"/>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office:value-type="string" ns42:value-type="string" table:number-columns-spanned="5" table:number-rows-spanned="1">
            <text:p>MOVE EXECUTED · QTY 2</text:p>
          </table:table-cell>
          <table:covered-table-cell table:number-columns-repeated="4" table:style-name="ce76"/>
        </table:table-row>
        <table:table-row table:style-name="ro12">
          <table:table-cell table:style-name="ce62"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2"/>
        </table:table-row>
        <table:table-row table:style-name="ro13">
          <table:table-cell table:number-columns-repeated="18"/>
        </table:table-row>
        <table:table-row table:style-name="ro13">
          <table:table-cell table:style-name="ce60" office:value-type="string" ns42:value-type="string" table:number-columns-spanned="18" table:number-rows-spanned="1">
            <text:p>📍 LOCATION HISTORY · RECORDED MOVE EVENT</text:p>
          </table:table-cell>
          <table:covered-table-cell table:number-columns-repeated="17" table:style-name="ce60"/>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4" office:value-type="string" ns42:value-type="string" table:number-columns-spanned="3" table:number-rows-spanned="1">
            <text:p>07-05-2026</text:p>
          </table:table-cell>
          <table:covered-table-cell table:number-columns-repeated="2" table:style-name="ce6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68" office:value-type="string" ns42:value-type="string" table:number-columns-spanned="3" table:number-rows-spanned="1">
            <text:p>Aquarium Stand</text:p>
          </table:table-cell>
          <table:covered-table-cell table:number-columns-repeated="2" table:style-name="ce68"/>
          <table:table-cell table:style-name="ce68" office:value-type="string" ns42:value-type="string" table:number-columns-spanned="5" table:number-rows-spanned="1">
            <text:p>COMPLETED · QTY 2</text:p>
          </table:table-cell>
          <table:covered-table-cell table:number-columns-repeated="4" table:style-name="ce68"/>
        </table:table-row>
        <table:table-row table:style-name="ro12">
          <table:table-cell table:style-name="ce62"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2"/>
        </table:table-row>
        <table:table-row table:style-name="ro5">
          <table:table-cell table:number-columns-repeated="18"/>
        </table:table-row>
        <table:table-row table:style-name="ro14">
          <table:table-cell table:style-name="ce60" office:value-type="string" ns42:value-type="string" table:number-columns-spanned="18" table:number-rows-spanned="1">
            <text:p>💰 HOLD REVIEW · PROFIT POTENTIAL</text:p>
          </table:table-cell>
          <table:covered-table-cell table:number-columns-repeated="17" table:style-name="ce60"/>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HORT-TERM HOLD</text:p>
          </table:table-cell>
          <table:covered-table-cell table:number-columns-repeated="2" table:style-name="ce68"/>
          <table:table-cell table:style-name="ce68" office:value-type="string" ns42:value-type="string" table:number-columns-spanned="3" table:number-rows-spanned="1">
            <text:p>EARLY DEC 2026</text:p>
          </table:table-cell>
          <table:covered-table-cell table:number-columns-repeated="2" table:style-name="ce68"/>
          <table:table-cell table:style-name="ce68" office:value-type="string" ns42:value-type="string" table:number-columns-spanned="3" table:number-rows-spanned="1">
            <text:p>PROFIT POTENTIAL</text:p>
          </table:table-cell>
          <table:covered-table-cell table:number-columns-repeated="2" table:style-name="ce68"/>
          <table:table-cell table:style-name="ce76" office:value-type="string" ns42:value-type="string" table:number-columns-spanned="5" table:number-rows-spanned="1">
            <text:p>PLANNED REVIEW</text:p>
          </table:table-cell>
          <table:covered-table-cell table:number-columns-repeated="4" table:style-name="ce76"/>
        </table:table-row>
        <table:table-row table:style-name="ro10">
          <table:table-cell table:style-name="ce62"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eBAY PROFIT TARGET · DECEMBER SELL REVIEW</text:p>
          </table:table-cell>
          <table:covered-table-cell table:number-columns-repeated="17" table:style-name="ce63"/>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2</text:p>
          </table:table-cell>
          <table:covered-table-cell table:number-columns-repeated="2" table:style-name="ce70"/>
          <table:table-cell table:style-name="ce70" office:value-type="string" ns42:value-type="string" table:number-columns-spanned="3" table:number-rows-spanned="1">
            <text:p>$200.00</text:p>
          </table:table-cell>
          <table:covered-table-cell table:number-columns-repeated="2" table:style-name="ce70"/>
          <table:table-cell table:style-name="ce80" office:value-type="string" ns42:value-type="string" table:number-columns-spanned="3" table:number-rows-spanned="1">
            <text:p>REVIEW REQUIRED</text:p>
          </table:table-cell>
          <table:covered-table-cell table:number-columns-repeated="2" table:style-name="ce80"/>
          <table:table-cell table:style-name="ce76" office:value-type="string" ns42:value-type="string" table:number-columns-spanned="3" table:number-rows-spanned="1">
            <text:p>PRICE TARGET PENDING</text:p>
          </table:table-cell>
          <table:covered-table-cell table:number-columns-repeated="2" table:style-name="ce76"/>
        </table:table-row>
        <table:table-row table:style-name="ro12">
          <table:table-cell table:style-name="ce65" office:value-type="string" ns42:value-type="string" table:number-columns-spanned="6" table:number-rows-spanned="1">
            <text:p>SELLER PROFILE</text:p>
          </table:table-cell>
          <table:covered-table-cell table:number-columns-repeated="5" table:style-name="ce65"/>
          <table:table-cell table:style-name="ce65" office:value-type="string" ns42:value-type="string" table:number-columns-spanned="6" table:number-rows-spanned="1">
            <text:p>TARGET DEFINITION</text:p>
          </table:table-cell>
          <table:covered-table-cell table:number-columns-repeated="5" table:style-name="ce65"/>
          <table:table-cell table:style-name="ce65" office:value-type="string" ns42:value-type="string" table:number-columns-spanned="6" table:number-rows-spanned="1">
            <text:p>FEE CONTROL</text:p>
          </table:table-cell>
          <table:covered-table-cell table:number-columns-repeated="5" table:style-name="ce65"/>
        </table:table-row>
        <table:table-row table:style-name="ro15">
          <table:table-cell table:style-name="ce62" office:value-type="string" ns42:value-type="string" table:number-columns-spanned="6" table:number-rows-spanned="1">
            <text:p>NO STORE SUBSCRIPTION · NO PROMOTED LISTINGS</text:p>
          </table:table-cell>
          <table:covered-table-cell table:number-columns-repeated="5" table:style-name="ce62"/>
          <table:table-cell table:style-name="ce62" office:value-type="string" ns42:value-type="string" table:number-columns-spanned="6" table:number-rows-spanned="1">
            <text:p>$100 PROFIT PER BOX AFTER eBAY MARKETPLACE FEES · SHIPPING AND PACKAGING EXCLUDED</text:p>
          </table:table-cell>
          <table:covered-table-cell table:number-columns-repeated="5" table:style-name="ce62"/>
          <table:table-cell table:style-name="ce71"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1"/>
        </table:table-row>
        <table:table-row table:style-name="ro10">
          <table:table-cell table:style-name="ce62"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DECEMBER SELL DECISION SIMULATOR · DEMO ASSUMPTIONS</text:p>
          </table:table-cell>
          <table:covered-table-cell table:number-columns-repeated="17" table:style-name="ce63"/>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8" office:value-type="string" ns42:value-type="string" table:number-columns-spanned="3" table:number-rows-spanned="1">
            <text:p>INDIVIDUALLY</text:p>
          </table:table-cell>
          <table:covered-table-cell table:number-columns-repeated="2" table:style-name="ce68"/>
          <table:table-cell table:style-name="ce76" office:value-type="string" ns42:value-type="string" table:number-columns-spanned="3" table:number-rows-spanned="1">
            <text:p>$175.00 · DEMO</text:p>
          </table:table-cell>
          <table:covered-table-cell table:number-columns-repeated="2" table:style-name="ce76"/>
          <table:table-cell table:style-name="ce76" office:value-type="string" ns42:value-type="string" table:number-columns-spanned="3" table:number-rows-spanned="1">
            <text:p>$185.00 · DEMO</text:p>
          </table:table-cell>
          <table:covered-table-cell table:number-columns-repeated="2" table:style-name="ce76"/>
          <table:table-cell table:style-name="ce80" office:value-type="string" ns42:value-type="string" table:number-columns-spanned="3" table:number-rows-spanned="1">
            <text:p>13.25% · DEMO</text:p>
          </table:table-cell>
          <table:covered-table-cell table:number-columns-repeated="2" table:style-name="ce80"/>
          <table:table-cell table:style-name="ce80" office:value-type="string" ns42:value-type="string" table:number-columns-spanned="3" table:number-rows-spanned="1">
            <text:p>BUYER PAYS · DEMO</text:p>
          </table:table-cell>
          <table:covered-table-cell table:number-columns-repeated="2" table:style-name="ce80"/>
          <table:table-cell table:style-name="ce76" office:value-type="string" ns42:value-type="string" table:number-columns-spanned="3" table:number-rows-spanned="1">
            <text:p>TESTING</text:p>
          </table:table-cell>
          <table:covered-table-cell table:number-columns-repeated="2" table:style-name="ce76"/>
        </table:table-row>
        <table:table-row table:style-name="ro12">
          <table:table-cell table:style-name="ce69" office:value-type="string" ns42:value-type="string" table:number-columns-spanned="3" table:number-rows-spanned="1">
            <text:p>AVG UNIT COST</text:p>
          </table:table-cell>
          <table:covered-table-cell table:number-columns-repeated="2" table:style-name="ce69"/>
          <table:table-cell table:style-name="ce69" office:value-type="string" ns42:value-type="string" table:number-columns-spanned="3" table:number-rows-spanned="1">
            <text:p>TARGET PROFIT / BOX</text:p>
          </table:table-cell>
          <table:covered-table-cell table:number-columns-repeated="2" table:style-name="ce69"/>
          <table:table-cell table:style-name="ce69" office:value-type="string" ns42:value-type="string" table:number-columns-spanned="3" table:number-rows-spanned="1">
            <text:p>REQUIRED NET / BOX</text:p>
          </table:table-cell>
          <table:covered-table-cell table:number-columns-repeated="2" table:style-name="ce69"/>
          <table:table-cell table:style-name="ce69" office:value-type="string" ns42:value-type="string" table:number-columns-spanned="3" table:number-rows-spanned="1">
            <text:p>DEMO NET @ LIST PRICE</text:p>
          </table:table-cell>
          <table:covered-table-cell table:number-columns-repeated="2" table:style-name="ce69"/>
          <table:table-cell table:style-name="ce69" office:value-type="string" ns42:value-type="string" table:number-columns-spanned="3" table:number-rows-spanned="1">
            <text:p>DEMO PROFIT / BOX</text:p>
          </table:table-cell>
          <table:covered-table-cell table:number-columns-repeated="2" table:style-name="ce69"/>
          <table:table-cell table:style-name="ce69" office:value-type="string" ns42:value-type="string" table:number-columns-spanned="3" table:number-rows-spanned="1">
            <text:p>TARGET RESULT</text:p>
          </table:table-cell>
          <table:covered-table-cell table:number-columns-repeated="2" table:style-name="ce69"/>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148.985</text:p>
          </table:table-cell>
          <table:covered-table-cell table:number-columns-repeated="2" table:style-name="ce70"/>
          <table:table-cell table:style-name="ce70" office:value-type="string" ns42:value-type="string" table:number-columns-spanned="3" table:number-rows-spanned="1">
            <text:p>$160.49</text:p>
          </table:table-cell>
          <table:covered-table-cell table:number-columns-repeated="2" table:style-name="ce70"/>
          <table:table-cell table:style-name="ce70" office:value-type="string" ns42:value-type="string" table:number-columns-spanned="3" table:number-rows-spanned="1">
            <text:p>$111.50</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2"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THRESHOLD COMPARISON · DEMO DECISION TEST</text:p>
          </table:table-cell>
          <table:covered-table-cell table:number-columns-repeated="17" table:style-name="ce63"/>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80" office:value-type="string" ns42:value-type="string" table:number-columns-spanned="3" table:number-rows-spanned="1">
            <text:p>13.25% · DEMO</text:p>
          </table:table-cell>
          <table:covered-table-cell table:number-columns-repeated="2" table:style-name="ce80"/>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2" office:value-type="string" ns42:value-type="string" table:number-columns-spanned="3" table:number-rows-spanned="1">
            <text:p>DEMO LISTING PRICE</text:p>
          </table:table-cell>
          <table:covered-table-cell table:number-columns-repeated="2" table:style-name="ce72"/>
          <table:table-cell table:style-name="ce72" office:value-type="string" ns42:value-type="string" table:number-columns-spanned="3" table:number-rows-spanned="1">
            <text:p>NET AFTER DEMO FEE</text:p>
          </table:table-cell>
          <table:covered-table-cell table:number-columns-repeated="2" table:style-name="ce72"/>
          <table:table-cell table:style-name="ce72" office:value-type="string" ns42:value-type="string" table:number-columns-spanned="3" table:number-rows-spanned="1">
            <text:p>PROFIT / BOX</text:p>
          </table:table-cell>
          <table:covered-table-cell table:number-columns-repeated="2" table:style-name="ce72"/>
          <table:table-cell table:style-name="ce72" office:value-type="string" ns42:value-type="string" table:number-columns-spanned="3" table:number-rows-spanned="1">
            <text:p>ABOVE MINIMUM</text:p>
          </table:table-cell>
          <table:covered-table-cell table:number-columns-repeated="2" table:style-name="ce72"/>
          <table:table-cell table:style-name="ce72" office:value-type="string" ns42:value-type="string" table:number-columns-spanned="3" table:number-rows-spanned="1">
            <text:p>QUANTITY</text:p>
          </table:table-cell>
          <table:covered-table-cell table:number-columns-repeated="2" table:style-name="ce72"/>
          <table:table-cell table:style-name="ce72" office:value-type="string" ns42:value-type="string" table:number-columns-spanned="3" table:number-rows-spanned="1">
            <text:p>DECISION STATE</text:p>
          </table:table-cell>
          <table:covered-table-cell table:number-columns-repeated="2" table:style-name="ce72"/>
        </table:table-row>
        <table:table-row table:style-name="ro12">
          <table:table-cell table:style-name="ce73" office:value-type="string" ns42:value-type="string" table:number-columns-spanned="3" table:number-rows-spanned="1">
            <text:p>$185.00 · DEMO</text:p>
          </table:table-cell>
          <table:covered-table-cell table:number-columns-repeated="2" table:style-name="ce73"/>
          <table:table-cell table:style-name="ce73" office:value-type="string" ns42:value-type="string" table:number-columns-spanned="3" table:number-rows-spanned="1">
            <text:p>$160.49 · DEMO</text:p>
          </table:table-cell>
          <table:covered-table-cell table:number-columns-repeated="2" table:style-name="ce73"/>
          <table:table-cell table:style-name="ce73" office:value-type="string" ns42:value-type="string" table:number-columns-spanned="3" table:number-rows-spanned="1">
            <text:p>$111.50 · DEMO</text:p>
          </table:table-cell>
          <table:covered-table-cell table:number-columns-repeated="2" table:style-name="ce73"/>
          <table:table-cell table:style-name="ce73" office:value-type="string" ns42:value-type="string" table:number-columns-spanned="3" table:number-rows-spanned="1">
            <text:p>+$13.26 · DEMO</text:p>
          </table:table-cell>
          <table:covered-table-cell table:number-columns-repeated="2" table:style-name="ce73"/>
          <table:table-cell table:style-name="ce70" office:value-type="string" ns42:value-type="string" table:number-columns-spanned="3" table:number-rows-spanned="1">
            <text:p>2</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2"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2"/>
        </table:table-row>
        <table:table-row table:style-name="ro17">
          <table:table-cell table:style-name="ce71"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ACTION BANDS · DEMO DECISION TRANSLATION</text:p>
          </table:table-cell>
          <table:covered-table-cell table:number-columns-repeated="17" table:style-name="ce63"/>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8" office:value-type="string" ns42:value-type="string" table:number-columns-spanned="4" table:number-rows-spanned="1">
            <text:p>BELOW $171.74 · DEMO</text:p>
          </table:table-cell>
          <table:covered-table-cell table:number-columns-repeated="3" table:style-name="ce68"/>
          <table:table-cell table:style-name="ce78" office:value-type="string" ns42:value-type="string" table:number-columns-spanned="4" table:number-rows-spanned="1">
            <text:p>TARGET NOT MET</text:p>
          </table:table-cell>
          <table:covered-table-cell table:number-columns-repeated="3" table:style-name="ce78"/>
          <table:table-cell table:style-name="ce73" office:value-type="string" ns42:value-type="string" table:number-columns-spanned="4" table:number-rows-spanned="1">
            <text:p>HOLD</text:p>
          </table:table-cell>
          <table:covered-table-cell table:number-columns-repeated="3" table:style-name="ce73"/>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8" office:value-type="string" ns42:value-type="string" table:number-columns-spanned="4" table:number-rows-spanned="1">
            <text:p>$171.74–$184.99 · DEMO</text:p>
          </table:table-cell>
          <table:covered-table-cell table:number-columns-repeated="3" table:style-name="ce68"/>
          <table:table-cell table:style-name="ce68" office:value-type="string" ns42:value-type="string" table:number-columns-spanned="4" table:number-rows-spanned="1">
            <text:p>TARGET MET</text:p>
          </table:table-cell>
          <table:covered-table-cell table:number-columns-repeated="3" table:style-name="ce68"/>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8" office:value-type="string" ns42:value-type="string" table:number-columns-spanned="4" table:number-rows-spanned="1">
            <text:p>$185.00+ · DEMO</text:p>
          </table:table-cell>
          <table:covered-table-cell table:number-columns-repeated="3" table:style-name="ce68"/>
          <table:table-cell table:style-name="ce79" office:value-type="string" ns42:value-type="string" table:number-columns-spanned="4" table:number-rows-spanned="1">
            <text:p>TARGET EXCEEDED</text:p>
          </table:table-cell>
          <table:covered-table-cell table:number-columns-repeated="3" table:style-name="ce79"/>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9" office:value-type="string" ns42:value-type="string" table:number-columns-spanned="6" table:number-rows-spanned="1">
            <text:p>CURRENT DEMO MARKET CONTEXT</text:p>
          </table:table-cell>
          <table:covered-table-cell table:number-columns-repeated="5" table:style-name="ce69"/>
          <table:table-cell table:style-name="ce69" office:value-type="string" ns42:value-type="string" table:number-columns-spanned="6" table:number-rows-spanned="1">
            <text:p>CURRENT DEMO LISTING CONTEXT</text:p>
          </table:table-cell>
          <table:covered-table-cell table:number-columns-repeated="5" table:style-name="ce69"/>
          <table:table-cell table:style-name="ce69" office:value-type="string" ns42:value-type="string" table:number-columns-spanned="6" table:number-rows-spanned="1">
            <text:p>CURRENT TEST INTERPRETATION</text:p>
          </table:table-cell>
          <table:covered-table-cell table:number-columns-repeated="5" table:style-name="ce69"/>
        </table:table-row>
        <table:table-row table:style-name="ro12">
          <table:table-cell table:style-name="ce73" office:value-type="string" ns42:value-type="string" table:number-columns-spanned="6" table:number-rows-spanned="1">
            <text:p>$175.00 · READY TO SELL</text:p>
          </table:table-cell>
          <table:covered-table-cell table:number-columns-repeated="5" table:style-name="ce73"/>
          <table:table-cell table:style-name="ce73" office:value-type="string" ns42:value-type="string" table:number-columns-spanned="6" table:number-rows-spanned="1">
            <text:p>$185.00 · SELL OPPORTUNITY</text:p>
          </table:table-cell>
          <table:covered-table-cell table:number-columns-repeated="5" table:style-name="ce73"/>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2"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PRIORITY SIGNAL · DEMO ATTENTION TEST</text:p>
          </table:table-cell>
          <table:covered-table-cell table:number-columns-repeated="17" table:style-name="ce63"/>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8" office:value-type="string" ns42:value-type="string" table:number-columns-spanned="3" table:number-rows-spanned="1">
            <text:p>SELL OPPORTUNITY · DEMO</text:p>
          </table:table-cell>
          <table:covered-table-cell table:number-columns-repeated="2" table:style-name="ce68"/>
          <table:table-cell table:style-name="ce73" office:value-type="string" ns42:value-type="string" table:number-columns-spanned="3" table:number-rows-spanned="1">
            <text:p>10 DAYS</text:p>
          </table:table-cell>
          <table:covered-table-cell table:number-columns-repeated="2" table:style-name="ce73"/>
          <table:table-cell table:style-name="ce78" office:value-type="string" ns42:value-type="string" table:number-columns-spanned="3" table:number-rows-spanned="1">
            <text:p>PREPARATION NEEDED</text:p>
          </table:table-cell>
          <table:covered-table-cell table:number-columns-repeated="2" table:style-name="ce78"/>
          <table:table-cell table:style-name="ce68" office:value-type="string" ns42:value-type="string" table:number-columns-spanned="3" table:number-rows-spanned="1">
            <text:p>EARLY DEC 2026</text:p>
          </table:table-cell>
          <table:covered-table-cell table:number-columns-repeated="2" table:style-name="ce68"/>
          <table:table-cell table:style-name="ce49" office:value-type="string" ns42:value-type="string" table:number-columns-spanned="3" table:number-rows-spanned="1">
            <text:p>NORMAL · DEMO</text:p>
          </table:table-cell>
          <table:covered-table-cell table:number-columns-repeated="2" table:style-name="ce49"/>
          <table:table-cell table:style-name="ce68" office:value-type="string" ns42:value-type="string" table:number-columns-spanned="3" table:number-rows-spanned="1">
            <text:p>PREPARE, DO NOT RUSH</text:p>
          </table:table-cell>
          <table:covered-table-cell table:number-columns-repeated="2" table:style-name="ce68"/>
        </table:table-row>
        <table:table-row table:style-name="ro12">
          <table:table-cell table:style-name="ce69" office:value-type="string" ns42:value-type="string" table:number-columns-spanned="6" table:number-rows-spanned="1">
            <text:p>PRIORITY RULE</text:p>
          </table:table-cell>
          <table:covered-table-cell table:number-columns-repeated="5" table:style-name="ce69"/>
          <table:table-cell table:style-name="ce69" office:value-type="string" ns42:value-type="string" table:number-columns-spanned="6" table:number-rows-spanned="1">
            <text:p>WHY NORMAL?</text:p>
          </table:table-cell>
          <table:covered-table-cell table:number-columns-repeated="5" table:style-name="ce69"/>
          <table:table-cell table:style-name="ce69" office:value-type="string" ns42:value-type="string" table:number-columns-spanned="6" table:number-rows-spanned="1">
            <text:p>WHAT WOULD MAKE IT HIGH?</text:p>
          </table:table-cell>
          <table:covered-table-cell table:number-columns-repeated="5" table:style-name="ce69"/>
        </table:table-row>
        <table:table-row table:style-name="ro16">
          <table:table-cell table:style-name="ce62" office:value-type="string" ns42:value-type="string" table:number-columns-spanned="6" table:number-rows-spanned="1">
            <text:p>Profit signal + inventory age + listing readiness + planned review timing</text:p>
          </table:table-cell>
          <table:covered-table-cell table:number-columns-repeated="5" table:style-name="ce62"/>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4" office:value-type="string" ns42:value-type="string" table:number-columns-spanned="4" table:number-rows-spanned="1">
            <text:p>LOW</text:p>
          </table:table-cell>
          <table:covered-table-cell table:number-columns-repeated="3" table:style-name="ce74"/>
          <table:table-cell table:style-name="ce49" office:value-type="string" ns42:value-type="string" table:number-columns-spanned="4" table:number-rows-spanned="1">
            <text:p>NORMAL</text:p>
          </table:table-cell>
          <table:covered-table-cell table:number-columns-repeated="3" table:style-name="ce49"/>
          <table:table-cell table:style-name="ce82" office:value-type="string" ns42:value-type="string" table:number-columns-spanned="4" table:number-rows-spanned="1">
            <text:p>HIGH</text:p>
          </table:table-cell>
          <table:covered-table-cell table:number-columns-repeated="3" table:style-name="ce82"/>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2"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1"/>
        </table:table-row>
        <table:table-row table:style-name="ro5">
          <table:table-cell table:style-name="ce63" office:value-type="string" ns42:value-type="string" table:number-columns-spanned="18" table:number-rows-spanned="1">
            <text:p>🏷 LISTING READINESS PREPARATION GATE · DEMO EVIDENCE TEST</text:p>
          </table:table-cell>
          <table:covered-table-cell table:number-columns-repeated="17" table:style-name="ce63"/>
        </table:table-row>
        <table:table-row table:style-name="ro5">
          <table:table-cell table:style-name="ce74" office:value-type="string" ns42:value-type="string" table:number-columns-spanned="4" table:number-rows-spanned="1">
            <text:p>READINESS FACTOR</text:p>
          </table:table-cell>
          <table:covered-table-cell table:number-columns-repeated="3" table:style-name="ce74"/>
          <table:table-cell table:style-name="ce49" office:value-type="string" ns42:value-type="string" table:number-columns-spanned="4" table:number-rows-spanned="1">
            <text:p>FACTOR STATUS</text:p>
          </table:table-cell>
          <table:covered-table-cell table:number-columns-repeated="3" table:style-name="ce49"/>
          <table:table-cell table:style-name="ce82" office:value-type="string" ns42:value-type="string" table:number-columns-spanned="4" table:number-rows-spanned="1">
            <text:p>CURRENT EVIDENCE</text:p>
          </table:table-cell>
          <table:covered-table-cell table:number-columns-repeated="3" table:style-name="ce82"/>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9" office:value-type="string" ns42:value-type="string" table:number-columns-spanned="6" table:number-rows-spanned="1">
            <text:p>OVERALL LISTING READINESS</text:p>
          </table:table-cell>
          <table:covered-table-cell table:number-columns-repeated="5" table:style-name="ce69"/>
          <table:table-cell table:style-name="ce69" office:value-type="string" ns42:value-type="string" table:number-columns-spanned="6" table:number-rows-spanned="1">
            <text:p>VISIBLE BLOCKING REASONS</text:p>
          </table:table-cell>
          <table:covered-table-cell table:number-columns-repeated="5" table:style-name="ce69"/>
          <table:table-cell table:style-name="ce69" office:value-type="string" ns42:value-type="string" table:number-columns-spanned="6" table:number-rows-spanned="1">
            <text:p>NEXT PREPARATION ACTION</text:p>
          </table:table-cell>
          <table:covered-table-cell table:number-columns-repeated="5" table:style-name="ce69"/>
        </table:table-row>
        <table:table-row table:style-name="ro19">
          <table:table-cell table:style-name="ce62"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2"/>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2"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2"/>
        </table:table-row>
        <table:table-row table:style-name="ro19">
          <table:table-cell table:style-name="ce62"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2"/>
        </table:table-row>
        <table:table-row table:style-name="ro5">
          <table:table-cell table:style-name="ce74" office:value-type="string" ns42:value-type="string" table:number-columns-spanned="4" table:number-rows-spanned="1">
            <text:p>READY TO LIST</text:p>
          </table:table-cell>
          <table:covered-table-cell table:number-columns-repeated="3" table:style-name="ce74"/>
          <table:table-cell table:style-name="ce49" office:value-type="string" ns42:value-type="string" table:number-columns-spanned="4" table:number-rows-spanned="1">
            <text:p>PREPARATION NEEDED</text:p>
          </table:table-cell>
          <table:covered-table-cell table:number-columns-repeated="3" table:style-name="ce49"/>
          <table:table-cell table:style-name="ce82" office:value-type="string" ns42:value-type="string" table:number-columns-spanned="4" table:number-rows-spanned="1">
            <text:p>BLOCKED</text:p>
          </table:table-cell>
          <table:covered-table-cell table:number-columns-repeated="3" table:style-name="ce82"/>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1"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1"/>
        </table:table-row>
        <table:table-row table:style-name="ro5">
          <table:table-cell table:style-name="ce63" office:value-type="string" ns42:value-type="string" table:number-columns-spanned="18" table:number-rows-spanned="1">
            <text:p>📸 LISTING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BLOCKER AFFECTED</text:p>
          </table:table-cell>
          <table:covered-table-cell table:number-columns-repeated="3" table:style-name="ce82"/>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cell table:style-name="ce69" office:value-type="string" ns42:value-type="string" table:number-columns-spanned="6" table:number-rows-spanned="1">
            <text:p>PROTECTED BLOCKERS</text:p>
          </table:table-cell>
          <table:covered-table-cell table:number-columns-repeated="5" table:style-name="ce69"/>
        </table:table-row>
        <table:table-row table:style-name="ro20">
          <table:table-cell table:style-name="ce62" office:value-type="string" ns42:value-type="string" table:number-columns-spanned="6" table:number-rows-spanned="1">
            <text:p>PREPARATION NEEDED</text:p>
          </table:table-cell>
          <table:covered-table-cell table:number-columns-repeated="5" table:style-name="ce62"/>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2"/>
        </table:table-row>
        <table:table-row table:style-name="ro5">
          <table:table-cell table:style-name="ce63" office:value-type="string" ns42:value-type="string" table:number-columns-spanned="18" table:number-rows-spanned="1">
            <text:p>🔎 CONDIT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DI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CONDITION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LISTING CO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TENT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CONTENT PREPAR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PRICE DECIS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VIEWED PRIC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REVIEWED LISTING PRICE RECORD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LATFORM SELEC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PLATFORM SELECT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SHIPPING REVIEW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PING REVIEW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SHIPPING PATH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2"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DATA-QUALITY CLEARANCE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ATA-QUALITY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L READINESS CROSS-CHECK</text:p>
          </table:table-cell>
          <table:covered-table-cell table:number-columns-repeated="5" table:style-name="ce69"/>
          <table:table-cell table:style-name="ce69" office:value-type="string" ns42:value-type="string" table:number-columns-spanned="6" table:number-rows-spanned="1">
            <text:p>READINESS AFTER CROSS-CHECK</text:p>
          </table:table-cell>
          <table:covered-table-cell table:number-columns-repeated="5" table:style-name="ce69"/>
        </table:table-row>
        <table:table-row table:style-name="ro5">
          <table:table-cell table:style-name="ce62" office:value-type="string" ns42:value-type="string" table:number-columns-spanned="6" table:number-rows-spanned="1">
            <text:p>DATA-QUALITY CLEARED · DEMO</text:p>
          </table:table-cell>
          <table:covered-table-cell table:number-columns-repeated="5" table:style-name="ce62"/>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2"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2"/>
        </table:table-row>
        <table:table-row table:style-name="ro19">
          <table:table-cell table:style-name="ce62"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2"/>
        </table:table-row>
        <table:table-row table:style-name="ro5">
          <table:table-cell table:style-name="ce63" office:value-type="string" ns42:value-type="string" table:number-columns-spanned="18" table:number-rows-spanned="1">
            <text:p>🎯 LISTING I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INT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BUSINESS STATE AFTER ACTION</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INTENT CONFIRMED · DEMO</text:p>
          </table:table-cell>
          <table:covered-table-cell table:number-columns-repeated="5" table:style-name="ce62"/>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Listing intent does not create, publish, or expose a marketplace listing.</text:p>
          </table:table-cell>
          <table:covered-table-cell table:number-columns-repeated="17" table:style-name="ce62"/>
        </table:table-row>
        <table:table-row table:style-name="ro5">
          <table:table-cell table:style-name="ce63" office:value-type="string" ns42:value-type="string" table:number-columns-spanned="18" table:number-rows-spanned="1">
            <text:p>📝 LISTING RECORD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RAFT RESULT</text:p>
          </table:table-cell>
          <table:covered-table-cell table:number-columns-repeated="3" table:style-name="ce82"/>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STING RECORD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DRAFT PREPARED · DEMO</text:p>
          </table:table-cell>
          <table:covered-table-cell table:number-columns-repeated="5" table:style-name="ce62"/>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2"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 LISTING RECORD DRAFT is not LISTED, PUBLISHED, EXPOSED,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READINESS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READY FOR PUBLICATION · DEMO</text:p>
          </table:table-cell>
          <table:covered-table-cell table:number-columns-repeated="5" table:style-name="ce62"/>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2"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AUTHORIZ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AUTHORIZ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AUTHORITY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AUTHORIZED · DEMO</text:p>
          </table:table-cell>
          <table:covered-table-cell table:number-columns-repeated="5" table:style-name="ce62"/>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EVENT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UBLICATION RESULT</text:p>
          </table:table-cell>
          <table:covered-table-cell table:number-columns-repeated="3" table:style-name="ce82"/>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EV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CONTROLLED PUBLICATION OUTCOMES: PUBLISHED · FAIL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EXPOSURE ACTI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EXPOSURE RESULT</text:p>
          </table:table-cell>
          <table:covered-table-cell table:number-columns-repeated="3" table:style-name="ce82"/>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LATFORM EXPOSURE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PLATFORM EXPOSURE ACTIVAT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2"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UTHORIZED ≠ PUBLISHED · PUBLISHED ≠ SOLD · ACTIVE PLATFORM EXPOSURE ≠ SOLD.</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ALE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ALE OBSERV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ALE EVIDENCE OBSERVED · DEMO</text:p>
          </table:table-cell>
          <table:covered-table-cell table:number-columns-repeated="5" table:style-name="ce62"/>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2"/>
        </table:table-row>
        <table:table-row table:style-name="ro5">
          <table:table-cell table:style-name="ce63" office:value-type="string" ns42:value-type="string" table:number-columns-spanned="18" table:number-rows-spanned="1">
            <text:p>🧾 SALE RELATIONSHIP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LATIONSHIP RESULT</text:p>
          </table:table-cell>
          <table:covered-table-cell table:number-columns-repeated="3" table:style-name="ce82"/>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RELATIONSHIP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INVENTORY ↔ SALE RELATIONSHIP RECORDED · DEMO</text:p>
          </table:table-cell>
          <table:covered-table-cell table:number-columns-repeated="5" table:style-name="ce62"/>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2"/>
        </table:table-row>
        <table:table-row table:style-name="ro5">
          <table:table-cell table:style-name="ce63" office:value-type="string" ns42:value-type="string" table:number-columns-spanned="18" table:number-rows-spanned="1">
            <text:p>🚧 SOL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OLD INVENTORY STATE</text:p>
          </table:table-cell>
          <table:covered-table-cell table:number-columns-repeated="5" table:style-name="ce69"/>
          <table:table-cell table:style-name="ce69" office:value-type="string" ns42:value-type="string" table:number-columns-spanned="6" table:number-rows-spanned="1">
            <text:p>REMAINING INVENTORY RULE</text:p>
          </table:table-cell>
          <table:covered-table-cell table:number-columns-repeated="5" table:style-name="ce69"/>
        </table:table-row>
        <table:table-row table:style-name="ro20">
          <table:table-cell table:style-name="ce62" office:value-type="string" ns42:value-type="string" table:number-columns-spanned="6" table:number-rows-spanned="1">
            <text:p>SOLD TRANSITION SUPPORTED · DEMO</text:p>
          </table:table-cell>
          <table:covered-table-cell table:number-columns-repeated="5" table:style-name="ce62"/>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2"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FULFILLM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FULFILLM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FILLMENT PREPARATION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READY FOR SHIPMENT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EVEN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MENT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HIPMENT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HIPMENT OUTCOMES: SHIPPED · NOT SHIPP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HIPPE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PED INVENTORY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SHIPPED TRANSITION SUPPORT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2"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OLD ≠ READY FOR SHIPMENT ≠ SHIPP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ELIVERY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DELIVERY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DELIVERY EVENT OBSERV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DELIVERY OUTCOMES: DELIVERED · NOT DELIVER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 SHIPPED ≠ DELIVERED.</text:p>
          </table:table-cell>
          <table:covered-table-cell table:number-columns-repeated="17" table:style-name="ce62"/>
        </table:table-row>
        <table:table-row table:style-name="ro5">
          <table:table-cell table:style-name="ce63" office:value-type="string" ns42:value-type="string" table:number-columns-spanned="18" table:number-rows-spanned="1">
            <text:p>💵 SETTLEMENT / PAYOU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ETTLEMENT RESULT</text:p>
          </table:table-cell>
          <table:covered-table-cell table:number-columns-repeated="3" table:style-name="ce82"/>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ETTLE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PAYOUT EVIDENCE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ETTLEMENT OUTCOMES: PAID OUT · PENDING PAYOUT · HELD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FEES, TAXES, MARKETPLACE ADJUSTMENTS, AND PAYOUT AMOUNT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financial settlement facts. DELIVERED ≠ PAID OUT.</text:p>
          </table:table-cell>
          <table:covered-table-cell table:number-columns-repeated="17" table:style-name="ce62"/>
        </table:table-row>
        <table:table-row table:style-name="ro5">
          <table:table-cell table:style-name="ce63" office:value-type="string" ns42:value-type="string" table:number-columns-spanned="18" table:number-rows-spanned="1">
            <text:p>🚧 LIFECYCLE COMPLE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FECYCLE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LIFECYCLE COMPLETION SUPPORTED · DEMO</text:p>
          </table:table-cell>
          <table:covered-table-cell table:number-columns-repeated="5" table:style-name="ce62"/>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HIPPED ≠ DELIVERED · DELIVERED ≠ PAID OUT · PAID OUT ≠ COMPLE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2"/>
        </table:table-row>
        <table:table-row table:style-name="ro5">
          <table:table-cell table:style-name="ce63" office:value-type="string" ns42:value-type="string" table:number-columns-spanned="18" table:number-rows-spanned="1">
            <text:p>🎯 OPERATOR RECORD SELECTION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OPERATOR RESPONSIBILITY</text:p>
          </table:table-cell>
          <table:covered-table-cell table:number-columns-repeated="3" table:style-name="ce74"/>
          <table:table-cell table:style-name="ce49" office:value-type="string" ns42:value-type="string" table:number-columns-spanned="4" table:number-rows-spanned="1">
            <text:p>SELECTION STATE</text:p>
          </table:table-cell>
          <table:covered-table-cell table:number-columns-repeated="3" table:style-name="ce49"/>
          <table:table-cell table:style-name="ce82" office:value-type="string" ns42:value-type="string" table:number-columns-spanned="4" table:number-rows-spanned="1">
            <text:p>SELECTED RECO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SELECTION</text:p>
          </table:table-cell>
          <table:covered-table-cell table:number-columns-repeated="5" table:style-name="ce69"/>
          <table:table-cell table:style-name="ce69" office:value-type="string" ns42:value-type="string" table:number-columns-spanned="6" table:number-rows-spanned="1">
            <text:p>WORKING CONTEXT</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CORD CONTEXT ESTABLISH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2"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2"/>
        </table:table-row>
        <table:table-row table:style-name="ro5">
          <table:table-cell table:style-name="ce63" office:value-type="string" ns42:value-type="string" table:number-columns-spanned="18" table:number-rows-spanned="1">
            <text:p>📍 CURRENT LIFECYCLE STATE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RECORD</text:p>
          </table:table-cell>
          <table:covered-table-cell table:number-columns-repeated="3" table:style-name="ce74"/>
          <table:table-cell table:style-name="ce49" office:value-type="string" ns42:value-type="string" table:number-columns-spanned="4" table:number-rows-spanned="1">
            <text:p>SUPPORTED STATE</text:p>
          </table:table-cell>
          <table:covered-table-cell table:number-columns-repeated="3" table:style-name="ce49"/>
          <table:table-cell table:style-name="ce82" office:value-type="string" ns42:value-type="string" table:number-columns-spanned="4" table:number-rows-spanned="1">
            <text:p>STATE SOURC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9" office:value-type="string" ns42:value-type="string" table:number-columns-spanned="6" table:number-rows-spanned="1">
            <text:p>STATE SURFACE RESULT</text:p>
          </table:table-cell>
          <table:covered-table-cell table:number-columns-repeated="5" table:style-name="ce69"/>
          <table:table-cell table:style-name="ce69" office:value-type="string" ns42:value-type="string" table:number-columns-spanned="6" table:number-rows-spanned="1">
            <text:p>CURRENT BUSINESS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CURRENT STATE SHOWN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2"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2"/>
        </table:table-row>
        <table:table-row table:style-name="ro5">
          <table:table-cell table:style-name="ce63" office:value-type="string" ns42:value-type="string" table:number-columns-spanned="18" table:number-rows-spanned="1">
            <text:p>👉 NEXT REQUIRED ACTION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ACTION BASI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ACTION SURFAC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NEXT ACTION SHOWN · DEMO</text:p>
          </table:table-cell>
          <table:covered-table-cell table:number-columns-repeated="5" table:style-name="ce62"/>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2"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Guidance does not silently complete the action or change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ACTIVE BLOCKER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ACTION</text:p>
          </table:table-cell>
          <table:covered-table-cell table:number-columns-repeated="3" table:style-name="ce74"/>
          <table:table-cell table:style-name="ce49" office:value-type="string" ns42:value-type="string" table:number-columns-spanned="4" table:number-rows-spanned="1">
            <text:p>ACTIVE BLOCKER</text:p>
          </table:table-cell>
          <table:covered-table-cell table:number-columns-repeated="3" table:style-name="ce49"/>
          <table:table-cell table:style-name="ce82" office:value-type="string" ns42:value-type="string" table:number-columns-spanned="4" table:number-rows-spanned="1">
            <text:p>BLOCKER STAT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9" office:value-type="string" ns42:value-type="string" table:number-columns-spanned="6" table:number-rows-spanned="1">
            <text:p>BLOCKER SURFACE RESULT</text:p>
          </table:table-cell>
          <table:covered-table-cell table:number-columns-repeated="5" table:style-name="ce69"/>
          <table:table-cell table:style-name="ce69" office:value-type="string" ns42:value-type="string" table:number-columns-spanned="6" table:number-rows-spanned="1">
            <text:p>ADVANCEMENT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BLOCKER EXPOSED · DEMO</text:p>
          </table:table-cell>
          <table:covered-table-cell table:number-columns-repeated="5" table:style-name="ce62"/>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2"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n unresolved blocker cannot be silently cleared by unrelated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NEEDED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ACTIVE BLOCKER</text:p>
          </table:table-cell>
          <table:covered-table-cell table:number-columns-repeated="3" table:style-name="ce74"/>
          <table:table-cell table:style-name="ce49" office:value-type="string" ns42:value-type="string" table:number-columns-spanned="4" table:number-rows-spanned="1">
            <text:p>EVIDENCE NEEDED</text:p>
          </table:table-cell>
          <table:covered-table-cell table:number-columns-repeated="3" table:style-name="ce49"/>
          <table:table-cell table:style-name="ce82" office:value-type="string" ns42:value-type="string" table:number-columns-spanned="4" table:number-rows-spanned="1">
            <text:p>EVIDENCE STANDA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9" office:value-type="string" ns42:value-type="string" table:number-columns-spanned="6" table:number-rows-spanned="1">
            <text:p>EVIDENCE SURFACE RESULT</text:p>
          </table:table-cell>
          <table:covered-table-cell table:number-columns-repeated="5" table:style-name="ce69"/>
          <table:table-cell table:style-name="ce69" office:value-type="string" ns42:value-type="string" table:number-columns-spanned="6" table:number-rows-spanned="1">
            <text:p>OPERATOR QUESTION</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QUIRED EVIDENCE SHOWN · DEMO</text:p>
          </table:table-cell>
          <table:covered-table-cell table:number-columns-repeated="5" table:style-name="ce62"/>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2"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OPERATOR INPU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INPUT</text:p>
          </table:table-cell>
          <table:covered-table-cell table:number-columns-repeated="3" table:style-name="ce49"/>
          <table:table-cell table:style-name="ce82" office:value-type="string" ns42:value-type="string" table:number-columns-spanned="4" table:number-rows-spanned="1">
            <text:p>DEMO ENTRY</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9" office:value-type="string" ns42:value-type="string" table:number-columns-spanned="6" table:number-rows-spanned="1">
            <text:p>INPUT SURFACE RESULT</text:p>
          </table:table-cell>
          <table:covered-table-cell table:number-columns-repeated="5" table:style-name="ce69"/>
          <table:table-cell table:style-name="ce69" office:value-type="string" ns42:value-type="string" table:number-columns-spanned="6" table:number-rows-spanned="1">
            <text:p>RECORDED EVIDE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OPERATOR EVIDENCE RECORDED · DEMO</text:p>
          </table:table-cell>
          <table:covered-table-cell table:number-columns-repeated="5" table:style-name="ce62"/>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2"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REVIEW RESUL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ECORDED EVIDENCE</text:p>
          </table:table-cell>
          <table:covered-table-cell table:number-columns-repeated="3" table:style-name="ce74"/>
          <table:table-cell table:style-name="ce49" office:value-type="string" ns42:value-type="string" table:number-columns-spanned="4" table:number-rows-spanned="1">
            <text:p>REVIEW RESULT</text:p>
          </table:table-cell>
          <table:covered-table-cell table:number-columns-repeated="3" table:style-name="ce49"/>
          <table:table-cell table:style-name="ce82" office:value-type="string" ns42:value-type="string" table:number-columns-spanned="4" table:number-rows-spanned="1">
            <text:p>CONTROLLED REVIEW STATE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9" office:value-type="string" ns42:value-type="string" table:number-columns-spanned="6" table:number-rows-spanned="1">
            <text:p>REVIEW SURFACE RESULT</text:p>
          </table:table-cell>
          <table:covered-table-cell table:number-columns-repeated="5" table:style-name="ce69"/>
          <table:table-cell table:style-name="ce69" office:value-type="string" ns42:value-type="string" table:number-columns-spanned="6" table:number-rows-spanned="1">
            <text:p>EVIDENCE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EVIDENCE REVIEWED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2"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RIVED TRANSITION PREVIEW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SUPPORTED EVIDENCE</text:p>
          </table:table-cell>
          <table:covered-table-cell table:number-columns-repeated="3" table:style-name="ce49"/>
          <table:table-cell table:style-name="ce82" office:value-type="string" ns42:value-type="string" table:number-columns-spanned="4" table:number-rows-spanned="1">
            <text:p>TRANSITION PREVIEW</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9" office:value-type="string" ns42:value-type="string" table:number-columns-spanned="6" table:number-rows-spanned="1">
            <text:p>PREVIEW SURFACE RESULT</text:p>
          </table:table-cell>
          <table:covered-table-cell table:number-columns-repeated="5" table:style-name="ce69"/>
          <table:table-cell table:style-name="ce69" office:value-type="string" ns42:value-type="string" table:number-columns-spanned="6" table:number-rows-spanned="1">
            <text:p>STATE CHANGE STATU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SUPPORTED TRANSITION SHOWN · DEMO</text:p>
          </table:table-cell>
          <table:covered-table-cell table:number-columns-repeated="5" table:style-name="ce62"/>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2"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2"/>
        </table:table-row>
        <table:table-row table:style-name="ro5">
          <table:table-cell table:style-name="ce63" office:value-type="string" ns42:value-type="string" table:number-columns-spanned="18" table:number-rows-spanned="1">
            <text:p>🎛️ INVENTORY ACTION CENTER GAT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CURRENT STATE</text:p>
          </table:table-cell>
          <table:covered-table-cell table:number-columns-repeated="3" table:style-name="ce49"/>
          <table:table-cell table:style-name="ce82" office:value-type="string" ns42:value-type="string" table:number-columns-spanned="4" table:number-rows-spanned="1">
            <text:p>NEXT ACTION</text:p>
          </table:table-cell>
          <table:covered-table-cell table:number-columns-repeated="3" table:style-name="ce82"/>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OPERATING BOUNDARY</text:p>
          </table:table-cell>
          <table:covered-table-cell table:number-columns-repeated="5" table:style-name="ce69"/>
        </table:table-row>
        <table:table-row table:style-name="ro20">
          <table:table-cell table:style-name="ce62" office:value-type="string" ns42:value-type="string" table:number-columns-spanned="6" table:number-rows-spanned="1">
            <text:p>DELIVERED · DEMO → SUPPORTED · DEMO → SHIPPED → DELIVERED PREVIEW</text:p>
          </table:table-cell>
          <table:covered-table-cell table:number-columns-repeated="5" table:style-name="ce62"/>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LIFECYCLE ROUTING MAP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OUTING INPUT</text:p>
          </table:table-cell>
          <table:covered-table-cell table:number-columns-repeated="3" table:style-name="ce74"/>
          <table:table-cell table:style-name="ce49" office:value-type="string" ns42:value-type="string" table:number-columns-spanned="4" table:number-rows-spanned="1">
            <text:p>ROUTING BASIS</text:p>
          </table:table-cell>
          <table:covered-table-cell table:number-columns-repeated="3" table:style-name="ce49"/>
          <table:table-cell table:style-name="ce82" office:value-type="string" ns42:value-type="string" table:number-columns-spanned="4" table:number-rows-spanned="1">
            <text:p>ROUTING OUTPU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9" office:value-type="string" ns42:value-type="string" table:number-columns-spanned="6" table:number-rows-spanned="1">
            <text:p>MAP RESULT</text:p>
          </table:table-cell>
          <table:covered-table-cell table:number-columns-repeated="5" table:style-name="ce69"/>
          <table:table-cell table:style-name="ce69" office:value-type="string" ns42:value-type="string" table:number-columns-spanned="6" table:number-rows-spanned="1">
            <text:p>CONTROLLED ROUTING STATE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OUTING MAP ESTABLISHED · DEMO</text:p>
          </table:table-cell>
          <table:covered-table-cell table:number-columns-repeated="5" table:style-name="ce62"/>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2" office:value-type="string" ns42:value-type="string" table:number-columns-spanned="18" table:number-rows-spanned="1">
            <text:p>ROUTING CONTRACT: One supported current state selects one controlled operator route.</text:p>
          </table:table-cell>
          <table:covered-table-cell table:number-columns-repeated="17" table:style-name="ce62"/>
        </table:table-row>
        <table:table-row table:style-name="ro5">
          <table:table-cell table:style-name="ce62"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outing guidance cannot silently alter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PREPARATION NEEDE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READY-STAT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 EXPOSUR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OL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 SETTLE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COMPLETE TERMINAL-STATE PROTECTION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ACTIVE BLOCKER</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9" office:value-type="string" ns42:value-type="string" table:number-columns-spanned="6" table:number-rows-spanned="1">
            <text:p>TERMINAL ROUT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COMPLETE ROUTE PROTECTED · DEMO</text:p>
          </table:table-cell>
          <table:covered-table-cell table:number-columns-repeated="5" table:style-name="ce62"/>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TERMINAL CONTRACT: COMPLETE is a terminal sale-lifecycle state for this proven contrac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2"/>
        </table:table-row>
        <table:table-row table:style-name="ro5">
          <table:table-cell table:style-name="ce62"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2"/>
        </table:table-row>
        <table:table-row table:style-name="ro5">
          <table:table-cell table:style-name="ce63" office:value-type="string" ns42:value-type="string" table:number-columns-spanned="18" table:number-rows-spanned="1">
            <text:p>🎛️ STATE-DRIVEN INVENTORY ACTION CENTER GA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SUPPORTED CURRENT STATE</text:p>
          </table:table-cell>
          <table:covered-table-cell table:number-columns-repeated="3" table:style-name="ce49"/>
          <table:table-cell table:style-name="ce82" office:value-type="string" ns42:value-type="string" table:number-columns-spanned="4" table:number-rows-spanned="1">
            <text:p>ROUTED OPERATOR PATH</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STATE-DRIVEN CROSS-CHECK</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TERMINAL PROTECTION</text:p>
          </table:table-cell>
          <table:covered-table-cell table:number-columns-repeated="5" table:style-name="ce69"/>
        </table:table-row>
        <table:table-row table:style-name="ro20">
          <table:table-cell table:style-name="ce62" office:value-type="string" ns42:value-type="string" table:number-columns-spanned="6" table:number-rows-spanned="1">
            <text:p>STATE → ACTION → BLOCKER → EVIDENCE → REVIEW → PREVIEW · SUPPORTED</text:p>
          </table:table-cell>
          <table:covered-table-cell table:number-columns-repeated="5" table:style-name="ce62"/>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SELECTED-STATE INPUT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2" office:value-type="string" ns42:value-type="string" table:number-columns-spanned="4" table:number-rows-spanned="1">
            <text:p>SOURCE ROL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9" office:value-type="string" ns42:value-type="string" table:number-columns-spanned="6" table:number-rows-spanned="1">
            <text:p>INPUT RESULT</text:p>
          </table:table-cell>
          <table:covered-table-cell table:number-columns-repeated="5" table:style-name="ce69"/>
          <table:table-cell table:style-name="ce69" office:value-type="string" ns42:value-type="string" table:number-columns-spanned="6" table:number-rows-spanned="1">
            <text:p>SELECTED STATE SOUR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5">
          <table:table-cell table:style-name="ce62" office:value-type="string" ns42:value-type="string" table:number-columns-spanned="6" table:number-rows-spanned="1">
            <text:p>STATE INPUT RECORD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STATE NORMALIZATION + FAIL-SAFE LAY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OURCE INPUT</text:p>
          </table:table-cell>
          <table:covered-table-cell table:number-columns-repeated="3" table:style-name="ce74"/>
          <table:table-cell table:style-name="ce49" office:value-type="string" ns42:value-type="string" table:number-columns-spanned="4" table:number-rows-spanned="1">
            <text:p>NORMALIZATION RULE</text:p>
          </table:table-cell>
          <table:covered-table-cell table:number-columns-repeated="3" table:style-name="ce49"/>
          <table:table-cell table:style-name="ce82" office:value-type="string" ns42:value-type="string" table:number-columns-spanned="4" table:number-rows-spanned="1">
            <text:p>NORMALIZED STATE</text:p>
          </table:table-cell>
          <table:covered-table-cell table:number-columns-repeated="3" table:style-name="ce82"/>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9" office:value-type="string" ns42:value-type="string" table:number-columns-spanned="6" table:number-rows-spanned="1">
            <text:p>NORMALIZATION RESULT</text:p>
          </table:table-cell>
          <table:covered-table-cell table:number-columns-repeated="5" table:style-name="ce69"/>
          <table:table-cell table:style-name="ce69" office:value-type="string" ns42:value-type="string" table:number-columns-spanned="6" table:number-rows-spanned="1">
            <text:p>FORMULA ROL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9" table:number-rows-spanned="1">
            <text:p>NORMALIZED STATE · FORMULA</text:p>
          </table:table-cell>
          <table:covered-table-cell table:number-columns-repeated="8" table:style-name="ce62"/>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NEXT A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NEXT ACTION · FORMULA</text:p>
          </table:table-cell>
          <table:covered-table-cell table:number-columns-repeated="8" table:style-name="ce62"/>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ACTIVE BLOCK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ACTIVE BLOCKER · FORMULA</text:p>
          </table:table-cell>
          <table:covered-table-cell table:number-columns-repeated="8" table:style-name="ce62"/>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EVIDENCE NEEDED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EVIDENCE NEEDED · FORMULA</text:p>
          </table:table-cell>
          <table:covered-table-cell table:number-columns-repeated="8" table:style-name="ce62"/>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REVIEW RESPONSIBILITY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REVIEW RESPONSIBILITY · FORMULA</text:p>
          </table:table-cell>
          <table:covered-table-cell table:number-columns-repeated="8" table:style-name="ce62"/>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TRANSITION PREVIEW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TRANSITION PREVIEW · FORMULA</text:p>
          </table:table-cell>
          <table:covered-table-cell table:number-columns-repeated="8" table:style-name="ce62"/>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BLANK + UNKNOWN + UNMAPPED FAIL-CLOSED PROTE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CONDITION</text:p>
          </table:table-cell>
          <table:covered-table-cell table:number-columns-repeated="3" table:style-name="ce74"/>
          <table:table-cell table:style-name="ce49" office:value-type="string" ns42:value-type="string" table:number-columns-spanned="4" table:number-rows-spanned="1">
            <text:p>ROUTING RESULT</text:p>
          </table:table-cell>
          <table:covered-table-cell table:number-columns-repeated="3" table:style-name="ce49"/>
          <table:table-cell table:style-name="ce82" office:value-type="string" ns42:value-type="string" table:number-columns-spanned="4" table:number-rows-spanned="1">
            <text:p>OPERATOR GUIDANCE</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9" office:value-type="string" ns42:value-type="string" table:number-columns-spanned="6" table:number-rows-spanned="1">
            <text:p>FAIL-CLOSED RESULT</text:p>
          </table:table-cell>
          <table:covered-table-cell table:number-columns-repeated="5" table:style-name="ce69"/>
          <table:table-cell table:style-name="ce69" office:value-type="string" ns42:value-type="string" table:number-columns-spanned="6" table:number-rows-spanned="1">
            <text:p>INVENTED ROUTE</text:p>
          </table:table-cell>
          <table:covered-table-cell table:number-columns-repeated="5" table:style-name="ce69"/>
          <table:table-cell table:style-name="ce69" office:value-type="string" ns42:value-type="string" table:number-columns-spanned="6" table:number-rows-spanned="1">
            <text:p>STATE MUTATION</text:p>
          </table:table-cell>
          <table:covered-table-cell table:number-columns-repeated="5" table:style-name="ce69"/>
        </table:table-row>
        <table:table-row table:style-name="ro5">
          <table:table-cell table:style-name="ce62" office:value-type="string" ns42:value-type="string" table:number-columns-spanned="6" table:number-rows-spanned="1">
            <text:p>SAFE REVIEW BOUNDARY · DEMO</text:p>
          </table:table-cell>
          <table:covered-table-cell table:number-columns-repeated="5" table:style-name="ce62"/>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3" office:value-type="string" ns42:value-type="string" table:number-columns-spanned="18" table:number-rows-spanned="1">
            <text:p>🎛️ FORMULA-DRIVEN INVENTORY ACTION CENTER GATE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DERIVED ACTIVE BLOCKER</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DERIVED 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FAIL-CLOSED PROTECTION</text:p>
          </table:table-cell>
          <table:covered-table-cell table:number-columns-repeated="5" table:style-name="ce69"/>
        </table:table-row>
        <table:table-row table:style-name="ro5">
          <table:table-cell table:style-name="ce62" office:value-type="string" ns42:value-type="string" table:number-columns-spanned="6" table:number-rows-spanned="1">
            <text:p>FACTUAL DELIVERY RESULT → REVIEW DELIVERY EVIDENCE → SHIPPED → DELIVERED PREVIEW</text:p>
          </table:table-cell>
          <table:covered-table-cell table:number-columns-repeated="5" table:style-name="ce62"/>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office:value-type="string" ns42:value-type="string" table:number-columns-spanned="18" table:number-rows-spanned="1">
            <text:p>✅ VERIFIED PUBLICATION SUCCESS EVIDENCE · BUILDS 251–260</text:p>
          </table:table-cell>
          <table:covered-table-cell table:number-columns-repeated="17"/>
        </table:table-row>
        <table:table-row table:style-name="ro5">
          <table:table-cell table:style-name="ce53" office:value-type="string" ns42:value-type="string" table:number-columns-spanned="6" table:number-rows-spanned="1">
            <text:p>EVIDENC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OPERATING BOUNDARY</text:p>
          </table:table-cell>
          <table:covered-table-cell table:number-columns-repeated="5"/>
        </table:table-row>
        <table:table-row table:style-name="ro5">
          <table:table-cell table:style-name="ce54" office:value-type="string" ns42:value-type="string" table:number-columns-spanned="6" table:number-rows-spanned="1">
            <text:p>CAN A MARKETPLACE SUCCESS RESULT BECOME VERIFIED PUBLICATION?</text:p>
          </table:table-cell>
          <table:covered-table-cell table:number-columns-repeated="5"/>
          <table:table-cell table:style-name="ce54" office:value-type="string" ns42:value-type="string" table:number-columns-spanned="6" table:number-rows-spanned="1">
            <text:p>REVALIDATE SUCCESS EVIDENCE + IDENTITY CHAIN</text:p>
          </table:table-cell>
          <table:covered-table-cell table:number-columns-repeated="5"/>
          <table:table-cell table:style-name="ce54" office:value-type="string" ns42:value-type="string" table:number-columns-spanned="6" table:number-rows-spanned="1">
            <text:p>SUCCESS CLAIM ≠ VERIFIED PUBLICATION · VERIFIED PUBLICATION ≠ LISTED</text:p>
          </table:table-cell>
          <table:covered-table-cell table:number-columns-repeated="5"/>
        </table:table-row>
        <table:table-row table:style-name="ro5">
          <table:table-cell table:style-name="ce52" office:value-type="string" ns42:value-type="string" table:number-columns-spanned="18" table:number-rows-spanned="1">
            <text:p>📥 SUCCESS RESULT FACTUAL INTAKE</text:p>
          </table:table-cell>
          <table:covered-table-cell table:number-columns-repeated="17"/>
        </table:table-row>
        <table:table-row table:style-name="ro5">
          <table:table-cell table:style-name="ce53" office:value-type="string" ns42:value-type="string" table:number-columns-spanned="3" table:number-rows-spanned="1">
            <text:p>ATTEMPT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EXTERNAL RESULT RECEIVED?</text:p>
          </table:table-cell>
          <table:covered-table-cell table:number-columns-repeated="2"/>
          <table:table-cell table:style-name="ce53" office:value-type="string" ns42:value-type="string" table:number-columns-spanned="3" table:number-rows-spanned="1">
            <text:p>EXTERNAL RESULT STATUS</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row>
        <table:table-row table:style-name="ro5">
          <table:table-cell table:style-name="ce54" office:value-type="string" ns42:value-type="string" table:number-columns-spanned="3" table:number-rows-spanned="1">
            <text:p>PUB-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UCCESS</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table-cell table:style-name="ce53" office:value-type="string" ns42:value-type="string" table:number-columns-spanned="9" table:number-rows-spanned="1">
            <text:p>RESULT RECEIVED AT</text:p>
          </table:table-cell>
          <table:covered-table-cell table:number-columns-repeated="8"/>
        </table:table-row>
        <table:table-row table:style-name="ro5">
          <table:table-cell table:style-name="ce54" office:value-type="string" ns42:value-type="string" table:number-columns-spanned="9" table:number-rows-spanned="1">
            <text:p>EBAY-RESULT-REF-000001</text:p>
          </table:table-cell>
          <table:covered-table-cell table:number-columns-repeated="8"/>
          <table:table-cell table:style-name="ce54" office:value-type="string" ns42:value-type="string" table:number-columns-spanned="9" table:number-rows-spanned="1">
            <text:p>2026-07-06T19:55:00-04:00</text:p>
          </table:table-cell>
          <table:covered-table-cell table:number-columns-repeated="8"/>
        </table:table-row>
        <table:table-row table:style-name="ro5">
          <table:table-cell table:style-name="ce52" office:value-type="string" ns42:value-type="string" table:number-columns-spanned="18" table:number-rows-spanned="1">
            <text:p>🔎 SUCCESS STATUS + REQUIRED EVIDENCE VALIDATION</text:p>
          </table:table-cell>
          <table:covered-table-cell table:number-columns-repeated="17"/>
        </table:table-row>
        <table:table-row table:style-name="ro5">
          <table:table-cell table:style-name="ce53" office:value-type="string" ns42:value-type="string" table:number-columns-spanned="3" table:number-rows-spanned="1">
            <text:p>SUCCESS STATUS VALI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RESULT REFERENCE PRESENT</text:p>
          </table:table-cell>
          <table:covered-table-cell table:number-columns-repeated="2"/>
          <table:table-cell table:style-name="ce53" office:value-type="string" ns42:value-type="string" table:number-columns-spanned="3" table:number-rows-spanned="1">
            <text:p>RESULT TIME PRESENT</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row>
        <table:table-row table:style-name="ro21">
          <table:table-cell table:style-name="ce54" table:formula="of:=IF(AND(UPPER(TRIM([.J810]))=&quot;YES&quot;;UPPER(TRIM([.M810]))=&quot;SUCCES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10]))&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0]))=UPPER(TRIM([.O766]));UPPER(TRIM([.D810]))=UPPER(TRIM([.D766]));UPPER(TRIM([.G810]))=UPPER(TRIM([.A766])));&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5]))=&quot;YES&quot;;UPPER(TRIM([.D815]))=&quot;YES&quot;;UPPER(TRIM([.G815]))=&quot;YES&quot;;UPPER(TRIM([.J815]))=&quot;YES&quot;;UPPER(TRIM([.M815]))=&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VERIFIED PUBLICATION CROSS-CHECK</text:p>
          </table:table-cell>
          <table:covered-table-cell table:number-columns-repeated="17"/>
        </table:table-row>
        <table:table-row table:style-name="ro5">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COMMIT VALID</text:p>
          </table:table-cell>
          <table:covered-table-cell table:number-columns-repeated="2"/>
          <table:table-cell table:style-name="ce53" office:value-type="string" ns42:value-type="string" table:number-columns-spanned="3" table:number-rows-spanned="1">
            <text:p>ATTEMPT MATCH</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cell table:style-name="ce53" office:value-type="string" ns42:value-type="string" table:number-columns-spanned="3" table:number-rows-spanned="1">
            <text:p>VERIFIED PUBLICATION</text:p>
          </table:table-cell>
          <table:covered-table-cell table:number-columns-repeated="2"/>
          <table:table-cell table:style-name="ce53" office:value-type="string" ns42:value-type="string" table:number-columns-spanned="3" table:number-rows-spanned="1">
            <text:p>VERIFICATION RESULT</text:p>
          </table:table-cell>
          <table:covered-table-cell table:number-columns-repeated="2"/>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0]))=UPPER(TRIM([.O766]));&quot;YES&quot;;&quot;NO&quot;)" office:value-type="string" office:string-value="YES" ns42:value-type="string" table:number-columns-spanned="3" table:number-rows-spanned="1">
            <text:p>YES</text:p>
          </table:table-cell>
          <table:covered-table-cell table:number-columns-repeated="2"/>
          <table:table-cell table:style-name="ce54" table:formula="of:=[.P815]" office:value-type="string" office:string-value="YES" ns42:value-type="string" table:number-columns-spanned="3" table:number-rows-spanned="1">
            <text:p>YES</text:p>
          </table:table-cell>
          <table:covered-table-cell table:number-columns-repeated="2"/>
          <table:table-cell table:style-name="ce54" table:formula="of:=IF(AND(UPPER(TRIM([.A818]))=&quot;YES&quot;;UPPER(TRIM([.D818]))=&quot;YES&quot;;UPPER(TRIM([.G818]))=&quot;YES&quot;;UPPER(TRIM([.J818]))=&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VERIFIED PUBLISHED&quot;;&quot;NOT VERIFIED&quot;)" office:value-type="string" office:string-value="VERIFIED PUBLISHED" ns42:value-type="string" table:number-columns-spanned="3" table:number-rows-spanned="1">
            <text:p>VERIFIED PUBLISHED</text:p>
          </table:table-cell>
          <table:covered-table-cell table:number-columns-repeated="2"/>
        </table:table-row>
        <table:table-row table:style-name="ro5">
          <table:table-cell table:style-name="ce52" office:value-type="string" ns42:value-type="string" table:number-columns-spanned="18" table:number-rows-spanned="1">
            <text:p>🔗 LISTED ELIGIBILITY REVALIDATION</text:p>
          </table:table-cell>
          <table:covered-table-cell table:number-columns-repeated="17"/>
        </table:table-row>
        <table:table-row table:style-name="ro5">
          <table:table-cell table:style-name="ce53" office:value-type="string" ns42:value-type="string" table:number-columns-spanned="4" table:number-rows-spanned="1">
            <text:p>VERIFIED PUBLICATION</text:p>
          </table:table-cell>
          <table:covered-table-cell table:number-columns-repeated="3"/>
          <table:table-cell table:style-name="ce53" office:value-type="string" ns42:value-type="string" table:number-columns-spanned="5" table:number-rows-spanned="1">
            <text:p>PUBLICATION CONSEQUENCE</text:p>
          </table:table-cell>
          <table:covered-table-cell table:number-columns-repeated="4"/>
          <table:table-cell table:style-name="ce53" office:value-type="string" ns42:value-type="string" table:number-columns-spanned="5" table:number-rows-spanned="1">
            <text:p>LISTED TRANSITION ELIGIBILITY</text:p>
          </table:table-cell>
          <table:covered-table-cell table:number-columns-repeated="4"/>
          <table:table-cell table:style-name="ce53" office:value-type="string" ns42:value-type="string" table:number-columns-spanned="4" table:number-rows-spanned="1">
            <text:p>AUTHORITATIVE INVENTORY STATE WRITE</text:p>
          </table:table-cell>
          <table:covered-table-cell table:number-columns-repeated="3"/>
        </table:table-row>
        <table:table-row table:style-name="ro21">
          <table:table-cell table:style-name="ce54" table:formula="of:=[.M818]" office:value-type="string" office:string-value="YES" ns42:value-type="string" table:number-columns-spanned="4" table:number-rows-spanned="1">
            <text:p>YES</text:p>
          </table:table-cell>
          <table:covered-table-cell table:number-columns-repeated="3"/>
          <table:table-cell table:style-name="ce54" table:formula="of:=IF(UPPER(TRIM([.A821]))=&quot;YES&quot;;&quot;PUBLICATION VERIFIED&quot;;&quot;NONE&quot;)" office:value-type="string" office:string-value="PUBLICATION VERIFIED" ns42:value-type="string" table:number-columns-spanned="5" table:number-rows-spanned="1">
            <text:p>PUBLICATION VERIFIED</text:p>
          </table:table-cell>
          <table:covered-table-cell table:number-columns-repeated="4"/>
          <table:table-cell table:style-name="ce54" table:formula="of:=IF(AND(UPPER(TRIM([.A821]))=&quot;YES&quot;;UPPER(TRIM([.E821]))=&quot;PUBLICATION VERIFIED&quot;);&quot;ELIGIBLE&quot;;&quot;NOT ELIGIBLE&quot;)" office:value-type="string" office:string-value="ELIGIBLE" ns42:value-type="string" table:number-columns-spanned="5" table:number-rows-spanned="1">
            <text:p>ELIGIBLE</text:p>
          </table:table-cell>
          <table:covered-table-cell table:number-columns-repeated="4"/>
          <table:table-cell table:style-name="ce54" table:formula="of:=&quot;NO&quot;" office:value-type="string" office:string-value="NO" ns42:value-type="string" table:number-columns-spanned="4" table:number-rows-spanned="1">
            <text:p>NO</text:p>
          </table:table-cell>
          <table:covered-table-cell table:number-columns-repeated="3"/>
        </table:table-row>
        <table:table-row table:style-name="ro5">
          <table:table-cell table:style-name="ce52" office:value-type="string" ns42:value-type="string" table:number-columns-spanned="18" table:number-rows-spanned="1">
            <text:p>🚫 FAIL-CLOSED VERIFIED PUBLICATION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PUBLICATION</text:p>
          </table:table-cell>
          <table:covered-table-cell table:number-columns-repeated="4"/>
          <table:table-cell table:style-name="ce53" office:value-type="string" ns42:value-type="string" table:number-columns-spanned="5" table:number-rows-spanned="1">
            <text:p>LISTED ELIGIBILITY</text:p>
          </table:table-cell>
          <table:covered-table-cell table:number-columns-repeated="4"/>
        </table:table-row>
        <table:table-row table:style-name="ro5">
          <table:table-cell table:style-name="ce54" office:value-type="string" ns42:value-type="string" table:number-columns-spanned="8" table:number-rows-spanned="1">
            <text:p>SUCCESS WITHOUT LISTING ID</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ATTEMPT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PUBLICATION GATE · BUILD 260</text:p>
          </table:table-cell>
          <table:covered-table-cell table:number-columns-repeated="17"/>
        </table:table-row>
        <table:table-row table:style-name="ro5">
          <table:table-cell table:style-name="ce54" office:value-type="string" ns42:value-type="string" table:number-columns-spanned="18" table:number-rows-spanned="1">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LISTED TRANSITION EXECUTION · BUILDS 261–28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PUBLICATION BECOME AUTHORITATIVE LIST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PUBLICATION ≠ LISTE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LISTED TRANSITION REQUEST · BUILDS 261–265</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ADY TO LIST → LIST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J82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39]))=&quot;INV-000001&quot;;UPPER(TRIM([.E839]))=&quot;READY TO LIST → LISTED&quot;;UPPER(TRIM([.J83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3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1]))=&quot;YES&quot;;UPPER(TRIM([.E841]))=&quot;YES&quot;;UPPER(TRIM([.J84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LISTED TRANSITION AUTHORITY · BUILDS 266–27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PUBLIC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B726]))=&quot;READY TO LIST&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4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3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44]))=&quot;YES&quot;;UPPER(TRIM([.D844]))=&quot;YES&quot;;UPPER(TRIM([.H844]))=&quot;YES&quot;;UPPER(TRIM([.L84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TATE WRITE · BUILDS 271–275</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LISTED TRANSITION</text:p>
          </table:table-cell>
          <table:covered-table-cell table:number-columns-repeated="3"/>
          <table:table-cell table:style-name="ce54" table:formula="of:=IF(UPPER(TRIM([.O84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7]))=&quot;EXECUTE LISTED TRANSITION&quot;;UPPER(TRIM([.E84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4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47]))=&quot;YES&quot;;&quot;LISTED&quot;;&quot;READY TO LIST&quot;)" office:value-type="string" office:string-value="LISTED" ns42:value-type="string" table:number-columns-spanned="3" table:number-rows-spanned="1">
            <text:p>LISTED</text:p>
          </table:table-cell>
          <table:covered-table-cell table:number-columns-repeated="2"/>
        </table:table-row>
        <table:table-row table:style-name="ro5">
          <table:table-cell table:style-name="ce52" office:value-type="string" ns42:value-type="string" table:number-columns-spanned="18" table:number-rows-spanned="1">
            <text:p>📜 APPEND-ONLY LISTED TRANSITION HISTORY · BUILDS 276–277</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2</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READY TO LIST</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278–2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47]" office:value-type="string" office:string-value="YES" ns42:value-type="string" table:number-columns-spanned="3" table:number-rows-spanned="1">
            <text:p>YES</text:p>
          </table:table-cell>
          <table:covered-table-cell table:number-columns-repeated="2"/>
          <table:table-cell table:style-name="ce54" table:formula="of:=IF(AND(UPPER(TRIM([.D850]))=&quot;INV-000001&quot;;UPPER(TRIM([.G850]))=&quot;READY TO LIST&quot;;UPPER(TRIM([.J850]))=&quot;LISTED&quot;;UPPER(TRIM([.P85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47]))=UPPER(TRIM([.J85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53]))=&quot;YES&quot;;UPPER(TRIM([.D853]))=&quot;YES&quot;;UPPER(TRIM([.G85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85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85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LISTED TRANSITION EXECUTION GATE · BUILD 280</text:p>
          </table:table-cell>
          <table:covered-table-cell table:number-columns-repeated="17"/>
        </table:table-row>
        <table:table-row table:style-name="ro5">
          <table:table-cell table:style-name="ce54" office:value-type="string" ns42:value-type="string" table:number-columns-spanned="18" table:number-rows-spanned="1">
            <text:p>VERIFIED PUBLICATION → ELIGIBILITY ONLY · EXPLICIT REQUEST + GRANTED AUTHORITY + EXECUTION COMMIT REQUIRED · CONTROLLED WRITE DERIVES LISTE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CONTROLLED SALE EVIDENCE · BUILDS 281–320</text:p>
          </table:table-cell>
          <table:covered-table-cell table:number-columns-repeated="17"/>
        </table:table-row>
        <table:table-row table:style-name="ro5">
          <table:table-cell table:style-name="ce53" office:value-type="string" ns42:value-type="string" table:number-columns-spanned="6" table:number-rows-spanned="1">
            <text:p>SAL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 LISTED ASSET BECOME VERIFIED SOLD?</text:p>
          </table:table-cell>
          <table:covered-table-cell table:number-columns-repeated="5"/>
          <table:table-cell table:style-name="ce54" office:value-type="string" ns42:value-type="string" table:number-columns-spanned="6" table:number-rows-spanned="1">
            <text:p>INTAKE + IDENTITY + VALUE + QUANTITY + CROSS-CHECK</text:p>
          </table:table-cell>
          <table:covered-table-cell table:number-columns-repeated="5"/>
          <table:table-cell table:style-name="ce54" office:value-type="string" ns42:value-type="string" table:number-columns-spanned="6" table:number-rows-spanned="1">
            <text:p>LISTED ≠ SOLD · SALE CLAIM ≠ VERIFIED SALE</text:p>
          </table:table-cell>
          <table:covered-table-cell table:number-columns-repeated="5"/>
        </table:table-row>
        <table:table-row table:style-name="ro5">
          <table:table-cell table:style-name="ce52" office:value-type="string" ns42:value-type="string" table:number-columns-spanned="18" table:number-rows-spanned="1">
            <text:p>📥 SALE EVIDENCE INTAKE · BUILDS 281–29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cell table:style-name="ce53" office:value-type="string" ns42:value-type="string" table:number-columns-spanned="3" table:number-rows-spanned="1">
            <text:p>SALE RECEIVED?</text:p>
          </table:table-cell>
          <table:covered-table-cell table:number-columns-repeated="2"/>
          <table:table-cell table:style-name="ce53" office:value-type="string" ns42:value-type="string" table:number-columns-spanned="3" table:number-rows-spanned="1">
            <text:p>SALE STATUS</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row>
        <table:table-row table:style-name="ro5">
          <table:table-cell table:style-name="ce53" office:value-type="string" ns42:value-type="string" table:number-columns-spanned="5" table:number-rows-spanned="1">
            <text:p>SALE REFERENCE</text:p>
          </table:table-cell>
          <table:covered-table-cell table:number-columns-repeated="4"/>
          <table:table-cell table:style-name="ce53" office:value-type="string" ns42:value-type="string" table:number-columns-spanned="5" table:number-rows-spanned="1">
            <text:p>SOLD AT</text:p>
          </table:table-cell>
          <table:covered-table-cell table:number-columns-repeated="4"/>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row>
        <table:table-row table:style-name="ro5">
          <table:table-cell table:style-name="ce54" office:value-type="string" ns42:value-type="string" table:number-columns-spanned="5" table:number-rows-spanned="1">
            <text:p>EBAY-SALE-REF-000001</text:p>
          </table:table-cell>
          <table:covered-table-cell table:number-columns-repeated="4"/>
          <table:table-cell table:style-name="ce54" office:value-type="string" ns42:value-type="string" table:number-columns-spanned="5" table:number-rows-spanned="1">
            <text:p>2026-07-06T20:30:00-04:00</text:p>
          </table:table-cell>
          <table:covered-table-cell table:number-columns-repeated="4"/>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4" table:number-rows-spanned="1">
            <text:p>1</text:p>
          </table:table-cell>
          <table:covered-table-cell table:number-columns-repeated="3"/>
        </table:table-row>
        <table:table-row table:style-name="ro5">
          <table:table-cell table:style-name="ce52" office:value-type="string" ns42:value-type="string" table:number-columns-spanned="18" table:number-rows-spanned="1">
            <text:p>🔗 SALE IDENTITY + MARKETPLACE MATCH · BUILDS 291–300</text:p>
          </table:table-cell>
          <table:covered-table-cell table:number-columns-repeated="17"/>
        </table:table-row>
        <table:table-row table:style-name="ro5">
          <table:table-cell table:style-name="ce53" office:value-type="string" ns42:value-type="string" table:number-columns-spanned="3" table:number-rows-spanned="1">
            <text:p>AUTHORITATIVE STATE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PLATFORM MATCH</text:p>
          </table:table-cell>
          <table:covered-table-cell table:number-columns-repeated="2"/>
          <table:table-cell table:style-name="ce53" office:value-type="string" ns42:value-type="string" table:number-columns-spanned="3" table:number-rows-spanned="1">
            <text:p>LISTING ID MATCH</text:p>
          </table:table-cell>
          <table:covered-table-cell table:number-columns-repeated="2"/>
          <table:table-cell table:style-name="ce53" office:value-type="string" ns42:value-type="string" table:number-columns-spanned="3" table:number-rows-spanned="1">
            <text:p>SALE RECEIVED VALID</text:p>
          </table:table-cell>
          <table:covered-table-cell table:number-columns-repeated="2"/>
          <table:table-cell table:style-name="ce53" office:value-type="string" ns42:value-type="string" table:number-columns-spanned="3" table:number-rows-spanned="1">
            <text:p>SALE STATUS VALID</text:p>
          </table:table-cell>
          <table:covered-table-cell table:number-columns-repeated="2"/>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61]))=&quot;INV-000001&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61]))=&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61]))=&quot;EBAY-1234567890&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61]))=&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61]))=&quot;SOLD&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AMOUNT + QUANTITY VALIDATION · BUILDS 301–310</text:p>
          </table:table-cell>
          <table:covered-table-cell table:number-columns-repeated="17"/>
        </table:table-row>
        <table:table-row table:style-name="ro5">
          <table:table-cell table:style-name="ce53" office:value-type="string" ns42:value-type="string" table:number-columns-spanned="4" table:number-rows-spanned="1">
            <text:p>SALE REFERENCE PRESENT</text:p>
          </table:table-cell>
          <table:covered-table-cell table:number-columns-repeated="3"/>
          <table:table-cell table:style-name="ce53" office:value-type="string" ns42:value-type="string" table:number-columns-spanned="4" table:number-rows-spanned="1">
            <text:p>SOLD TIME PRESENT</text:p>
          </table:table-cell>
          <table:covered-table-cell table:number-columns-repeated="3"/>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4" table:number-rows-spanned="1">
            <text:p>SALE EVIDENCE COMPLETE</text:p>
          </table:table-cell>
          <table:covered-table-cell table:number-columns-repeated="3"/>
        </table:table-row>
        <table:table-row table:style-name="ro21">
          <table:table-cell table:style-name="ce54" table:formula="of:=IF(UPPER(TRIM([.A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VALUE([.K863])&gt;0;&quot;YES&quot;;&quot;NO&quot;)" office:value-type="string" office:string-value="YES" ns42:value-type="string" table:number-columns-spanned="3" table:number-rows-spanned="1">
            <text:p>YES</text:p>
          </table:table-cell>
          <table:covered-table-cell table:number-columns-repeated="2"/>
          <table:table-cell table:style-name="ce54" table:formula="of:=IF(VALUE([.O863])&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office:value-type="string" office:string-value="YES" ns42:value-type="string" table:number-columns-spanned="4" table:number-rows-spanned="1">
            <text:p>YES</text:p>
          </table:table-cell>
          <table:covered-table-cell table:number-columns-repeated="3"/>
        </table:table-row>
        <table:table-row table:style-name="ro5">
          <table:table-cell table:style-name="ce52" office:value-type="string" ns42:value-type="string" table:number-columns-spanned="18" table:number-rows-spanned="1">
            <text:p>✅ VERIFIED SALE CROSS-CHECK · BUILDS 311–320</text:p>
          </table:table-cell>
          <table:covered-table-cell table:number-columns-repeated="17"/>
        </table:table-row>
        <table:table-row table:style-name="ro5">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ALE EVIDENCE COMPLETE</text:p>
          </table:table-cell>
          <table:covered-table-cell table:number-columns-repeated="2"/>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SALE CONSEQUENCE</text:p>
          </table:table-cell>
          <table:covered-table-cell table:number-columns-repeated="2"/>
          <table:table-cell table:style-name="ce53" office:value-type="string" ns42:value-type="string" table:number-columns-spanned="3" table:number-rows-spanned="1">
            <text:p>SOLD TRANSITION ELIGIBILITY</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row>
        <table:table-row table:style-name="ro21">
          <table:table-cell table:style-name="ce54" table:formula="of:=IF(AND(UPPER(TRIM([.A866]))=&quot;YES&quot;;UPPER(TRIM([.D866]))=&quot;YES&quot;;UPPER(TRIM([.G866]))=&quot;YES&quot;;UPPER(TRIM([.J866]))=&quot;YES&quot;);&quot;YES&quot;;&quot;NO&quot;)" office:value-type="string" office:string-value="YES" ns42:value-type="string" table:number-columns-spanned="3" table:number-rows-spanned="1">
            <text:p>YES</text:p>
          </table:table-cell>
          <table:covered-table-cell table:number-columns-repeated="2"/>
          <table:table-cell table:style-name="ce54" table:formula="of:=[.O869]" office:value-type="string" office:string-value="YES" ns42:value-type="string" table:number-columns-spanned="3" table:number-rows-spanned="1">
            <text:p>YES</text:p>
          </table:table-cell>
          <table:covered-table-cell table:number-columns-repeated="2"/>
          <table:table-cell table:style-name="ce54" table:formula="of:=IF(AND(UPPER(TRIM([.A872]))=&quot;YES&quot;;UPPER(TRIM([.D87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SALE VERIFIED&quot;;&quot;NONE&quot;)" office:value-type="string" office:string-value="SALE VERIFIED" ns42:value-type="string" table:number-columns-spanned="3" table:number-rows-spanned="1">
            <text:p>SALE VERIFIED</text:p>
          </table:table-cell>
          <table:covered-table-cell table:number-columns-repeated="2"/>
          <table:table-cell table:style-name="ce54" table:formula="of:=IF(AND(UPPER(TRIM([.G872]))=&quot;YES&quot;;UPPER(TRIM([.J872]))=&quot;SALE VERIFIED&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quot;NO&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FAIL-CLOSED SALE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SALE</text:p>
          </table:table-cell>
          <table:covered-table-cell table:number-columns-repeated="4"/>
          <table:table-cell table:style-name="ce53" office:value-type="string" ns42:value-type="string" table:number-columns-spanned="5" table:number-rows-spanned="1">
            <text:p>SOLD ELIGIBILITY</text:p>
          </table:table-cell>
          <table:covered-table-cell table:number-columns-repeated="4"/>
        </table:table-row>
        <table:table-row table:style-name="ro5">
          <table:table-cell table:style-name="ce54" office:value-type="string" ns42:value-type="string" table:number-columns-spanned="8" table:number-rows-spanned="1">
            <text:p>SALE WITHOUT LISTING ID 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SOLD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AMOUNT</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QUANTITY</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OR 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SALE EVIDENCE GATE · BUILD 320</text:p>
          </table:table-cell>
          <table:covered-table-cell table:number-columns-repeated="17"/>
        </table:table-row>
        <table:table-row table:style-name="ro5">
          <table:table-cell table:style-name="ce54" office:value-type="string" ns42:value-type="string" table:number-columns-spanned="18" table:number-rows-spanned="1">
            <text:p>LISTED ≠ SOLD · SALE CLAIM ≠ VERIFIED SALE · VALID IDENTITY + LISTING MATCH + SALE REFERENCE + SOLD TIME + POSITIVE AMOUNT + POSITIVE QUANTITY REQUIRED · VERIFIED SALE → SOL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SOLD TRANSITION EXECUTION · BUILDS 321–36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BECOME AUTHORITATIVE SOL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ALE ≠ SOL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SOLD TRANSITION REQUEST · BUILDS 321–3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LISTED → SOL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M872]))=&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89]))=&quot;INV-000001&quot;;UPPER(TRIM([.E889]))=&quot;LISTED → SOLD&quot;;UPPER(TRIM([.J88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8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1]))=&quot;YES&quot;;UPPER(TRIM([.E891]))=&quot;YES&quot;;UPPER(TRIM([.J89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OLD TRANSITION AUTHORITY · BUILDS 331–34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SALE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9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8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94]))=&quot;YES&quot;;UPPER(TRIM([.D894]))=&quot;YES&quot;;UPPER(TRIM([.H894]))=&quot;YES&quot;;UPPER(TRIM([.L89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OLD STATE WRITE · BUILDS 341–35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OLD TRANSITION</text:p>
          </table:table-cell>
          <table:covered-table-cell table:number-columns-repeated="3"/>
          <table:table-cell table:style-name="ce54" table:formula="of:=IF(UPPER(TRIM([.O89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7]))=&quot;EXECUTE SOLD TRANSITION&quot;;UPPER(TRIM([.E89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9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97]))=&quot;YES&quot;;&quot;SOLD&quot;;&quot;LISTED&quot;)" office:value-type="string" office:string-value="SOLD" ns42:value-type="string" table:number-columns-spanned="3" table:number-rows-spanned="1">
            <text:p>SOLD</text:p>
          </table:table-cell>
          <table:covered-table-cell table:number-columns-repeated="2"/>
        </table:table-row>
        <table:table-row table:style-name="ro5">
          <table:table-cell table:style-name="ce52" office:value-type="string" ns42:value-type="string" table:number-columns-spanned="18" table:number-rows-spanned="1">
            <text:p>📜 APPEND-ONLY SOLD TRANSITION HISTORY · BUILDS 351–354</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3</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355–3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97]" office:value-type="string" office:string-value="YES" ns42:value-type="string" table:number-columns-spanned="3" table:number-rows-spanned="1">
            <text:p>YES</text:p>
          </table:table-cell>
          <table:covered-table-cell table:number-columns-repeated="2"/>
          <table:table-cell table:style-name="ce54" table:formula="of:=IF(AND(UPPER(TRIM([.D900]))=&quot;INV-000001&quot;;UPPER(TRIM([.G900]))=&quot;LISTED&quot;;UPPER(TRIM([.J900]))=&quot;SOLD&quot;;UPPER(TRIM([.P90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97]))=UPPER(TRIM([.J90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03]))=&quot;YES&quot;;UPPER(TRIM([.D903]))=&quot;YES&quot;;UPPER(TRIM([.G90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0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0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OLD TRANSITION EXECUTION GATE · BUILD 360</text:p>
          </table:table-cell>
          <table:covered-table-cell table:number-columns-repeated="17"/>
        </table:table-row>
        <table:table-row table:style-name="ro5">
          <table:table-cell table:style-name="ce54" office:value-type="string" ns42:value-type="string" table:number-columns-spanned="18" table:number-rows-spanned="1">
            <text:p>VERIFIED SALE → SOLD ELIGIBILITY ONLY · EXPLICIT REQUEST + GRANTED AUTHORITY + EXECUTION COMMIT REQUIRED · CONTROLLED WRITE DERIVES SOL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SALE REVENUE AUTHORITY · BUILDS 361–380</text:p>
          </table:table-cell>
          <table:covered-table-cell table:number-columns-repeated="17"/>
        </table:table-row>
        <table:table-row table:style-name="ro5">
          <table:table-cell table:style-name="ce53" office:value-type="string" ns42:value-type="string" table:number-columns-spanned="6" table:number-rows-spanned="1">
            <text:p>FINANCIAL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VALUE BECOME AUTHORITATIVE REVENUE?</text:p>
          </table:table-cell>
          <table:covered-table-cell table:number-columns-repeated="5"/>
          <table:table-cell table:style-name="ce54" office:value-type="string" ns42:value-type="string" table:number-columns-spanned="6" table:number-rows-spanned="1">
            <text:p>SALE IDENTITY + VERIFIED SALE + AMOUNT + QUANTITY + CROSS-CHECK</text:p>
          </table:table-cell>
          <table:covered-table-cell table:number-columns-repeated="5"/>
          <table:table-cell table:style-name="ce54" office:value-type="string" ns42:value-type="string" table:number-columns-spanned="6" table:number-rows-spanned="1">
            <text:p>SALE CLAIM ≠ REVENUE · SOLD STATE ≠ REVENUE</text:p>
          </table:table-cell>
          <table:covered-table-cell table:number-columns-repeated="5"/>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4" table:number-rows-spanned="1">
            <text:p>VERIFIED SALE</text:p>
          </table:table-cell>
          <table:covered-table-cell table:number-columns-repeated="3"/>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SALE ID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VERIFIED SALE VALID</text:p>
          </table:table-cell>
          <table:covered-table-cell table:number-columns-repeated="2"/>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REVENUE EVIDENCE COMPLETE</text:p>
          </table:table-cell>
          <table:covered-table-cell table:number-columns-repeated="2"/>
        </table:table-row>
        <table:table-row table:style-name="ro21">
          <table:table-cell table:style-name="ce54" table:formula="of:=IF(TRIM([.A9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0]))=UPPER(TRIM([.D867]));&quot;YES&quot;;&quot;NO&quot;)" office:value-type="string" office:string-value="YES" ns42:value-type="string" table:number-columns-spanned="3" table:number-rows-spanned="1">
            <text:p>YES</text:p>
          </table:table-cell>
          <table:covered-table-cell table:number-columns-repeated="2"/>
          <table:table-cell table:style-name="ce54" table:formula="of:=IF(UPPER(TRIM([.H910]))=UPPER(TRIM([.G870]));&quot;YES&quot;;&quot;NO&quot;)" office:value-type="string" office:string-value="YES" ns42:value-type="string" table:number-columns-spanned="3" table:number-rows-spanned="1">
            <text:p>YES</text:p>
          </table:table-cell>
          <table:covered-table-cell table:number-columns-repeated="2"/>
          <table:table-cell table:style-name="ce54" table:formula="of:=IF(VALUE([.L910])&gt;0;&quot;YES&quot;;&quot;NO&quot;)" office:value-type="string" office:string-value="YES" ns42:value-type="string" table:number-columns-spanned="3" table:number-rows-spanned="1">
            <text:p>YES</text:p>
          </table:table-cell>
          <table:covered-table-cell table:number-columns-repeated="2"/>
          <table:table-cell table:style-name="ce54" table:formula="of:=IF(VALUE([.P910])&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12]))=&quot;YES&quot;;UPPER(TRIM([.D912]))=&quot;YES&quot;;UPPER(TRIM([.G912]))=&quot;YES&quot;;UPPER(TRIM([.J912]))=&quot;YES&quot;;UPPER(TRIM([.M912]))=&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REVENUE CROSS-CHECK · BUILDS 371–380</text:p>
          </table:table-cell>
          <table:covered-table-cell table:number-columns-repeated="17"/>
        </table:table-row>
        <table:table-row table:style-name="ro5">
          <table:table-cell table:style-name="ce53" office:value-type="string" ns42:value-type="string" table:number-columns-spanned="5" table:number-rows-spanned="1">
            <text:p>REVENUE EVIDENCE COMPLETE</text:p>
          </table:table-cell>
          <table:covered-table-cell table:number-columns-repeated="4"/>
          <table:table-cell table:style-name="ce53" office:value-type="string" ns42:value-type="string" table:number-columns-spanned="4" table:number-rows-spanned="1">
            <text:p>SALE IDENTITY VALID</text:p>
          </table:table-cell>
          <table:covered-table-cell table:number-columns-repeated="3"/>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REVENUE RESULT</text:p>
          </table:table-cell>
          <table:covered-table-cell table:number-columns-repeated="3"/>
        </table:table-row>
        <table:table-row table:style-name="ro21">
          <table:table-cell table:style-name="ce54" table:formula="of:=[.P912]" office:value-type="string" office:string-value="YES" ns42:value-type="string" table:number-columns-spanned="5" table:number-rows-spanned="1">
            <text:p>YES</text:p>
          </table:table-cell>
          <table:covered-table-cell table:number-columns-repeated="4"/>
          <table:table-cell table:style-name="ce54" table:formula="of:=IF(AND(UPPER(TRIM([.A912]))=&quot;YES&quot;;UPPER(TRIM([.D912]))=&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15]))=&quot;YES&quot;;UPPER(TRIM([.F915]))=&quot;YES&quot;);[.L910];&quot;0.00&quot;)" office:value-type="string" office:string-value="102.00" ns42:value-type="string" table:number-columns-spanned="5" table:number-rows-spanned="1">
            <text:p>102.00</text:p>
          </table:table-cell>
          <table:covered-table-cell table:number-columns-repeated="4"/>
          <table:table-cell table:style-name="ce54" table:formula="of:=IF(VALUE([.J915])&gt;0;&quot;REVENUE VERIFIED&quot;;&quot;REVENUE NOT VERIFIED&quot;)" office:value-type="string" office:string-value="REVENUE VERIFIED" ns42:value-type="string" table:number-columns-spanned="4" table:number-rows-spanned="1">
            <text:p>REVENUE VERIFIED</text:p>
          </table:table-cell>
          <table:covered-table-cell table:number-columns-repeated="3"/>
        </table:table-row>
        <table:table-row table:style-name="ro5">
          <table:table-cell table:style-name="ce52" office:value-type="string" ns42:value-type="string" table:number-columns-spanned="18" table:number-rows-spanned="1">
            <text:p>🏪 MARKETPLACE FEE EVIDENCE · BUILDS 381–400</text:p>
          </table:table-cell>
          <table:covered-table-cell table:number-columns-repeated="17"/>
        </table:table-row>
        <table:table-row table:style-name="ro5">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FEE EVIDENCE RECEIVED</text:p>
          </table:table-cell>
          <table:covered-table-cell table:number-columns-repeated="3"/>
          <table:table-cell table:style-name="ce53" office:value-type="string" ns42:value-type="string" table:number-columns-spanned="4" table:number-rows-spanned="1">
            <text:p>MARKETPLACE FEE</text:p>
          </table:table-cell>
          <table:covered-table-cell table:number-columns-repeated="3"/>
          <table:table-cell table:style-name="ce53" office:value-type="string" ns42:value-type="string" table:number-columns-spanned="4" table:number-rows-spanned="1">
            <text:p>FEE REFERENCE</text:p>
          </table:table-cell>
          <table:covered-table-cell table:number-columns-repeated="3"/>
        </table:table-row>
        <table:table-row table:style-name="ro5">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3.26</text:p>
          </table:table-cell>
          <table:covered-table-cell table:number-columns-repeated="3"/>
          <table:table-cell table:style-name="ce54" office:value-type="string" ns42:value-type="string" table:number-columns-spanned="4" table:number-rows-spanned="1">
            <text:p>EBAY-FEE-REF-000001</text:p>
          </table:table-cell>
          <table:covered-table-cell table:number-columns-repeated="3"/>
        </table:table-row>
        <table:table-row table:style-name="ro5">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FEE RECEIVED VALID</text:p>
          </table:table-cell>
          <table:covered-table-cell table:number-columns-repeated="2"/>
          <table:table-cell table:style-name="ce53" office:value-type="string" ns42:value-type="string" table:number-columns-spanned="3" table:number-rows-spanned="1">
            <text:p>FEE AMOUNT VALID</text:p>
          </table:table-cell>
          <table:covered-table-cell table:number-columns-repeated="2"/>
          <table:table-cell table:style-name="ce53" office:value-type="string" ns42:value-type="string" table:number-columns-spanned="3" table:number-rows-spanned="1">
            <text:p>FEE REFERENCE PRESENT</text:p>
          </table:table-cell>
          <table:covered-table-cell table:number-columns-repeated="2"/>
          <table:table-cell table:style-name="ce53" office:value-type="string" ns42:value-type="string" table:number-columns-spanned="3" table:number-rows-spanned="1">
            <text:p>FEE EVIDENCE COMPLETE</text:p>
          </table:table-cell>
          <table:covered-table-cell table:number-columns-repeated="2"/>
        </table:table-row>
        <table:table-row table:style-name="ro21">
          <table:table-cell table:style-name="ce54" table:formula="of:=IF(UPPER(TRIM([.A918]))=&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8]))=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G918]))=&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K918])&gt;=0;&quot;YES&quot;;&quot;NO&quot;)" office:value-type="string" office:string-value="YES" ns42:value-type="string" table:number-columns-spanned="3" table:number-rows-spanned="1">
            <text:p>YES</text:p>
          </table:table-cell>
          <table:covered-table-cell table:number-columns-repeated="2"/>
          <table:table-cell table:style-name="ce54" table:formula="of:=IF(TRIM([.O918])&lt;&gt;&quot;&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0]))=&quot;YES&quot;;UPPER(TRIM([.D920]))=&quot;YES&quot;;UPPER(TRIM([.G920]))=&quot;YES&quot;;UPPER(TRIM([.J920]))=&quot;YES&quot;;UPPER(TRIM([.M920]))=&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MARKETPLACE FEE AUTHORITY · BUILDS 391–400</text:p>
          </table:table-cell>
          <table:covered-table-cell table:number-columns-repeated="17"/>
        </table:table-row>
        <table:table-row table:style-name="ro5">
          <table:table-cell table:style-name="ce53" office:value-type="string" ns42:value-type="string" table:number-columns-spanned="5" table:number-rows-spanned="1">
            <text:p>FEE EVIDENCE COMPLETE</text:p>
          </table:table-cell>
          <table:covered-table-cell table:number-columns-repeated="4"/>
          <table:table-cell table:style-name="ce53" office:value-type="string" ns42:value-type="string" table:number-columns-spanned="4" table:number-rows-spanned="1">
            <text:p>REVENUE VERIFIED</text:p>
          </table:table-cell>
          <table:covered-table-cell table:number-columns-repeated="3"/>
          <table:table-cell table:style-name="ce53" office:value-type="string" ns42:value-type="string" table:number-columns-spanned="5" table:number-rows-spanned="1">
            <text:p>AUTHORITATIVE MARKETPLACE FEE</text:p>
          </table:table-cell>
          <table:covered-table-cell table:number-columns-repeated="4"/>
          <table:table-cell table:style-name="ce53" office:value-type="string" ns42:value-type="string" table:number-columns-spanned="4" table:number-rows-spanned="1">
            <text:p>FEE RESULT</text:p>
          </table:table-cell>
          <table:covered-table-cell table:number-columns-repeated="3"/>
        </table:table-row>
        <table:table-row table:style-name="ro21">
          <table:table-cell table:style-name="ce54" table:formula="of:=[.P920]" office:value-type="string" office:string-value="YES" ns42:value-type="string" table:number-columns-spanned="5" table:number-rows-spanned="1">
            <text:p>YES</text:p>
          </table:table-cell>
          <table:covered-table-cell table:number-columns-repeated="4"/>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23]))=&quot;YES&quot;;UPPER(TRIM([.F923]))=&quot;YES&quot;);[.K918];&quot;0.00&quot;)" office:value-type="string" office:string-value="13.26" ns42:value-type="string" table:number-columns-spanned="5" table:number-rows-spanned="1">
            <text:p>13.26</text:p>
          </table:table-cell>
          <table:covered-table-cell table:number-columns-repeated="4"/>
          <table:table-cell table:style-name="ce54" table:formula="of:=IF(AND(UPPER(TRIM([.A923]))=&quot;YES&quot;;UPPER(TRIM([.F923]))=&quot;YES&quot;);&quot;FEE VERIFIED&quot;;&quot;FEE NOT VERIFIED&quot;)" office:value-type="string" office:string-value="FEE VERIFIED" ns42:value-type="string" table:number-columns-spanned="4" table:number-rows-spanned="1">
            <text:p>FEE VERIFIED</text:p>
          </table:table-cell>
          <table:covered-table-cell table:number-columns-repeated="3"/>
        </table:table-row>
        <table:table-row table:style-name="ro5">
          <table:table-cell table:style-name="ce52" office:value-type="string" ns42:value-type="string" table:number-columns-spanned="18" table:number-rows-spanned="1">
            <text:p>📦 SHIPPING + PACKAGING COST EVIDENCE · BUILDS 401–42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SHIPPING COST RECEIVED</text:p>
          </table:table-cell>
          <table:covered-table-cell table:number-columns-repeated="3"/>
          <table:table-cell table:style-name="ce53" office:value-type="string" ns42:value-type="string" table:number-columns-spanned="4" table:number-rows-spanned="1">
            <text:p>SHIPPING COST</text:p>
          </table:table-cell>
          <table:covered-table-cell table:number-columns-repeated="3"/>
          <table:table-cell table:style-name="ce53" office:value-type="string" ns42:value-type="string" table:number-columns-spanned="4" table:number-rows-spanned="1">
            <text:p>PACKAGING COST RECEIVED</text:p>
          </table:table-cell>
          <table:covered-table-cell table:number-columns-repeated="3"/>
          <table:table-cell table:style-name="ce53" office:value-type="string" ns42:value-type="string" table:number-columns-spanned="3" table:number-rows-spanned="1">
            <text:p>PACKAGING COST</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25</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3" table:number-rows-spanned="1">
            <text:p>0.75</text:p>
          </table:table-cell>
          <table:covered-table-cell table:number-columns-repeated="2"/>
        </table:table-row>
        <table:table-row table:style-name="ro5">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SHIPPING RECEIVED VALID</text:p>
          </table:table-cell>
          <table:covered-table-cell table:number-columns-repeated="2"/>
          <table:table-cell table:style-name="ce53" office:value-type="string" ns42:value-type="string" table:number-columns-spanned="3" table:number-rows-spanned="1">
            <text:p>SHIPPING AMOUNT VALID</text:p>
          </table:table-cell>
          <table:covered-table-cell table:number-columns-repeated="2"/>
          <table:table-cell table:style-name="ce53" office:value-type="string" ns42:value-type="string" table:number-columns-spanned="3" table:number-rows-spanned="1">
            <text:p>PACKAGING RECEIVED VALID</text:p>
          </table:table-cell>
          <table:covered-table-cell table:number-columns-repeated="2"/>
          <table:table-cell table:style-name="ce53" office:value-type="string" ns42:value-type="string" table:number-columns-spanned="3" table:number-rows-spanned="1">
            <text:p>PACKAGING AMOUNT VALID</text:p>
          </table:table-cell>
          <table:covered-table-cell table:number-columns-repeated="2"/>
          <table:table-cell table:style-name="ce53" office:value-type="string" ns42:value-type="string" table:number-columns-spanned="3" table:number-rows-spanned="1">
            <text:p>COST EVIDENCE COMPLETE</text:p>
          </table:table-cell>
          <table:covered-table-cell table:number-columns-repeated="2"/>
        </table:table-row>
        <table:table-row table:style-name="ro21">
          <table:table-cell table:style-name="ce54" table:formula="of:=IF(UPPER(TRIM([.A926]))=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D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H926])&gt;=0;&quot;YES&quot;;&quot;NO&quot;)" office:value-type="string" office:string-value="YES" ns42:value-type="string" table:number-columns-spanned="3" table:number-rows-spanned="1">
            <text:p>YES</text:p>
          </table:table-cell>
          <table:covered-table-cell table:number-columns-repeated="2"/>
          <table:table-cell table:style-name="ce54" table:formula="of:=IF(UPPER(TRIM([.L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P92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8]))=&quot;YES&quot;;UPPER(TRIM([.D928]))=&quot;YES&quot;;UPPER(TRIM([.G928]))=&quot;YES&quot;;UPPER(TRIM([.J928]))=&quot;YES&quot;;UPPER(TRIM([.M92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SALE COST EVIDENCE GATE · BUILD 420</text:p>
          </table:table-cell>
          <table:covered-table-cell table:number-columns-repeated="17"/>
        </table:table-row>
        <table:table-row table:style-name="ro5">
          <table:table-cell table:style-name="ce53" office:value-type="string" ns42:value-type="string" table:number-columns-spanned="4" table:number-rows-spanned="1">
            <text:p>COST EVIDENCE COMPLETE</text:p>
          </table:table-cell>
          <table:covered-table-cell table:number-columns-repeated="3"/>
          <table:table-cell table:style-name="ce53" office:value-type="string" ns42:value-type="string" table:number-columns-spanned="4" table:number-rows-spanned="1">
            <text:p>AUTHORITATIVE SHIPPING COST</text:p>
          </table:table-cell>
          <table:covered-table-cell table:number-columns-repeated="3"/>
          <table:table-cell table:style-name="ce53" office:value-type="string" ns42:value-type="string" table:number-columns-spanned="4" table:number-rows-spanned="1">
            <text:p>AUTHORITATIVE PACKAGING COST</text:p>
          </table:table-cell>
          <table:covered-table-cell table:number-columns-repeated="3"/>
          <table:table-cell table:style-name="ce53" office:value-type="string" ns42:value-type="string" table:number-columns-spanned="3" table:number-rows-spanned="1">
            <text:p>TOTAL FULFILLMENT COST</text:p>
          </table:table-cell>
          <table:covered-table-cell table:number-columns-repeated="2"/>
          <table:table-cell table:style-name="ce53" office:value-type="string" ns42:value-type="string" table:number-columns-spanned="3" table:number-rows-spanned="1">
            <text:p>COST RESULT</text:p>
          </table:table-cell>
          <table:covered-table-cell table:number-columns-repeated="2"/>
        </table:table-row>
        <table:table-row table:style-name="ro21">
          <table:table-cell table:style-name="ce54" table:formula="of:=[.P928]" office:value-type="string" office:string-value="YES" ns42:value-type="string" table:number-columns-spanned="4" table:number-rows-spanned="1">
            <text:p>YES</text:p>
          </table:table-cell>
          <table:covered-table-cell table:number-columns-repeated="3"/>
          <table:table-cell table:style-name="ce54" table:formula="of:=IF(UPPER(TRIM([.A931]))=&quot;YES&quot;;[.H926];&quot;0.00&quot;)" office:value-type="string" office:string-value="5.25" ns42:value-type="string" table:number-columns-spanned="4" table:number-rows-spanned="1">
            <text:p>5.25</text:p>
          </table:table-cell>
          <table:covered-table-cell table:number-columns-repeated="3"/>
          <table:table-cell table:style-name="ce54" table:formula="of:=IF(UPPER(TRIM([.A931]))=&quot;YES&quot;;[.P926];&quot;0.00&quot;)" office:value-type="string" office:string-value="0.75" ns42:value-type="string" table:number-columns-spanned="4" table:number-rows-spanned="1">
            <text:p>0.75</text:p>
          </table:table-cell>
          <table:covered-table-cell table:number-columns-repeated="3"/>
          <table:table-cell table:style-name="ce54" table:formula="of:=IF(UPPER(TRIM([.A931]))=&quot;YES&quot;;VALUE([.E931])+VALUE([.I931]);&quot;0.00&quot;)" office:value-type="string" office:string-value="6.00" ns42:value-type="string" table:number-columns-spanned="3" table:number-rows-spanned="1">
            <text:p>6.00</text:p>
          </table:table-cell>
          <table:covered-table-cell table:number-columns-repeated="2"/>
          <table:table-cell table:style-name="ce54" table:formula="of:=IF(UPPER(TRIM([.A931]))=&quot;YES&quot;;&quot;COST VERIFIED&quot;;&quot;COST NOT VERIFIED&quot;)" office:value-type="string" office:string-value="COST VERIFIED" ns42:value-type="string" table:number-columns-spanned="3" table:number-rows-spanned="1">
            <text:p>COST VERIFIED</text:p>
          </table:table-cell>
          <table:covered-table-cell table:number-columns-repeated="2"/>
        </table:table-row>
        <table:table-row table:style-name="ro5">
          <table:table-cell table:style-name="ce54" office:value-type="string" ns42:value-type="string" table:number-columns-spanned="18" table:number-rows-spanned="1">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number-columns-repeated="17"/>
        </table:table-row>
        <table:table-row table:style-name="ro5">
          <table:table-cell table:style-name="ce52" office:value-type="string" ns42:value-type="string" table:number-columns-spanned="18" table:number-rows-spanned="1">
            <text:p>📦 INVENTORY COST BASIS EVIDENCE · BUILDS 421–4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4" table:number-rows-spanned="1">
            <text:p>SOLD STATE VALID</text:p>
          </table:table-cell>
          <table:covered-table-cell table:number-columns-repeated="3"/>
          <table:table-cell table:style-name="ce53" office:value-type="string" ns42:value-type="string" table:number-columns-spanned="4" table:number-rows-spanned="1">
            <text:p>COST BASIS RECEIVED</text:p>
          </table:table-cell>
          <table:covered-table-cell table:number-columns-repeated="3"/>
          <table:table-cell table:style-name="ce53" office:value-type="string" ns42:value-type="string" table:number-columns-spanned="4" table:number-rows-spanned="1">
            <text:p>UNIT COST BASIS</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0.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SOLD STATE VALID</text:p>
          </table:table-cell>
          <table:covered-table-cell table:number-columns-repeated="2"/>
          <table:table-cell table:style-name="ce53" office:value-type="string" ns42:value-type="string" table:number-columns-spanned="3" table:number-rows-spanned="1">
            <text:p>COST BASIS RECEIVED VALID</text:p>
          </table:table-cell>
          <table:covered-table-cell table:number-columns-repeated="2"/>
          <table:table-cell table:style-name="ce53" office:value-type="string" ns42:value-type="string" table:number-columns-spanned="3" table:number-rows-spanned="1">
            <text:p>UNIT COST VALID</text:p>
          </table:table-cell>
          <table:covered-table-cell table:number-columns-repeated="2"/>
          <table:table-cell table:style-name="ce53" office:value-type="string" ns42:value-type="string" table:number-columns-spanned="3" table:number-rows-spanned="1">
            <text:p>QUANTITY MATCH</text:p>
          </table:table-cell>
          <table:covered-table-cell table:number-columns-repeated="2"/>
          <table:table-cell table:style-name="ce53" office:value-type="string" ns42:value-type="string" table:number-columns-spanned="3" table:number-rows-spanned="1">
            <text:p>COST BASIS EVIDENCE COMPLETE</text:p>
          </table:table-cell>
          <table:covered-table-cell table:number-columns-repeated="2"/>
        </table:table-row>
        <table:table-row table:style-name="ro21">
          <table:table-cell table:style-name="ce54" table:formula="of:=IF(UPPER(TRIM([.A936]))=UPPER(TRIM([.D886]));&quot;YES&quot;;&quot;NO&quot;)" office:value-type="string" office:string-value="YES" ns42:value-type="string" table:number-columns-spanned="3" table:number-rows-spanned="1">
            <text:p>YES</text:p>
          </table:table-cell>
          <table:covered-table-cell table:number-columns-repeated="2"/>
          <table:table-cell table:style-name="ce54" table:formula="of:=IF(UPPER(TRIM([.D93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H93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L936])&gt;=0;&quot;YES&quot;;&quot;NO&quot;)" office:value-type="string" office:string-value="YES" ns42:value-type="string" table:number-columns-spanned="3" table:number-rows-spanned="1">
            <text:p>YES</text:p>
          </table:table-cell>
          <table:covered-table-cell table:number-columns-repeated="2"/>
          <table:table-cell table:style-name="ce54" table:formula="of:=IF(VALUE([.P936])=VALUE([.P91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38]))=&quot;YES&quot;;UPPER(TRIM([.D938]))=&quot;YES&quot;;UPPER(TRIM([.G938]))=&quot;YES&quot;;UPPER(TRIM([.J938]))=&quot;YES&quot;;UPPER(TRIM([.M93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COST BASIS CROSS-CHECK · BUILDS 431–440</text:p>
          </table:table-cell>
          <table:covered-table-cell table:number-columns-repeated="17"/>
        </table:table-row>
        <table:table-row table:style-name="ro5">
          <table:table-cell table:style-name="ce53" office:value-type="string" ns42:value-type="string" table:number-columns-spanned="5" table:number-rows-spanned="1">
            <text:p>COST BASIS EVIDENCE COMPLETE</text:p>
          </table:table-cell>
          <table:covered-table-cell table:number-columns-repeated="4"/>
          <table:table-cell table:style-name="ce53" office:value-type="string" ns42:value-type="string" table:number-columns-spanned="4" table:number-rows-spanned="1">
            <text:p>RECORD IDENTITY VALID</text:p>
          </table:table-cell>
          <table:covered-table-cell table:number-columns-repeated="3"/>
          <table:table-cell table:style-name="ce53" office:value-type="string" ns42:value-type="string" table:number-columns-spanned="5" table:number-rows-spanned="1">
            <text:p>AUTHORITATIVE TOTAL COST BASIS</text:p>
          </table:table-cell>
          <table:covered-table-cell table:number-columns-repeated="4"/>
          <table:table-cell table:style-name="ce53" office:value-type="string" ns42:value-type="string" table:number-columns-spanned="4" table:number-rows-spanned="1">
            <text:p>COST BASIS RESULT</text:p>
          </table:table-cell>
          <table:covered-table-cell table:number-columns-repeated="3"/>
        </table:table-row>
        <table:table-row table:style-name="ro21">
          <table:table-cell table:style-name="ce54" table:formula="of:=[.P938]" office:value-type="string" office:string-value="YES" ns42:value-type="string" table:number-columns-spanned="5" table:number-rows-spanned="1">
            <text:p>YES</text:p>
          </table:table-cell>
          <table:covered-table-cell table:number-columns-repeated="4"/>
          <table:table-cell table:style-name="ce54" table:formula="of:=IF(UPPER(TRIM([.A938]))=&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1]))=&quot;YES&quot;;UPPER(TRIM([.F941]))=&quot;YES&quot;);VALUE([.L936])*VALUE([.P936]);&quot;0.00&quot;)" office:value-type="string" office:string-value="50.00" ns42:value-type="string" table:number-columns-spanned="5" table:number-rows-spanned="1">
            <text:p>50.00</text:p>
          </table:table-cell>
          <table:covered-table-cell table:number-columns-repeated="4"/>
          <table:table-cell table:style-name="ce54" table:formula="of:=IF(VALUE([.J941])&gt;=0;&quot;COST BASIS VERIFIED&quot;;&quot;COST BASIS NOT VERIFIED&quot;)" office:value-type="string" office:string-value="COST BASIS VERIFIED" ns42:value-type="string" table:number-columns-spanned="4" table:number-rows-spanned="1">
            <text:p>COST BASIS VERIFIED</text:p>
          </table:table-cell>
          <table:covered-table-cell table:number-columns-repeated="3"/>
        </table:table-row>
        <table:table-row table:style-name="ro5">
          <table:table-cell table:style-name="ce52" office:value-type="string" ns42:value-type="string" table:number-columns-spanned="18" table:number-rows-spanned="1">
            <text:p>💰 NET PROFIT DERIVATION · BUILDS 441–460</text:p>
          </table:table-cell>
          <table:covered-table-cell table:number-columns-repeated="17"/>
        </table:table-row>
        <table:table-row table:style-name="ro5">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AUTHORITATIVE MARKETPLACE FEE</text:p>
          </table:table-cell>
          <table:covered-table-cell table:number-columns-repeated="3"/>
          <table:table-cell table:style-name="ce53" office:value-type="string" ns42:value-type="string" table:number-columns-spanned="5" table:number-rows-spanned="1">
            <text:p>TOTAL FULFILLMENT COST</text:p>
          </table:table-cell>
          <table:covered-table-cell table:number-columns-repeated="4"/>
          <table:table-cell table:style-name="ce53" office:value-type="string" ns42:value-type="string" table:number-columns-spanned="4" table:number-rows-spanned="1">
            <text:p>AUTHORITATIVE TOTAL COST BASIS</text:p>
          </table:table-cell>
          <table:covered-table-cell table:number-columns-repeated="3"/>
        </table:table-row>
        <table:table-row table:style-name="ro21">
          <table:table-cell table:style-name="ce54" table:formula="of:=[.J915]" office:value-type="string" office:string-value="102.00" ns42:value-type="string" table:number-columns-spanned="5" table:number-rows-spanned="1">
            <text:p>102.00</text:p>
          </table:table-cell>
          <table:covered-table-cell table:number-columns-repeated="4"/>
          <table:table-cell table:style-name="ce54" table:formula="of:=[.J923]" office:value-type="string" office:string-value="13.26" ns42:value-type="string" table:number-columns-spanned="4" table:number-rows-spanned="1">
            <text:p>13.26</text:p>
          </table:table-cell>
          <table:covered-table-cell table:number-columns-repeated="3"/>
          <table:table-cell table:style-name="ce54" table:formula="of:=[.M931]" office:value-type="string" office:string-value="6.00" ns42:value-type="string" table:number-columns-spanned="5" table:number-rows-spanned="1">
            <text:p>6.00</text:p>
          </table:table-cell>
          <table:covered-table-cell table:number-columns-repeated="4"/>
          <table:table-cell table:style-name="ce54" table:formula="of:=[.J941]" office:value-type="string" office:string-value="50.00" ns42:value-type="string" table:number-columns-spanned="4" table:number-rows-spanned="1">
            <text:p>50.00</text:p>
          </table:table-cell>
          <table:covered-table-cell table:number-columns-repeated="3"/>
        </table:table-row>
        <table:table-row table:style-name="ro5">
          <table:table-cell table:style-name="ce53" office:value-type="string" ns42:value-type="string" table:number-columns-spanned="4" table:number-rows-spanned="1">
            <text:p>REVENUE VALID</text:p>
          </table:table-cell>
          <table:covered-table-cell table:number-columns-repeated="3"/>
          <table:table-cell table:style-name="ce53" office:value-type="string" ns42:value-type="string" table:number-columns-spanned="3" table:number-rows-spanned="1">
            <text:p>FEE VALID</text:p>
          </table:table-cell>
          <table:covered-table-cell table:number-columns-repeated="2"/>
          <table:table-cell table:style-name="ce53" office:value-type="string" ns42:value-type="string" table:number-columns-spanned="4" table:number-rows-spanned="1">
            <text:p>FULFILLMENT COST VALID</text:p>
          </table:table-cell>
          <table:covered-table-cell table:number-columns-repeated="3"/>
          <table:table-cell table:style-name="ce53" office:value-type="string" ns42:value-type="string" table:number-columns-spanned="4" table:number-rows-spanned="1">
            <text:p>COST BASIS VALID</text:p>
          </table:table-cell>
          <table:covered-table-cell table:number-columns-repeated="3"/>
          <table:table-cell table:style-name="ce53" office:value-type="string" ns42:value-type="string" table:number-columns-spanned="3" table:number-rows-spanned="1">
            <text:p>NET PROFIT</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41]))=&quot;COST BASIS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6]))=&quot;YES&quot;;UPPER(TRIM([.E946]))=&quot;YES&quot;;UPPER(TRIM([.H946]))=&quot;YES&quot;;UPPER(TRIM([.L946]))=&quot;YES&quot;);VALUE([.A944])-VALUE([.F944])-VALUE([.J944])-VALUE([.O944]);&quot;0.00&quot;)" office:value-type="string" office:string-value="32.74" ns42:value-type="string" table:number-columns-spanned="3" table:number-rows-spanned="1">
            <text:p>32.74</text:p>
          </table:table-cell>
          <table:covered-table-cell table:number-columns-repeated="2"/>
        </table:table-row>
        <table:table-row table:style-name="ro5">
          <table:table-cell table:style-name="ce52" office:value-type="string" ns42:value-type="string" table:number-columns-spanned="18" table:number-rows-spanned="1">
            <text:p>📈 NET PROFIT RESULT · BUILDS 451–460</text:p>
          </table:table-cell>
          <table:covered-table-cell table:number-columns-repeated="17"/>
        </table:table-row>
        <table:table-row table:style-name="ro5">
          <table:table-cell table:style-name="ce53" office:value-type="string" ns42:value-type="string" table:number-columns-spanned="6" table:number-rows-spanned="1">
            <text:p>NET PROFIT</text:p>
          </table:table-cell>
          <table:covered-table-cell table:number-columns-repeated="5"/>
          <table:table-cell table:style-name="ce53" office:value-type="string" ns42:value-type="string" table:number-columns-spanned="6" table:number-rows-spanned="1">
            <text:p>PROFIT STATUS</text:p>
          </table:table-cell>
          <table:covered-table-cell table:number-columns-repeated="5"/>
          <table:table-cell table:style-name="ce53" office:value-type="string" ns42:value-type="string" table:number-columns-spanned="6" table:number-rows-spanned="1">
            <text:p>FINANCIAL COMPONENTS COMPLETE</text:p>
          </table:table-cell>
          <table:covered-table-cell table:number-columns-repeated="5"/>
        </table:table-row>
        <table:table-row table:style-name="ro21">
          <table:table-cell table:style-name="ce54" table:formula="of:=[.P946]" office:value-type="string" office:string-value="32.74" ns42:value-type="string" table:number-columns-spanned="6" table:number-rows-spanned="1">
            <text:p>32.74</text:p>
          </table:table-cell>
          <table:covered-table-cell table:number-columns-repeated="5"/>
          <table:table-cell table:style-name="ce54" table:formula="of:=IF(VALUE([.A949])&gt;0;&quot;PROFIT&quot;;IF(VALUE([.A949])&lt;0;&quot;LOSS&quot;;&quot;BREAK EVEN&quot;))" office:value-type="string" office:string-value="PROFIT" ns42:value-type="string" table:number-columns-spanned="6" table:number-rows-spanned="1">
            <text:p>PROFIT</text:p>
          </table:table-cell>
          <table:covered-table-cell table:number-columns-repeated="5"/>
          <table:table-cell table:style-name="ce54" table:formula="of:=IF(AND(UPPER(TRIM([.A946]))=&quot;YES&quot;;UPPER(TRIM([.E946]))=&quot;YES&quot;;UPPER(TRIM([.H946]))=&quot;YES&quot;;UPPER(TRIM([.L946]))=&quot;YES&quot;);&quot;YES&quot;;&quot;NO&quot;)" office:value-type="string" office:string-value="YES" ns42:value-type="string" table:number-columns-spanned="6" table:number-rows-spanned="1">
            <text:p>YES</text:p>
          </table:table-cell>
          <table:covered-table-cell table:number-columns-repeated="5"/>
        </table:table-row>
        <table:table-row table:style-name="ro5">
          <table:table-cell table:style-name="ce52" office:value-type="string" ns42:value-type="string" table:number-columns-spanned="18" table:number-rows-spanned="1">
            <text:p>🔍 FINANCIAL TRUTH CROSS-CHECK · BUILDS 461–479</text:p>
          </table:table-cell>
          <table:covered-table-cell table:number-columns-repeated="17"/>
        </table:table-row>
        <table:table-row table:style-name="ro5">
          <table:table-cell table:style-name="ce53" office:value-type="string" ns42:value-type="string" table:number-columns-spanned="3" table:number-rows-spanned="1">
            <text:p>REVENUE VERIFIED</text:p>
          </table:table-cell>
          <table:covered-table-cell table:number-columns-repeated="2"/>
          <table:table-cell table:style-name="ce53" office:value-type="string" ns42:value-type="string" table:number-columns-spanned="3" table:number-rows-spanned="1">
            <text:p>FEE VERIFIED</text:p>
          </table:table-cell>
          <table:covered-table-cell table:number-columns-repeated="2"/>
          <table:table-cell table:style-name="ce53" office:value-type="string" ns42:value-type="string" table:number-columns-spanned="3" table:number-rows-spanned="1">
            <text:p>COST VERIFIED</text:p>
          </table:table-cell>
          <table:covered-table-cell table:number-columns-repeated="2"/>
          <table:table-cell table:style-name="ce53" office:value-type="string" ns42:value-type="string" table:number-columns-spanned="3" table:number-rows-spanned="1">
            <text:p>COST BASIS VERIFIED</text:p>
          </table:table-cell>
          <table:covered-table-cell table:number-columns-repeated="2"/>
          <table:table-cell table:style-name="ce53" office:value-type="string" ns42:value-type="string" table:number-columns-spanned="3" table:number-rows-spanned="1">
            <text:p>COMPONENTS COMPLETE</text:p>
          </table:table-cell>
          <table:covered-table-cell table:number-columns-repeated="2"/>
          <table:table-cell table:style-name="ce53" office:value-type="string" ns42:value-type="string" table:number-columns-spanned="3" table:number-rows-spanned="1">
            <text:p>FINANCIAL TRUTH</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41]))=&quot;COST BASIS VERIFIED&quot;;&quot;YES&quot;;&quot;NO&quot;)" office:value-type="string" office:string-value="YES" ns42:value-type="string" table:number-columns-spanned="3" table:number-rows-spanned="1">
            <text:p>YES</text:p>
          </table:table-cell>
          <table:covered-table-cell table:number-columns-repeated="2"/>
          <table:table-cell table:style-name="ce54" table:formula="of:=[.M949]" office:value-type="string" office:string-value="YES" ns42:value-type="string" table:number-columns-spanned="3" table:number-rows-spanned="1">
            <text:p>YES</text:p>
          </table:table-cell>
          <table:covered-table-cell table:number-columns-repeated="2"/>
          <table:table-cell table:style-name="ce54" table:formula="of:=IF(AND(UPPER(TRIM([.A952]))=&quot;YES&quot;;UPPER(TRIM([.D952]))=&quot;YES&quot;;UPPER(TRIM([.G952]))=&quot;YES&quot;;UPPER(TRIM([.J952]))=&quot;YES&quot;;UPPER(TRIM([.M952]))=&quot;YES&quot;);&quot;VERIFIED&quot;;&quot;NOT VERIFI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CONTROLLED FINANCIAL TRUTH CROSS-CHECK GATE · BUILD 480</text:p>
          </table:table-cell>
          <table:covered-table-cell table:number-columns-repeated="17"/>
        </table:table-row>
        <table:table-row table:style-name="ro5">
          <table:table-cell table:style-name="ce53" office:value-type="string" ns42:value-type="string" table:number-columns-spanned="4" table:number-rows-spanned="1">
            <text:p>AUTHORITATIVE GROSS REVENUE</text:p>
          </table:table-cell>
          <table:covered-table-cell table:number-columns-repeated="3"/>
          <table:table-cell table:style-name="ce53" office:value-type="string" ns42:value-type="string" table:number-columns-spanned="4" table:number-rows-spanned="1">
            <text:p>TOTAL DEDUCTIONS</text:p>
          </table:table-cell>
          <table:covered-table-cell table:number-columns-repeated="3"/>
          <table:table-cell table:style-name="ce53" office:value-type="string" ns42:value-type="string" table:number-columns-spanned="4" table:number-rows-spanned="1">
            <text:p>NET PROFIT</text:p>
          </table:table-cell>
          <table:covered-table-cell table:number-columns-repeated="3"/>
          <table:table-cell table:style-name="ce53" office:value-type="string" ns42:value-type="string" table:number-columns-spanned="3" table:number-rows-spanned="1">
            <text:p>PROFIT STATUS</text:p>
          </table:table-cell>
          <table:covered-table-cell table:number-columns-repeated="2"/>
          <table:table-cell table:style-name="ce53" office:value-type="string" ns42:value-type="string" table:number-columns-spanned="3" table:number-rows-spanned="1">
            <text:p>FINANCIAL TRUTH RESULT</text:p>
          </table:table-cell>
          <table:covered-table-cell table:number-columns-repeated="2"/>
        </table:table-row>
        <table:table-row table:style-name="ro21">
          <table:table-cell table:style-name="ce54" table:formula="of:=[.A944]" office:value-type="string" office:string-value="102.00" ns42:value-type="string" table:number-columns-spanned="4" table:number-rows-spanned="1">
            <text:p>102.00</text:p>
          </table:table-cell>
          <table:covered-table-cell table:number-columns-repeated="3"/>
          <table:table-cell table:style-name="ce54" table:formula="of:=VALUE([.F944])+VALUE([.J944])+VALUE([.O944])" office:value-type="string" office:string-value="69.26" ns42:value-type="string" table:number-columns-spanned="4" table:number-rows-spanned="1">
            <text:p>69.26</text:p>
          </table:table-cell>
          <table:covered-table-cell table:number-columns-repeated="3"/>
          <table:table-cell table:style-name="ce54" table:formula="of:=[.A949]" office:value-type="string" office:string-value="32.74" ns42:value-type="string" table:number-columns-spanned="4" table:number-rows-spanned="1">
            <text:p>32.74</text:p>
          </table:table-cell>
          <table:covered-table-cell table:number-columns-repeated="3"/>
          <table:table-cell table:style-name="ce54" table:formula="of:=[.G949]" office:value-type="string" office:string-value="PROFIT" ns42:value-type="string" table:number-columns-spanned="3" table:number-rows-spanned="1">
            <text:p>PROFIT</text:p>
          </table:table-cell>
          <table:covered-table-cell table:number-columns-repeated="2"/>
          <table:table-cell table:style-name="ce54" table:formula="of:=IF(UPPER(TRIM([.P952]))=&quot;VERIFIED&quot;;&quot;FINANCIAL TRUTH VERIFIED&quot;;&quot;FINANCIAL TRUTH NOT VERIFIED&quot;)" office:value-type="string" office:string-value="FINANCIAL TRUTH VERIFIED" ns42:value-type="string" table:number-columns-spanned="3" table:number-rows-spanned="1">
            <text:p>FINANCIAL TRUTH VERIFIED</text:p>
          </table:table-cell>
          <table:covered-table-cell table:number-columns-repeated="2"/>
        </table:table-row>
        <table:table-row table:style-name="ro5">
          <table:table-cell table:style-name="ce54" office:value-type="string" ns42:value-type="string" table:number-columns-spanned="18" table:number-rows-spanned="1">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number-columns-repeated="17"/>
        </table:table-row>
        <table:table-row table:style-name="ro5">
          <table:table-cell table:style-name="ce52" office:value-type="string" ns42:value-type="string" table:number-columns-spanned="18" table:number-rows-spanned="1">
            <text:p>💵 MARKETPLACE SETTLEMENT EVIDENCE INTAKE · BUILDS 481–500</text:p>
          </table:table-cell>
          <table:covered-table-cell table:number-columns-repeated="17"/>
        </table:table-row>
        <table:table-row table:style-name="ro5">
          <table:table-cell table:style-name="ce53" office:value-type="string" ns42:value-type="string" table:number-columns-spanned="6" table:number-rows-spanned="1">
            <text:p>SETTLEMENT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FINANCIAL TRUTH BECOME VERIFIED CASH SETTLEMENT?</text:p>
          </table:table-cell>
          <table:covered-table-cell table:number-columns-repeated="5"/>
          <table:table-cell table:style-name="ce54" office:value-type="string" ns42:value-type="string" table:number-columns-spanned="6" table:number-rows-spanned="1">
            <text:p>SETTLEMENT EVIDENCE + SALE IDENTITY + PLATFORM + PAYOUT + TIME</text:p>
          </table:table-cell>
          <table:covered-table-cell table:number-columns-repeated="5"/>
          <table:table-cell table:style-name="ce54" office:value-type="string" ns42:value-type="string" table:number-columns-spanned="6" table:number-rows-spanned="1">
            <text:p>DERIVED PROFIT ≠ CASH RECEIVED · SETTLEMENT CLAIM ≠ VERIFIED SETTLEMENT</text:p>
          </table:table-cell>
          <table:covered-table-cell table:number-columns-repeated="5"/>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ETTLEMENT RECEIVED</text:p>
          </table:table-cell>
          <table:covered-table-cell table:number-columns-repeated="2"/>
          <table:table-cell table:style-name="ce53" office:value-type="string" ns42:value-type="string" table:number-columns-spanned="3" table:number-rows-spanned="1">
            <text:p>PAYOUT AMOUNT</text:p>
          </table:table-cell>
          <table:covered-table-cell table:number-columns-repeated="2"/>
          <table:table-cell table:style-name="ce53" office:value-type="string" ns42:value-type="string" table:number-columns-spanned="3" table:number-rows-spanned="1">
            <text:p>SETTLED AT</text:p>
          </table:table-cell>
          <table:covered-table-cell table:number-columns-repeated="2"/>
        </table:table-row>
        <table:table-row table:style-name="ro5">
          <table:table-cell table:style-name="ce54" office:value-type="string" ns42:value-type="string" table:number-columns-spanned="3" table:number-rows-spanned="1">
            <text:p>SET-000001</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88.74</text:p>
          </table:table-cell>
          <table:covered-table-cell table:number-columns-repeated="2"/>
          <table:table-cell table:style-name="ce54" office:value-type="string" ns42:value-type="string" table:number-columns-spanned="3" table:number-rows-spanned="1">
            <text:p>2026-07-08T21:00:00-04:00</text:p>
          </table:table-cell>
          <table:covered-table-cell table:number-columns-repeated="2"/>
        </table:table-row>
        <table:table-row table:style-name="ro5">
          <table:table-cell table:style-name="ce53" office:value-type="string" ns42:value-type="string" table:number-columns-spanned="3" table:number-rows-spanned="1">
            <text:p>SETTLEMENT ID PRESENT</text:p>
          </table:table-cell>
          <table:covered-table-cell table:number-columns-repeated="2"/>
          <table:table-cell table:style-name="ce53" office:value-type="string" ns42:value-type="string" table:number-columns-spanned="3" table:number-rows-spanned="1">
            <text:p>SALE ID PRESENT</text:p>
          </table:table-cell>
          <table:covered-table-cell table:number-columns-repeated="2"/>
          <table:table-cell table:style-name="ce53" office:value-type="string" ns42:value-type="string" table:number-columns-spanned="3" table:number-rows-spanned="1">
            <text:p>PLATFORM PRESENT</text:p>
          </table:table-cell>
          <table:covered-table-cell table:number-columns-repeated="2"/>
          <table:table-cell table:style-name="ce53" office:value-type="string" ns42:value-type="string" table:number-columns-spanned="3" table:number-rows-spanned="1">
            <text:p>SETTLEMENT RECEIVED VALID</text:p>
          </table:table-cell>
          <table:covered-table-cell table:number-columns-repeated="2"/>
          <table:table-cell table:style-name="ce53" office:value-type="string" ns42:value-type="string" table:number-columns-spanned="3" table:number-rows-spanned="1">
            <text:p>PAYOUT PRESENT</text:p>
          </table:table-cell>
          <table:covered-table-cell table:number-columns-repeated="2"/>
          <table:table-cell table:style-name="ce53" office:value-type="string" ns42:value-type="string" table:number-columns-spanned="3" table:number-rows-spanned="1">
            <text:p>SETTLED TIME PRESENT</text:p>
          </table:table-cell>
          <table:covered-table-cell table:number-columns-repeated="2"/>
        </table:table-row>
        <table:table-row table:style-name="ro21">
          <table:table-cell table:style-name="ce54" table:formula="of:=IF(TRIM([.A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D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G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J961]))=&quot;YES&quot;;&quot;YES&quot;;&quot;NO&quot;)" office:value-type="string" office:string-value="YES" ns42:value-type="string" table:number-columns-spanned="3" table:number-rows-spanned="1">
            <text:p>YES</text:p>
          </table:table-cell>
          <table:covered-table-cell table:number-columns-repeated="2"/>
          <table:table-cell table:style-name="ce54" table:formula="of:=IF(TRIM([.M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P961])&lt;&gt;&quot;&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 PLATFORM IDENTITY MATCH · BUILDS 501–520</text:p>
          </table:table-cell>
          <table:covered-table-cell table:number-columns-repeated="17"/>
        </table:table-row>
        <table:table-row table:style-name="ro5">
          <table:table-cell table:style-name="ce53" office:value-type="string" ns42:value-type="string" table:number-columns-spanned="4" table:number-rows-spanned="1">
            <text:p>SALE ID MATCH</text:p>
          </table:table-cell>
          <table:covered-table-cell table:number-columns-repeated="3"/>
          <table:table-cell table:style-name="ce53" office:value-type="string" ns42:value-type="string" table:number-columns-spanned="4" table:number-rows-spanned="1">
            <text:p>PLATFORM MATCH</text:p>
          </table:table-cell>
          <table:covered-table-cell table:number-columns-repeated="3"/>
          <table:table-cell table:style-name="ce53" office:value-type="string" ns42:value-type="string" table:number-columns-spanned="4" table:number-rows-spanned="1">
            <text:p>FINANCIAL TRUTH VERIFIED</text:p>
          </table:table-cell>
          <table:covered-table-cell table:number-columns-repeated="3"/>
          <table:table-cell table:style-name="ce53" office:value-type="string" ns42:value-type="string" table:number-columns-spanned="3" table:number-rows-spanned="1">
            <text:p>SETTLEMENT ID VALID</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row>
        <table:table-row table:style-name="ro21">
          <table:table-cell table:style-name="ce54" table:formula="of:=IF(UPPER(TRIM([.D961]))=UPPER(TRIM([.D915]));&quot;YES&quot;;&quot;NO&quot;)" office:value-type="string" office:string-value="YES" ns42:value-type="string" table:number-columns-spanned="4" table:number-rows-spanned="1">
            <text:p>YES</text:p>
          </table:table-cell>
          <table:covered-table-cell table:number-columns-repeated="3"/>
          <table:table-cell table:style-name="ce54" table:formula="of:=IF(UPPER(TRIM([.G961]))=UPPER(TRIM([.A918]));&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A963]))=&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66]))=&quot;YES&quot;;UPPER(TRIM([.E966]))=&quot;YES&quot;;UPPER(TRIM([.I966]))=&quot;YES&quot;;UPPER(TRIM([.M96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PAYOUT + SETTLEMENT VALIDATION · BUILDS 521–539</text:p>
          </table:table-cell>
          <table:covered-table-cell table:number-columns-repeated="17"/>
        </table:table-row>
        <table:table-row table:style-name="ro5">
          <table:table-cell table:style-name="ce53" office:value-type="string" ns42:value-type="string" table:number-columns-spanned="4" table:number-rows-spanned="1">
            <text:p>SETTLEMENT RECEIVED VALID</text:p>
          </table:table-cell>
          <table:covered-table-cell table:number-columns-repeated="3"/>
          <table:table-cell table:style-name="ce53" office:value-type="string" ns42:value-type="string" table:number-columns-spanned="4" table:number-rows-spanned="1">
            <text:p>PAYOUT AMOUNT VALID</text:p>
          </table:table-cell>
          <table:covered-table-cell table:number-columns-repeated="3"/>
          <table:table-cell table:style-name="ce53" office:value-type="string" ns42:value-type="string" table:number-columns-spanned="4" table:number-rows-spanned="1">
            <text:p>SETTLED TIME VALID</text:p>
          </table:table-cell>
          <table:covered-table-cell table:number-columns-repeated="3"/>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ETTLEMENT EVIDENCE COMPLETE</text:p>
          </table:table-cell>
          <table:covered-table-cell table:number-columns-repeated="2"/>
        </table:table-row>
        <table:table-row table:style-name="ro21">
          <table:table-cell table:style-name="ce54" table:formula="of:=[.J963]" office:value-type="string" office:string-value="YES" ns42:value-type="string" table:number-columns-spanned="4" table:number-rows-spanned="1">
            <text:p>YES</text:p>
          </table:table-cell>
          <table:covered-table-cell table:number-columns-repeated="3"/>
          <table:table-cell table:style-name="ce54" table:formula="of:=IF(VALUE([.M961])&gt;=0;&quot;YES&quot;;&quot;NO&quot;)" office:value-type="string" office:string-value="YES" ns42:value-type="string" table:number-columns-spanned="4" table:number-rows-spanned="1">
            <text:p>YES</text:p>
          </table:table-cell>
          <table:covered-table-cell table:number-columns-repeated="3"/>
          <table:table-cell table:style-name="ce54" table:formula="of:=IF(TRIM([.P961])&lt;&gt;&quot;&quot;;&quot;YES&quot;;&quot;NO&quot;)" office:value-type="string" office:string-value="YES" ns42:value-type="string" table:number-columns-spanned="4" table:number-rows-spanned="1">
            <text:p>YES</text:p>
          </table:table-cell>
          <table:covered-table-cell table:number-columns-repeated="3"/>
          <table:table-cell table:style-name="ce54" table:formula="of:=[.P966]" office:value-type="string" office:string-value="YES" ns42:value-type="string" table:number-columns-spanned="3" table:number-rows-spanned="1">
            <text:p>YES</text:p>
          </table:table-cell>
          <table:covered-table-cell table:number-columns-repeated="2"/>
          <table:table-cell table:style-name="ce54" table:formula="of:=IF(AND(UPPER(TRIM([.A969]))=&quot;YES&quot;;UPPER(TRIM([.E969]))=&quot;YES&quot;;UPPER(TRIM([.I969]))=&quot;YES&quot;;UPPER(TRIM([.M969]))=&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MARKETPLACE SETTLEMENT EVIDENCE GATE · BUILD 540</text:p>
          </table:table-cell>
          <table:covered-table-cell table:number-columns-repeated="17"/>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ENTITY VALID</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PAYOUT VALID</text:p>
          </table:table-cell>
          <table:covered-table-cell table:number-columns-repeated="2"/>
          <table:table-cell table:style-name="ce53" office:value-type="string" ns42:value-type="string" table:number-columns-spanned="3" table:number-rows-spanned="1">
            <text:p>SETTLEMENT TIME VALID</text:p>
          </table:table-cell>
          <table:covered-table-cell table:number-columns-repeated="2"/>
          <table:table-cell table:style-name="ce53" office:value-type="string" ns42:value-type="string" table:number-columns-spanned="3" table:number-rows-spanned="1">
            <text:p>SETTLEMENT RESULT</text:p>
          </table:table-cell>
          <table:covered-table-cell table:number-columns-repeated="2"/>
        </table:table-row>
        <table:table-row table:style-name="ro21">
          <table:table-cell table:style-name="ce54" table:formula="of:=[.A961]" office:value-type="string" office:string-value="SET-000001" ns42:value-type="string" table:number-columns-spanned="3" table:number-rows-spanned="1">
            <text:p>SET-000001</text:p>
          </table:table-cell>
          <table:covered-table-cell table:number-columns-repeated="2"/>
          <table:table-cell table:style-name="ce54" table:formula="of:=[.A966]" office:value-type="string" office:string-value="YES" ns42:value-type="string" table:number-columns-spanned="3" table:number-rows-spanned="1">
            <text:p>YES</text:p>
          </table:table-cell>
          <table:covered-table-cell table:number-columns-repeated="2"/>
          <table:table-cell table:style-name="ce54" table:formula="of:=[.E966]" office:value-type="string" office:string-value="YES" ns42:value-type="string" table:number-columns-spanned="3" table:number-rows-spanned="1">
            <text:p>YES</text:p>
          </table:table-cell>
          <table:covered-table-cell table:number-columns-repeated="2"/>
          <table:table-cell table:style-name="ce54" table:formula="of:=[.E969]" office:value-type="string" office:string-value="YES" ns42:value-type="string" table:number-columns-spanned="3" table:number-rows-spanned="1">
            <text:p>YES</text:p>
          </table:table-cell>
          <table:covered-table-cell table:number-columns-repeated="2"/>
          <table:table-cell table:style-name="ce54" table:formula="of:=[.I969]" office:value-type="string" office:string-value="YES" ns42:value-type="string" table:number-columns-spanned="3" table:number-rows-spanned="1">
            <text:p>YES</text:p>
          </table:table-cell>
          <table:covered-table-cell table:number-columns-repeated="2"/>
          <table:table-cell table:style-name="ce54" table:formula="of:=IF(AND(UPPER(TRIM([.P969]))=&quot;YES&quot;;UPPER(TRIM([.P966]))=&quot;YES&quot;);&quot;VERIFIED SETTLEMENT&quot;;&quot;SETTLEMENT NOT VERIFIED&quot;)" office:value-type="string" office:string-value="VERIFIED SETTLEMENT" ns42:value-type="string" table:number-columns-spanned="3" table:number-rows-spanned="1">
            <text:p>VERIFIED SETTLEMENT</text:p>
          </table:table-cell>
          <table:covered-table-cell table:number-columns-repeated="2"/>
        </table:table-row>
        <table:table-row table:style-name="ro5">
          <table:table-cell table:style-name="ce54" office:value-type="string" ns42:value-type="string" table:number-columns-spanned="18" table:number-rows-spanned="1">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number-columns-repeated="17"/>
        </table:table-row>
        <table:table-row table:style-name="ro5">
          <table:table-cell table:style-name="ce52" office:value-type="string" ns42:value-type="string" table:number-columns-spanned="18" table:number-rows-spanned="1">
            <text:p>🔐 CONTROLLED SETTLEMENT TRANSITION ELIGIBILITY · BUILDS 541–55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ETTLEMENT BECOME AUTHORITATIVE SETTL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ETTLEMENT ≠ SETTLED · AUTHORITY + EXECUTION REQUIRED</text:p>
          </table:table-cell>
          <table:covered-table-cell table:number-columns-repeated="5"/>
        </table:table-row>
        <table:table-row table:style-name="ro5">
          <table:table-cell table:style-name="ce52" office:value-type="string" ns42:value-type="string" table:number-columns-spanned="18" table:number-rows-spanned="1">
            <text:p>📥 EXPLICIT SETTLED TRANSITION REQUEST · BUILDS 551–56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VERIFIED SETTLEMENT → SETTL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F979]))=&quot;VERIFIED SETTLEMENT → SETTLED&quot;;&quot;YES&quot;;&quot;NO&quot;)" office:value-type="string" office:string-value="YES" ns42:value-type="string" table:number-columns-spanned="5" table:number-rows-spanned="1">
            <text:p>YES</text:p>
          </table:table-cell>
          <table:covered-table-cell table:number-columns-repeated="4"/>
          <table:table-cell table:style-name="ce54" table:formula="of:=IF(TRIM([.N97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81]))=&quot;YES&quot;;UPPER(TRIM([.E981]))=&quot;YES&quot;;UPPER(TRIM([.J98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ETTLED TRANSITION AUTHORITY · BUILDS 561–57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M893]))=&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7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84]))=&quot;YES&quot;;UPPER(TRIM([.E984]))=&quot;YES&quot;;UPPER(TRIM([.I984]))=&quot;YES&quot;;UPPER(TRIM([.M984]))=&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SETTLED STATE WRITE · BUILDS 571–58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ETTLED TRANSITION</text:p>
          </table:table-cell>
          <table:covered-table-cell table:number-columns-repeated="3"/>
          <table:table-cell table:style-name="ce54" table:formula="of:=IF(UPPER(TRIM([.P98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987]))=&quot;YES&quot;;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98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987]))=&quot;YES&quot;;&quot;SETTLED&quot;;&quot;NO STATE WRITE&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2" office:value-type="string" ns42:value-type="string" table:number-columns-spanned="18" table:number-rows-spanned="1">
            <text:p>📜 APPEND-ONLY SETTLED TRANSITION HISTORY · BUILDS 581–59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4</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VERIFIED SETTLEMENT</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591–59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987]))=&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990]))=&quot;INV-000001&quot;;UPPER(TRIM([.J990]))=&quot;SETTL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87]))=UPPER(TRIM([.J99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93]))=&quot;YES&quot;;UPPER(TRIM([.D993]))=&quot;YES&quot;;UPPER(TRIM([.G99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93]))=&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9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ETTLED TRANSITION EXECUTION GATE · BUILD 600</text:p>
          </table:table-cell>
          <table:covered-table-cell table:number-columns-repeated="17"/>
        </table:table-row>
        <table:table-row table:style-name="ro5">
          <table:table-cell table:style-name="ce53" office:value-type="string" ns42:value-type="string" table:number-columns-spanned="3" table:number-rows-spanned="1">
            <text:p>VERIFIED SETTLEMENT</text:p>
          </table:table-cell>
          <table:covered-table-cell table:number-columns-repeated="2"/>
          <table:table-cell table:style-name="ce53" office:value-type="string" ns42:value-type="string" table:number-columns-spanned="3" table:number-rows-spanned="1">
            <text:p>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IF(UPPER(TRIM([.P972]))=&quot;VERIFIED SETTLEMENT&quot;;&quot;YES&quot;;&quot;NO&quot;)" office:value-type="string" office:string-value="YES" ns42:value-type="string" table:number-columns-spanned="3" table:number-rows-spanned="1">
            <text:p>YES</text:p>
          </table:table-cell>
          <table:covered-table-cell table:number-columns-repeated="2"/>
          <table:table-cell table:style-name="ce54" table:formula="of:=[.A981]" office:value-type="string" office:string-value="YES" ns42:value-type="string" table:number-columns-spanned="3" table:number-rows-spanned="1">
            <text:p>YES</text:p>
          </table:table-cell>
          <table:covered-table-cell table:number-columns-repeated="2"/>
          <table:table-cell table:style-name="ce54" table:formula="of:=[.E981]" office:value-type="string" office:string-value="YES" ns42:value-type="string" table:number-columns-spanned="3" table:number-rows-spanned="1">
            <text:p>YES</text:p>
          </table:table-cell>
          <table:covered-table-cell table:number-columns-repeated="2"/>
          <table:table-cell table:style-name="ce54" table:formula="of:=[.P984]" office:value-type="string" office:string-value="GRANTED" ns42:value-type="string" table:number-columns-spanned="3" table:number-rows-spanned="1">
            <text:p>GRANTED</text:p>
          </table:table-cell>
          <table:covered-table-cell table:number-columns-repeated="2"/>
          <table:table-cell table:style-name="ce54" table:formula="of:=[.J993]" office:value-type="string" office:string-value="COMPLETED" ns42:value-type="string" table:number-columns-spanned="3" table:number-rows-spanned="1">
            <text:p>COMPLETED</text:p>
          </table:table-cell>
          <table:covered-table-cell table:number-columns-repeated="2"/>
          <table:table-cell table:style-name="ce54" table:formula="of:=IF(AND(UPPER(TRIM([.A996]))=&quot;YES&quot;;UPPER(TRIM([.D996]))=&quot;YES&quot;;UPPER(TRIM([.G996]))=&quot;YES&quot;;UPPER(TRIM([.J996]))=&quot;GRANTED&quot;;UPPER(TRIM([.M996]))=&quot;COMPLETED&quot;);&quot;SETTLED&quot;;&quot;NOT SETTLED&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4" office:value-type="string" ns42:value-type="string" table:number-columns-spanned="18" table:number-rows-spanned="1">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number-columns-repeated="17"/>
        </table:table-row>
        <table:table-row table:style-name="ro5">
          <table:table-cell table:style-name="ce52" office:value-type="string" ns42:value-type="string" table:number-columns-spanned="18" table:number-rows-spanned="1">
            <text:p>🔐 CONTROLLED CLOSE ELIGIBILITY · BUILDS 601–610</text:p>
          </table:table-cell>
          <table:covered-table-cell table:number-columns-repeated="17"/>
        </table:table-row>
        <table:table-row table:style-name="ro5">
          <table:table-cell table:style-name="ce53" office:value-type="string" ns42:value-type="string" table:number-columns-spanned="6" table:number-rows-spanned="1">
            <text:p>CLOS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UTHORITATIVE SETTLED STATE BECOME CLOSED?</text:p>
          </table:table-cell>
          <table:covered-table-cell table:number-columns-repeated="5"/>
          <table:table-cell table:style-name="ce54" office:value-type="string" ns42:value-type="string" table:number-columns-spanned="6" table:number-rows-spanned="1">
            <text:p>SETTLED STATE + FINANCIAL TRUTH + VERIFIED SETTLEMENT + EXPLICIT CLOSE CONTROL</text:p>
          </table:table-cell>
          <table:covered-table-cell table:number-columns-repeated="5"/>
          <table:table-cell table:style-name="ce54" office:value-type="string" ns42:value-type="string" table:number-columns-spanned="6" table:number-rows-spanned="1">
            <text:p>SETTLED ≠ CLOSED · VERIFIED FINANCIAL TRUTH ≠ CLOSE AUTHORITY</text:p>
          </table:table-cell>
          <table:covered-table-cell table:number-columns-repeated="5"/>
        </table:table-row>
        <table:table-row table:style-name="ro5">
          <table:table-cell table:style-name="ce53" office:value-type="string" ns42:value-type="string" table:number-columns-spanned="4" table:number-rows-spanned="1">
            <text:p>SETTLED STATE VALID</text:p>
          </table:table-cell>
          <table:covered-table-cell table:number-columns-repeated="3"/>
          <table:table-cell table:style-name="ce53" office:value-type="string" ns42:value-type="string" table:number-columns-spanned="5" table:number-rows-spanned="1">
            <text:p>FINANCIAL TRUTH VALID</text:p>
          </table:table-cell>
          <table:covered-table-cell table:number-columns-repeated="4"/>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5" table:number-rows-spanned="1">
            <text:p>CLOSE ELIGIBILITY</text:p>
          </table:table-cell>
          <table:covered-table-cell table:number-columns-repeated="4"/>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5" table:number-rows-spanned="1">
            <text:p>YES</text:p>
          </table:table-cell>
          <table:covered-table-cell table:number-columns-repeated="4"/>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1]))=&quot;YES&quot;;UPPER(TRIM([.E1001]))=&quot;YES&quot;;UPPER(TRIM([.J1001]))=&quot;YES&quot;);&quot;ELIGIBLE&quot;;&quot;NOT ELIGIBLE&quot;)" office:value-type="string" office:string-value="ELIGIBLE" ns42:value-type="string" table:number-columns-spanned="5" table:number-rows-spanned="1">
            <text:p>ELIGIBLE</text:p>
          </table:table-cell>
          <table:covered-table-cell table:number-columns-repeated="4"/>
        </table:table-row>
        <table:table-row table:style-name="ro5">
          <table:table-cell table:style-name="ce52" office:value-type="string" ns42:value-type="string" table:number-columns-spanned="18" table:number-rows-spanned="1">
            <text:p>📥 EXPLICIT CLOSE REQUEST · BUILDS 611–62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SETTLED → CLOS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04]))=&quot;SETTLED → CLOSED&quot;;&quot;YES&quot;;&quot;NO&quot;)" office:value-type="string" office:string-value="YES" ns42:value-type="string" table:number-columns-spanned="5" table:number-rows-spanned="1">
            <text:p>YES</text:p>
          </table:table-cell>
          <table:covered-table-cell table:number-columns-repeated="4"/>
          <table:table-cell table:style-name="ce54" table:formula="of:=IF(TRIM([.N1004])&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6]))=&quot;YES&quot;;UPPER(TRIM([.E1006]))=&quot;YES&quot;;UPPER(TRIM([.J1006]))=&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CLOSE TRANSITION AUTHORITY · BUILDS 621–63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CLOSE ELIGIBILITY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4]))=&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09]))=&quot;YES&quot;;UPPER(TRIM([.E1009]))=&quot;YES&quot;;UPPER(TRIM([.I1009]))=&quot;YES&quot;;UPPER(TRIM([.M1009]))=&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CLOSED STATE WRITE · BUILDS 631–64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CLOSE TRANSITION</text:p>
          </table:table-cell>
          <table:covered-table-cell table:number-columns-repeated="3"/>
          <table:table-cell table:style-name="ce54" table:formula="of:=IF(UPPER(TRIM([.P1009]))=&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12]))=&quot;YES&quot;;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12]))=&quot;YES&quot;;&quot;CLOSED&quot;;&quot;NO STATE WRITE&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2" office:value-type="string" ns42:value-type="string" table:number-columns-spanned="18" table:number-rows-spanned="1">
            <text:p>📜 APPEND-ONLY CLOSE TRANSITION HISTORY · BUILDS 641–65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5</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CLOS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651–6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15]))=&quot;INV-000001&quot;;UPPER(TRIM([.J1015]))=&quot;CLOS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12]))=UPPER(TRIM([.J1015]));&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18]))=&quot;YES&quot;;UPPER(TRIM([.D1018]))=&quot;YES&quot;;UPPER(TRIM([.G1018]))=&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18]))=&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1018]))=&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CLOSED TRANSITION EXECUTION GATE · BUILD 660</text:p>
          </table:table-cell>
          <table:covered-table-cell table:number-columns-repeated="17"/>
        </table:table-row>
        <table:table-row table:style-name="ro5">
          <table:table-cell table:style-name="ce53" office:value-type="string" ns42:value-type="string" table:number-columns-spanned="3" table:number-rows-spanned="1">
            <text:p>SETTLED STATE</text:p>
          </table:table-cell>
          <table:covered-table-cell table:number-columns-repeated="2"/>
          <table:table-cell table:style-name="ce53" office:value-type="string" ns42:value-type="string" table:number-columns-spanned="3" table:number-rows-spanned="1">
            <text:p>CLOSE 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A1001]" office:value-type="string" office:string-value="YES" ns42:value-type="string" table:number-columns-spanned="3" table:number-rows-spanned="1">
            <text:p>YES</text:p>
          </table:table-cell>
          <table:covered-table-cell table:number-columns-repeated="2"/>
          <table:table-cell table:style-name="ce54" table:formula="of:=[.N1001]" office:value-type="string" office:string-value="ELIGIBLE" ns42:value-type="string" table:number-columns-spanned="3" table:number-rows-spanned="1">
            <text:p>ELIGIBLE</text:p>
          </table:table-cell>
          <table:covered-table-cell table:number-columns-repeated="2"/>
          <table:table-cell table:style-name="ce54" table:formula="of:=[.N1006]" office:value-type="string" office:string-value="VALID REQUEST" ns42:value-type="string" table:number-columns-spanned="3" table:number-rows-spanned="1">
            <text:p>VALID REQUEST</text:p>
          </table:table-cell>
          <table:covered-table-cell table:number-columns-repeated="2"/>
          <table:table-cell table:style-name="ce54" table:formula="of:=[.P1009]" office:value-type="string" office:string-value="GRANTED" ns42:value-type="string" table:number-columns-spanned="3" table:number-rows-spanned="1">
            <text:p>GRANTED</text:p>
          </table:table-cell>
          <table:covered-table-cell table:number-columns-repeated="2"/>
          <table:table-cell table:style-name="ce54" table:formula="of:=[.J1018]" office:value-type="string" office:string-value="COMPLETED" ns42:value-type="string" table:number-columns-spanned="3" table:number-rows-spanned="1">
            <text:p>COMPLETED</text:p>
          </table:table-cell>
          <table:covered-table-cell table:number-columns-repeated="2"/>
          <table:table-cell table:style-name="ce54" table:formula="of:=IF(AND(UPPER(TRIM([.A1021]))=&quot;YES&quot;;UPPER(TRIM([.D1021]))=&quot;ELIGIBLE&quot;;UPPER(TRIM([.G1021]))=&quot;VALID REQUEST&quot;;UPPER(TRIM([.J1021]))=&quot;GRANTED&quot;;UPPER(TRIM([.M1021]))=&quot;COMPLETED&quot;);&quot;CLOSED&quot;;&quot;NOT CLOSED&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4" office:value-type="string" ns42:value-type="string" table:number-columns-spanned="18" table:number-rows-spanned="1">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number-columns-repeated="17"/>
        </table:table-row>
        <table:table-row table:style-name="ro5">
          <table:table-cell table:style-name="ce52" office:value-type="string" ns42:value-type="string" table:number-columns-spanned="18" table:number-rows-spanned="1">
            <text:p>📦 CLOSED INVENTORY RECONCILIATION INTAKE · BUILDS 661–670</text:p>
          </table:table-cell>
          <table:covered-table-cell table:number-columns-repeated="17"/>
        </table:table-row>
        <table:table-row table:style-name="ro5">
          <table:table-cell table:style-name="ce53" office:value-type="string" ns42:value-type="string" table:number-columns-spanned="6" table:number-rows-spanned="1">
            <text:p>RECONCILIA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CLOSED LIFECYCLE RECONCILE AUTHORITATIVE INVENTORY QUANTITY?</text:p>
          </table:table-cell>
          <table:covered-table-cell table:number-columns-repeated="5"/>
          <table:table-cell table:style-name="ce54" office:value-type="string" ns42:value-type="string" table:number-columns-spanned="6" table:number-rows-spanned="1">
            <text:p>CLOSED STATE + RECORD IDENTITY + QUANTITY EVIDENCE + SALE EVIDENCE</text:p>
          </table:table-cell>
          <table:covered-table-cell table:number-columns-repeated="5"/>
          <table:table-cell table:style-name="ce54" office:value-type="string" ns42:value-type="string" table:number-columns-spanned="6" table:number-rows-spanned="1">
            <text:p>CLOSED ≠ QUANTITY WRITE · RECONCILIATION MUST PROVE DEPLETION</text:p>
          </table:table-cell>
          <table:covered-table-cell table:number-columns-repeated="5"/>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CLOSED STATE VALID</text:p>
          </table:table-cell>
          <table:covered-table-cell table:number-columns-repeated="2"/>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UANTITY</text:p>
          </table:table-cell>
          <table:covered-table-cell table:number-columns-repeated="2"/>
          <table:table-cell table:style-name="ce53" office:value-type="string" ns42:value-type="string" table:number-columns-spanned="3" table:number-rows-spanned="1">
            <text:p>QUANTITY SOLD</text:p>
          </table:table-cell>
          <table:covered-table-cell table:number-columns-repeated="2"/>
          <table:table-cell table:style-name="ce53" office:value-type="string" ns42:value-type="string" table:number-columns-spanned="3" table:number-rows-spanned="1">
            <text:p>RECONCILIATION INTAKE</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P1018]))=&quot;CLOSED&quot;;&quot;YES&quot;;&quot;NO&quot;)" office:value-type="string" office:string-value="YES"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AND(UPPER(TRIM([.D1025]))=&quot;YES&quot;;VALUE([.J1025])&gt;=0;VALUE([.M1025])&gt;=0);&quot;RECEIVED&quot;;&quot;REJECTED&quot;)" office:value-type="string" office:string-value="RECEIVED" ns42:value-type="string" table:number-columns-spanned="3" table:number-rows-spanned="1">
            <text:p>RECEIVED</text:p>
          </table:table-cell>
          <table:covered-table-cell table:number-columns-repeated="2"/>
        </table:table-row>
        <table:table-row table:style-name="ro5">
          <table:table-cell table:style-name="ce52" office:value-type="string" ns42:value-type="string" table:number-columns-spanned="18" table:number-rows-spanned="1">
            <text:p>📉 SOLD QUANTITY DEPLETION · BUILDS 671–680</text:p>
          </table:table-cell>
          <table:covered-table-cell table:number-columns-repeated="17"/>
        </table:table-row>
        <table:table-row table:style-name="ro5">
          <table:table-cell table:style-name="ce53" office:value-type="string" ns42:value-type="string" table:number-columns-spanned="4" table:number-rows-spanned="1">
            <text:p>RECORD MATCH</text:p>
          </table:table-cell>
          <table:covered-table-cell table:number-columns-repeated="3"/>
          <table:table-cell table:style-name="ce53" office:value-type="string" ns42:value-type="string" table:number-columns-spanned="5" table:number-rows-spanned="1">
            <text:p>SALE STATUS VALID</text:p>
          </table:table-cell>
          <table:covered-table-cell table:number-columns-repeated="4"/>
          <table:table-cell table:style-name="ce53" office:value-type="string" ns42:value-type="string" table:number-columns-spanned="4" table:number-rows-spanned="1">
            <text:p>QUANTITY SOLD VALID</text:p>
          </table:table-cell>
          <table:covered-table-cell table:number-columns-repeated="3"/>
          <table:table-cell table:style-name="ce53" office:value-type="string" ns42:value-type="string" table:number-columns-spanned="5" table:number-rows-spanned="1">
            <text:p>DEPLETION EVIDENCE COMPLETE</text:p>
          </table:table-cell>
          <table:covered-table-cell table:number-columns-repeated="4"/>
        </table:table-row>
        <table:table-row table:style-name="ro21">
          <table:table-cell table:style-name="ce54" table:formula="of:=IF(UPPER(TRIM([.A1025]))=&quot;INV-000001&quot;;&quot;YES&quot;;&quot;NO&quot;)" office:value-type="string" office:string-value="YES" ns42:value-type="string" table:number-columns-spanned="4" table:number-rows-spanned="1">
            <text:p>YES</text:p>
          </table:table-cell>
          <table:covered-table-cell table:number-columns-repeated="3"/>
          <table:table-cell table:style-name="ce54" table:formula="of:=IF(UPPER(TRIM([.P870]))=&quot;ELIGIBLE&quot;;&quot;YES&quot;;&quot;NO&quot;)" office:value-type="string" office:string-value="YES" ns42:value-type="string" table:number-columns-spanned="5" table:number-rows-spanned="1">
            <text:p>YES</text:p>
          </table:table-cell>
          <table:covered-table-cell table:number-columns-repeated="4"/>
          <table:table-cell table:style-name="ce54" table:formula="of:=IF(VALUE([.M1025])&gt;0;&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28]))=&quot;YES&quot;;UPPER(TRIM([.E1028]))=&quot;YES&quot;;UPPER(TRIM([.J1028]))=&quot;YES&quot;);&quot;YES&quot;;&quot;NO&quot;)" office:value-type="string" office:string-value="YES" ns42:value-type="string" table:number-columns-spanned="5" table:number-rows-spanned="1">
            <text:p>YES</text:p>
          </table:table-cell>
          <table:covered-table-cell table:number-columns-repeated="4"/>
        </table:table-row>
        <table:table-row table:style-name="ro5">
          <table:table-cell table:style-name="ce52" office:value-type="string" ns42:value-type="string" table:number-columns-spanned="18" table:number-rows-spanned="1">
            <text:p>🧮 REMAINING QUANTITY TRUTH · BUILDS 681–690</text:p>
          </table:table-cell>
          <table:covered-table-cell table:number-columns-repeated="17"/>
        </table:table-row>
        <table:table-row table:style-name="ro5">
          <table:table-cell table:style-name="ce53" office:value-type="string" ns42:value-type="string" table:number-columns-spanned="4" table:number-rows-spanned="1">
            <text:p>ORIGINAL QUANTITY</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cell table:style-name="ce53" office:value-type="string" ns42:value-type="string" table:number-columns-spanned="4" table:number-rows-spanned="1">
            <text:p>DERIVED REMAINING QUANTITY</text:p>
          </table:table-cell>
          <table:covered-table-cell table:number-columns-repeated="3"/>
          <table:table-cell table:style-name="ce53" office:value-type="string" ns42:value-type="string" table:number-columns-spanned="3" table:number-rows-spanned="1">
            <text:p>NEGATIVE QUANTITY</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row>
        <table:table-row table:style-name="ro21">
          <table:table-cell table:style-name="ce54" table:formula="of:=[.J1025]" office:value-type="string" office:string-value="1" ns42:value-type="string" table:number-columns-spanned="4" table:number-rows-spanned="1">
            <text:p>1</text:p>
          </table:table-cell>
          <table:covered-table-cell table:number-columns-repeated="3"/>
          <table:table-cell table:style-name="ce54" table:formula="of:=[.M1025]" office:value-type="string" office:string-value="1" ns42:value-type="string" table:number-columns-spanned="4" table:number-rows-spanned="1">
            <text:p>1</text:p>
          </table:table-cell>
          <table:covered-table-cell table:number-columns-repeated="3"/>
          <table:table-cell table:style-name="ce54" table:formula="of:=VALUE([.A1031])-VALUE([.E1031])" office:value-type="string" office:string-value="0" ns42:value-type="string" table:number-columns-spanned="4" table:number-rows-spanned="1">
            <text:p>0</text:p>
          </table:table-cell>
          <table:covered-table-cell table:number-columns-repeated="3"/>
          <table:table-cell table:style-name="ce54" table:formula="of:=IF(VALUE([.I1031])&lt;0;&quot;YES&quot;;&quot;NO&quot;)" office:value-type="string" office:string-value="NO" ns42:value-type="string" table:number-columns-spanned="3" table:number-rows-spanned="1">
            <text:p>NO</text:p>
          </table:table-cell>
          <table:covered-table-cell table:number-columns-repeated="2"/>
          <table:table-cell table:style-name="ce54" table:formula="of:=IF(AND(VALUE([.I1031])&gt;=0;UPPER(TRIM([.M1031]))=&quot;NO&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LIFECYCLE ↔ INVENTORY CROSS-CHECK · BUILDS 691–700</text:p>
          </table:table-cell>
          <table:covered-table-cell table:number-columns-repeated="17"/>
        </table:table-row>
        <table:table-row table:style-name="ro5">
          <table:table-cell table:style-name="ce53" office:value-type="string" ns42:value-type="string" table:number-columns-spanned="4" table:number-rows-spanned="1">
            <text:p>CLOSED STATE</text:p>
          </table:table-cell>
          <table:covered-table-cell table:number-columns-repeated="3"/>
          <table:table-cell table:style-name="ce53" office:value-type="string" ns42:value-type="string" table:number-columns-spanned="4" table:number-rows-spanned="1">
            <text:p>RECORD IDENTITY</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DEPLETION COMPLETE</text:p>
          </table:table-cell>
          <table:covered-table-cell table:number-columns-repeated="2"/>
          <table:table-cell table:style-name="ce53" office:value-type="string" ns42:value-type="string" table:number-columns-spanned="3" table:number-rows-spanned="1">
            <text:p>CROSS-CHECK RESULT</text:p>
          </table:table-cell>
          <table:covered-table-cell table:number-columns-repeated="2"/>
        </table:table-row>
        <table:table-row table:style-name="ro21">
          <table:table-cell table:style-name="ce54" table:formula="of:=[.D1025]" office:value-type="string" office:string-value="YES" ns42:value-type="string" table:number-columns-spanned="4" table:number-rows-spanned="1">
            <text:p>YES</text:p>
          </table:table-cell>
          <table:covered-table-cell table:number-columns-repeated="3"/>
          <table:table-cell table:style-name="ce54" table:formula="of:=[.A1028]" office:value-type="string" office:string-value="YES" ns42:value-type="string" table:number-columns-spanned="4" table:number-rows-spanned="1">
            <text:p>YES</text:p>
          </table:table-cell>
          <table:covered-table-cell table:number-columns-repeated="3"/>
          <table:table-cell table:style-name="ce54" table:formula="of:=IF(VALUE([.M1025])=VALUE([.M859]);&quot;YES&quot;;&quot;NO&quot;)" office:value-type="string" office:string-value="YES" ns42:value-type="string" table:number-columns-spanned="4" table:number-rows-spanned="1">
            <text:p>YES</text:p>
          </table:table-cell>
          <table:covered-table-cell table:number-columns-repeated="3"/>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IF(AND(UPPER(TRIM([.A1034]))=&quot;YES&quot;;UPPER(TRIM([.E1034]))=&quot;YES&quot;;UPPER(TRIM([.I1034]))=&quot;YES&quot;;UPPER(TRIM([.M103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NEGATIVE QUANTITY FAIL-CLOSE · BUILDS 701–71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EGATIVE DETECTED</text:p>
          </table:table-cell>
          <table:covered-table-cell table:number-columns-repeated="3"/>
          <table:table-cell table:style-name="ce53" office:value-type="string" ns42:value-type="string" table:number-columns-spanned="4" table:number-rows-spanned="1">
            <text:p>QUANTITY TRUTH VALID</text:p>
          </table:table-cell>
          <table:covered-table-cell table:number-columns-repeated="3"/>
          <table:table-cell table:style-name="ce53" office:value-type="string" ns42:value-type="string" table:number-columns-spanned="3" table:number-rows-spanned="1">
            <text:p>WRITE ELIGIBILITY</text:p>
          </table:table-cell>
          <table:covered-table-cell table:number-columns-repeated="2"/>
          <table:table-cell table:style-name="ce53" office:value-type="string" ns42:value-type="string" table:number-columns-spanned="3" table:number-rows-spanned="1">
            <text:p>FAIL-CLOSE RESULT</text:p>
          </table:table-cell>
          <table:covered-table-cell table:number-columns-repeated="2"/>
        </table:table-row>
        <table:table-row table:style-name="ro21">
          <table:table-cell table:style-name="ce54" table:formula="of:=[.I1031]" office:value-type="string" office:string-value="0" ns42:value-type="string" table:number-columns-spanned="4" table:number-rows-spanned="1">
            <text:p>0</text:p>
          </table:table-cell>
          <table:covered-table-cell table:number-columns-repeated="3"/>
          <table:table-cell table:style-name="ce54" table:formula="of:=[.M1031]" office:value-type="string" office:string-value="NO" ns42:value-type="string" table:number-columns-spanned="4" table:number-rows-spanned="1">
            <text:p>NO</text:p>
          </table:table-cell>
          <table:covered-table-cell table:number-columns-repeated="3"/>
          <table:table-cell table:style-name="ce54" table:formula="of:=IF(UPPER(TRIM([.P1031]))=&quot;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VALUE([.A1037])&gt;=0;UPPER(TRIM([.E1037]))=&quot;NO&quot;;UPPER(TRIM([.I1037]))=&quot;YES&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IF(UPPER(TRIM([.M1037]))=&quot;ELIGIBLE&quot;;&quot;PASS&quot;;&quot;FAIL-CLOS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2" office:value-type="string" ns42:value-type="string" table:number-columns-spanned="18" table:number-rows-spanned="1">
            <text:p>🔁 REPLAY-SAFE RECONCILIATION · BUILDS 711–719</text:p>
          </table:table-cell>
          <table:covered-table-cell table:number-columns-repeated="17"/>
        </table:table-row>
        <table:table-row table:style-name="ro5">
          <table:table-cell table:style-name="ce53" office:value-type="string" ns42:value-type="string" table:number-columns-spanned="3" table:number-rows-spanned="1">
            <text:p>RECONCILI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cell table:style-name="ce53" office:value-type="string" ns42:value-type="string" table:number-columns-spanned="3" table:number-rows-spanned="1">
            <text:p>FIRST RESULT</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row>
        <table:table-row table:style-name="ro21">
          <table:table-cell table:style-name="ce54" office:value-type="string" ns42:value-type="string" table:number-columns-spanned="3" table:number-rows-spanned="1">
            <text:p>REC-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table:formula="of:=[.A1037]" office:value-type="string" office:string-value="0" ns42:value-type="string" table:number-columns-spanned="3" table:number-rows-spanned="1">
            <text:p>0</text:p>
          </table:table-cell>
          <table:covered-table-cell table:number-columns-repeated="2"/>
          <table:table-cell table:style-name="ce54" table:formula="of:=IF(AND(UPPER(TRIM([.P1034]))=&quot;VERIFIED&quot;;UPPER(TRIM([.P1037]))=&quot;PAS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40]))=&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40]))=&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INVENTORY RECONCILIATION GATE · BUILD 720</text:p>
          </table:table-cell>
          <table:covered-table-cell table:number-columns-repeated="17"/>
        </table:table-row>
        <table:table-row table:style-name="ro5">
          <table:table-cell table:style-name="ce53" office:value-type="string" ns42:value-type="string" table:number-columns-spanned="3" table:number-rows-spanned="1">
            <text:p>CLOSED STATE</text:p>
          </table:table-cell>
          <table:covered-table-cell table:number-columns-repeated="2"/>
          <table:table-cell table:style-name="ce53" office:value-type="string" ns42:value-type="string" table:number-columns-spanned="3" table:number-rows-spanned="1">
            <text:p>DEPLETION EVIDENCE</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LIFECYCLE CROSS-CHECK</text:p>
          </table:table-cell>
          <table:covered-table-cell table:number-columns-repeated="2"/>
          <table:table-cell table:style-name="ce53" office:value-type="string" ns42:value-type="string" table:number-columns-spanned="3" table:number-rows-spanned="1">
            <text:p>FAIL-CLOSE</text:p>
          </table:table-cell>
          <table:covered-table-cell table:number-columns-repeated="2"/>
          <table:table-cell table:style-name="ce53" office:value-type="string" ns42:value-type="string" table:number-columns-spanned="3" table:number-rows-spanned="1">
            <text:p>RECONCILIATION RESULT</text:p>
          </table:table-cell>
          <table:covered-table-cell table:number-columns-repeated="2"/>
        </table:table-row>
        <table:table-row table:style-name="ro21">
          <table:table-cell table:style-name="ce54" table:formula="of:=[.D1025]" office:value-type="string" office:string-value="YES" ns42:value-type="string" table:number-columns-spanned="3" table:number-rows-spanned="1">
            <text:p>YES</text:p>
          </table:table-cell>
          <table:covered-table-cell table:number-columns-repeated="2"/>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P1031]" office:value-type="string" office:string-value="VERIFIED" ns42:value-type="string" table:number-columns-spanned="3" table:number-rows-spanned="1">
            <text:p>VERIFIED</text:p>
          </table:table-cell>
          <table:covered-table-cell table:number-columns-repeated="2"/>
          <table:table-cell table:style-name="ce54" table:formula="of:=[.P1034]" office:value-type="string" office:string-value="VERIFIED" ns42:value-type="string" table:number-columns-spanned="3" table:number-rows-spanned="1">
            <text:p>VERIFIED</text:p>
          </table:table-cell>
          <table:covered-table-cell table:number-columns-repeated="2"/>
          <table:table-cell table:style-name="ce54" table:formula="of:=[.P1037]" office:value-type="string" office:string-value="PASS" ns42:value-type="string" table:number-columns-spanned="3" table:number-rows-spanned="1">
            <text:p>PASS</text:p>
          </table:table-cell>
          <table:covered-table-cell table:number-columns-repeated="2"/>
          <table:table-cell table:style-name="ce54" table:formula="of:=IF(AND(UPPER(TRIM([.A1043]))=&quot;YES&quot;;UPPER(TRIM([.D1043]))=&quot;YES&quot;;UPPER(TRIM([.G1043]))=&quot;VERIFIED&quot;;UPPER(TRIM([.J1043]))=&quot;VERIFIED&quot;;UPPER(TRIM([.M1043]))=&quot;PASS&quot;);&quot;RECONCILED&quot;;&quot;NOT RECONCILED&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number-columns-repeated="17"/>
        </table:table-row>
        <table:table-row table:style-name="ro5">
          <table:table-cell table:style-name="ce52" office:value-type="string" ns42:value-type="string" table:number-columns-spanned="18" table:number-rows-spanned="1">
            <text:p>📥 EXPLICIT RECONCILIATION REQUEST · BUILDS 721–7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CONCILED QUANTITY WRITE</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48]))=&quot;RECONCILED QUANTITY WRITE&quot;;&quot;YES&quot;;&quot;NO&quot;)" office:value-type="string" office:string-value="YES" ns42:value-type="string" table:number-columns-spanned="5" table:number-rows-spanned="1">
            <text:p>YES</text:p>
          </table:table-cell>
          <table:covered-table-cell table:number-columns-repeated="4"/>
          <table:table-cell table:style-name="ce54" table:formula="of:=IF(TRIM([.N1048])&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50]))=&quot;YES&quot;;UPPER(TRIM([.E1050]))=&quot;YES&quot;;UPPER(TRIM([.J1050]))=&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RECONCILIATION ADJUSTMENT AUTHORITY · BUILDS 731–740</text:p>
          </table:table-cell>
          <table:covered-table-cell table:number-columns-repeated="17"/>
        </table:table-row>
        <table:table-row table:style-name="ro5">
          <table:table-cell table:style-name="ce53" office:value-type="string" ns42:value-type="string" table:number-columns-spanned="4" table:number-rows-spanned="1">
            <text:p>CLOSED STATE VALID</text:p>
          </table:table-cell>
          <table:covered-table-cell table:number-columns-repeated="3"/>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18]))=&quot;CLOS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50]))=&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48]))=&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53]))=&quot;YES&quot;;UPPER(TRIM([.E1053]))=&quot;YES&quot;;UPPER(TRIM([.I1053]))=&quot;YES&quot;;UPPER(TRIM([.M1053]))=&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AUTHORIZED QUANTITY ADJUSTMENT VALIDATION · BUILDS 741–75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ONNEGATIVE</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row>
        <table:table-row table:style-name="ro21">
          <table:table-cell table:style-name="ce54" table:formula="of:=[.A1037]" office:value-type="string" office:string-value="0" ns42:value-type="string" table:number-columns-spanned="4" table:number-rows-spanned="1">
            <text:p>0</text:p>
          </table:table-cell>
          <table:covered-table-cell table:number-columns-repeated="3"/>
          <table:table-cell table:style-name="ce54" table:formula="of:=IF(VALUE([.A1056])&gt;=0;&quot;YES&quot;;&quot;NO&quot;)" office:value-type="string" office:string-value="YES" ns42:value-type="string" table:number-columns-spanned="4" table:number-rows-spanned="1">
            <text:p>YES</text:p>
          </table:table-cell>
          <table:covered-table-cell table:number-columns-repeated="3"/>
          <table:table-cell table:style-name="ce54" table:formula="of:=[.I1034]" office:value-type="string" office:string-value="YES" ns42:value-type="string" table:number-columns-spanned="4" table:number-rows-spanned="1">
            <text:p>YES</text:p>
          </table:table-cell>
          <table:covered-table-cell table:number-columns-repeated="3"/>
          <table:table-cell table:style-name="ce54" table:formula="of:=IF(UPPER(TRIM([.P1053]))=&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E1056]))=&quot;YES&quot;;UPPER(TRIM([.I1056]))=&quot;YES&quot;;UPPER(TRIM([.M105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QUANTITY WRITE · BUILDS 751–76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QUANTITY WRITE</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row>
        <table:table-row table:style-name="ro21">
          <table:table-cell table:style-name="ce54" office:value-type="string" ns42:value-type="string" table:number-columns-spanned="4" table:number-rows-spanned="1">
            <text:p>EXECUTE RECONCILIATION</text:p>
          </table:table-cell>
          <table:covered-table-cell table:number-columns-repeated="3"/>
          <table:table-cell table:style-name="ce54" table:formula="of:=IF(UPPER(TRIM([.P1053]))=&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59]))=&quot;YES&quot;;UPPER(TRIM([.P1056]))=&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59]))=&quot;YES&quot;;[.A1056];&quot;NO WRITE&quot;)" office:value-type="string" office:string-value="0" ns42:value-type="string" table:number-columns-spanned="3" table:number-rows-spanned="1">
            <text:p>0</text:p>
          </table:table-cell>
          <table:covered-table-cell table:number-columns-repeated="2"/>
        </table:table-row>
        <table:table-row table:style-name="ro5">
          <table:table-cell table:style-name="ce52" office:value-type="string" ns42:value-type="string" table:number-columns-spanned="18" table:number-rows-spanned="1">
            <text:p>📜 APPEND-ONLY RECONCILIATION HISTORY · BUILDS 761–770</text:p>
          </table:table-cell>
          <table:covered-table-cell table:number-columns-repeated="17"/>
        </table:table-row>
        <table:table-row table:style-name="ro5">
          <table:table-cell table:style-name="ce53" office:value-type="string" ns42:value-type="string" table:number-columns-spanned="3" table:number-rows-spanned="1">
            <text:p>ADJUSTMENT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QUANTITY</text:p>
          </table:table-cell>
          <table:covered-table-cell table:number-columns-repeated="2"/>
          <table:table-cell table:style-name="ce53" office:value-type="string" ns42:value-type="string" table:number-columns-spanned="3" table:number-rows-spanned="1">
            <text:p>TO QUANTITY</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ADJ-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SECOND-WRITE PROTECTION · BUILDS 771–7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QUANTITY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62]))=&quot;INV-000001&quot;;VALUE([.J1062])=VALUE([.P1059]));&quot;YES&quot;;&quot;NO&quot;)" office:value-type="string" office:string-value="YES" ns42:value-type="string" table:number-columns-spanned="3" table:number-rows-spanned="1">
            <text:p>YES</text:p>
          </table:table-cell>
          <table:covered-table-cell table:number-columns-repeated="2"/>
          <table:table-cell table:style-name="ce54" table:formula="of:=IF(VALUE([.P1059])=VALUE([.J1062]);&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65]))=&quot;YES&quot;;UPPER(TRIM([.D1065]))=&quot;YES&quot;;UPPER(TRIM([.G1065]))=&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65]))=&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65]))=&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RECONCILED STATE EXECUTION GATE · BUILD 780</text:p>
          </table:table-cell>
          <table:covered-table-cell table:number-columns-repeated="17"/>
        </table:table-row>
        <table:table-row table:style-name="ro5">
          <table:table-cell table:style-name="ce53" office:value-type="string" ns42:value-type="string" table:number-columns-spanned="3" table:number-rows-spanned="1">
            <text:p>RECONCILIATION</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QUANTITY STATE</text:p>
          </table:table-cell>
          <table:covered-table-cell table:number-columns-repeated="2"/>
        </table:table-row>
        <table:table-row table:style-name="ro21">
          <table:table-cell table:style-name="ce54" table:formula="of:=[.P1043]" office:value-type="string" office:string-value="RECONCILED" ns42:value-type="string" table:number-columns-spanned="3" table:number-rows-spanned="1">
            <text:p>RECONCILED</text:p>
          </table:table-cell>
          <table:covered-table-cell table:number-columns-repeated="2"/>
          <table:table-cell table:style-name="ce54" table:formula="of:=[.N1050]" office:value-type="string" office:string-value="VALID REQUEST" ns42:value-type="string" table:number-columns-spanned="3" table:number-rows-spanned="1">
            <text:p>VALID REQUEST</text:p>
          </table:table-cell>
          <table:covered-table-cell table:number-columns-repeated="2"/>
          <table:table-cell table:style-name="ce54" table:formula="of:=[.P1053]" office:value-type="string" office:string-value="GRANTED" ns42:value-type="string" table:number-columns-spanned="3" table:number-rows-spanned="1">
            <text:p>GRANTED</text:p>
          </table:table-cell>
          <table:covered-table-cell table:number-columns-repeated="2"/>
          <table:table-cell table:style-name="ce54" table:formula="of:=[.P1056]" office:value-type="string" office:string-value="YES" ns42:value-type="string" table:number-columns-spanned="3" table:number-rows-spanned="1">
            <text:p>YES</text:p>
          </table:table-cell>
          <table:covered-table-cell table:number-columns-repeated="2"/>
          <table:table-cell table:style-name="ce54" table:formula="of:=[.J1065]" office:value-type="string" office:string-value="COMPLETED" ns42:value-type="string" table:number-columns-spanned="3" table:number-rows-spanned="1">
            <text:p>COMPLETED</text:p>
          </table:table-cell>
          <table:covered-table-cell table:number-columns-repeated="2"/>
          <table:table-cell table:style-name="ce54" table:formula="of:=IF(AND(UPPER(TRIM([.A1068]))=&quot;RECONCILED&quot;;UPPER(TRIM([.D1068]))=&quot;VALID REQUEST&quot;;UPPER(TRIM([.G1068]))=&quot;GRANTED&quot;;UPPER(TRIM([.J1068]))=&quot;YES&quot;;UPPER(TRIM([.M1068]))=&quot;COMPLETED&quot;);[.P1059];&quot;NOT WRITTEN&quot;)"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ADJUSTMENT TRUTH · BUILDS 781–8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CONCILED STATE</text:p>
          </table:table-cell>
          <table:covered-table-cell table:number-columns-repeated="2"/>
          <table:table-cell table:style-name="ce53" office:value-type="string" ns42:value-type="string" table:number-columns-spanned="3" table:number-rows-spanned="1">
            <text:p>FINAL QUANTITY</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A1068]))=&quot;RECONCILED&quot;;&quot;RECONCILED&quot;;&quot;INVALID&quot;)" office:value-type="string" office:string-value="RECONCILED" ns42:value-type="string" table:number-columns-spanned="3" table:number-rows-spanned="1">
            <text:p>RECONCILED</text:p>
          </table:table-cell>
          <table:covered-table-cell table:number-columns-repeated="2"/>
          <table:table-cell table:style-name="ce54" table:formula="of:=[.P1068]" office:value-type="string" office:string-value="0" ns42:value-type="string" table:number-columns-spanned="3" table:number-rows-spanned="1">
            <text:p>0</text:p>
          </table:table-cell>
          <table:covered-table-cell table:number-columns-repeated="2"/>
          <table:table-cell table:style-name="ce54" table:formula="of:=IF(AND(UPPER(TRIM([.D1062]))=&quot;INV-000001&quot;;VALUE([.J1062])=VALUE([.G1072]));&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72]))=&quot;RECONCILED&quot;;VALUE([.G1072])&gt;=0;UPPER(TRIM([.J1072]))=&quot;YES&quot;);&quot;VERIFIED&quot;;&quot;INVALID&quot;)" office:value-type="string" office:string-value="VERIFIED" ns42:value-type="string" table:number-columns-spanned="3" table:number-rows-spanned="1">
            <text:p>VERIFIED</text:p>
          </table:table-cell>
          <table:covered-table-cell table:number-columns-repeated="2"/>
          <table:table-cell table:style-name="ce54" table:formula="of:=IF(UPPER(TRIM([.M1072]))=&quot;VERIFIED&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DJUSTMENT TRUTH REQUIRES RECONCILED STATE + NONNEGATIVE FINAL QUANTITY + MATCHED APPEND-ONLY HISTORY</text:p>
          </table:table-cell>
          <table:covered-table-cell table:number-columns-repeated="17"/>
        </table:table-row>
        <table:table-row table:style-name="ro5">
          <table:table-cell table:style-name="ce52" office:value-type="string" ns42:value-type="string" table:number-columns-spanned="18" table:number-rows-spanned="1">
            <text:p>📦 STOCK AVAILABILITY DERIVATION · BUILDS 841–900</text:p>
          </table:table-cell>
          <table:covered-table-cell table:number-columns-repeated="17"/>
        </table:table-row>
        <table:table-row table:style-name="ro5">
          <table:table-cell table:style-name="ce53" office:value-type="string" ns42:value-type="string" table:number-columns-spanned="3" table:number-rows-spanned="1">
            <text:p>AUTHORITATIVE QUANTITY</text:p>
          </table:table-cell>
          <table:covered-table-cell table:number-columns-repeated="2"/>
          <table:table-cell table:style-name="ce53" office:value-type="string" ns42:value-type="string" table:number-columns-spanned="3" table:number-rows-spanned="1">
            <text:p>ACTIVE RESERVATIONS</text:p>
          </table:table-cell>
          <table:covered-table-cell table:number-columns-repeated="2"/>
          <table:table-cell table:style-name="ce53" office:value-type="string" ns42:value-type="string" table:number-columns-spanned="3" table:number-rows-spanned="1">
            <text:p>DERIVED AVAILABLE</text:p>
          </table:table-cell>
          <table:covered-table-cell table:number-columns-repeated="2"/>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DERIVATION VALID</text:p>
          </table:table-cell>
          <table:covered-table-cell table:number-columns-repeated="2"/>
          <table:table-cell table:style-name="ce53" office:value-type="string" ns42:value-type="string" table:number-columns-spanned="3" table:number-rows-spanned="1">
            <text:p>AVAILABILITY RESULT</text:p>
          </table:table-cell>
          <table:covered-table-cell table:number-columns-repeated="2"/>
        </table:table-row>
        <table:table-row table:style-name="ro21">
          <table:table-cell table:style-name="ce54" table:formula="of:=[.G1072]" office:value-type="string" office:string-value="0"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table:formula="of:=VALUE([.A1076])-VALUE([.D1076])" office:value-type="string" office:string-value="0" ns42:value-type="string" table:number-columns-spanned="3" table:number-rows-spanned="1">
            <text:p>0</text:p>
          </table:table-cell>
          <table:covered-table-cell table:number-columns-repeated="2"/>
          <table:table-cell table:style-name="ce54" table:formula="of:=IF(VALUE([.G107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P1072]))=&quot;VERIFIED&quot;;UPPER(TRIM([.J107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76]))=&quot;YES&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VAILABLE STOCK IS DERIVED ONLY FROM AUTHORITATIVE QUANTITY LESS ACTIVE RESERVATIONS; NEGATIVE AVAILABILITY FAILS CLOSED</text:p>
          </table:table-cell>
          <table:covered-table-cell table:number-columns-repeated="17"/>
        </table:table-row>
        <table:table-row table:style-name="ro5">
          <table:table-cell table:style-name="ce52" office:value-type="string" ns42:value-type="string" table:number-columns-spanned="18" table:number-rows-spanned="1">
            <text:p>🛡️ SELLABLE QUANTITY AUTHORITY · BUILDS 901–960</text:p>
          </table:table-cell>
          <table:covered-table-cell table:number-columns-repeated="17"/>
        </table:table-row>
        <table:table-row table:style-name="ro5">
          <table:table-cell table:style-name="ce53" office:value-type="string" ns42:value-type="string" table:number-columns-spanned="3" table:number-rows-spanned="1">
            <text:p>AVAILABILITY VERIFIE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AVAILABLE QUANTITY</text:p>
          </table:table-cell>
          <table:covered-table-cell table:number-columns-repeated="2"/>
          <table:table-cell table:style-name="ce53" office:value-type="string" ns42:value-type="string" table:number-columns-spanned="3" table:number-rows-spanned="1">
            <text:p>SELLABLE ELIGIBILITY</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76]))=&quot;VERIFIED&quot;;&quot;YES&quot;;&quot;NO&quot;)" office:value-type="string" office:string-value="YES" ns42:value-type="string" table:number-columns-spanned="3" table:number-rows-spanned="1">
            <text:p>YES</text:p>
          </table:table-cell>
          <table:covered-table-cell table:number-columns-repeated="2"/>
          <table:table-cell table:style-name="ce54" table:formula="of:=IF(TRIM([.P8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10]))=&quot;EBAY&quot;;&quot;YES&quot;;&quot;NO&quot;)" office:value-type="string" office:string-value="YES" ns42:value-type="string" table:number-columns-spanned="3" table:number-rows-spanned="1">
            <text:p>YES</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IF(AND(UPPER(TRIM([.A1080]))=&quot;YES&quot;;UPPER(TRIM([.D1080]))=&quot;YES&quot;;UPPER(TRIM([.G1080]))=&quot;YES&quot;;VALUE([.J108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80]))=&quot;ELIGIBLE&quot;;&quot;GRANTED&quot;;&quot;DENI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ZERO AVAILABLE QUANTITY MUST NEVER RECEIVE SELLABLE AUTHORITY; AUTHORITY IS DERIVED AND FAIL-CLOSED</text:p>
          </table:table-cell>
          <table:covered-table-cell table:number-columns-repeated="17"/>
        </table:table-row>
        <table:table-row table:style-name="ro5">
          <table:table-cell table:style-name="ce52" office:value-type="string" ns42:value-type="string" table:number-columns-spanned="18" table:number-rows-spanned="1">
            <text:p>📥 INVENTORY RESERVATION EVIDENCE · BUILDS 961–1020</text:p>
          </table:table-cell>
          <table:covered-table-cell table:number-columns-repeated="17"/>
        </table:table-row>
        <table:table-row table:style-name="ro5">
          <table:table-cell table:style-name="ce53" office:value-type="string" ns42:value-type="string" table:number-columns-spanned="3" table:number-rows-spanned="1">
            <text:p>RESERV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QUESTED QUANT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QUEST EVIDENCE</text:p>
          </table:table-cell>
          <table:covered-table-cell table:number-columns-repeated="2"/>
          <table:table-cell table:style-name="ce53" office:value-type="string" ns42:value-type="string" table:number-columns-spanned="3" table:number-rows-spanned="1">
            <text:p>RESERVATION ELIGIBILITY</text:p>
          </table:table-cell>
          <table:covered-table-cell table:number-columns-repeated="2"/>
        </table:table-row>
        <table:table-row table:style-name="ro21">
          <table:table-cell table:style-name="ce54" office:value-type="string" ns42:value-type="string" table:number-columns-spanned="3" table:number-rows-spanned="1">
            <text:p>RSV-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IF(AND(TRIM([.A1084])&lt;&gt;&quot;&quot;;TRIM([.D1084])&lt;&gt;&quot;&quot;;VALUE([.G1084])&gt;0);&quot;COMPLETE&quot;;&quot;INCOMPLETE&quot;)" office:value-type="string" office:string-value="COMPLETE" ns42:value-type="string" table:number-columns-spanned="3" table:number-rows-spanned="1">
            <text:p>COMPLETE</text:p>
          </table:table-cell>
          <table:covered-table-cell table:number-columns-repeated="2"/>
          <table:table-cell table:style-name="ce54" table:formula="of:=IF(AND(UPPER(TRIM([.J1084]))=&quot;GRANTED&quot;;UPPER(TRIM([.M1084]))=&quot;COMPLETE&quot;;VALUE([.G1084])&lt;=VALUE([.J1080]));&quot;ELIGIBLE&quot;;&quot;NOT ELIGIBLE&quot;)" office:value-type="string" office:string-value="NOT ELIGIBLE" ns42:value-type="string" table:number-columns-spanned="3" table:number-rows-spanned="1">
            <text:p>NOT ELIGIBLE</text:p>
          </table:table-cell>
          <table:covered-table-cell table:number-columns-repeated="2"/>
        </table:table-row>
        <table:table-row table:style-name="ro5">
          <table:table-cell table:style-name="ce54" office:value-type="string" ns42:value-type="string" table:number-columns-spanned="18" table:number-rows-spanned="1">
            <text:p>RESERVATION EVIDENCE MAY PROVE A REQUEST BUT CANNOT OVERRIDE DENIED SELLABLE AUTHORITY OR INSUFFICIENT QUANTITY</text:p>
          </table:table-cell>
          <table:covered-table-cell table:number-columns-repeated="17"/>
        </table:table-row>
        <table:table-row table:style-name="ro5">
          <table:table-cell table:style-name="ce52" office:value-type="string" ns42:value-type="string" table:number-columns-spanned="18" table:number-rows-spanned="1">
            <text:p>⚙️ RESERVATION EXECUTION CONTROL · BUILDS 1021–1080</text:p>
          </table:table-cell>
          <table:covered-table-cell table:number-columns-repeated="17"/>
        </table:table-row>
        <table:table-row table:style-name="ro5">
          <table:table-cell table:style-name="ce53" office:value-type="string" ns42:value-type="string" table:number-columns-spanned="3" table:number-rows-spanned="1">
            <text:p>REQUEST VALID</text:p>
          </table:table-cell>
          <table:covered-table-cell table:number-columns-repeated="2"/>
          <table:table-cell table:style-name="ce53" office:value-type="string" ns42:value-type="string" table:number-columns-spanned="3" table:number-rows-spanned="1">
            <text:p>RESERVATION ELIGIBLE</text:p>
          </table:table-cell>
          <table:covered-table-cell table:number-columns-repeated="2"/>
          <table:table-cell table:style-name="ce53" office:value-type="string" ns42:value-type="string" table:number-columns-spanned="3" table:number-rows-spanned="1">
            <text:p>AUTHORITY REVALIDATE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EXECUTION RESULT</text:p>
          </table:table-cell>
          <table:covered-table-cell table:number-columns-repeated="2"/>
          <table:table-cell table:style-name="ce53" office:value-type="string" ns42:value-type="string" table:number-columns-spanned="3" table:number-rows-spanned="1">
            <text:p>RESERVED QUANTITY</text:p>
          </table:table-cell>
          <table:covered-table-cell table:number-columns-repeated="2"/>
        </table:table-row>
        <table:table-row table:style-name="ro21">
          <table:table-cell table:style-name="ce54" table:formula="of:=IF(UPPER(TRIM([.M1084]))=&quot;COMPLETE&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84]))=&quot;ELIGIBLE&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4]))=&quot;GRANTED&quot;;&quot;YES&quot;;&quot;NO&quot;)" office:value-type="string" office:string-value="NO" ns42:value-type="string" table:number-columns-spanned="3" table:number-rows-spanned="1">
            <text:p>NO</text:p>
          </table:table-cell>
          <table:covered-table-cell table:number-columns-repeated="2"/>
          <table:table-cell table:style-name="ce54" table:formula="of:=IF(AND(UPPER(TRIM([.A1088]))=&quot;YES&quot;;UPPER(TRIM([.D1088]))=&quot;YES&quot;;UPPER(TRIM([.G1088]))=&quot;YES&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8]))=&quot;YES&quot;;&quot;EXECUTED&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088]))=&quot;EXECUTED&quot;;[.G1084];0)"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CONTROLLED RESERVATION WRITE REQUIRES VALID REQUEST + ELIGIBILITY + REVALIDATED AUTHORITY; FAILED CONTROL CREATES NO WRITE</text:p>
          </table:table-cell>
          <table:covered-table-cell table:number-columns-repeated="17"/>
        </table:table-row>
        <table:table-row table:style-name="ro5">
          <table:table-cell table:style-name="ce52" office:value-type="string" ns42:value-type="string" table:number-columns-spanned="18" table:number-rows-spanned="1">
            <text:p>🔁 RELEASE + CANCELLATION CONTROLS · BUILDS 1081–1140</text:p>
          </table:table-cell>
          <table:covered-table-cell table:number-columns-repeated="17"/>
        </table:table-row>
        <table:table-row table:style-name="ro5">
          <table:table-cell table:style-name="ce53" office:value-type="string" ns42:value-type="string" table:number-columns-spanned="3" table:number-rows-spanned="1">
            <text:p>RESERVATION EXECUTED</text:p>
          </table:table-cell>
          <table:covered-table-cell table:number-columns-repeated="2"/>
          <table:table-cell table:style-name="ce53" office:value-type="string" ns42:value-type="string" table:number-columns-spanned="3" table:number-rows-spanned="1">
            <text:p>ACTIVE RESERV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CANCEL REQUEST</text:p>
          </table:table-cell>
          <table:covered-table-cell table:number-columns-repeated="2"/>
          <table:table-cell table:style-name="ce53" office:value-type="string" ns42:value-type="string" table:number-columns-spanned="3" table:number-rows-spanned="1">
            <text:p>RELEASE ELIGIBILITY</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IF(UPPER(TRIM([.M1088]))=&quot;EXECUTED&quot;;&quot;YES&quot;;&quot;NO&quot;)" office:value-type="string" office:string-value="NO" ns42:value-type="string" table:number-columns-spanned="3" table:number-rows-spanned="1">
            <text:p>NO</text:p>
          </table:table-cell>
          <table:covered-table-cell table:number-columns-repeated="2"/>
          <table:table-cell table:style-name="ce54" table:formula="of:=IF(VALUE([.P1088])&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092]))=&quot;YES&quot;;UPPER(TRIM([.D1092]))=&quot;YES&quot;;OR(UPPER(TRIM([.G1092]))=&quot;YES&quot;;UPPER(TRIM([.J1092]))=&quot;YES&quot;));&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92]))=&quot;ELIGIBLE&quot;;&quot;CONTROLLED RELEASE&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OR CANCELLATION CANNOT MUTATE INVENTORY WITHOUT AN EXECUTED ACTIVE RESERVATION AND EXPLICIT CONTROL REQUEST</text:p>
          </table:table-cell>
          <table:covered-table-cell table:number-columns-repeated="17"/>
        </table:table-row>
        <table:table-row table:style-name="ro5">
          <table:table-cell table:style-name="ce52" office:value-type="string" ns42:value-type="string" table:number-columns-spanned="18" table:number-rows-spanned="1">
            <text:p>🏁 CONTROLLED AVAILABLE INVENTORY TRUTH GATE · BUILD 1200</text:p>
          </table:table-cell>
          <table:covered-table-cell table:number-columns-repeated="17"/>
        </table:table-row>
        <table:table-row table:style-name="ro5">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AVAILABIL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SERVATION CONTROL</text:p>
          </table:table-cell>
          <table:covered-table-cell table:number-columns-repeated="2"/>
          <table:table-cell table:style-name="ce53" office:value-type="string" ns42:value-type="string" table:number-columns-spanned="3" table:number-rows-spanned="1">
            <text:p>RELEASE CONTROL</text:p>
          </table:table-cell>
          <table:covered-table-cell table:number-columns-repeated="2"/>
          <table:table-cell table:style-name="ce53" office:value-type="string" ns42:value-type="string" table:number-columns-spanned="3" table:number-rows-spanned="1">
            <text:p>AVAILABLE INVENTORY TRUTH</text:p>
          </table:table-cell>
          <table:covered-table-cell table:number-columns-repeated="2"/>
        </table:table-row>
        <table:table-row table:style-name="ro21">
          <table:table-cell table:style-name="ce54" table:formula="of:=[.P1072]" office:value-type="string" office:string-value="VERIFIED" ns42:value-type="string" table:number-columns-spanned="3" table:number-rows-spanned="1">
            <text:p>VERIFIED</text:p>
          </table:table-cell>
          <table:covered-table-cell table:number-columns-repeated="2"/>
          <table:table-cell table:style-name="ce54" table:formula="of:=[.P1076]" office:value-type="string" office:string-value="VERIFIED" ns42:value-type="string" table:number-columns-spanned="3" table:number-rows-spanned="1">
            <text:p>VERIFIED</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096]))=&quot;VERIFIED&quot;;UPPER(TRIM([.D1096]))=&quot;VERIFIED&quot;;UPPER(TRIM([.G1096]))=&quot;DENIED&quot;;UPPER(TRIM([.J1096]))=&quot;NO WRITE&quot;;UPPER(TRIM([.M1096]))=&quot;NO ACTION&quot;;VALUE([.G1076])=0);&quot;VERIFIED ZERO AVAILABLE&quot;;&quot;FAILED&quot;)" office:value-type="string" office:string-value="VERIFIED ZERO AVAILABLE" ns42:value-type="string" table:number-columns-spanned="3" table:number-rows-spanned="1">
            <text:p>VERIFIED ZERO AVAILABLE</text:p>
          </table:table-cell>
          <table:covered-table-cell table:number-columns-repeated="2"/>
        </table:table-row>
        <table:table-row table:style-name="ro5">
          <table:table-cell table:style-name="ce54" office:value-type="string" ns42:value-type="string" table:number-columns-spanned="18" table:number-rows-spanned="1">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OVERSELL PREVENTION · BUILDS 1201–1600</text:p>
          </table:table-cell>
          <table:covered-table-cell table:number-columns-repeated="17"/>
        </table:table-row>
        <table:table-row table:style-name="ro5">
          <table:table-cell table:style-name="ce53" office:value-type="string" ns42:value-type="string" table:number-columns-spanned="3" table:number-rows-spanned="1">
            <text:p>AVAILABLE TRUTH</text:p>
          </table:table-cell>
          <table:covered-table-cell table:number-columns-repeated="2"/>
          <table:table-cell table:style-name="ce53" office:value-type="string" ns42:value-type="string" table:number-columns-spanned="3" table:number-rows-spanned="1">
            <text:p>REQUESTED QTY</text:p>
          </table:table-cell>
          <table:covered-table-cell table:number-columns-repeated="2"/>
          <table:table-cell table:style-name="ce53" office:value-type="string" ns42:value-type="string" table:number-columns-spanned="3" table:number-rows-spanned="1">
            <text:p>CAPACITY CHECK</text:p>
          </table:table-cell>
          <table:covered-table-cell table:number-columns-repeated="2"/>
          <table:table-cell table:style-name="ce53" office:value-type="string" ns42:value-type="string" table:number-columns-spanned="3" table:number-rows-spanned="1">
            <text:p>OVERSOL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P1096]" office:value-type="string" office:string-value="VERIFIED ZERO AVAILABLE" ns42:value-type="string" table:number-columns-spanned="3" table:number-rows-spanned="1">
            <text:p>VERIFIED ZERO AVAILABLE</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VALUE([.D1100])&lt;=VALUE([.G1076]);&quot;PASS&quot;;&quot;FAIL&quot;)" office:value-type="string" office:string-value="FAIL" ns42:value-type="string" table:number-columns-spanned="3" table:number-rows-spanned="1">
            <text:p>FAIL</text:p>
          </table:table-cell>
          <table:covered-table-cell table:number-columns-repeated="2"/>
          <table:table-cell table:style-name="ce54" table:formula="of:=IF(UPPER(TRIM([.G1100]))=&quot;PASS&quot;;&quot;NO&quot;;&quot;NO&quot;)" office:value-type="string" office:string-value="NO" ns42:value-type="string" table:number-columns-spanned="3" table:number-rows-spanned="1">
            <text:p>NO</text:p>
          </table:table-cell>
          <table:covered-table-cell table:number-columns-repeated="2"/>
          <table:table-cell table:style-name="ce54" table:formula="of:=IF(UPPER(TRIM([.G1100]))=&quot;PASS&quot;;&quot;YES&quot;;&quot;NO&quot;)" office:value-type="string" office:string-value="NO" ns42:value-type="string" table:number-columns-spanned="3" table:number-rows-spanned="1">
            <text:p>NO</text:p>
          </table:table-cell>
          <table:covered-table-cell table:number-columns-repeated="2"/>
          <table:table-cell table:style-name="ce54" table:formula="of:=IF(UPPER(TRIM([.M1100]))=&quot;YES&quot;;&quot;AUTHORIZ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ZERO AVAILABLE INVENTORY MUST BLOCK POSITIVE QUANTITY REQUESTS BEFORE ANY CONTROLLED WRITE</text:p>
          </table:table-cell>
          <table:covered-table-cell table:number-columns-repeated="17"/>
        </table:table-row>
        <table:table-row table:style-name="ro5">
          <table:table-cell table:style-name="ce52" office:value-type="string" ns42:value-type="string" table:number-columns-spanned="18" table:number-rows-spanned="1">
            <text:p>📦 MULTI-UNIT INVENTORY TRUTH · BUILDS 1601–2000</text:p>
          </table:table-cell>
          <table:covered-table-cell table:number-columns-repeated="17"/>
        </table:table-row>
        <table:table-row table:style-name="ro5">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TY</text:p>
          </table:table-cell>
          <table:covered-table-cell table:number-columns-repeated="2"/>
          <table:table-cell table:style-name="ce53" office:value-type="string" ns42:value-type="string" table:number-columns-spanned="3" table:number-rows-spanned="1">
            <text:p>SOLD QTY</text:p>
          </table:table-cell>
          <table:covered-table-cell table:number-columns-repeated="2"/>
          <table:table-cell table:style-name="ce53" office:value-type="string" ns42:value-type="string" table:number-columns-spanned="3" table:number-rows-spanned="1">
            <text:p>REMAINING QTY</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table:formula="of:=[.G932]" office:value-type="string" office:string-value="50.00" ns42:value-type="string" table:number-columns-spanned="3" table:number-rows-spanned="1">
            <text:p>50.00</text:p>
          </table:table-cell>
          <table:covered-table-cell table:number-columns-repeated="2"/>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D1104])-VALUE([.G1104])" office:value-type="string" office:string-value="0" ns42:value-type="string" table:number-columns-spanned="3" table:number-rows-spanned="1">
            <text:p>0</text:p>
          </table:table-cell>
          <table:covered-table-cell table:number-columns-repeated="2"/>
          <table:table-cell table:style-name="ce54" table:formula="of:=IF(AND(VALUE([.J1104])&gt;=0;VALUE([.J1104])&lt;=VALUE([.D1104]));&quot;YES&quot;;&quot;NO&quot;)" office:value-type="string" office:string-value="YES" ns42:value-type="string" table:number-columns-spanned="3" table:number-rows-spanned="1">
            <text:p>YES</text:p>
          </table:table-cell>
          <table:covered-table-cell table:number-columns-repeated="2"/>
          <table:table-cell table:style-name="ce54" table:formula="of:=IF(UPPER(TRIM([.M110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MULTI-UNIT TRUTH DERIVES REMAINING QUANTITY FROM ORIGINAL QUANTITY LESS SOLD QUANTITY AND FAILS CLOSED ON INVALID COUNTS</text:p>
          </table:table-cell>
          <table:covered-table-cell table:number-columns-repeated="17"/>
        </table:table-row>
        <table:table-row table:style-name="ro5">
          <table:table-cell table:style-name="ce52" office:value-type="string" ns42:value-type="string" table:number-columns-spanned="18" table:number-rows-spanned="1">
            <text:p>🔐 CONCURRENT RESERVATION AUTHORITY · BUILDS 2001–2400</text:p>
          </table:table-cell>
          <table:covered-table-cell table:number-columns-repeated="17"/>
        </table:table-row>
        <table:table-row table:style-name="ro5">
          <table:table-cell table:style-name="ce53" office:value-type="string" ns42:value-type="string" table:number-columns-spanned="3" table:number-rows-spanned="1">
            <text:p>RESERVATION A</text:p>
          </table:table-cell>
          <table:covered-table-cell table:number-columns-repeated="2"/>
          <table:table-cell table:style-name="ce53" office:value-type="string" ns42:value-type="string" table:number-columns-spanned="3" table:number-rows-spanned="1">
            <text:p>RESERVATION B</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ce53" office:value-type="string" ns42:value-type="string" table:number-columns-spanned="3" table:number-rows-spanned="1">
            <text:p>TOTAL REQUESTED</text:p>
          </table:table-cell>
          <table:covered-table-cell table:number-columns-repeated="2"/>
          <table:table-cell table:style-name="ce53" office:value-type="string" ns42:value-type="string" table:number-columns-spanned="3" table:number-rows-spanned="1">
            <text:p>CONFLICT</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A1108])+VALUE([.D1108])" office:value-type="string" office:string-value="2" ns42:value-type="string" table:number-columns-spanned="3" table:number-rows-spanned="1">
            <text:p>2</text:p>
          </table:table-cell>
          <table:covered-table-cell table:number-columns-repeated="2"/>
          <table:table-cell table:style-name="ce54" table:formula="of:=IF(VALUE([.J1108])&gt;VALUE([.G1108]);&quot;YES&quot;;&quot;NO&quot;)" office:value-type="string" office:string-value="YES" ns42:value-type="string" table:number-columns-spanned="3" table:number-rows-spanned="1">
            <text:p>YES</text:p>
          </table:table-cell>
          <table:covered-table-cell table:number-columns-repeated="2"/>
          <table:table-cell table:style-name="ce54" table:formula="of:=IF(UPPER(TRIM([.M1108]))=&quot;YES&quot;;&quot;DENIED&quot;;&quot;GRANT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CONCURRENT REQUESTS ARE EVALUATED AGAINST ONE AUTHORITATIVE AVAILABILITY VALUE; OVER-ALLOCATION CONFLICT DENIES AUTHORITY</text:p>
          </table:table-cell>
          <table:covered-table-cell table:number-columns-repeated="17"/>
        </table:table-row>
        <table:table-row table:style-name="ro5">
          <table:table-cell table:style-name="ce52" office:value-type="string" ns42:value-type="string" table:number-columns-spanned="18" table:number-rows-spanned="1">
            <text:p>🧮 ALLOCATION + DEPLETION INTEGRITY · BUILDS 2401–2800</text:p>
          </table:table-cell>
          <table:covered-table-cell table:number-columns-repeated="17"/>
        </table:table-row>
        <table:table-row table:style-name="ro5">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LLOCATED QTY</text:p>
          </table:table-cell>
          <table:covered-table-cell table:number-columns-repeated="2"/>
          <table:table-cell table:style-name="ce53" office:value-type="string" ns42:value-type="string" table:number-columns-spanned="3" table:number-rows-spanned="1">
            <text:p>PRE-WRITE QTY</text:p>
          </table:table-cell>
          <table:covered-table-cell table:number-columns-repeated="2"/>
          <table:table-cell table:style-name="ce53" office:value-type="string" ns42:value-type="string" table:number-columns-spanned="3" table:number-rows-spanned="1">
            <text:p>POST-WRITE QTY</text:p>
          </table:table-cell>
          <table:covered-table-cell table:number-columns-repeated="2"/>
          <table:table-cell table:style-name="ce53" office:value-type="string" ns42:value-type="string" table:number-columns-spanned="3" table:number-rows-spanned="1">
            <text:p>DEPLETION VALID</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IF(UPPER(TRIM([.A1112]))=&quot;GRANTED&quot;;VALUE([.J1108]);0)" office:value-type="string" office:string-value="0" ns42:value-type="string" table:number-columns-spanned="3" table:number-rows-spanned="1">
            <text:p>0</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G1112])-VALUE([.D1112])" office:value-type="string" office:string-value="0" ns42:value-type="string" table:number-columns-spanned="3" table:number-rows-spanned="1">
            <text:p>0</text:p>
          </table:table-cell>
          <table:covered-table-cell table:number-columns-repeated="2"/>
          <table:table-cell table:style-name="ce54" table:formula="of:=IF(AND(VALUE([.J1112])&gt;=0;VALUE([.J1112])=VALUE([.G1112])-VALUE([.D1112]));&quot;YES&quot;;&quot;NO&quot;)" office:value-type="string" office:string-value="YES" ns42:value-type="string" table:number-columns-spanned="3" table:number-rows-spanned="1">
            <text:p>YES</text:p>
          </table:table-cell>
          <table:covered-table-cell table:number-columns-repeated="2"/>
          <table:table-cell table:style-name="ce54" table:formula="of:=IF(UPPER(TRIM([.M1112]))=&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LLOCATION MAY DEPLETE INVENTORY ONLY AFTER GRANTED AUTHORITY; DENIED AUTHORITY DERIVES ZERO ALLOCATION AND PRESERVES QUANTITY</text:p>
          </table:table-cell>
          <table:covered-table-cell table:number-columns-repeated="17"/>
        </table:table-row>
        <table:table-row table:style-name="ro5">
          <table:table-cell table:style-name="ce52" office:value-type="string" ns42:value-type="string" table:number-columns-spanned="18" table:number-rows-spanned="1">
            <text:p>🔁 RELEASE RESTORATION TRUTH · BUILDS 2801–3200</text:p>
          </table:table-cell>
          <table:covered-table-cell table:number-columns-repeated="17"/>
        </table:table-row>
        <table:table-row table:style-name="ro5">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RELEASE QTY</text:p>
          </table:table-cell>
          <table:covered-table-cell table:number-columns-repeated="2"/>
          <table:table-cell table:style-name="ce53" office:value-type="string" ns42:value-type="string" table:number-columns-spanned="3" table:number-rows-spanned="1">
            <text:p>PRE-RELEASE QTY</text:p>
          </table:table-cell>
          <table:covered-table-cell table:number-columns-repeated="2"/>
          <table:table-cell table:style-name="ce53" office:value-type="string" ns42:value-type="string" table:number-columns-spanned="3" table:number-rows-spanned="1">
            <text:p>RESTORED QTY</text:p>
          </table:table-cell>
          <table:covered-table-cell table:number-columns-repeated="2"/>
          <table:table-cell table:style-name="ce53" office:value-type="string" ns42:value-type="string" table:number-columns-spanned="3" table:number-rows-spanned="1">
            <text:p>RESTORATION RESULT</text:p>
          </table:table-cell>
          <table:covered-table-cell table:number-columns-repeated="2"/>
        </table:table-row>
        <table:table-row table:style-name="ro21">
          <table:table-cell table:style-name="ce54" table:formula="of:=IF(VALUE([.D1112])&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116]))=&quot;YES&quot;;UPPER(TRIM([.D1116]))=&quot;YES&quot;);VALUE([.D1112]);0)" office:value-type="string" office:string-value="0" ns42:value-type="string" table:number-columns-spanned="3" table:number-rows-spanned="1">
            <text:p>0</text:p>
          </table:table-cell>
          <table:covered-table-cell table:number-columns-repeated="2"/>
          <table:table-cell table:style-name="ce54" table:formula="of:=[.J1112]" office:value-type="string" office:string-value="0" ns42:value-type="string" table:number-columns-spanned="3" table:number-rows-spanned="1">
            <text:p>0</text:p>
          </table:table-cell>
          <table:covered-table-cell table:number-columns-repeated="2"/>
          <table:table-cell table:style-name="ce54" table:formula="of:=VALUE([.J1116])+VALUE([.G1116])" office:value-type="string" office:string-value="0" ns42:value-type="string" table:number-columns-spanned="3" table:number-rows-spanned="1">
            <text:p>0</text:p>
          </table:table-cell>
          <table:covered-table-cell table:number-columns-repeated="2"/>
          <table:table-cell table:style-name="ce54" table:formula="of:=IF(VALUE([.G1116])&gt;0;&quot;RESTORED&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RESTORATION REQUIRES AN ACTIVE ALLOCATION AND EXPLICIT RELEASE REQUEST; OTHERWISE INVENTORY REMAINS UNCHANGED</text:p>
          </table:table-cell>
          <table:covered-table-cell table:number-columns-repeated="17"/>
        </table:table-row>
        <table:table-row table:style-name="ro5">
          <table:table-cell table:style-name="ce52" office:value-type="string" ns42:value-type="string" table:number-columns-spanned="18" table:number-rows-spanned="1">
            <text:p>💰 SOLD CONVERSION CONTROL · BUILDS 3201–3600</text:p>
          </table:table-cell>
          <table:covered-table-cell table:number-columns-repeated="17"/>
        </table:table-row>
        <table:table-row table:style-name="ro5">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SALE QTY</text:p>
          </table:table-cell>
          <table:covered-table-cell table:number-columns-repeated="2"/>
          <table:table-cell table:style-name="ce53" office:value-type="string" ns42:value-type="string" table:number-columns-spanned="3" table:number-rows-spanned="1">
            <text:p>CONVERSION ELIGIBLE</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cell table:style-name="ce53" office:value-type="string" ns42:value-type="string" table:number-columns-spanned="3" table:number-rows-spanned="1">
            <text:p>CONVERSION RESULT</text:p>
          </table:table-cell>
          <table:covered-table-cell table:number-columns-repeated="2"/>
        </table:table-row>
        <table:table-row table:style-name="ro21">
          <table:table-cell table:style-name="ce54" table:formula="of:=[.J869]" office:value-type="string" office:string-value="YES" ns42:value-type="string" table:number-columns-spanned="3" table:number-rows-spanned="1">
            <text:p>YES</text:p>
          </table:table-cell>
          <table:covered-table-cell table:number-columns-repeated="2"/>
          <table:table-cell table:style-name="ce54" table:formula="of:=[.A1116]" office:value-type="string" office:string-value="NO" ns42:value-type="string" table:number-columns-spanned="3" table:number-rows-spanned="1">
            <text:p>NO</text:p>
          </table:table-cell>
          <table:covered-table-cell table:number-columns-repeated="2"/>
          <table:table-cell table:style-name="ce54" table:formula="of:=[.J860]" office:value-type="string" office:string-value="1" ns42:value-type="string" table:number-columns-spanned="3" table:number-rows-spanned="1">
            <text:p>1</text:p>
          </table:table-cell>
          <table:covered-table-cell table:number-columns-repeated="2"/>
          <table:table-cell table:style-name="ce54" table:formula="of:=IF(AND(UPPER(TRIM([.A1120]))=&quot;YES&quot;;UPPER(TRIM([.D1120]))=&quot;YES&quot;;VALUE([.G112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J1120]))=&quot;ELIGIBLE&quot;;&quot;CONTROLLED SOLD WRITE&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120]))=&quot;CONTROLLED SOLD WRITE&quot;;&quot;CONVERT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VERIFIED SALE EVIDENCE ALONE CANNOT CONVERT INVENTORY; SOLD CONVERSION REQUIRES A MATCHED ACTIVE ALLOCATION</text:p>
          </table:table-cell>
          <table:covered-table-cell table:number-columns-repeated="17"/>
        </table:table-row>
        <table:table-row table:style-name="ro5">
          <table:table-cell table:style-name="ce52" office:value-type="string" ns42:value-type="string" table:number-columns-spanned="18" table:number-rows-spanned="1">
            <text:p>📚 INVENTORY LEDGER RECONCILIATION · BUILDS 3601–400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ALLOCATED</text:p>
          </table:table-cell>
          <table:covered-table-cell table:number-columns-repeated="2"/>
          <table:table-cell table:style-name="ce53" office:value-type="string" ns42:value-type="string" table:number-columns-spanned="3" table:number-rows-spanned="1">
            <text:p>RELEASED</text:p>
          </table:table-cell>
          <table:covered-table-cell table:number-columns-repeated="2"/>
          <table:table-cell table:style-name="ce53" office:value-type="string" ns42:value-type="string" table:number-columns-spanned="3" table:number-rows-spanned="1">
            <text:p>SOLD</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ce53" office:value-type="string" ns42:value-type="string" table:number-columns-spanned="3" table:number-rows-spanned="1">
            <text:p>LEDGER RESULT</text:p>
          </table:table-cell>
          <table:covered-table-cell table:number-columns-repeated="2"/>
        </table:table-row>
        <table:table-row table:style-name="ro21">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D1112]" office:value-type="string" office:string-value="0" ns42:value-type="string" table:number-columns-spanned="3" table:number-rows-spanned="1">
            <text:p>0</text:p>
          </table:table-cell>
          <table:covered-table-cell table:number-columns-repeated="2"/>
          <table:table-cell table:style-name="ce54" table:formula="of:=[.G1116]" office:value-type="string" office:string-value="0" ns42:value-type="string" table:number-columns-spanned="3" table:number-rows-spanned="1">
            <text:p>0</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A1124])-VALUE([.D1124])+VALUE([.G1124])-VALUE([.J1124])" office:value-type="string" office:string-value="0" ns42:value-type="string" table:number-columns-spanned="3" table:number-rows-spanned="1">
            <text:p>0</text:p>
          </table:table-cell>
          <table:covered-table-cell table:number-columns-repeated="2"/>
          <table:table-cell table:style-name="ce54" table:formula="of:=IF(VALUE([.M1124])=VALUE([.G1076]);&quot;RECONCILED&quot;;&quot;MISMATCH&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APPEND-ONLY INVENTORY EVENTS MUST RECONCILE OPENING QUANTITY - ALLOCATED + RELEASED - SOLD TO AUTHORITATIVE AVAILABLE QUANTITY</text:p>
          </table:table-cell>
          <table:covered-table-cell table:number-columns-repeated="17"/>
        </table:table-row>
        <table:table-row table:style-name="ro5">
          <table:table-cell table:style-name="ce52" office:value-type="string" ns42:value-type="string" table:number-columns-spanned="18" table:number-rows-spanned="1">
            <text:p>⚙️ CROSS-WORKFLOW EXECUTION PROTECTION · BUILDS 4001–4400</text:p>
          </table:table-cell>
          <table:covered-table-cell table:number-columns-repeated="17"/>
        </table:table-row>
        <table:table-row table:style-name="ro5">
          <table:table-cell table:style-name="ce53" office:value-type="string" ns42:value-type="string" table:number-columns-spanned="3" table:number-rows-spanned="1">
            <text:p>LISTED WRITE</text:p>
          </table:table-cell>
          <table:covered-table-cell table:number-columns-repeated="2"/>
          <table:table-cell table:style-name="ce53" office:value-type="string" ns42:value-type="string" table:number-columns-spanned="3" table:number-rows-spanned="1">
            <text:p>SOLD WRITE</text:p>
          </table:table-cell>
          <table:covered-table-cell table:number-columns-repeated="2"/>
          <table:table-cell table:style-name="ce53" office:value-type="string" ns42:value-type="string" table:number-columns-spanned="3" table:number-rows-spanned="1">
            <text:p>RESERVATION WRITE</text:p>
          </table:table-cell>
          <table:covered-table-cell table:number-columns-repeated="2"/>
          <table:table-cell table:style-name="ce53" office:value-type="string" ns42:value-type="string" table:number-columns-spanned="3" table:number-rows-spanned="1">
            <text:p>RELEASE WRITE</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PROTECTION RESULT</text:p>
          </table:table-cell>
          <table:covered-table-cell table:number-columns-repeated="2"/>
        </table:table-row>
        <table:table-row table:style-name="ro21">
          <table:table-cell table:style-name="ce54" table:formula="of:=[.M818]" office:value-type="string" office:string-value="COMPLETED" ns42:value-type="string" table:number-columns-spanned="3" table:number-rows-spanned="1">
            <text:p>COMPLETED</text:p>
          </table:table-cell>
          <table:covered-table-cell table:number-columns-repeated="2"/>
          <table:table-cell table:style-name="ce54" table:formula="of:=[.M899]" office:value-type="string" office:string-value="COMPLETED" ns42:value-type="string" table:number-columns-spanned="3" table:number-rows-spanned="1">
            <text:p>COMPLET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128]))=&quot;COMPLETED&quot;;UPPER(TRIM([.D1128]))=&quot;COMPLETED&quot;;OR(UPPER(TRIM([.G1128]))=&quot;EXECUTED&quot;;UPPER(TRIM([.J1128]))=&quot;CONTROLLED RELEASE&quot;));&quot;YES&quot;;&quot;NO&quot;)" office:value-type="string" office:string-value="NO" ns42:value-type="string" table:number-columns-spanned="3" table:number-rows-spanned="1">
            <text:p>NO</text:p>
          </table:table-cell>
          <table:covered-table-cell table:number-columns-repeated="2"/>
          <table:table-cell table:style-name="ce54" table:formula="of:=IF(UPPER(TRIM([.M1128]))=&quot;NO&quot;;&quot;PROTECTED&quot;;&quot;CONFLICT&quot;)" office:value-type="string" office:string-value="PROTECTED" ns42:value-type="string" table:number-columns-spanned="3" table:number-rows-spanned="1">
            <text:p>PROTECTED</text:p>
          </table:table-cell>
          <table:covered-table-cell table:number-columns-repeated="2"/>
        </table:table-row>
        <table:table-row table:style-name="ro5">
          <table:table-cell table:style-name="ce54" office:value-type="string" ns42:value-type="string" table:number-columns-spanned="18" table:number-rows-spanned="1">
            <text:p>CROSS-WORKFLOW CONTROL MUST NOT DERIVE A SECOND INVENTORY WRITE FROM ALREADY COMPLETED LIFECYCLE EXECUTIONS</text:p>
          </table:table-cell>
          <table:covered-table-cell table:number-columns-repeated="17"/>
        </table:table-row>
        <table:table-row table:style-name="ro5">
          <table:table-cell table:style-name="ce52" office:value-type="string" ns42:value-type="string" table:number-columns-spanned="18" table:number-rows-spanned="1">
            <text:p>🔎 REPLAY + DUPLICATE-WRITE DEFENSE · BUILDS 4401–4800</text:p>
          </table:table-cell>
          <table:covered-table-cell table:number-columns-repeated="17"/>
        </table:table-row>
        <table:table-row table:style-name="ro5">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REPLAY DETECTED</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cell table:style-name="ce53" office:value-type="string" ns42:value-type="string" table:number-columns-spanned="3" table:number-rows-spanned="1">
            <text:p>SECOND RESTORE</text:p>
          </table:table-cell>
          <table:covered-table-cell table:number-columns-repeated="2"/>
          <table:table-cell table:style-name="ce53" office:value-type="string" ns42:value-type="string" table:number-columns-spanned="3" table:number-rows-spanned="1">
            <text:p>SECOND SOLD WRITE</text:p>
          </table:table-cell>
          <table:covered-table-cell table:number-columns-repeated="2"/>
          <table:table-cell table:style-name="ce53" office:value-type="string" ns42:value-type="string" table:number-columns-spanned="3" table:number-rows-spanned="1">
            <text:p>DEFENSE RESULT</text:p>
          </table:table-cell>
          <table:covered-table-cell table:number-columns-repeated="2"/>
        </table:table-row>
        <table:table-row table:style-name="ro21">
          <table:table-cell table:style-name="ce54" table:formula="of:=[.D1039]" office:value-type="string" office:string-value="YES" ns42:value-type="string" table:number-columns-spanned="3" table:number-rows-spanned="1">
            <text:p>YES</text:p>
          </table:table-cell>
          <table:covered-table-cell table:number-columns-repeated="2"/>
          <table:table-cell table:style-name="ce54" table:formula="of:=IF(AND(UPPER(TRIM([.A1132]))=&quot;YES&quot;;UPPER(TRIM([.P1039]))=&quot;ALREADY RECONCILED&quot;);&quot;YES&quot;;&quot;NO&quot;)" office:value-type="string" office:string-value="YES" ns42:value-type="string" table:number-columns-spanned="3" table:number-rows-spanned="1">
            <text:p>YES</text:p>
          </table:table-cell>
          <table:covered-table-cell table:number-columns-repeated="2"/>
          <table:table-cell table:style-name="ce54" table:formula="of:=[.P1039]" office:value-type="string" office:string-value="NO" ns42:value-type="string" table:number-columns-spanned="3" table:number-rows-spanned="1">
            <text:p>NO</text:p>
          </table:table-cell>
          <table:covered-table-cell table:number-columns-repeated="2"/>
          <table:table-cell table:style-name="ce54" table:formula="of:=IF(UPPER(TRIM([.P1116]))=&quot;RESTORED&quot;;&quot;NO&quot;;&quot;NO&quot;)" office:value-type="string" office:string-value="NO" ns42:value-type="string" table:number-columns-spanned="3" table:number-rows-spanned="1">
            <text:p>NO</text:p>
          </table:table-cell>
          <table:covered-table-cell table:number-columns-repeated="2"/>
          <table:table-cell table:style-name="ce54" table:formula="of:=IF(UPPER(TRIM([.P1120]))=&quot;CONVERTED&quot;;&quot;NO&quot;;&quot;NO&quot;)" office:value-type="string" office:string-value="NO" ns42:value-type="string" table:number-columns-spanned="3" table:number-rows-spanned="1">
            <text:p>NO</text:p>
          </table:table-cell>
          <table:covered-table-cell table:number-columns-repeated="2"/>
          <table:table-cell table:style-name="ce54" table:formula="of:=IF(AND(UPPER(TRIM([.D1132]))=&quot;YES&quot;;UPPER(TRIM([.G1132]))=&quot;NO&quot;;UPPER(TRIM([.J1132]))=&quot;NO&quot;;UPPER(TRIM([.M1132]))=&quot;NO&quot;);&quot;PASS&quot;;&quot;FAIL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4" office:value-type="string" ns42:value-type="string" table:number-columns-spanned="18" table:number-rows-spanned="1">
            <text:p>REPLAYED LIFECYCLE EVIDENCE MUST NOT CREATE SECOND DEPLETION, SECOND RESTORATION, OR SECOND SOLD CONVERSION</text:p>
          </table:table-cell>
          <table:covered-table-cell table:number-columns-repeated="17"/>
        </table:table-row>
        <table:table-row table:style-name="ro5">
          <table:table-cell table:style-name="ce52" office:value-type="string" ns42:value-type="string" table:number-columns-spanned="18" table:number-rows-spanned="1">
            <text:p>🏁 CONTROLLED OPERATIONAL INVENTORY INTEGRITY GATE · BUILD 5000</text:p>
          </table:table-cell>
          <table:covered-table-cell table:number-columns-repeated="17"/>
        </table:table-row>
        <table:table-row table:style-name="ro5">
          <table:table-cell table:style-name="ce53" office:value-type="string" ns42:value-type="string" table:number-columns-spanned="3" table:number-rows-spanned="1">
            <text:p>OVERSELL CONTROL</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CONCURRENCY</text:p>
          </table:table-cell>
          <table:covered-table-cell table:number-columns-repeated="2"/>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0]" office:value-type="string" office:string-value="BLOCKED" ns42:value-type="string" table:number-columns-spanned="3" table:number-rows-spanned="1">
            <text:p>BLOCKED</text:p>
          </table:table-cell>
          <table:covered-table-cell table:number-columns-repeated="2"/>
          <table:table-cell table:style-name="ce54" table:formula="of:=[.P1104]" office:value-type="string" office:string-value="VERIFIED" ns42:value-type="string" table:number-columns-spanned="3" table:number-rows-spanned="1">
            <text:p>VERIFIED</text:p>
          </table:table-cell>
          <table:covered-table-cell table:number-columns-repeated="2"/>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P1124]" office:value-type="string" office:string-value="RECONCILED" ns42:value-type="string" table:number-columns-spanned="3" table:number-rows-spanned="1">
            <text:p>RECONCILED</text:p>
          </table:table-cell>
          <table:covered-table-cell table:number-columns-repeated="2"/>
          <table:table-cell table:style-name="ce54" table:formula="of:=[.P1132]" office:value-type="string" office:string-value="PASS" ns42:value-type="string" table:number-columns-spanned="3" table:number-rows-spanned="1">
            <text:p>PASS</text:p>
          </table:table-cell>
          <table:covered-table-cell table:number-columns-repeated="2"/>
          <table:table-cell table:style-name="ce54" table:formula="of:=IF(AND(UPPER(TRIM([.A1136]))=&quot;BLOCKED&quot;;UPPER(TRIM([.D1136]))=&quot;VERIFIED&quot;;UPPER(TRIM([.G1136]))=&quot;DENIED&quot;;UPPER(TRIM([.J1136]))=&quot;RECONCILED&quot;;UPPER(TRIM([.M1136]))=&quot;PASS&quot;;UPPER(TRIM([.P1096]))=&quot;VERIFIED ZERO AVAILABLE&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row>
        <table:table-row table:style-name="ro5">
          <table:table-cell table:style-name="ce54" office:value-type="string" ns42:value-type="string" table:number-columns-spanned="18" table:number-rows-spanned="1">
            <text:p>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LIFECYCLE COORDINATION · BUILDS 5001–8750</text:p>
          </table:table-cell>
          <table:covered-table-cell table:number-columns-repeated="17"/>
        </table:table-row>
        <table:table-row table:style-name="ro5">
          <table:table-cell table:style-name="ce53" office:value-type="string" ns42:value-type="string" table:number-columns-spanned="3" table:number-rows-spanned="1">
            <text:p>PRIOR INTEGRITY</text:p>
          </table:table-cell>
          <table:covered-table-cell table:number-columns-repeated="2"/>
          <table:table-cell table:style-name="ce53" office:value-type="string" ns42:value-type="string" table:number-columns-spanned="3" table:number-rows-spanned="1">
            <text:p>LIFECYCLE ID</text:p>
          </table:table-cell>
          <table:covered-table-cell table:number-columns-repeated="2"/>
          <table:table-cell table:style-name="ce53" office:value-type="string" ns42:value-type="string" table:number-columns-spanned="3" table:number-rows-spanned="1">
            <text:p>STATE CHAIN</text:p>
          </table:table-cell>
          <table:covered-table-cell table:number-columns-repeated="2"/>
          <table:table-cell table:style-name="Default" table:number-columns-repeated="9"/>
        </table:table-row>
        <table:table-row table:style-name="ro21">
          <table:table-cell table:style-name="ce54" table:formula="of:=IF(UPPER(TRIM([.P1136]))=&quot;OPERATIONAL INVENTORY VERIFIED&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CLOSED → RECONCIL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AUTHORITY</text:p>
          </table:table-cell>
          <table:covered-table-cell table:number-columns-repeated="2"/>
          <table:table-cell table:style-name="ce53" office:value-type="string" ns42:value-type="string" table:number-columns-spanned="3" table:number-rows-spanned="1">
            <text:p>ORDER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39]))&lt;&gt;&quot;FAILED&quot;;&quot;COORDINATED&quot;;&quot;FAILED&quot;)" office:value-type="string" office:string-value="COORDINATED" ns42:value-type="string" table:number-columns-spanned="3" table:number-rows-spanned="1">
            <text:p>COORDINA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IFECYCLE COORDINATION REQUIRES VERIFIED SOURCE AUTHORITY AND AN ORDERED STATE CHAIN; NO FREE-FORM STATE WRITE IS CREAT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TRANSFORMATION LINEAGE PROTECTION · BUILDS 8751–12500</text:p>
          </table:table-cell>
          <table:covered-table-cell table:number-columns-repeated="17"/>
        </table:table-row>
        <table:table-row table:style-name="ro5">
          <table:table-cell table:style-name="ce53" office:value-type="string" ns42:value-type="string" table:number-columns-spanned="3" table:number-rows-spanned="1">
            <text:p>SOURCE RECORD</text:p>
          </table:table-cell>
          <table:covered-table-cell table:number-columns-repeated="2"/>
          <table:table-cell table:style-name="ce53" office:value-type="string" ns42:value-type="string" table:number-columns-spanned="3" table:number-rows-spanned="1">
            <text:p>EVENT ID</text:p>
          </table:table-cell>
          <table:covered-table-cell table:number-columns-repeated="2"/>
          <table:table-cell table:style-name="ce53" office:value-type="string" ns42:value-type="string" table:number-columns-spanned="3" table:number-rows-spanned="1">
            <text:p>RESULT GROUP</text:p>
          </table:table-cell>
          <table:covered-table-cell table:number-columns-repeated="2"/>
          <table:table-cell table:style-name="Default" table:number-columns-repeated="9"/>
        </table:table-row>
        <table:table-row table:style-name="ro21">
          <table:table-cell table:style-name="ce54" table:formula="of:=IF(UPPER(TRIM([.G1141]))=&quot;COORDINAT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TRN-000001</text:p>
          </table:table-cell>
          <table:covered-table-cell table:number-columns-repeated="2"/>
          <table:table-cell table:style-name="ce54" office:value-type="string" ns42:value-type="string" table:number-columns-spanned="3" table:number-rows-spanned="1">
            <text:p>RG-000001</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MATCH</text:p>
          </table:table-cell>
          <table:covered-table-cell table:number-columns-repeated="2"/>
          <table:table-cell table:style-name="ce53" office:value-type="string" ns42:value-type="string" table:number-columns-spanned="3" table:number-rows-spanned="1">
            <text:p>LINEAGE COMPLE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4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TRANSFORMATION LINEAGE PRESERVES SOURCE → EVENT → RESULT RELATIONSHIPS AND FAILS CLOSED WHEN IDENTITY IS INCOMPLE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OST CONSERVATION AUTHORITY · BUILDS 12501–16250</text:p>
          </table:table-cell>
          <table:covered-table-cell table:number-columns-repeated="17"/>
        </table:table-row>
        <table:table-row table:style-name="ro5">
          <table:table-cell table:style-name="ce53" office:value-type="string" ns42:value-type="string" table:number-columns-spanned="3" table:number-rows-spanned="1">
            <text:p>SOURCE COST</text:p>
          </table:table-cell>
          <table:covered-table-cell table:number-columns-repeated="2"/>
          <table:table-cell table:style-name="ce53" office:value-type="string" ns42:value-type="string" table:number-columns-spanned="3" table:number-rows-spanned="1">
            <text:p>ALLOCATED COST</text:p>
          </table:table-cell>
          <table:covered-table-cell table:number-columns-repeated="2"/>
          <table:table-cell table:style-name="ce53" office:value-type="string" ns42:value-type="string" table:number-columns-spanned="3" table:number-rows-spanned="1">
            <text:p>UNASSIGNED COST</text:p>
          </table:table-cell>
          <table:covered-table-cell table:number-columns-repeated="2"/>
          <table:table-cell table:style-name="Default" table:number-columns-repeated="9"/>
        </table:table-row>
        <table:table-row table:style-name="ro21">
          <table:table-cell table:style-name="ce54" table:formula="of:=IF(UPPER(TRIM([.G1147]))=&quot;PROTECTED&quot;;&quot;50.00&quot;;&quot;FAILED&quot;)" office:value-type="string" office:string-value="50.00"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0.0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OST BALANCED</text:p>
          </table:table-cell>
          <table:covered-table-cell table:number-columns-repeated="2"/>
          <table:table-cell table:style-name="ce53" office:value-type="string" ns42:value-type="string" table:number-columns-spanned="3" table:number-rows-spanned="1">
            <text:p>VALUE CREAT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51]))&lt;&gt;&quot;FAILED&quot;;&quot;CONSERVED&quot;;&quot;FAILED&quot;)"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OST MAY MOVE BETWEEN AUTHORITATIVE RESULTS BUT MUST NOT BE CREATED OR LOST.</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LOCATION TRUTH · BUILDS 16251–2000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STORAGE LOCATION</text:p>
          </table:table-cell>
          <table:covered-table-cell table:number-columns-repeated="2"/>
          <table:table-cell table:style-name="ce53" office:value-type="string" ns42:value-type="string" table:number-columns-spanned="3" table:number-rows-spanned="1">
            <text:p>LOCATION EVIDENCE</text:p>
          </table:table-cell>
          <table:covered-table-cell table:number-columns-repeated="2"/>
          <table:table-cell table:style-name="Default" table:number-columns-repeated="9"/>
        </table:table-row>
        <table:table-row table:style-name="ro21">
          <table:table-cell table:style-name="ce54" table:formula="of:=IF(UPPER(TRIM([.G1153]))=&quot;CONSERV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TORAGE-A1</text:p>
          </table:table-cell>
          <table:covered-table-cell table:number-columns-repeated="2"/>
          <table:table-cell table:style-name="ce54" office:value-type="string" ns42:value-type="string" table:number-columns-spanned="3" table:number-rows-spanned="1">
            <text:p>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IDENTITY MATCH</text:p>
          </table:table-cell>
          <table:covered-table-cell table:number-columns-repeated="2"/>
          <table:table-cell table:style-name="ce53" office:value-type="string" ns42:value-type="string" table:number-columns-spanned="3" table:number-rows-spanned="1">
            <text:p>LOCATION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57]))&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OCATION TRUTH REQUIRES MATCHED INVENTORY IDENTITY AND COMPLETE LOCATION EVIDENCE BEFORE AUTHORITY IS DERIV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T + QUANTITY AUTHORITY · BUILDS 20001–23750</text:p>
          </table:table-cell>
          <table:covered-table-cell table:number-columns-repeated="17"/>
        </table:table-row>
        <table:table-row table:style-name="ro5">
          <table:table-cell table:style-name="ce53" office:value-type="string" ns42:value-type="string" table:number-columns-spanned="3" table:number-rows-spanned="1">
            <text:p>UNIT ID MODE</text:p>
          </table:table-cell>
          <table:covered-table-cell table:number-columns-repeated="2"/>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59]))=&quot;VERIFIED&quot;;&quot;QUANTITY TRACKED&quot;;&quot;FAILED&quot;)" office:value-type="string" office:string-value="QUANTITY TRACKED" ns42:value-type="string" table:number-columns-spanned="3" table:number-rows-spanned="1">
            <text:p>QUANTITY TRACKED</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UNIT/QTY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63]))&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UNIT AND QUANTITY AUTHORITY MUST RECONCILE TO NONNEGATIVE AUTHORITATIVE INVENTORY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MARKETPLACE ALLOCATION COORDINATION · BUILDS 23751–27500</text:p>
          </table:table-cell>
          <table:covered-table-cell table:number-columns-repeated="17"/>
        </table:table-row>
        <table:table-row table:style-name="ro5">
          <table:table-cell table:style-name="ce53" office:value-type="string" ns42:value-type="string" table:number-columns-spanned="3" table:number-rows-spanned="1">
            <text:p>EBAY REQUEST</text:p>
          </table:table-cell>
          <table:covered-table-cell table:number-columns-repeated="2"/>
          <table:table-cell table:style-name="ce53" office:value-type="string" ns42:value-type="string" table:number-columns-spanned="3" table:number-rows-spanned="1">
            <text:p>TCGPLAYER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65]))=&quot;VERIFI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ROSS-CHANNEL CONFLICT</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69]))&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MARKETPLACE ALLOCATION REQUESTS SHARE ONE AUTHORITATIVE AVAILABLE QUANTITY; CONFLICTS FAIL CLOSED BEFORE WRI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RETURNS + REVERSALS CONTROL · BUILDS 27501–31250</text:p>
          </table:table-cell>
          <table:covered-table-cell table:number-columns-repeated="17"/>
        </table:table-row>
        <table:table-row table:style-name="ro5">
          <table:table-cell table:style-name="ce53" office:value-type="string" ns42:value-type="string" table:number-columns-spanned="3" table:number-rows-spanned="1">
            <text:p>ORIGINAL SALE</text:p>
          </table:table-cell>
          <table:covered-table-cell table:number-columns-repeated="2"/>
          <table:table-cell table:style-name="ce53" office:value-type="string" ns42:value-type="string" table:number-columns-spanned="3" table:number-rows-spanned="1">
            <text:p>RETURN REQUEST</text:p>
          </table:table-cell>
          <table:covered-table-cell table:number-columns-repeated="2"/>
          <table:table-cell table:style-name="ce53" office:value-type="string" ns42:value-type="string" table:number-columns-spanned="3" table:number-rows-spanned="1">
            <text:p>RETURN EVIDENCE</text:p>
          </table:table-cell>
          <table:covered-table-cell table:number-columns-repeated="2"/>
          <table:table-cell table:style-name="Default" table:number-columns-repeated="9"/>
        </table:table-row>
        <table:table-row table:style-name="ro21">
          <table:table-cell table:style-name="ce54" table:formula="of:=IF(UPPER(TRIM([.G1171]))=&quot;BLOCKED&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IN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REVERSAL ELIGIBLE</text:p>
          </table:table-cell>
          <table:covered-table-cell table:number-columns-repeated="2"/>
          <table:table-cell table:style-name="ce53" office:value-type="string" ns42:value-type="string" table:number-columns-spanned="3" table:number-rows-spanned="1">
            <text:p>INVENTORY RESTOR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 WRITE</text:p>
          </table:table-cell>
          <table:covered-table-cell table:number-columns-repeated="2"/>
          <table:table-cell table:style-name="ce54" table:formula="of:=IF(UPPER(TRIM([.A1175]))&lt;&gt;&quot;FAILED&quot;;&quot;NO ACTION&quot;;&quot;FAILED&quot;)" office:value-type="string" office:string-value="NO ACTION" ns42:value-type="string" table:number-columns-spanned="3" table:number-rows-spanned="1">
            <text:p>NO ACTION</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RETURNS AND REVERSALS REQUIRE MATCHED ORIGINAL SALE IDENTITY, COMPLETE EVIDENCE, AND EXPLICIT REQUEST BEFORE RESTORATIO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AMAGED + LOST INVENTORY CONTROL · BUILDS 31251–35000</text:p>
          </table:table-cell>
          <table:covered-table-cell table:number-columns-repeated="17"/>
        </table:table-row>
        <table:table-row table:style-name="ro5">
          <table:table-cell table:style-name="ce53" office:value-type="string" ns42:value-type="string" table:number-columns-spanned="3" table:number-rows-spanned="1">
            <text:p>LOSS REQUEST</text:p>
          </table:table-cell>
          <table:covered-table-cell table:number-columns-repeated="2"/>
          <table:table-cell table:style-name="ce53" office:value-type="string" ns42:value-type="string" table:number-columns-spanned="3" table:number-rows-spanned="1">
            <text:p>DAMAGE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77]))=&quot;NO ACTION&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VIDENCE COMPLETE</text:p>
          </table:table-cell>
          <table:covered-table-cell table:number-columns-repeated="2"/>
          <table:table-cell table:style-name="ce53" office:value-type="string" ns42:value-type="string" table:number-columns-spanned="3" table:number-rows-spanned="1">
            <text:p>ADJUSTMENT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81]))&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DAMAGED OR LOST INVENTORY CANNOT REDUCE QUANTITY WITHOUT COMPLETE EVIDENCE, EXPLICIT REQUEST, AND REVALIDATED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MOVEMENT LEDGER · BUILDS 35001–3875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NET MOVEMENTS</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Default" table:number-columns-repeated="9"/>
        </table:table-row>
        <table:table-row table:style-name="ro21">
          <table:table-cell table:style-name="ce54" table:formula="of:=IF(UPPER(TRIM([.G1183]))=&quot;BLOCK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LEDGER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87]))&lt;&gt;&quot;FAILED&quot;;&quot;RECONCILED&quot;;&quot;FAILED&quot;)" office:value-type="string" office:string-value="RECONCILED" ns42:value-type="string" table:number-columns-spanned="3" table:number-rows-spanned="1">
            <text:p>RECONCI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AUTHORIZED INVENTORY MOVEMENTS RECONCILE THROUGH ONE APPEND-ONLY MOVEMENT TRUTH CHAI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EXCEPTION DETECTION · BUILDS 38751–42500</text:p>
          </table:table-cell>
          <table:covered-table-cell table:number-columns-repeated="17"/>
        </table:table-row>
        <table:table-row table:style-name="ro5">
          <table:table-cell table:style-name="ce53" office:value-type="string" ns42:value-type="string" table:number-columns-spanned="3" table:number-rows-spanned="1">
            <text:p>NEGATIVE QTY</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COST IMBALANCE</text:p>
          </table:table-cell>
          <table:covered-table-cell table:number-columns-repeated="2"/>
          <table:table-cell table:style-name="Default" table:number-columns-repeated="9"/>
        </table:table-row>
        <table:table-row table:style-name="ro21">
          <table:table-cell table:style-name="ce54" table:formula="of:=IF(UPPER(TRIM([.G1189]))=&quot;RECONCILED&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OCATION GAP</text:p>
          </table:table-cell>
          <table:covered-table-cell table:number-columns-repeated="2"/>
          <table:table-cell table:style-name="ce53" office:value-type="string" ns42:value-type="string" table:number-columns-spanned="3" table:number-rows-spanned="1">
            <text:p>OPEN EXCEPTION</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93]))&lt;&gt;&quot;FAILED&quot;;&quot;CLEAR&quot;;&quot;FAILED&quot;)" office:value-type="string" office:string-value="CLEAR"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EXCEPTION DETECTION SURFACES QUANTITY, REPLAY, COST, AND LOCATION FAILURES WITHOUT CREATING MUTATION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ERIVED OPERATIONAL STATUS · BUILDS 42501–46250</text:p>
          </table:table-cell>
          <table:covered-table-cell table:number-columns-repeated="17"/>
        </table:table-row>
        <table:table-row table:style-name="ro5">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ALLOCATION STATE</text:p>
          </table:table-cell>
          <table:covered-table-cell table:number-columns-repeated="2"/>
          <table:table-cell table:style-name="ce53" office:value-type="string" ns42:value-type="string" table:number-columns-spanned="3" table:number-rows-spanned="1">
            <text:p>EXCEPTION STATE</text:p>
          </table:table-cell>
          <table:covered-table-cell table:number-columns-repeated="2"/>
          <table:table-cell table:style-name="Default" table:number-columns-repeated="9"/>
        </table:table-row>
        <table:table-row table:style-name="ro21">
          <table:table-cell table:style-name="ce54" table:formula="of:=IF(UPPER(TRIM([.G1195]))=&quot;CLEAR&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BLOCKED</text:p>
          </table:table-cell>
          <table:covered-table-cell table:number-columns-repeated="2"/>
          <table:table-cell table:style-name="ce54" office:value-type="string"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FINANCIAL LINEAGE</text:p>
          </table:table-cell>
          <table:covered-table-cell table:number-columns-repeated="2"/>
          <table:table-cell table:style-name="ce53" office:value-type="string" ns42:value-type="string" table:number-columns-spanned="3" table:number-rows-spanned="1">
            <text:p>STATUS DERIV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ONSERV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99]))&lt;&gt;&quot;FAILED&quot;;&quot;CONTROLLED&quot;;&quot;FAILED&quot;)" office:value-type="string" office:string-value="CONTROLLED" ns42:value-type="string" table:number-columns-spanned="3" table:number-rows-spanned="1">
            <text:p>CONTROL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OPERATIONAL STATUS IS DERIVED FROM AUTHORITATIVE EVIDENCE CHAINS; A TYPED STATUS VALUE ALONE CANNOT BECOME BUSINESS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ROSS-CONTROL EXECUTION INTEGRITY · BUILDS 46251–49999</text:p>
          </table:table-cell>
          <table:covered-table-cell table:number-columns-repeated="17"/>
        </table:table-row>
        <table:table-row table:style-name="ro5">
          <table:table-cell table:style-name="ce53" office:value-type="string" ns42:value-type="string" table:number-columns-spanned="3" table:number-rows-spanned="1">
            <text:p>LIFECYCLE CONTROL</text:p>
          </table:table-cell>
          <table:covered-table-cell table:number-columns-repeated="2"/>
          <table:table-cell table:style-name="ce53" office:value-type="string" ns42:value-type="string" table:number-columns-spanned="3" table:number-rows-spanned="1">
            <text:p>MOVEMENT 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Default" table:number-columns-repeated="9"/>
        </table:table-row>
        <table:table-row table:style-name="ro21">
          <table:table-cell table:style-name="ce54" table:formula="of:=IF(UPPER(TRIM([.G1201]))=&quot;CONTROLLED&quot;;&quot;COORDINATED&quot;;&quot;FAILED&quot;)" office:value-type="string" office:string-value="COORDINATED" ns42:value-type="string" table:number-columns-spanned="3" table:number-rows-spanned="1">
            <text:p>COORDINATED</text:p>
          </table:table-cell>
          <table:covered-table-cell table:number-columns-repeated="2"/>
          <table:table-cell table:style-name="ce54" office:value-type="string" ns42:value-type="string" table:number-columns-spanned="3" table:number-rows-spanned="1">
            <text:p>RECONCILED</text:p>
          </table:table-cell>
          <table:covered-table-cell table:number-columns-repeated="2"/>
          <table:table-cell table:style-name="ce54" office:value-type="string" ns42:value-type="string" table:number-columns-spanned="3" table:number-rows-spanned="1">
            <text:p>PASS</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XCEPTIONS</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LEAR</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20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ROSS-CONTROL EXECUTION REVALIDATES AUTHORITY AND DEFENDS AGAINST SECOND WRITES ACROSS LIFECYCLE, MOVEMENT, AND REVERSAL WORKFLOWS.</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BUSINESS CONTROL LAYER · BUILD 50000</text:p>
          </table:table-cell>
          <table:covered-table-cell table:number-columns-repeated="17"/>
        </table:table-row>
        <table:table-row table:style-name="ro5">
          <table:table-cell table:style-name="ce53" office:value-type="string" ns42:value-type="string" table:number-columns-spanned="3" table:number-rows-spanned="1">
            <text:p>LIFECYCLE</text:p>
          </table:table-cell>
          <table:covered-table-cell table:number-columns-repeated="2"/>
          <table:table-cell table:style-name="ce53" office:value-type="string" ns42:value-type="string" table:number-columns-spanned="3" table:number-rows-spanned="1">
            <text:p>LINEAGE</text:p>
          </table:table-cell>
          <table:covered-table-cell table:number-columns-repeated="2"/>
          <table:table-cell table:style-name="ce53" office:value-type="string" ns42:value-type="string" table:number-columns-spanned="3" table:number-rows-spanned="1">
            <text:p>COST</text:p>
          </table:table-cell>
          <table:covered-table-cell table:number-columns-repeated="2"/>
          <table:table-cell table:style-name="Default" table:number-columns-repeated="9"/>
        </table:table-row>
        <table:table-row table:style-name="ro21">
          <table:table-cell table:style-name="ce54" table:formula="of:=[.G1141]" office:value-type="string" office:string-value="COORDINATED" ns42:value-type="string" table:number-columns-spanned="3" table:number-rows-spanned="1">
            <text:p>COORDINATED</text:p>
          </table:table-cell>
          <table:covered-table-cell table:number-columns-repeated="2"/>
          <table:table-cell table:style-name="ce54" table:formula="of:=[.G1147]" office:value-type="string" office:string-value="PROTECTED" ns42:value-type="string" table:number-columns-spanned="3" table:number-rows-spanned="1">
            <text:p>PROTECTED</text:p>
          </table:table-cell>
          <table:covered-table-cell table:number-columns-repeated="2"/>
          <table:table-cell table:style-name="ce54" table:formula="of:=[.G1153]"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EXECUTION DEFENSE</text:p>
          </table:table-cell>
          <table:covered-table-cell table:number-columns-repeated="2"/>
          <table:table-cell table:style-name="ce53" office:value-type="string" ns42:value-type="string" table:number-columns-spanned="3" table:number-rows-spanned="1">
            <text:p>FINAL INTEGRITY</text:p>
          </table:table-cell>
          <table:covered-table-cell table:number-columns-repeated="2"/>
          <table:table-cell table:style-name="Default" table:number-columns-repeated="9"/>
        </table:table-row>
        <table:table-row table:style-name="ro21">
          <table:table-cell table:style-name="ce54" table:formula="of:=[.G1189]" office:value-type="string" office:string-value="RECONCILED" ns42:value-type="string" table:number-columns-spanned="3" table:number-rows-spanned="1">
            <text:p>RECONCILED</text:p>
          </table:table-cell>
          <table:covered-table-cell table:number-columns-repeated="2"/>
          <table:table-cell table:style-name="ce54" table:formula="of:=[.G1207]" office:value-type="string" office:string-value="PROTECTED" ns42:value-type="string" table:number-columns-spanned="3" table:number-rows-spanned="1">
            <text:p>PROTECTED</text:p>
          </table:table-cell>
          <table:covered-table-cell table:number-columns-repeated="2"/>
          <table:table-cell table:style-name="ce54" table:formula="of:=IF(AND(UPPER(TRIM([.A1213]))=&quot;RECONCILED&quot;;UPPER(TRIM([.D1213]))=&quot;PROTECTED&quot;;UPPER(TRIM([.G1201]))=&quot;CONTROLLED&quot;;UPPER(TRIM([.G1195]))=&quot;CLEAR&quot;);&quot;UNIFIED INVENTORY CONTROL VERIFIED&quot;;&quot;FAILED&quot;)" office:value-type="string" office:string-value="UNIFIED INVENTORY CONTROL VERIFIED" ns42:value-type="string" table:number-columns-spanned="3" table:number-rows-spanned="1">
            <text:p>UNIFIED INVENTORY CONTROL 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BUILD 50000 UNIFIES LIFECYCLE COORDINATION + TRANSFORMATION LINEAGE + COST CONSERVATION + LOCATION TRUTH + UNIT/QUANTITY AUTHORITY + CROSS-MARKETPLACE ALLOCATION + RETURNS/REVERSALS + LOSS/DAMAGE CONTROL + MOVEMENT LEDGER + EXCEPTION DETECTION + DERIVED STATUS + CROSS-CONTROL EXECUTION DEFENSE · COMPACT HALF-WIDTH CONTROL ARCHITECTURE · NO GENERAL INVENTORY EDIT AUTHORITY.</text:p>
          </table:table-cell>
          <table:covered-table-cell table:number-columns-repeated="8"/>
          <table:table-cell table:style-name="Default" table:number-columns-repeated="9"/>
        </table:table-row>
        <table:table-row>
          <table:table-cell office:value-type="string">
            <text:p>🧭 M13.B1 · OPERATIONAL EXCEPTION + AUDIT READINESS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RESULT</text:p>
          </table:table-cell>
          <table:table-cell office:value-type="string">
            <text:p>REPLAY</text:p>
          </table:table-cell>
          <table:table-cell office:value-type="string">
            <text:p>AUDI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UNIFIED INVENTORY CONTROL VERIFIED</text:p>
          </table:table-cell>
          <table:table-cell office:value-type="string">
            <text:p>VERIFIED</text:p>
          </table:table-cell>
          <table:table-cell office:value-type="string">
            <text:p>PASS</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NTAKE</text:p>
          </table:table-cell>
          <table:table-cell office:value-type="string">
            <text:p>NONE OPEN</text:p>
          </table:table-cell>
          <table:table-cell office:value-type="string">
            <text:p>VALIDAT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EXCEPTION</text:p>
          </table:table-cell>
          <table:table-cell office:value-type="string">
            <text:p>ZERO NEGATIVE</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COST EXCEPTION</text:p>
          </table:table-cell>
          <table:table-cell office:value-type="string">
            <text:p>COST CONSERV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INEAGE EXCEPTION</text:p>
          </table:table-cell>
          <table:table-cell office:value-type="string">
            <text:p>LINEAGE PROTECT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EXCEPTION</text:p>
          </table:table-cell>
          <table:table-cell office:value-type="string">
            <text:p>LOCATION VERIFI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EXCEPTION</text:p>
          </table:table-cell>
          <table:table-cell office:value-type="string">
            <text:p>EXECUTION DEFENSE PROTECTED</text:p>
          </table:table-cell>
          <table:table-cell office:value-type="string">
            <text:p>DERIVED</text:p>
          </table:table-cell>
          <table:table-cell office:value-type="string">
            <text:p>CLEAR</text:p>
          </table:table-cell>
          <table:table-cell office:value-type="string">
            <text:p>YES</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AUDIT PACKET</text:p>
          </table:table-cell>
          <table:table-cell office:value-type="string">
            <text:p>CONTROL CHAIN COMPLETE</text:p>
          </table:table-cell>
          <table:table-cell office:value-type="string">
            <text:p>AUTHORIZED</text:p>
          </table:table-cell>
          <table:table-cell office:value-type="string">
            <text:p>READY</text:p>
          </table:table-cell>
          <table:table-cell office:value-type="string">
            <text:p>NO</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SECOND WRITE</text:p>
          </table:table-cell>
          <table:table-cell office:value-type="string">
            <text:p>REVALIDATED</text:p>
          </table:table-cell>
          <table:table-cell office:value-type="string">
            <text:p>PASS</text:p>
          </table:table-cell>
          <table:table-cell office:value-type="string">
            <text:p>YES</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ALL EXCEPTIONS CLEAR</text:p>
          </table:table-cell>
          <table:table-cell office:value-type="string">
            <text:p>AUTHORIZED</text:p>
          </table:table-cell>
          <table:table-cell office:value-type="string">
            <text:p>AUDIT READY</text:p>
          </table:table-cell>
          <table:table-cell office:value-type="string">
            <text:p>PASS</text:p>
          </table:table-cell>
          <table:table-cell office:value-type="string">
            <text:p>OPERATIONAL AUDIT READY</text:p>
          </table:table-cell>
          <table:table-cell/>
          <table:table-cell/>
          <table:table-cell/>
          <table:table-cell/>
          <table:table-cell/>
          <table:table-cell/>
          <table:table-cell/>
          <table:table-cell/>
          <table:table-cell/>
          <table:table-cell/>
          <table:table-cell/>
          <table:table-cell/>
        </table:table-row>
        <table:table-row>
          <table:table-cell office:value-type="string">
            <text:p>M13.B1 RESULT</text:p>
          </table:table-cell>
          <table:table-cell office:value-type="string">
            <text:p>PRIOR AUTHORITY PRESERVED</text:p>
          </table:table-cell>
          <table:table-cell office:value-type="string">
            <text:p>FAIL-CLOSED</text:p>
          </table:table-cell>
          <table:table-cell office:value-type="string">
            <text:p>VERIFIED</text:p>
          </table:table-cell>
          <table:table-cell office:value-type="string">
            <text:p>DEFENDED</text:p>
          </table:table-cell>
          <table:table-cell office:value-type="string">
            <text:p>OPERATIONAL EXCEPTION CONTROL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3.B2 · CONTROLLED EXCEPTION RESOLUTION EXECUTION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REQUEST</text:p>
          </table:table-cell>
          <table:table-cell office:value-type="string">
            <text:p>AUTHORITY</text:p>
          </table:table-cell>
          <table:table-cell office:value-type="string">
            <text:p>WRITE</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AUDIT READY</text:p>
          </table:table-cell>
          <table:table-cell office:value-type="string">
            <text:p>VERIFIED</text:p>
          </table:table-cell>
          <table:table-cell office:value-type="string">
            <text:p>NO 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RESOLUTION INTAKE</text:p>
          </table:table-cell>
          <table:table-cell office:value-type="string">
            <text:p>NONE OPEN</text:p>
          </table:table-cell>
          <table:table-cell office:value-type="string">
            <text:p>VALIDATED</text:p>
          </table:table-cell>
          <table:table-cell office:value-type="string">
            <text:p>NO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DENTITY</text:p>
          </table:table-cell>
          <table:table-cell office:value-type="string">
            <text:p>NO ACTIVE EXCEPTION</text:p>
          </table:table-cell>
          <table:table-cell office:value-type="string">
            <text:p>MATCH REQUIR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REQUEST</text:p>
          </table:table-cell>
          <table:table-cell office:value-type="string">
            <text:p>NO REQUEST</text:p>
          </table:table-cell>
          <table:table-cell office:value-type="string">
            <text:p>EXPLICIT REQUIRED</text:p>
          </table:table-cell>
          <table:table-cell office:value-type="string">
            <text:p>NO WRITE</text:p>
          </table:table-cell>
          <table:table-cell office:value-type="string">
            <text:p>PASS</text:p>
          </table:table-cell>
          <table:table-cell office:value-type="string">
            <text:p>NO ACTION</text:p>
          </table:table-cell>
          <table:table-cell/>
          <table:table-cell/>
          <table:table-cell/>
          <table:table-cell/>
          <table:table-cell/>
          <table:table-cell/>
          <table:table-cell/>
          <table:table-cell/>
          <table:table-cell/>
          <table:table-cell/>
          <table:table-cell/>
          <table:table-cell/>
        </table:table-row>
        <table:table-row>
          <table:table-cell office:value-type="string">
            <text:p>REVALIDATION</text:p>
          </table:table-cell>
          <table:table-cell office:value-type="string">
            <text:p>PRIOR AUTHORITY PRESERVED</text:p>
          </table:table-cell>
          <table:table-cell office:value-type="string">
            <text:p>REVALIDATED</text:p>
          </table:table-cell>
          <table:table-cell office:value-type="string">
            <text:p>NO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COMMIT</text:p>
          </table:table-cell>
          <table:table-cell office:value-type="string">
            <text:p>NO AUTHORIZED REQUEST</text:p>
          </table:table-cell>
          <table:table-cell office:value-type="string">
            <text:p>DENI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NTROLLED WRITE</text:p>
          </table:table-cell>
          <table:table-cell office:value-type="string">
            <text:p>AUTHORITY DENIED</text:p>
          </table:table-cell>
          <table:table-cell office:value-type="string">
            <text:p>FAIL-CLOS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HISTORY APPEND</text:p>
          </table:table-cell>
          <table:table-cell office:value-type="string">
            <text:p>NO EXECUTED WRITE</text:p>
          </table:table-cell>
          <table:table-cell office:value-type="string">
            <text:p>APPEND-ONLY</text:p>
          </table:table-cell>
          <table:table-cell office:value-type="string">
            <text:p>NO APPEND</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WRITE OCCURRED</text:p>
          </table:table-cell>
          <table:table-cell office:value-type="string">
            <text:p>REVALIDATED</text:p>
          </table:table-cell>
          <table:table-cell office:value-type="string">
            <text:p>NO SECOND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NO 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NO UNAUTHORIZED CORRECTION</text:p>
          </table:table-cell>
          <table:table-cell office:value-type="string">
            <text:p>AUTHORIZED CONTROL</text:p>
          </table:table-cell>
          <table:table-cell office:value-type="string">
            <text:p>NO WRITE</text:p>
          </table:table-cell>
          <table:table-cell office:value-type="string">
            <text:p>PASS</text:p>
          </table:table-cell>
          <table:table-cell office:value-type="string">
            <text:p>EXCEPTION EXECUTION 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M13.B2 RESULT</text:p>
          </table:table-cell>
          <table:table-cell office:value-type="string">
            <text:p>PRIOR AUTHORITY PRESERVED</text:p>
          </table:table-cell>
          <table:table-cell office:value-type="string">
            <text:p>FAIL-CLOSED</text:p>
          </table:table-cell>
          <table:table-cell office:value-type="string">
            <text:p>PROTECTED</text:p>
          </table:table-cell>
          <table:table-cell office:value-type="string">
            <text:p>DEFENDED</text:p>
          </table:table-cell>
          <table:table-cell office:value-type="string">
            <text:p>CONTROLLED EXCEPTION RESOLUTION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4.B1 · CORRECTIVE BUSINESS TRUTH MEGA-BATCH</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NTROLLED EXCEPTION RESOLUTION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ON EXECUTION</text:p>
          </table:table-cell>
          <table:table-cell office:value-type="string">
            <text:p>NO OPEN CORRECTION</text:p>
          </table:table-cell>
          <table:table-cell office:value-type="string">
            <text:p>EXPLICIT REQUEST REQUIRED</text:p>
          </table:table-cell>
          <table:table-cell office:value-type="string">
            <text:p>NO WRITE</text:p>
          </table:table-cell>
          <table:table-cell office:value-type="string">
            <text:p>PASS</text:p>
          </table:table-cell>
          <table:table-cell office:value-type="string">
            <text:p>FAIL-CLOS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AUTHORITY</text:p>
          </table:table-cell>
          <table:table-cell office:value-type="string">
            <text:p>NO REVERSAL EVIDENCE</text:p>
          </table:table-cell>
          <table:table-cell office:value-type="string">
            <text:p>DENIED</text:p>
          </table:table-cell>
          <table:table-cell office:value-type="string">
            <text:p>NO REVERSAL</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NO RETURN RECEIVED</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 REQUIRED</text:p>
          </table:table-cell>
          <table:table-cell office:value-type="string">
            <text:p>MATCH REQUIR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NO CONDITION EVIDENCE</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TO-INVENTORY</text:p>
          </table:table-cell>
          <table:table-cell office:value-type="string">
            <text:p>RETURN AUTHORITY DENIED</text:p>
          </table:table-cell>
          <table:table-cell office:value-type="string">
            <text:p>FAIL-CLOSED</text:p>
          </table:table-cell>
          <table:table-cell office:value-type="string">
            <text:p>NO QTY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EVIDENCE</text:p>
          </table:table-cell>
          <table:table-cell office:value-type="string">
            <text:p>NO VERIFIED REFUND</text:p>
          </table:table-cell>
          <table:table-cell office:value-type="string">
            <text:p>INCOMPLETE</text:p>
          </table:table-cell>
          <table:table-cell office:value-type="string">
            <text:p>NO FINANCIAL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 REQUIRED</text:p>
          </table:table-cell>
          <table:table-cell office:value-type="string">
            <text:p>DENIED</text:p>
          </table:table-cell>
          <table:table-cell office:value-type="string">
            <text:p>NO REFUND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IMPACT</text:p>
          </table:table-cell>
          <table:table-cell office:value-type="string">
            <text:p>NO AUTHORIZED REFUND</text:p>
          </table:table-cell>
          <table:table-cell office:value-type="string">
            <text:p>DERIVED</text:p>
          </table:table-cell>
          <table:table-cell office:value-type="string">
            <text:p>ZERO RESTATEMEN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NO VERIFIED RESTOCK</text:p>
          </table:table-cell>
          <table:table-cell office:value-type="string">
            <text:p>DENIED</text:p>
          </table:table-cell>
          <table:table-cell office:value-type="string">
            <text:p>ZERO RESTORE</text:p>
          </table:table-cell>
          <table:table-cell office:value-type="string">
            <text:p>PASS</text:p>
          </table:table-cell>
          <table:table-cell office:value-type="string">
            <text:p>COST 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NO VERIFIED CORRECTION</text:p>
          </table:table-cell>
          <table:table-cell office:value-type="string">
            <text:p>DENIED</text:p>
          </table:table-cell>
          <table:table-cell office:value-type="string">
            <text:p>NO RESTATEMENT</text:p>
          </table:table-cell>
          <table:table-cell office:value-type="string">
            <text:p>PASS</text:p>
          </table:table-cell>
          <table:table-cell office:value-type="string">
            <text:p>TRUTH 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INEAGE</text:p>
          </table:table-cell>
          <table:table-cell office:value-type="string">
            <text:p>SOURCE EVENT RESULT REQUIRED</text:p>
          </table:table-cell>
          <table:table-cell office:value-type="string">
            <text:p>VALIDATED</text:p>
          </table:table-cell>
          <table:table-cell office:value-type="string">
            <text:p>NO ORPHAN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EDGER</text:p>
          </table:table-cell>
          <table:table-cell office:value-type="string">
            <text:p>NO EXECUTED CORRECTION</text:p>
          </table:table-cell>
          <table:table-cell office:value-type="string">
            <text:p>APPEND-ONLY</text:p>
          </table:table-cell>
          <table:table-cell office:value-type="string">
            <text:p>NO 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CROSS-WORKFLOW REPLAY</text:p>
          </table:table-cell>
          <table:table-cell office:value-type="string">
            <text:p>PRIOR HISTORY PROTECTED</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PRIOR 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 AUTHORITATIVE</text:p>
          </table:table-cell>
          <table:table-cell office:value-type="string">
            <text:p>DERIVED</text:p>
          </table:table-cell>
          <table:table-cell office:value-type="string">
            <text:p>NO VARIANCE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NO UNRESOLVED VARIANCE</text:p>
          </table:table-cell>
          <table:table-cell office:value-type="string">
            <text:p>NOT REQUIRED</text:p>
          </table:table-cell>
          <table:table-cell office:value-type="string">
            <text:p>NO ESCALATION</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RRECTIVE CONTROLS PASS</text:p>
          </table:table-cell>
          <table:table-cell office:value-type="string">
            <text:p>AUTHORIZ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FINAL CORRECTIVE GATE</text:p>
          </table:table-cell>
          <table:table-cell office:value-type="string">
            <text:p>NO UNAUTHORIZED CORRECTIVE MUTATION</text:p>
          </table:table-cell>
          <table:table-cell office:value-type="string">
            <text:p>FAIL-CLOSED</text:p>
          </table:table-cell>
          <table:table-cell office:value-type="string">
            <text:p>PROTECTED</text:p>
          </table:table-cell>
          <table:table-cell office:value-type="string">
            <text:p>PASS</text:p>
          </table:table-cell>
          <table:table-cell office:value-type="string">
            <text:p>CORRECTIVE INTEG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4.B1 RESULT</text:p>
          </table:table-cell>
          <table:table-cell office:value-type="string">
            <text:p>PRIOR AUTHORITY PRESERVED</text:p>
          </table:table-cell>
          <table:table-cell office:value-type="string">
            <text:p>CONTROLLED</text:p>
          </table:table-cell>
          <table:table-cell office:value-type="string">
            <text:p>DEFENDED</text:p>
          </table:table-cell>
          <table:table-cell office:value-type="string">
            <text:p>PASS</text:p>
          </table:table-cell>
          <table:table-cell office:value-type="string">
            <text:p>CORRECTIVE BUSINESS TRUTH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5.B1 · END-TO-END BUSINESS OPERATING AUTHORITY · MAXIMUM LEAP</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RRECTIVE BUSINESS TRUTH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SSET IDENTITY</text:p>
          </table:table-cell>
          <table:table-cell office:value-type="string">
            <text:p>UNIQUE ASSET REQUIRED</text:p>
          </table:table-cell>
          <table:table-cell office:value-type="string">
            <text:p>AUTHORITATIVE</text:p>
          </table:table-cell>
          <table:table-cell office:value-type="string">
            <text:p>NO DUPLICA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ACQUISITION INTAKE</text:p>
          </table:table-cell>
          <table:table-cell office:value-type="string">
            <text:p>SOURCE + DATE + COST REQUIRED</text:p>
          </table:table-cell>
          <table:table-cell office:value-type="string">
            <text:p>VALIDATED</text:p>
          </table:table-cell>
          <table:table-cell office:value-type="string">
            <text:p>INTAK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URCHASE COST</text:p>
          </table:table-cell>
          <table:table-cell office:value-type="string">
            <text:p>ACQUISITION EVIDENCE</text:p>
          </table:table-cell>
          <table:table-cell office:value-type="string">
            <text:p>DERIVED</text:p>
          </table:table-cell>
          <table:table-cell office:value-type="string">
            <text:p>NO MANUAL TRUTH</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AUTHORITY</text:p>
          </table:table-cell>
          <table:table-cell office:value-type="string">
            <text:p>MOVEMENT LEDGER</text:p>
          </table:table-cell>
          <table:table-cell office:value-type="string">
            <text:p>DERIVED</text:p>
          </table:table-cell>
          <table:table-cell office:value-type="string">
            <text:p>NO NEGATI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AUTHORITY</text:p>
          </table:table-cell>
          <table:table-cell office:value-type="string">
            <text:p>CURRENT LOCATION MATCH</text:p>
          </table:table-cell>
          <table:table-cell office:value-type="string">
            <text:p>VALIDATED</text:p>
          </table:table-cell>
          <table:table-cell office:value-type="string">
            <text:p>MOVE CONTROLLED</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CONDITION AUTHORITY</text:p>
          </table:table-cell>
          <table:table-cell office:value-type="string">
            <text:p>EVIDENCE REQUIRED</text:p>
          </table:table-cell>
          <table:table-cell office:value-type="string">
            <text:p>VALIDATED</text:p>
          </table:table-cell>
          <table:table-cell office:value-type="string">
            <text:p>NO SILENT CHANG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PLAN</text:p>
          </table:table-cell>
          <table:table-cell office:value-type="string">
            <text:p>SOURCE + EVENT + RESULT</text:p>
          </table:table-cell>
          <table:table-cell office:value-type="string">
            <text:p>PLANNED</text:p>
          </table:table-cell>
          <table:table-cell office:value-type="string">
            <text:p>NO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EXECUTION</text:p>
          </table:table-cell>
          <table:table-cell office:value-type="string">
            <text:p>EXPLICIT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LINEAGE</text:p>
          </table:table-cell>
          <table:table-cell office:value-type="string">
            <text:p>SOURCE EVENT RESULT</text:p>
          </table:table-cell>
          <table:table-cell office:value-type="string">
            <text:p>AUTHORITATIVE</text:p>
          </table:table-cell>
          <table:table-cell office:value-type="string">
            <text:p>APPEND</text:p>
          </table:table-cell>
          <table:table-cell office:value-type="string">
            <text:p>PASS</text:p>
          </table:table-cell>
          <table:table-cell office:value-type="string">
            <text:p>PERMANENT</text:p>
          </table:table-cell>
          <table:table-cell/>
          <table:table-cell/>
          <table:table-cell/>
          <table:table-cell/>
          <table:table-cell/>
          <table:table-cell/>
          <table:table-cell/>
          <table:table-cell/>
          <table:table-cell/>
          <table:table-cell/>
          <table:table-cell/>
          <table:table-cell/>
        </table:table-row>
        <table:table-row>
          <table:table-cell office:value-type="string">
            <text:p>COST ALLOCATION</text:p>
          </table:table-cell>
          <table:table-cell office:value-type="string">
            <text:p>RESULT GROUP BASIS</text:p>
          </table:table-cell>
          <table:table-cell office:value-type="string">
            <text:p>DERIVED</text:p>
          </table:table-cell>
          <table:table-cell office:value-type="string">
            <text:p>CONSERVE COST</text:p>
          </table:table-cell>
          <table:table-cell office:value-type="string">
            <text:p>PASS</text:p>
          </table:table-cell>
          <table:table-cell office:value-type="string">
            <text:p>BALANCED</text:p>
          </table:table-cell>
          <table:table-cell/>
          <table:table-cell/>
          <table:table-cell/>
          <table:table-cell/>
          <table:table-cell/>
          <table:table-cell/>
          <table:table-cell/>
          <table:table-cell/>
          <table:table-cell/>
          <table:table-cell/>
          <table:table-cell/>
          <table:table-cell/>
        </table:table-row>
        <table:table-row>
          <table:table-cell office:value-type="string">
            <text:p>SEALED BREAK</text:p>
          </table:table-cell>
          <table:table-cell office:value-type="string">
            <text:p>BREAK EVENT</text:p>
          </table:table-cell>
          <table:table-cell office:value-type="string">
            <text:p>AUTHORIZED</text:p>
          </table:table-cell>
          <table:table-cell office:value-type="string">
            <text:p>SOURCE CONSUM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RODUCT OPEN</text:p>
          </table:table-cell>
          <table:table-cell office:value-type="string">
            <text:p>OPEN EVENT</text:p>
          </table:table-cell>
          <table:table-cell office:value-type="string">
            <text:p>AUTHORIZED</text:p>
          </table:table-cell>
          <table:table-cell office:value-type="string">
            <text:p>CONTENTS CREAT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AVAILABILITY</text:p>
          </table:table-cell>
          <table:table-cell office:value-type="string">
            <text:p>QTY + ALLOCATION + STAT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ALLOCATION</text:p>
          </table:table-cell>
          <table:table-cell office:value-type="string">
            <text:p>AVAILABLE QTY</text:p>
          </table:table-cell>
          <table:table-cell office:value-type="string">
            <text:p>VALIDATED</text:p>
          </table:table-cell>
          <table:table-cell office:value-type="string">
            <text:p>RESER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EBAY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CGPLAYER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ROSS-CHANNEL CONFLICT</text:p>
          </table:table-cell>
          <table:table-cell office:value-type="string">
            <text:p>TOTAL REQUEST VS AVAILABLE</text:p>
          </table:table-cell>
          <table:table-cell office:value-type="string">
            <text:p>DERIVED</text:p>
          </table:table-cell>
          <table:table-cell office:value-type="string">
            <text:p>BLOCK OVERSELL</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SALE INTAKE</text:p>
          </table:table-cell>
          <table:table-cell office:value-type="string">
            <text:p>MARKETPLACE SALE EVIDENCE</text:p>
          </table:table-cell>
          <table:table-cell office:value-type="string">
            <text:p>VALIDATED</text:p>
          </table:table-cell>
          <table:table-cell office:value-type="string">
            <text:p>SAL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SALE EXECUTION</text:p>
          </table:table-cell>
          <table:table-cell office:value-type="string">
            <text:p>SALE AUTHORITY</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DECREMENT</text:p>
          </table:table-cell>
          <table:table-cell office:value-type="string">
            <text:p>EXECUTED SALE</text:p>
          </table:table-cell>
          <table:table-cell office:value-type="string">
            <text:p>DERIVED</text:p>
          </table:table-cell>
          <table:table-cell office:value-type="string">
            <text:p>QTY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GROSS REVENUE</text:p>
          </table:table-cell>
          <table:table-cell office:value-type="string">
            <text:p>SALE EVIDENCE</text:p>
          </table:table-cell>
          <table:table-cell office:value-type="string">
            <text:p>DERIVED</text:p>
          </table:table-cell>
          <table:table-cell office:value-type="string">
            <text:p>FINANCIAL WRI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FEES</text:p>
          </table:table-cell>
          <table:table-cell office:value-type="string">
            <text:p>PLATFORM EVIDENCE</text:p>
          </table:table-cell>
          <table:table-cell office:value-type="string">
            <text:p>DERIVED</text:p>
          </table:table-cell>
          <table:table-cell office:value-type="string">
            <text:p>FEE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SHIPPING COST</text:p>
          </table:table-cell>
          <table:table-cell office:value-type="string">
            <text:p>POSTAGE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PACKAGING COST</text:p>
          </table:table-cell>
          <table:table-cell office:value-type="string">
            <text:p>MATERIAL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NET PROCEEDS</text:p>
          </table:table-cell>
          <table:table-cell office:value-type="string">
            <text:p>REVENUE - COST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COGS</text:p>
          </table:table-cell>
          <table:table-cell office:value-type="string">
            <text:p>COST LINEAGE</text:p>
          </table:table-cell>
          <table:table-cell office:value-type="string">
            <text:p>DERIVED</text:p>
          </table:table-cell>
          <table:table-cell office:value-type="string">
            <text:p>COST WRITE</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REALIZED PROFIT</text:p>
          </table:table-cell>
          <table:table-cell office:value-type="string">
            <text:p>NET PROCEEDS - COG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SETTLEMENT</text:p>
          </table:table-cell>
          <table:table-cell office:value-type="string">
            <text:p>PLATFORM PAYOUT MATCH</text:p>
          </table:table-cell>
          <table:table-cell office:value-type="string">
            <text:p>VALIDATED</text:p>
          </table:table-cell>
          <table:table-cell office:value-type="string">
            <text:p>SETTL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ORDER CLOSURE</text:p>
          </table:table-cell>
          <table:table-cell office:value-type="string">
            <text:p>SALE + SETTLEMENT</text:p>
          </table:table-cell>
          <table:table-cell office:value-type="string">
            <text:p>AUTHORIZED</text:p>
          </table:table-cell>
          <table:table-cell office:value-type="string">
            <text:p>CLOS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RETURN EVIDENCE</text:p>
          </table:table-cell>
          <table:table-cell office:value-type="string">
            <text:p>VALIDATED</text:p>
          </table:table-cell>
          <table:table-cell office:value-type="string">
            <text:p>NO RESTOCK YE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text:p>
          </table:table-cell>
          <table:table-cell office:value-type="string">
            <text:p>MATCHED</text:p>
          </table:table-cell>
          <table:table-cell office:value-type="string">
            <text:p>NO ORPHAN RETURN</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CONDITION EVIDENCE</text:p>
          </table:table-cell>
          <table:table-cell office:value-type="string">
            <text:p>VALIDATED</text:p>
          </table:table-cell>
          <table:table-cell office:value-type="string">
            <text:p>RESTOCK DECISION</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text:p>
          </table:table-cell>
          <table:table-cell office:value-type="string">
            <text:p>AUTHORIZED</text:p>
          </table:table-cell>
          <table:table-cell office:value-type="string">
            <text:p>REFUND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VERIFIED RESTOCK</text:p>
          </table:table-cell>
          <table:table-cell office:value-type="string">
            <text:p>DERIVED</text:p>
          </table:table-cell>
          <table:table-cell office:value-type="string">
            <text:p>RESTORE COS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VERIFIED CORRECTION</text:p>
          </table:table-cell>
          <table:table-cell office:value-type="string">
            <text:p>DERIVED</text:p>
          </table:table-cell>
          <table:table-cell office:value-type="string">
            <text:p>RESTA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DAMAGE CONTROL</text:p>
          </table:table-cell>
          <table:table-cell office:value-type="string">
            <text:p>DAMAGE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SS CONTROL</text:p>
          </table:table-cell>
          <table:table-cell office:value-type="string">
            <text:p>LOSS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EVENT</text:p>
          </table:table-cell>
          <table:table-cell office:value-type="string">
            <text:p>EXPLICIT CORRECTION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EVENT</text:p>
          </table:table-cell>
          <table:table-cell office:value-type="string">
            <text:p>ORIGINAL EVENT MATCH</text:p>
          </table:table-cell>
          <table:table-cell office:value-type="string">
            <text:p>AUTHORIZED</text:p>
          </table:table-cell>
          <table:table-cell office:value-type="string">
            <text:p>REVERSAL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UNIFIED MOVEMENT LEDGER</text:p>
          </table:table-cell>
          <table:table-cell office:value-type="string">
            <text:p>ALL AUTHORIZED MOVEM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FINANCIAL LEDGER</text:p>
          </table:table-cell>
          <table:table-cell office:value-type="string">
            <text:p>ALL FINANCIAL EV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VS AUTHORITATIVE</text:p>
          </table:table-cell>
          <table:table-cell office:value-type="string">
            <text:p>DERIVED</text:p>
          </table:table-cell>
          <table:table-cell office:value-type="string">
            <text:p>EXCEPTION ONLY</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UNRESOLVED VARIANCE</text:p>
          </table:table-cell>
          <table:table-cell office:value-type="string">
            <text:p>RULE DRIVEN</text:p>
          </table:table-cell>
          <table:table-cell office:value-type="string">
            <text:p>ESCALATE IF NEED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NTROL DOMAINS</text:p>
          </table:table-cell>
          <table:table-cell office:value-type="string">
            <text:p>DERIV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DESKTOP MIGRATION READINESS</text:p>
          </table:table-cell>
          <table:table-cell office:value-type="string">
            <text:p>PROVEN WORKFLOW + AUTHORITY</text:p>
          </table:table-cell>
          <table:table-cell office:value-type="string">
            <text:p>VALIDATED</text:p>
          </table:table-cell>
          <table:table-cell office:value-type="string">
            <text:p>SPEC READY</text:p>
          </table:table-cell>
          <table:table-cell office:value-type="string">
            <text:p>PASS</text:p>
          </table:table-cell>
          <table:table-cell office:value-type="string">
            <text:p>READY</text:p>
          </table:table-cell>
          <table:table-cell/>
          <table:table-cell/>
          <table:table-cell/>
          <table:table-cell/>
          <table:table-cell/>
          <table:table-cell/>
          <table:table-cell/>
          <table:table-cell/>
          <table:table-cell/>
          <table:table-cell/>
          <table:table-cell/>
          <table:table-cell/>
        </table:table-row>
        <table:table-row>
          <table:table-cell office:value-type="string">
            <text:p>FINAL OS AUTHORITY GATE</text:p>
          </table:table-cell>
          <table:table-cell office:value-type="string">
            <text:p>END-TO-END BUSINESS TRUTH</text:p>
          </table:table-cell>
          <table:table-cell office:value-type="string">
            <text:p>FAIL-CLOSED</text:p>
          </table:table-cell>
          <table:table-cell office:value-type="string">
            <text:p>PROTECTED</text:p>
          </table:table-cell>
          <table:table-cell office:value-type="string">
            <text:p>PASS</text:p>
          </table:table-cell>
          <table:table-cell office:value-type="string">
            <text:p>OPERATING AUTHO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5.B1 RESULT</text:p>
          </table:table-cell>
          <table:table-cell office:value-type="string">
            <text:p>ENTER ONCE UNDERSTAND EVERYWHERE</text:p>
          </table:table-cell>
          <table:table-cell office:value-type="string">
            <text:p>AUTHORITATIVE</text:p>
          </table:table-cell>
          <table:table-cell office:value-type="string">
            <text:p>DEFENDED</text:p>
          </table:table-cell>
          <table:table-cell office:value-type="string">
            <text:p>PASS</text:p>
          </table:table-cell>
          <table:table-cell office:value-type="string">
            <text:p>END-TO-END BUSINESS OS TRUTH VERIFIED</text:p>
          </table:table-cell>
          <table:table-cell/>
          <table:table-cell/>
          <table:table-cell/>
          <table:table-cell/>
          <table:table-cell/>
          <table:table-cell/>
          <table:table-cell/>
          <table:table-cell/>
          <table:table-cell/>
          <table:table-cell/>
          <table:table-cell/>
          <table:table-cell/>
        </table:table-row>
        <table:table-row table:style-name="ro5" table:number-rows-repeated="1047362">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table:table table:name="🧭 Ops Contract">
        <table:table-row>
          <table:table-cell office:value-type="string">
            <text:p>🏠 M16.B1 · MARKETDEX MISSION CONTROL</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BUSINESS HEALTH</text:p>
          </table:table-cell>
          <table:table-cell office:value-type="string">
            <text:p>No duplicate entry</text:p>
          </table:table-cell>
          <table:table-cell office:value-type="string">
            <text:p>Qty + Cost + Profit + Lineage</text:p>
          </table:table-cell>
          <table:table-cell office:value-type="string">
            <text:p>What needs attention?</text:p>
          </table:table-cell>
          <table:table-cell office:value-type="string">
            <text:p>Review exceptions</text:p>
          </table:table-cell>
          <table:table-cell office:value-type="string">
            <text:p>DERIVED</text:p>
          </table:table-cell>
        </table:table-row>
        <table:table-row>
          <table:table-cell office:value-type="string">
            <text:p>INVENTORY</text:p>
          </table:table-cell>
          <table:table-cell office:value-type="string">
            <text:p>Asset intake</text:p>
          </table:table-cell>
          <table:table-cell office:value-type="string">
            <text:p>Available inventory</text:p>
          </table:table-cell>
          <table:table-cell office:value-type="string">
            <text:p>What can sell?</text:p>
          </table:table-cell>
          <table:table-cell office:value-type="string">
            <text:p>Open inventory work</text:p>
          </table:table-cell>
          <table:table-cell office:value-type="string">
            <text:p>AUTHORITATIVE</text:p>
          </table:table-cell>
        </table:table-row>
        <table:table-row>
          <table:table-cell office:value-type="string">
            <text:p>SALES</text:p>
          </table:table-cell>
          <table:table-cell office:value-type="string">
            <text:p>Sale evidence</text:p>
          </table:table-cell>
          <table:table-cell office:value-type="string">
            <text:p>Revenue + COGS + Profit</text:p>
          </table:table-cell>
          <table:table-cell office:value-type="string">
            <text:p>What closed?</text:p>
          </table:table-cell>
          <table:table-cell office:value-type="string">
            <text:p>Review sale truth</text:p>
          </table:table-cell>
          <table:table-cell office:value-type="string">
            <text:p>AUTHORITATIVE</text:p>
          </table:table-cell>
        </table:table-row>
        <table:table-row>
          <table:table-cell office:value-type="string">
            <text:p>RETURNS</text:p>
          </table:table-cell>
          <table:table-cell office:value-type="string">
            <text:p>Return evidence</text:p>
          </table:table-cell>
          <table:table-cell office:value-type="string">
            <text:p>Restock + Refund impact</text:p>
          </table:table-cell>
          <table:table-cell office:value-type="string">
            <text:p>What changed?</text:p>
          </table:table-cell>
          <table:table-cell office:value-type="string">
            <text:p>Resolve return</text:p>
          </table:table-cell>
          <table:table-cell office:value-type="string">
            <text:p>CONTROLLED</text:p>
          </table:table-cell>
        </table:table-row>
        <table:table-row>
          <table:table-cell office:value-type="string">
            <text:p>EXCEPTIONS</text:p>
          </table:table-cell>
          <table:table-cell office:value-type="string">
            <text:p>Variance evidence</text:p>
          </table:table-cell>
          <table:table-cell office:value-type="string">
            <text:p>Open exception state</text:p>
          </table:table-cell>
          <table:table-cell office:value-type="string">
            <text:p>What is blocked?</text:p>
          </table:table-cell>
          <table:table-cell office:value-type="string">
            <text:p>Resolve exception</text:p>
          </table:table-cell>
          <table:table-cell office:value-type="string">
            <text:p>FAIL-CLOSED</text:p>
          </table:table-cell>
        </table:table-row>
        <table:table-row>
          <table:table-cell office:value-type="string">
            <text:p>READINESS</text:p>
          </table:table-cell>
          <table:table-cell office:value-type="string">
            <text:p>All domains</text:p>
          </table:table-cell>
          <table:table-cell office:value-type="string">
            <text:p>Operating readiness</text:p>
          </table:table-cell>
          <table:table-cell office:value-type="string">
            <text:p>Can workflow proceed?</text:p>
          </table:table-cell>
          <table:table-cell office:value-type="string">
            <text:p>Proceed or block</text:p>
          </table:table-cell>
          <table:table-cell office:value-type="string">
            <text:p>DERIVED</text:p>
          </table:table-cell>
        </table:table-row>
        <table:table-row>
          <table:table-cell office:value-type="string">
            <text:p>🧭 M17.B1 · OPERATOR CONTRACT + DESKTOP MIGRATION BRIDGE</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MISSION CONTROL</text:p>
          </table:table-cell>
          <table:table-cell office:value-type="string">
            <text:p>No direct truth entry</text:p>
          </table:table-cell>
          <table:table-cell office:value-type="string">
            <text:p>Health · readiness · attention</text:p>
          </table:table-cell>
          <table:table-cell office:value-type="string">
            <text:p>Missing authoritative evidence</text:p>
          </table:table-cell>
          <table:table-cell office:value-type="string">
            <text:p>Home</text:p>
          </table:table-cell>
          <table:table-cell office:value-type="string">
            <text:p>CONTRACT LOCKED</text:p>
          </table:table-cell>
        </table:table-row>
        <table:table-row>
          <table:table-cell office:value-type="string">
            <text:p>ENTER ONCE</text:p>
          </table:table-cell>
          <table:table-cell office:value-type="string">
            <text:p>Event evidence only</text:p>
          </table:table-cell>
          <table:table-cell office:value-type="string">
            <text:p>Validated authoritative event</text:p>
          </table:table-cell>
          <table:table-cell office:value-type="string">
            <text:p>Identity/evidence/authority fail</text:p>
          </table:table-cell>
          <table:table-cell office:value-type="string">
            <text:p>Asset Manager</text:p>
          </table:table-cell>
          <table:table-cell office:value-type="string">
            <text:p>CONTRACT LOCKED</text:p>
          </table:table-cell>
        </table:table-row>
        <table:table-row>
          <table:table-cell office:value-type="string">
            <text:p>INVENTORY</text:p>
          </table:table-cell>
          <table:table-cell office:value-type="string">
            <text:p>Movement ledger</text:p>
          </table:table-cell>
          <table:table-cell office:value-type="string">
            <text:p>Available qty · location · state</text:p>
          </table:table-cell>
          <table:table-cell office:value-type="string">
            <text:p>Negative qty / conflict</text:p>
          </table:table-cell>
          <table:table-cell office:value-type="string">
            <text:p>Inventory</text:p>
          </table:table-cell>
          <table:table-cell office:value-type="string">
            <text:p>CONTRACT LOCKED</text:p>
          </table:table-cell>
        </table:table-row>
        <table:table-row>
          <table:table-cell office:value-type="string">
            <text:p>TRANSFORMATION</text:p>
          </table:table-cell>
          <table:table-cell office:value-type="string">
            <text:p>Source + event + result request</text:p>
          </table:table-cell>
          <table:table-cell office:value-type="string">
            <text:p>Lineage · cost allocation</text:p>
          </table:table-cell>
          <table:table-cell office:value-type="string">
            <text:p>No explicit request / imbalance</text:p>
          </table:table-cell>
          <table:table-cell office:value-type="string">
            <text:p>Transformation</text:p>
          </table:table-cell>
          <table:table-cell office:value-type="string">
            <text:p>CONTRACT LOCKED</text:p>
          </table:table-cell>
        </table:table-row>
        <table:table-row>
          <table:table-cell office:value-type="string">
            <text:p>SALES</text:p>
          </table:table-cell>
          <table:table-cell office:value-type="string">
            <text:p>Marketplace sale evidence</text:p>
          </table:table-cell>
          <table:table-cell office:value-type="string">
            <text:p>Revenue · COGS · profit</text:p>
          </table:table-cell>
          <table:table-cell office:value-type="string">
            <text:p>Oversell / invalid sale</text:p>
          </table:table-cell>
          <table:table-cell office:value-type="string">
            <text:p>Sales</text:p>
          </table:table-cell>
          <table:table-cell office:value-type="string">
            <text:p>CONTRACT LOCKED</text:p>
          </table:table-cell>
        </table:table-row>
        <table:table-row>
          <table:table-cell office:value-type="string">
            <text:p>RETURNS</text:p>
          </table:table-cell>
          <table:table-cell office:value-type="string">
            <text:p>Original sale + return evidence</text:p>
          </table:table-cell>
          <table:table-cell office:value-type="string">
            <text:p>Refund · restock · restatement</text:p>
          </table:table-cell>
          <table:table-cell office:value-type="string">
            <text:p>No match / incomplete condition</text:p>
          </table:table-cell>
          <table:table-cell office:value-type="string">
            <text:p>Returns</text:p>
          </table:table-cell>
          <table:table-cell office:value-type="string">
            <text:p>CONTRACT LOCKED</text:p>
          </table:table-cell>
        </table:table-row>
        <table:table-row>
          <table:table-cell office:value-type="string">
            <text:p>EXCEPTIONS</text:p>
          </table:table-cell>
          <table:table-cell office:value-type="string">
            <text:p>Variance evidence</text:p>
          </table:table-cell>
          <table:table-cell office:value-type="string">
            <text:p>Blocked state + resolution path</text:p>
          </table:table-cell>
          <table:table-cell office:value-type="string">
            <text:p>Unresolved authority</text:p>
          </table:table-cell>
          <table:table-cell office:value-type="string">
            <text:p>Exceptions</text:p>
          </table:table-cell>
          <table:table-cell office:value-type="string">
            <text:p>CONTRACT LOCKED</text:p>
          </table:table-cell>
        </table:table-row>
        <table:table-row>
          <table:table-cell office:value-type="string">
            <text:p>AUDIT</text:p>
          </table:table-cell>
          <table:table-cell office:value-type="string">
            <text:p>Append-only history</text:p>
          </table:table-cell>
          <table:table-cell office:value-type="string">
            <text:p>Explainable lineage + financial truth</text:p>
          </table:table-cell>
          <table:table-cell office:value-type="string">
            <text:p>Orphan or overwrite attempt</text:p>
          </table:table-cell>
          <table:table-cell office:value-type="string">
            <text:p>Audit</text:p>
          </table:table-cell>
          <table:table-cell office:value-type="string">
            <text:p>CONTRACT LOCKED</text:p>
          </table:table-cell>
        </table:table-row>
        <table:table-row>
          <table:table-cell office:value-type="string">
            <text:p>SETTINGS</text:p>
          </table:table-cell>
          <table:table-cell office:value-type="string">
            <text:p>Operator preferences only</text:p>
          </table:table-cell>
          <table:table-cell office:value-type="string">
            <text:p>Display + local behavior</text:p>
          </table:table-cell>
          <table:table-cell office:value-type="string">
            <text:p>Attempt to alter business truth</text:p>
          </table:table-cell>
          <table:table-cell office:value-type="string">
            <text:p>Settings</text:p>
          </table:table-cell>
          <table:table-cell office:value-type="string">
            <text:p>BOUNDARY LOCKED</text:p>
          </table:table-cell>
        </table:table-row>
        <table:table-row>
          <table:table-cell office:value-type="string">
            <text:p>MIGRATION GATE</text:p>
          </table:table-cell>
          <table:table-cell office:value-type="string">
            <text:p>All contracts preserved</text:p>
          </table:table-cell>
          <table:table-cell office:value-type="string">
            <text:p>Desktop service boundaries</text:p>
          </table:table-cell>
          <table:table-cell office:value-type="string">
            <text:p>Any workbook authority ambiguity</text:p>
          </table:table-cell>
          <table:table-cell office:value-type="string">
            <text:p>Desktop Foundation</text:p>
          </table:table-cell>
          <table:table-cell office:value-type="string">
            <text:p>READY</text:p>
          </table:table-cell>
        </table:table-row>
        <table:table-row>
          <table:table-cell office:value-type="string">
            <text:p>M17.B1 RESULT</text:p>
          </table:table-cell>
          <table:table-cell office:value-type="string">
            <text:p>ENTER ONCE UNDERSTAND EVERYWHERE</text:p>
          </table:table-cell>
          <table:table-cell office:value-type="string">
            <text:p>OPERATOR CONTRACT AUTHORITATIVE</text:p>
          </table:table-cell>
          <table:table-cell office:value-type="string">
            <text:p>FAIL-CLOSED</text:p>
          </table:table-cell>
          <table:table-cell office:value-type="string">
            <text:p>DESKTOP MIGRATION</text:p>
          </table:table-cell>
          <table:table-cell office:value-type="string">
            <text:p>BRIDGE VERIFIED</text:p>
          </table:table-cell>
        </table:table-row>
      </table:table>
      <table:table table:name="➕ Enter Once">
        <table:table-row>
          <table:table-cell office:value-type="string">
            <text:p>➕ M16.B1 · ENTER ONCE INTAKE ROUT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CQUISITION</text:p>
          </table:table-cell>
          <table:table-cell office:value-type="string">
            <text:p>Source · Date · Cost · Qty</text:p>
          </table:table-cell>
          <table:table-cell office:value-type="string">
            <text:p>Asset + cost truth</text:p>
          </table:table-cell>
          <table:table-cell office:value-type="string">
            <text:p>Valid intake?</text:p>
          </table:table-cell>
          <table:table-cell office:value-type="string">
            <text:p>Create acquisition event</text:p>
          </table:table-cell>
          <table:table-cell office:value-type="string">
            <text:p>VALIDATED</text:p>
          </table:table-cell>
        </table:table-row>
        <table:table-row>
          <table:table-cell office:value-type="string">
            <text:p>TRANSFORMATION</text:p>
          </table:table-cell>
          <table:table-cell office:value-type="string">
            <text:p>Source · Event · Result</text:p>
          </table:table-cell>
          <table:table-cell office:value-type="string">
            <text:p>Lineage + allocation</text:p>
          </table:table-cell>
          <table:table-cell office:value-type="string">
            <text:p>Can transform?</text:p>
          </table:table-cell>
          <table:table-cell office:value-type="string">
            <text:p>Create transformation event</text:p>
          </table:table-cell>
          <table:table-cell office:value-type="string">
            <text:p>EXPLICIT REQUEST</text:p>
          </table:table-cell>
        </table:table-row>
        <table:table-row>
          <table:table-cell office:value-type="string">
            <text:p>SALE</text:p>
          </table:table-cell>
          <table:table-cell office:value-type="string">
            <text:p>Marketplace sale evidence</text:p>
          </table:table-cell>
          <table:table-cell office:value-type="string">
            <text:p>Qty + financial truth</text:p>
          </table:table-cell>
          <table:table-cell office:value-type="string">
            <text:p>Can execute sale?</text:p>
          </table:table-cell>
          <table:table-cell office:value-type="string">
            <text:p>Create sale event</text:p>
          </table:table-cell>
          <table:table-cell office:value-type="string">
            <text:p>REVALIDATED</text:p>
          </table:table-cell>
        </table:table-row>
        <table:table-row>
          <table:table-cell office:value-type="string">
            <text:p>RETURN</text:p>
          </table:table-cell>
          <table:table-cell office:value-type="string">
            <text:p>Original sale + return evidence</text:p>
          </table:table-cell>
          <table:table-cell office:value-type="string">
            <text:p>Return + refund truth</text:p>
          </table:table-cell>
          <table:table-cell office:value-type="string">
            <text:p>Can restock/refund?</text:p>
          </table:table-cell>
          <table:table-cell office:value-type="string">
            <text:p>Create return event</text:p>
          </table:table-cell>
          <table:table-cell office:value-type="string">
            <text:p>MATCH REQUIRED</text:p>
          </table:table-cell>
        </table:table-row>
        <table:table-row>
          <table:table-cell office:value-type="string">
            <text:p>CORRECTION</text:p>
          </table:table-cell>
          <table:table-cell office:value-type="string">
            <text:p>Target event + evidence</text:p>
          </table:table-cell>
          <table:table-cell office:value-type="string">
            <text:p>Corrective lineage</text:p>
          </table:table-cell>
          <table:table-cell office:value-type="string">
            <text:p>Is correction authorized?</text:p>
          </table:table-cell>
          <table:table-cell office:value-type="string">
            <text:p>Create corrective event</text:p>
          </table:table-cell>
          <table:table-cell office:value-type="string">
            <text:p>FAIL-CLOSED</text:p>
          </table:table-cell>
        </table:table-row>
      </table:table>
      <table:table table:name="🚨 Exceptions">
        <table:table-row>
          <table:table-cell office:value-type="string">
            <text:p>🚨 M16.B1 · EXCEPTION WORKBENCH</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QUANTITY</text:p>
          </table:table-cell>
          <table:table-cell office:value-type="string">
            <text:p>Negative or mismatch</text:p>
          </table:table-cell>
          <table:table-cell office:value-type="string">
            <text:p>Quantity variance</text:p>
          </table:table-cell>
          <table:table-cell office:value-type="string">
            <text:p>Block mutation</text:p>
          </table:table-cell>
          <table:table-cell office:value-type="string">
            <text:p>Investigate ledger</text:p>
          </table:table-cell>
          <table:table-cell office:value-type="string">
            <text:p>FAIL-CLOSED</text:p>
          </table:table-cell>
        </table:table-row>
        <table:table-row>
          <table:table-cell office:value-type="string">
            <text:p>COST</text:p>
          </table:table-cell>
          <table:table-cell office:value-type="string">
            <text:p>Conservation mismatch</text:p>
          </table:table-cell>
          <table:table-cell office:value-type="string">
            <text:p>Cost variance</text:p>
          </table:table-cell>
          <table:table-cell office:value-type="string">
            <text:p>Block correction</text:p>
          </table:table-cell>
          <table:table-cell office:value-type="string">
            <text:p>Trace lineage</text:p>
          </table:table-cell>
          <table:table-cell office:value-type="string">
            <text:p>FAIL-CLOSED</text:p>
          </table:table-cell>
        </table:table-row>
        <table:table-row>
          <table:table-cell office:value-type="string">
            <text:p>LINEAGE</text:p>
          </table:table-cell>
          <table:table-cell office:value-type="string">
            <text:p>Missing source/event/result</text:p>
          </table:table-cell>
          <table:table-cell office:value-type="string">
            <text:p>Orphan state</text:p>
          </table:table-cell>
          <table:table-cell office:value-type="string">
            <text:p>Block result</text:p>
          </table:table-cell>
          <table:table-cell office:value-type="string">
            <text:p>Repair evidence</text:p>
          </table:table-cell>
          <table:table-cell office:value-type="string">
            <text:p>FAIL-CLOSED</text:p>
          </table:table-cell>
        </table:table-row>
        <table:table-row>
          <table:table-cell office:value-type="string">
            <text:p>LOCATION</text:p>
          </table:table-cell>
          <table:table-cell office:value-type="string">
            <text:p>Identity/location mismatch</text:p>
          </table:table-cell>
          <table:table-cell office:value-type="string">
            <text:p>Location variance</text:p>
          </table:table-cell>
          <table:table-cell office:value-type="string">
            <text:p>Block move</text:p>
          </table:table-cell>
          <table:table-cell office:value-type="string">
            <text:p>Verify location</text:p>
          </table:table-cell>
          <table:table-cell office:value-type="string">
            <text:p>FAIL-CLOSED</text:p>
          </table:table-cell>
        </table:table-row>
        <table:table-row>
          <table:table-cell office:value-type="string">
            <text:p>ALLOCATION</text:p>
          </table:table-cell>
          <table:table-cell office:value-type="string">
            <text:p>Requested &gt; available</text:p>
          </table:table-cell>
          <table:table-cell office:value-type="string">
            <text:p>Oversell risk</text:p>
          </table:table-cell>
          <table:table-cell office:value-type="string">
            <text:p>Block publication</text:p>
          </table:table-cell>
          <table:table-cell office:value-type="string">
            <text:p>Reconcile channels</text:p>
          </table:table-cell>
          <table:table-cell office:value-type="string">
            <text:p>FAIL-CLOSED</text:p>
          </table:table-cell>
        </table:table-row>
        <table:table-row>
          <table:table-cell office:value-type="string">
            <text:p>FINANCIAL</text:p>
          </table:table-cell>
          <table:table-cell office:value-type="string">
            <text:p>Expected ≠ authoritative</text:p>
          </table:table-cell>
          <table:table-cell office:value-type="string">
            <text:p>Financial variance</text:p>
          </table:table-cell>
          <table:table-cell office:value-type="string">
            <text:p>Block closure</text:p>
          </table:table-cell>
          <table:table-cell office:value-type="string">
            <text:p>Reconcile evidence</text:p>
          </table:table-cell>
          <table:table-cell office:value-type="string">
            <text:p>FAIL-CLOSED</text:p>
          </table:table-cell>
        </table:table-row>
        <table:table-row>
          <table:table-cell office:value-type="string">
            <text:p>REPLAY</text:p>
          </table:table-cell>
          <table:table-cell office:value-type="string">
            <text:p>History match</text:p>
          </table:table-cell>
          <table:table-cell office:value-type="string">
            <text:p>Duplicate execution risk</text:p>
          </table:table-cell>
          <table:table-cell office:value-type="string">
            <text:p>No second write</text:p>
          </table:table-cell>
          <table:table-cell office:value-type="string">
            <text:p>Review history</text:p>
          </table:table-cell>
          <table:table-cell office:value-type="string">
            <text:p>DEFENDED</text:p>
          </table:table-cell>
        </table:table-row>
      </table:table>
      <table:table table:name="📚 Audit Trail">
        <table:table-row>
          <table:table-cell office:value-type="string">
            <text:p>📚 M16.B1 · AUDIT + LINEAGE READ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SSET</text:p>
          </table:table-cell>
          <table:table-cell office:value-type="string">
            <text:p>Asset ID</text:p>
          </table:table-cell>
          <table:table-cell office:value-type="string">
            <text:p>Acquisition origin</text:p>
          </table:table-cell>
          <table:table-cell office:value-type="string">
            <text:p>Where did it start?</text:p>
          </table:table-cell>
          <table:table-cell office:value-type="string">
            <text:p>Trace source</text:p>
          </table:table-cell>
          <table:table-cell office:value-type="string">
            <text:p>IMMUTABLE ID</text:p>
          </table:table-cell>
        </table:table-row>
        <table:table-row>
          <table:table-cell office:value-type="string">
            <text:p>EVENT</text:p>
          </table:table-cell>
          <table:table-cell office:value-type="string">
            <text:p>Event ID</text:p>
          </table:table-cell>
          <table:table-cell office:value-type="string">
            <text:p>Authorized movement</text:p>
          </table:table-cell>
          <table:table-cell office:value-type="string">
            <text:p>What happened?</text:p>
          </table:table-cell>
          <table:table-cell office:value-type="string">
            <text:p>Trace event</text:p>
          </table:table-cell>
          <table:table-cell office:value-type="string">
            <text:p>APPEND-ONLY</text:p>
          </table:table-cell>
        </table:table-row>
        <table:table-row>
          <table:table-cell office:value-type="string">
            <text:p>RESULT</text:p>
          </table:table-cell>
          <table:table-cell office:value-type="string">
            <text:p>Result ID</text:p>
          </table:table-cell>
          <table:table-cell office:value-type="string">
            <text:p>Derived outcome</text:p>
          </table:table-cell>
          <table:table-cell office:value-type="string">
            <text:p>What exists now?</text:p>
          </table:table-cell>
          <table:table-cell office:value-type="string">
            <text:p>Trace result</text:p>
          </table:table-cell>
          <table:table-cell office:value-type="string">
            <text:p>AUTHORITATIVE</text:p>
          </table:table-cell>
        </table:table-row>
        <table:table-row>
          <table:table-cell office:value-type="string">
            <text:p>COST</text:p>
          </table:table-cell>
          <table:table-cell office:value-type="string">
            <text:p>Cost lineage</text:p>
          </table:table-cell>
          <table:table-cell office:value-type="string">
            <text:p>Conserved allocation</text:p>
          </table:table-cell>
          <table:table-cell office:value-type="string">
            <text:p>Where did cost move?</text:p>
          </table:table-cell>
          <table:table-cell office:value-type="string">
            <text:p>Trace allocation</text:p>
          </table:table-cell>
          <table:table-cell office:value-type="string">
            <text:p>CONSERVED</text:p>
          </table:table-cell>
        </table:table-row>
        <table:table-row>
          <table:table-cell office:value-type="string">
            <text:p>SALE</text:p>
          </table:table-cell>
          <table:table-cell office:value-type="string">
            <text:p>Sale lineage</text:p>
          </table:table-cell>
          <table:table-cell office:value-type="string">
            <text:p>Revenue to profit</text:p>
          </table:table-cell>
          <table:table-cell office:value-type="string">
            <text:p>How was profit derived?</text:p>
          </table:table-cell>
          <table:table-cell office:value-type="string">
            <text:p>Trace financials</text:p>
          </table:table-cell>
          <table:table-cell office:value-type="string">
            <text:p>DERIVED</text:p>
          </table:table-cell>
        </table:table-row>
        <table:table-row>
          <table:table-cell office:value-type="string">
            <text:p>CORRECTION</text:p>
          </table:table-cell>
          <table:table-cell office:value-type="string">
            <text:p>Corrective lineage</text:p>
          </table:table-cell>
          <table:table-cell office:value-type="string">
            <text:p>Original to correction</text:p>
          </table:table-cell>
          <table:table-cell office:value-type="string">
            <text:p>Why did truth change?</text:p>
          </table:table-cell>
          <table:table-cell office:value-type="string">
            <text:p>Trace correction</text:p>
          </table:table-cell>
          <table:table-cell office:value-type="string">
            <text:p>APPEND-ONLY</text:p>
          </table:table-cell>
        </table:table-row>
      </table:table>
      <table:table table:name="🖥 Desktop Map">
        <table:table-row>
          <table:table-cell office:value-type="string">
            <text:p>🖥 M16.B1 · DESKTOP MIGRATION MAP</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HOME</text:p>
          </table:table-cell>
          <table:table-cell office:value-type="string">
            <text:p>Mission Control</text:p>
          </table:table-cell>
          <table:table-cell office:value-type="string">
            <text:p>Business health + readiness</text:p>
          </table:table-cell>
          <table:table-cell office:value-type="string">
            <text:p>Daily command center</text:p>
          </table:table-cell>
          <table:table-cell office:value-type="string">
            <text:p>Desktop Home</text:p>
          </table:table-cell>
          <table:table-cell office:value-type="string">
            <text:p>SPEC READY</text:p>
          </table:table-cell>
        </table:table-row>
        <table:table-row>
          <table:table-cell office:value-type="string">
            <text:p>ASSET MANAGER</text:p>
          </table:table-cell>
          <table:table-cell office:value-type="string">
            <text:p>Enter Once</text:p>
          </table:table-cell>
          <table:table-cell office:value-type="string">
            <text:p>Acquisition + identity</text:p>
          </table:table-cell>
          <table:table-cell office:value-type="string">
            <text:p>Create asset truth</text:p>
          </table:table-cell>
          <table:table-cell office:value-type="string">
            <text:p>Asset Manager</text:p>
          </table:table-cell>
          <table:table-cell office:value-type="string">
            <text:p>SPEC READY</text:p>
          </table:table-cell>
        </table:table-row>
        <table:table-row>
          <table:table-cell office:value-type="string">
            <text:p>INVENTORY</text:p>
          </table:table-cell>
          <table:table-cell office:value-type="string">
            <text:p>Inventory authority</text:p>
          </table:table-cell>
          <table:table-cell office:value-type="string">
            <text:p>Qty + location + state</text:p>
          </table:table-cell>
          <table:table-cell office:value-type="string">
            <text:p>Operate inventory</text:p>
          </table:table-cell>
          <table:table-cell office:value-type="string">
            <text:p>Inventory</text:p>
          </table:table-cell>
          <table:table-cell office:value-type="string">
            <text:p>SPEC READY</text:p>
          </table:table-cell>
        </table:table-row>
        <table:table-row>
          <table:table-cell office:value-type="string">
            <text:p>TRANSFORM</text:p>
          </table:table-cell>
          <table:table-cell office:value-type="string">
            <text:p>Transformation authority</text:p>
          </table:table-cell>
          <table:table-cell office:value-type="string">
            <text:p>Lineage + cost allocation</text:p>
          </table:table-cell>
          <table:table-cell office:value-type="string">
            <text:p>Break/open products</text:p>
          </table:table-cell>
          <table:table-cell office:value-type="string">
            <text:p>Transformation</text:p>
          </table:table-cell>
          <table:table-cell office:value-type="string">
            <text:p>SPEC READY</text:p>
          </table:table-cell>
        </table:table-row>
        <table:table-row>
          <table:table-cell office:value-type="string">
            <text:p>SALES</text:p>
          </table:table-cell>
          <table:table-cell office:value-type="string">
            <text:p>Sale authority</text:p>
          </table:table-cell>
          <table:table-cell office:value-type="string">
            <text:p>Sale + financial truth</text:p>
          </table:table-cell>
          <table:table-cell office:value-type="string">
            <text:p>Execute marketplace sales</text:p>
          </table:table-cell>
          <table:table-cell office:value-type="string">
            <text:p>Sales</text:p>
          </table:table-cell>
          <table:table-cell office:value-type="string">
            <text:p>SPEC READY</text:p>
          </table:table-cell>
        </table:table-row>
        <table:table-row>
          <table:table-cell office:value-type="string">
            <text:p>EXCEPTIONS</text:p>
          </table:table-cell>
          <table:table-cell office:value-type="string">
            <text:p>Exception Workbench</text:p>
          </table:table-cell>
          <table:table-cell office:value-type="string">
            <text:p>Blocked variance</text:p>
          </table:table-cell>
          <table:table-cell office:value-type="string">
            <text:p>Resolve safely</text:p>
          </table:table-cell>
          <table:table-cell office:value-type="string">
            <text:p>Exceptions</text:p>
          </table:table-cell>
          <table:table-cell office:value-type="string">
            <text:p>SPEC READY</text:p>
          </table:table-cell>
        </table:table-row>
        <table:table-row>
          <table:table-cell office:value-type="string">
            <text:p>AUDIT</text:p>
          </table:table-cell>
          <table:table-cell office:value-type="string">
            <text:p>Audit + Lineage Reader</text:p>
          </table:table-cell>
          <table:table-cell office:value-type="string">
            <text:p>Permanent history</text:p>
          </table:table-cell>
          <table:table-cell office:value-type="string">
            <text:p>Explain business truth</text:p>
          </table:table-cell>
          <table:table-cell office:value-type="string">
            <text:p>Audit</text:p>
          </table:table-cell>
          <table:table-cell office:value-type="string">
            <text:p>SPEC READY</text:p>
          </table:table-cell>
        </table:table-row>
        <table:table-row>
          <table:table-cell office:value-type="string">
            <text:p>🖥 M17.B1 · DESKTOP SERVICE BOUNDARY CONTRACT</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ASSET SERVICE</text:p>
          </table:table-cell>
          <table:table-cell office:value-type="string">
            <text:p>Acquisition event</text:p>
          </table:table-cell>
          <table:table-cell office:value-type="string">
            <text:p>Asset identity + origin</text:p>
          </table:table-cell>
          <table:table-cell office:value-type="string">
            <text:p>Invalid identity</text:p>
          </table:table-cell>
          <table:table-cell office:value-type="string">
            <text:p>asset_service</text:p>
          </table:table-cell>
          <table:table-cell office:value-type="string">
            <text:p>SPEC LOCKED</text:p>
          </table:table-cell>
        </table:table-row>
        <table:table-row>
          <table:table-cell office:value-type="string">
            <text:p>INVENTORY SERVICE</text:p>
          </table:table-cell>
          <table:table-cell office:value-type="string">
            <text:p>Authorized movement</text:p>
          </table:table-cell>
          <table:table-cell office:value-type="string">
            <text:p>Qty + location + availability</text:p>
          </table:table-cell>
          <table:table-cell office:value-type="string">
            <text:p>Negative/conflict</text:p>
          </table:table-cell>
          <table:table-cell office:value-type="string">
            <text:p>inventory_service</text:p>
          </table:table-cell>
          <table:table-cell office:value-type="string">
            <text:p>SPEC LOCKED</text:p>
          </table:table-cell>
        </table:table-row>
        <table:table-row>
          <table:table-cell office:value-type="string">
            <text:p>TRANSFORMATION SERVICE</text:p>
          </table:table-cell>
          <table:table-cell office:value-type="string">
            <text:p>Explicit transformation request</text:p>
          </table:table-cell>
          <table:table-cell office:value-type="string">
            <text:p>Lineage + allocation</text:p>
          </table:table-cell>
          <table:table-cell office:value-type="string">
            <text:p>Cost imbalance</text:p>
          </table:table-cell>
          <table:table-cell office:value-type="string">
            <text:p>transformation_service</text:p>
          </table:table-cell>
          <table:table-cell office:value-type="string">
            <text:p>SPEC LOCKED</text:p>
          </table:table-cell>
        </table:table-row>
        <table:table-row>
          <table:table-cell office:value-type="string">
            <text:p>SALES SERVICE</text:p>
          </table:table-cell>
          <table:table-cell office:value-type="string">
            <text:p>Validated sale event</text:p>
          </table:table-cell>
          <table:table-cell office:value-type="string">
            <text:p>Sale + financial truth</text:p>
          </table:table-cell>
          <table:table-cell office:value-type="string">
            <text:p>Oversell/invalid sale</text:p>
          </table:table-cell>
          <table:table-cell office:value-type="string">
            <text:p>sales_service</text:p>
          </table:table-cell>
          <table:table-cell office:value-type="string">
            <text:p>SPEC LOCKED</text:p>
          </table:table-cell>
        </table:table-row>
        <table:table-row>
          <table:table-cell office:value-type="string">
            <text:p>RETURN SERVICE</text:p>
          </table:table-cell>
          <table:table-cell office:value-type="string">
            <text:p>Matched return event</text:p>
          </table:table-cell>
          <table:table-cell office:value-type="string">
            <text:p>Refund/restock/restatement</text:p>
          </table:table-cell>
          <table:table-cell office:value-type="string">
            <text:p>Unmatched return</text:p>
          </table:table-cell>
          <table:table-cell office:value-type="string">
            <text:p>return_service</text:p>
          </table:table-cell>
          <table:table-cell office:value-type="string">
            <text:p>SPEC LOCKED</text:p>
          </table:table-cell>
        </table:table-row>
        <table:table-row>
          <table:table-cell office:value-type="string">
            <text:p>EXCEPTION SERVICE</text:p>
          </table:table-cell>
          <table:table-cell office:value-type="string">
            <text:p>Detected variance</text:p>
          </table:table-cell>
          <table:table-cell office:value-type="string">
            <text:p>Blocked/resolution state</text:p>
          </table:table-cell>
          <table:table-cell office:value-type="string">
            <text:p>Unauthorized resolution</text:p>
          </table:table-cell>
          <table:table-cell office:value-type="string">
            <text:p>exception_service</text:p>
          </table:table-cell>
          <table:table-cell office:value-type="string">
            <text:p>SPEC LOCKED</text:p>
          </table:table-cell>
        </table:table-row>
        <table:table-row>
          <table:table-cell office:value-type="string">
            <text:p>AUDIT SERVICE</text:p>
          </table:table-cell>
          <table:table-cell office:value-type="string">
            <text:p>All authoritative events</text:p>
          </table:table-cell>
          <table:table-cell office:value-type="string">
            <text:p>Append-only audit chain</text:p>
          </table:table-cell>
          <table:table-cell office:value-type="string">
            <text:p>Overwrite/replay</text:p>
          </table:table-cell>
          <table:table-cell office:value-type="string">
            <text:p>audit_service</text:p>
          </table:table-cell>
          <table:table-cell office:value-type="string">
            <text:p>SPEC LOCKED</text:p>
          </table:table-cell>
        </table:table-row>
        <table:table-row>
          <table:table-cell office:value-type="string">
            <text:p>DASHBOARD SERVICE</text:p>
          </table:table-cell>
          <table:table-cell office:value-type="string">
            <text:p>Authoritative derived truth</text:p>
          </table:table-cell>
          <table:table-cell office:value-type="string">
            <text:p>Mission Control views</text:p>
          </table:table-cell>
          <table:table-cell office:value-type="string">
            <text:p>Manual truth injection</text:p>
          </table:table-cell>
          <table:table-cell office:value-type="string">
            <text:p>dashboard_service</text:p>
          </table:table-cell>
          <table:table-cell office:value-type="string">
            <text:p>SPEC LOCKED</text:p>
          </table:table-cell>
        </table:table-row>
        <table:table-row>
          <table:table-cell office:value-type="string">
            <text:p>DATABASE</text:p>
          </table:table-cell>
          <table:table-cell office:value-type="string">
            <text:p>Authoritative event records</text:p>
          </table:table-cell>
          <table:table-cell office:value-type="string">
            <text:p>Persistent business truth</text:p>
          </table:table-cell>
          <table:table-cell office:value-type="string">
            <text:p>Schema ambiguity</text:p>
          </table:table-cell>
          <table:table-cell office:value-type="string">
            <text:p>SQLite</text:p>
          </table:table-cell>
          <table:table-cell office:value-type="string">
            <text:p>MIGRATION READY</text:p>
          </table:table-cell>
        </table:table-row>
        <table:table-row>
          <table:table-cell office:value-type="string">
            <text:p>FINAL BRIDGE</text:p>
          </table:table-cell>
          <table:table-cell office:value-type="string">
            <text:p>Workbook contracts</text:p>
          </table:table-cell>
          <table:table-cell office:value-type="string">
            <text:p>Desktop module specification</text:p>
          </table:table-cell>
          <table:table-cell office:value-type="string">
            <text:p>Authority drift</text:p>
          </table:table-cell>
          <table:table-cell office:value-type="string">
            <text:p>Permanent codebase</text:p>
          </table:table-cell>
          <table:table-cell office:value-type="string">
            <text:p>READY</text:p>
          </table:table-cell>
        </table:table-row>
      </table:table>
      <table:table table:name="📜 Implementation Contract">
        <table:table-row>
          <table:table-cell office:value-type="string">
            <text:p>📜 M18.B1 · DESKTOP IMPLEMENTATION CONTRACT</text:p>
          </table:table-cell>
          <table:table-cell/>
          <table:table-cell/>
          <table:table-cell/>
          <table:table-cell/>
        </table:table-row>
        <table:table-row>
          <table:table-cell office:value-type="string">
            <text:p>CONTRACT</text:p>
          </table:table-cell>
          <table:table-cell office:value-type="string">
            <text:p>AUTHORITATIVE RULE</text:p>
          </table:table-cell>
          <table:table-cell office:value-type="string">
            <text:p>DESKTOP TARGET</text:p>
          </table:table-cell>
          <table:table-cell office:value-type="string">
            <text:p>FAIL CONDITION</text:p>
          </table:table-cell>
          <table:table-cell office:value-type="string">
            <text:p>ACCEPTANCE</text:p>
          </table:table-cell>
        </table:table-row>
        <table:table-row>
          <table:table-cell office:value-type="string">
            <text:p>DOMAIN</text:p>
          </table:table-cell>
          <table:table-cell office:value-type="string">
            <text:p>Asset · Inventory · Transformation · Sales · Return · Exception · Audit</text:p>
          </table:table-cell>
          <table:table-cell office:value-type="string">
            <text:p>modules + services</text:p>
          </table:table-cell>
          <table:table-cell office:value-type="string">
            <text:p>Domain truth reinterpreted</text:p>
          </table:table-cell>
          <table:table-cell office:value-type="string">
            <text:p>LOCKED</text:p>
          </table:table-cell>
        </table:table-row>
        <table:table-row>
          <table:table-cell office:value-type="string">
            <text:p>EVENT</text:p>
          </table:table-cell>
          <table:table-cell office:value-type="string">
            <text:p>Acquisition · Movement · Transformation · Sale · Return · Correction · Reversal</text:p>
          </table:table-cell>
          <table:table-cell office:value-type="string">
            <text:p>event records</text:p>
          </table:table-cell>
          <table:table-cell office:value-type="string">
            <text:p>Mutation without event</text:p>
          </table:table-cell>
          <table:table-cell office:value-type="string">
            <text:p>LOCKED</text:p>
          </table:table-cell>
        </table:table-row>
        <table:table-row>
          <table:table-cell office:value-type="string">
            <text:p>AUTHORITY</text:p>
          </table:table-cell>
          <table:table-cell office:value-type="string">
            <text:p>Evidence → Validate → Revalidate → Explicit Request → Commit</text:p>
          </table:table-cell>
          <table:table-cell office:value-type="string">
            <text:p>service layer</text:p>
          </table:table-cell>
          <table:table-cell office:value-type="string">
            <text:p>Write before authority</text:p>
          </table:table-cell>
          <table:table-cell office:value-type="string">
            <text:p>FAIL-CLOSED</text:p>
          </table:table-cell>
        </table:table-row>
        <table:table-row>
          <table:table-cell office:value-type="string">
            <text:p>SERVICE</text:p>
          </table:table-cell>
          <table:table-cell office:value-type="string">
            <text:p>One service owns each business mutation</text:p>
          </table:table-cell>
          <table:table-cell office:value-type="string">
            <text:p>core services</text:p>
          </table:table-cell>
          <table:table-cell office:value-type="string">
            <text:p>Cross-service mutation</text:p>
          </table:table-cell>
          <table:table-cell office:value-type="string">
            <text:p>LOCKED</text:p>
          </table:table-cell>
        </table:table-row>
        <table:table-row>
          <table:table-cell office:value-type="string">
            <text:p>DATABASE</text:p>
          </table:table-cell>
          <table:table-cell office:value-type="string">
            <text:p>Asset · Event · Result · Movement · Financial · Exception · Audit</text:p>
          </table:table-cell>
          <table:table-cell office:value-type="string">
            <text:p>SQLite schema</text:p>
          </table:table-cell>
          <table:table-cell office:value-type="string">
            <text:p>Missing lineage key</text:p>
          </table:table-cell>
          <table:table-cell office:value-type="string">
            <text:p>BLOCK</text:p>
          </table:table-cell>
        </table:table-row>
        <table:table-row>
          <table:table-cell office:value-type="string">
            <text:p>STATE</text:p>
          </table:table-cell>
          <table:table-cell office:value-type="string">
            <text:p>PLANNED · IN PROGRESS · COMPLETED · CANCELLED · REVIEW</text:p>
          </table:table-cell>
          <table:table-cell office:value-type="string">
            <text:p>state machine</text:p>
          </table:table-cell>
          <table:table-cell office:value-type="string">
            <text:p>Invalid transition</text:p>
          </table:table-cell>
          <table:table-cell office:value-type="string">
            <text:p>BLOCK</text:p>
          </table:table-cell>
        </table:table-row>
        <table:table-row>
          <table:table-cell office:value-type="string">
            <text:p>FAIL-CLOSED</text:p>
          </table:table-cell>
          <table:table-cell office:value-type="string">
            <text:p>Ambiguous evidence creates no business write</text:p>
          </table:table-cell>
          <table:table-cell office:value-type="string">
            <text:p>all mutation paths</text:p>
          </table:table-cell>
          <table:table-cell office:value-type="string">
            <text:p>Silent fallback</text:p>
          </table:table-cell>
          <table:table-cell office:value-type="string">
            <text:p>REJECT</text:p>
          </table:table-cell>
        </table:table-row>
        <table:table-row>
          <table:table-cell office:value-type="string">
            <text:p>REPLAY</text:p>
          </table:table-cell>
          <table:table-cell office:value-type="string">
            <text:p>History match prevents second authoritative write</text:p>
          </table:table-cell>
          <table:table-cell office:value-type="string">
            <text:p>execution guard</text:p>
          </table:table-cell>
          <table:table-cell office:value-type="string">
            <text:p>Duplicate write</text:p>
          </table:table-cell>
          <table:table-cell office:value-type="string">
            <text:p>REJECT</text:p>
          </table:table-cell>
        </table:table-row>
        <table:table-row>
          <table:table-cell office:value-type="string">
            <text:p>AUDIT</text:p>
          </table:table-cell>
          <table:table-cell office:value-type="string">
            <text:p>Every authoritative mutation is explainable from permanent history</text:p>
          </table:table-cell>
          <table:table-cell office:value-type="string">
            <text:p>audit service</text:p>
          </table:table-cell>
          <table:table-cell office:value-type="string">
            <text:p>Orphan result</text:p>
          </table:table-cell>
          <table:table-cell office:value-type="string">
            <text:p>BLOCK</text:p>
          </table:table-cell>
        </table:table-row>
        <table:table-row>
          <table:table-cell office:value-type="string">
            <text:p>UI</text:p>
          </table:table-cell>
          <table:table-cell office:value-type="string">
            <text:p>UI collects evidence and requests actions; UI never invents truth</text:p>
          </table:table-cell>
          <table:table-cell office:value-type="string">
            <text:p>PySide6 pages/dialogs</text:p>
          </table:table-cell>
          <table:table-cell office:value-type="string">
            <text:p>Direct truth mutation</text:p>
          </table:table-cell>
          <table:table-cell office:value-type="string">
            <text:p>REJECT</text:p>
          </table:table-cell>
        </table:table-row>
        <table:table-row>
          <table:table-cell office:value-type="string">
            <text:p>MIGRATION 1</text:p>
          </table:table-cell>
          <table:table-cell office:value-type="string">
            <text:p>Schema + database manager + event identity</text:p>
          </table:table-cell>
          <table:table-cell office:value-type="string">
            <text:p>core/data</text:p>
          </table:table-cell>
          <table:table-cell office:value-type="string">
            <text:p>Persistence ambiguity</text:p>
          </table:table-cell>
          <table:table-cell office:value-type="string">
            <text:p>GATE</text:p>
          </table:table-cell>
        </table:table-row>
        <table:table-row>
          <table:table-cell office:value-type="string">
            <text:p>MIGRATION 2</text:p>
          </table:table-cell>
          <table:table-cell office:value-type="string">
            <text:p>Repositories + authoritative service boundaries</text:p>
          </table:table-cell>
          <table:table-cell office:value-type="string">
            <text:p>core/services</text:p>
          </table:table-cell>
          <table:table-cell office:value-type="string">
            <text:p>Business logic in UI</text:p>
          </table:table-cell>
          <table:table-cell office:value-type="string">
            <text:p>GATE</text:p>
          </table:table-cell>
        </table:table-row>
        <table:table-row>
          <table:table-cell office:value-type="string">
            <text:p>MIGRATION 3</text:p>
          </table:table-cell>
          <table:table-cell office:value-type="string">
            <text:p>Asset + inventory workflows</text:p>
          </table:table-cell>
          <table:table-cell office:value-type="string">
            <text:p>modules/inventory</text:p>
          </table:table-cell>
          <table:table-cell office:value-type="string">
            <text:p>Quantity authority drift</text:p>
          </table:table-cell>
          <table:table-cell office:value-type="string">
            <text:p>GATE</text:p>
          </table:table-cell>
        </table:table-row>
        <table:table-row>
          <table:table-cell office:value-type="string">
            <text:p>MIGRATION 4</text:p>
          </table:table-cell>
          <table:table-cell office:value-type="string">
            <text:p>Transformation + lineage + cost conservation</text:p>
          </table:table-cell>
          <table:table-cell office:value-type="string">
            <text:p>modules/transformation</text:p>
          </table:table-cell>
          <table:table-cell office:value-type="string">
            <text:p>Cost imbalance</text:p>
          </table:table-cell>
          <table:table-cell office:value-type="string">
            <text:p>GATE</text:p>
          </table:table-cell>
        </table:table-row>
        <table:table-row>
          <table:table-cell office:value-type="string">
            <text:p>MIGRATION 5</text:p>
          </table:table-cell>
          <table:table-cell office:value-type="string">
            <text:p>Sales + financial truth + settlement</text:p>
          </table:table-cell>
          <table:table-cell office:value-type="string">
            <text:p>modules/sales</text:p>
          </table:table-cell>
          <table:table-cell office:value-type="string">
            <text:p>Financial mismatch</text:p>
          </table:table-cell>
          <table:table-cell office:value-type="string">
            <text:p>GATE</text:p>
          </table:table-cell>
        </table:table-row>
        <table:table-row>
          <table:table-cell office:value-type="string">
            <text:p>MIGRATION 6</text:p>
          </table:table-cell>
          <table:table-cell office:value-type="string">
            <text:p>Returns + corrections + reversals</text:p>
          </table:table-cell>
          <table:table-cell office:value-type="string">
            <text:p>modules/returns</text:p>
          </table:table-cell>
          <table:table-cell office:value-type="string">
            <text:p>Historical overwrite</text:p>
          </table:table-cell>
          <table:table-cell office:value-type="string">
            <text:p>GATE</text:p>
          </table:table-cell>
        </table:table-row>
        <table:table-row>
          <table:table-cell office:value-type="string">
            <text:p>MIGRATION 7</text:p>
          </table:table-cell>
          <table:table-cell office:value-type="string">
            <text:p>Exceptions + audit + replay defense</text:p>
          </table:table-cell>
          <table:table-cell office:value-type="string">
            <text:p>modules/audit</text:p>
          </table:table-cell>
          <table:table-cell office:value-type="string">
            <text:p>Unresolved authority</text:p>
          </table:table-cell>
          <table:table-cell office:value-type="string">
            <text:p>GATE</text:p>
          </table:table-cell>
        </table:table-row>
        <table:table-row>
          <table:table-cell office:value-type="string">
            <text:p>MIGRATION 8</text:p>
          </table:table-cell>
          <table:table-cell office:value-type="string">
            <text:p>Mission Control derived views</text:p>
          </table:table-cell>
          <table:table-cell office:value-type="string">
            <text:p>ui/dashboard</text:p>
          </table:table-cell>
          <table:table-cell office:value-type="string">
            <text:p>Manual dashboard truth</text:p>
          </table:table-cell>
          <table:table-cell office:value-type="string">
            <text:p>GATE</text:p>
          </table:table-cell>
        </table:table-row>
        <table:table-row>
          <table:table-cell office:value-type="string">
            <text:p>ACCEPTANCE</text:p>
          </table:table-cell>
          <table:table-cell office:value-type="string">
            <text:p>Workbook contract preserved by automated tests</text:p>
          </table:table-cell>
          <table:table-cell office:value-type="string">
            <text:p>tests</text:p>
          </table:table-cell>
          <table:table-cell office:value-type="string">
            <text:p>Contract drift</text:p>
          </table:table-cell>
          <table:table-cell office:value-type="string">
            <text:p>FAIL</text:p>
          </table:table-cell>
        </table:table-row>
        <table:table-row>
          <table:table-cell office:value-type="string">
            <text:p>FINAL CONTRACT</text:p>
          </table:table-cell>
          <table:table-cell office:value-type="string">
            <text:p>ENTER ONCE. UNDERSTAND EVERYWHERE.</text:p>
          </table:table-cell>
          <table:table-cell office:value-type="string">
            <text:p>Permanent desktop codebase</text:p>
          </table:table-cell>
          <table:table-cell office:value-type="string">
            <text:p>Reinterpretation of proven truth</text:p>
          </table:table-cell>
          <table:table-cell office:value-type="string">
            <text:p>IMPLEMENTATION READY</text:p>
          </table:table-cell>
        </table:table-row>
        <table:table-row>
          <table:table-cell office:value-type="string">
            <text:p>M18.B1 RESULT</text:p>
          </table:table-cell>
          <table:table-cell office:value-type="string">
            <text:p>WORKBOOK AUTHORITY PRESERVED</text:p>
          </table:table-cell>
          <table:table-cell office:value-type="string">
            <text:p>DESKTOP CONTRACT AUTHORITATIVE</text:p>
          </table:table-cell>
          <table:table-cell office:value-type="string">
            <text:p>FAIL-CLOSED</text:p>
          </table:table-cell>
          <table:table-cell office:value-type="string">
            <text:p>IMPLEMENTATION CONTRACT VERIFIED</text:p>
          </table:table-cell>
        </table:table-row>
      </table:table>
      <table:table table:name="❄ Specification Freeze">
        <table:table-row>
          <table:table-cell office:value-type="string">
            <text:p>❄ M19.B1 · AUTHORITATIVE WORKBOOK SPECIFICATION FREEZE</text:p>
          </table:table-cell>
          <table:table-cell/>
          <table:table-cell/>
          <table:table-cell/>
          <table:table-cell/>
        </table:table-row>
        <table:table-row>
          <table:table-cell office:value-type="string">
            <text:p>FREEZE AREA</text:p>
          </table:table-cell>
          <table:table-cell office:value-type="string">
            <text:p>LOCKED AUTHORITY</text:p>
          </table:table-cell>
          <table:table-cell office:value-type="string">
            <text:p>CHANGE ROUTE</text:p>
          </table:table-cell>
          <table:table-cell office:value-type="string">
            <text:p>IMPLEMENTATION RULE</text:p>
          </table:table-cell>
          <table:table-cell office:value-type="string">
            <text:p>STATUS</text:p>
          </table:table-cell>
        </table:table-row>
        <table:table-row>
          <table:table-cell office:value-type="string">
            <text:p>WORKBOOK</text:p>
          </table:table-cell>
          <table:table-cell office:value-type="string">
            <text:p>Accepted M18.B1 business + desktop contract</text:p>
          </table:table-cell>
          <table:table-cell office:value-type="string">
            <text:p>Spreadsheet Design</text:p>
          </table:table-cell>
          <table:table-cell office:value-type="string">
            <text:p>Implement exactly</text:p>
          </table:table-cell>
          <table:table-cell office:value-type="string">
            <text:p>FROZEN</text:p>
          </table:table-cell>
        </table:table-row>
        <table:table-row>
          <table:table-cell office:value-type="string">
            <text:p>BUSINESS TRUTH</text:p>
          </table:table-cell>
          <table:table-cell office:value-type="string">
            <text:p>Enter once · derive everywhere</text:p>
          </table:table-cell>
          <table:table-cell office:value-type="string">
            <text:p>Spreadsheet Design</text:p>
          </table:table-cell>
          <table:table-cell office:value-type="string">
            <text:p>No reinterpretation</text:p>
          </table:table-cell>
          <table:table-cell office:value-type="string">
            <text:p>FROZEN</text:p>
          </table:table-cell>
        </table:table-row>
        <table:table-row>
          <table:table-cell office:value-type="string">
            <text:p>DOMAIN CONTRACTS</text:p>
          </table:table-cell>
          <table:table-cell office:value-type="string">
            <text:p>Asset · Inventory · Transformation · Sales · Return · Exception · Audit</text:p>
          </table:table-cell>
          <table:table-cell office:value-type="string">
            <text:p>Spreadsheet Design</text:p>
          </table:table-cell>
          <table:table-cell office:value-type="string">
            <text:p>Preserve boundaries</text:p>
          </table:table-cell>
          <table:table-cell office:value-type="string">
            <text:p>FROZEN</text:p>
          </table:table-cell>
        </table:table-row>
        <table:table-row>
          <table:table-cell office:value-type="string">
            <text:p>EVENT CONTRACTS</text:p>
          </table:table-cell>
          <table:table-cell office:value-type="string">
            <text:p>Acquisition · Movement · Transformation · Sale · Return · Correction · Reversal</text:p>
          </table:table-cell>
          <table:table-cell office:value-type="string">
            <text:p>Spreadsheet Design</text:p>
          </table:table-cell>
          <table:table-cell office:value-type="string">
            <text:p>Mutation requires event</text:p>
          </table:table-cell>
          <table:table-cell office:value-type="string">
            <text:p>FROZEN</text:p>
          </table:table-cell>
        </table:table-row>
        <table:table-row>
          <table:table-cell office:value-type="string">
            <text:p>AUTHORITY CHAIN</text:p>
          </table:table-cell>
          <table:table-cell office:value-type="string">
            <text:p>Evidence → Validate → Revalidate → Explicit Request → Commit</text:p>
          </table:table-cell>
          <table:table-cell office:value-type="string">
            <text:p>Spreadsheet Design</text:p>
          </table:table-cell>
          <table:table-cell office:value-type="string">
            <text:p>Write only after authority</text:p>
          </table:table-cell>
          <table:table-cell office:value-type="string">
            <text:p>FROZEN</text:p>
          </table:table-cell>
        </table:table-row>
        <table:table-row>
          <table:table-cell office:value-type="string">
            <text:p>SERVICE OWNERSHIP</text:p>
          </table:table-cell>
          <table:table-cell office:value-type="string">
            <text:p>One service owns each business mutation</text:p>
          </table:table-cell>
          <table:table-cell office:value-type="string">
            <text:p>Spreadsheet Design</text:p>
          </table:table-cell>
          <table:table-cell office:value-type="string">
            <text:p>No cross-service mutation</text:p>
          </table:table-cell>
          <table:table-cell office:value-type="string">
            <text:p>FROZEN</text:p>
          </table:table-cell>
        </table:table-row>
        <table:table-row>
          <table:table-cell office:value-type="string">
            <text:p>DATABASE BOUNDARY</text:p>
          </table:table-cell>
          <table:table-cell office:value-type="string">
            <text:p>Authoritative event records + lineage keys</text:p>
          </table:table-cell>
          <table:table-cell office:value-type="string">
            <text:p>Spreadsheet Design</text:p>
          </table:table-cell>
          <table:table-cell office:value-type="string">
            <text:p>SQLite persists truth</text:p>
          </table:table-cell>
          <table:table-cell office:value-type="string">
            <text:p>FROZEN</text:p>
          </table:table-cell>
        </table:table-row>
        <table:table-row>
          <table:table-cell office:value-type="string">
            <text:p>STATE TRANSITIONS</text:p>
          </table:table-cell>
          <table:table-cell office:value-type="string">
            <text:p>PLANNED · IN PROGRESS · COMPLETED · CANCELLED · REVIEW</text:p>
          </table:table-cell>
          <table:table-cell office:value-type="string">
            <text:p>Spreadsheet Design</text:p>
          </table:table-cell>
          <table:table-cell office:value-type="string">
            <text:p>Reject invalid transition</text:p>
          </table:table-cell>
          <table:table-cell office:value-type="string">
            <text:p>FROZEN</text:p>
          </table:table-cell>
        </table:table-row>
        <table:table-row>
          <table:table-cell office:value-type="string">
            <text:p>FAIL-CLOSED</text:p>
          </table:table-cell>
          <table:table-cell office:value-type="string">
            <text:p>Ambiguity creates no business write</text:p>
          </table:table-cell>
          <table:table-cell office:value-type="string">
            <text:p>Spreadsheet Design</text:p>
          </table:table-cell>
          <table:table-cell office:value-type="string">
            <text:p>Reject silent fallback</text:p>
          </table:table-cell>
          <table:table-cell office:value-type="string">
            <text:p>FROZEN</text:p>
          </table:table-cell>
        </table:table-row>
        <table:table-row>
          <table:table-cell office:value-type="string">
            <text:p>REPLAY DEFENSE</text:p>
          </table:table-cell>
          <table:table-cell office:value-type="string">
            <text:p>History match prevents second authoritative write</text:p>
          </table:table-cell>
          <table:table-cell office:value-type="string">
            <text:p>Spreadsheet Design</text:p>
          </table:table-cell>
          <table:table-cell office:value-type="string">
            <text:p>Reject duplicate execution</text:p>
          </table:table-cell>
          <table:table-cell office:value-type="string">
            <text:p>FROZEN</text:p>
          </table:table-cell>
        </table:table-row>
        <table:table-row>
          <table:table-cell office:value-type="string">
            <text:p>AUDIT</text:p>
          </table:table-cell>
          <table:table-cell office:value-type="string">
            <text:p>Every authoritative mutation explainable from permanent history</text:p>
          </table:table-cell>
          <table:table-cell office:value-type="string">
            <text:p>Spreadsheet Design</text:p>
          </table:table-cell>
          <table:table-cell office:value-type="string">
            <text:p>Block orphan result</text:p>
          </table:table-cell>
          <table:table-cell office:value-type="string">
            <text:p>FROZEN</text:p>
          </table:table-cell>
        </table:table-row>
        <table:table-row>
          <table:table-cell office:value-type="string">
            <text:p>UI RESPONSIBILITY</text:p>
          </table:table-cell>
          <table:table-cell office:value-type="string">
            <text:p>Collect evidence + request actions</text:p>
          </table:table-cell>
          <table:table-cell office:value-type="string">
            <text:p>Prototype Design</text:p>
          </table:table-cell>
          <table:table-cell office:value-type="string">
            <text:p>UI never invents truth</text:p>
          </table:table-cell>
          <table:table-cell office:value-type="string">
            <text:p>FROZEN</text:p>
          </table:table-cell>
        </table:table-row>
        <table:table-row>
          <table:table-cell office:value-type="string">
            <text:p>MIGRATION ORDER</text:p>
          </table:table-cell>
          <table:table-cell office:value-type="string">
            <text:p>Schema → repositories/services → inventory → transformation → sales → returns → audit → dashboard</text:p>
          </table:table-cell>
          <table:table-cell office:value-type="string">
            <text:p>Spreadsheet Design</text:p>
          </table:table-cell>
          <table:table-cell office:value-type="string">
            <text:p>Implement in order</text:p>
          </table:table-cell>
          <table:table-cell office:value-type="string">
            <text:p>LOCKED</text:p>
          </table:table-cell>
        </table:table-row>
        <table:table-row>
          <table:table-cell office:value-type="string">
            <text:p>ACCEPTANCE</text:p>
          </table:table-cell>
          <table:table-cell office:value-type="string">
            <text:p>Automated tests preserve workbook contract</text:p>
          </table:table-cell>
          <table:table-cell office:value-type="string">
            <text:p>Development</text:p>
          </table:table-cell>
          <table:table-cell office:value-type="string">
            <text:p>Contract drift fails</text:p>
          </table:table-cell>
          <table:table-cell office:value-type="string">
            <text:p>LOCKED</text:p>
          </table:table-cell>
        </table:table-row>
        <table:table-row>
          <table:table-cell office:value-type="string">
            <text:p>DEVELOPMENT ROUTE</text:p>
          </table:table-cell>
          <table:table-cell office:value-type="string">
            <text:p>Implement proven specification only</text:p>
          </table:table-cell>
          <table:table-cell office:value-type="string">
            <text:p>Development</text:p>
          </table:table-cell>
          <table:table-cell office:value-type="string">
            <text:p>No redesign in code</text:p>
          </table:table-cell>
          <table:table-cell office:value-type="string">
            <text:p>AUTHORIZED</text:p>
          </table:table-cell>
        </table:table-row>
        <table:table-row>
          <table:table-cell office:value-type="string">
            <text:p>DESIGN RETURN</text:p>
          </table:table-cell>
          <table:table-cell office:value-type="string">
            <text:p>Better idea or business-rule change</text:p>
          </table:table-cell>
          <table:table-cell office:value-type="string">
            <text:p>Spreadsheet Design</text:p>
          </table:table-cell>
          <table:table-cell office:value-type="string">
            <text:p>Stop implementation and return</text:p>
          </table:table-cell>
          <table:table-cell office:value-type="string">
            <text:p>MANDATORY</text:p>
          </table:table-cell>
        </table:table-row>
        <table:table-row>
          <table:table-cell office:value-type="string">
            <text:p>PROTOTYPE RETURN</text:p>
          </table:table-cell>
          <table:table-cell office:value-type="string">
            <text:p>Visual workflow ambiguity</text:p>
          </table:table-cell>
          <table:table-cell office:value-type="string">
            <text:p>Prototype Design</text:p>
          </table:table-cell>
          <table:table-cell office:value-type="string">
            <text:p>Resolve visual contract first</text:p>
          </table:table-cell>
          <table:table-cell office:value-type="string">
            <text:p>MANDATORY</text:p>
          </table:table-cell>
        </table:table-row>
        <table:table-row>
          <table:table-cell office:value-type="string">
            <text:p>RELEASE RULE</text:p>
          </table:table-cell>
          <table:table-cell office:value-type="string">
            <text:p>Only accepted gates become release history</text:p>
          </table:table-cell>
          <table:table-cell office:value-type="string">
            <text:p>Releases</text:p>
          </table:table-cell>
          <table:table-cell office:value-type="string">
            <text:p>Preserve milestone evidence</text:p>
          </table:table-cell>
          <table:table-cell office:value-type="string">
            <text:p>LOCKED</text:p>
          </table:table-cell>
        </table:table-row>
        <table:table-row>
          <table:table-cell office:value-type="string">
            <text:p>FINAL FREEZE GATE</text:p>
          </table:table-cell>
          <table:table-cell office:value-type="string">
            <text:p>M18.B1 contract + prior authority chain</text:p>
          </table:table-cell>
          <table:table-cell office:value-type="string">
            <text:p>Specification Authority</text:p>
          </table:table-cell>
          <table:table-cell office:value-type="string">
            <text:p>Workbook truth frozen</text:p>
          </table:table-cell>
          <table:table-cell office:value-type="string">
            <text:p>PASS</text:p>
          </table:table-cell>
        </table:table-row>
        <table:table-row>
          <table:table-cell office:value-type="string">
            <text:p>M19.B1 RESULT</text:p>
          </table:table-cell>
          <table:table-cell office:value-type="string">
            <text:p>AUTHORITATIVE WORKBOOK SPECIFICATION</text:p>
          </table:table-cell>
          <table:table-cell office:value-type="string">
            <text:p>Development handoff</text:p>
          </table:table-cell>
          <table:table-cell office:value-type="string">
            <text:p>FAIL-CLOSED</text:p>
          </table:table-cell>
          <table:table-cell office:value-type="string">
            <text:p>SPECIFICATION FREEZE VERIFIED</text:p>
          </table:table-cell>
        </table:table-row>
      </table:table>
      <table:content-validations>
        <table:content-validation table:name="Build483CanonicalLinkageStatus" table:condition="of:cell-content-is-in-list(&quot;UNMATCHED&quot;;&quot;SINGLE_SALE_LINKED&quot;;&quot;MULTI_SALE_PENDING_ALLOCATION&quot;;&quot;ALLOCATED&quot;)" table:allow-empty-cell="true" table:display-list="unsorted"/>
        <table:content-validation table:name="Build482EvidenceStatus" table:condition="of:cell-content-is-in-list(&quot;INCOMPLETE&quot;;&quot;CAPTURED&quot;;&quot;REJECTED&quot;)" table:allow-empty-cell="true" table:display-list="unsorted"/>
        <table:content-validation table:name="Build482VerificationResult" table:condition="of:cell-content-is-in-list(&quot;NOT EVALUATED&quot;;&quot;PASS&quot;;&quot;FAIL&quot;;&quot;AMBIGUOUS&quot;)" table:allow-empty-cell="true" table:display-list="unsorted"/>
        <table:content-validation table:name="Build491ReviewOutcomeValidation" table:condition="of:cell-content-is-in-list(&quot;REVIEWED — NO AUTHORITY&quot;;&quot;REVIEW DEFERRED&quot;;&quot;REVIEW BLOCKED&quot;)" table:allow-empty-cell="true" table:display-list="unsorted"/>
      </table:content-validations>
      <table:table table:name="Settlement Evidence Intake">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column table:style-name="Build481Column"/>
        <table:table-row>
          <table:table-cell table:style-name="Build481Header" office:value-type="string">
            <text:p>Settlement Evidence ID</text:p>
          </table:table-cell>
          <table:table-cell table:style-name="Build481Header" office:value-type="string">
            <text:p>Marketplace</text:p>
          </table:table-cell>
          <table:table-cell table:style-name="Build481Header" office:value-type="string">
            <text:p>Marketplace Settlement Reference</text:p>
          </table:table-cell>
          <table:table-cell table:style-name="Build481Header" office:value-type="string">
            <text:p>Settlement Date</text:p>
          </table:table-cell>
          <table:table-cell table:style-name="Build481Header" office:value-type="string">
            <text:p>Settlement Currency</text:p>
          </table:table-cell>
          <table:table-cell table:style-name="Build481Header" office:value-type="string">
            <text:p>Evidence Source Type</text:p>
          </table:table-cell>
          <table:table-cell table:style-name="Build481Header" office:value-type="string">
            <text:p>Evidence Source Reference</text:p>
          </table:table-cell>
          <table:table-cell table:style-name="Build481Header" office:value-type="string">
            <text:p>Settlement Gross Amount</text:p>
          </table:table-cell>
          <table:table-cell table:style-name="Build481Header" office:value-type="string">
            <text:p>Settlement Fee Amount</text:p>
          </table:table-cell>
          <table:table-cell table:style-name="Build481Header" office:value-type="string">
            <text:p>Settlement Adjustment Amount</text:p>
          </table:table-cell>
          <table:table-cell table:style-name="Build481Header" office:value-type="string">
            <text:p>Settlement Net Amount</text:p>
          </table:table-cell>
          <table:table-cell table:style-name="Build481Header" office:value-type="string">
            <text:p>Linked Sale ID</text:p>
          </table:table-cell>
          <table:table-cell table:style-name="Build481Header" office:value-type="string">
            <text:p>Linkage Status</text:p>
          </table:table-cell>
          <table:table-cell table:style-name="Build481Header" office:value-type="string">
            <text:p>Allocation Group ID</text:p>
          </table:table-cell>
          <table:table-cell table:style-name="Build481Header" office:value-type="string">
            <text:p>Settlement Evidence Status</text:p>
          </table:table-cell>
          <table:table-cell table:style-name="Build481Header" office:value-type="string">
            <text:p>Cross-Check Difference</text:p>
          </table:table-cell>
          <table:table-cell table:style-name="Build481Header" office:value-type="string">
            <text:p>Settlement Verification Result</text:p>
          </table:table-cell>
          <table:table-cell table:style-name="Build481Header" office:value-type="string">
            <text:p>Verification Note</text:p>
          </table:table-cell>
          <table:table-cell table:style-name="Build481Header" office:value-type="string">
            <text:p>Linkage Contradiction Check</text:p>
          </table:table-cell>
          <table:table-cell table:style-name="Build481Header" office:value-type="string">
            <text:p>Linkage Contradiction Resolution Guidance</text:p>
          </table:table-cell>
          <table:table-cell table:style-name="Build481Header" office:value-type="string">
            <text:p>Settlement Evidence Readiness</text:p>
          </table:table-cell>
          <table:table-cell table:style-name="Build481Header" office:value-type="string">
            <text:p>Settlement Evidence Review Guidance</text:p>
          </table:table-cell>
          <table:table-cell table:style-name="Build481Header" office:value-type="string">
            <text:p>Settlement Review Boundary Status</text:p>
          </table:table-cell>
          <table:table-cell table:style-name="Build481Header" office:value-type="string">
            <text:p>Settlement Review Boundary Guidance</text:p>
          </table:table-cell>
          <table:table-cell table:style-name="Build481Header" office:value-type="string">
            <text:p>Settlement Review Outcome Intake</text:p>
          </table:table-cell>
          <table:table-cell table:style-name="Build481Header" office:value-type="string">
            <text:p>Settlement Review Outcome Boundary Check</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quot;&quot;;IF(AND([.L2]=&quot;&quot;;[.N2]=&quot;&quot;);&quot;UNKNOWN&quot;;&quot;CONTRADICTION&quot;);IF([.M2]=&quot;UNMATCHED&quot;;IF(AND([.L2]=&quot;&quot;;[.N2]=&quot;&quot;);&quot;CLEAR&quot;;&quot;CONTRADICTION&quot;);IF([.M2]=&quot;SINGLE_SALE_LINKED&quot;;IF(AND([.L2]&lt;&gt;&quot;&quot;;[.N2]=&quot;&quot;);&quot;CLEAR&quot;;&quot;CONTRADICTION&quot;);IF([.M2]=&quot;MULTI_SALE_PENDING_ALLOCATION&quot;;IF([.L2]=&quot;&quot;;&quot;CLEAR&quot;;&quot;CONTRADICTION&quot;);IF([.M2]=&quot;ALLOCATED&quot;;IF(AND([.L2]=&quot;&quot;;[.N2]&lt;&gt;&quot;&quot;);&quot;CLEAR&quot;;&quot;CONTRADICTION&quot;);&quot;CONTRADICTION&quot;)))))">
            <text:p>UNKNOWN</text:p>
          </table:table-cell>
          <table:table-cell office:value-type="string" table:formula="of:=IF([.S2]=&quot;UNKNOWN&quot;;&quot;NO ACTION — linkage status is UNKNOWN / not asserted&quot;;IF([.S2]=&quot;CLEAR&quot;;&quot;NO CONTRADICTION — preserve evidence as entered&quot;;IF([.M2]=&quot;&quot;;&quot;REVIEW LINKAGE STATUS — identifiers are present while status is UNKNOWN&quot;;IF([.M2]=&quot;UNMATCHED&quot;;&quot;REMOVE LINKAGE IDENTIFIERS OR CORRECT LINKAGE STATUS&quot;;IF([.M2]=&quot;SINGLE_SALE_LINKED&quot;;&quot;REQUIRE LINKED SALE ID AND NO ALLOCATION GROUP ID&quot;;IF([.M2]=&quot;MULTI_SALE_PENDING_ALLOCATION&quot;;&quot;REMOVE LINKED SALE ID OR CORRECT LINKAGE STATUS&quot;;IF([.M2]=&quot;ALLOCATED&quot;;&quot;REQUIRE ALLOCATION GROUP ID AND NO LINKED SALE ID&quot;;&quot;REVIEW LINKAGE EVIDENCE — NO AUTHORITY CREATED&quot;)))))))">
            <text:p>NO ACTION — linkage status is UNKNOWN / not asserted</text:p>
          </table:table-cell>
          <table:table-cell office:value-type="string" table:formula="of:=IF([.S2]=&quot;CONTRADICTION&quot;;&quot;BLOCKED&quot;;IF([.S2]=&quot;UNKNOWN&quot;;&quot;UNKNOWN&quot;;IF([.S2]=&quot;CLEAR&quot;;IF(OR([.O2]=&quot;&quot;;[.P2]=&quot;&quot;);&quot;UNKNOWN&quot;;&quot;READY FOR REVIEW&quot;);&quot;BLOCKED&quot;)))">
            <text:p>UNKNOWN</text:p>
          </table:table-cell>
          <table:table-cell office:value-type="string" table:formula="of:=IF([.U2]=&quot;UNKNOWN&quot;;&quot;COMPLETE OR ASSERT REQUIRED EVIDENCE BEFORE REVIEW&quot;;IF([.U2]=&quot;BLOCKED&quot;;&quot;RESOLVE CONTRADICTION BEFORE REVIEW — NO AUTHORITY CREATED&quot;;IF([.U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quot;READY FOR REVIEW&quot;;&quot;REVIEW ELIGIBLE — NO AUTHORITY&quot;;IF(OR([.U2]=&quot;UNKNOWN&quot;;[.U2]=&quot;BLOCKED&quot;);&quot;NOT REVIEW ELIGIBLE&quot;;&quot;NOT REVIEW ELIGIBLE&quot;))">
            <text:p>NOT REVIEW ELIGIBLE</text:p>
          </table:table-cell>
          <table:table-cell office:value-type="string" table:formula="of:=IF([.W2]=&quot;NOT REVIEW ELIGIBLE&quot;;&quot;DO NOT BEGIN SETTLEMENT REVIEW — RESOLVE READINESS OR CONTRADICTION CONDITIONS&quot;;IF([.W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quot;&quot;;&quot;UNKNOWN&quot;;IF([.W2]&lt;&gt;&quot;REVIEW ELIGIBLE — NO AUTHORITY&quot;;&quot;BLOCKED — OUTCOME ASSERTED WITHOUT REVIEW ELIGIBILITY&quot;;IF(OR([.Y2]=&quot;REVIEWED — NO AUTHORITY&quot;;[.Y2]=&quot;REVIEW DEFERRED&quot;;[.Y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quot;&quot;;IF(AND([.L3]=&quot;&quot;;[.N3]=&quot;&quot;);&quot;UNKNOWN&quot;;&quot;CONTRADICTION&quot;);IF([.M3]=&quot;UNMATCHED&quot;;IF(AND([.L3]=&quot;&quot;;[.N3]=&quot;&quot;);&quot;CLEAR&quot;;&quot;CONTRADICTION&quot;);IF([.M3]=&quot;SINGLE_SALE_LINKED&quot;;IF(AND([.L3]&lt;&gt;&quot;&quot;;[.N3]=&quot;&quot;);&quot;CLEAR&quot;;&quot;CONTRADICTION&quot;);IF([.M3]=&quot;MULTI_SALE_PENDING_ALLOCATION&quot;;IF([.L3]=&quot;&quot;;&quot;CLEAR&quot;;&quot;CONTRADICTION&quot;);IF([.M3]=&quot;ALLOCATED&quot;;IF(AND([.L3]=&quot;&quot;;[.N3]&lt;&gt;&quot;&quot;);&quot;CLEAR&quot;;&quot;CONTRADICTION&quot;);&quot;CONTRADICTION&quot;)))))">
            <text:p>UNKNOWN</text:p>
          </table:table-cell>
          <table:table-cell office:value-type="string" table:formula="of:=IF([.S3]=&quot;UNKNOWN&quot;;&quot;NO ACTION — linkage status is UNKNOWN / not asserted&quot;;IF([.S3]=&quot;CLEAR&quot;;&quot;NO CONTRADICTION — preserve evidence as entered&quot;;IF([.M3]=&quot;&quot;;&quot;REVIEW LINKAGE STATUS — identifiers are present while status is UNKNOWN&quot;;IF([.M3]=&quot;UNMATCHED&quot;;&quot;REMOVE LINKAGE IDENTIFIERS OR CORRECT LINKAGE STATUS&quot;;IF([.M3]=&quot;SINGLE_SALE_LINKED&quot;;&quot;REQUIRE LINKED SALE ID AND NO ALLOCATION GROUP ID&quot;;IF([.M3]=&quot;MULTI_SALE_PENDING_ALLOCATION&quot;;&quot;REMOVE LINKED SALE ID OR CORRECT LINKAGE STATUS&quot;;IF([.M3]=&quot;ALLOCATED&quot;;&quot;REQUIRE ALLOCATION GROUP ID AND NO LINKED SALE ID&quot;;&quot;REVIEW LINKAGE EVIDENCE — NO AUTHORITY CREATED&quot;)))))))">
            <text:p>NO ACTION — linkage status is UNKNOWN / not asserted</text:p>
          </table:table-cell>
          <table:table-cell office:value-type="string" table:formula="of:=IF([.S3]=&quot;CONTRADICTION&quot;;&quot;BLOCKED&quot;;IF([.S3]=&quot;UNKNOWN&quot;;&quot;UNKNOWN&quot;;IF([.S3]=&quot;CLEAR&quot;;IF(OR([.O3]=&quot;&quot;;[.P3]=&quot;&quot;);&quot;UNKNOWN&quot;;&quot;READY FOR REVIEW&quot;);&quot;BLOCKED&quot;)))">
            <text:p>UNKNOWN</text:p>
          </table:table-cell>
          <table:table-cell office:value-type="string" table:formula="of:=IF([.U3]=&quot;UNKNOWN&quot;;&quot;COMPLETE OR ASSERT REQUIRED EVIDENCE BEFORE REVIEW&quot;;IF([.U3]=&quot;BLOCKED&quot;;&quot;RESOLVE CONTRADICTION BEFORE REVIEW — NO AUTHORITY CREATED&quot;;IF([.U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quot;READY FOR REVIEW&quot;;&quot;REVIEW ELIGIBLE — NO AUTHORITY&quot;;IF(OR([.U3]=&quot;UNKNOWN&quot;;[.U3]=&quot;BLOCKED&quot;);&quot;NOT REVIEW ELIGIBLE&quot;;&quot;NOT REVIEW ELIGIBLE&quot;))">
            <text:p>NOT REVIEW ELIGIBLE</text:p>
          </table:table-cell>
          <table:table-cell office:value-type="string" table:formula="of:=IF([.W3]=&quot;NOT REVIEW ELIGIBLE&quot;;&quot;DO NOT BEGIN SETTLEMENT REVIEW — RESOLVE READINESS OR CONTRADICTION CONDITIONS&quot;;IF([.W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quot;&quot;;&quot;UNKNOWN&quot;;IF([.W3]&lt;&gt;&quot;REVIEW ELIGIBLE — NO AUTHORITY&quot;;&quot;BLOCKED — OUTCOME ASSERTED WITHOUT REVIEW ELIGIBILITY&quot;;IF(OR([.Y3]=&quot;REVIEWED — NO AUTHORITY&quot;;[.Y3]=&quot;REVIEW DEFERRED&quot;;[.Y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quot;&quot;;IF(AND([.L4]=&quot;&quot;;[.N4]=&quot;&quot;);&quot;UNKNOWN&quot;;&quot;CONTRADICTION&quot;);IF([.M4]=&quot;UNMATCHED&quot;;IF(AND([.L4]=&quot;&quot;;[.N4]=&quot;&quot;);&quot;CLEAR&quot;;&quot;CONTRADICTION&quot;);IF([.M4]=&quot;SINGLE_SALE_LINKED&quot;;IF(AND([.L4]&lt;&gt;&quot;&quot;;[.N4]=&quot;&quot;);&quot;CLEAR&quot;;&quot;CONTRADICTION&quot;);IF([.M4]=&quot;MULTI_SALE_PENDING_ALLOCATION&quot;;IF([.L4]=&quot;&quot;;&quot;CLEAR&quot;;&quot;CONTRADICTION&quot;);IF([.M4]=&quot;ALLOCATED&quot;;IF(AND([.L4]=&quot;&quot;;[.N4]&lt;&gt;&quot;&quot;);&quot;CLEAR&quot;;&quot;CONTRADICTION&quot;);&quot;CONTRADICTION&quot;)))))">
            <text:p>UNKNOWN</text:p>
          </table:table-cell>
          <table:table-cell office:value-type="string" table:formula="of:=IF([.S4]=&quot;UNKNOWN&quot;;&quot;NO ACTION — linkage status is UNKNOWN / not asserted&quot;;IF([.S4]=&quot;CLEAR&quot;;&quot;NO CONTRADICTION — preserve evidence as entered&quot;;IF([.M4]=&quot;&quot;;&quot;REVIEW LINKAGE STATUS — identifiers are present while status is UNKNOWN&quot;;IF([.M4]=&quot;UNMATCHED&quot;;&quot;REMOVE LINKAGE IDENTIFIERS OR CORRECT LINKAGE STATUS&quot;;IF([.M4]=&quot;SINGLE_SALE_LINKED&quot;;&quot;REQUIRE LINKED SALE ID AND NO ALLOCATION GROUP ID&quot;;IF([.M4]=&quot;MULTI_SALE_PENDING_ALLOCATION&quot;;&quot;REMOVE LINKED SALE ID OR CORRECT LINKAGE STATUS&quot;;IF([.M4]=&quot;ALLOCATED&quot;;&quot;REQUIRE ALLOCATION GROUP ID AND NO LINKED SALE ID&quot;;&quot;REVIEW LINKAGE EVIDENCE — NO AUTHORITY CREATED&quot;)))))))">
            <text:p>NO ACTION — linkage status is UNKNOWN / not asserted</text:p>
          </table:table-cell>
          <table:table-cell office:value-type="string" table:formula="of:=IF([.S4]=&quot;CONTRADICTION&quot;;&quot;BLOCKED&quot;;IF([.S4]=&quot;UNKNOWN&quot;;&quot;UNKNOWN&quot;;IF([.S4]=&quot;CLEAR&quot;;IF(OR([.O4]=&quot;&quot;;[.P4]=&quot;&quot;);&quot;UNKNOWN&quot;;&quot;READY FOR REVIEW&quot;);&quot;BLOCKED&quot;)))">
            <text:p>UNKNOWN</text:p>
          </table:table-cell>
          <table:table-cell office:value-type="string" table:formula="of:=IF([.U4]=&quot;UNKNOWN&quot;;&quot;COMPLETE OR ASSERT REQUIRED EVIDENCE BEFORE REVIEW&quot;;IF([.U4]=&quot;BLOCKED&quot;;&quot;RESOLVE CONTRADICTION BEFORE REVIEW — NO AUTHORITY CREATED&quot;;IF([.U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quot;READY FOR REVIEW&quot;;&quot;REVIEW ELIGIBLE — NO AUTHORITY&quot;;IF(OR([.U4]=&quot;UNKNOWN&quot;;[.U4]=&quot;BLOCKED&quot;);&quot;NOT REVIEW ELIGIBLE&quot;;&quot;NOT REVIEW ELIGIBLE&quot;))">
            <text:p>NOT REVIEW ELIGIBLE</text:p>
          </table:table-cell>
          <table:table-cell office:value-type="string" table:formula="of:=IF([.W4]=&quot;NOT REVIEW ELIGIBLE&quot;;&quot;DO NOT BEGIN SETTLEMENT REVIEW — RESOLVE READINESS OR CONTRADICTION CONDITIONS&quot;;IF([.W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quot;&quot;;&quot;UNKNOWN&quot;;IF([.W4]&lt;&gt;&quot;REVIEW ELIGIBLE — NO AUTHORITY&quot;;&quot;BLOCKED — OUTCOME ASSERTED WITHOUT REVIEW ELIGIBILITY&quot;;IF(OR([.Y4]=&quot;REVIEWED — NO AUTHORITY&quot;;[.Y4]=&quot;REVIEW DEFERRED&quot;;[.Y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quot;&quot;;IF(AND([.L5]=&quot;&quot;;[.N5]=&quot;&quot;);&quot;UNKNOWN&quot;;&quot;CONTRADICTION&quot;);IF([.M5]=&quot;UNMATCHED&quot;;IF(AND([.L5]=&quot;&quot;;[.N5]=&quot;&quot;);&quot;CLEAR&quot;;&quot;CONTRADICTION&quot;);IF([.M5]=&quot;SINGLE_SALE_LINKED&quot;;IF(AND([.L5]&lt;&gt;&quot;&quot;;[.N5]=&quot;&quot;);&quot;CLEAR&quot;;&quot;CONTRADICTION&quot;);IF([.M5]=&quot;MULTI_SALE_PENDING_ALLOCATION&quot;;IF([.L5]=&quot;&quot;;&quot;CLEAR&quot;;&quot;CONTRADICTION&quot;);IF([.M5]=&quot;ALLOCATED&quot;;IF(AND([.L5]=&quot;&quot;;[.N5]&lt;&gt;&quot;&quot;);&quot;CLEAR&quot;;&quot;CONTRADICTION&quot;);&quot;CONTRADICTION&quot;)))))">
            <text:p>UNKNOWN</text:p>
          </table:table-cell>
          <table:table-cell office:value-type="string" table:formula="of:=IF([.S5]=&quot;UNKNOWN&quot;;&quot;NO ACTION — linkage status is UNKNOWN / not asserted&quot;;IF([.S5]=&quot;CLEAR&quot;;&quot;NO CONTRADICTION — preserve evidence as entered&quot;;IF([.M5]=&quot;&quot;;&quot;REVIEW LINKAGE STATUS — identifiers are present while status is UNKNOWN&quot;;IF([.M5]=&quot;UNMATCHED&quot;;&quot;REMOVE LINKAGE IDENTIFIERS OR CORRECT LINKAGE STATUS&quot;;IF([.M5]=&quot;SINGLE_SALE_LINKED&quot;;&quot;REQUIRE LINKED SALE ID AND NO ALLOCATION GROUP ID&quot;;IF([.M5]=&quot;MULTI_SALE_PENDING_ALLOCATION&quot;;&quot;REMOVE LINKED SALE ID OR CORRECT LINKAGE STATUS&quot;;IF([.M5]=&quot;ALLOCATED&quot;;&quot;REQUIRE ALLOCATION GROUP ID AND NO LINKED SALE ID&quot;;&quot;REVIEW LINKAGE EVIDENCE — NO AUTHORITY CREATED&quot;)))))))">
            <text:p>NO ACTION — linkage status is UNKNOWN / not asserted</text:p>
          </table:table-cell>
          <table:table-cell office:value-type="string" table:formula="of:=IF([.S5]=&quot;CONTRADICTION&quot;;&quot;BLOCKED&quot;;IF([.S5]=&quot;UNKNOWN&quot;;&quot;UNKNOWN&quot;;IF([.S5]=&quot;CLEAR&quot;;IF(OR([.O5]=&quot;&quot;;[.P5]=&quot;&quot;);&quot;UNKNOWN&quot;;&quot;READY FOR REVIEW&quot;);&quot;BLOCKED&quot;)))">
            <text:p>UNKNOWN</text:p>
          </table:table-cell>
          <table:table-cell office:value-type="string" table:formula="of:=IF([.U5]=&quot;UNKNOWN&quot;;&quot;COMPLETE OR ASSERT REQUIRED EVIDENCE BEFORE REVIEW&quot;;IF([.U5]=&quot;BLOCKED&quot;;&quot;RESOLVE CONTRADICTION BEFORE REVIEW — NO AUTHORITY CREATED&quot;;IF([.U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quot;READY FOR REVIEW&quot;;&quot;REVIEW ELIGIBLE — NO AUTHORITY&quot;;IF(OR([.U5]=&quot;UNKNOWN&quot;;[.U5]=&quot;BLOCKED&quot;);&quot;NOT REVIEW ELIGIBLE&quot;;&quot;NOT REVIEW ELIGIBLE&quot;))">
            <text:p>NOT REVIEW ELIGIBLE</text:p>
          </table:table-cell>
          <table:table-cell office:value-type="string" table:formula="of:=IF([.W5]=&quot;NOT REVIEW ELIGIBLE&quot;;&quot;DO NOT BEGIN SETTLEMENT REVIEW — RESOLVE READINESS OR CONTRADICTION CONDITIONS&quot;;IF([.W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quot;&quot;;&quot;UNKNOWN&quot;;IF([.W5]&lt;&gt;&quot;REVIEW ELIGIBLE — NO AUTHORITY&quot;;&quot;BLOCKED — OUTCOME ASSERTED WITHOUT REVIEW ELIGIBILITY&quot;;IF(OR([.Y5]=&quot;REVIEWED — NO AUTHORITY&quot;;[.Y5]=&quot;REVIEW DEFERRED&quot;;[.Y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quot;&quot;;IF(AND([.L6]=&quot;&quot;;[.N6]=&quot;&quot;);&quot;UNKNOWN&quot;;&quot;CONTRADICTION&quot;);IF([.M6]=&quot;UNMATCHED&quot;;IF(AND([.L6]=&quot;&quot;;[.N6]=&quot;&quot;);&quot;CLEAR&quot;;&quot;CONTRADICTION&quot;);IF([.M6]=&quot;SINGLE_SALE_LINKED&quot;;IF(AND([.L6]&lt;&gt;&quot;&quot;;[.N6]=&quot;&quot;);&quot;CLEAR&quot;;&quot;CONTRADICTION&quot;);IF([.M6]=&quot;MULTI_SALE_PENDING_ALLOCATION&quot;;IF([.L6]=&quot;&quot;;&quot;CLEAR&quot;;&quot;CONTRADICTION&quot;);IF([.M6]=&quot;ALLOCATED&quot;;IF(AND([.L6]=&quot;&quot;;[.N6]&lt;&gt;&quot;&quot;);&quot;CLEAR&quot;;&quot;CONTRADICTION&quot;);&quot;CONTRADICTION&quot;)))))">
            <text:p>UNKNOWN</text:p>
          </table:table-cell>
          <table:table-cell office:value-type="string" table:formula="of:=IF([.S6]=&quot;UNKNOWN&quot;;&quot;NO ACTION — linkage status is UNKNOWN / not asserted&quot;;IF([.S6]=&quot;CLEAR&quot;;&quot;NO CONTRADICTION — preserve evidence as entered&quot;;IF([.M6]=&quot;&quot;;&quot;REVIEW LINKAGE STATUS — identifiers are present while status is UNKNOWN&quot;;IF([.M6]=&quot;UNMATCHED&quot;;&quot;REMOVE LINKAGE IDENTIFIERS OR CORRECT LINKAGE STATUS&quot;;IF([.M6]=&quot;SINGLE_SALE_LINKED&quot;;&quot;REQUIRE LINKED SALE ID AND NO ALLOCATION GROUP ID&quot;;IF([.M6]=&quot;MULTI_SALE_PENDING_ALLOCATION&quot;;&quot;REMOVE LINKED SALE ID OR CORRECT LINKAGE STATUS&quot;;IF([.M6]=&quot;ALLOCATED&quot;;&quot;REQUIRE ALLOCATION GROUP ID AND NO LINKED SALE ID&quot;;&quot;REVIEW LINKAGE EVIDENCE — NO AUTHORITY CREATED&quot;)))))))">
            <text:p>NO ACTION — linkage status is UNKNOWN / not asserted</text:p>
          </table:table-cell>
          <table:table-cell office:value-type="string" table:formula="of:=IF([.S6]=&quot;CONTRADICTION&quot;;&quot;BLOCKED&quot;;IF([.S6]=&quot;UNKNOWN&quot;;&quot;UNKNOWN&quot;;IF([.S6]=&quot;CLEAR&quot;;IF(OR([.O6]=&quot;&quot;;[.P6]=&quot;&quot;);&quot;UNKNOWN&quot;;&quot;READY FOR REVIEW&quot;);&quot;BLOCKED&quot;)))">
            <text:p>UNKNOWN</text:p>
          </table:table-cell>
          <table:table-cell office:value-type="string" table:formula="of:=IF([.U6]=&quot;UNKNOWN&quot;;&quot;COMPLETE OR ASSERT REQUIRED EVIDENCE BEFORE REVIEW&quot;;IF([.U6]=&quot;BLOCKED&quot;;&quot;RESOLVE CONTRADICTION BEFORE REVIEW — NO AUTHORITY CREATED&quot;;IF([.U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quot;READY FOR REVIEW&quot;;&quot;REVIEW ELIGIBLE — NO AUTHORITY&quot;;IF(OR([.U6]=&quot;UNKNOWN&quot;;[.U6]=&quot;BLOCKED&quot;);&quot;NOT REVIEW ELIGIBLE&quot;;&quot;NOT REVIEW ELIGIBLE&quot;))">
            <text:p>NOT REVIEW ELIGIBLE</text:p>
          </table:table-cell>
          <table:table-cell office:value-type="string" table:formula="of:=IF([.W6]=&quot;NOT REVIEW ELIGIBLE&quot;;&quot;DO NOT BEGIN SETTLEMENT REVIEW — RESOLVE READINESS OR CONTRADICTION CONDITIONS&quot;;IF([.W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quot;&quot;;&quot;UNKNOWN&quot;;IF([.W6]&lt;&gt;&quot;REVIEW ELIGIBLE — NO AUTHORITY&quot;;&quot;BLOCKED — OUTCOME ASSERTED WITHOUT REVIEW ELIGIBILITY&quot;;IF(OR([.Y6]=&quot;REVIEWED — NO AUTHORITY&quot;;[.Y6]=&quot;REVIEW DEFERRED&quot;;[.Y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quot;&quot;;IF(AND([.L7]=&quot;&quot;;[.N7]=&quot;&quot;);&quot;UNKNOWN&quot;;&quot;CONTRADICTION&quot;);IF([.M7]=&quot;UNMATCHED&quot;;IF(AND([.L7]=&quot;&quot;;[.N7]=&quot;&quot;);&quot;CLEAR&quot;;&quot;CONTRADICTION&quot;);IF([.M7]=&quot;SINGLE_SALE_LINKED&quot;;IF(AND([.L7]&lt;&gt;&quot;&quot;;[.N7]=&quot;&quot;);&quot;CLEAR&quot;;&quot;CONTRADICTION&quot;);IF([.M7]=&quot;MULTI_SALE_PENDING_ALLOCATION&quot;;IF([.L7]=&quot;&quot;;&quot;CLEAR&quot;;&quot;CONTRADICTION&quot;);IF([.M7]=&quot;ALLOCATED&quot;;IF(AND([.L7]=&quot;&quot;;[.N7]&lt;&gt;&quot;&quot;);&quot;CLEAR&quot;;&quot;CONTRADICTION&quot;);&quot;CONTRADICTION&quot;)))))">
            <text:p>UNKNOWN</text:p>
          </table:table-cell>
          <table:table-cell office:value-type="string" table:formula="of:=IF([.S7]=&quot;UNKNOWN&quot;;&quot;NO ACTION — linkage status is UNKNOWN / not asserted&quot;;IF([.S7]=&quot;CLEAR&quot;;&quot;NO CONTRADICTION — preserve evidence as entered&quot;;IF([.M7]=&quot;&quot;;&quot;REVIEW LINKAGE STATUS — identifiers are present while status is UNKNOWN&quot;;IF([.M7]=&quot;UNMATCHED&quot;;&quot;REMOVE LINKAGE IDENTIFIERS OR CORRECT LINKAGE STATUS&quot;;IF([.M7]=&quot;SINGLE_SALE_LINKED&quot;;&quot;REQUIRE LINKED SALE ID AND NO ALLOCATION GROUP ID&quot;;IF([.M7]=&quot;MULTI_SALE_PENDING_ALLOCATION&quot;;&quot;REMOVE LINKED SALE ID OR CORRECT LINKAGE STATUS&quot;;IF([.M7]=&quot;ALLOCATED&quot;;&quot;REQUIRE ALLOCATION GROUP ID AND NO LINKED SALE ID&quot;;&quot;REVIEW LINKAGE EVIDENCE — NO AUTHORITY CREATED&quot;)))))))">
            <text:p>NO ACTION — linkage status is UNKNOWN / not asserted</text:p>
          </table:table-cell>
          <table:table-cell office:value-type="string" table:formula="of:=IF([.S7]=&quot;CONTRADICTION&quot;;&quot;BLOCKED&quot;;IF([.S7]=&quot;UNKNOWN&quot;;&quot;UNKNOWN&quot;;IF([.S7]=&quot;CLEAR&quot;;IF(OR([.O7]=&quot;&quot;;[.P7]=&quot;&quot;);&quot;UNKNOWN&quot;;&quot;READY FOR REVIEW&quot;);&quot;BLOCKED&quot;)))">
            <text:p>UNKNOWN</text:p>
          </table:table-cell>
          <table:table-cell office:value-type="string" table:formula="of:=IF([.U7]=&quot;UNKNOWN&quot;;&quot;COMPLETE OR ASSERT REQUIRED EVIDENCE BEFORE REVIEW&quot;;IF([.U7]=&quot;BLOCKED&quot;;&quot;RESOLVE CONTRADICTION BEFORE REVIEW — NO AUTHORITY CREATED&quot;;IF([.U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quot;READY FOR REVIEW&quot;;&quot;REVIEW ELIGIBLE — NO AUTHORITY&quot;;IF(OR([.U7]=&quot;UNKNOWN&quot;;[.U7]=&quot;BLOCKED&quot;);&quot;NOT REVIEW ELIGIBLE&quot;;&quot;NOT REVIEW ELIGIBLE&quot;))">
            <text:p>NOT REVIEW ELIGIBLE</text:p>
          </table:table-cell>
          <table:table-cell office:value-type="string" table:formula="of:=IF([.W7]=&quot;NOT REVIEW ELIGIBLE&quot;;&quot;DO NOT BEGIN SETTLEMENT REVIEW — RESOLVE READINESS OR CONTRADICTION CONDITIONS&quot;;IF([.W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quot;&quot;;&quot;UNKNOWN&quot;;IF([.W7]&lt;&gt;&quot;REVIEW ELIGIBLE — NO AUTHORITY&quot;;&quot;BLOCKED — OUTCOME ASSERTED WITHOUT REVIEW ELIGIBILITY&quot;;IF(OR([.Y7]=&quot;REVIEWED — NO AUTHORITY&quot;;[.Y7]=&quot;REVIEW DEFERRED&quot;;[.Y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quot;&quot;;IF(AND([.L8]=&quot;&quot;;[.N8]=&quot;&quot;);&quot;UNKNOWN&quot;;&quot;CONTRADICTION&quot;);IF([.M8]=&quot;UNMATCHED&quot;;IF(AND([.L8]=&quot;&quot;;[.N8]=&quot;&quot;);&quot;CLEAR&quot;;&quot;CONTRADICTION&quot;);IF([.M8]=&quot;SINGLE_SALE_LINKED&quot;;IF(AND([.L8]&lt;&gt;&quot;&quot;;[.N8]=&quot;&quot;);&quot;CLEAR&quot;;&quot;CONTRADICTION&quot;);IF([.M8]=&quot;MULTI_SALE_PENDING_ALLOCATION&quot;;IF([.L8]=&quot;&quot;;&quot;CLEAR&quot;;&quot;CONTRADICTION&quot;);IF([.M8]=&quot;ALLOCATED&quot;;IF(AND([.L8]=&quot;&quot;;[.N8]&lt;&gt;&quot;&quot;);&quot;CLEAR&quot;;&quot;CONTRADICTION&quot;);&quot;CONTRADICTION&quot;)))))">
            <text:p>UNKNOWN</text:p>
          </table:table-cell>
          <table:table-cell office:value-type="string" table:formula="of:=IF([.S8]=&quot;UNKNOWN&quot;;&quot;NO ACTION — linkage status is UNKNOWN / not asserted&quot;;IF([.S8]=&quot;CLEAR&quot;;&quot;NO CONTRADICTION — preserve evidence as entered&quot;;IF([.M8]=&quot;&quot;;&quot;REVIEW LINKAGE STATUS — identifiers are present while status is UNKNOWN&quot;;IF([.M8]=&quot;UNMATCHED&quot;;&quot;REMOVE LINKAGE IDENTIFIERS OR CORRECT LINKAGE STATUS&quot;;IF([.M8]=&quot;SINGLE_SALE_LINKED&quot;;&quot;REQUIRE LINKED SALE ID AND NO ALLOCATION GROUP ID&quot;;IF([.M8]=&quot;MULTI_SALE_PENDING_ALLOCATION&quot;;&quot;REMOVE LINKED SALE ID OR CORRECT LINKAGE STATUS&quot;;IF([.M8]=&quot;ALLOCATED&quot;;&quot;REQUIRE ALLOCATION GROUP ID AND NO LINKED SALE ID&quot;;&quot;REVIEW LINKAGE EVIDENCE — NO AUTHORITY CREATED&quot;)))))))">
            <text:p>NO ACTION — linkage status is UNKNOWN / not asserted</text:p>
          </table:table-cell>
          <table:table-cell office:value-type="string" table:formula="of:=IF([.S8]=&quot;CONTRADICTION&quot;;&quot;BLOCKED&quot;;IF([.S8]=&quot;UNKNOWN&quot;;&quot;UNKNOWN&quot;;IF([.S8]=&quot;CLEAR&quot;;IF(OR([.O8]=&quot;&quot;;[.P8]=&quot;&quot;);&quot;UNKNOWN&quot;;&quot;READY FOR REVIEW&quot;);&quot;BLOCKED&quot;)))">
            <text:p>UNKNOWN</text:p>
          </table:table-cell>
          <table:table-cell office:value-type="string" table:formula="of:=IF([.U8]=&quot;UNKNOWN&quot;;&quot;COMPLETE OR ASSERT REQUIRED EVIDENCE BEFORE REVIEW&quot;;IF([.U8]=&quot;BLOCKED&quot;;&quot;RESOLVE CONTRADICTION BEFORE REVIEW — NO AUTHORITY CREATED&quot;;IF([.U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quot;READY FOR REVIEW&quot;;&quot;REVIEW ELIGIBLE — NO AUTHORITY&quot;;IF(OR([.U8]=&quot;UNKNOWN&quot;;[.U8]=&quot;BLOCKED&quot;);&quot;NOT REVIEW ELIGIBLE&quot;;&quot;NOT REVIEW ELIGIBLE&quot;))">
            <text:p>NOT REVIEW ELIGIBLE</text:p>
          </table:table-cell>
          <table:table-cell office:value-type="string" table:formula="of:=IF([.W8]=&quot;NOT REVIEW ELIGIBLE&quot;;&quot;DO NOT BEGIN SETTLEMENT REVIEW — RESOLVE READINESS OR CONTRADICTION CONDITIONS&quot;;IF([.W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quot;&quot;;&quot;UNKNOWN&quot;;IF([.W8]&lt;&gt;&quot;REVIEW ELIGIBLE — NO AUTHORITY&quot;;&quot;BLOCKED — OUTCOME ASSERTED WITHOUT REVIEW ELIGIBILITY&quot;;IF(OR([.Y8]=&quot;REVIEWED — NO AUTHORITY&quot;;[.Y8]=&quot;REVIEW DEFERRED&quot;;[.Y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quot;&quot;;IF(AND([.L9]=&quot;&quot;;[.N9]=&quot;&quot;);&quot;UNKNOWN&quot;;&quot;CONTRADICTION&quot;);IF([.M9]=&quot;UNMATCHED&quot;;IF(AND([.L9]=&quot;&quot;;[.N9]=&quot;&quot;);&quot;CLEAR&quot;;&quot;CONTRADICTION&quot;);IF([.M9]=&quot;SINGLE_SALE_LINKED&quot;;IF(AND([.L9]&lt;&gt;&quot;&quot;;[.N9]=&quot;&quot;);&quot;CLEAR&quot;;&quot;CONTRADICTION&quot;);IF([.M9]=&quot;MULTI_SALE_PENDING_ALLOCATION&quot;;IF([.L9]=&quot;&quot;;&quot;CLEAR&quot;;&quot;CONTRADICTION&quot;);IF([.M9]=&quot;ALLOCATED&quot;;IF(AND([.L9]=&quot;&quot;;[.N9]&lt;&gt;&quot;&quot;);&quot;CLEAR&quot;;&quot;CONTRADICTION&quot;);&quot;CONTRADICTION&quot;)))))">
            <text:p>UNKNOWN</text:p>
          </table:table-cell>
          <table:table-cell office:value-type="string" table:formula="of:=IF([.S9]=&quot;UNKNOWN&quot;;&quot;NO ACTION — linkage status is UNKNOWN / not asserted&quot;;IF([.S9]=&quot;CLEAR&quot;;&quot;NO CONTRADICTION — preserve evidence as entered&quot;;IF([.M9]=&quot;&quot;;&quot;REVIEW LINKAGE STATUS — identifiers are present while status is UNKNOWN&quot;;IF([.M9]=&quot;UNMATCHED&quot;;&quot;REMOVE LINKAGE IDENTIFIERS OR CORRECT LINKAGE STATUS&quot;;IF([.M9]=&quot;SINGLE_SALE_LINKED&quot;;&quot;REQUIRE LINKED SALE ID AND NO ALLOCATION GROUP ID&quot;;IF([.M9]=&quot;MULTI_SALE_PENDING_ALLOCATION&quot;;&quot;REMOVE LINKED SALE ID OR CORRECT LINKAGE STATUS&quot;;IF([.M9]=&quot;ALLOCATED&quot;;&quot;REQUIRE ALLOCATION GROUP ID AND NO LINKED SALE ID&quot;;&quot;REVIEW LINKAGE EVIDENCE — NO AUTHORITY CREATED&quot;)))))))">
            <text:p>NO ACTION — linkage status is UNKNOWN / not asserted</text:p>
          </table:table-cell>
          <table:table-cell office:value-type="string" table:formula="of:=IF([.S9]=&quot;CONTRADICTION&quot;;&quot;BLOCKED&quot;;IF([.S9]=&quot;UNKNOWN&quot;;&quot;UNKNOWN&quot;;IF([.S9]=&quot;CLEAR&quot;;IF(OR([.O9]=&quot;&quot;;[.P9]=&quot;&quot;);&quot;UNKNOWN&quot;;&quot;READY FOR REVIEW&quot;);&quot;BLOCKED&quot;)))">
            <text:p>UNKNOWN</text:p>
          </table:table-cell>
          <table:table-cell office:value-type="string" table:formula="of:=IF([.U9]=&quot;UNKNOWN&quot;;&quot;COMPLETE OR ASSERT REQUIRED EVIDENCE BEFORE REVIEW&quot;;IF([.U9]=&quot;BLOCKED&quot;;&quot;RESOLVE CONTRADICTION BEFORE REVIEW — NO AUTHORITY CREATED&quot;;IF([.U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quot;READY FOR REVIEW&quot;;&quot;REVIEW ELIGIBLE — NO AUTHORITY&quot;;IF(OR([.U9]=&quot;UNKNOWN&quot;;[.U9]=&quot;BLOCKED&quot;);&quot;NOT REVIEW ELIGIBLE&quot;;&quot;NOT REVIEW ELIGIBLE&quot;))">
            <text:p>NOT REVIEW ELIGIBLE</text:p>
          </table:table-cell>
          <table:table-cell office:value-type="string" table:formula="of:=IF([.W9]=&quot;NOT REVIEW ELIGIBLE&quot;;&quot;DO NOT BEGIN SETTLEMENT REVIEW — RESOLVE READINESS OR CONTRADICTION CONDITIONS&quot;;IF([.W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quot;&quot;;&quot;UNKNOWN&quot;;IF([.W9]&lt;&gt;&quot;REVIEW ELIGIBLE — NO AUTHORITY&quot;;&quot;BLOCKED — OUTCOME ASSERTED WITHOUT REVIEW ELIGIBILITY&quot;;IF(OR([.Y9]=&quot;REVIEWED — NO AUTHORITY&quot;;[.Y9]=&quot;REVIEW DEFERRED&quot;;[.Y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quot;&quot;;IF(AND([.L10]=&quot;&quot;;[.N10]=&quot;&quot;);&quot;UNKNOWN&quot;;&quot;CONTRADICTION&quot;);IF([.M10]=&quot;UNMATCHED&quot;;IF(AND([.L10]=&quot;&quot;;[.N10]=&quot;&quot;);&quot;CLEAR&quot;;&quot;CONTRADICTION&quot;);IF([.M10]=&quot;SINGLE_SALE_LINKED&quot;;IF(AND([.L10]&lt;&gt;&quot;&quot;;[.N10]=&quot;&quot;);&quot;CLEAR&quot;;&quot;CONTRADICTION&quot;);IF([.M10]=&quot;MULTI_SALE_PENDING_ALLOCATION&quot;;IF([.L10]=&quot;&quot;;&quot;CLEAR&quot;;&quot;CONTRADICTION&quot;);IF([.M10]=&quot;ALLOCATED&quot;;IF(AND([.L10]=&quot;&quot;;[.N10]&lt;&gt;&quot;&quot;);&quot;CLEAR&quot;;&quot;CONTRADICTION&quot;);&quot;CONTRADICTION&quot;)))))">
            <text:p>UNKNOWN</text:p>
          </table:table-cell>
          <table:table-cell office:value-type="string" table:formula="of:=IF([.S10]=&quot;UNKNOWN&quot;;&quot;NO ACTION — linkage status is UNKNOWN / not asserted&quot;;IF([.S10]=&quot;CLEAR&quot;;&quot;NO CONTRADICTION — preserve evidence as entered&quot;;IF([.M10]=&quot;&quot;;&quot;REVIEW LINKAGE STATUS — identifiers are present while status is UNKNOWN&quot;;IF([.M10]=&quot;UNMATCHED&quot;;&quot;REMOVE LINKAGE IDENTIFIERS OR CORRECT LINKAGE STATUS&quot;;IF([.M10]=&quot;SINGLE_SALE_LINKED&quot;;&quot;REQUIRE LINKED SALE ID AND NO ALLOCATION GROUP ID&quot;;IF([.M10]=&quot;MULTI_SALE_PENDING_ALLOCATION&quot;;&quot;REMOVE LINKED SALE ID OR CORRECT LINKAGE STATUS&quot;;IF([.M10]=&quot;ALLOCATED&quot;;&quot;REQUIRE ALLOCATION GROUP ID AND NO LINKED SALE ID&quot;;&quot;REVIEW LINKAGE EVIDENCE — NO AUTHORITY CREATED&quot;)))))))">
            <text:p>NO ACTION — linkage status is UNKNOWN / not asserted</text:p>
          </table:table-cell>
          <table:table-cell office:value-type="string" table:formula="of:=IF([.S10]=&quot;CONTRADICTION&quot;;&quot;BLOCKED&quot;;IF([.S10]=&quot;UNKNOWN&quot;;&quot;UNKNOWN&quot;;IF([.S10]=&quot;CLEAR&quot;;IF(OR([.O10]=&quot;&quot;;[.P10]=&quot;&quot;);&quot;UNKNOWN&quot;;&quot;READY FOR REVIEW&quot;);&quot;BLOCKED&quot;)))">
            <text:p>UNKNOWN</text:p>
          </table:table-cell>
          <table:table-cell office:value-type="string" table:formula="of:=IF([.U10]=&quot;UNKNOWN&quot;;&quot;COMPLETE OR ASSERT REQUIRED EVIDENCE BEFORE REVIEW&quot;;IF([.U10]=&quot;BLOCKED&quot;;&quot;RESOLVE CONTRADICTION BEFORE REVIEW — NO AUTHORITY CREATED&quot;;IF([.U1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quot;READY FOR REVIEW&quot;;&quot;REVIEW ELIGIBLE — NO AUTHORITY&quot;;IF(OR([.U10]=&quot;UNKNOWN&quot;;[.U10]=&quot;BLOCKED&quot;);&quot;NOT REVIEW ELIGIBLE&quot;;&quot;NOT REVIEW ELIGIBLE&quot;))">
            <text:p>NOT REVIEW ELIGIBLE</text:p>
          </table:table-cell>
          <table:table-cell office:value-type="string" table:formula="of:=IF([.W10]=&quot;NOT REVIEW ELIGIBLE&quot;;&quot;DO NOT BEGIN SETTLEMENT REVIEW — RESOLVE READINESS OR CONTRADICTION CONDITIONS&quot;;IF([.W1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quot;&quot;;&quot;UNKNOWN&quot;;IF([.W10]&lt;&gt;&quot;REVIEW ELIGIBLE — NO AUTHORITY&quot;;&quot;BLOCKED — OUTCOME ASSERTED WITHOUT REVIEW ELIGIBILITY&quot;;IF(OR([.Y10]=&quot;REVIEWED — NO AUTHORITY&quot;;[.Y10]=&quot;REVIEW DEFERRED&quot;;[.Y1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quot;&quot;;IF(AND([.L11]=&quot;&quot;;[.N11]=&quot;&quot;);&quot;UNKNOWN&quot;;&quot;CONTRADICTION&quot;);IF([.M11]=&quot;UNMATCHED&quot;;IF(AND([.L11]=&quot;&quot;;[.N11]=&quot;&quot;);&quot;CLEAR&quot;;&quot;CONTRADICTION&quot;);IF([.M11]=&quot;SINGLE_SALE_LINKED&quot;;IF(AND([.L11]&lt;&gt;&quot;&quot;;[.N11]=&quot;&quot;);&quot;CLEAR&quot;;&quot;CONTRADICTION&quot;);IF([.M11]=&quot;MULTI_SALE_PENDING_ALLOCATION&quot;;IF([.L11]=&quot;&quot;;&quot;CLEAR&quot;;&quot;CONTRADICTION&quot;);IF([.M11]=&quot;ALLOCATED&quot;;IF(AND([.L11]=&quot;&quot;;[.N11]&lt;&gt;&quot;&quot;);&quot;CLEAR&quot;;&quot;CONTRADICTION&quot;);&quot;CONTRADICTION&quot;)))))">
            <text:p>UNKNOWN</text:p>
          </table:table-cell>
          <table:table-cell office:value-type="string" table:formula="of:=IF([.S11]=&quot;UNKNOWN&quot;;&quot;NO ACTION — linkage status is UNKNOWN / not asserted&quot;;IF([.S11]=&quot;CLEAR&quot;;&quot;NO CONTRADICTION — preserve evidence as entered&quot;;IF([.M11]=&quot;&quot;;&quot;REVIEW LINKAGE STATUS — identifiers are present while status is UNKNOWN&quot;;IF([.M11]=&quot;UNMATCHED&quot;;&quot;REMOVE LINKAGE IDENTIFIERS OR CORRECT LINKAGE STATUS&quot;;IF([.M11]=&quot;SINGLE_SALE_LINKED&quot;;&quot;REQUIRE LINKED SALE ID AND NO ALLOCATION GROUP ID&quot;;IF([.M11]=&quot;MULTI_SALE_PENDING_ALLOCATION&quot;;&quot;REMOVE LINKED SALE ID OR CORRECT LINKAGE STATUS&quot;;IF([.M11]=&quot;ALLOCATED&quot;;&quot;REQUIRE ALLOCATION GROUP ID AND NO LINKED SALE ID&quot;;&quot;REVIEW LINKAGE EVIDENCE — NO AUTHORITY CREATED&quot;)))))))">
            <text:p>NO ACTION — linkage status is UNKNOWN / not asserted</text:p>
          </table:table-cell>
          <table:table-cell office:value-type="string" table:formula="of:=IF([.S11]=&quot;CONTRADICTION&quot;;&quot;BLOCKED&quot;;IF([.S11]=&quot;UNKNOWN&quot;;&quot;UNKNOWN&quot;;IF([.S11]=&quot;CLEAR&quot;;IF(OR([.O11]=&quot;&quot;;[.P11]=&quot;&quot;);&quot;UNKNOWN&quot;;&quot;READY FOR REVIEW&quot;);&quot;BLOCKED&quot;)))">
            <text:p>UNKNOWN</text:p>
          </table:table-cell>
          <table:table-cell office:value-type="string" table:formula="of:=IF([.U11]=&quot;UNKNOWN&quot;;&quot;COMPLETE OR ASSERT REQUIRED EVIDENCE BEFORE REVIEW&quot;;IF([.U11]=&quot;BLOCKED&quot;;&quot;RESOLVE CONTRADICTION BEFORE REVIEW — NO AUTHORITY CREATED&quot;;IF([.U1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quot;READY FOR REVIEW&quot;;&quot;REVIEW ELIGIBLE — NO AUTHORITY&quot;;IF(OR([.U11]=&quot;UNKNOWN&quot;;[.U11]=&quot;BLOCKED&quot;);&quot;NOT REVIEW ELIGIBLE&quot;;&quot;NOT REVIEW ELIGIBLE&quot;))">
            <text:p>NOT REVIEW ELIGIBLE</text:p>
          </table:table-cell>
          <table:table-cell office:value-type="string" table:formula="of:=IF([.W11]=&quot;NOT REVIEW ELIGIBLE&quot;;&quot;DO NOT BEGIN SETTLEMENT REVIEW — RESOLVE READINESS OR CONTRADICTION CONDITIONS&quot;;IF([.W1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quot;&quot;;&quot;UNKNOWN&quot;;IF([.W11]&lt;&gt;&quot;REVIEW ELIGIBLE — NO AUTHORITY&quot;;&quot;BLOCKED — OUTCOME ASSERTED WITHOUT REVIEW ELIGIBILITY&quot;;IF(OR([.Y11]=&quot;REVIEWED — NO AUTHORITY&quot;;[.Y11]=&quot;REVIEW DEFERRED&quot;;[.Y11]=&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quot;&quot;;IF(AND([.L12]=&quot;&quot;;[.N12]=&quot;&quot;);&quot;UNKNOWN&quot;;&quot;CONTRADICTION&quot;);IF([.M12]=&quot;UNMATCHED&quot;;IF(AND([.L12]=&quot;&quot;;[.N12]=&quot;&quot;);&quot;CLEAR&quot;;&quot;CONTRADICTION&quot;);IF([.M12]=&quot;SINGLE_SALE_LINKED&quot;;IF(AND([.L12]&lt;&gt;&quot;&quot;;[.N12]=&quot;&quot;);&quot;CLEAR&quot;;&quot;CONTRADICTION&quot;);IF([.M12]=&quot;MULTI_SALE_PENDING_ALLOCATION&quot;;IF([.L12]=&quot;&quot;;&quot;CLEAR&quot;;&quot;CONTRADICTION&quot;);IF([.M12]=&quot;ALLOCATED&quot;;IF(AND([.L12]=&quot;&quot;;[.N12]&lt;&gt;&quot;&quot;);&quot;CLEAR&quot;;&quot;CONTRADICTION&quot;);&quot;CONTRADICTION&quot;)))))">
            <text:p>UNKNOWN</text:p>
          </table:table-cell>
          <table:table-cell office:value-type="string" table:formula="of:=IF([.S12]=&quot;UNKNOWN&quot;;&quot;NO ACTION — linkage status is UNKNOWN / not asserted&quot;;IF([.S12]=&quot;CLEAR&quot;;&quot;NO CONTRADICTION — preserve evidence as entered&quot;;IF([.M12]=&quot;&quot;;&quot;REVIEW LINKAGE STATUS — identifiers are present while status is UNKNOWN&quot;;IF([.M12]=&quot;UNMATCHED&quot;;&quot;REMOVE LINKAGE IDENTIFIERS OR CORRECT LINKAGE STATUS&quot;;IF([.M12]=&quot;SINGLE_SALE_LINKED&quot;;&quot;REQUIRE LINKED SALE ID AND NO ALLOCATION GROUP ID&quot;;IF([.M12]=&quot;MULTI_SALE_PENDING_ALLOCATION&quot;;&quot;REMOVE LINKED SALE ID OR CORRECT LINKAGE STATUS&quot;;IF([.M12]=&quot;ALLOCATED&quot;;&quot;REQUIRE ALLOCATION GROUP ID AND NO LINKED SALE ID&quot;;&quot;REVIEW LINKAGE EVIDENCE — NO AUTHORITY CREATED&quot;)))))))">
            <text:p>NO ACTION — linkage status is UNKNOWN / not asserted</text:p>
          </table:table-cell>
          <table:table-cell office:value-type="string" table:formula="of:=IF([.S12]=&quot;CONTRADICTION&quot;;&quot;BLOCKED&quot;;IF([.S12]=&quot;UNKNOWN&quot;;&quot;UNKNOWN&quot;;IF([.S12]=&quot;CLEAR&quot;;IF(OR([.O12]=&quot;&quot;;[.P12]=&quot;&quot;);&quot;UNKNOWN&quot;;&quot;READY FOR REVIEW&quot;);&quot;BLOCKED&quot;)))">
            <text:p>UNKNOWN</text:p>
          </table:table-cell>
          <table:table-cell office:value-type="string" table:formula="of:=IF([.U12]=&quot;UNKNOWN&quot;;&quot;COMPLETE OR ASSERT REQUIRED EVIDENCE BEFORE REVIEW&quot;;IF([.U12]=&quot;BLOCKED&quot;;&quot;RESOLVE CONTRADICTION BEFORE REVIEW — NO AUTHORITY CREATED&quot;;IF([.U1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quot;READY FOR REVIEW&quot;;&quot;REVIEW ELIGIBLE — NO AUTHORITY&quot;;IF(OR([.U12]=&quot;UNKNOWN&quot;;[.U12]=&quot;BLOCKED&quot;);&quot;NOT REVIEW ELIGIBLE&quot;;&quot;NOT REVIEW ELIGIBLE&quot;))">
            <text:p>NOT REVIEW ELIGIBLE</text:p>
          </table:table-cell>
          <table:table-cell office:value-type="string" table:formula="of:=IF([.W12]=&quot;NOT REVIEW ELIGIBLE&quot;;&quot;DO NOT BEGIN SETTLEMENT REVIEW — RESOLVE READINESS OR CONTRADICTION CONDITIONS&quot;;IF([.W1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quot;&quot;;&quot;UNKNOWN&quot;;IF([.W12]&lt;&gt;&quot;REVIEW ELIGIBLE — NO AUTHORITY&quot;;&quot;BLOCKED — OUTCOME ASSERTED WITHOUT REVIEW ELIGIBILITY&quot;;IF(OR([.Y12]=&quot;REVIEWED — NO AUTHORITY&quot;;[.Y12]=&quot;REVIEW DEFERRED&quot;;[.Y1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quot;&quot;;IF(AND([.L13]=&quot;&quot;;[.N13]=&quot;&quot;);&quot;UNKNOWN&quot;;&quot;CONTRADICTION&quot;);IF([.M13]=&quot;UNMATCHED&quot;;IF(AND([.L13]=&quot;&quot;;[.N13]=&quot;&quot;);&quot;CLEAR&quot;;&quot;CONTRADICTION&quot;);IF([.M13]=&quot;SINGLE_SALE_LINKED&quot;;IF(AND([.L13]&lt;&gt;&quot;&quot;;[.N13]=&quot;&quot;);&quot;CLEAR&quot;;&quot;CONTRADICTION&quot;);IF([.M13]=&quot;MULTI_SALE_PENDING_ALLOCATION&quot;;IF([.L13]=&quot;&quot;;&quot;CLEAR&quot;;&quot;CONTRADICTION&quot;);IF([.M13]=&quot;ALLOCATED&quot;;IF(AND([.L13]=&quot;&quot;;[.N13]&lt;&gt;&quot;&quot;);&quot;CLEAR&quot;;&quot;CONTRADICTION&quot;);&quot;CONTRADICTION&quot;)))))">
            <text:p>UNKNOWN</text:p>
          </table:table-cell>
          <table:table-cell office:value-type="string" table:formula="of:=IF([.S13]=&quot;UNKNOWN&quot;;&quot;NO ACTION — linkage status is UNKNOWN / not asserted&quot;;IF([.S13]=&quot;CLEAR&quot;;&quot;NO CONTRADICTION — preserve evidence as entered&quot;;IF([.M13]=&quot;&quot;;&quot;REVIEW LINKAGE STATUS — identifiers are present while status is UNKNOWN&quot;;IF([.M13]=&quot;UNMATCHED&quot;;&quot;REMOVE LINKAGE IDENTIFIERS OR CORRECT LINKAGE STATUS&quot;;IF([.M13]=&quot;SINGLE_SALE_LINKED&quot;;&quot;REQUIRE LINKED SALE ID AND NO ALLOCATION GROUP ID&quot;;IF([.M13]=&quot;MULTI_SALE_PENDING_ALLOCATION&quot;;&quot;REMOVE LINKED SALE ID OR CORRECT LINKAGE STATUS&quot;;IF([.M13]=&quot;ALLOCATED&quot;;&quot;REQUIRE ALLOCATION GROUP ID AND NO LINKED SALE ID&quot;;&quot;REVIEW LINKAGE EVIDENCE — NO AUTHORITY CREATED&quot;)))))))">
            <text:p>NO ACTION — linkage status is UNKNOWN / not asserted</text:p>
          </table:table-cell>
          <table:table-cell office:value-type="string" table:formula="of:=IF([.S13]=&quot;CONTRADICTION&quot;;&quot;BLOCKED&quot;;IF([.S13]=&quot;UNKNOWN&quot;;&quot;UNKNOWN&quot;;IF([.S13]=&quot;CLEAR&quot;;IF(OR([.O13]=&quot;&quot;;[.P13]=&quot;&quot;);&quot;UNKNOWN&quot;;&quot;READY FOR REVIEW&quot;);&quot;BLOCKED&quot;)))">
            <text:p>UNKNOWN</text:p>
          </table:table-cell>
          <table:table-cell office:value-type="string" table:formula="of:=IF([.U13]=&quot;UNKNOWN&quot;;&quot;COMPLETE OR ASSERT REQUIRED EVIDENCE BEFORE REVIEW&quot;;IF([.U13]=&quot;BLOCKED&quot;;&quot;RESOLVE CONTRADICTION BEFORE REVIEW — NO AUTHORITY CREATED&quot;;IF([.U1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quot;READY FOR REVIEW&quot;;&quot;REVIEW ELIGIBLE — NO AUTHORITY&quot;;IF(OR([.U13]=&quot;UNKNOWN&quot;;[.U13]=&quot;BLOCKED&quot;);&quot;NOT REVIEW ELIGIBLE&quot;;&quot;NOT REVIEW ELIGIBLE&quot;))">
            <text:p>NOT REVIEW ELIGIBLE</text:p>
          </table:table-cell>
          <table:table-cell office:value-type="string" table:formula="of:=IF([.W13]=&quot;NOT REVIEW ELIGIBLE&quot;;&quot;DO NOT BEGIN SETTLEMENT REVIEW — RESOLVE READINESS OR CONTRADICTION CONDITIONS&quot;;IF([.W1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quot;&quot;;&quot;UNKNOWN&quot;;IF([.W13]&lt;&gt;&quot;REVIEW ELIGIBLE — NO AUTHORITY&quot;;&quot;BLOCKED — OUTCOME ASSERTED WITHOUT REVIEW ELIGIBILITY&quot;;IF(OR([.Y13]=&quot;REVIEWED — NO AUTHORITY&quot;;[.Y13]=&quot;REVIEW DEFERRED&quot;;[.Y1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quot;&quot;;IF(AND([.L14]=&quot;&quot;;[.N14]=&quot;&quot;);&quot;UNKNOWN&quot;;&quot;CONTRADICTION&quot;);IF([.M14]=&quot;UNMATCHED&quot;;IF(AND([.L14]=&quot;&quot;;[.N14]=&quot;&quot;);&quot;CLEAR&quot;;&quot;CONTRADICTION&quot;);IF([.M14]=&quot;SINGLE_SALE_LINKED&quot;;IF(AND([.L14]&lt;&gt;&quot;&quot;;[.N14]=&quot;&quot;);&quot;CLEAR&quot;;&quot;CONTRADICTION&quot;);IF([.M14]=&quot;MULTI_SALE_PENDING_ALLOCATION&quot;;IF([.L14]=&quot;&quot;;&quot;CLEAR&quot;;&quot;CONTRADICTION&quot;);IF([.M14]=&quot;ALLOCATED&quot;;IF(AND([.L14]=&quot;&quot;;[.N14]&lt;&gt;&quot;&quot;);&quot;CLEAR&quot;;&quot;CONTRADICTION&quot;);&quot;CONTRADICTION&quot;)))))">
            <text:p>UNKNOWN</text:p>
          </table:table-cell>
          <table:table-cell office:value-type="string" table:formula="of:=IF([.S14]=&quot;UNKNOWN&quot;;&quot;NO ACTION — linkage status is UNKNOWN / not asserted&quot;;IF([.S14]=&quot;CLEAR&quot;;&quot;NO CONTRADICTION — preserve evidence as entered&quot;;IF([.M14]=&quot;&quot;;&quot;REVIEW LINKAGE STATUS — identifiers are present while status is UNKNOWN&quot;;IF([.M14]=&quot;UNMATCHED&quot;;&quot;REMOVE LINKAGE IDENTIFIERS OR CORRECT LINKAGE STATUS&quot;;IF([.M14]=&quot;SINGLE_SALE_LINKED&quot;;&quot;REQUIRE LINKED SALE ID AND NO ALLOCATION GROUP ID&quot;;IF([.M14]=&quot;MULTI_SALE_PENDING_ALLOCATION&quot;;&quot;REMOVE LINKED SALE ID OR CORRECT LINKAGE STATUS&quot;;IF([.M14]=&quot;ALLOCATED&quot;;&quot;REQUIRE ALLOCATION GROUP ID AND NO LINKED SALE ID&quot;;&quot;REVIEW LINKAGE EVIDENCE — NO AUTHORITY CREATED&quot;)))))))">
            <text:p>NO ACTION — linkage status is UNKNOWN / not asserted</text:p>
          </table:table-cell>
          <table:table-cell office:value-type="string" table:formula="of:=IF([.S14]=&quot;CONTRADICTION&quot;;&quot;BLOCKED&quot;;IF([.S14]=&quot;UNKNOWN&quot;;&quot;UNKNOWN&quot;;IF([.S14]=&quot;CLEAR&quot;;IF(OR([.O14]=&quot;&quot;;[.P14]=&quot;&quot;);&quot;UNKNOWN&quot;;&quot;READY FOR REVIEW&quot;);&quot;BLOCKED&quot;)))">
            <text:p>UNKNOWN</text:p>
          </table:table-cell>
          <table:table-cell office:value-type="string" table:formula="of:=IF([.U14]=&quot;UNKNOWN&quot;;&quot;COMPLETE OR ASSERT REQUIRED EVIDENCE BEFORE REVIEW&quot;;IF([.U14]=&quot;BLOCKED&quot;;&quot;RESOLVE CONTRADICTION BEFORE REVIEW — NO AUTHORITY CREATED&quot;;IF([.U1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quot;READY FOR REVIEW&quot;;&quot;REVIEW ELIGIBLE — NO AUTHORITY&quot;;IF(OR([.U14]=&quot;UNKNOWN&quot;;[.U14]=&quot;BLOCKED&quot;);&quot;NOT REVIEW ELIGIBLE&quot;;&quot;NOT REVIEW ELIGIBLE&quot;))">
            <text:p>NOT REVIEW ELIGIBLE</text:p>
          </table:table-cell>
          <table:table-cell office:value-type="string" table:formula="of:=IF([.W14]=&quot;NOT REVIEW ELIGIBLE&quot;;&quot;DO NOT BEGIN SETTLEMENT REVIEW — RESOLVE READINESS OR CONTRADICTION CONDITIONS&quot;;IF([.W1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quot;&quot;;&quot;UNKNOWN&quot;;IF([.W14]&lt;&gt;&quot;REVIEW ELIGIBLE — NO AUTHORITY&quot;;&quot;BLOCKED — OUTCOME ASSERTED WITHOUT REVIEW ELIGIBILITY&quot;;IF(OR([.Y14]=&quot;REVIEWED — NO AUTHORITY&quot;;[.Y14]=&quot;REVIEW DEFERRED&quot;;[.Y1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quot;&quot;;IF(AND([.L15]=&quot;&quot;;[.N15]=&quot;&quot;);&quot;UNKNOWN&quot;;&quot;CONTRADICTION&quot;);IF([.M15]=&quot;UNMATCHED&quot;;IF(AND([.L15]=&quot;&quot;;[.N15]=&quot;&quot;);&quot;CLEAR&quot;;&quot;CONTRADICTION&quot;);IF([.M15]=&quot;SINGLE_SALE_LINKED&quot;;IF(AND([.L15]&lt;&gt;&quot;&quot;;[.N15]=&quot;&quot;);&quot;CLEAR&quot;;&quot;CONTRADICTION&quot;);IF([.M15]=&quot;MULTI_SALE_PENDING_ALLOCATION&quot;;IF([.L15]=&quot;&quot;;&quot;CLEAR&quot;;&quot;CONTRADICTION&quot;);IF([.M15]=&quot;ALLOCATED&quot;;IF(AND([.L15]=&quot;&quot;;[.N15]&lt;&gt;&quot;&quot;);&quot;CLEAR&quot;;&quot;CONTRADICTION&quot;);&quot;CONTRADICTION&quot;)))))">
            <text:p>UNKNOWN</text:p>
          </table:table-cell>
          <table:table-cell office:value-type="string" table:formula="of:=IF([.S15]=&quot;UNKNOWN&quot;;&quot;NO ACTION — linkage status is UNKNOWN / not asserted&quot;;IF([.S15]=&quot;CLEAR&quot;;&quot;NO CONTRADICTION — preserve evidence as entered&quot;;IF([.M15]=&quot;&quot;;&quot;REVIEW LINKAGE STATUS — identifiers are present while status is UNKNOWN&quot;;IF([.M15]=&quot;UNMATCHED&quot;;&quot;REMOVE LINKAGE IDENTIFIERS OR CORRECT LINKAGE STATUS&quot;;IF([.M15]=&quot;SINGLE_SALE_LINKED&quot;;&quot;REQUIRE LINKED SALE ID AND NO ALLOCATION GROUP ID&quot;;IF([.M15]=&quot;MULTI_SALE_PENDING_ALLOCATION&quot;;&quot;REMOVE LINKED SALE ID OR CORRECT LINKAGE STATUS&quot;;IF([.M15]=&quot;ALLOCATED&quot;;&quot;REQUIRE ALLOCATION GROUP ID AND NO LINKED SALE ID&quot;;&quot;REVIEW LINKAGE EVIDENCE — NO AUTHORITY CREATED&quot;)))))))">
            <text:p>NO ACTION — linkage status is UNKNOWN / not asserted</text:p>
          </table:table-cell>
          <table:table-cell office:value-type="string" table:formula="of:=IF([.S15]=&quot;CONTRADICTION&quot;;&quot;BLOCKED&quot;;IF([.S15]=&quot;UNKNOWN&quot;;&quot;UNKNOWN&quot;;IF([.S15]=&quot;CLEAR&quot;;IF(OR([.O15]=&quot;&quot;;[.P15]=&quot;&quot;);&quot;UNKNOWN&quot;;&quot;READY FOR REVIEW&quot;);&quot;BLOCKED&quot;)))">
            <text:p>UNKNOWN</text:p>
          </table:table-cell>
          <table:table-cell office:value-type="string" table:formula="of:=IF([.U15]=&quot;UNKNOWN&quot;;&quot;COMPLETE OR ASSERT REQUIRED EVIDENCE BEFORE REVIEW&quot;;IF([.U15]=&quot;BLOCKED&quot;;&quot;RESOLVE CONTRADICTION BEFORE REVIEW — NO AUTHORITY CREATED&quot;;IF([.U1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quot;READY FOR REVIEW&quot;;&quot;REVIEW ELIGIBLE — NO AUTHORITY&quot;;IF(OR([.U15]=&quot;UNKNOWN&quot;;[.U15]=&quot;BLOCKED&quot;);&quot;NOT REVIEW ELIGIBLE&quot;;&quot;NOT REVIEW ELIGIBLE&quot;))">
            <text:p>NOT REVIEW ELIGIBLE</text:p>
          </table:table-cell>
          <table:table-cell office:value-type="string" table:formula="of:=IF([.W15]=&quot;NOT REVIEW ELIGIBLE&quot;;&quot;DO NOT BEGIN SETTLEMENT REVIEW — RESOLVE READINESS OR CONTRADICTION CONDITIONS&quot;;IF([.W1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quot;&quot;;&quot;UNKNOWN&quot;;IF([.W15]&lt;&gt;&quot;REVIEW ELIGIBLE — NO AUTHORITY&quot;;&quot;BLOCKED — OUTCOME ASSERTED WITHOUT REVIEW ELIGIBILITY&quot;;IF(OR([.Y15]=&quot;REVIEWED — NO AUTHORITY&quot;;[.Y15]=&quot;REVIEW DEFERRED&quot;;[.Y1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quot;&quot;;IF(AND([.L16]=&quot;&quot;;[.N16]=&quot;&quot;);&quot;UNKNOWN&quot;;&quot;CONTRADICTION&quot;);IF([.M16]=&quot;UNMATCHED&quot;;IF(AND([.L16]=&quot;&quot;;[.N16]=&quot;&quot;);&quot;CLEAR&quot;;&quot;CONTRADICTION&quot;);IF([.M16]=&quot;SINGLE_SALE_LINKED&quot;;IF(AND([.L16]&lt;&gt;&quot;&quot;;[.N16]=&quot;&quot;);&quot;CLEAR&quot;;&quot;CONTRADICTION&quot;);IF([.M16]=&quot;MULTI_SALE_PENDING_ALLOCATION&quot;;IF([.L16]=&quot;&quot;;&quot;CLEAR&quot;;&quot;CONTRADICTION&quot;);IF([.M16]=&quot;ALLOCATED&quot;;IF(AND([.L16]=&quot;&quot;;[.N16]&lt;&gt;&quot;&quot;);&quot;CLEAR&quot;;&quot;CONTRADICTION&quot;);&quot;CONTRADICTION&quot;)))))">
            <text:p>UNKNOWN</text:p>
          </table:table-cell>
          <table:table-cell office:value-type="string" table:formula="of:=IF([.S16]=&quot;UNKNOWN&quot;;&quot;NO ACTION — linkage status is UNKNOWN / not asserted&quot;;IF([.S16]=&quot;CLEAR&quot;;&quot;NO CONTRADICTION — preserve evidence as entered&quot;;IF([.M16]=&quot;&quot;;&quot;REVIEW LINKAGE STATUS — identifiers are present while status is UNKNOWN&quot;;IF([.M16]=&quot;UNMATCHED&quot;;&quot;REMOVE LINKAGE IDENTIFIERS OR CORRECT LINKAGE STATUS&quot;;IF([.M16]=&quot;SINGLE_SALE_LINKED&quot;;&quot;REQUIRE LINKED SALE ID AND NO ALLOCATION GROUP ID&quot;;IF([.M16]=&quot;MULTI_SALE_PENDING_ALLOCATION&quot;;&quot;REMOVE LINKED SALE ID OR CORRECT LINKAGE STATUS&quot;;IF([.M16]=&quot;ALLOCATED&quot;;&quot;REQUIRE ALLOCATION GROUP ID AND NO LINKED SALE ID&quot;;&quot;REVIEW LINKAGE EVIDENCE — NO AUTHORITY CREATED&quot;)))))))">
            <text:p>NO ACTION — linkage status is UNKNOWN / not asserted</text:p>
          </table:table-cell>
          <table:table-cell office:value-type="string" table:formula="of:=IF([.S16]=&quot;CONTRADICTION&quot;;&quot;BLOCKED&quot;;IF([.S16]=&quot;UNKNOWN&quot;;&quot;UNKNOWN&quot;;IF([.S16]=&quot;CLEAR&quot;;IF(OR([.O16]=&quot;&quot;;[.P16]=&quot;&quot;);&quot;UNKNOWN&quot;;&quot;READY FOR REVIEW&quot;);&quot;BLOCKED&quot;)))">
            <text:p>UNKNOWN</text:p>
          </table:table-cell>
          <table:table-cell office:value-type="string" table:formula="of:=IF([.U16]=&quot;UNKNOWN&quot;;&quot;COMPLETE OR ASSERT REQUIRED EVIDENCE BEFORE REVIEW&quot;;IF([.U16]=&quot;BLOCKED&quot;;&quot;RESOLVE CONTRADICTION BEFORE REVIEW — NO AUTHORITY CREATED&quot;;IF([.U1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quot;READY FOR REVIEW&quot;;&quot;REVIEW ELIGIBLE — NO AUTHORITY&quot;;IF(OR([.U16]=&quot;UNKNOWN&quot;;[.U16]=&quot;BLOCKED&quot;);&quot;NOT REVIEW ELIGIBLE&quot;;&quot;NOT REVIEW ELIGIBLE&quot;))">
            <text:p>NOT REVIEW ELIGIBLE</text:p>
          </table:table-cell>
          <table:table-cell office:value-type="string" table:formula="of:=IF([.W16]=&quot;NOT REVIEW ELIGIBLE&quot;;&quot;DO NOT BEGIN SETTLEMENT REVIEW — RESOLVE READINESS OR CONTRADICTION CONDITIONS&quot;;IF([.W1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quot;&quot;;&quot;UNKNOWN&quot;;IF([.W16]&lt;&gt;&quot;REVIEW ELIGIBLE — NO AUTHORITY&quot;;&quot;BLOCKED — OUTCOME ASSERTED WITHOUT REVIEW ELIGIBILITY&quot;;IF(OR([.Y16]=&quot;REVIEWED — NO AUTHORITY&quot;;[.Y16]=&quot;REVIEW DEFERRED&quot;;[.Y1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quot;&quot;;IF(AND([.L17]=&quot;&quot;;[.N17]=&quot;&quot;);&quot;UNKNOWN&quot;;&quot;CONTRADICTION&quot;);IF([.M17]=&quot;UNMATCHED&quot;;IF(AND([.L17]=&quot;&quot;;[.N17]=&quot;&quot;);&quot;CLEAR&quot;;&quot;CONTRADICTION&quot;);IF([.M17]=&quot;SINGLE_SALE_LINKED&quot;;IF(AND([.L17]&lt;&gt;&quot;&quot;;[.N17]=&quot;&quot;);&quot;CLEAR&quot;;&quot;CONTRADICTION&quot;);IF([.M17]=&quot;MULTI_SALE_PENDING_ALLOCATION&quot;;IF([.L17]=&quot;&quot;;&quot;CLEAR&quot;;&quot;CONTRADICTION&quot;);IF([.M17]=&quot;ALLOCATED&quot;;IF(AND([.L17]=&quot;&quot;;[.N17]&lt;&gt;&quot;&quot;);&quot;CLEAR&quot;;&quot;CONTRADICTION&quot;);&quot;CONTRADICTION&quot;)))))">
            <text:p>UNKNOWN</text:p>
          </table:table-cell>
          <table:table-cell office:value-type="string" table:formula="of:=IF([.S17]=&quot;UNKNOWN&quot;;&quot;NO ACTION — linkage status is UNKNOWN / not asserted&quot;;IF([.S17]=&quot;CLEAR&quot;;&quot;NO CONTRADICTION — preserve evidence as entered&quot;;IF([.M17]=&quot;&quot;;&quot;REVIEW LINKAGE STATUS — identifiers are present while status is UNKNOWN&quot;;IF([.M17]=&quot;UNMATCHED&quot;;&quot;REMOVE LINKAGE IDENTIFIERS OR CORRECT LINKAGE STATUS&quot;;IF([.M17]=&quot;SINGLE_SALE_LINKED&quot;;&quot;REQUIRE LINKED SALE ID AND NO ALLOCATION GROUP ID&quot;;IF([.M17]=&quot;MULTI_SALE_PENDING_ALLOCATION&quot;;&quot;REMOVE LINKED SALE ID OR CORRECT LINKAGE STATUS&quot;;IF([.M17]=&quot;ALLOCATED&quot;;&quot;REQUIRE ALLOCATION GROUP ID AND NO LINKED SALE ID&quot;;&quot;REVIEW LINKAGE EVIDENCE — NO AUTHORITY CREATED&quot;)))))))">
            <text:p>NO ACTION — linkage status is UNKNOWN / not asserted</text:p>
          </table:table-cell>
          <table:table-cell office:value-type="string" table:formula="of:=IF([.S17]=&quot;CONTRADICTION&quot;;&quot;BLOCKED&quot;;IF([.S17]=&quot;UNKNOWN&quot;;&quot;UNKNOWN&quot;;IF([.S17]=&quot;CLEAR&quot;;IF(OR([.O17]=&quot;&quot;;[.P17]=&quot;&quot;);&quot;UNKNOWN&quot;;&quot;READY FOR REVIEW&quot;);&quot;BLOCKED&quot;)))">
            <text:p>UNKNOWN</text:p>
          </table:table-cell>
          <table:table-cell office:value-type="string" table:formula="of:=IF([.U17]=&quot;UNKNOWN&quot;;&quot;COMPLETE OR ASSERT REQUIRED EVIDENCE BEFORE REVIEW&quot;;IF([.U17]=&quot;BLOCKED&quot;;&quot;RESOLVE CONTRADICTION BEFORE REVIEW — NO AUTHORITY CREATED&quot;;IF([.U1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quot;READY FOR REVIEW&quot;;&quot;REVIEW ELIGIBLE — NO AUTHORITY&quot;;IF(OR([.U17]=&quot;UNKNOWN&quot;;[.U17]=&quot;BLOCKED&quot;);&quot;NOT REVIEW ELIGIBLE&quot;;&quot;NOT REVIEW ELIGIBLE&quot;))">
            <text:p>NOT REVIEW ELIGIBLE</text:p>
          </table:table-cell>
          <table:table-cell office:value-type="string" table:formula="of:=IF([.W17]=&quot;NOT REVIEW ELIGIBLE&quot;;&quot;DO NOT BEGIN SETTLEMENT REVIEW — RESOLVE READINESS OR CONTRADICTION CONDITIONS&quot;;IF([.W1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quot;&quot;;&quot;UNKNOWN&quot;;IF([.W17]&lt;&gt;&quot;REVIEW ELIGIBLE — NO AUTHORITY&quot;;&quot;BLOCKED — OUTCOME ASSERTED WITHOUT REVIEW ELIGIBILITY&quot;;IF(OR([.Y17]=&quot;REVIEWED — NO AUTHORITY&quot;;[.Y17]=&quot;REVIEW DEFERRED&quot;;[.Y1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quot;&quot;;IF(AND([.L18]=&quot;&quot;;[.N18]=&quot;&quot;);&quot;UNKNOWN&quot;;&quot;CONTRADICTION&quot;);IF([.M18]=&quot;UNMATCHED&quot;;IF(AND([.L18]=&quot;&quot;;[.N18]=&quot;&quot;);&quot;CLEAR&quot;;&quot;CONTRADICTION&quot;);IF([.M18]=&quot;SINGLE_SALE_LINKED&quot;;IF(AND([.L18]&lt;&gt;&quot;&quot;;[.N18]=&quot;&quot;);&quot;CLEAR&quot;;&quot;CONTRADICTION&quot;);IF([.M18]=&quot;MULTI_SALE_PENDING_ALLOCATION&quot;;IF([.L18]=&quot;&quot;;&quot;CLEAR&quot;;&quot;CONTRADICTION&quot;);IF([.M18]=&quot;ALLOCATED&quot;;IF(AND([.L18]=&quot;&quot;;[.N18]&lt;&gt;&quot;&quot;);&quot;CLEAR&quot;;&quot;CONTRADICTION&quot;);&quot;CONTRADICTION&quot;)))))">
            <text:p>UNKNOWN</text:p>
          </table:table-cell>
          <table:table-cell office:value-type="string" table:formula="of:=IF([.S18]=&quot;UNKNOWN&quot;;&quot;NO ACTION — linkage status is UNKNOWN / not asserted&quot;;IF([.S18]=&quot;CLEAR&quot;;&quot;NO CONTRADICTION — preserve evidence as entered&quot;;IF([.M18]=&quot;&quot;;&quot;REVIEW LINKAGE STATUS — identifiers are present while status is UNKNOWN&quot;;IF([.M18]=&quot;UNMATCHED&quot;;&quot;REMOVE LINKAGE IDENTIFIERS OR CORRECT LINKAGE STATUS&quot;;IF([.M18]=&quot;SINGLE_SALE_LINKED&quot;;&quot;REQUIRE LINKED SALE ID AND NO ALLOCATION GROUP ID&quot;;IF([.M18]=&quot;MULTI_SALE_PENDING_ALLOCATION&quot;;&quot;REMOVE LINKED SALE ID OR CORRECT LINKAGE STATUS&quot;;IF([.M18]=&quot;ALLOCATED&quot;;&quot;REQUIRE ALLOCATION GROUP ID AND NO LINKED SALE ID&quot;;&quot;REVIEW LINKAGE EVIDENCE — NO AUTHORITY CREATED&quot;)))))))">
            <text:p>NO ACTION — linkage status is UNKNOWN / not asserted</text:p>
          </table:table-cell>
          <table:table-cell office:value-type="string" table:formula="of:=IF([.S18]=&quot;CONTRADICTION&quot;;&quot;BLOCKED&quot;;IF([.S18]=&quot;UNKNOWN&quot;;&quot;UNKNOWN&quot;;IF([.S18]=&quot;CLEAR&quot;;IF(OR([.O18]=&quot;&quot;;[.P18]=&quot;&quot;);&quot;UNKNOWN&quot;;&quot;READY FOR REVIEW&quot;);&quot;BLOCKED&quot;)))">
            <text:p>UNKNOWN</text:p>
          </table:table-cell>
          <table:table-cell office:value-type="string" table:formula="of:=IF([.U18]=&quot;UNKNOWN&quot;;&quot;COMPLETE OR ASSERT REQUIRED EVIDENCE BEFORE REVIEW&quot;;IF([.U18]=&quot;BLOCKED&quot;;&quot;RESOLVE CONTRADICTION BEFORE REVIEW — NO AUTHORITY CREATED&quot;;IF([.U1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quot;READY FOR REVIEW&quot;;&quot;REVIEW ELIGIBLE — NO AUTHORITY&quot;;IF(OR([.U18]=&quot;UNKNOWN&quot;;[.U18]=&quot;BLOCKED&quot;);&quot;NOT REVIEW ELIGIBLE&quot;;&quot;NOT REVIEW ELIGIBLE&quot;))">
            <text:p>NOT REVIEW ELIGIBLE</text:p>
          </table:table-cell>
          <table:table-cell office:value-type="string" table:formula="of:=IF([.W18]=&quot;NOT REVIEW ELIGIBLE&quot;;&quot;DO NOT BEGIN SETTLEMENT REVIEW — RESOLVE READINESS OR CONTRADICTION CONDITIONS&quot;;IF([.W1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quot;&quot;;&quot;UNKNOWN&quot;;IF([.W18]&lt;&gt;&quot;REVIEW ELIGIBLE — NO AUTHORITY&quot;;&quot;BLOCKED — OUTCOME ASSERTED WITHOUT REVIEW ELIGIBILITY&quot;;IF(OR([.Y18]=&quot;REVIEWED — NO AUTHORITY&quot;;[.Y18]=&quot;REVIEW DEFERRED&quot;;[.Y1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quot;&quot;;IF(AND([.L19]=&quot;&quot;;[.N19]=&quot;&quot;);&quot;UNKNOWN&quot;;&quot;CONTRADICTION&quot;);IF([.M19]=&quot;UNMATCHED&quot;;IF(AND([.L19]=&quot;&quot;;[.N19]=&quot;&quot;);&quot;CLEAR&quot;;&quot;CONTRADICTION&quot;);IF([.M19]=&quot;SINGLE_SALE_LINKED&quot;;IF(AND([.L19]&lt;&gt;&quot;&quot;;[.N19]=&quot;&quot;);&quot;CLEAR&quot;;&quot;CONTRADICTION&quot;);IF([.M19]=&quot;MULTI_SALE_PENDING_ALLOCATION&quot;;IF([.L19]=&quot;&quot;;&quot;CLEAR&quot;;&quot;CONTRADICTION&quot;);IF([.M19]=&quot;ALLOCATED&quot;;IF(AND([.L19]=&quot;&quot;;[.N19]&lt;&gt;&quot;&quot;);&quot;CLEAR&quot;;&quot;CONTRADICTION&quot;);&quot;CONTRADICTION&quot;)))))">
            <text:p>UNKNOWN</text:p>
          </table:table-cell>
          <table:table-cell office:value-type="string" table:formula="of:=IF([.S19]=&quot;UNKNOWN&quot;;&quot;NO ACTION — linkage status is UNKNOWN / not asserted&quot;;IF([.S19]=&quot;CLEAR&quot;;&quot;NO CONTRADICTION — preserve evidence as entered&quot;;IF([.M19]=&quot;&quot;;&quot;REVIEW LINKAGE STATUS — identifiers are present while status is UNKNOWN&quot;;IF([.M19]=&quot;UNMATCHED&quot;;&quot;REMOVE LINKAGE IDENTIFIERS OR CORRECT LINKAGE STATUS&quot;;IF([.M19]=&quot;SINGLE_SALE_LINKED&quot;;&quot;REQUIRE LINKED SALE ID AND NO ALLOCATION GROUP ID&quot;;IF([.M19]=&quot;MULTI_SALE_PENDING_ALLOCATION&quot;;&quot;REMOVE LINKED SALE ID OR CORRECT LINKAGE STATUS&quot;;IF([.M19]=&quot;ALLOCATED&quot;;&quot;REQUIRE ALLOCATION GROUP ID AND NO LINKED SALE ID&quot;;&quot;REVIEW LINKAGE EVIDENCE — NO AUTHORITY CREATED&quot;)))))))">
            <text:p>NO ACTION — linkage status is UNKNOWN / not asserted</text:p>
          </table:table-cell>
          <table:table-cell office:value-type="string" table:formula="of:=IF([.S19]=&quot;CONTRADICTION&quot;;&quot;BLOCKED&quot;;IF([.S19]=&quot;UNKNOWN&quot;;&quot;UNKNOWN&quot;;IF([.S19]=&quot;CLEAR&quot;;IF(OR([.O19]=&quot;&quot;;[.P19]=&quot;&quot;);&quot;UNKNOWN&quot;;&quot;READY FOR REVIEW&quot;);&quot;BLOCKED&quot;)))">
            <text:p>UNKNOWN</text:p>
          </table:table-cell>
          <table:table-cell office:value-type="string" table:formula="of:=IF([.U19]=&quot;UNKNOWN&quot;;&quot;COMPLETE OR ASSERT REQUIRED EVIDENCE BEFORE REVIEW&quot;;IF([.U19]=&quot;BLOCKED&quot;;&quot;RESOLVE CONTRADICTION BEFORE REVIEW — NO AUTHORITY CREATED&quot;;IF([.U1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quot;READY FOR REVIEW&quot;;&quot;REVIEW ELIGIBLE — NO AUTHORITY&quot;;IF(OR([.U19]=&quot;UNKNOWN&quot;;[.U19]=&quot;BLOCKED&quot;);&quot;NOT REVIEW ELIGIBLE&quot;;&quot;NOT REVIEW ELIGIBLE&quot;))">
            <text:p>NOT REVIEW ELIGIBLE</text:p>
          </table:table-cell>
          <table:table-cell office:value-type="string" table:formula="of:=IF([.W19]=&quot;NOT REVIEW ELIGIBLE&quot;;&quot;DO NOT BEGIN SETTLEMENT REVIEW — RESOLVE READINESS OR CONTRADICTION CONDITIONS&quot;;IF([.W1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quot;&quot;;&quot;UNKNOWN&quot;;IF([.W19]&lt;&gt;&quot;REVIEW ELIGIBLE — NO AUTHORITY&quot;;&quot;BLOCKED — OUTCOME ASSERTED WITHOUT REVIEW ELIGIBILITY&quot;;IF(OR([.Y19]=&quot;REVIEWED — NO AUTHORITY&quot;;[.Y19]=&quot;REVIEW DEFERRED&quot;;[.Y1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quot;&quot;;IF(AND([.L20]=&quot;&quot;;[.N20]=&quot;&quot;);&quot;UNKNOWN&quot;;&quot;CONTRADICTION&quot;);IF([.M20]=&quot;UNMATCHED&quot;;IF(AND([.L20]=&quot;&quot;;[.N20]=&quot;&quot;);&quot;CLEAR&quot;;&quot;CONTRADICTION&quot;);IF([.M20]=&quot;SINGLE_SALE_LINKED&quot;;IF(AND([.L20]&lt;&gt;&quot;&quot;;[.N20]=&quot;&quot;);&quot;CLEAR&quot;;&quot;CONTRADICTION&quot;);IF([.M20]=&quot;MULTI_SALE_PENDING_ALLOCATION&quot;;IF([.L20]=&quot;&quot;;&quot;CLEAR&quot;;&quot;CONTRADICTION&quot;);IF([.M20]=&quot;ALLOCATED&quot;;IF(AND([.L20]=&quot;&quot;;[.N20]&lt;&gt;&quot;&quot;);&quot;CLEAR&quot;;&quot;CONTRADICTION&quot;);&quot;CONTRADICTION&quot;)))))">
            <text:p>UNKNOWN</text:p>
          </table:table-cell>
          <table:table-cell office:value-type="string" table:formula="of:=IF([.S20]=&quot;UNKNOWN&quot;;&quot;NO ACTION — linkage status is UNKNOWN / not asserted&quot;;IF([.S20]=&quot;CLEAR&quot;;&quot;NO CONTRADICTION — preserve evidence as entered&quot;;IF([.M20]=&quot;&quot;;&quot;REVIEW LINKAGE STATUS — identifiers are present while status is UNKNOWN&quot;;IF([.M20]=&quot;UNMATCHED&quot;;&quot;REMOVE LINKAGE IDENTIFIERS OR CORRECT LINKAGE STATUS&quot;;IF([.M20]=&quot;SINGLE_SALE_LINKED&quot;;&quot;REQUIRE LINKED SALE ID AND NO ALLOCATION GROUP ID&quot;;IF([.M20]=&quot;MULTI_SALE_PENDING_ALLOCATION&quot;;&quot;REMOVE LINKED SALE ID OR CORRECT LINKAGE STATUS&quot;;IF([.M20]=&quot;ALLOCATED&quot;;&quot;REQUIRE ALLOCATION GROUP ID AND NO LINKED SALE ID&quot;;&quot;REVIEW LINKAGE EVIDENCE — NO AUTHORITY CREATED&quot;)))))))">
            <text:p>NO ACTION — linkage status is UNKNOWN / not asserted</text:p>
          </table:table-cell>
          <table:table-cell office:value-type="string" table:formula="of:=IF([.S20]=&quot;CONTRADICTION&quot;;&quot;BLOCKED&quot;;IF([.S20]=&quot;UNKNOWN&quot;;&quot;UNKNOWN&quot;;IF([.S20]=&quot;CLEAR&quot;;IF(OR([.O20]=&quot;&quot;;[.P20]=&quot;&quot;);&quot;UNKNOWN&quot;;&quot;READY FOR REVIEW&quot;);&quot;BLOCKED&quot;)))">
            <text:p>UNKNOWN</text:p>
          </table:table-cell>
          <table:table-cell office:value-type="string" table:formula="of:=IF([.U20]=&quot;UNKNOWN&quot;;&quot;COMPLETE OR ASSERT REQUIRED EVIDENCE BEFORE REVIEW&quot;;IF([.U20]=&quot;BLOCKED&quot;;&quot;RESOLVE CONTRADICTION BEFORE REVIEW — NO AUTHORITY CREATED&quot;;IF([.U2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quot;READY FOR REVIEW&quot;;&quot;REVIEW ELIGIBLE — NO AUTHORITY&quot;;IF(OR([.U20]=&quot;UNKNOWN&quot;;[.U20]=&quot;BLOCKED&quot;);&quot;NOT REVIEW ELIGIBLE&quot;;&quot;NOT REVIEW ELIGIBLE&quot;))">
            <text:p>NOT REVIEW ELIGIBLE</text:p>
          </table:table-cell>
          <table:table-cell office:value-type="string" table:formula="of:=IF([.W20]=&quot;NOT REVIEW ELIGIBLE&quot;;&quot;DO NOT BEGIN SETTLEMENT REVIEW — RESOLVE READINESS OR CONTRADICTION CONDITIONS&quot;;IF([.W2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quot;&quot;;&quot;UNKNOWN&quot;;IF([.W20]&lt;&gt;&quot;REVIEW ELIGIBLE — NO AUTHORITY&quot;;&quot;BLOCKED — OUTCOME ASSERTED WITHOUT REVIEW ELIGIBILITY&quot;;IF(OR([.Y20]=&quot;REVIEWED — NO AUTHORITY&quot;;[.Y20]=&quot;REVIEW DEFERRED&quot;;[.Y2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quot;&quot;;IF(AND([.L21]=&quot;&quot;;[.N21]=&quot;&quot;);&quot;UNKNOWN&quot;;&quot;CONTRADICTION&quot;);IF([.M21]=&quot;UNMATCHED&quot;;IF(AND([.L21]=&quot;&quot;;[.N21]=&quot;&quot;);&quot;CLEAR&quot;;&quot;CONTRADICTION&quot;);IF([.M21]=&quot;SINGLE_SALE_LINKED&quot;;IF(AND([.L21]&lt;&gt;&quot;&quot;;[.N21]=&quot;&quot;);&quot;CLEAR&quot;;&quot;CONTRADICTION&quot;);IF([.M21]=&quot;MULTI_SALE_PENDING_ALLOCATION&quot;;IF([.L21]=&quot;&quot;;&quot;CLEAR&quot;;&quot;CONTRADICTION&quot;);IF([.M21]=&quot;ALLOCATED&quot;;IF(AND([.L21]=&quot;&quot;;[.N21]&lt;&gt;&quot;&quot;);&quot;CLEAR&quot;;&quot;CONTRADICTION&quot;);&quot;CONTRADICTION&quot;)))))">
            <text:p>UNKNOWN</text:p>
          </table:table-cell>
          <table:table-cell office:value-type="string" table:formula="of:=IF([.S21]=&quot;UNKNOWN&quot;;&quot;NO ACTION — linkage status is UNKNOWN / not asserted&quot;;IF([.S21]=&quot;CLEAR&quot;;&quot;NO CONTRADICTION — preserve evidence as entered&quot;;IF([.M21]=&quot;&quot;;&quot;REVIEW LINKAGE STATUS — identifiers are present while status is UNKNOWN&quot;;IF([.M21]=&quot;UNMATCHED&quot;;&quot;REMOVE LINKAGE IDENTIFIERS OR CORRECT LINKAGE STATUS&quot;;IF([.M21]=&quot;SINGLE_SALE_LINKED&quot;;&quot;REQUIRE LINKED SALE ID AND NO ALLOCATION GROUP ID&quot;;IF([.M21]=&quot;MULTI_SALE_PENDING_ALLOCATION&quot;;&quot;REMOVE LINKED SALE ID OR CORRECT LINKAGE STATUS&quot;;IF([.M21]=&quot;ALLOCATED&quot;;&quot;REQUIRE ALLOCATION GROUP ID AND NO LINKED SALE ID&quot;;&quot;REVIEW LINKAGE EVIDENCE — NO AUTHORITY CREATED&quot;)))))))">
            <text:p>NO ACTION — linkage status is UNKNOWN / not asserted</text:p>
          </table:table-cell>
          <table:table-cell office:value-type="string" table:formula="of:=IF([.S21]=&quot;CONTRADICTION&quot;;&quot;BLOCKED&quot;;IF([.S21]=&quot;UNKNOWN&quot;;&quot;UNKNOWN&quot;;IF([.S21]=&quot;CLEAR&quot;;IF(OR([.O21]=&quot;&quot;;[.P21]=&quot;&quot;);&quot;UNKNOWN&quot;;&quot;READY FOR REVIEW&quot;);&quot;BLOCKED&quot;)))">
            <text:p>UNKNOWN</text:p>
          </table:table-cell>
          <table:table-cell office:value-type="string" table:formula="of:=IF([.U21]=&quot;UNKNOWN&quot;;&quot;COMPLETE OR ASSERT REQUIRED EVIDENCE BEFORE REVIEW&quot;;IF([.U21]=&quot;BLOCKED&quot;;&quot;RESOLVE CONTRADICTION BEFORE REVIEW — NO AUTHORITY CREATED&quot;;IF([.U2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quot;READY FOR REVIEW&quot;;&quot;REVIEW ELIGIBLE — NO AUTHORITY&quot;;IF(OR([.U21]=&quot;UNKNOWN&quot;;[.U21]=&quot;BLOCKED&quot;);&quot;NOT REVIEW ELIGIBLE&quot;;&quot;NOT REVIEW ELIGIBLE&quot;))">
            <text:p>NOT REVIEW ELIGIBLE</text:p>
          </table:table-cell>
          <table:table-cell office:value-type="string" table:formula="of:=IF([.W21]=&quot;NOT REVIEW ELIGIBLE&quot;;&quot;DO NOT BEGIN SETTLEMENT REVIEW — RESOLVE READINESS OR CONTRADICTION CONDITIONS&quot;;IF([.W2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quot;&quot;;&quot;UNKNOWN&quot;;IF([.W21]&lt;&gt;&quot;REVIEW ELIGIBLE — NO AUTHORITY&quot;;&quot;BLOCKED — OUTCOME ASSERTED WITHOUT REVIEW ELIGIBILITY&quot;;IF(OR([.Y21]=&quot;REVIEWED — NO AUTHORITY&quot;;[.Y21]=&quot;REVIEW DEFERRED&quot;;[.Y21]=&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quot;&quot;;IF(AND([.L22]=&quot;&quot;;[.N22]=&quot;&quot;);&quot;UNKNOWN&quot;;&quot;CONTRADICTION&quot;);IF([.M22]=&quot;UNMATCHED&quot;;IF(AND([.L22]=&quot;&quot;;[.N22]=&quot;&quot;);&quot;CLEAR&quot;;&quot;CONTRADICTION&quot;);IF([.M22]=&quot;SINGLE_SALE_LINKED&quot;;IF(AND([.L22]&lt;&gt;&quot;&quot;;[.N22]=&quot;&quot;);&quot;CLEAR&quot;;&quot;CONTRADICTION&quot;);IF([.M22]=&quot;MULTI_SALE_PENDING_ALLOCATION&quot;;IF([.L22]=&quot;&quot;;&quot;CLEAR&quot;;&quot;CONTRADICTION&quot;);IF([.M22]=&quot;ALLOCATED&quot;;IF(AND([.L22]=&quot;&quot;;[.N22]&lt;&gt;&quot;&quot;);&quot;CLEAR&quot;;&quot;CONTRADICTION&quot;);&quot;CONTRADICTION&quot;)))))">
            <text:p>UNKNOWN</text:p>
          </table:table-cell>
          <table:table-cell office:value-type="string" table:formula="of:=IF([.S22]=&quot;UNKNOWN&quot;;&quot;NO ACTION — linkage status is UNKNOWN / not asserted&quot;;IF([.S22]=&quot;CLEAR&quot;;&quot;NO CONTRADICTION — preserve evidence as entered&quot;;IF([.M22]=&quot;&quot;;&quot;REVIEW LINKAGE STATUS — identifiers are present while status is UNKNOWN&quot;;IF([.M22]=&quot;UNMATCHED&quot;;&quot;REMOVE LINKAGE IDENTIFIERS OR CORRECT LINKAGE STATUS&quot;;IF([.M22]=&quot;SINGLE_SALE_LINKED&quot;;&quot;REQUIRE LINKED SALE ID AND NO ALLOCATION GROUP ID&quot;;IF([.M22]=&quot;MULTI_SALE_PENDING_ALLOCATION&quot;;&quot;REMOVE LINKED SALE ID OR CORRECT LINKAGE STATUS&quot;;IF([.M22]=&quot;ALLOCATED&quot;;&quot;REQUIRE ALLOCATION GROUP ID AND NO LINKED SALE ID&quot;;&quot;REVIEW LINKAGE EVIDENCE — NO AUTHORITY CREATED&quot;)))))))">
            <text:p>NO ACTION — linkage status is UNKNOWN / not asserted</text:p>
          </table:table-cell>
          <table:table-cell office:value-type="string" table:formula="of:=IF([.S22]=&quot;CONTRADICTION&quot;;&quot;BLOCKED&quot;;IF([.S22]=&quot;UNKNOWN&quot;;&quot;UNKNOWN&quot;;IF([.S22]=&quot;CLEAR&quot;;IF(OR([.O22]=&quot;&quot;;[.P22]=&quot;&quot;);&quot;UNKNOWN&quot;;&quot;READY FOR REVIEW&quot;);&quot;BLOCKED&quot;)))">
            <text:p>UNKNOWN</text:p>
          </table:table-cell>
          <table:table-cell office:value-type="string" table:formula="of:=IF([.U22]=&quot;UNKNOWN&quot;;&quot;COMPLETE OR ASSERT REQUIRED EVIDENCE BEFORE REVIEW&quot;;IF([.U22]=&quot;BLOCKED&quot;;&quot;RESOLVE CONTRADICTION BEFORE REVIEW — NO AUTHORITY CREATED&quot;;IF([.U2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quot;READY FOR REVIEW&quot;;&quot;REVIEW ELIGIBLE — NO AUTHORITY&quot;;IF(OR([.U22]=&quot;UNKNOWN&quot;;[.U22]=&quot;BLOCKED&quot;);&quot;NOT REVIEW ELIGIBLE&quot;;&quot;NOT REVIEW ELIGIBLE&quot;))">
            <text:p>NOT REVIEW ELIGIBLE</text:p>
          </table:table-cell>
          <table:table-cell office:value-type="string" table:formula="of:=IF([.W22]=&quot;NOT REVIEW ELIGIBLE&quot;;&quot;DO NOT BEGIN SETTLEMENT REVIEW — RESOLVE READINESS OR CONTRADICTION CONDITIONS&quot;;IF([.W2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quot;&quot;;&quot;UNKNOWN&quot;;IF([.W22]&lt;&gt;&quot;REVIEW ELIGIBLE — NO AUTHORITY&quot;;&quot;BLOCKED — OUTCOME ASSERTED WITHOUT REVIEW ELIGIBILITY&quot;;IF(OR([.Y22]=&quot;REVIEWED — NO AUTHORITY&quot;;[.Y22]=&quot;REVIEW DEFERRED&quot;;[.Y2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quot;&quot;;IF(AND([.L23]=&quot;&quot;;[.N23]=&quot;&quot;);&quot;UNKNOWN&quot;;&quot;CONTRADICTION&quot;);IF([.M23]=&quot;UNMATCHED&quot;;IF(AND([.L23]=&quot;&quot;;[.N23]=&quot;&quot;);&quot;CLEAR&quot;;&quot;CONTRADICTION&quot;);IF([.M23]=&quot;SINGLE_SALE_LINKED&quot;;IF(AND([.L23]&lt;&gt;&quot;&quot;;[.N23]=&quot;&quot;);&quot;CLEAR&quot;;&quot;CONTRADICTION&quot;);IF([.M23]=&quot;MULTI_SALE_PENDING_ALLOCATION&quot;;IF([.L23]=&quot;&quot;;&quot;CLEAR&quot;;&quot;CONTRADICTION&quot;);IF([.M23]=&quot;ALLOCATED&quot;;IF(AND([.L23]=&quot;&quot;;[.N23]&lt;&gt;&quot;&quot;);&quot;CLEAR&quot;;&quot;CONTRADICTION&quot;);&quot;CONTRADICTION&quot;)))))">
            <text:p>UNKNOWN</text:p>
          </table:table-cell>
          <table:table-cell office:value-type="string" table:formula="of:=IF([.S23]=&quot;UNKNOWN&quot;;&quot;NO ACTION — linkage status is UNKNOWN / not asserted&quot;;IF([.S23]=&quot;CLEAR&quot;;&quot;NO CONTRADICTION — preserve evidence as entered&quot;;IF([.M23]=&quot;&quot;;&quot;REVIEW LINKAGE STATUS — identifiers are present while status is UNKNOWN&quot;;IF([.M23]=&quot;UNMATCHED&quot;;&quot;REMOVE LINKAGE IDENTIFIERS OR CORRECT LINKAGE STATUS&quot;;IF([.M23]=&quot;SINGLE_SALE_LINKED&quot;;&quot;REQUIRE LINKED SALE ID AND NO ALLOCATION GROUP ID&quot;;IF([.M23]=&quot;MULTI_SALE_PENDING_ALLOCATION&quot;;&quot;REMOVE LINKED SALE ID OR CORRECT LINKAGE STATUS&quot;;IF([.M23]=&quot;ALLOCATED&quot;;&quot;REQUIRE ALLOCATION GROUP ID AND NO LINKED SALE ID&quot;;&quot;REVIEW LINKAGE EVIDENCE — NO AUTHORITY CREATED&quot;)))))))">
            <text:p>NO ACTION — linkage status is UNKNOWN / not asserted</text:p>
          </table:table-cell>
          <table:table-cell office:value-type="string" table:formula="of:=IF([.S23]=&quot;CONTRADICTION&quot;;&quot;BLOCKED&quot;;IF([.S23]=&quot;UNKNOWN&quot;;&quot;UNKNOWN&quot;;IF([.S23]=&quot;CLEAR&quot;;IF(OR([.O23]=&quot;&quot;;[.P23]=&quot;&quot;);&quot;UNKNOWN&quot;;&quot;READY FOR REVIEW&quot;);&quot;BLOCKED&quot;)))">
            <text:p>UNKNOWN</text:p>
          </table:table-cell>
          <table:table-cell office:value-type="string" table:formula="of:=IF([.U23]=&quot;UNKNOWN&quot;;&quot;COMPLETE OR ASSERT REQUIRED EVIDENCE BEFORE REVIEW&quot;;IF([.U23]=&quot;BLOCKED&quot;;&quot;RESOLVE CONTRADICTION BEFORE REVIEW — NO AUTHORITY CREATED&quot;;IF([.U2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quot;READY FOR REVIEW&quot;;&quot;REVIEW ELIGIBLE — NO AUTHORITY&quot;;IF(OR([.U23]=&quot;UNKNOWN&quot;;[.U23]=&quot;BLOCKED&quot;);&quot;NOT REVIEW ELIGIBLE&quot;;&quot;NOT REVIEW ELIGIBLE&quot;))">
            <text:p>NOT REVIEW ELIGIBLE</text:p>
          </table:table-cell>
          <table:table-cell office:value-type="string" table:formula="of:=IF([.W23]=&quot;NOT REVIEW ELIGIBLE&quot;;&quot;DO NOT BEGIN SETTLEMENT REVIEW — RESOLVE READINESS OR CONTRADICTION CONDITIONS&quot;;IF([.W2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quot;&quot;;&quot;UNKNOWN&quot;;IF([.W23]&lt;&gt;&quot;REVIEW ELIGIBLE — NO AUTHORITY&quot;;&quot;BLOCKED — OUTCOME ASSERTED WITHOUT REVIEW ELIGIBILITY&quot;;IF(OR([.Y23]=&quot;REVIEWED — NO AUTHORITY&quot;;[.Y23]=&quot;REVIEW DEFERRED&quot;;[.Y2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quot;&quot;;IF(AND([.L24]=&quot;&quot;;[.N24]=&quot;&quot;);&quot;UNKNOWN&quot;;&quot;CONTRADICTION&quot;);IF([.M24]=&quot;UNMATCHED&quot;;IF(AND([.L24]=&quot;&quot;;[.N24]=&quot;&quot;);&quot;CLEAR&quot;;&quot;CONTRADICTION&quot;);IF([.M24]=&quot;SINGLE_SALE_LINKED&quot;;IF(AND([.L24]&lt;&gt;&quot;&quot;;[.N24]=&quot;&quot;);&quot;CLEAR&quot;;&quot;CONTRADICTION&quot;);IF([.M24]=&quot;MULTI_SALE_PENDING_ALLOCATION&quot;;IF([.L24]=&quot;&quot;;&quot;CLEAR&quot;;&quot;CONTRADICTION&quot;);IF([.M24]=&quot;ALLOCATED&quot;;IF(AND([.L24]=&quot;&quot;;[.N24]&lt;&gt;&quot;&quot;);&quot;CLEAR&quot;;&quot;CONTRADICTION&quot;);&quot;CONTRADICTION&quot;)))))">
            <text:p>UNKNOWN</text:p>
          </table:table-cell>
          <table:table-cell office:value-type="string" table:formula="of:=IF([.S24]=&quot;UNKNOWN&quot;;&quot;NO ACTION — linkage status is UNKNOWN / not asserted&quot;;IF([.S24]=&quot;CLEAR&quot;;&quot;NO CONTRADICTION — preserve evidence as entered&quot;;IF([.M24]=&quot;&quot;;&quot;REVIEW LINKAGE STATUS — identifiers are present while status is UNKNOWN&quot;;IF([.M24]=&quot;UNMATCHED&quot;;&quot;REMOVE LINKAGE IDENTIFIERS OR CORRECT LINKAGE STATUS&quot;;IF([.M24]=&quot;SINGLE_SALE_LINKED&quot;;&quot;REQUIRE LINKED SALE ID AND NO ALLOCATION GROUP ID&quot;;IF([.M24]=&quot;MULTI_SALE_PENDING_ALLOCATION&quot;;&quot;REMOVE LINKED SALE ID OR CORRECT LINKAGE STATUS&quot;;IF([.M24]=&quot;ALLOCATED&quot;;&quot;REQUIRE ALLOCATION GROUP ID AND NO LINKED SALE ID&quot;;&quot;REVIEW LINKAGE EVIDENCE — NO AUTHORITY CREATED&quot;)))))))">
            <text:p>NO ACTION — linkage status is UNKNOWN / not asserted</text:p>
          </table:table-cell>
          <table:table-cell office:value-type="string" table:formula="of:=IF([.S24]=&quot;CONTRADICTION&quot;;&quot;BLOCKED&quot;;IF([.S24]=&quot;UNKNOWN&quot;;&quot;UNKNOWN&quot;;IF([.S24]=&quot;CLEAR&quot;;IF(OR([.O24]=&quot;&quot;;[.P24]=&quot;&quot;);&quot;UNKNOWN&quot;;&quot;READY FOR REVIEW&quot;);&quot;BLOCKED&quot;)))">
            <text:p>UNKNOWN</text:p>
          </table:table-cell>
          <table:table-cell office:value-type="string" table:formula="of:=IF([.U24]=&quot;UNKNOWN&quot;;&quot;COMPLETE OR ASSERT REQUIRED EVIDENCE BEFORE REVIEW&quot;;IF([.U24]=&quot;BLOCKED&quot;;&quot;RESOLVE CONTRADICTION BEFORE REVIEW — NO AUTHORITY CREATED&quot;;IF([.U2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quot;READY FOR REVIEW&quot;;&quot;REVIEW ELIGIBLE — NO AUTHORITY&quot;;IF(OR([.U24]=&quot;UNKNOWN&quot;;[.U24]=&quot;BLOCKED&quot;);&quot;NOT REVIEW ELIGIBLE&quot;;&quot;NOT REVIEW ELIGIBLE&quot;))">
            <text:p>NOT REVIEW ELIGIBLE</text:p>
          </table:table-cell>
          <table:table-cell office:value-type="string" table:formula="of:=IF([.W24]=&quot;NOT REVIEW ELIGIBLE&quot;;&quot;DO NOT BEGIN SETTLEMENT REVIEW — RESOLVE READINESS OR CONTRADICTION CONDITIONS&quot;;IF([.W2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quot;&quot;;&quot;UNKNOWN&quot;;IF([.W24]&lt;&gt;&quot;REVIEW ELIGIBLE — NO AUTHORITY&quot;;&quot;BLOCKED — OUTCOME ASSERTED WITHOUT REVIEW ELIGIBILITY&quot;;IF(OR([.Y24]=&quot;REVIEWED — NO AUTHORITY&quot;;[.Y24]=&quot;REVIEW DEFERRED&quot;;[.Y2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quot;&quot;;IF(AND([.L25]=&quot;&quot;;[.N25]=&quot;&quot;);&quot;UNKNOWN&quot;;&quot;CONTRADICTION&quot;);IF([.M25]=&quot;UNMATCHED&quot;;IF(AND([.L25]=&quot;&quot;;[.N25]=&quot;&quot;);&quot;CLEAR&quot;;&quot;CONTRADICTION&quot;);IF([.M25]=&quot;SINGLE_SALE_LINKED&quot;;IF(AND([.L25]&lt;&gt;&quot;&quot;;[.N25]=&quot;&quot;);&quot;CLEAR&quot;;&quot;CONTRADICTION&quot;);IF([.M25]=&quot;MULTI_SALE_PENDING_ALLOCATION&quot;;IF([.L25]=&quot;&quot;;&quot;CLEAR&quot;;&quot;CONTRADICTION&quot;);IF([.M25]=&quot;ALLOCATED&quot;;IF(AND([.L25]=&quot;&quot;;[.N25]&lt;&gt;&quot;&quot;);&quot;CLEAR&quot;;&quot;CONTRADICTION&quot;);&quot;CONTRADICTION&quot;)))))">
            <text:p>UNKNOWN</text:p>
          </table:table-cell>
          <table:table-cell office:value-type="string" table:formula="of:=IF([.S25]=&quot;UNKNOWN&quot;;&quot;NO ACTION — linkage status is UNKNOWN / not asserted&quot;;IF([.S25]=&quot;CLEAR&quot;;&quot;NO CONTRADICTION — preserve evidence as entered&quot;;IF([.M25]=&quot;&quot;;&quot;REVIEW LINKAGE STATUS — identifiers are present while status is UNKNOWN&quot;;IF([.M25]=&quot;UNMATCHED&quot;;&quot;REMOVE LINKAGE IDENTIFIERS OR CORRECT LINKAGE STATUS&quot;;IF([.M25]=&quot;SINGLE_SALE_LINKED&quot;;&quot;REQUIRE LINKED SALE ID AND NO ALLOCATION GROUP ID&quot;;IF([.M25]=&quot;MULTI_SALE_PENDING_ALLOCATION&quot;;&quot;REMOVE LINKED SALE ID OR CORRECT LINKAGE STATUS&quot;;IF([.M25]=&quot;ALLOCATED&quot;;&quot;REQUIRE ALLOCATION GROUP ID AND NO LINKED SALE ID&quot;;&quot;REVIEW LINKAGE EVIDENCE — NO AUTHORITY CREATED&quot;)))))))">
            <text:p>NO ACTION — linkage status is UNKNOWN / not asserted</text:p>
          </table:table-cell>
          <table:table-cell office:value-type="string" table:formula="of:=IF([.S25]=&quot;CONTRADICTION&quot;;&quot;BLOCKED&quot;;IF([.S25]=&quot;UNKNOWN&quot;;&quot;UNKNOWN&quot;;IF([.S25]=&quot;CLEAR&quot;;IF(OR([.O25]=&quot;&quot;;[.P25]=&quot;&quot;);&quot;UNKNOWN&quot;;&quot;READY FOR REVIEW&quot;);&quot;BLOCKED&quot;)))">
            <text:p>UNKNOWN</text:p>
          </table:table-cell>
          <table:table-cell office:value-type="string" table:formula="of:=IF([.U25]=&quot;UNKNOWN&quot;;&quot;COMPLETE OR ASSERT REQUIRED EVIDENCE BEFORE REVIEW&quot;;IF([.U25]=&quot;BLOCKED&quot;;&quot;RESOLVE CONTRADICTION BEFORE REVIEW — NO AUTHORITY CREATED&quot;;IF([.U2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5]=&quot;READY FOR REVIEW&quot;;&quot;REVIEW ELIGIBLE — NO AUTHORITY&quot;;IF(OR([.U25]=&quot;UNKNOWN&quot;;[.U25]=&quot;BLOCKED&quot;);&quot;NOT REVIEW ELIGIBLE&quot;;&quot;NOT REVIEW ELIGIBLE&quot;))">
            <text:p>NOT REVIEW ELIGIBLE</text:p>
          </table:table-cell>
          <table:table-cell office:value-type="string" table:formula="of:=IF([.W25]=&quot;NOT REVIEW ELIGIBLE&quot;;&quot;DO NOT BEGIN SETTLEMENT REVIEW — RESOLVE READINESS OR CONTRADICTION CONDITIONS&quot;;IF([.W2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5]=&quot;&quot;;&quot;UNKNOWN&quot;;IF([.W25]&lt;&gt;&quot;REVIEW ELIGIBLE — NO AUTHORITY&quot;;&quot;BLOCKED — OUTCOME ASSERTED WITHOUT REVIEW ELIGIBILITY&quot;;IF(OR([.Y25]=&quot;REVIEWED — NO AUTHORITY&quot;;[.Y25]=&quot;REVIEW DEFERRED&quot;;[.Y2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6]=&quot;&quot;;IF(AND([.L26]=&quot;&quot;;[.N26]=&quot;&quot;);&quot;UNKNOWN&quot;;&quot;CONTRADICTION&quot;);IF([.M26]=&quot;UNMATCHED&quot;;IF(AND([.L26]=&quot;&quot;;[.N26]=&quot;&quot;);&quot;CLEAR&quot;;&quot;CONTRADICTION&quot;);IF([.M26]=&quot;SINGLE_SALE_LINKED&quot;;IF(AND([.L26]&lt;&gt;&quot;&quot;;[.N26]=&quot;&quot;);&quot;CLEAR&quot;;&quot;CONTRADICTION&quot;);IF([.M26]=&quot;MULTI_SALE_PENDING_ALLOCATION&quot;;IF([.L26]=&quot;&quot;;&quot;CLEAR&quot;;&quot;CONTRADICTION&quot;);IF([.M26]=&quot;ALLOCATED&quot;;IF(AND([.L26]=&quot;&quot;;[.N26]&lt;&gt;&quot;&quot;);&quot;CLEAR&quot;;&quot;CONTRADICTION&quot;);&quot;CONTRADICTION&quot;)))))">
            <text:p>UNKNOWN</text:p>
          </table:table-cell>
          <table:table-cell office:value-type="string" table:formula="of:=IF([.S26]=&quot;UNKNOWN&quot;;&quot;NO ACTION — linkage status is UNKNOWN / not asserted&quot;;IF([.S26]=&quot;CLEAR&quot;;&quot;NO CONTRADICTION — preserve evidence as entered&quot;;IF([.M26]=&quot;&quot;;&quot;REVIEW LINKAGE STATUS — identifiers are present while status is UNKNOWN&quot;;IF([.M26]=&quot;UNMATCHED&quot;;&quot;REMOVE LINKAGE IDENTIFIERS OR CORRECT LINKAGE STATUS&quot;;IF([.M26]=&quot;SINGLE_SALE_LINKED&quot;;&quot;REQUIRE LINKED SALE ID AND NO ALLOCATION GROUP ID&quot;;IF([.M26]=&quot;MULTI_SALE_PENDING_ALLOCATION&quot;;&quot;REMOVE LINKED SALE ID OR CORRECT LINKAGE STATUS&quot;;IF([.M26]=&quot;ALLOCATED&quot;;&quot;REQUIRE ALLOCATION GROUP ID AND NO LINKED SALE ID&quot;;&quot;REVIEW LINKAGE EVIDENCE — NO AUTHORITY CREATED&quot;)))))))">
            <text:p>NO ACTION — linkage status is UNKNOWN / not asserted</text:p>
          </table:table-cell>
          <table:table-cell office:value-type="string" table:formula="of:=IF([.S26]=&quot;CONTRADICTION&quot;;&quot;BLOCKED&quot;;IF([.S26]=&quot;UNKNOWN&quot;;&quot;UNKNOWN&quot;;IF([.S26]=&quot;CLEAR&quot;;IF(OR([.O26]=&quot;&quot;;[.P26]=&quot;&quot;);&quot;UNKNOWN&quot;;&quot;READY FOR REVIEW&quot;);&quot;BLOCKED&quot;)))">
            <text:p>UNKNOWN</text:p>
          </table:table-cell>
          <table:table-cell office:value-type="string" table:formula="of:=IF([.U26]=&quot;UNKNOWN&quot;;&quot;COMPLETE OR ASSERT REQUIRED EVIDENCE BEFORE REVIEW&quot;;IF([.U26]=&quot;BLOCKED&quot;;&quot;RESOLVE CONTRADICTION BEFORE REVIEW — NO AUTHORITY CREATED&quot;;IF([.U2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6]=&quot;READY FOR REVIEW&quot;;&quot;REVIEW ELIGIBLE — NO AUTHORITY&quot;;IF(OR([.U26]=&quot;UNKNOWN&quot;;[.U26]=&quot;BLOCKED&quot;);&quot;NOT REVIEW ELIGIBLE&quot;;&quot;NOT REVIEW ELIGIBLE&quot;))">
            <text:p>NOT REVIEW ELIGIBLE</text:p>
          </table:table-cell>
          <table:table-cell office:value-type="string" table:formula="of:=IF([.W26]=&quot;NOT REVIEW ELIGIBLE&quot;;&quot;DO NOT BEGIN SETTLEMENT REVIEW — RESOLVE READINESS OR CONTRADICTION CONDITIONS&quot;;IF([.W2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6]=&quot;&quot;;&quot;UNKNOWN&quot;;IF([.W26]&lt;&gt;&quot;REVIEW ELIGIBLE — NO AUTHORITY&quot;;&quot;BLOCKED — OUTCOME ASSERTED WITHOUT REVIEW ELIGIBILITY&quot;;IF(OR([.Y26]=&quot;REVIEWED — NO AUTHORITY&quot;;[.Y26]=&quot;REVIEW DEFERRED&quot;;[.Y2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7]=&quot;&quot;;IF(AND([.L27]=&quot;&quot;;[.N27]=&quot;&quot;);&quot;UNKNOWN&quot;;&quot;CONTRADICTION&quot;);IF([.M27]=&quot;UNMATCHED&quot;;IF(AND([.L27]=&quot;&quot;;[.N27]=&quot;&quot;);&quot;CLEAR&quot;;&quot;CONTRADICTION&quot;);IF([.M27]=&quot;SINGLE_SALE_LINKED&quot;;IF(AND([.L27]&lt;&gt;&quot;&quot;;[.N27]=&quot;&quot;);&quot;CLEAR&quot;;&quot;CONTRADICTION&quot;);IF([.M27]=&quot;MULTI_SALE_PENDING_ALLOCATION&quot;;IF([.L27]=&quot;&quot;;&quot;CLEAR&quot;;&quot;CONTRADICTION&quot;);IF([.M27]=&quot;ALLOCATED&quot;;IF(AND([.L27]=&quot;&quot;;[.N27]&lt;&gt;&quot;&quot;);&quot;CLEAR&quot;;&quot;CONTRADICTION&quot;);&quot;CONTRADICTION&quot;)))))">
            <text:p>UNKNOWN</text:p>
          </table:table-cell>
          <table:table-cell office:value-type="string" table:formula="of:=IF([.S27]=&quot;UNKNOWN&quot;;&quot;NO ACTION — linkage status is UNKNOWN / not asserted&quot;;IF([.S27]=&quot;CLEAR&quot;;&quot;NO CONTRADICTION — preserve evidence as entered&quot;;IF([.M27]=&quot;&quot;;&quot;REVIEW LINKAGE STATUS — identifiers are present while status is UNKNOWN&quot;;IF([.M27]=&quot;UNMATCHED&quot;;&quot;REMOVE LINKAGE IDENTIFIERS OR CORRECT LINKAGE STATUS&quot;;IF([.M27]=&quot;SINGLE_SALE_LINKED&quot;;&quot;REQUIRE LINKED SALE ID AND NO ALLOCATION GROUP ID&quot;;IF([.M27]=&quot;MULTI_SALE_PENDING_ALLOCATION&quot;;&quot;REMOVE LINKED SALE ID OR CORRECT LINKAGE STATUS&quot;;IF([.M27]=&quot;ALLOCATED&quot;;&quot;REQUIRE ALLOCATION GROUP ID AND NO LINKED SALE ID&quot;;&quot;REVIEW LINKAGE EVIDENCE — NO AUTHORITY CREATED&quot;)))))))">
            <text:p>NO ACTION — linkage status is UNKNOWN / not asserted</text:p>
          </table:table-cell>
          <table:table-cell office:value-type="string" table:formula="of:=IF([.S27]=&quot;CONTRADICTION&quot;;&quot;BLOCKED&quot;;IF([.S27]=&quot;UNKNOWN&quot;;&quot;UNKNOWN&quot;;IF([.S27]=&quot;CLEAR&quot;;IF(OR([.O27]=&quot;&quot;;[.P27]=&quot;&quot;);&quot;UNKNOWN&quot;;&quot;READY FOR REVIEW&quot;);&quot;BLOCKED&quot;)))">
            <text:p>UNKNOWN</text:p>
          </table:table-cell>
          <table:table-cell office:value-type="string" table:formula="of:=IF([.U27]=&quot;UNKNOWN&quot;;&quot;COMPLETE OR ASSERT REQUIRED EVIDENCE BEFORE REVIEW&quot;;IF([.U27]=&quot;BLOCKED&quot;;&quot;RESOLVE CONTRADICTION BEFORE REVIEW — NO AUTHORITY CREATED&quot;;IF([.U2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7]=&quot;READY FOR REVIEW&quot;;&quot;REVIEW ELIGIBLE — NO AUTHORITY&quot;;IF(OR([.U27]=&quot;UNKNOWN&quot;;[.U27]=&quot;BLOCKED&quot;);&quot;NOT REVIEW ELIGIBLE&quot;;&quot;NOT REVIEW ELIGIBLE&quot;))">
            <text:p>NOT REVIEW ELIGIBLE</text:p>
          </table:table-cell>
          <table:table-cell office:value-type="string" table:formula="of:=IF([.W27]=&quot;NOT REVIEW ELIGIBLE&quot;;&quot;DO NOT BEGIN SETTLEMENT REVIEW — RESOLVE READINESS OR CONTRADICTION CONDITIONS&quot;;IF([.W2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7]=&quot;&quot;;&quot;UNKNOWN&quot;;IF([.W27]&lt;&gt;&quot;REVIEW ELIGIBLE — NO AUTHORITY&quot;;&quot;BLOCKED — OUTCOME ASSERTED WITHOUT REVIEW ELIGIBILITY&quot;;IF(OR([.Y27]=&quot;REVIEWED — NO AUTHORITY&quot;;[.Y27]=&quot;REVIEW DEFERRED&quot;;[.Y2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8]=&quot;&quot;;IF(AND([.L28]=&quot;&quot;;[.N28]=&quot;&quot;);&quot;UNKNOWN&quot;;&quot;CONTRADICTION&quot;);IF([.M28]=&quot;UNMATCHED&quot;;IF(AND([.L28]=&quot;&quot;;[.N28]=&quot;&quot;);&quot;CLEAR&quot;;&quot;CONTRADICTION&quot;);IF([.M28]=&quot;SINGLE_SALE_LINKED&quot;;IF(AND([.L28]&lt;&gt;&quot;&quot;;[.N28]=&quot;&quot;);&quot;CLEAR&quot;;&quot;CONTRADICTION&quot;);IF([.M28]=&quot;MULTI_SALE_PENDING_ALLOCATION&quot;;IF([.L28]=&quot;&quot;;&quot;CLEAR&quot;;&quot;CONTRADICTION&quot;);IF([.M28]=&quot;ALLOCATED&quot;;IF(AND([.L28]=&quot;&quot;;[.N28]&lt;&gt;&quot;&quot;);&quot;CLEAR&quot;;&quot;CONTRADICTION&quot;);&quot;CONTRADICTION&quot;)))))">
            <text:p>UNKNOWN</text:p>
          </table:table-cell>
          <table:table-cell office:value-type="string" table:formula="of:=IF([.S28]=&quot;UNKNOWN&quot;;&quot;NO ACTION — linkage status is UNKNOWN / not asserted&quot;;IF([.S28]=&quot;CLEAR&quot;;&quot;NO CONTRADICTION — preserve evidence as entered&quot;;IF([.M28]=&quot;&quot;;&quot;REVIEW LINKAGE STATUS — identifiers are present while status is UNKNOWN&quot;;IF([.M28]=&quot;UNMATCHED&quot;;&quot;REMOVE LINKAGE IDENTIFIERS OR CORRECT LINKAGE STATUS&quot;;IF([.M28]=&quot;SINGLE_SALE_LINKED&quot;;&quot;REQUIRE LINKED SALE ID AND NO ALLOCATION GROUP ID&quot;;IF([.M28]=&quot;MULTI_SALE_PENDING_ALLOCATION&quot;;&quot;REMOVE LINKED SALE ID OR CORRECT LINKAGE STATUS&quot;;IF([.M28]=&quot;ALLOCATED&quot;;&quot;REQUIRE ALLOCATION GROUP ID AND NO LINKED SALE ID&quot;;&quot;REVIEW LINKAGE EVIDENCE — NO AUTHORITY CREATED&quot;)))))))">
            <text:p>NO ACTION — linkage status is UNKNOWN / not asserted</text:p>
          </table:table-cell>
          <table:table-cell office:value-type="string" table:formula="of:=IF([.S28]=&quot;CONTRADICTION&quot;;&quot;BLOCKED&quot;;IF([.S28]=&quot;UNKNOWN&quot;;&quot;UNKNOWN&quot;;IF([.S28]=&quot;CLEAR&quot;;IF(OR([.O28]=&quot;&quot;;[.P28]=&quot;&quot;);&quot;UNKNOWN&quot;;&quot;READY FOR REVIEW&quot;);&quot;BLOCKED&quot;)))">
            <text:p>UNKNOWN</text:p>
          </table:table-cell>
          <table:table-cell office:value-type="string" table:formula="of:=IF([.U28]=&quot;UNKNOWN&quot;;&quot;COMPLETE OR ASSERT REQUIRED EVIDENCE BEFORE REVIEW&quot;;IF([.U28]=&quot;BLOCKED&quot;;&quot;RESOLVE CONTRADICTION BEFORE REVIEW — NO AUTHORITY CREATED&quot;;IF([.U2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8]=&quot;READY FOR REVIEW&quot;;&quot;REVIEW ELIGIBLE — NO AUTHORITY&quot;;IF(OR([.U28]=&quot;UNKNOWN&quot;;[.U28]=&quot;BLOCKED&quot;);&quot;NOT REVIEW ELIGIBLE&quot;;&quot;NOT REVIEW ELIGIBLE&quot;))">
            <text:p>NOT REVIEW ELIGIBLE</text:p>
          </table:table-cell>
          <table:table-cell office:value-type="string" table:formula="of:=IF([.W28]=&quot;NOT REVIEW ELIGIBLE&quot;;&quot;DO NOT BEGIN SETTLEMENT REVIEW — RESOLVE READINESS OR CONTRADICTION CONDITIONS&quot;;IF([.W2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8]=&quot;&quot;;&quot;UNKNOWN&quot;;IF([.W28]&lt;&gt;&quot;REVIEW ELIGIBLE — NO AUTHORITY&quot;;&quot;BLOCKED — OUTCOME ASSERTED WITHOUT REVIEW ELIGIBILITY&quot;;IF(OR([.Y28]=&quot;REVIEWED — NO AUTHORITY&quot;;[.Y28]=&quot;REVIEW DEFERRED&quot;;[.Y2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9]=&quot;&quot;;IF(AND([.L29]=&quot;&quot;;[.N29]=&quot;&quot;);&quot;UNKNOWN&quot;;&quot;CONTRADICTION&quot;);IF([.M29]=&quot;UNMATCHED&quot;;IF(AND([.L29]=&quot;&quot;;[.N29]=&quot;&quot;);&quot;CLEAR&quot;;&quot;CONTRADICTION&quot;);IF([.M29]=&quot;SINGLE_SALE_LINKED&quot;;IF(AND([.L29]&lt;&gt;&quot;&quot;;[.N29]=&quot;&quot;);&quot;CLEAR&quot;;&quot;CONTRADICTION&quot;);IF([.M29]=&quot;MULTI_SALE_PENDING_ALLOCATION&quot;;IF([.L29]=&quot;&quot;;&quot;CLEAR&quot;;&quot;CONTRADICTION&quot;);IF([.M29]=&quot;ALLOCATED&quot;;IF(AND([.L29]=&quot;&quot;;[.N29]&lt;&gt;&quot;&quot;);&quot;CLEAR&quot;;&quot;CONTRADICTION&quot;);&quot;CONTRADICTION&quot;)))))">
            <text:p>UNKNOWN</text:p>
          </table:table-cell>
          <table:table-cell office:value-type="string" table:formula="of:=IF([.S29]=&quot;UNKNOWN&quot;;&quot;NO ACTION — linkage status is UNKNOWN / not asserted&quot;;IF([.S29]=&quot;CLEAR&quot;;&quot;NO CONTRADICTION — preserve evidence as entered&quot;;IF([.M29]=&quot;&quot;;&quot;REVIEW LINKAGE STATUS — identifiers are present while status is UNKNOWN&quot;;IF([.M29]=&quot;UNMATCHED&quot;;&quot;REMOVE LINKAGE IDENTIFIERS OR CORRECT LINKAGE STATUS&quot;;IF([.M29]=&quot;SINGLE_SALE_LINKED&quot;;&quot;REQUIRE LINKED SALE ID AND NO ALLOCATION GROUP ID&quot;;IF([.M29]=&quot;MULTI_SALE_PENDING_ALLOCATION&quot;;&quot;REMOVE LINKED SALE ID OR CORRECT LINKAGE STATUS&quot;;IF([.M29]=&quot;ALLOCATED&quot;;&quot;REQUIRE ALLOCATION GROUP ID AND NO LINKED SALE ID&quot;;&quot;REVIEW LINKAGE EVIDENCE — NO AUTHORITY CREATED&quot;)))))))">
            <text:p>NO ACTION — linkage status is UNKNOWN / not asserted</text:p>
          </table:table-cell>
          <table:table-cell office:value-type="string" table:formula="of:=IF([.S29]=&quot;CONTRADICTION&quot;;&quot;BLOCKED&quot;;IF([.S29]=&quot;UNKNOWN&quot;;&quot;UNKNOWN&quot;;IF([.S29]=&quot;CLEAR&quot;;IF(OR([.O29]=&quot;&quot;;[.P29]=&quot;&quot;);&quot;UNKNOWN&quot;;&quot;READY FOR REVIEW&quot;);&quot;BLOCKED&quot;)))">
            <text:p>UNKNOWN</text:p>
          </table:table-cell>
          <table:table-cell office:value-type="string" table:formula="of:=IF([.U29]=&quot;UNKNOWN&quot;;&quot;COMPLETE OR ASSERT REQUIRED EVIDENCE BEFORE REVIEW&quot;;IF([.U29]=&quot;BLOCKED&quot;;&quot;RESOLVE CONTRADICTION BEFORE REVIEW — NO AUTHORITY CREATED&quot;;IF([.U2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9]=&quot;READY FOR REVIEW&quot;;&quot;REVIEW ELIGIBLE — NO AUTHORITY&quot;;IF(OR([.U29]=&quot;UNKNOWN&quot;;[.U29]=&quot;BLOCKED&quot;);&quot;NOT REVIEW ELIGIBLE&quot;;&quot;NOT REVIEW ELIGIBLE&quot;))">
            <text:p>NOT REVIEW ELIGIBLE</text:p>
          </table:table-cell>
          <table:table-cell office:value-type="string" table:formula="of:=IF([.W29]=&quot;NOT REVIEW ELIGIBLE&quot;;&quot;DO NOT BEGIN SETTLEMENT REVIEW — RESOLVE READINESS OR CONTRADICTION CONDITIONS&quot;;IF([.W2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9]=&quot;&quot;;&quot;UNKNOWN&quot;;IF([.W29]&lt;&gt;&quot;REVIEW ELIGIBLE — NO AUTHORITY&quot;;&quot;BLOCKED — OUTCOME ASSERTED WITHOUT REVIEW ELIGIBILITY&quot;;IF(OR([.Y29]=&quot;REVIEWED — NO AUTHORITY&quot;;[.Y29]=&quot;REVIEW DEFERRED&quot;;[.Y2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0]=&quot;&quot;;IF(AND([.L30]=&quot;&quot;;[.N30]=&quot;&quot;);&quot;UNKNOWN&quot;;&quot;CONTRADICTION&quot;);IF([.M30]=&quot;UNMATCHED&quot;;IF(AND([.L30]=&quot;&quot;;[.N30]=&quot;&quot;);&quot;CLEAR&quot;;&quot;CONTRADICTION&quot;);IF([.M30]=&quot;SINGLE_SALE_LINKED&quot;;IF(AND([.L30]&lt;&gt;&quot;&quot;;[.N30]=&quot;&quot;);&quot;CLEAR&quot;;&quot;CONTRADICTION&quot;);IF([.M30]=&quot;MULTI_SALE_PENDING_ALLOCATION&quot;;IF([.L30]=&quot;&quot;;&quot;CLEAR&quot;;&quot;CONTRADICTION&quot;);IF([.M30]=&quot;ALLOCATED&quot;;IF(AND([.L30]=&quot;&quot;;[.N30]&lt;&gt;&quot;&quot;);&quot;CLEAR&quot;;&quot;CONTRADICTION&quot;);&quot;CONTRADICTION&quot;)))))">
            <text:p>UNKNOWN</text:p>
          </table:table-cell>
          <table:table-cell office:value-type="string" table:formula="of:=IF([.S30]=&quot;UNKNOWN&quot;;&quot;NO ACTION — linkage status is UNKNOWN / not asserted&quot;;IF([.S30]=&quot;CLEAR&quot;;&quot;NO CONTRADICTION — preserve evidence as entered&quot;;IF([.M30]=&quot;&quot;;&quot;REVIEW LINKAGE STATUS — identifiers are present while status is UNKNOWN&quot;;IF([.M30]=&quot;UNMATCHED&quot;;&quot;REMOVE LINKAGE IDENTIFIERS OR CORRECT LINKAGE STATUS&quot;;IF([.M30]=&quot;SINGLE_SALE_LINKED&quot;;&quot;REQUIRE LINKED SALE ID AND NO ALLOCATION GROUP ID&quot;;IF([.M30]=&quot;MULTI_SALE_PENDING_ALLOCATION&quot;;&quot;REMOVE LINKED SALE ID OR CORRECT LINKAGE STATUS&quot;;IF([.M30]=&quot;ALLOCATED&quot;;&quot;REQUIRE ALLOCATION GROUP ID AND NO LINKED SALE ID&quot;;&quot;REVIEW LINKAGE EVIDENCE — NO AUTHORITY CREATED&quot;)))))))">
            <text:p>NO ACTION — linkage status is UNKNOWN / not asserted</text:p>
          </table:table-cell>
          <table:table-cell office:value-type="string" table:formula="of:=IF([.S30]=&quot;CONTRADICTION&quot;;&quot;BLOCKED&quot;;IF([.S30]=&quot;UNKNOWN&quot;;&quot;UNKNOWN&quot;;IF([.S30]=&quot;CLEAR&quot;;IF(OR([.O30]=&quot;&quot;;[.P30]=&quot;&quot;);&quot;UNKNOWN&quot;;&quot;READY FOR REVIEW&quot;);&quot;BLOCKED&quot;)))">
            <text:p>UNKNOWN</text:p>
          </table:table-cell>
          <table:table-cell office:value-type="string" table:formula="of:=IF([.U30]=&quot;UNKNOWN&quot;;&quot;COMPLETE OR ASSERT REQUIRED EVIDENCE BEFORE REVIEW&quot;;IF([.U30]=&quot;BLOCKED&quot;;&quot;RESOLVE CONTRADICTION BEFORE REVIEW — NO AUTHORITY CREATED&quot;;IF([.U3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0]=&quot;READY FOR REVIEW&quot;;&quot;REVIEW ELIGIBLE — NO AUTHORITY&quot;;IF(OR([.U30]=&quot;UNKNOWN&quot;;[.U30]=&quot;BLOCKED&quot;);&quot;NOT REVIEW ELIGIBLE&quot;;&quot;NOT REVIEW ELIGIBLE&quot;))">
            <text:p>NOT REVIEW ELIGIBLE</text:p>
          </table:table-cell>
          <table:table-cell office:value-type="string" table:formula="of:=IF([.W30]=&quot;NOT REVIEW ELIGIBLE&quot;;&quot;DO NOT BEGIN SETTLEMENT REVIEW — RESOLVE READINESS OR CONTRADICTION CONDITIONS&quot;;IF([.W3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0]=&quot;&quot;;&quot;UNKNOWN&quot;;IF([.W30]&lt;&gt;&quot;REVIEW ELIGIBLE — NO AUTHORITY&quot;;&quot;BLOCKED — OUTCOME ASSERTED WITHOUT REVIEW ELIGIBILITY&quot;;IF(OR([.Y30]=&quot;REVIEWED — NO AUTHORITY&quot;;[.Y30]=&quot;REVIEW DEFERRED&quot;;[.Y3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1]=&quot;&quot;;IF(AND([.L31]=&quot;&quot;;[.N31]=&quot;&quot;);&quot;UNKNOWN&quot;;&quot;CONTRADICTION&quot;);IF([.M31]=&quot;UNMATCHED&quot;;IF(AND([.L31]=&quot;&quot;;[.N31]=&quot;&quot;);&quot;CLEAR&quot;;&quot;CONTRADICTION&quot;);IF([.M31]=&quot;SINGLE_SALE_LINKED&quot;;IF(AND([.L31]&lt;&gt;&quot;&quot;;[.N31]=&quot;&quot;);&quot;CLEAR&quot;;&quot;CONTRADICTION&quot;);IF([.M31]=&quot;MULTI_SALE_PENDING_ALLOCATION&quot;;IF([.L31]=&quot;&quot;;&quot;CLEAR&quot;;&quot;CONTRADICTION&quot;);IF([.M31]=&quot;ALLOCATED&quot;;IF(AND([.L31]=&quot;&quot;;[.N31]&lt;&gt;&quot;&quot;);&quot;CLEAR&quot;;&quot;CONTRADICTION&quot;);&quot;CONTRADICTION&quot;)))))">
            <text:p>UNKNOWN</text:p>
          </table:table-cell>
          <table:table-cell office:value-type="string" table:formula="of:=IF([.S31]=&quot;UNKNOWN&quot;;&quot;NO ACTION — linkage status is UNKNOWN / not asserted&quot;;IF([.S31]=&quot;CLEAR&quot;;&quot;NO CONTRADICTION — preserve evidence as entered&quot;;IF([.M31]=&quot;&quot;;&quot;REVIEW LINKAGE STATUS — identifiers are present while status is UNKNOWN&quot;;IF([.M31]=&quot;UNMATCHED&quot;;&quot;REMOVE LINKAGE IDENTIFIERS OR CORRECT LINKAGE STATUS&quot;;IF([.M31]=&quot;SINGLE_SALE_LINKED&quot;;&quot;REQUIRE LINKED SALE ID AND NO ALLOCATION GROUP ID&quot;;IF([.M31]=&quot;MULTI_SALE_PENDING_ALLOCATION&quot;;&quot;REMOVE LINKED SALE ID OR CORRECT LINKAGE STATUS&quot;;IF([.M31]=&quot;ALLOCATED&quot;;&quot;REQUIRE ALLOCATION GROUP ID AND NO LINKED SALE ID&quot;;&quot;REVIEW LINKAGE EVIDENCE — NO AUTHORITY CREATED&quot;)))))))">
            <text:p>NO ACTION — linkage status is UNKNOWN / not asserted</text:p>
          </table:table-cell>
          <table:table-cell office:value-type="string" table:formula="of:=IF([.S31]=&quot;CONTRADICTION&quot;;&quot;BLOCKED&quot;;IF([.S31]=&quot;UNKNOWN&quot;;&quot;UNKNOWN&quot;;IF([.S31]=&quot;CLEAR&quot;;IF(OR([.O31]=&quot;&quot;;[.P31]=&quot;&quot;);&quot;UNKNOWN&quot;;&quot;READY FOR REVIEW&quot;);&quot;BLOCKED&quot;)))">
            <text:p>UNKNOWN</text:p>
          </table:table-cell>
          <table:table-cell office:value-type="string" table:formula="of:=IF([.U31]=&quot;UNKNOWN&quot;;&quot;COMPLETE OR ASSERT REQUIRED EVIDENCE BEFORE REVIEW&quot;;IF([.U31]=&quot;BLOCKED&quot;;&quot;RESOLVE CONTRADICTION BEFORE REVIEW — NO AUTHORITY CREATED&quot;;IF([.U3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1]=&quot;READY FOR REVIEW&quot;;&quot;REVIEW ELIGIBLE — NO AUTHORITY&quot;;IF(OR([.U31]=&quot;UNKNOWN&quot;;[.U31]=&quot;BLOCKED&quot;);&quot;NOT REVIEW ELIGIBLE&quot;;&quot;NOT REVIEW ELIGIBLE&quot;))">
            <text:p>NOT REVIEW ELIGIBLE</text:p>
          </table:table-cell>
          <table:table-cell office:value-type="string" table:formula="of:=IF([.W31]=&quot;NOT REVIEW ELIGIBLE&quot;;&quot;DO NOT BEGIN SETTLEMENT REVIEW — RESOLVE READINESS OR CONTRADICTION CONDITIONS&quot;;IF([.W3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1]=&quot;&quot;;&quot;UNKNOWN&quot;;IF([.W31]&lt;&gt;&quot;REVIEW ELIGIBLE — NO AUTHORITY&quot;;&quot;BLOCKED — OUTCOME ASSERTED WITHOUT REVIEW ELIGIBILITY&quot;;IF(OR([.Y31]=&quot;REVIEWED — NO AUTHORITY&quot;;[.Y31]=&quot;REVIEW DEFERRED&quot;;[.Y31]=&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2]=&quot;&quot;;IF(AND([.L32]=&quot;&quot;;[.N32]=&quot;&quot;);&quot;UNKNOWN&quot;;&quot;CONTRADICTION&quot;);IF([.M32]=&quot;UNMATCHED&quot;;IF(AND([.L32]=&quot;&quot;;[.N32]=&quot;&quot;);&quot;CLEAR&quot;;&quot;CONTRADICTION&quot;);IF([.M32]=&quot;SINGLE_SALE_LINKED&quot;;IF(AND([.L32]&lt;&gt;&quot;&quot;;[.N32]=&quot;&quot;);&quot;CLEAR&quot;;&quot;CONTRADICTION&quot;);IF([.M32]=&quot;MULTI_SALE_PENDING_ALLOCATION&quot;;IF([.L32]=&quot;&quot;;&quot;CLEAR&quot;;&quot;CONTRADICTION&quot;);IF([.M32]=&quot;ALLOCATED&quot;;IF(AND([.L32]=&quot;&quot;;[.N32]&lt;&gt;&quot;&quot;);&quot;CLEAR&quot;;&quot;CONTRADICTION&quot;);&quot;CONTRADICTION&quot;)))))">
            <text:p>UNKNOWN</text:p>
          </table:table-cell>
          <table:table-cell office:value-type="string" table:formula="of:=IF([.S32]=&quot;UNKNOWN&quot;;&quot;NO ACTION — linkage status is UNKNOWN / not asserted&quot;;IF([.S32]=&quot;CLEAR&quot;;&quot;NO CONTRADICTION — preserve evidence as entered&quot;;IF([.M32]=&quot;&quot;;&quot;REVIEW LINKAGE STATUS — identifiers are present while status is UNKNOWN&quot;;IF([.M32]=&quot;UNMATCHED&quot;;&quot;REMOVE LINKAGE IDENTIFIERS OR CORRECT LINKAGE STATUS&quot;;IF([.M32]=&quot;SINGLE_SALE_LINKED&quot;;&quot;REQUIRE LINKED SALE ID AND NO ALLOCATION GROUP ID&quot;;IF([.M32]=&quot;MULTI_SALE_PENDING_ALLOCATION&quot;;&quot;REMOVE LINKED SALE ID OR CORRECT LINKAGE STATUS&quot;;IF([.M32]=&quot;ALLOCATED&quot;;&quot;REQUIRE ALLOCATION GROUP ID AND NO LINKED SALE ID&quot;;&quot;REVIEW LINKAGE EVIDENCE — NO AUTHORITY CREATED&quot;)))))))">
            <text:p>NO ACTION — linkage status is UNKNOWN / not asserted</text:p>
          </table:table-cell>
          <table:table-cell office:value-type="string" table:formula="of:=IF([.S32]=&quot;CONTRADICTION&quot;;&quot;BLOCKED&quot;;IF([.S32]=&quot;UNKNOWN&quot;;&quot;UNKNOWN&quot;;IF([.S32]=&quot;CLEAR&quot;;IF(OR([.O32]=&quot;&quot;;[.P32]=&quot;&quot;);&quot;UNKNOWN&quot;;&quot;READY FOR REVIEW&quot;);&quot;BLOCKED&quot;)))">
            <text:p>UNKNOWN</text:p>
          </table:table-cell>
          <table:table-cell office:value-type="string" table:formula="of:=IF([.U32]=&quot;UNKNOWN&quot;;&quot;COMPLETE OR ASSERT REQUIRED EVIDENCE BEFORE REVIEW&quot;;IF([.U32]=&quot;BLOCKED&quot;;&quot;RESOLVE CONTRADICTION BEFORE REVIEW — NO AUTHORITY CREATED&quot;;IF([.U3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2]=&quot;READY FOR REVIEW&quot;;&quot;REVIEW ELIGIBLE — NO AUTHORITY&quot;;IF(OR([.U32]=&quot;UNKNOWN&quot;;[.U32]=&quot;BLOCKED&quot;);&quot;NOT REVIEW ELIGIBLE&quot;;&quot;NOT REVIEW ELIGIBLE&quot;))">
            <text:p>NOT REVIEW ELIGIBLE</text:p>
          </table:table-cell>
          <table:table-cell office:value-type="string" table:formula="of:=IF([.W32]=&quot;NOT REVIEW ELIGIBLE&quot;;&quot;DO NOT BEGIN SETTLEMENT REVIEW — RESOLVE READINESS OR CONTRADICTION CONDITIONS&quot;;IF([.W3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2]=&quot;&quot;;&quot;UNKNOWN&quot;;IF([.W32]&lt;&gt;&quot;REVIEW ELIGIBLE — NO AUTHORITY&quot;;&quot;BLOCKED — OUTCOME ASSERTED WITHOUT REVIEW ELIGIBILITY&quot;;IF(OR([.Y32]=&quot;REVIEWED — NO AUTHORITY&quot;;[.Y32]=&quot;REVIEW DEFERRED&quot;;[.Y3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3]=&quot;&quot;;IF(AND([.L33]=&quot;&quot;;[.N33]=&quot;&quot;);&quot;UNKNOWN&quot;;&quot;CONTRADICTION&quot;);IF([.M33]=&quot;UNMATCHED&quot;;IF(AND([.L33]=&quot;&quot;;[.N33]=&quot;&quot;);&quot;CLEAR&quot;;&quot;CONTRADICTION&quot;);IF([.M33]=&quot;SINGLE_SALE_LINKED&quot;;IF(AND([.L33]&lt;&gt;&quot;&quot;;[.N33]=&quot;&quot;);&quot;CLEAR&quot;;&quot;CONTRADICTION&quot;);IF([.M33]=&quot;MULTI_SALE_PENDING_ALLOCATION&quot;;IF([.L33]=&quot;&quot;;&quot;CLEAR&quot;;&quot;CONTRADICTION&quot;);IF([.M33]=&quot;ALLOCATED&quot;;IF(AND([.L33]=&quot;&quot;;[.N33]&lt;&gt;&quot;&quot;);&quot;CLEAR&quot;;&quot;CONTRADICTION&quot;);&quot;CONTRADICTION&quot;)))))">
            <text:p>UNKNOWN</text:p>
          </table:table-cell>
          <table:table-cell office:value-type="string" table:formula="of:=IF([.S33]=&quot;UNKNOWN&quot;;&quot;NO ACTION — linkage status is UNKNOWN / not asserted&quot;;IF([.S33]=&quot;CLEAR&quot;;&quot;NO CONTRADICTION — preserve evidence as entered&quot;;IF([.M33]=&quot;&quot;;&quot;REVIEW LINKAGE STATUS — identifiers are present while status is UNKNOWN&quot;;IF([.M33]=&quot;UNMATCHED&quot;;&quot;REMOVE LINKAGE IDENTIFIERS OR CORRECT LINKAGE STATUS&quot;;IF([.M33]=&quot;SINGLE_SALE_LINKED&quot;;&quot;REQUIRE LINKED SALE ID AND NO ALLOCATION GROUP ID&quot;;IF([.M33]=&quot;MULTI_SALE_PENDING_ALLOCATION&quot;;&quot;REMOVE LINKED SALE ID OR CORRECT LINKAGE STATUS&quot;;IF([.M33]=&quot;ALLOCATED&quot;;&quot;REQUIRE ALLOCATION GROUP ID AND NO LINKED SALE ID&quot;;&quot;REVIEW LINKAGE EVIDENCE — NO AUTHORITY CREATED&quot;)))))))">
            <text:p>NO ACTION — linkage status is UNKNOWN / not asserted</text:p>
          </table:table-cell>
          <table:table-cell office:value-type="string" table:formula="of:=IF([.S33]=&quot;CONTRADICTION&quot;;&quot;BLOCKED&quot;;IF([.S33]=&quot;UNKNOWN&quot;;&quot;UNKNOWN&quot;;IF([.S33]=&quot;CLEAR&quot;;IF(OR([.O33]=&quot;&quot;;[.P33]=&quot;&quot;);&quot;UNKNOWN&quot;;&quot;READY FOR REVIEW&quot;);&quot;BLOCKED&quot;)))">
            <text:p>UNKNOWN</text:p>
          </table:table-cell>
          <table:table-cell office:value-type="string" table:formula="of:=IF([.U33]=&quot;UNKNOWN&quot;;&quot;COMPLETE OR ASSERT REQUIRED EVIDENCE BEFORE REVIEW&quot;;IF([.U33]=&quot;BLOCKED&quot;;&quot;RESOLVE CONTRADICTION BEFORE REVIEW — NO AUTHORITY CREATED&quot;;IF([.U3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3]=&quot;READY FOR REVIEW&quot;;&quot;REVIEW ELIGIBLE — NO AUTHORITY&quot;;IF(OR([.U33]=&quot;UNKNOWN&quot;;[.U33]=&quot;BLOCKED&quot;);&quot;NOT REVIEW ELIGIBLE&quot;;&quot;NOT REVIEW ELIGIBLE&quot;))">
            <text:p>NOT REVIEW ELIGIBLE</text:p>
          </table:table-cell>
          <table:table-cell office:value-type="string" table:formula="of:=IF([.W33]=&quot;NOT REVIEW ELIGIBLE&quot;;&quot;DO NOT BEGIN SETTLEMENT REVIEW — RESOLVE READINESS OR CONTRADICTION CONDITIONS&quot;;IF([.W3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3]=&quot;&quot;;&quot;UNKNOWN&quot;;IF([.W33]&lt;&gt;&quot;REVIEW ELIGIBLE — NO AUTHORITY&quot;;&quot;BLOCKED — OUTCOME ASSERTED WITHOUT REVIEW ELIGIBILITY&quot;;IF(OR([.Y33]=&quot;REVIEWED — NO AUTHORITY&quot;;[.Y33]=&quot;REVIEW DEFERRED&quot;;[.Y3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4]=&quot;&quot;;IF(AND([.L34]=&quot;&quot;;[.N34]=&quot;&quot;);&quot;UNKNOWN&quot;;&quot;CONTRADICTION&quot;);IF([.M34]=&quot;UNMATCHED&quot;;IF(AND([.L34]=&quot;&quot;;[.N34]=&quot;&quot;);&quot;CLEAR&quot;;&quot;CONTRADICTION&quot;);IF([.M34]=&quot;SINGLE_SALE_LINKED&quot;;IF(AND([.L34]&lt;&gt;&quot;&quot;;[.N34]=&quot;&quot;);&quot;CLEAR&quot;;&quot;CONTRADICTION&quot;);IF([.M34]=&quot;MULTI_SALE_PENDING_ALLOCATION&quot;;IF([.L34]=&quot;&quot;;&quot;CLEAR&quot;;&quot;CONTRADICTION&quot;);IF([.M34]=&quot;ALLOCATED&quot;;IF(AND([.L34]=&quot;&quot;;[.N34]&lt;&gt;&quot;&quot;);&quot;CLEAR&quot;;&quot;CONTRADICTION&quot;);&quot;CONTRADICTION&quot;)))))">
            <text:p>UNKNOWN</text:p>
          </table:table-cell>
          <table:table-cell office:value-type="string" table:formula="of:=IF([.S34]=&quot;UNKNOWN&quot;;&quot;NO ACTION — linkage status is UNKNOWN / not asserted&quot;;IF([.S34]=&quot;CLEAR&quot;;&quot;NO CONTRADICTION — preserve evidence as entered&quot;;IF([.M34]=&quot;&quot;;&quot;REVIEW LINKAGE STATUS — identifiers are present while status is UNKNOWN&quot;;IF([.M34]=&quot;UNMATCHED&quot;;&quot;REMOVE LINKAGE IDENTIFIERS OR CORRECT LINKAGE STATUS&quot;;IF([.M34]=&quot;SINGLE_SALE_LINKED&quot;;&quot;REQUIRE LINKED SALE ID AND NO ALLOCATION GROUP ID&quot;;IF([.M34]=&quot;MULTI_SALE_PENDING_ALLOCATION&quot;;&quot;REMOVE LINKED SALE ID OR CORRECT LINKAGE STATUS&quot;;IF([.M34]=&quot;ALLOCATED&quot;;&quot;REQUIRE ALLOCATION GROUP ID AND NO LINKED SALE ID&quot;;&quot;REVIEW LINKAGE EVIDENCE — NO AUTHORITY CREATED&quot;)))))))">
            <text:p>NO ACTION — linkage status is UNKNOWN / not asserted</text:p>
          </table:table-cell>
          <table:table-cell office:value-type="string" table:formula="of:=IF([.S34]=&quot;CONTRADICTION&quot;;&quot;BLOCKED&quot;;IF([.S34]=&quot;UNKNOWN&quot;;&quot;UNKNOWN&quot;;IF([.S34]=&quot;CLEAR&quot;;IF(OR([.O34]=&quot;&quot;;[.P34]=&quot;&quot;);&quot;UNKNOWN&quot;;&quot;READY FOR REVIEW&quot;);&quot;BLOCKED&quot;)))">
            <text:p>UNKNOWN</text:p>
          </table:table-cell>
          <table:table-cell office:value-type="string" table:formula="of:=IF([.U34]=&quot;UNKNOWN&quot;;&quot;COMPLETE OR ASSERT REQUIRED EVIDENCE BEFORE REVIEW&quot;;IF([.U34]=&quot;BLOCKED&quot;;&quot;RESOLVE CONTRADICTION BEFORE REVIEW — NO AUTHORITY CREATED&quot;;IF([.U3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4]=&quot;READY FOR REVIEW&quot;;&quot;REVIEW ELIGIBLE — NO AUTHORITY&quot;;IF(OR([.U34]=&quot;UNKNOWN&quot;;[.U34]=&quot;BLOCKED&quot;);&quot;NOT REVIEW ELIGIBLE&quot;;&quot;NOT REVIEW ELIGIBLE&quot;))">
            <text:p>NOT REVIEW ELIGIBLE</text:p>
          </table:table-cell>
          <table:table-cell office:value-type="string" table:formula="of:=IF([.W34]=&quot;NOT REVIEW ELIGIBLE&quot;;&quot;DO NOT BEGIN SETTLEMENT REVIEW — RESOLVE READINESS OR CONTRADICTION CONDITIONS&quot;;IF([.W3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4]=&quot;&quot;;&quot;UNKNOWN&quot;;IF([.W34]&lt;&gt;&quot;REVIEW ELIGIBLE — NO AUTHORITY&quot;;&quot;BLOCKED — OUTCOME ASSERTED WITHOUT REVIEW ELIGIBILITY&quot;;IF(OR([.Y34]=&quot;REVIEWED — NO AUTHORITY&quot;;[.Y34]=&quot;REVIEW DEFERRED&quot;;[.Y3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5]=&quot;&quot;;IF(AND([.L35]=&quot;&quot;;[.N35]=&quot;&quot;);&quot;UNKNOWN&quot;;&quot;CONTRADICTION&quot;);IF([.M35]=&quot;UNMATCHED&quot;;IF(AND([.L35]=&quot;&quot;;[.N35]=&quot;&quot;);&quot;CLEAR&quot;;&quot;CONTRADICTION&quot;);IF([.M35]=&quot;SINGLE_SALE_LINKED&quot;;IF(AND([.L35]&lt;&gt;&quot;&quot;;[.N35]=&quot;&quot;);&quot;CLEAR&quot;;&quot;CONTRADICTION&quot;);IF([.M35]=&quot;MULTI_SALE_PENDING_ALLOCATION&quot;;IF([.L35]=&quot;&quot;;&quot;CLEAR&quot;;&quot;CONTRADICTION&quot;);IF([.M35]=&quot;ALLOCATED&quot;;IF(AND([.L35]=&quot;&quot;;[.N35]&lt;&gt;&quot;&quot;);&quot;CLEAR&quot;;&quot;CONTRADICTION&quot;);&quot;CONTRADICTION&quot;)))))">
            <text:p>UNKNOWN</text:p>
          </table:table-cell>
          <table:table-cell office:value-type="string" table:formula="of:=IF([.S35]=&quot;UNKNOWN&quot;;&quot;NO ACTION — linkage status is UNKNOWN / not asserted&quot;;IF([.S35]=&quot;CLEAR&quot;;&quot;NO CONTRADICTION — preserve evidence as entered&quot;;IF([.M35]=&quot;&quot;;&quot;REVIEW LINKAGE STATUS — identifiers are present while status is UNKNOWN&quot;;IF([.M35]=&quot;UNMATCHED&quot;;&quot;REMOVE LINKAGE IDENTIFIERS OR CORRECT LINKAGE STATUS&quot;;IF([.M35]=&quot;SINGLE_SALE_LINKED&quot;;&quot;REQUIRE LINKED SALE ID AND NO ALLOCATION GROUP ID&quot;;IF([.M35]=&quot;MULTI_SALE_PENDING_ALLOCATION&quot;;&quot;REMOVE LINKED SALE ID OR CORRECT LINKAGE STATUS&quot;;IF([.M35]=&quot;ALLOCATED&quot;;&quot;REQUIRE ALLOCATION GROUP ID AND NO LINKED SALE ID&quot;;&quot;REVIEW LINKAGE EVIDENCE — NO AUTHORITY CREATED&quot;)))))))">
            <text:p>NO ACTION — linkage status is UNKNOWN / not asserted</text:p>
          </table:table-cell>
          <table:table-cell office:value-type="string" table:formula="of:=IF([.S35]=&quot;CONTRADICTION&quot;;&quot;BLOCKED&quot;;IF([.S35]=&quot;UNKNOWN&quot;;&quot;UNKNOWN&quot;;IF([.S35]=&quot;CLEAR&quot;;IF(OR([.O35]=&quot;&quot;;[.P35]=&quot;&quot;);&quot;UNKNOWN&quot;;&quot;READY FOR REVIEW&quot;);&quot;BLOCKED&quot;)))">
            <text:p>UNKNOWN</text:p>
          </table:table-cell>
          <table:table-cell office:value-type="string" table:formula="of:=IF([.U35]=&quot;UNKNOWN&quot;;&quot;COMPLETE OR ASSERT REQUIRED EVIDENCE BEFORE REVIEW&quot;;IF([.U35]=&quot;BLOCKED&quot;;&quot;RESOLVE CONTRADICTION BEFORE REVIEW — NO AUTHORITY CREATED&quot;;IF([.U3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5]=&quot;READY FOR REVIEW&quot;;&quot;REVIEW ELIGIBLE — NO AUTHORITY&quot;;IF(OR([.U35]=&quot;UNKNOWN&quot;;[.U35]=&quot;BLOCKED&quot;);&quot;NOT REVIEW ELIGIBLE&quot;;&quot;NOT REVIEW ELIGIBLE&quot;))">
            <text:p>NOT REVIEW ELIGIBLE</text:p>
          </table:table-cell>
          <table:table-cell office:value-type="string" table:formula="of:=IF([.W35]=&quot;NOT REVIEW ELIGIBLE&quot;;&quot;DO NOT BEGIN SETTLEMENT REVIEW — RESOLVE READINESS OR CONTRADICTION CONDITIONS&quot;;IF([.W3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5]=&quot;&quot;;&quot;UNKNOWN&quot;;IF([.W35]&lt;&gt;&quot;REVIEW ELIGIBLE — NO AUTHORITY&quot;;&quot;BLOCKED — OUTCOME ASSERTED WITHOUT REVIEW ELIGIBILITY&quot;;IF(OR([.Y35]=&quot;REVIEWED — NO AUTHORITY&quot;;[.Y35]=&quot;REVIEW DEFERRED&quot;;[.Y3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6]=&quot;&quot;;IF(AND([.L36]=&quot;&quot;;[.N36]=&quot;&quot;);&quot;UNKNOWN&quot;;&quot;CONTRADICTION&quot;);IF([.M36]=&quot;UNMATCHED&quot;;IF(AND([.L36]=&quot;&quot;;[.N36]=&quot;&quot;);&quot;CLEAR&quot;;&quot;CONTRADICTION&quot;);IF([.M36]=&quot;SINGLE_SALE_LINKED&quot;;IF(AND([.L36]&lt;&gt;&quot;&quot;;[.N36]=&quot;&quot;);&quot;CLEAR&quot;;&quot;CONTRADICTION&quot;);IF([.M36]=&quot;MULTI_SALE_PENDING_ALLOCATION&quot;;IF([.L36]=&quot;&quot;;&quot;CLEAR&quot;;&quot;CONTRADICTION&quot;);IF([.M36]=&quot;ALLOCATED&quot;;IF(AND([.L36]=&quot;&quot;;[.N36]&lt;&gt;&quot;&quot;);&quot;CLEAR&quot;;&quot;CONTRADICTION&quot;);&quot;CONTRADICTION&quot;)))))">
            <text:p>UNKNOWN</text:p>
          </table:table-cell>
          <table:table-cell office:value-type="string" table:formula="of:=IF([.S36]=&quot;UNKNOWN&quot;;&quot;NO ACTION — linkage status is UNKNOWN / not asserted&quot;;IF([.S36]=&quot;CLEAR&quot;;&quot;NO CONTRADICTION — preserve evidence as entered&quot;;IF([.M36]=&quot;&quot;;&quot;REVIEW LINKAGE STATUS — identifiers are present while status is UNKNOWN&quot;;IF([.M36]=&quot;UNMATCHED&quot;;&quot;REMOVE LINKAGE IDENTIFIERS OR CORRECT LINKAGE STATUS&quot;;IF([.M36]=&quot;SINGLE_SALE_LINKED&quot;;&quot;REQUIRE LINKED SALE ID AND NO ALLOCATION GROUP ID&quot;;IF([.M36]=&quot;MULTI_SALE_PENDING_ALLOCATION&quot;;&quot;REMOVE LINKED SALE ID OR CORRECT LINKAGE STATUS&quot;;IF([.M36]=&quot;ALLOCATED&quot;;&quot;REQUIRE ALLOCATION GROUP ID AND NO LINKED SALE ID&quot;;&quot;REVIEW LINKAGE EVIDENCE — NO AUTHORITY CREATED&quot;)))))))">
            <text:p>NO ACTION — linkage status is UNKNOWN / not asserted</text:p>
          </table:table-cell>
          <table:table-cell office:value-type="string" table:formula="of:=IF([.S36]=&quot;CONTRADICTION&quot;;&quot;BLOCKED&quot;;IF([.S36]=&quot;UNKNOWN&quot;;&quot;UNKNOWN&quot;;IF([.S36]=&quot;CLEAR&quot;;IF(OR([.O36]=&quot;&quot;;[.P36]=&quot;&quot;);&quot;UNKNOWN&quot;;&quot;READY FOR REVIEW&quot;);&quot;BLOCKED&quot;)))">
            <text:p>UNKNOWN</text:p>
          </table:table-cell>
          <table:table-cell office:value-type="string" table:formula="of:=IF([.U36]=&quot;UNKNOWN&quot;;&quot;COMPLETE OR ASSERT REQUIRED EVIDENCE BEFORE REVIEW&quot;;IF([.U36]=&quot;BLOCKED&quot;;&quot;RESOLVE CONTRADICTION BEFORE REVIEW — NO AUTHORITY CREATED&quot;;IF([.U3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6]=&quot;READY FOR REVIEW&quot;;&quot;REVIEW ELIGIBLE — NO AUTHORITY&quot;;IF(OR([.U36]=&quot;UNKNOWN&quot;;[.U36]=&quot;BLOCKED&quot;);&quot;NOT REVIEW ELIGIBLE&quot;;&quot;NOT REVIEW ELIGIBLE&quot;))">
            <text:p>NOT REVIEW ELIGIBLE</text:p>
          </table:table-cell>
          <table:table-cell office:value-type="string" table:formula="of:=IF([.W36]=&quot;NOT REVIEW ELIGIBLE&quot;;&quot;DO NOT BEGIN SETTLEMENT REVIEW — RESOLVE READINESS OR CONTRADICTION CONDITIONS&quot;;IF([.W3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6]=&quot;&quot;;&quot;UNKNOWN&quot;;IF([.W36]&lt;&gt;&quot;REVIEW ELIGIBLE — NO AUTHORITY&quot;;&quot;BLOCKED — OUTCOME ASSERTED WITHOUT REVIEW ELIGIBILITY&quot;;IF(OR([.Y36]=&quot;REVIEWED — NO AUTHORITY&quot;;[.Y36]=&quot;REVIEW DEFERRED&quot;;[.Y3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7]=&quot;&quot;;IF(AND([.L37]=&quot;&quot;;[.N37]=&quot;&quot;);&quot;UNKNOWN&quot;;&quot;CONTRADICTION&quot;);IF([.M37]=&quot;UNMATCHED&quot;;IF(AND([.L37]=&quot;&quot;;[.N37]=&quot;&quot;);&quot;CLEAR&quot;;&quot;CONTRADICTION&quot;);IF([.M37]=&quot;SINGLE_SALE_LINKED&quot;;IF(AND([.L37]&lt;&gt;&quot;&quot;;[.N37]=&quot;&quot;);&quot;CLEAR&quot;;&quot;CONTRADICTION&quot;);IF([.M37]=&quot;MULTI_SALE_PENDING_ALLOCATION&quot;;IF([.L37]=&quot;&quot;;&quot;CLEAR&quot;;&quot;CONTRADICTION&quot;);IF([.M37]=&quot;ALLOCATED&quot;;IF(AND([.L37]=&quot;&quot;;[.N37]&lt;&gt;&quot;&quot;);&quot;CLEAR&quot;;&quot;CONTRADICTION&quot;);&quot;CONTRADICTION&quot;)))))">
            <text:p>UNKNOWN</text:p>
          </table:table-cell>
          <table:table-cell office:value-type="string" table:formula="of:=IF([.S37]=&quot;UNKNOWN&quot;;&quot;NO ACTION — linkage status is UNKNOWN / not asserted&quot;;IF([.S37]=&quot;CLEAR&quot;;&quot;NO CONTRADICTION — preserve evidence as entered&quot;;IF([.M37]=&quot;&quot;;&quot;REVIEW LINKAGE STATUS — identifiers are present while status is UNKNOWN&quot;;IF([.M37]=&quot;UNMATCHED&quot;;&quot;REMOVE LINKAGE IDENTIFIERS OR CORRECT LINKAGE STATUS&quot;;IF([.M37]=&quot;SINGLE_SALE_LINKED&quot;;&quot;REQUIRE LINKED SALE ID AND NO ALLOCATION GROUP ID&quot;;IF([.M37]=&quot;MULTI_SALE_PENDING_ALLOCATION&quot;;&quot;REMOVE LINKED SALE ID OR CORRECT LINKAGE STATUS&quot;;IF([.M37]=&quot;ALLOCATED&quot;;&quot;REQUIRE ALLOCATION GROUP ID AND NO LINKED SALE ID&quot;;&quot;REVIEW LINKAGE EVIDENCE — NO AUTHORITY CREATED&quot;)))))))">
            <text:p>NO ACTION — linkage status is UNKNOWN / not asserted</text:p>
          </table:table-cell>
          <table:table-cell office:value-type="string" table:formula="of:=IF([.S37]=&quot;CONTRADICTION&quot;;&quot;BLOCKED&quot;;IF([.S37]=&quot;UNKNOWN&quot;;&quot;UNKNOWN&quot;;IF([.S37]=&quot;CLEAR&quot;;IF(OR([.O37]=&quot;&quot;;[.P37]=&quot;&quot;);&quot;UNKNOWN&quot;;&quot;READY FOR REVIEW&quot;);&quot;BLOCKED&quot;)))">
            <text:p>UNKNOWN</text:p>
          </table:table-cell>
          <table:table-cell office:value-type="string" table:formula="of:=IF([.U37]=&quot;UNKNOWN&quot;;&quot;COMPLETE OR ASSERT REQUIRED EVIDENCE BEFORE REVIEW&quot;;IF([.U37]=&quot;BLOCKED&quot;;&quot;RESOLVE CONTRADICTION BEFORE REVIEW — NO AUTHORITY CREATED&quot;;IF([.U3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7]=&quot;READY FOR REVIEW&quot;;&quot;REVIEW ELIGIBLE — NO AUTHORITY&quot;;IF(OR([.U37]=&quot;UNKNOWN&quot;;[.U37]=&quot;BLOCKED&quot;);&quot;NOT REVIEW ELIGIBLE&quot;;&quot;NOT REVIEW ELIGIBLE&quot;))">
            <text:p>NOT REVIEW ELIGIBLE</text:p>
          </table:table-cell>
          <table:table-cell office:value-type="string" table:formula="of:=IF([.W37]=&quot;NOT REVIEW ELIGIBLE&quot;;&quot;DO NOT BEGIN SETTLEMENT REVIEW — RESOLVE READINESS OR CONTRADICTION CONDITIONS&quot;;IF([.W3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7]=&quot;&quot;;&quot;UNKNOWN&quot;;IF([.W37]&lt;&gt;&quot;REVIEW ELIGIBLE — NO AUTHORITY&quot;;&quot;BLOCKED — OUTCOME ASSERTED WITHOUT REVIEW ELIGIBILITY&quot;;IF(OR([.Y37]=&quot;REVIEWED — NO AUTHORITY&quot;;[.Y37]=&quot;REVIEW DEFERRED&quot;;[.Y3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8]=&quot;&quot;;IF(AND([.L38]=&quot;&quot;;[.N38]=&quot;&quot;);&quot;UNKNOWN&quot;;&quot;CONTRADICTION&quot;);IF([.M38]=&quot;UNMATCHED&quot;;IF(AND([.L38]=&quot;&quot;;[.N38]=&quot;&quot;);&quot;CLEAR&quot;;&quot;CONTRADICTION&quot;);IF([.M38]=&quot;SINGLE_SALE_LINKED&quot;;IF(AND([.L38]&lt;&gt;&quot;&quot;;[.N38]=&quot;&quot;);&quot;CLEAR&quot;;&quot;CONTRADICTION&quot;);IF([.M38]=&quot;MULTI_SALE_PENDING_ALLOCATION&quot;;IF([.L38]=&quot;&quot;;&quot;CLEAR&quot;;&quot;CONTRADICTION&quot;);IF([.M38]=&quot;ALLOCATED&quot;;IF(AND([.L38]=&quot;&quot;;[.N38]&lt;&gt;&quot;&quot;);&quot;CLEAR&quot;;&quot;CONTRADICTION&quot;);&quot;CONTRADICTION&quot;)))))">
            <text:p>UNKNOWN</text:p>
          </table:table-cell>
          <table:table-cell office:value-type="string" table:formula="of:=IF([.S38]=&quot;UNKNOWN&quot;;&quot;NO ACTION — linkage status is UNKNOWN / not asserted&quot;;IF([.S38]=&quot;CLEAR&quot;;&quot;NO CONTRADICTION — preserve evidence as entered&quot;;IF([.M38]=&quot;&quot;;&quot;REVIEW LINKAGE STATUS — identifiers are present while status is UNKNOWN&quot;;IF([.M38]=&quot;UNMATCHED&quot;;&quot;REMOVE LINKAGE IDENTIFIERS OR CORRECT LINKAGE STATUS&quot;;IF([.M38]=&quot;SINGLE_SALE_LINKED&quot;;&quot;REQUIRE LINKED SALE ID AND NO ALLOCATION GROUP ID&quot;;IF([.M38]=&quot;MULTI_SALE_PENDING_ALLOCATION&quot;;&quot;REMOVE LINKED SALE ID OR CORRECT LINKAGE STATUS&quot;;IF([.M38]=&quot;ALLOCATED&quot;;&quot;REQUIRE ALLOCATION GROUP ID AND NO LINKED SALE ID&quot;;&quot;REVIEW LINKAGE EVIDENCE — NO AUTHORITY CREATED&quot;)))))))">
            <text:p>NO ACTION — linkage status is UNKNOWN / not asserted</text:p>
          </table:table-cell>
          <table:table-cell office:value-type="string" table:formula="of:=IF([.S38]=&quot;CONTRADICTION&quot;;&quot;BLOCKED&quot;;IF([.S38]=&quot;UNKNOWN&quot;;&quot;UNKNOWN&quot;;IF([.S38]=&quot;CLEAR&quot;;IF(OR([.O38]=&quot;&quot;;[.P38]=&quot;&quot;);&quot;UNKNOWN&quot;;&quot;READY FOR REVIEW&quot;);&quot;BLOCKED&quot;)))">
            <text:p>UNKNOWN</text:p>
          </table:table-cell>
          <table:table-cell office:value-type="string" table:formula="of:=IF([.U38]=&quot;UNKNOWN&quot;;&quot;COMPLETE OR ASSERT REQUIRED EVIDENCE BEFORE REVIEW&quot;;IF([.U38]=&quot;BLOCKED&quot;;&quot;RESOLVE CONTRADICTION BEFORE REVIEW — NO AUTHORITY CREATED&quot;;IF([.U3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8]=&quot;READY FOR REVIEW&quot;;&quot;REVIEW ELIGIBLE — NO AUTHORITY&quot;;IF(OR([.U38]=&quot;UNKNOWN&quot;;[.U38]=&quot;BLOCKED&quot;);&quot;NOT REVIEW ELIGIBLE&quot;;&quot;NOT REVIEW ELIGIBLE&quot;))">
            <text:p>NOT REVIEW ELIGIBLE</text:p>
          </table:table-cell>
          <table:table-cell office:value-type="string" table:formula="of:=IF([.W38]=&quot;NOT REVIEW ELIGIBLE&quot;;&quot;DO NOT BEGIN SETTLEMENT REVIEW — RESOLVE READINESS OR CONTRADICTION CONDITIONS&quot;;IF([.W3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8]=&quot;&quot;;&quot;UNKNOWN&quot;;IF([.W38]&lt;&gt;&quot;REVIEW ELIGIBLE — NO AUTHORITY&quot;;&quot;BLOCKED — OUTCOME ASSERTED WITHOUT REVIEW ELIGIBILITY&quot;;IF(OR([.Y38]=&quot;REVIEWED — NO AUTHORITY&quot;;[.Y38]=&quot;REVIEW DEFERRED&quot;;[.Y3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39]=&quot;&quot;;IF(AND([.L39]=&quot;&quot;;[.N39]=&quot;&quot;);&quot;UNKNOWN&quot;;&quot;CONTRADICTION&quot;);IF([.M39]=&quot;UNMATCHED&quot;;IF(AND([.L39]=&quot;&quot;;[.N39]=&quot;&quot;);&quot;CLEAR&quot;;&quot;CONTRADICTION&quot;);IF([.M39]=&quot;SINGLE_SALE_LINKED&quot;;IF(AND([.L39]&lt;&gt;&quot;&quot;;[.N39]=&quot;&quot;);&quot;CLEAR&quot;;&quot;CONTRADICTION&quot;);IF([.M39]=&quot;MULTI_SALE_PENDING_ALLOCATION&quot;;IF([.L39]=&quot;&quot;;&quot;CLEAR&quot;;&quot;CONTRADICTION&quot;);IF([.M39]=&quot;ALLOCATED&quot;;IF(AND([.L39]=&quot;&quot;;[.N39]&lt;&gt;&quot;&quot;);&quot;CLEAR&quot;;&quot;CONTRADICTION&quot;);&quot;CONTRADICTION&quot;)))))">
            <text:p>UNKNOWN</text:p>
          </table:table-cell>
          <table:table-cell office:value-type="string" table:formula="of:=IF([.S39]=&quot;UNKNOWN&quot;;&quot;NO ACTION — linkage status is UNKNOWN / not asserted&quot;;IF([.S39]=&quot;CLEAR&quot;;&quot;NO CONTRADICTION — preserve evidence as entered&quot;;IF([.M39]=&quot;&quot;;&quot;REVIEW LINKAGE STATUS — identifiers are present while status is UNKNOWN&quot;;IF([.M39]=&quot;UNMATCHED&quot;;&quot;REMOVE LINKAGE IDENTIFIERS OR CORRECT LINKAGE STATUS&quot;;IF([.M39]=&quot;SINGLE_SALE_LINKED&quot;;&quot;REQUIRE LINKED SALE ID AND NO ALLOCATION GROUP ID&quot;;IF([.M39]=&quot;MULTI_SALE_PENDING_ALLOCATION&quot;;&quot;REMOVE LINKED SALE ID OR CORRECT LINKAGE STATUS&quot;;IF([.M39]=&quot;ALLOCATED&quot;;&quot;REQUIRE ALLOCATION GROUP ID AND NO LINKED SALE ID&quot;;&quot;REVIEW LINKAGE EVIDENCE — NO AUTHORITY CREATED&quot;)))))))">
            <text:p>NO ACTION — linkage status is UNKNOWN / not asserted</text:p>
          </table:table-cell>
          <table:table-cell office:value-type="string" table:formula="of:=IF([.S39]=&quot;CONTRADICTION&quot;;&quot;BLOCKED&quot;;IF([.S39]=&quot;UNKNOWN&quot;;&quot;UNKNOWN&quot;;IF([.S39]=&quot;CLEAR&quot;;IF(OR([.O39]=&quot;&quot;;[.P39]=&quot;&quot;);&quot;UNKNOWN&quot;;&quot;READY FOR REVIEW&quot;);&quot;BLOCKED&quot;)))">
            <text:p>UNKNOWN</text:p>
          </table:table-cell>
          <table:table-cell office:value-type="string" table:formula="of:=IF([.U39]=&quot;UNKNOWN&quot;;&quot;COMPLETE OR ASSERT REQUIRED EVIDENCE BEFORE REVIEW&quot;;IF([.U39]=&quot;BLOCKED&quot;;&quot;RESOLVE CONTRADICTION BEFORE REVIEW — NO AUTHORITY CREATED&quot;;IF([.U3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39]=&quot;READY FOR REVIEW&quot;;&quot;REVIEW ELIGIBLE — NO AUTHORITY&quot;;IF(OR([.U39]=&quot;UNKNOWN&quot;;[.U39]=&quot;BLOCKED&quot;);&quot;NOT REVIEW ELIGIBLE&quot;;&quot;NOT REVIEW ELIGIBLE&quot;))">
            <text:p>NOT REVIEW ELIGIBLE</text:p>
          </table:table-cell>
          <table:table-cell office:value-type="string" table:formula="of:=IF([.W39]=&quot;NOT REVIEW ELIGIBLE&quot;;&quot;DO NOT BEGIN SETTLEMENT REVIEW — RESOLVE READINESS OR CONTRADICTION CONDITIONS&quot;;IF([.W3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39]=&quot;&quot;;&quot;UNKNOWN&quot;;IF([.W39]&lt;&gt;&quot;REVIEW ELIGIBLE — NO AUTHORITY&quot;;&quot;BLOCKED — OUTCOME ASSERTED WITHOUT REVIEW ELIGIBILITY&quot;;IF(OR([.Y39]=&quot;REVIEWED — NO AUTHORITY&quot;;[.Y39]=&quot;REVIEW DEFERRED&quot;;[.Y3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0]=&quot;&quot;;IF(AND([.L40]=&quot;&quot;;[.N40]=&quot;&quot;);&quot;UNKNOWN&quot;;&quot;CONTRADICTION&quot;);IF([.M40]=&quot;UNMATCHED&quot;;IF(AND([.L40]=&quot;&quot;;[.N40]=&quot;&quot;);&quot;CLEAR&quot;;&quot;CONTRADICTION&quot;);IF([.M40]=&quot;SINGLE_SALE_LINKED&quot;;IF(AND([.L40]&lt;&gt;&quot;&quot;;[.N40]=&quot;&quot;);&quot;CLEAR&quot;;&quot;CONTRADICTION&quot;);IF([.M40]=&quot;MULTI_SALE_PENDING_ALLOCATION&quot;;IF([.L40]=&quot;&quot;;&quot;CLEAR&quot;;&quot;CONTRADICTION&quot;);IF([.M40]=&quot;ALLOCATED&quot;;IF(AND([.L40]=&quot;&quot;;[.N40]&lt;&gt;&quot;&quot;);&quot;CLEAR&quot;;&quot;CONTRADICTION&quot;);&quot;CONTRADICTION&quot;)))))">
            <text:p>UNKNOWN</text:p>
          </table:table-cell>
          <table:table-cell office:value-type="string" table:formula="of:=IF([.S40]=&quot;UNKNOWN&quot;;&quot;NO ACTION — linkage status is UNKNOWN / not asserted&quot;;IF([.S40]=&quot;CLEAR&quot;;&quot;NO CONTRADICTION — preserve evidence as entered&quot;;IF([.M40]=&quot;&quot;;&quot;REVIEW LINKAGE STATUS — identifiers are present while status is UNKNOWN&quot;;IF([.M40]=&quot;UNMATCHED&quot;;&quot;REMOVE LINKAGE IDENTIFIERS OR CORRECT LINKAGE STATUS&quot;;IF([.M40]=&quot;SINGLE_SALE_LINKED&quot;;&quot;REQUIRE LINKED SALE ID AND NO ALLOCATION GROUP ID&quot;;IF([.M40]=&quot;MULTI_SALE_PENDING_ALLOCATION&quot;;&quot;REMOVE LINKED SALE ID OR CORRECT LINKAGE STATUS&quot;;IF([.M40]=&quot;ALLOCATED&quot;;&quot;REQUIRE ALLOCATION GROUP ID AND NO LINKED SALE ID&quot;;&quot;REVIEW LINKAGE EVIDENCE — NO AUTHORITY CREATED&quot;)))))))">
            <text:p>NO ACTION — linkage status is UNKNOWN / not asserted</text:p>
          </table:table-cell>
          <table:table-cell office:value-type="string" table:formula="of:=IF([.S40]=&quot;CONTRADICTION&quot;;&quot;BLOCKED&quot;;IF([.S40]=&quot;UNKNOWN&quot;;&quot;UNKNOWN&quot;;IF([.S40]=&quot;CLEAR&quot;;IF(OR([.O40]=&quot;&quot;;[.P40]=&quot;&quot;);&quot;UNKNOWN&quot;;&quot;READY FOR REVIEW&quot;);&quot;BLOCKED&quot;)))">
            <text:p>UNKNOWN</text:p>
          </table:table-cell>
          <table:table-cell office:value-type="string" table:formula="of:=IF([.U40]=&quot;UNKNOWN&quot;;&quot;COMPLETE OR ASSERT REQUIRED EVIDENCE BEFORE REVIEW&quot;;IF([.U40]=&quot;BLOCKED&quot;;&quot;RESOLVE CONTRADICTION BEFORE REVIEW — NO AUTHORITY CREATED&quot;;IF([.U4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0]=&quot;READY FOR REVIEW&quot;;&quot;REVIEW ELIGIBLE — NO AUTHORITY&quot;;IF(OR([.U40]=&quot;UNKNOWN&quot;;[.U40]=&quot;BLOCKED&quot;);&quot;NOT REVIEW ELIGIBLE&quot;;&quot;NOT REVIEW ELIGIBLE&quot;))">
            <text:p>NOT REVIEW ELIGIBLE</text:p>
          </table:table-cell>
          <table:table-cell office:value-type="string" table:formula="of:=IF([.W40]=&quot;NOT REVIEW ELIGIBLE&quot;;&quot;DO NOT BEGIN SETTLEMENT REVIEW — RESOLVE READINESS OR CONTRADICTION CONDITIONS&quot;;IF([.W4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0]=&quot;&quot;;&quot;UNKNOWN&quot;;IF([.W40]&lt;&gt;&quot;REVIEW ELIGIBLE — NO AUTHORITY&quot;;&quot;BLOCKED — OUTCOME ASSERTED WITHOUT REVIEW ELIGIBILITY&quot;;IF(OR([.Y40]=&quot;REVIEWED — NO AUTHORITY&quot;;[.Y40]=&quot;REVIEW DEFERRED&quot;;[.Y4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1]=&quot;&quot;;IF(AND([.L41]=&quot;&quot;;[.N41]=&quot;&quot;);&quot;UNKNOWN&quot;;&quot;CONTRADICTION&quot;);IF([.M41]=&quot;UNMATCHED&quot;;IF(AND([.L41]=&quot;&quot;;[.N41]=&quot;&quot;);&quot;CLEAR&quot;;&quot;CONTRADICTION&quot;);IF([.M41]=&quot;SINGLE_SALE_LINKED&quot;;IF(AND([.L41]&lt;&gt;&quot;&quot;;[.N41]=&quot;&quot;);&quot;CLEAR&quot;;&quot;CONTRADICTION&quot;);IF([.M41]=&quot;MULTI_SALE_PENDING_ALLOCATION&quot;;IF([.L41]=&quot;&quot;;&quot;CLEAR&quot;;&quot;CONTRADICTION&quot;);IF([.M41]=&quot;ALLOCATED&quot;;IF(AND([.L41]=&quot;&quot;;[.N41]&lt;&gt;&quot;&quot;);&quot;CLEAR&quot;;&quot;CONTRADICTION&quot;);&quot;CONTRADICTION&quot;)))))">
            <text:p>UNKNOWN</text:p>
          </table:table-cell>
          <table:table-cell office:value-type="string" table:formula="of:=IF([.S41]=&quot;UNKNOWN&quot;;&quot;NO ACTION — linkage status is UNKNOWN / not asserted&quot;;IF([.S41]=&quot;CLEAR&quot;;&quot;NO CONTRADICTION — preserve evidence as entered&quot;;IF([.M41]=&quot;&quot;;&quot;REVIEW LINKAGE STATUS — identifiers are present while status is UNKNOWN&quot;;IF([.M41]=&quot;UNMATCHED&quot;;&quot;REMOVE LINKAGE IDENTIFIERS OR CORRECT LINKAGE STATUS&quot;;IF([.M41]=&quot;SINGLE_SALE_LINKED&quot;;&quot;REQUIRE LINKED SALE ID AND NO ALLOCATION GROUP ID&quot;;IF([.M41]=&quot;MULTI_SALE_PENDING_ALLOCATION&quot;;&quot;REMOVE LINKED SALE ID OR CORRECT LINKAGE STATUS&quot;;IF([.M41]=&quot;ALLOCATED&quot;;&quot;REQUIRE ALLOCATION GROUP ID AND NO LINKED SALE ID&quot;;&quot;REVIEW LINKAGE EVIDENCE — NO AUTHORITY CREATED&quot;)))))))">
            <text:p>NO ACTION — linkage status is UNKNOWN / not asserted</text:p>
          </table:table-cell>
          <table:table-cell office:value-type="string" table:formula="of:=IF([.S41]=&quot;CONTRADICTION&quot;;&quot;BLOCKED&quot;;IF([.S41]=&quot;UNKNOWN&quot;;&quot;UNKNOWN&quot;;IF([.S41]=&quot;CLEAR&quot;;IF(OR([.O41]=&quot;&quot;;[.P41]=&quot;&quot;);&quot;UNKNOWN&quot;;&quot;READY FOR REVIEW&quot;);&quot;BLOCKED&quot;)))">
            <text:p>UNKNOWN</text:p>
          </table:table-cell>
          <table:table-cell office:value-type="string" table:formula="of:=IF([.U41]=&quot;UNKNOWN&quot;;&quot;COMPLETE OR ASSERT REQUIRED EVIDENCE BEFORE REVIEW&quot;;IF([.U41]=&quot;BLOCKED&quot;;&quot;RESOLVE CONTRADICTION BEFORE REVIEW — NO AUTHORITY CREATED&quot;;IF([.U4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1]=&quot;READY FOR REVIEW&quot;;&quot;REVIEW ELIGIBLE — NO AUTHORITY&quot;;IF(OR([.U41]=&quot;UNKNOWN&quot;;[.U41]=&quot;BLOCKED&quot;);&quot;NOT REVIEW ELIGIBLE&quot;;&quot;NOT REVIEW ELIGIBLE&quot;))">
            <text:p>NOT REVIEW ELIGIBLE</text:p>
          </table:table-cell>
          <table:table-cell office:value-type="string" table:formula="of:=IF([.W41]=&quot;NOT REVIEW ELIGIBLE&quot;;&quot;DO NOT BEGIN SETTLEMENT REVIEW — RESOLVE READINESS OR CONTRADICTION CONDITIONS&quot;;IF([.W4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1]=&quot;&quot;;&quot;UNKNOWN&quot;;IF([.W41]&lt;&gt;&quot;REVIEW ELIGIBLE — NO AUTHORITY&quot;;&quot;BLOCKED — OUTCOME ASSERTED WITHOUT REVIEW ELIGIBILITY&quot;;IF(OR([.Y41]=&quot;REVIEWED — NO AUTHORITY&quot;;[.Y41]=&quot;REVIEW DEFERRED&quot;;[.Y41]=&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2]=&quot;&quot;;IF(AND([.L42]=&quot;&quot;;[.N42]=&quot;&quot;);&quot;UNKNOWN&quot;;&quot;CONTRADICTION&quot;);IF([.M42]=&quot;UNMATCHED&quot;;IF(AND([.L42]=&quot;&quot;;[.N42]=&quot;&quot;);&quot;CLEAR&quot;;&quot;CONTRADICTION&quot;);IF([.M42]=&quot;SINGLE_SALE_LINKED&quot;;IF(AND([.L42]&lt;&gt;&quot;&quot;;[.N42]=&quot;&quot;);&quot;CLEAR&quot;;&quot;CONTRADICTION&quot;);IF([.M42]=&quot;MULTI_SALE_PENDING_ALLOCATION&quot;;IF([.L42]=&quot;&quot;;&quot;CLEAR&quot;;&quot;CONTRADICTION&quot;);IF([.M42]=&quot;ALLOCATED&quot;;IF(AND([.L42]=&quot;&quot;;[.N42]&lt;&gt;&quot;&quot;);&quot;CLEAR&quot;;&quot;CONTRADICTION&quot;);&quot;CONTRADICTION&quot;)))))">
            <text:p>UNKNOWN</text:p>
          </table:table-cell>
          <table:table-cell office:value-type="string" table:formula="of:=IF([.S42]=&quot;UNKNOWN&quot;;&quot;NO ACTION — linkage status is UNKNOWN / not asserted&quot;;IF([.S42]=&quot;CLEAR&quot;;&quot;NO CONTRADICTION — preserve evidence as entered&quot;;IF([.M42]=&quot;&quot;;&quot;REVIEW LINKAGE STATUS — identifiers are present while status is UNKNOWN&quot;;IF([.M42]=&quot;UNMATCHED&quot;;&quot;REMOVE LINKAGE IDENTIFIERS OR CORRECT LINKAGE STATUS&quot;;IF([.M42]=&quot;SINGLE_SALE_LINKED&quot;;&quot;REQUIRE LINKED SALE ID AND NO ALLOCATION GROUP ID&quot;;IF([.M42]=&quot;MULTI_SALE_PENDING_ALLOCATION&quot;;&quot;REMOVE LINKED SALE ID OR CORRECT LINKAGE STATUS&quot;;IF([.M42]=&quot;ALLOCATED&quot;;&quot;REQUIRE ALLOCATION GROUP ID AND NO LINKED SALE ID&quot;;&quot;REVIEW LINKAGE EVIDENCE — NO AUTHORITY CREATED&quot;)))))))">
            <text:p>NO ACTION — linkage status is UNKNOWN / not asserted</text:p>
          </table:table-cell>
          <table:table-cell office:value-type="string" table:formula="of:=IF([.S42]=&quot;CONTRADICTION&quot;;&quot;BLOCKED&quot;;IF([.S42]=&quot;UNKNOWN&quot;;&quot;UNKNOWN&quot;;IF([.S42]=&quot;CLEAR&quot;;IF(OR([.O42]=&quot;&quot;;[.P42]=&quot;&quot;);&quot;UNKNOWN&quot;;&quot;READY FOR REVIEW&quot;);&quot;BLOCKED&quot;)))">
            <text:p>UNKNOWN</text:p>
          </table:table-cell>
          <table:table-cell office:value-type="string" table:formula="of:=IF([.U42]=&quot;UNKNOWN&quot;;&quot;COMPLETE OR ASSERT REQUIRED EVIDENCE BEFORE REVIEW&quot;;IF([.U42]=&quot;BLOCKED&quot;;&quot;RESOLVE CONTRADICTION BEFORE REVIEW — NO AUTHORITY CREATED&quot;;IF([.U4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2]=&quot;READY FOR REVIEW&quot;;&quot;REVIEW ELIGIBLE — NO AUTHORITY&quot;;IF(OR([.U42]=&quot;UNKNOWN&quot;;[.U42]=&quot;BLOCKED&quot;);&quot;NOT REVIEW ELIGIBLE&quot;;&quot;NOT REVIEW ELIGIBLE&quot;))">
            <text:p>NOT REVIEW ELIGIBLE</text:p>
          </table:table-cell>
          <table:table-cell office:value-type="string" table:formula="of:=IF([.W42]=&quot;NOT REVIEW ELIGIBLE&quot;;&quot;DO NOT BEGIN SETTLEMENT REVIEW — RESOLVE READINESS OR CONTRADICTION CONDITIONS&quot;;IF([.W4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2]=&quot;&quot;;&quot;UNKNOWN&quot;;IF([.W42]&lt;&gt;&quot;REVIEW ELIGIBLE — NO AUTHORITY&quot;;&quot;BLOCKED — OUTCOME ASSERTED WITHOUT REVIEW ELIGIBILITY&quot;;IF(OR([.Y42]=&quot;REVIEWED — NO AUTHORITY&quot;;[.Y42]=&quot;REVIEW DEFERRED&quot;;[.Y4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3]=&quot;&quot;;IF(AND([.L43]=&quot;&quot;;[.N43]=&quot;&quot;);&quot;UNKNOWN&quot;;&quot;CONTRADICTION&quot;);IF([.M43]=&quot;UNMATCHED&quot;;IF(AND([.L43]=&quot;&quot;;[.N43]=&quot;&quot;);&quot;CLEAR&quot;;&quot;CONTRADICTION&quot;);IF([.M43]=&quot;SINGLE_SALE_LINKED&quot;;IF(AND([.L43]&lt;&gt;&quot;&quot;;[.N43]=&quot;&quot;);&quot;CLEAR&quot;;&quot;CONTRADICTION&quot;);IF([.M43]=&quot;MULTI_SALE_PENDING_ALLOCATION&quot;;IF([.L43]=&quot;&quot;;&quot;CLEAR&quot;;&quot;CONTRADICTION&quot;);IF([.M43]=&quot;ALLOCATED&quot;;IF(AND([.L43]=&quot;&quot;;[.N43]&lt;&gt;&quot;&quot;);&quot;CLEAR&quot;;&quot;CONTRADICTION&quot;);&quot;CONTRADICTION&quot;)))))">
            <text:p>UNKNOWN</text:p>
          </table:table-cell>
          <table:table-cell office:value-type="string" table:formula="of:=IF([.S43]=&quot;UNKNOWN&quot;;&quot;NO ACTION — linkage status is UNKNOWN / not asserted&quot;;IF([.S43]=&quot;CLEAR&quot;;&quot;NO CONTRADICTION — preserve evidence as entered&quot;;IF([.M43]=&quot;&quot;;&quot;REVIEW LINKAGE STATUS — identifiers are present while status is UNKNOWN&quot;;IF([.M43]=&quot;UNMATCHED&quot;;&quot;REMOVE LINKAGE IDENTIFIERS OR CORRECT LINKAGE STATUS&quot;;IF([.M43]=&quot;SINGLE_SALE_LINKED&quot;;&quot;REQUIRE LINKED SALE ID AND NO ALLOCATION GROUP ID&quot;;IF([.M43]=&quot;MULTI_SALE_PENDING_ALLOCATION&quot;;&quot;REMOVE LINKED SALE ID OR CORRECT LINKAGE STATUS&quot;;IF([.M43]=&quot;ALLOCATED&quot;;&quot;REQUIRE ALLOCATION GROUP ID AND NO LINKED SALE ID&quot;;&quot;REVIEW LINKAGE EVIDENCE — NO AUTHORITY CREATED&quot;)))))))">
            <text:p>NO ACTION — linkage status is UNKNOWN / not asserted</text:p>
          </table:table-cell>
          <table:table-cell office:value-type="string" table:formula="of:=IF([.S43]=&quot;CONTRADICTION&quot;;&quot;BLOCKED&quot;;IF([.S43]=&quot;UNKNOWN&quot;;&quot;UNKNOWN&quot;;IF([.S43]=&quot;CLEAR&quot;;IF(OR([.O43]=&quot;&quot;;[.P43]=&quot;&quot;);&quot;UNKNOWN&quot;;&quot;READY FOR REVIEW&quot;);&quot;BLOCKED&quot;)))">
            <text:p>UNKNOWN</text:p>
          </table:table-cell>
          <table:table-cell office:value-type="string" table:formula="of:=IF([.U43]=&quot;UNKNOWN&quot;;&quot;COMPLETE OR ASSERT REQUIRED EVIDENCE BEFORE REVIEW&quot;;IF([.U43]=&quot;BLOCKED&quot;;&quot;RESOLVE CONTRADICTION BEFORE REVIEW — NO AUTHORITY CREATED&quot;;IF([.U4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3]=&quot;READY FOR REVIEW&quot;;&quot;REVIEW ELIGIBLE — NO AUTHORITY&quot;;IF(OR([.U43]=&quot;UNKNOWN&quot;;[.U43]=&quot;BLOCKED&quot;);&quot;NOT REVIEW ELIGIBLE&quot;;&quot;NOT REVIEW ELIGIBLE&quot;))">
            <text:p>NOT REVIEW ELIGIBLE</text:p>
          </table:table-cell>
          <table:table-cell office:value-type="string" table:formula="of:=IF([.W43]=&quot;NOT REVIEW ELIGIBLE&quot;;&quot;DO NOT BEGIN SETTLEMENT REVIEW — RESOLVE READINESS OR CONTRADICTION CONDITIONS&quot;;IF([.W4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3]=&quot;&quot;;&quot;UNKNOWN&quot;;IF([.W43]&lt;&gt;&quot;REVIEW ELIGIBLE — NO AUTHORITY&quot;;&quot;BLOCKED — OUTCOME ASSERTED WITHOUT REVIEW ELIGIBILITY&quot;;IF(OR([.Y43]=&quot;REVIEWED — NO AUTHORITY&quot;;[.Y43]=&quot;REVIEW DEFERRED&quot;;[.Y4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4]=&quot;&quot;;IF(AND([.L44]=&quot;&quot;;[.N44]=&quot;&quot;);&quot;UNKNOWN&quot;;&quot;CONTRADICTION&quot;);IF([.M44]=&quot;UNMATCHED&quot;;IF(AND([.L44]=&quot;&quot;;[.N44]=&quot;&quot;);&quot;CLEAR&quot;;&quot;CONTRADICTION&quot;);IF([.M44]=&quot;SINGLE_SALE_LINKED&quot;;IF(AND([.L44]&lt;&gt;&quot;&quot;;[.N44]=&quot;&quot;);&quot;CLEAR&quot;;&quot;CONTRADICTION&quot;);IF([.M44]=&quot;MULTI_SALE_PENDING_ALLOCATION&quot;;IF([.L44]=&quot;&quot;;&quot;CLEAR&quot;;&quot;CONTRADICTION&quot;);IF([.M44]=&quot;ALLOCATED&quot;;IF(AND([.L44]=&quot;&quot;;[.N44]&lt;&gt;&quot;&quot;);&quot;CLEAR&quot;;&quot;CONTRADICTION&quot;);&quot;CONTRADICTION&quot;)))))">
            <text:p>UNKNOWN</text:p>
          </table:table-cell>
          <table:table-cell office:value-type="string" table:formula="of:=IF([.S44]=&quot;UNKNOWN&quot;;&quot;NO ACTION — linkage status is UNKNOWN / not asserted&quot;;IF([.S44]=&quot;CLEAR&quot;;&quot;NO CONTRADICTION — preserve evidence as entered&quot;;IF([.M44]=&quot;&quot;;&quot;REVIEW LINKAGE STATUS — identifiers are present while status is UNKNOWN&quot;;IF([.M44]=&quot;UNMATCHED&quot;;&quot;REMOVE LINKAGE IDENTIFIERS OR CORRECT LINKAGE STATUS&quot;;IF([.M44]=&quot;SINGLE_SALE_LINKED&quot;;&quot;REQUIRE LINKED SALE ID AND NO ALLOCATION GROUP ID&quot;;IF([.M44]=&quot;MULTI_SALE_PENDING_ALLOCATION&quot;;&quot;REMOVE LINKED SALE ID OR CORRECT LINKAGE STATUS&quot;;IF([.M44]=&quot;ALLOCATED&quot;;&quot;REQUIRE ALLOCATION GROUP ID AND NO LINKED SALE ID&quot;;&quot;REVIEW LINKAGE EVIDENCE — NO AUTHORITY CREATED&quot;)))))))">
            <text:p>NO ACTION — linkage status is UNKNOWN / not asserted</text:p>
          </table:table-cell>
          <table:table-cell office:value-type="string" table:formula="of:=IF([.S44]=&quot;CONTRADICTION&quot;;&quot;BLOCKED&quot;;IF([.S44]=&quot;UNKNOWN&quot;;&quot;UNKNOWN&quot;;IF([.S44]=&quot;CLEAR&quot;;IF(OR([.O44]=&quot;&quot;;[.P44]=&quot;&quot;);&quot;UNKNOWN&quot;;&quot;READY FOR REVIEW&quot;);&quot;BLOCKED&quot;)))">
            <text:p>UNKNOWN</text:p>
          </table:table-cell>
          <table:table-cell office:value-type="string" table:formula="of:=IF([.U44]=&quot;UNKNOWN&quot;;&quot;COMPLETE OR ASSERT REQUIRED EVIDENCE BEFORE REVIEW&quot;;IF([.U44]=&quot;BLOCKED&quot;;&quot;RESOLVE CONTRADICTION BEFORE REVIEW — NO AUTHORITY CREATED&quot;;IF([.U4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4]=&quot;READY FOR REVIEW&quot;;&quot;REVIEW ELIGIBLE — NO AUTHORITY&quot;;IF(OR([.U44]=&quot;UNKNOWN&quot;;[.U44]=&quot;BLOCKED&quot;);&quot;NOT REVIEW ELIGIBLE&quot;;&quot;NOT REVIEW ELIGIBLE&quot;))">
            <text:p>NOT REVIEW ELIGIBLE</text:p>
          </table:table-cell>
          <table:table-cell office:value-type="string" table:formula="of:=IF([.W44]=&quot;NOT REVIEW ELIGIBLE&quot;;&quot;DO NOT BEGIN SETTLEMENT REVIEW — RESOLVE READINESS OR CONTRADICTION CONDITIONS&quot;;IF([.W4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4]=&quot;&quot;;&quot;UNKNOWN&quot;;IF([.W44]&lt;&gt;&quot;REVIEW ELIGIBLE — NO AUTHORITY&quot;;&quot;BLOCKED — OUTCOME ASSERTED WITHOUT REVIEW ELIGIBILITY&quot;;IF(OR([.Y44]=&quot;REVIEWED — NO AUTHORITY&quot;;[.Y44]=&quot;REVIEW DEFERRED&quot;;[.Y4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5]=&quot;&quot;;IF(AND([.L45]=&quot;&quot;;[.N45]=&quot;&quot;);&quot;UNKNOWN&quot;;&quot;CONTRADICTION&quot;);IF([.M45]=&quot;UNMATCHED&quot;;IF(AND([.L45]=&quot;&quot;;[.N45]=&quot;&quot;);&quot;CLEAR&quot;;&quot;CONTRADICTION&quot;);IF([.M45]=&quot;SINGLE_SALE_LINKED&quot;;IF(AND([.L45]&lt;&gt;&quot;&quot;;[.N45]=&quot;&quot;);&quot;CLEAR&quot;;&quot;CONTRADICTION&quot;);IF([.M45]=&quot;MULTI_SALE_PENDING_ALLOCATION&quot;;IF([.L45]=&quot;&quot;;&quot;CLEAR&quot;;&quot;CONTRADICTION&quot;);IF([.M45]=&quot;ALLOCATED&quot;;IF(AND([.L45]=&quot;&quot;;[.N45]&lt;&gt;&quot;&quot;);&quot;CLEAR&quot;;&quot;CONTRADICTION&quot;);&quot;CONTRADICTION&quot;)))))">
            <text:p>UNKNOWN</text:p>
          </table:table-cell>
          <table:table-cell office:value-type="string" table:formula="of:=IF([.S45]=&quot;UNKNOWN&quot;;&quot;NO ACTION — linkage status is UNKNOWN / not asserted&quot;;IF([.S45]=&quot;CLEAR&quot;;&quot;NO CONTRADICTION — preserve evidence as entered&quot;;IF([.M45]=&quot;&quot;;&quot;REVIEW LINKAGE STATUS — identifiers are present while status is UNKNOWN&quot;;IF([.M45]=&quot;UNMATCHED&quot;;&quot;REMOVE LINKAGE IDENTIFIERS OR CORRECT LINKAGE STATUS&quot;;IF([.M45]=&quot;SINGLE_SALE_LINKED&quot;;&quot;REQUIRE LINKED SALE ID AND NO ALLOCATION GROUP ID&quot;;IF([.M45]=&quot;MULTI_SALE_PENDING_ALLOCATION&quot;;&quot;REMOVE LINKED SALE ID OR CORRECT LINKAGE STATUS&quot;;IF([.M45]=&quot;ALLOCATED&quot;;&quot;REQUIRE ALLOCATION GROUP ID AND NO LINKED SALE ID&quot;;&quot;REVIEW LINKAGE EVIDENCE — NO AUTHORITY CREATED&quot;)))))))">
            <text:p>NO ACTION — linkage status is UNKNOWN / not asserted</text:p>
          </table:table-cell>
          <table:table-cell office:value-type="string" table:formula="of:=IF([.S45]=&quot;CONTRADICTION&quot;;&quot;BLOCKED&quot;;IF([.S45]=&quot;UNKNOWN&quot;;&quot;UNKNOWN&quot;;IF([.S45]=&quot;CLEAR&quot;;IF(OR([.O45]=&quot;&quot;;[.P45]=&quot;&quot;);&quot;UNKNOWN&quot;;&quot;READY FOR REVIEW&quot;);&quot;BLOCKED&quot;)))">
            <text:p>UNKNOWN</text:p>
          </table:table-cell>
          <table:table-cell office:value-type="string" table:formula="of:=IF([.U45]=&quot;UNKNOWN&quot;;&quot;COMPLETE OR ASSERT REQUIRED EVIDENCE BEFORE REVIEW&quot;;IF([.U45]=&quot;BLOCKED&quot;;&quot;RESOLVE CONTRADICTION BEFORE REVIEW — NO AUTHORITY CREATED&quot;;IF([.U4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5]=&quot;READY FOR REVIEW&quot;;&quot;REVIEW ELIGIBLE — NO AUTHORITY&quot;;IF(OR([.U45]=&quot;UNKNOWN&quot;;[.U45]=&quot;BLOCKED&quot;);&quot;NOT REVIEW ELIGIBLE&quot;;&quot;NOT REVIEW ELIGIBLE&quot;))">
            <text:p>NOT REVIEW ELIGIBLE</text:p>
          </table:table-cell>
          <table:table-cell office:value-type="string" table:formula="of:=IF([.W45]=&quot;NOT REVIEW ELIGIBLE&quot;;&quot;DO NOT BEGIN SETTLEMENT REVIEW — RESOLVE READINESS OR CONTRADICTION CONDITIONS&quot;;IF([.W4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5]=&quot;&quot;;&quot;UNKNOWN&quot;;IF([.W45]&lt;&gt;&quot;REVIEW ELIGIBLE — NO AUTHORITY&quot;;&quot;BLOCKED — OUTCOME ASSERTED WITHOUT REVIEW ELIGIBILITY&quot;;IF(OR([.Y45]=&quot;REVIEWED — NO AUTHORITY&quot;;[.Y45]=&quot;REVIEW DEFERRED&quot;;[.Y4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6]=&quot;&quot;;IF(AND([.L46]=&quot;&quot;;[.N46]=&quot;&quot;);&quot;UNKNOWN&quot;;&quot;CONTRADICTION&quot;);IF([.M46]=&quot;UNMATCHED&quot;;IF(AND([.L46]=&quot;&quot;;[.N46]=&quot;&quot;);&quot;CLEAR&quot;;&quot;CONTRADICTION&quot;);IF([.M46]=&quot;SINGLE_SALE_LINKED&quot;;IF(AND([.L46]&lt;&gt;&quot;&quot;;[.N46]=&quot;&quot;);&quot;CLEAR&quot;;&quot;CONTRADICTION&quot;);IF([.M46]=&quot;MULTI_SALE_PENDING_ALLOCATION&quot;;IF([.L46]=&quot;&quot;;&quot;CLEAR&quot;;&quot;CONTRADICTION&quot;);IF([.M46]=&quot;ALLOCATED&quot;;IF(AND([.L46]=&quot;&quot;;[.N46]&lt;&gt;&quot;&quot;);&quot;CLEAR&quot;;&quot;CONTRADICTION&quot;);&quot;CONTRADICTION&quot;)))))">
            <text:p>UNKNOWN</text:p>
          </table:table-cell>
          <table:table-cell office:value-type="string" table:formula="of:=IF([.S46]=&quot;UNKNOWN&quot;;&quot;NO ACTION — linkage status is UNKNOWN / not asserted&quot;;IF([.S46]=&quot;CLEAR&quot;;&quot;NO CONTRADICTION — preserve evidence as entered&quot;;IF([.M46]=&quot;&quot;;&quot;REVIEW LINKAGE STATUS — identifiers are present while status is UNKNOWN&quot;;IF([.M46]=&quot;UNMATCHED&quot;;&quot;REMOVE LINKAGE IDENTIFIERS OR CORRECT LINKAGE STATUS&quot;;IF([.M46]=&quot;SINGLE_SALE_LINKED&quot;;&quot;REQUIRE LINKED SALE ID AND NO ALLOCATION GROUP ID&quot;;IF([.M46]=&quot;MULTI_SALE_PENDING_ALLOCATION&quot;;&quot;REMOVE LINKED SALE ID OR CORRECT LINKAGE STATUS&quot;;IF([.M46]=&quot;ALLOCATED&quot;;&quot;REQUIRE ALLOCATION GROUP ID AND NO LINKED SALE ID&quot;;&quot;REVIEW LINKAGE EVIDENCE — NO AUTHORITY CREATED&quot;)))))))">
            <text:p>NO ACTION — linkage status is UNKNOWN / not asserted</text:p>
          </table:table-cell>
          <table:table-cell office:value-type="string" table:formula="of:=IF([.S46]=&quot;CONTRADICTION&quot;;&quot;BLOCKED&quot;;IF([.S46]=&quot;UNKNOWN&quot;;&quot;UNKNOWN&quot;;IF([.S46]=&quot;CLEAR&quot;;IF(OR([.O46]=&quot;&quot;;[.P46]=&quot;&quot;);&quot;UNKNOWN&quot;;&quot;READY FOR REVIEW&quot;);&quot;BLOCKED&quot;)))">
            <text:p>UNKNOWN</text:p>
          </table:table-cell>
          <table:table-cell office:value-type="string" table:formula="of:=IF([.U46]=&quot;UNKNOWN&quot;;&quot;COMPLETE OR ASSERT REQUIRED EVIDENCE BEFORE REVIEW&quot;;IF([.U46]=&quot;BLOCKED&quot;;&quot;RESOLVE CONTRADICTION BEFORE REVIEW — NO AUTHORITY CREATED&quot;;IF([.U4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6]=&quot;READY FOR REVIEW&quot;;&quot;REVIEW ELIGIBLE — NO AUTHORITY&quot;;IF(OR([.U46]=&quot;UNKNOWN&quot;;[.U46]=&quot;BLOCKED&quot;);&quot;NOT REVIEW ELIGIBLE&quot;;&quot;NOT REVIEW ELIGIBLE&quot;))">
            <text:p>NOT REVIEW ELIGIBLE</text:p>
          </table:table-cell>
          <table:table-cell office:value-type="string" table:formula="of:=IF([.W46]=&quot;NOT REVIEW ELIGIBLE&quot;;&quot;DO NOT BEGIN SETTLEMENT REVIEW — RESOLVE READINESS OR CONTRADICTION CONDITIONS&quot;;IF([.W4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6]=&quot;&quot;;&quot;UNKNOWN&quot;;IF([.W46]&lt;&gt;&quot;REVIEW ELIGIBLE — NO AUTHORITY&quot;;&quot;BLOCKED — OUTCOME ASSERTED WITHOUT REVIEW ELIGIBILITY&quot;;IF(OR([.Y46]=&quot;REVIEWED — NO AUTHORITY&quot;;[.Y46]=&quot;REVIEW DEFERRED&quot;;[.Y4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7]=&quot;&quot;;IF(AND([.L47]=&quot;&quot;;[.N47]=&quot;&quot;);&quot;UNKNOWN&quot;;&quot;CONTRADICTION&quot;);IF([.M47]=&quot;UNMATCHED&quot;;IF(AND([.L47]=&quot;&quot;;[.N47]=&quot;&quot;);&quot;CLEAR&quot;;&quot;CONTRADICTION&quot;);IF([.M47]=&quot;SINGLE_SALE_LINKED&quot;;IF(AND([.L47]&lt;&gt;&quot;&quot;;[.N47]=&quot;&quot;);&quot;CLEAR&quot;;&quot;CONTRADICTION&quot;);IF([.M47]=&quot;MULTI_SALE_PENDING_ALLOCATION&quot;;IF([.L47]=&quot;&quot;;&quot;CLEAR&quot;;&quot;CONTRADICTION&quot;);IF([.M47]=&quot;ALLOCATED&quot;;IF(AND([.L47]=&quot;&quot;;[.N47]&lt;&gt;&quot;&quot;);&quot;CLEAR&quot;;&quot;CONTRADICTION&quot;);&quot;CONTRADICTION&quot;)))))">
            <text:p>UNKNOWN</text:p>
          </table:table-cell>
          <table:table-cell office:value-type="string" table:formula="of:=IF([.S47]=&quot;UNKNOWN&quot;;&quot;NO ACTION — linkage status is UNKNOWN / not asserted&quot;;IF([.S47]=&quot;CLEAR&quot;;&quot;NO CONTRADICTION — preserve evidence as entered&quot;;IF([.M47]=&quot;&quot;;&quot;REVIEW LINKAGE STATUS — identifiers are present while status is UNKNOWN&quot;;IF([.M47]=&quot;UNMATCHED&quot;;&quot;REMOVE LINKAGE IDENTIFIERS OR CORRECT LINKAGE STATUS&quot;;IF([.M47]=&quot;SINGLE_SALE_LINKED&quot;;&quot;REQUIRE LINKED SALE ID AND NO ALLOCATION GROUP ID&quot;;IF([.M47]=&quot;MULTI_SALE_PENDING_ALLOCATION&quot;;&quot;REMOVE LINKED SALE ID OR CORRECT LINKAGE STATUS&quot;;IF([.M47]=&quot;ALLOCATED&quot;;&quot;REQUIRE ALLOCATION GROUP ID AND NO LINKED SALE ID&quot;;&quot;REVIEW LINKAGE EVIDENCE — NO AUTHORITY CREATED&quot;)))))))">
            <text:p>NO ACTION — linkage status is UNKNOWN / not asserted</text:p>
          </table:table-cell>
          <table:table-cell office:value-type="string" table:formula="of:=IF([.S47]=&quot;CONTRADICTION&quot;;&quot;BLOCKED&quot;;IF([.S47]=&quot;UNKNOWN&quot;;&quot;UNKNOWN&quot;;IF([.S47]=&quot;CLEAR&quot;;IF(OR([.O47]=&quot;&quot;;[.P47]=&quot;&quot;);&quot;UNKNOWN&quot;;&quot;READY FOR REVIEW&quot;);&quot;BLOCKED&quot;)))">
            <text:p>UNKNOWN</text:p>
          </table:table-cell>
          <table:table-cell office:value-type="string" table:formula="of:=IF([.U47]=&quot;UNKNOWN&quot;;&quot;COMPLETE OR ASSERT REQUIRED EVIDENCE BEFORE REVIEW&quot;;IF([.U47]=&quot;BLOCKED&quot;;&quot;RESOLVE CONTRADICTION BEFORE REVIEW — NO AUTHORITY CREATED&quot;;IF([.U4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7]=&quot;READY FOR REVIEW&quot;;&quot;REVIEW ELIGIBLE — NO AUTHORITY&quot;;IF(OR([.U47]=&quot;UNKNOWN&quot;;[.U47]=&quot;BLOCKED&quot;);&quot;NOT REVIEW ELIGIBLE&quot;;&quot;NOT REVIEW ELIGIBLE&quot;))">
            <text:p>NOT REVIEW ELIGIBLE</text:p>
          </table:table-cell>
          <table:table-cell office:value-type="string" table:formula="of:=IF([.W47]=&quot;NOT REVIEW ELIGIBLE&quot;;&quot;DO NOT BEGIN SETTLEMENT REVIEW — RESOLVE READINESS OR CONTRADICTION CONDITIONS&quot;;IF([.W4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7]=&quot;&quot;;&quot;UNKNOWN&quot;;IF([.W47]&lt;&gt;&quot;REVIEW ELIGIBLE — NO AUTHORITY&quot;;&quot;BLOCKED — OUTCOME ASSERTED WITHOUT REVIEW ELIGIBILITY&quot;;IF(OR([.Y47]=&quot;REVIEWED — NO AUTHORITY&quot;;[.Y47]=&quot;REVIEW DEFERRED&quot;;[.Y4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8]=&quot;&quot;;IF(AND([.L48]=&quot;&quot;;[.N48]=&quot;&quot;);&quot;UNKNOWN&quot;;&quot;CONTRADICTION&quot;);IF([.M48]=&quot;UNMATCHED&quot;;IF(AND([.L48]=&quot;&quot;;[.N48]=&quot;&quot;);&quot;CLEAR&quot;;&quot;CONTRADICTION&quot;);IF([.M48]=&quot;SINGLE_SALE_LINKED&quot;;IF(AND([.L48]&lt;&gt;&quot;&quot;;[.N48]=&quot;&quot;);&quot;CLEAR&quot;;&quot;CONTRADICTION&quot;);IF([.M48]=&quot;MULTI_SALE_PENDING_ALLOCATION&quot;;IF([.L48]=&quot;&quot;;&quot;CLEAR&quot;;&quot;CONTRADICTION&quot;);IF([.M48]=&quot;ALLOCATED&quot;;IF(AND([.L48]=&quot;&quot;;[.N48]&lt;&gt;&quot;&quot;);&quot;CLEAR&quot;;&quot;CONTRADICTION&quot;);&quot;CONTRADICTION&quot;)))))">
            <text:p>UNKNOWN</text:p>
          </table:table-cell>
          <table:table-cell office:value-type="string" table:formula="of:=IF([.S48]=&quot;UNKNOWN&quot;;&quot;NO ACTION — linkage status is UNKNOWN / not asserted&quot;;IF([.S48]=&quot;CLEAR&quot;;&quot;NO CONTRADICTION — preserve evidence as entered&quot;;IF([.M48]=&quot;&quot;;&quot;REVIEW LINKAGE STATUS — identifiers are present while status is UNKNOWN&quot;;IF([.M48]=&quot;UNMATCHED&quot;;&quot;REMOVE LINKAGE IDENTIFIERS OR CORRECT LINKAGE STATUS&quot;;IF([.M48]=&quot;SINGLE_SALE_LINKED&quot;;&quot;REQUIRE LINKED SALE ID AND NO ALLOCATION GROUP ID&quot;;IF([.M48]=&quot;MULTI_SALE_PENDING_ALLOCATION&quot;;&quot;REMOVE LINKED SALE ID OR CORRECT LINKAGE STATUS&quot;;IF([.M48]=&quot;ALLOCATED&quot;;&quot;REQUIRE ALLOCATION GROUP ID AND NO LINKED SALE ID&quot;;&quot;REVIEW LINKAGE EVIDENCE — NO AUTHORITY CREATED&quot;)))))))">
            <text:p>NO ACTION — linkage status is UNKNOWN / not asserted</text:p>
          </table:table-cell>
          <table:table-cell office:value-type="string" table:formula="of:=IF([.S48]=&quot;CONTRADICTION&quot;;&quot;BLOCKED&quot;;IF([.S48]=&quot;UNKNOWN&quot;;&quot;UNKNOWN&quot;;IF([.S48]=&quot;CLEAR&quot;;IF(OR([.O48]=&quot;&quot;;[.P48]=&quot;&quot;);&quot;UNKNOWN&quot;;&quot;READY FOR REVIEW&quot;);&quot;BLOCKED&quot;)))">
            <text:p>UNKNOWN</text:p>
          </table:table-cell>
          <table:table-cell office:value-type="string" table:formula="of:=IF([.U48]=&quot;UNKNOWN&quot;;&quot;COMPLETE OR ASSERT REQUIRED EVIDENCE BEFORE REVIEW&quot;;IF([.U48]=&quot;BLOCKED&quot;;&quot;RESOLVE CONTRADICTION BEFORE REVIEW — NO AUTHORITY CREATED&quot;;IF([.U4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8]=&quot;READY FOR REVIEW&quot;;&quot;REVIEW ELIGIBLE — NO AUTHORITY&quot;;IF(OR([.U48]=&quot;UNKNOWN&quot;;[.U48]=&quot;BLOCKED&quot;);&quot;NOT REVIEW ELIGIBLE&quot;;&quot;NOT REVIEW ELIGIBLE&quot;))">
            <text:p>NOT REVIEW ELIGIBLE</text:p>
          </table:table-cell>
          <table:table-cell office:value-type="string" table:formula="of:=IF([.W48]=&quot;NOT REVIEW ELIGIBLE&quot;;&quot;DO NOT BEGIN SETTLEMENT REVIEW — RESOLVE READINESS OR CONTRADICTION CONDITIONS&quot;;IF([.W4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8]=&quot;&quot;;&quot;UNKNOWN&quot;;IF([.W48]&lt;&gt;&quot;REVIEW ELIGIBLE — NO AUTHORITY&quot;;&quot;BLOCKED — OUTCOME ASSERTED WITHOUT REVIEW ELIGIBILITY&quot;;IF(OR([.Y48]=&quot;REVIEWED — NO AUTHORITY&quot;;[.Y48]=&quot;REVIEW DEFERRED&quot;;[.Y4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49]=&quot;&quot;;IF(AND([.L49]=&quot;&quot;;[.N49]=&quot;&quot;);&quot;UNKNOWN&quot;;&quot;CONTRADICTION&quot;);IF([.M49]=&quot;UNMATCHED&quot;;IF(AND([.L49]=&quot;&quot;;[.N49]=&quot;&quot;);&quot;CLEAR&quot;;&quot;CONTRADICTION&quot;);IF([.M49]=&quot;SINGLE_SALE_LINKED&quot;;IF(AND([.L49]&lt;&gt;&quot;&quot;;[.N49]=&quot;&quot;);&quot;CLEAR&quot;;&quot;CONTRADICTION&quot;);IF([.M49]=&quot;MULTI_SALE_PENDING_ALLOCATION&quot;;IF([.L49]=&quot;&quot;;&quot;CLEAR&quot;;&quot;CONTRADICTION&quot;);IF([.M49]=&quot;ALLOCATED&quot;;IF(AND([.L49]=&quot;&quot;;[.N49]&lt;&gt;&quot;&quot;);&quot;CLEAR&quot;;&quot;CONTRADICTION&quot;);&quot;CONTRADICTION&quot;)))))">
            <text:p>UNKNOWN</text:p>
          </table:table-cell>
          <table:table-cell office:value-type="string" table:formula="of:=IF([.S49]=&quot;UNKNOWN&quot;;&quot;NO ACTION — linkage status is UNKNOWN / not asserted&quot;;IF([.S49]=&quot;CLEAR&quot;;&quot;NO CONTRADICTION — preserve evidence as entered&quot;;IF([.M49]=&quot;&quot;;&quot;REVIEW LINKAGE STATUS — identifiers are present while status is UNKNOWN&quot;;IF([.M49]=&quot;UNMATCHED&quot;;&quot;REMOVE LINKAGE IDENTIFIERS OR CORRECT LINKAGE STATUS&quot;;IF([.M49]=&quot;SINGLE_SALE_LINKED&quot;;&quot;REQUIRE LINKED SALE ID AND NO ALLOCATION GROUP ID&quot;;IF([.M49]=&quot;MULTI_SALE_PENDING_ALLOCATION&quot;;&quot;REMOVE LINKED SALE ID OR CORRECT LINKAGE STATUS&quot;;IF([.M49]=&quot;ALLOCATED&quot;;&quot;REQUIRE ALLOCATION GROUP ID AND NO LINKED SALE ID&quot;;&quot;REVIEW LINKAGE EVIDENCE — NO AUTHORITY CREATED&quot;)))))))">
            <text:p>NO ACTION — linkage status is UNKNOWN / not asserted</text:p>
          </table:table-cell>
          <table:table-cell office:value-type="string" table:formula="of:=IF([.S49]=&quot;CONTRADICTION&quot;;&quot;BLOCKED&quot;;IF([.S49]=&quot;UNKNOWN&quot;;&quot;UNKNOWN&quot;;IF([.S49]=&quot;CLEAR&quot;;IF(OR([.O49]=&quot;&quot;;[.P49]=&quot;&quot;);&quot;UNKNOWN&quot;;&quot;READY FOR REVIEW&quot;);&quot;BLOCKED&quot;)))">
            <text:p>UNKNOWN</text:p>
          </table:table-cell>
          <table:table-cell office:value-type="string" table:formula="of:=IF([.U49]=&quot;UNKNOWN&quot;;&quot;COMPLETE OR ASSERT REQUIRED EVIDENCE BEFORE REVIEW&quot;;IF([.U49]=&quot;BLOCKED&quot;;&quot;RESOLVE CONTRADICTION BEFORE REVIEW — NO AUTHORITY CREATED&quot;;IF([.U4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49]=&quot;READY FOR REVIEW&quot;;&quot;REVIEW ELIGIBLE — NO AUTHORITY&quot;;IF(OR([.U49]=&quot;UNKNOWN&quot;;[.U49]=&quot;BLOCKED&quot;);&quot;NOT REVIEW ELIGIBLE&quot;;&quot;NOT REVIEW ELIGIBLE&quot;))">
            <text:p>NOT REVIEW ELIGIBLE</text:p>
          </table:table-cell>
          <table:table-cell office:value-type="string" table:formula="of:=IF([.W49]=&quot;NOT REVIEW ELIGIBLE&quot;;&quot;DO NOT BEGIN SETTLEMENT REVIEW — RESOLVE READINESS OR CONTRADICTION CONDITIONS&quot;;IF([.W4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49]=&quot;&quot;;&quot;UNKNOWN&quot;;IF([.W49]&lt;&gt;&quot;REVIEW ELIGIBLE — NO AUTHORITY&quot;;&quot;BLOCKED — OUTCOME ASSERTED WITHOUT REVIEW ELIGIBILITY&quot;;IF(OR([.Y49]=&quot;REVIEWED — NO AUTHORITY&quot;;[.Y49]=&quot;REVIEW DEFERRED&quot;;[.Y4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0]=&quot;&quot;;IF(AND([.L50]=&quot;&quot;;[.N50]=&quot;&quot;);&quot;UNKNOWN&quot;;&quot;CONTRADICTION&quot;);IF([.M50]=&quot;UNMATCHED&quot;;IF(AND([.L50]=&quot;&quot;;[.N50]=&quot;&quot;);&quot;CLEAR&quot;;&quot;CONTRADICTION&quot;);IF([.M50]=&quot;SINGLE_SALE_LINKED&quot;;IF(AND([.L50]&lt;&gt;&quot;&quot;;[.N50]=&quot;&quot;);&quot;CLEAR&quot;;&quot;CONTRADICTION&quot;);IF([.M50]=&quot;MULTI_SALE_PENDING_ALLOCATION&quot;;IF([.L50]=&quot;&quot;;&quot;CLEAR&quot;;&quot;CONTRADICTION&quot;);IF([.M50]=&quot;ALLOCATED&quot;;IF(AND([.L50]=&quot;&quot;;[.N50]&lt;&gt;&quot;&quot;);&quot;CLEAR&quot;;&quot;CONTRADICTION&quot;);&quot;CONTRADICTION&quot;)))))">
            <text:p>UNKNOWN</text:p>
          </table:table-cell>
          <table:table-cell office:value-type="string" table:formula="of:=IF([.S50]=&quot;UNKNOWN&quot;;&quot;NO ACTION — linkage status is UNKNOWN / not asserted&quot;;IF([.S50]=&quot;CLEAR&quot;;&quot;NO CONTRADICTION — preserve evidence as entered&quot;;IF([.M50]=&quot;&quot;;&quot;REVIEW LINKAGE STATUS — identifiers are present while status is UNKNOWN&quot;;IF([.M50]=&quot;UNMATCHED&quot;;&quot;REMOVE LINKAGE IDENTIFIERS OR CORRECT LINKAGE STATUS&quot;;IF([.M50]=&quot;SINGLE_SALE_LINKED&quot;;&quot;REQUIRE LINKED SALE ID AND NO ALLOCATION GROUP ID&quot;;IF([.M50]=&quot;MULTI_SALE_PENDING_ALLOCATION&quot;;&quot;REMOVE LINKED SALE ID OR CORRECT LINKAGE STATUS&quot;;IF([.M50]=&quot;ALLOCATED&quot;;&quot;REQUIRE ALLOCATION GROUP ID AND NO LINKED SALE ID&quot;;&quot;REVIEW LINKAGE EVIDENCE — NO AUTHORITY CREATED&quot;)))))))">
            <text:p>NO ACTION — linkage status is UNKNOWN / not asserted</text:p>
          </table:table-cell>
          <table:table-cell office:value-type="string" table:formula="of:=IF([.S50]=&quot;CONTRADICTION&quot;;&quot;BLOCKED&quot;;IF([.S50]=&quot;UNKNOWN&quot;;&quot;UNKNOWN&quot;;IF([.S50]=&quot;CLEAR&quot;;IF(OR([.O50]=&quot;&quot;;[.P50]=&quot;&quot;);&quot;UNKNOWN&quot;;&quot;READY FOR REVIEW&quot;);&quot;BLOCKED&quot;)))">
            <text:p>UNKNOWN</text:p>
          </table:table-cell>
          <table:table-cell office:value-type="string" table:formula="of:=IF([.U50]=&quot;UNKNOWN&quot;;&quot;COMPLETE OR ASSERT REQUIRED EVIDENCE BEFORE REVIEW&quot;;IF([.U50]=&quot;BLOCKED&quot;;&quot;RESOLVE CONTRADICTION BEFORE REVIEW — NO AUTHORITY CREATED&quot;;IF([.U5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0]=&quot;READY FOR REVIEW&quot;;&quot;REVIEW ELIGIBLE — NO AUTHORITY&quot;;IF(OR([.U50]=&quot;UNKNOWN&quot;;[.U50]=&quot;BLOCKED&quot;);&quot;NOT REVIEW ELIGIBLE&quot;;&quot;NOT REVIEW ELIGIBLE&quot;))">
            <text:p>NOT REVIEW ELIGIBLE</text:p>
          </table:table-cell>
          <table:table-cell office:value-type="string" table:formula="of:=IF([.W50]=&quot;NOT REVIEW ELIGIBLE&quot;;&quot;DO NOT BEGIN SETTLEMENT REVIEW — RESOLVE READINESS OR CONTRADICTION CONDITIONS&quot;;IF([.W5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0]=&quot;&quot;;&quot;UNKNOWN&quot;;IF([.W50]&lt;&gt;&quot;REVIEW ELIGIBLE — NO AUTHORITY&quot;;&quot;BLOCKED — OUTCOME ASSERTED WITHOUT REVIEW ELIGIBILITY&quot;;IF(OR([.Y50]=&quot;REVIEWED — NO AUTHORITY&quot;;[.Y50]=&quot;REVIEW DEFERRED&quot;;[.Y5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1]=&quot;&quot;;IF(AND([.L51]=&quot;&quot;;[.N51]=&quot;&quot;);&quot;UNKNOWN&quot;;&quot;CONTRADICTION&quot;);IF([.M51]=&quot;UNMATCHED&quot;;IF(AND([.L51]=&quot;&quot;;[.N51]=&quot;&quot;);&quot;CLEAR&quot;;&quot;CONTRADICTION&quot;);IF([.M51]=&quot;SINGLE_SALE_LINKED&quot;;IF(AND([.L51]&lt;&gt;&quot;&quot;;[.N51]=&quot;&quot;);&quot;CLEAR&quot;;&quot;CONTRADICTION&quot;);IF([.M51]=&quot;MULTI_SALE_PENDING_ALLOCATION&quot;;IF([.L51]=&quot;&quot;;&quot;CLEAR&quot;;&quot;CONTRADICTION&quot;);IF([.M51]=&quot;ALLOCATED&quot;;IF(AND([.L51]=&quot;&quot;;[.N51]&lt;&gt;&quot;&quot;);&quot;CLEAR&quot;;&quot;CONTRADICTION&quot;);&quot;CONTRADICTION&quot;)))))">
            <text:p>UNKNOWN</text:p>
          </table:table-cell>
          <table:table-cell office:value-type="string" table:formula="of:=IF([.S51]=&quot;UNKNOWN&quot;;&quot;NO ACTION — linkage status is UNKNOWN / not asserted&quot;;IF([.S51]=&quot;CLEAR&quot;;&quot;NO CONTRADICTION — preserve evidence as entered&quot;;IF([.M51]=&quot;&quot;;&quot;REVIEW LINKAGE STATUS — identifiers are present while status is UNKNOWN&quot;;IF([.M51]=&quot;UNMATCHED&quot;;&quot;REMOVE LINKAGE IDENTIFIERS OR CORRECT LINKAGE STATUS&quot;;IF([.M51]=&quot;SINGLE_SALE_LINKED&quot;;&quot;REQUIRE LINKED SALE ID AND NO ALLOCATION GROUP ID&quot;;IF([.M51]=&quot;MULTI_SALE_PENDING_ALLOCATION&quot;;&quot;REMOVE LINKED SALE ID OR CORRECT LINKAGE STATUS&quot;;IF([.M51]=&quot;ALLOCATED&quot;;&quot;REQUIRE ALLOCATION GROUP ID AND NO LINKED SALE ID&quot;;&quot;REVIEW LINKAGE EVIDENCE — NO AUTHORITY CREATED&quot;)))))))">
            <text:p>NO ACTION — linkage status is UNKNOWN / not asserted</text:p>
          </table:table-cell>
          <table:table-cell office:value-type="string" table:formula="of:=IF([.S51]=&quot;CONTRADICTION&quot;;&quot;BLOCKED&quot;;IF([.S51]=&quot;UNKNOWN&quot;;&quot;UNKNOWN&quot;;IF([.S51]=&quot;CLEAR&quot;;IF(OR([.O51]=&quot;&quot;;[.P51]=&quot;&quot;);&quot;UNKNOWN&quot;;&quot;READY FOR REVIEW&quot;);&quot;BLOCKED&quot;)))">
            <text:p>UNKNOWN</text:p>
          </table:table-cell>
          <table:table-cell office:value-type="string" table:formula="of:=IF([.U51]=&quot;UNKNOWN&quot;;&quot;COMPLETE OR ASSERT REQUIRED EVIDENCE BEFORE REVIEW&quot;;IF([.U51]=&quot;BLOCKED&quot;;&quot;RESOLVE CONTRADICTION BEFORE REVIEW — NO AUTHORITY CREATED&quot;;IF([.U5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1]=&quot;READY FOR REVIEW&quot;;&quot;REVIEW ELIGIBLE — NO AUTHORITY&quot;;IF(OR([.U51]=&quot;UNKNOWN&quot;;[.U51]=&quot;BLOCKED&quot;);&quot;NOT REVIEW ELIGIBLE&quot;;&quot;NOT REVIEW ELIGIBLE&quot;))">
            <text:p>NOT REVIEW ELIGIBLE</text:p>
          </table:table-cell>
          <table:table-cell office:value-type="string" table:formula="of:=IF([.W51]=&quot;NOT REVIEW ELIGIBLE&quot;;&quot;DO NOT BEGIN SETTLEMENT REVIEW — RESOLVE READINESS OR CONTRADICTION CONDITIONS&quot;;IF([.W5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1]=&quot;&quot;;&quot;UNKNOWN&quot;;IF([.W51]&lt;&gt;&quot;REVIEW ELIGIBLE — NO AUTHORITY&quot;;&quot;BLOCKED — OUTCOME ASSERTED WITHOUT REVIEW ELIGIBILITY&quot;;IF(OR([.Y51]=&quot;REVIEWED — NO AUTHORITY&quot;;[.Y51]=&quot;REVIEW DEFERRED&quot;;[.Y51]=&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2]=&quot;&quot;;IF(AND([.L52]=&quot;&quot;;[.N52]=&quot;&quot;);&quot;UNKNOWN&quot;;&quot;CONTRADICTION&quot;);IF([.M52]=&quot;UNMATCHED&quot;;IF(AND([.L52]=&quot;&quot;;[.N52]=&quot;&quot;);&quot;CLEAR&quot;;&quot;CONTRADICTION&quot;);IF([.M52]=&quot;SINGLE_SALE_LINKED&quot;;IF(AND([.L52]&lt;&gt;&quot;&quot;;[.N52]=&quot;&quot;);&quot;CLEAR&quot;;&quot;CONTRADICTION&quot;);IF([.M52]=&quot;MULTI_SALE_PENDING_ALLOCATION&quot;;IF([.L52]=&quot;&quot;;&quot;CLEAR&quot;;&quot;CONTRADICTION&quot;);IF([.M52]=&quot;ALLOCATED&quot;;IF(AND([.L52]=&quot;&quot;;[.N52]&lt;&gt;&quot;&quot;);&quot;CLEAR&quot;;&quot;CONTRADICTION&quot;);&quot;CONTRADICTION&quot;)))))">
            <text:p>UNKNOWN</text:p>
          </table:table-cell>
          <table:table-cell office:value-type="string" table:formula="of:=IF([.S52]=&quot;UNKNOWN&quot;;&quot;NO ACTION — linkage status is UNKNOWN / not asserted&quot;;IF([.S52]=&quot;CLEAR&quot;;&quot;NO CONTRADICTION — preserve evidence as entered&quot;;IF([.M52]=&quot;&quot;;&quot;REVIEW LINKAGE STATUS — identifiers are present while status is UNKNOWN&quot;;IF([.M52]=&quot;UNMATCHED&quot;;&quot;REMOVE LINKAGE IDENTIFIERS OR CORRECT LINKAGE STATUS&quot;;IF([.M52]=&quot;SINGLE_SALE_LINKED&quot;;&quot;REQUIRE LINKED SALE ID AND NO ALLOCATION GROUP ID&quot;;IF([.M52]=&quot;MULTI_SALE_PENDING_ALLOCATION&quot;;&quot;REMOVE LINKED SALE ID OR CORRECT LINKAGE STATUS&quot;;IF([.M52]=&quot;ALLOCATED&quot;;&quot;REQUIRE ALLOCATION GROUP ID AND NO LINKED SALE ID&quot;;&quot;REVIEW LINKAGE EVIDENCE — NO AUTHORITY CREATED&quot;)))))))">
            <text:p>NO ACTION — linkage status is UNKNOWN / not asserted</text:p>
          </table:table-cell>
          <table:table-cell office:value-type="string" table:formula="of:=IF([.S52]=&quot;CONTRADICTION&quot;;&quot;BLOCKED&quot;;IF([.S52]=&quot;UNKNOWN&quot;;&quot;UNKNOWN&quot;;IF([.S52]=&quot;CLEAR&quot;;IF(OR([.O52]=&quot;&quot;;[.P52]=&quot;&quot;);&quot;UNKNOWN&quot;;&quot;READY FOR REVIEW&quot;);&quot;BLOCKED&quot;)))">
            <text:p>UNKNOWN</text:p>
          </table:table-cell>
          <table:table-cell office:value-type="string" table:formula="of:=IF([.U52]=&quot;UNKNOWN&quot;;&quot;COMPLETE OR ASSERT REQUIRED EVIDENCE BEFORE REVIEW&quot;;IF([.U52]=&quot;BLOCKED&quot;;&quot;RESOLVE CONTRADICTION BEFORE REVIEW — NO AUTHORITY CREATED&quot;;IF([.U5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2]=&quot;READY FOR REVIEW&quot;;&quot;REVIEW ELIGIBLE — NO AUTHORITY&quot;;IF(OR([.U52]=&quot;UNKNOWN&quot;;[.U52]=&quot;BLOCKED&quot;);&quot;NOT REVIEW ELIGIBLE&quot;;&quot;NOT REVIEW ELIGIBLE&quot;))">
            <text:p>NOT REVIEW ELIGIBLE</text:p>
          </table:table-cell>
          <table:table-cell office:value-type="string" table:formula="of:=IF([.W52]=&quot;NOT REVIEW ELIGIBLE&quot;;&quot;DO NOT BEGIN SETTLEMENT REVIEW — RESOLVE READINESS OR CONTRADICTION CONDITIONS&quot;;IF([.W5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2]=&quot;&quot;;&quot;UNKNOWN&quot;;IF([.W52]&lt;&gt;&quot;REVIEW ELIGIBLE — NO AUTHORITY&quot;;&quot;BLOCKED — OUTCOME ASSERTED WITHOUT REVIEW ELIGIBILITY&quot;;IF(OR([.Y52]=&quot;REVIEWED — NO AUTHORITY&quot;;[.Y52]=&quot;REVIEW DEFERRED&quot;;[.Y5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3]=&quot;&quot;;IF(AND([.L53]=&quot;&quot;;[.N53]=&quot;&quot;);&quot;UNKNOWN&quot;;&quot;CONTRADICTION&quot;);IF([.M53]=&quot;UNMATCHED&quot;;IF(AND([.L53]=&quot;&quot;;[.N53]=&quot;&quot;);&quot;CLEAR&quot;;&quot;CONTRADICTION&quot;);IF([.M53]=&quot;SINGLE_SALE_LINKED&quot;;IF(AND([.L53]&lt;&gt;&quot;&quot;;[.N53]=&quot;&quot;);&quot;CLEAR&quot;;&quot;CONTRADICTION&quot;);IF([.M53]=&quot;MULTI_SALE_PENDING_ALLOCATION&quot;;IF([.L53]=&quot;&quot;;&quot;CLEAR&quot;;&quot;CONTRADICTION&quot;);IF([.M53]=&quot;ALLOCATED&quot;;IF(AND([.L53]=&quot;&quot;;[.N53]&lt;&gt;&quot;&quot;);&quot;CLEAR&quot;;&quot;CONTRADICTION&quot;);&quot;CONTRADICTION&quot;)))))">
            <text:p>UNKNOWN</text:p>
          </table:table-cell>
          <table:table-cell office:value-type="string" table:formula="of:=IF([.S53]=&quot;UNKNOWN&quot;;&quot;NO ACTION — linkage status is UNKNOWN / not asserted&quot;;IF([.S53]=&quot;CLEAR&quot;;&quot;NO CONTRADICTION — preserve evidence as entered&quot;;IF([.M53]=&quot;&quot;;&quot;REVIEW LINKAGE STATUS — identifiers are present while status is UNKNOWN&quot;;IF([.M53]=&quot;UNMATCHED&quot;;&quot;REMOVE LINKAGE IDENTIFIERS OR CORRECT LINKAGE STATUS&quot;;IF([.M53]=&quot;SINGLE_SALE_LINKED&quot;;&quot;REQUIRE LINKED SALE ID AND NO ALLOCATION GROUP ID&quot;;IF([.M53]=&quot;MULTI_SALE_PENDING_ALLOCATION&quot;;&quot;REMOVE LINKED SALE ID OR CORRECT LINKAGE STATUS&quot;;IF([.M53]=&quot;ALLOCATED&quot;;&quot;REQUIRE ALLOCATION GROUP ID AND NO LINKED SALE ID&quot;;&quot;REVIEW LINKAGE EVIDENCE — NO AUTHORITY CREATED&quot;)))))))">
            <text:p>NO ACTION — linkage status is UNKNOWN / not asserted</text:p>
          </table:table-cell>
          <table:table-cell office:value-type="string" table:formula="of:=IF([.S53]=&quot;CONTRADICTION&quot;;&quot;BLOCKED&quot;;IF([.S53]=&quot;UNKNOWN&quot;;&quot;UNKNOWN&quot;;IF([.S53]=&quot;CLEAR&quot;;IF(OR([.O53]=&quot;&quot;;[.P53]=&quot;&quot;);&quot;UNKNOWN&quot;;&quot;READY FOR REVIEW&quot;);&quot;BLOCKED&quot;)))">
            <text:p>UNKNOWN</text:p>
          </table:table-cell>
          <table:table-cell office:value-type="string" table:formula="of:=IF([.U53]=&quot;UNKNOWN&quot;;&quot;COMPLETE OR ASSERT REQUIRED EVIDENCE BEFORE REVIEW&quot;;IF([.U53]=&quot;BLOCKED&quot;;&quot;RESOLVE CONTRADICTION BEFORE REVIEW — NO AUTHORITY CREATED&quot;;IF([.U5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3]=&quot;READY FOR REVIEW&quot;;&quot;REVIEW ELIGIBLE — NO AUTHORITY&quot;;IF(OR([.U53]=&quot;UNKNOWN&quot;;[.U53]=&quot;BLOCKED&quot;);&quot;NOT REVIEW ELIGIBLE&quot;;&quot;NOT REVIEW ELIGIBLE&quot;))">
            <text:p>NOT REVIEW ELIGIBLE</text:p>
          </table:table-cell>
          <table:table-cell office:value-type="string" table:formula="of:=IF([.W53]=&quot;NOT REVIEW ELIGIBLE&quot;;&quot;DO NOT BEGIN SETTLEMENT REVIEW — RESOLVE READINESS OR CONTRADICTION CONDITIONS&quot;;IF([.W5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3]=&quot;&quot;;&quot;UNKNOWN&quot;;IF([.W53]&lt;&gt;&quot;REVIEW ELIGIBLE — NO AUTHORITY&quot;;&quot;BLOCKED — OUTCOME ASSERTED WITHOUT REVIEW ELIGIBILITY&quot;;IF(OR([.Y53]=&quot;REVIEWED — NO AUTHORITY&quot;;[.Y53]=&quot;REVIEW DEFERRED&quot;;[.Y5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4]=&quot;&quot;;IF(AND([.L54]=&quot;&quot;;[.N54]=&quot;&quot;);&quot;UNKNOWN&quot;;&quot;CONTRADICTION&quot;);IF([.M54]=&quot;UNMATCHED&quot;;IF(AND([.L54]=&quot;&quot;;[.N54]=&quot;&quot;);&quot;CLEAR&quot;;&quot;CONTRADICTION&quot;);IF([.M54]=&quot;SINGLE_SALE_LINKED&quot;;IF(AND([.L54]&lt;&gt;&quot;&quot;;[.N54]=&quot;&quot;);&quot;CLEAR&quot;;&quot;CONTRADICTION&quot;);IF([.M54]=&quot;MULTI_SALE_PENDING_ALLOCATION&quot;;IF([.L54]=&quot;&quot;;&quot;CLEAR&quot;;&quot;CONTRADICTION&quot;);IF([.M54]=&quot;ALLOCATED&quot;;IF(AND([.L54]=&quot;&quot;;[.N54]&lt;&gt;&quot;&quot;);&quot;CLEAR&quot;;&quot;CONTRADICTION&quot;);&quot;CONTRADICTION&quot;)))))">
            <text:p>UNKNOWN</text:p>
          </table:table-cell>
          <table:table-cell office:value-type="string" table:formula="of:=IF([.S54]=&quot;UNKNOWN&quot;;&quot;NO ACTION — linkage status is UNKNOWN / not asserted&quot;;IF([.S54]=&quot;CLEAR&quot;;&quot;NO CONTRADICTION — preserve evidence as entered&quot;;IF([.M54]=&quot;&quot;;&quot;REVIEW LINKAGE STATUS — identifiers are present while status is UNKNOWN&quot;;IF([.M54]=&quot;UNMATCHED&quot;;&quot;REMOVE LINKAGE IDENTIFIERS OR CORRECT LINKAGE STATUS&quot;;IF([.M54]=&quot;SINGLE_SALE_LINKED&quot;;&quot;REQUIRE LINKED SALE ID AND NO ALLOCATION GROUP ID&quot;;IF([.M54]=&quot;MULTI_SALE_PENDING_ALLOCATION&quot;;&quot;REMOVE LINKED SALE ID OR CORRECT LINKAGE STATUS&quot;;IF([.M54]=&quot;ALLOCATED&quot;;&quot;REQUIRE ALLOCATION GROUP ID AND NO LINKED SALE ID&quot;;&quot;REVIEW LINKAGE EVIDENCE — NO AUTHORITY CREATED&quot;)))))))">
            <text:p>NO ACTION — linkage status is UNKNOWN / not asserted</text:p>
          </table:table-cell>
          <table:table-cell office:value-type="string" table:formula="of:=IF([.S54]=&quot;CONTRADICTION&quot;;&quot;BLOCKED&quot;;IF([.S54]=&quot;UNKNOWN&quot;;&quot;UNKNOWN&quot;;IF([.S54]=&quot;CLEAR&quot;;IF(OR([.O54]=&quot;&quot;;[.P54]=&quot;&quot;);&quot;UNKNOWN&quot;;&quot;READY FOR REVIEW&quot;);&quot;BLOCKED&quot;)))">
            <text:p>UNKNOWN</text:p>
          </table:table-cell>
          <table:table-cell office:value-type="string" table:formula="of:=IF([.U54]=&quot;UNKNOWN&quot;;&quot;COMPLETE OR ASSERT REQUIRED EVIDENCE BEFORE REVIEW&quot;;IF([.U54]=&quot;BLOCKED&quot;;&quot;RESOLVE CONTRADICTION BEFORE REVIEW — NO AUTHORITY CREATED&quot;;IF([.U5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4]=&quot;READY FOR REVIEW&quot;;&quot;REVIEW ELIGIBLE — NO AUTHORITY&quot;;IF(OR([.U54]=&quot;UNKNOWN&quot;;[.U54]=&quot;BLOCKED&quot;);&quot;NOT REVIEW ELIGIBLE&quot;;&quot;NOT REVIEW ELIGIBLE&quot;))">
            <text:p>NOT REVIEW ELIGIBLE</text:p>
          </table:table-cell>
          <table:table-cell office:value-type="string" table:formula="of:=IF([.W54]=&quot;NOT REVIEW ELIGIBLE&quot;;&quot;DO NOT BEGIN SETTLEMENT REVIEW — RESOLVE READINESS OR CONTRADICTION CONDITIONS&quot;;IF([.W5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4]=&quot;&quot;;&quot;UNKNOWN&quot;;IF([.W54]&lt;&gt;&quot;REVIEW ELIGIBLE — NO AUTHORITY&quot;;&quot;BLOCKED — OUTCOME ASSERTED WITHOUT REVIEW ELIGIBILITY&quot;;IF(OR([.Y54]=&quot;REVIEWED — NO AUTHORITY&quot;;[.Y54]=&quot;REVIEW DEFERRED&quot;;[.Y5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5]=&quot;&quot;;IF(AND([.L55]=&quot;&quot;;[.N55]=&quot;&quot;);&quot;UNKNOWN&quot;;&quot;CONTRADICTION&quot;);IF([.M55]=&quot;UNMATCHED&quot;;IF(AND([.L55]=&quot;&quot;;[.N55]=&quot;&quot;);&quot;CLEAR&quot;;&quot;CONTRADICTION&quot;);IF([.M55]=&quot;SINGLE_SALE_LINKED&quot;;IF(AND([.L55]&lt;&gt;&quot;&quot;;[.N55]=&quot;&quot;);&quot;CLEAR&quot;;&quot;CONTRADICTION&quot;);IF([.M55]=&quot;MULTI_SALE_PENDING_ALLOCATION&quot;;IF([.L55]=&quot;&quot;;&quot;CLEAR&quot;;&quot;CONTRADICTION&quot;);IF([.M55]=&quot;ALLOCATED&quot;;IF(AND([.L55]=&quot;&quot;;[.N55]&lt;&gt;&quot;&quot;);&quot;CLEAR&quot;;&quot;CONTRADICTION&quot;);&quot;CONTRADICTION&quot;)))))">
            <text:p>UNKNOWN</text:p>
          </table:table-cell>
          <table:table-cell office:value-type="string" table:formula="of:=IF([.S55]=&quot;UNKNOWN&quot;;&quot;NO ACTION — linkage status is UNKNOWN / not asserted&quot;;IF([.S55]=&quot;CLEAR&quot;;&quot;NO CONTRADICTION — preserve evidence as entered&quot;;IF([.M55]=&quot;&quot;;&quot;REVIEW LINKAGE STATUS — identifiers are present while status is UNKNOWN&quot;;IF([.M55]=&quot;UNMATCHED&quot;;&quot;REMOVE LINKAGE IDENTIFIERS OR CORRECT LINKAGE STATUS&quot;;IF([.M55]=&quot;SINGLE_SALE_LINKED&quot;;&quot;REQUIRE LINKED SALE ID AND NO ALLOCATION GROUP ID&quot;;IF([.M55]=&quot;MULTI_SALE_PENDING_ALLOCATION&quot;;&quot;REMOVE LINKED SALE ID OR CORRECT LINKAGE STATUS&quot;;IF([.M55]=&quot;ALLOCATED&quot;;&quot;REQUIRE ALLOCATION GROUP ID AND NO LINKED SALE ID&quot;;&quot;REVIEW LINKAGE EVIDENCE — NO AUTHORITY CREATED&quot;)))))))">
            <text:p>NO ACTION — linkage status is UNKNOWN / not asserted</text:p>
          </table:table-cell>
          <table:table-cell office:value-type="string" table:formula="of:=IF([.S55]=&quot;CONTRADICTION&quot;;&quot;BLOCKED&quot;;IF([.S55]=&quot;UNKNOWN&quot;;&quot;UNKNOWN&quot;;IF([.S55]=&quot;CLEAR&quot;;IF(OR([.O55]=&quot;&quot;;[.P55]=&quot;&quot;);&quot;UNKNOWN&quot;;&quot;READY FOR REVIEW&quot;);&quot;BLOCKED&quot;)))">
            <text:p>UNKNOWN</text:p>
          </table:table-cell>
          <table:table-cell office:value-type="string" table:formula="of:=IF([.U55]=&quot;UNKNOWN&quot;;&quot;COMPLETE OR ASSERT REQUIRED EVIDENCE BEFORE REVIEW&quot;;IF([.U55]=&quot;BLOCKED&quot;;&quot;RESOLVE CONTRADICTION BEFORE REVIEW — NO AUTHORITY CREATED&quot;;IF([.U5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5]=&quot;READY FOR REVIEW&quot;;&quot;REVIEW ELIGIBLE — NO AUTHORITY&quot;;IF(OR([.U55]=&quot;UNKNOWN&quot;;[.U55]=&quot;BLOCKED&quot;);&quot;NOT REVIEW ELIGIBLE&quot;;&quot;NOT REVIEW ELIGIBLE&quot;))">
            <text:p>NOT REVIEW ELIGIBLE</text:p>
          </table:table-cell>
          <table:table-cell office:value-type="string" table:formula="of:=IF([.W55]=&quot;NOT REVIEW ELIGIBLE&quot;;&quot;DO NOT BEGIN SETTLEMENT REVIEW — RESOLVE READINESS OR CONTRADICTION CONDITIONS&quot;;IF([.W5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5]=&quot;&quot;;&quot;UNKNOWN&quot;;IF([.W55]&lt;&gt;&quot;REVIEW ELIGIBLE — NO AUTHORITY&quot;;&quot;BLOCKED — OUTCOME ASSERTED WITHOUT REVIEW ELIGIBILITY&quot;;IF(OR([.Y55]=&quot;REVIEWED — NO AUTHORITY&quot;;[.Y55]=&quot;REVIEW DEFERRED&quot;;[.Y5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6]=&quot;&quot;;IF(AND([.L56]=&quot;&quot;;[.N56]=&quot;&quot;);&quot;UNKNOWN&quot;;&quot;CONTRADICTION&quot;);IF([.M56]=&quot;UNMATCHED&quot;;IF(AND([.L56]=&quot;&quot;;[.N56]=&quot;&quot;);&quot;CLEAR&quot;;&quot;CONTRADICTION&quot;);IF([.M56]=&quot;SINGLE_SALE_LINKED&quot;;IF(AND([.L56]&lt;&gt;&quot;&quot;;[.N56]=&quot;&quot;);&quot;CLEAR&quot;;&quot;CONTRADICTION&quot;);IF([.M56]=&quot;MULTI_SALE_PENDING_ALLOCATION&quot;;IF([.L56]=&quot;&quot;;&quot;CLEAR&quot;;&quot;CONTRADICTION&quot;);IF([.M56]=&quot;ALLOCATED&quot;;IF(AND([.L56]=&quot;&quot;;[.N56]&lt;&gt;&quot;&quot;);&quot;CLEAR&quot;;&quot;CONTRADICTION&quot;);&quot;CONTRADICTION&quot;)))))">
            <text:p>UNKNOWN</text:p>
          </table:table-cell>
          <table:table-cell office:value-type="string" table:formula="of:=IF([.S56]=&quot;UNKNOWN&quot;;&quot;NO ACTION — linkage status is UNKNOWN / not asserted&quot;;IF([.S56]=&quot;CLEAR&quot;;&quot;NO CONTRADICTION — preserve evidence as entered&quot;;IF([.M56]=&quot;&quot;;&quot;REVIEW LINKAGE STATUS — identifiers are present while status is UNKNOWN&quot;;IF([.M56]=&quot;UNMATCHED&quot;;&quot;REMOVE LINKAGE IDENTIFIERS OR CORRECT LINKAGE STATUS&quot;;IF([.M56]=&quot;SINGLE_SALE_LINKED&quot;;&quot;REQUIRE LINKED SALE ID AND NO ALLOCATION GROUP ID&quot;;IF([.M56]=&quot;MULTI_SALE_PENDING_ALLOCATION&quot;;&quot;REMOVE LINKED SALE ID OR CORRECT LINKAGE STATUS&quot;;IF([.M56]=&quot;ALLOCATED&quot;;&quot;REQUIRE ALLOCATION GROUP ID AND NO LINKED SALE ID&quot;;&quot;REVIEW LINKAGE EVIDENCE — NO AUTHORITY CREATED&quot;)))))))">
            <text:p>NO ACTION — linkage status is UNKNOWN / not asserted</text:p>
          </table:table-cell>
          <table:table-cell office:value-type="string" table:formula="of:=IF([.S56]=&quot;CONTRADICTION&quot;;&quot;BLOCKED&quot;;IF([.S56]=&quot;UNKNOWN&quot;;&quot;UNKNOWN&quot;;IF([.S56]=&quot;CLEAR&quot;;IF(OR([.O56]=&quot;&quot;;[.P56]=&quot;&quot;);&quot;UNKNOWN&quot;;&quot;READY FOR REVIEW&quot;);&quot;BLOCKED&quot;)))">
            <text:p>UNKNOWN</text:p>
          </table:table-cell>
          <table:table-cell office:value-type="string" table:formula="of:=IF([.U56]=&quot;UNKNOWN&quot;;&quot;COMPLETE OR ASSERT REQUIRED EVIDENCE BEFORE REVIEW&quot;;IF([.U56]=&quot;BLOCKED&quot;;&quot;RESOLVE CONTRADICTION BEFORE REVIEW — NO AUTHORITY CREATED&quot;;IF([.U5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6]=&quot;READY FOR REVIEW&quot;;&quot;REVIEW ELIGIBLE — NO AUTHORITY&quot;;IF(OR([.U56]=&quot;UNKNOWN&quot;;[.U56]=&quot;BLOCKED&quot;);&quot;NOT REVIEW ELIGIBLE&quot;;&quot;NOT REVIEW ELIGIBLE&quot;))">
            <text:p>NOT REVIEW ELIGIBLE</text:p>
          </table:table-cell>
          <table:table-cell office:value-type="string" table:formula="of:=IF([.W56]=&quot;NOT REVIEW ELIGIBLE&quot;;&quot;DO NOT BEGIN SETTLEMENT REVIEW — RESOLVE READINESS OR CONTRADICTION CONDITIONS&quot;;IF([.W5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6]=&quot;&quot;;&quot;UNKNOWN&quot;;IF([.W56]&lt;&gt;&quot;REVIEW ELIGIBLE — NO AUTHORITY&quot;;&quot;BLOCKED — OUTCOME ASSERTED WITHOUT REVIEW ELIGIBILITY&quot;;IF(OR([.Y56]=&quot;REVIEWED — NO AUTHORITY&quot;;[.Y56]=&quot;REVIEW DEFERRED&quot;;[.Y5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7]=&quot;&quot;;IF(AND([.L57]=&quot;&quot;;[.N57]=&quot;&quot;);&quot;UNKNOWN&quot;;&quot;CONTRADICTION&quot;);IF([.M57]=&quot;UNMATCHED&quot;;IF(AND([.L57]=&quot;&quot;;[.N57]=&quot;&quot;);&quot;CLEAR&quot;;&quot;CONTRADICTION&quot;);IF([.M57]=&quot;SINGLE_SALE_LINKED&quot;;IF(AND([.L57]&lt;&gt;&quot;&quot;;[.N57]=&quot;&quot;);&quot;CLEAR&quot;;&quot;CONTRADICTION&quot;);IF([.M57]=&quot;MULTI_SALE_PENDING_ALLOCATION&quot;;IF([.L57]=&quot;&quot;;&quot;CLEAR&quot;;&quot;CONTRADICTION&quot;);IF([.M57]=&quot;ALLOCATED&quot;;IF(AND([.L57]=&quot;&quot;;[.N57]&lt;&gt;&quot;&quot;);&quot;CLEAR&quot;;&quot;CONTRADICTION&quot;);&quot;CONTRADICTION&quot;)))))">
            <text:p>UNKNOWN</text:p>
          </table:table-cell>
          <table:table-cell office:value-type="string" table:formula="of:=IF([.S57]=&quot;UNKNOWN&quot;;&quot;NO ACTION — linkage status is UNKNOWN / not asserted&quot;;IF([.S57]=&quot;CLEAR&quot;;&quot;NO CONTRADICTION — preserve evidence as entered&quot;;IF([.M57]=&quot;&quot;;&quot;REVIEW LINKAGE STATUS — identifiers are present while status is UNKNOWN&quot;;IF([.M57]=&quot;UNMATCHED&quot;;&quot;REMOVE LINKAGE IDENTIFIERS OR CORRECT LINKAGE STATUS&quot;;IF([.M57]=&quot;SINGLE_SALE_LINKED&quot;;&quot;REQUIRE LINKED SALE ID AND NO ALLOCATION GROUP ID&quot;;IF([.M57]=&quot;MULTI_SALE_PENDING_ALLOCATION&quot;;&quot;REMOVE LINKED SALE ID OR CORRECT LINKAGE STATUS&quot;;IF([.M57]=&quot;ALLOCATED&quot;;&quot;REQUIRE ALLOCATION GROUP ID AND NO LINKED SALE ID&quot;;&quot;REVIEW LINKAGE EVIDENCE — NO AUTHORITY CREATED&quot;)))))))">
            <text:p>NO ACTION — linkage status is UNKNOWN / not asserted</text:p>
          </table:table-cell>
          <table:table-cell office:value-type="string" table:formula="of:=IF([.S57]=&quot;CONTRADICTION&quot;;&quot;BLOCKED&quot;;IF([.S57]=&quot;UNKNOWN&quot;;&quot;UNKNOWN&quot;;IF([.S57]=&quot;CLEAR&quot;;IF(OR([.O57]=&quot;&quot;;[.P57]=&quot;&quot;);&quot;UNKNOWN&quot;;&quot;READY FOR REVIEW&quot;);&quot;BLOCKED&quot;)))">
            <text:p>UNKNOWN</text:p>
          </table:table-cell>
          <table:table-cell office:value-type="string" table:formula="of:=IF([.U57]=&quot;UNKNOWN&quot;;&quot;COMPLETE OR ASSERT REQUIRED EVIDENCE BEFORE REVIEW&quot;;IF([.U57]=&quot;BLOCKED&quot;;&quot;RESOLVE CONTRADICTION BEFORE REVIEW — NO AUTHORITY CREATED&quot;;IF([.U5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7]=&quot;READY FOR REVIEW&quot;;&quot;REVIEW ELIGIBLE — NO AUTHORITY&quot;;IF(OR([.U57]=&quot;UNKNOWN&quot;;[.U57]=&quot;BLOCKED&quot;);&quot;NOT REVIEW ELIGIBLE&quot;;&quot;NOT REVIEW ELIGIBLE&quot;))">
            <text:p>NOT REVIEW ELIGIBLE</text:p>
          </table:table-cell>
          <table:table-cell office:value-type="string" table:formula="of:=IF([.W57]=&quot;NOT REVIEW ELIGIBLE&quot;;&quot;DO NOT BEGIN SETTLEMENT REVIEW — RESOLVE READINESS OR CONTRADICTION CONDITIONS&quot;;IF([.W5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7]=&quot;&quot;;&quot;UNKNOWN&quot;;IF([.W57]&lt;&gt;&quot;REVIEW ELIGIBLE — NO AUTHORITY&quot;;&quot;BLOCKED — OUTCOME ASSERTED WITHOUT REVIEW ELIGIBILITY&quot;;IF(OR([.Y57]=&quot;REVIEWED — NO AUTHORITY&quot;;[.Y57]=&quot;REVIEW DEFERRED&quot;;[.Y5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8]=&quot;&quot;;IF(AND([.L58]=&quot;&quot;;[.N58]=&quot;&quot;);&quot;UNKNOWN&quot;;&quot;CONTRADICTION&quot;);IF([.M58]=&quot;UNMATCHED&quot;;IF(AND([.L58]=&quot;&quot;;[.N58]=&quot;&quot;);&quot;CLEAR&quot;;&quot;CONTRADICTION&quot;);IF([.M58]=&quot;SINGLE_SALE_LINKED&quot;;IF(AND([.L58]&lt;&gt;&quot;&quot;;[.N58]=&quot;&quot;);&quot;CLEAR&quot;;&quot;CONTRADICTION&quot;);IF([.M58]=&quot;MULTI_SALE_PENDING_ALLOCATION&quot;;IF([.L58]=&quot;&quot;;&quot;CLEAR&quot;;&quot;CONTRADICTION&quot;);IF([.M58]=&quot;ALLOCATED&quot;;IF(AND([.L58]=&quot;&quot;;[.N58]&lt;&gt;&quot;&quot;);&quot;CLEAR&quot;;&quot;CONTRADICTION&quot;);&quot;CONTRADICTION&quot;)))))">
            <text:p>UNKNOWN</text:p>
          </table:table-cell>
          <table:table-cell office:value-type="string" table:formula="of:=IF([.S58]=&quot;UNKNOWN&quot;;&quot;NO ACTION — linkage status is UNKNOWN / not asserted&quot;;IF([.S58]=&quot;CLEAR&quot;;&quot;NO CONTRADICTION — preserve evidence as entered&quot;;IF([.M58]=&quot;&quot;;&quot;REVIEW LINKAGE STATUS — identifiers are present while status is UNKNOWN&quot;;IF([.M58]=&quot;UNMATCHED&quot;;&quot;REMOVE LINKAGE IDENTIFIERS OR CORRECT LINKAGE STATUS&quot;;IF([.M58]=&quot;SINGLE_SALE_LINKED&quot;;&quot;REQUIRE LINKED SALE ID AND NO ALLOCATION GROUP ID&quot;;IF([.M58]=&quot;MULTI_SALE_PENDING_ALLOCATION&quot;;&quot;REMOVE LINKED SALE ID OR CORRECT LINKAGE STATUS&quot;;IF([.M58]=&quot;ALLOCATED&quot;;&quot;REQUIRE ALLOCATION GROUP ID AND NO LINKED SALE ID&quot;;&quot;REVIEW LINKAGE EVIDENCE — NO AUTHORITY CREATED&quot;)))))))">
            <text:p>NO ACTION — linkage status is UNKNOWN / not asserted</text:p>
          </table:table-cell>
          <table:table-cell office:value-type="string" table:formula="of:=IF([.S58]=&quot;CONTRADICTION&quot;;&quot;BLOCKED&quot;;IF([.S58]=&quot;UNKNOWN&quot;;&quot;UNKNOWN&quot;;IF([.S58]=&quot;CLEAR&quot;;IF(OR([.O58]=&quot;&quot;;[.P58]=&quot;&quot;);&quot;UNKNOWN&quot;;&quot;READY FOR REVIEW&quot;);&quot;BLOCKED&quot;)))">
            <text:p>UNKNOWN</text:p>
          </table:table-cell>
          <table:table-cell office:value-type="string" table:formula="of:=IF([.U58]=&quot;UNKNOWN&quot;;&quot;COMPLETE OR ASSERT REQUIRED EVIDENCE BEFORE REVIEW&quot;;IF([.U58]=&quot;BLOCKED&quot;;&quot;RESOLVE CONTRADICTION BEFORE REVIEW — NO AUTHORITY CREATED&quot;;IF([.U5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8]=&quot;READY FOR REVIEW&quot;;&quot;REVIEW ELIGIBLE — NO AUTHORITY&quot;;IF(OR([.U58]=&quot;UNKNOWN&quot;;[.U58]=&quot;BLOCKED&quot;);&quot;NOT REVIEW ELIGIBLE&quot;;&quot;NOT REVIEW ELIGIBLE&quot;))">
            <text:p>NOT REVIEW ELIGIBLE</text:p>
          </table:table-cell>
          <table:table-cell office:value-type="string" table:formula="of:=IF([.W58]=&quot;NOT REVIEW ELIGIBLE&quot;;&quot;DO NOT BEGIN SETTLEMENT REVIEW — RESOLVE READINESS OR CONTRADICTION CONDITIONS&quot;;IF([.W5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8]=&quot;&quot;;&quot;UNKNOWN&quot;;IF([.W58]&lt;&gt;&quot;REVIEW ELIGIBLE — NO AUTHORITY&quot;;&quot;BLOCKED — OUTCOME ASSERTED WITHOUT REVIEW ELIGIBILITY&quot;;IF(OR([.Y58]=&quot;REVIEWED — NO AUTHORITY&quot;;[.Y58]=&quot;REVIEW DEFERRED&quot;;[.Y5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59]=&quot;&quot;;IF(AND([.L59]=&quot;&quot;;[.N59]=&quot;&quot;);&quot;UNKNOWN&quot;;&quot;CONTRADICTION&quot;);IF([.M59]=&quot;UNMATCHED&quot;;IF(AND([.L59]=&quot;&quot;;[.N59]=&quot;&quot;);&quot;CLEAR&quot;;&quot;CONTRADICTION&quot;);IF([.M59]=&quot;SINGLE_SALE_LINKED&quot;;IF(AND([.L59]&lt;&gt;&quot;&quot;;[.N59]=&quot;&quot;);&quot;CLEAR&quot;;&quot;CONTRADICTION&quot;);IF([.M59]=&quot;MULTI_SALE_PENDING_ALLOCATION&quot;;IF([.L59]=&quot;&quot;;&quot;CLEAR&quot;;&quot;CONTRADICTION&quot;);IF([.M59]=&quot;ALLOCATED&quot;;IF(AND([.L59]=&quot;&quot;;[.N59]&lt;&gt;&quot;&quot;);&quot;CLEAR&quot;;&quot;CONTRADICTION&quot;);&quot;CONTRADICTION&quot;)))))">
            <text:p>UNKNOWN</text:p>
          </table:table-cell>
          <table:table-cell office:value-type="string" table:formula="of:=IF([.S59]=&quot;UNKNOWN&quot;;&quot;NO ACTION — linkage status is UNKNOWN / not asserted&quot;;IF([.S59]=&quot;CLEAR&quot;;&quot;NO CONTRADICTION — preserve evidence as entered&quot;;IF([.M59]=&quot;&quot;;&quot;REVIEW LINKAGE STATUS — identifiers are present while status is UNKNOWN&quot;;IF([.M59]=&quot;UNMATCHED&quot;;&quot;REMOVE LINKAGE IDENTIFIERS OR CORRECT LINKAGE STATUS&quot;;IF([.M59]=&quot;SINGLE_SALE_LINKED&quot;;&quot;REQUIRE LINKED SALE ID AND NO ALLOCATION GROUP ID&quot;;IF([.M59]=&quot;MULTI_SALE_PENDING_ALLOCATION&quot;;&quot;REMOVE LINKED SALE ID OR CORRECT LINKAGE STATUS&quot;;IF([.M59]=&quot;ALLOCATED&quot;;&quot;REQUIRE ALLOCATION GROUP ID AND NO LINKED SALE ID&quot;;&quot;REVIEW LINKAGE EVIDENCE — NO AUTHORITY CREATED&quot;)))))))">
            <text:p>NO ACTION — linkage status is UNKNOWN / not asserted</text:p>
          </table:table-cell>
          <table:table-cell office:value-type="string" table:formula="of:=IF([.S59]=&quot;CONTRADICTION&quot;;&quot;BLOCKED&quot;;IF([.S59]=&quot;UNKNOWN&quot;;&quot;UNKNOWN&quot;;IF([.S59]=&quot;CLEAR&quot;;IF(OR([.O59]=&quot;&quot;;[.P59]=&quot;&quot;);&quot;UNKNOWN&quot;;&quot;READY FOR REVIEW&quot;);&quot;BLOCKED&quot;)))">
            <text:p>UNKNOWN</text:p>
          </table:table-cell>
          <table:table-cell office:value-type="string" table:formula="of:=IF([.U59]=&quot;UNKNOWN&quot;;&quot;COMPLETE OR ASSERT REQUIRED EVIDENCE BEFORE REVIEW&quot;;IF([.U59]=&quot;BLOCKED&quot;;&quot;RESOLVE CONTRADICTION BEFORE REVIEW — NO AUTHORITY CREATED&quot;;IF([.U5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59]=&quot;READY FOR REVIEW&quot;;&quot;REVIEW ELIGIBLE — NO AUTHORITY&quot;;IF(OR([.U59]=&quot;UNKNOWN&quot;;[.U59]=&quot;BLOCKED&quot;);&quot;NOT REVIEW ELIGIBLE&quot;;&quot;NOT REVIEW ELIGIBLE&quot;))">
            <text:p>NOT REVIEW ELIGIBLE</text:p>
          </table:table-cell>
          <table:table-cell office:value-type="string" table:formula="of:=IF([.W59]=&quot;NOT REVIEW ELIGIBLE&quot;;&quot;DO NOT BEGIN SETTLEMENT REVIEW — RESOLVE READINESS OR CONTRADICTION CONDITIONS&quot;;IF([.W5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59]=&quot;&quot;;&quot;UNKNOWN&quot;;IF([.W59]&lt;&gt;&quot;REVIEW ELIGIBLE — NO AUTHORITY&quot;;&quot;BLOCKED — OUTCOME ASSERTED WITHOUT REVIEW ELIGIBILITY&quot;;IF(OR([.Y59]=&quot;REVIEWED — NO AUTHORITY&quot;;[.Y59]=&quot;REVIEW DEFERRED&quot;;[.Y5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0]=&quot;&quot;;IF(AND([.L60]=&quot;&quot;;[.N60]=&quot;&quot;);&quot;UNKNOWN&quot;;&quot;CONTRADICTION&quot;);IF([.M60]=&quot;UNMATCHED&quot;;IF(AND([.L60]=&quot;&quot;;[.N60]=&quot;&quot;);&quot;CLEAR&quot;;&quot;CONTRADICTION&quot;);IF([.M60]=&quot;SINGLE_SALE_LINKED&quot;;IF(AND([.L60]&lt;&gt;&quot;&quot;;[.N60]=&quot;&quot;);&quot;CLEAR&quot;;&quot;CONTRADICTION&quot;);IF([.M60]=&quot;MULTI_SALE_PENDING_ALLOCATION&quot;;IF([.L60]=&quot;&quot;;&quot;CLEAR&quot;;&quot;CONTRADICTION&quot;);IF([.M60]=&quot;ALLOCATED&quot;;IF(AND([.L60]=&quot;&quot;;[.N60]&lt;&gt;&quot;&quot;);&quot;CLEAR&quot;;&quot;CONTRADICTION&quot;);&quot;CONTRADICTION&quot;)))))">
            <text:p>UNKNOWN</text:p>
          </table:table-cell>
          <table:table-cell office:value-type="string" table:formula="of:=IF([.S60]=&quot;UNKNOWN&quot;;&quot;NO ACTION — linkage status is UNKNOWN / not asserted&quot;;IF([.S60]=&quot;CLEAR&quot;;&quot;NO CONTRADICTION — preserve evidence as entered&quot;;IF([.M60]=&quot;&quot;;&quot;REVIEW LINKAGE STATUS — identifiers are present while status is UNKNOWN&quot;;IF([.M60]=&quot;UNMATCHED&quot;;&quot;REMOVE LINKAGE IDENTIFIERS OR CORRECT LINKAGE STATUS&quot;;IF([.M60]=&quot;SINGLE_SALE_LINKED&quot;;&quot;REQUIRE LINKED SALE ID AND NO ALLOCATION GROUP ID&quot;;IF([.M60]=&quot;MULTI_SALE_PENDING_ALLOCATION&quot;;&quot;REMOVE LINKED SALE ID OR CORRECT LINKAGE STATUS&quot;;IF([.M60]=&quot;ALLOCATED&quot;;&quot;REQUIRE ALLOCATION GROUP ID AND NO LINKED SALE ID&quot;;&quot;REVIEW LINKAGE EVIDENCE — NO AUTHORITY CREATED&quot;)))))))">
            <text:p>NO ACTION — linkage status is UNKNOWN / not asserted</text:p>
          </table:table-cell>
          <table:table-cell office:value-type="string" table:formula="of:=IF([.S60]=&quot;CONTRADICTION&quot;;&quot;BLOCKED&quot;;IF([.S60]=&quot;UNKNOWN&quot;;&quot;UNKNOWN&quot;;IF([.S60]=&quot;CLEAR&quot;;IF(OR([.O60]=&quot;&quot;;[.P60]=&quot;&quot;);&quot;UNKNOWN&quot;;&quot;READY FOR REVIEW&quot;);&quot;BLOCKED&quot;)))">
            <text:p>UNKNOWN</text:p>
          </table:table-cell>
          <table:table-cell office:value-type="string" table:formula="of:=IF([.U60]=&quot;UNKNOWN&quot;;&quot;COMPLETE OR ASSERT REQUIRED EVIDENCE BEFORE REVIEW&quot;;IF([.U60]=&quot;BLOCKED&quot;;&quot;RESOLVE CONTRADICTION BEFORE REVIEW — NO AUTHORITY CREATED&quot;;IF([.U6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0]=&quot;READY FOR REVIEW&quot;;&quot;REVIEW ELIGIBLE — NO AUTHORITY&quot;;IF(OR([.U60]=&quot;UNKNOWN&quot;;[.U60]=&quot;BLOCKED&quot;);&quot;NOT REVIEW ELIGIBLE&quot;;&quot;NOT REVIEW ELIGIBLE&quot;))">
            <text:p>NOT REVIEW ELIGIBLE</text:p>
          </table:table-cell>
          <table:table-cell office:value-type="string" table:formula="of:=IF([.W60]=&quot;NOT REVIEW ELIGIBLE&quot;;&quot;DO NOT BEGIN SETTLEMENT REVIEW — RESOLVE READINESS OR CONTRADICTION CONDITIONS&quot;;IF([.W6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0]=&quot;&quot;;&quot;UNKNOWN&quot;;IF([.W60]&lt;&gt;&quot;REVIEW ELIGIBLE — NO AUTHORITY&quot;;&quot;BLOCKED — OUTCOME ASSERTED WITHOUT REVIEW ELIGIBILITY&quot;;IF(OR([.Y60]=&quot;REVIEWED — NO AUTHORITY&quot;;[.Y60]=&quot;REVIEW DEFERRED&quot;;[.Y6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1]=&quot;&quot;;IF(AND([.L61]=&quot;&quot;;[.N61]=&quot;&quot;);&quot;UNKNOWN&quot;;&quot;CONTRADICTION&quot;);IF([.M61]=&quot;UNMATCHED&quot;;IF(AND([.L61]=&quot;&quot;;[.N61]=&quot;&quot;);&quot;CLEAR&quot;;&quot;CONTRADICTION&quot;);IF([.M61]=&quot;SINGLE_SALE_LINKED&quot;;IF(AND([.L61]&lt;&gt;&quot;&quot;;[.N61]=&quot;&quot;);&quot;CLEAR&quot;;&quot;CONTRADICTION&quot;);IF([.M61]=&quot;MULTI_SALE_PENDING_ALLOCATION&quot;;IF([.L61]=&quot;&quot;;&quot;CLEAR&quot;;&quot;CONTRADICTION&quot;);IF([.M61]=&quot;ALLOCATED&quot;;IF(AND([.L61]=&quot;&quot;;[.N61]&lt;&gt;&quot;&quot;);&quot;CLEAR&quot;;&quot;CONTRADICTION&quot;);&quot;CONTRADICTION&quot;)))))">
            <text:p>UNKNOWN</text:p>
          </table:table-cell>
          <table:table-cell office:value-type="string" table:formula="of:=IF([.S61]=&quot;UNKNOWN&quot;;&quot;NO ACTION — linkage status is UNKNOWN / not asserted&quot;;IF([.S61]=&quot;CLEAR&quot;;&quot;NO CONTRADICTION — preserve evidence as entered&quot;;IF([.M61]=&quot;&quot;;&quot;REVIEW LINKAGE STATUS — identifiers are present while status is UNKNOWN&quot;;IF([.M61]=&quot;UNMATCHED&quot;;&quot;REMOVE LINKAGE IDENTIFIERS OR CORRECT LINKAGE STATUS&quot;;IF([.M61]=&quot;SINGLE_SALE_LINKED&quot;;&quot;REQUIRE LINKED SALE ID AND NO ALLOCATION GROUP ID&quot;;IF([.M61]=&quot;MULTI_SALE_PENDING_ALLOCATION&quot;;&quot;REMOVE LINKED SALE ID OR CORRECT LINKAGE STATUS&quot;;IF([.M61]=&quot;ALLOCATED&quot;;&quot;REQUIRE ALLOCATION GROUP ID AND NO LINKED SALE ID&quot;;&quot;REVIEW LINKAGE EVIDENCE — NO AUTHORITY CREATED&quot;)))))))">
            <text:p>NO ACTION — linkage status is UNKNOWN / not asserted</text:p>
          </table:table-cell>
          <table:table-cell office:value-type="string" table:formula="of:=IF([.S61]=&quot;CONTRADICTION&quot;;&quot;BLOCKED&quot;;IF([.S61]=&quot;UNKNOWN&quot;;&quot;UNKNOWN&quot;;IF([.S61]=&quot;CLEAR&quot;;IF(OR([.O61]=&quot;&quot;;[.P61]=&quot;&quot;);&quot;UNKNOWN&quot;;&quot;READY FOR REVIEW&quot;);&quot;BLOCKED&quot;)))">
            <text:p>UNKNOWN</text:p>
          </table:table-cell>
          <table:table-cell office:value-type="string" table:formula="of:=IF([.U61]=&quot;UNKNOWN&quot;;&quot;COMPLETE OR ASSERT REQUIRED EVIDENCE BEFORE REVIEW&quot;;IF([.U61]=&quot;BLOCKED&quot;;&quot;RESOLVE CONTRADICTION BEFORE REVIEW — NO AUTHORITY CREATED&quot;;IF([.U6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1]=&quot;READY FOR REVIEW&quot;;&quot;REVIEW ELIGIBLE — NO AUTHORITY&quot;;IF(OR([.U61]=&quot;UNKNOWN&quot;;[.U61]=&quot;BLOCKED&quot;);&quot;NOT REVIEW ELIGIBLE&quot;;&quot;NOT REVIEW ELIGIBLE&quot;))">
            <text:p>NOT REVIEW ELIGIBLE</text:p>
          </table:table-cell>
          <table:table-cell office:value-type="string" table:formula="of:=IF([.W61]=&quot;NOT REVIEW ELIGIBLE&quot;;&quot;DO NOT BEGIN SETTLEMENT REVIEW — RESOLVE READINESS OR CONTRADICTION CONDITIONS&quot;;IF([.W6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1]=&quot;&quot;;&quot;UNKNOWN&quot;;IF([.W61]&lt;&gt;&quot;REVIEW ELIGIBLE — NO AUTHORITY&quot;;&quot;BLOCKED — OUTCOME ASSERTED WITHOUT REVIEW ELIGIBILITY&quot;;IF(OR([.Y61]=&quot;REVIEWED — NO AUTHORITY&quot;;[.Y61]=&quot;REVIEW DEFERRED&quot;;[.Y61]=&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2]=&quot;&quot;;IF(AND([.L62]=&quot;&quot;;[.N62]=&quot;&quot;);&quot;UNKNOWN&quot;;&quot;CONTRADICTION&quot;);IF([.M62]=&quot;UNMATCHED&quot;;IF(AND([.L62]=&quot;&quot;;[.N62]=&quot;&quot;);&quot;CLEAR&quot;;&quot;CONTRADICTION&quot;);IF([.M62]=&quot;SINGLE_SALE_LINKED&quot;;IF(AND([.L62]&lt;&gt;&quot;&quot;;[.N62]=&quot;&quot;);&quot;CLEAR&quot;;&quot;CONTRADICTION&quot;);IF([.M62]=&quot;MULTI_SALE_PENDING_ALLOCATION&quot;;IF([.L62]=&quot;&quot;;&quot;CLEAR&quot;;&quot;CONTRADICTION&quot;);IF([.M62]=&quot;ALLOCATED&quot;;IF(AND([.L62]=&quot;&quot;;[.N62]&lt;&gt;&quot;&quot;);&quot;CLEAR&quot;;&quot;CONTRADICTION&quot;);&quot;CONTRADICTION&quot;)))))">
            <text:p>UNKNOWN</text:p>
          </table:table-cell>
          <table:table-cell office:value-type="string" table:formula="of:=IF([.S62]=&quot;UNKNOWN&quot;;&quot;NO ACTION — linkage status is UNKNOWN / not asserted&quot;;IF([.S62]=&quot;CLEAR&quot;;&quot;NO CONTRADICTION — preserve evidence as entered&quot;;IF([.M62]=&quot;&quot;;&quot;REVIEW LINKAGE STATUS — identifiers are present while status is UNKNOWN&quot;;IF([.M62]=&quot;UNMATCHED&quot;;&quot;REMOVE LINKAGE IDENTIFIERS OR CORRECT LINKAGE STATUS&quot;;IF([.M62]=&quot;SINGLE_SALE_LINKED&quot;;&quot;REQUIRE LINKED SALE ID AND NO ALLOCATION GROUP ID&quot;;IF([.M62]=&quot;MULTI_SALE_PENDING_ALLOCATION&quot;;&quot;REMOVE LINKED SALE ID OR CORRECT LINKAGE STATUS&quot;;IF([.M62]=&quot;ALLOCATED&quot;;&quot;REQUIRE ALLOCATION GROUP ID AND NO LINKED SALE ID&quot;;&quot;REVIEW LINKAGE EVIDENCE — NO AUTHORITY CREATED&quot;)))))))">
            <text:p>NO ACTION — linkage status is UNKNOWN / not asserted</text:p>
          </table:table-cell>
          <table:table-cell office:value-type="string" table:formula="of:=IF([.S62]=&quot;CONTRADICTION&quot;;&quot;BLOCKED&quot;;IF([.S62]=&quot;UNKNOWN&quot;;&quot;UNKNOWN&quot;;IF([.S62]=&quot;CLEAR&quot;;IF(OR([.O62]=&quot;&quot;;[.P62]=&quot;&quot;);&quot;UNKNOWN&quot;;&quot;READY FOR REVIEW&quot;);&quot;BLOCKED&quot;)))">
            <text:p>UNKNOWN</text:p>
          </table:table-cell>
          <table:table-cell office:value-type="string" table:formula="of:=IF([.U62]=&quot;UNKNOWN&quot;;&quot;COMPLETE OR ASSERT REQUIRED EVIDENCE BEFORE REVIEW&quot;;IF([.U62]=&quot;BLOCKED&quot;;&quot;RESOLVE CONTRADICTION BEFORE REVIEW — NO AUTHORITY CREATED&quot;;IF([.U6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2]=&quot;READY FOR REVIEW&quot;;&quot;REVIEW ELIGIBLE — NO AUTHORITY&quot;;IF(OR([.U62]=&quot;UNKNOWN&quot;;[.U62]=&quot;BLOCKED&quot;);&quot;NOT REVIEW ELIGIBLE&quot;;&quot;NOT REVIEW ELIGIBLE&quot;))">
            <text:p>NOT REVIEW ELIGIBLE</text:p>
          </table:table-cell>
          <table:table-cell office:value-type="string" table:formula="of:=IF([.W62]=&quot;NOT REVIEW ELIGIBLE&quot;;&quot;DO NOT BEGIN SETTLEMENT REVIEW — RESOLVE READINESS OR CONTRADICTION CONDITIONS&quot;;IF([.W6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2]=&quot;&quot;;&quot;UNKNOWN&quot;;IF([.W62]&lt;&gt;&quot;REVIEW ELIGIBLE — NO AUTHORITY&quot;;&quot;BLOCKED — OUTCOME ASSERTED WITHOUT REVIEW ELIGIBILITY&quot;;IF(OR([.Y62]=&quot;REVIEWED — NO AUTHORITY&quot;;[.Y62]=&quot;REVIEW DEFERRED&quot;;[.Y6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3]=&quot;&quot;;IF(AND([.L63]=&quot;&quot;;[.N63]=&quot;&quot;);&quot;UNKNOWN&quot;;&quot;CONTRADICTION&quot;);IF([.M63]=&quot;UNMATCHED&quot;;IF(AND([.L63]=&quot;&quot;;[.N63]=&quot;&quot;);&quot;CLEAR&quot;;&quot;CONTRADICTION&quot;);IF([.M63]=&quot;SINGLE_SALE_LINKED&quot;;IF(AND([.L63]&lt;&gt;&quot;&quot;;[.N63]=&quot;&quot;);&quot;CLEAR&quot;;&quot;CONTRADICTION&quot;);IF([.M63]=&quot;MULTI_SALE_PENDING_ALLOCATION&quot;;IF([.L63]=&quot;&quot;;&quot;CLEAR&quot;;&quot;CONTRADICTION&quot;);IF([.M63]=&quot;ALLOCATED&quot;;IF(AND([.L63]=&quot;&quot;;[.N63]&lt;&gt;&quot;&quot;);&quot;CLEAR&quot;;&quot;CONTRADICTION&quot;);&quot;CONTRADICTION&quot;)))))">
            <text:p>UNKNOWN</text:p>
          </table:table-cell>
          <table:table-cell office:value-type="string" table:formula="of:=IF([.S63]=&quot;UNKNOWN&quot;;&quot;NO ACTION — linkage status is UNKNOWN / not asserted&quot;;IF([.S63]=&quot;CLEAR&quot;;&quot;NO CONTRADICTION — preserve evidence as entered&quot;;IF([.M63]=&quot;&quot;;&quot;REVIEW LINKAGE STATUS — identifiers are present while status is UNKNOWN&quot;;IF([.M63]=&quot;UNMATCHED&quot;;&quot;REMOVE LINKAGE IDENTIFIERS OR CORRECT LINKAGE STATUS&quot;;IF([.M63]=&quot;SINGLE_SALE_LINKED&quot;;&quot;REQUIRE LINKED SALE ID AND NO ALLOCATION GROUP ID&quot;;IF([.M63]=&quot;MULTI_SALE_PENDING_ALLOCATION&quot;;&quot;REMOVE LINKED SALE ID OR CORRECT LINKAGE STATUS&quot;;IF([.M63]=&quot;ALLOCATED&quot;;&quot;REQUIRE ALLOCATION GROUP ID AND NO LINKED SALE ID&quot;;&quot;REVIEW LINKAGE EVIDENCE — NO AUTHORITY CREATED&quot;)))))))">
            <text:p>NO ACTION — linkage status is UNKNOWN / not asserted</text:p>
          </table:table-cell>
          <table:table-cell office:value-type="string" table:formula="of:=IF([.S63]=&quot;CONTRADICTION&quot;;&quot;BLOCKED&quot;;IF([.S63]=&quot;UNKNOWN&quot;;&quot;UNKNOWN&quot;;IF([.S63]=&quot;CLEAR&quot;;IF(OR([.O63]=&quot;&quot;;[.P63]=&quot;&quot;);&quot;UNKNOWN&quot;;&quot;READY FOR REVIEW&quot;);&quot;BLOCKED&quot;)))">
            <text:p>UNKNOWN</text:p>
          </table:table-cell>
          <table:table-cell office:value-type="string" table:formula="of:=IF([.U63]=&quot;UNKNOWN&quot;;&quot;COMPLETE OR ASSERT REQUIRED EVIDENCE BEFORE REVIEW&quot;;IF([.U63]=&quot;BLOCKED&quot;;&quot;RESOLVE CONTRADICTION BEFORE REVIEW — NO AUTHORITY CREATED&quot;;IF([.U6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3]=&quot;READY FOR REVIEW&quot;;&quot;REVIEW ELIGIBLE — NO AUTHORITY&quot;;IF(OR([.U63]=&quot;UNKNOWN&quot;;[.U63]=&quot;BLOCKED&quot;);&quot;NOT REVIEW ELIGIBLE&quot;;&quot;NOT REVIEW ELIGIBLE&quot;))">
            <text:p>NOT REVIEW ELIGIBLE</text:p>
          </table:table-cell>
          <table:table-cell office:value-type="string" table:formula="of:=IF([.W63]=&quot;NOT REVIEW ELIGIBLE&quot;;&quot;DO NOT BEGIN SETTLEMENT REVIEW — RESOLVE READINESS OR CONTRADICTION CONDITIONS&quot;;IF([.W6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3]=&quot;&quot;;&quot;UNKNOWN&quot;;IF([.W63]&lt;&gt;&quot;REVIEW ELIGIBLE — NO AUTHORITY&quot;;&quot;BLOCKED — OUTCOME ASSERTED WITHOUT REVIEW ELIGIBILITY&quot;;IF(OR([.Y63]=&quot;REVIEWED — NO AUTHORITY&quot;;[.Y63]=&quot;REVIEW DEFERRED&quot;;[.Y6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4]=&quot;&quot;;IF(AND([.L64]=&quot;&quot;;[.N64]=&quot;&quot;);&quot;UNKNOWN&quot;;&quot;CONTRADICTION&quot;);IF([.M64]=&quot;UNMATCHED&quot;;IF(AND([.L64]=&quot;&quot;;[.N64]=&quot;&quot;);&quot;CLEAR&quot;;&quot;CONTRADICTION&quot;);IF([.M64]=&quot;SINGLE_SALE_LINKED&quot;;IF(AND([.L64]&lt;&gt;&quot;&quot;;[.N64]=&quot;&quot;);&quot;CLEAR&quot;;&quot;CONTRADICTION&quot;);IF([.M64]=&quot;MULTI_SALE_PENDING_ALLOCATION&quot;;IF([.L64]=&quot;&quot;;&quot;CLEAR&quot;;&quot;CONTRADICTION&quot;);IF([.M64]=&quot;ALLOCATED&quot;;IF(AND([.L64]=&quot;&quot;;[.N64]&lt;&gt;&quot;&quot;);&quot;CLEAR&quot;;&quot;CONTRADICTION&quot;);&quot;CONTRADICTION&quot;)))))">
            <text:p>UNKNOWN</text:p>
          </table:table-cell>
          <table:table-cell office:value-type="string" table:formula="of:=IF([.S64]=&quot;UNKNOWN&quot;;&quot;NO ACTION — linkage status is UNKNOWN / not asserted&quot;;IF([.S64]=&quot;CLEAR&quot;;&quot;NO CONTRADICTION — preserve evidence as entered&quot;;IF([.M64]=&quot;&quot;;&quot;REVIEW LINKAGE STATUS — identifiers are present while status is UNKNOWN&quot;;IF([.M64]=&quot;UNMATCHED&quot;;&quot;REMOVE LINKAGE IDENTIFIERS OR CORRECT LINKAGE STATUS&quot;;IF([.M64]=&quot;SINGLE_SALE_LINKED&quot;;&quot;REQUIRE LINKED SALE ID AND NO ALLOCATION GROUP ID&quot;;IF([.M64]=&quot;MULTI_SALE_PENDING_ALLOCATION&quot;;&quot;REMOVE LINKED SALE ID OR CORRECT LINKAGE STATUS&quot;;IF([.M64]=&quot;ALLOCATED&quot;;&quot;REQUIRE ALLOCATION GROUP ID AND NO LINKED SALE ID&quot;;&quot;REVIEW LINKAGE EVIDENCE — NO AUTHORITY CREATED&quot;)))))))">
            <text:p>NO ACTION — linkage status is UNKNOWN / not asserted</text:p>
          </table:table-cell>
          <table:table-cell office:value-type="string" table:formula="of:=IF([.S64]=&quot;CONTRADICTION&quot;;&quot;BLOCKED&quot;;IF([.S64]=&quot;UNKNOWN&quot;;&quot;UNKNOWN&quot;;IF([.S64]=&quot;CLEAR&quot;;IF(OR([.O64]=&quot;&quot;;[.P64]=&quot;&quot;);&quot;UNKNOWN&quot;;&quot;READY FOR REVIEW&quot;);&quot;BLOCKED&quot;)))">
            <text:p>UNKNOWN</text:p>
          </table:table-cell>
          <table:table-cell office:value-type="string" table:formula="of:=IF([.U64]=&quot;UNKNOWN&quot;;&quot;COMPLETE OR ASSERT REQUIRED EVIDENCE BEFORE REVIEW&quot;;IF([.U64]=&quot;BLOCKED&quot;;&quot;RESOLVE CONTRADICTION BEFORE REVIEW — NO AUTHORITY CREATED&quot;;IF([.U6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4]=&quot;READY FOR REVIEW&quot;;&quot;REVIEW ELIGIBLE — NO AUTHORITY&quot;;IF(OR([.U64]=&quot;UNKNOWN&quot;;[.U64]=&quot;BLOCKED&quot;);&quot;NOT REVIEW ELIGIBLE&quot;;&quot;NOT REVIEW ELIGIBLE&quot;))">
            <text:p>NOT REVIEW ELIGIBLE</text:p>
          </table:table-cell>
          <table:table-cell office:value-type="string" table:formula="of:=IF([.W64]=&quot;NOT REVIEW ELIGIBLE&quot;;&quot;DO NOT BEGIN SETTLEMENT REVIEW — RESOLVE READINESS OR CONTRADICTION CONDITIONS&quot;;IF([.W6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4]=&quot;&quot;;&quot;UNKNOWN&quot;;IF([.W64]&lt;&gt;&quot;REVIEW ELIGIBLE — NO AUTHORITY&quot;;&quot;BLOCKED — OUTCOME ASSERTED WITHOUT REVIEW ELIGIBILITY&quot;;IF(OR([.Y64]=&quot;REVIEWED — NO AUTHORITY&quot;;[.Y64]=&quot;REVIEW DEFERRED&quot;;[.Y6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5]=&quot;&quot;;IF(AND([.L65]=&quot;&quot;;[.N65]=&quot;&quot;);&quot;UNKNOWN&quot;;&quot;CONTRADICTION&quot;);IF([.M65]=&quot;UNMATCHED&quot;;IF(AND([.L65]=&quot;&quot;;[.N65]=&quot;&quot;);&quot;CLEAR&quot;;&quot;CONTRADICTION&quot;);IF([.M65]=&quot;SINGLE_SALE_LINKED&quot;;IF(AND([.L65]&lt;&gt;&quot;&quot;;[.N65]=&quot;&quot;);&quot;CLEAR&quot;;&quot;CONTRADICTION&quot;);IF([.M65]=&quot;MULTI_SALE_PENDING_ALLOCATION&quot;;IF([.L65]=&quot;&quot;;&quot;CLEAR&quot;;&quot;CONTRADICTION&quot;);IF([.M65]=&quot;ALLOCATED&quot;;IF(AND([.L65]=&quot;&quot;;[.N65]&lt;&gt;&quot;&quot;);&quot;CLEAR&quot;;&quot;CONTRADICTION&quot;);&quot;CONTRADICTION&quot;)))))">
            <text:p>UNKNOWN</text:p>
          </table:table-cell>
          <table:table-cell office:value-type="string" table:formula="of:=IF([.S65]=&quot;UNKNOWN&quot;;&quot;NO ACTION — linkage status is UNKNOWN / not asserted&quot;;IF([.S65]=&quot;CLEAR&quot;;&quot;NO CONTRADICTION — preserve evidence as entered&quot;;IF([.M65]=&quot;&quot;;&quot;REVIEW LINKAGE STATUS — identifiers are present while status is UNKNOWN&quot;;IF([.M65]=&quot;UNMATCHED&quot;;&quot;REMOVE LINKAGE IDENTIFIERS OR CORRECT LINKAGE STATUS&quot;;IF([.M65]=&quot;SINGLE_SALE_LINKED&quot;;&quot;REQUIRE LINKED SALE ID AND NO ALLOCATION GROUP ID&quot;;IF([.M65]=&quot;MULTI_SALE_PENDING_ALLOCATION&quot;;&quot;REMOVE LINKED SALE ID OR CORRECT LINKAGE STATUS&quot;;IF([.M65]=&quot;ALLOCATED&quot;;&quot;REQUIRE ALLOCATION GROUP ID AND NO LINKED SALE ID&quot;;&quot;REVIEW LINKAGE EVIDENCE — NO AUTHORITY CREATED&quot;)))))))">
            <text:p>NO ACTION — linkage status is UNKNOWN / not asserted</text:p>
          </table:table-cell>
          <table:table-cell office:value-type="string" table:formula="of:=IF([.S65]=&quot;CONTRADICTION&quot;;&quot;BLOCKED&quot;;IF([.S65]=&quot;UNKNOWN&quot;;&quot;UNKNOWN&quot;;IF([.S65]=&quot;CLEAR&quot;;IF(OR([.O65]=&quot;&quot;;[.P65]=&quot;&quot;);&quot;UNKNOWN&quot;;&quot;READY FOR REVIEW&quot;);&quot;BLOCKED&quot;)))">
            <text:p>UNKNOWN</text:p>
          </table:table-cell>
          <table:table-cell office:value-type="string" table:formula="of:=IF([.U65]=&quot;UNKNOWN&quot;;&quot;COMPLETE OR ASSERT REQUIRED EVIDENCE BEFORE REVIEW&quot;;IF([.U65]=&quot;BLOCKED&quot;;&quot;RESOLVE CONTRADICTION BEFORE REVIEW — NO AUTHORITY CREATED&quot;;IF([.U6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5]=&quot;READY FOR REVIEW&quot;;&quot;REVIEW ELIGIBLE — NO AUTHORITY&quot;;IF(OR([.U65]=&quot;UNKNOWN&quot;;[.U65]=&quot;BLOCKED&quot;);&quot;NOT REVIEW ELIGIBLE&quot;;&quot;NOT REVIEW ELIGIBLE&quot;))">
            <text:p>NOT REVIEW ELIGIBLE</text:p>
          </table:table-cell>
          <table:table-cell office:value-type="string" table:formula="of:=IF([.W65]=&quot;NOT REVIEW ELIGIBLE&quot;;&quot;DO NOT BEGIN SETTLEMENT REVIEW — RESOLVE READINESS OR CONTRADICTION CONDITIONS&quot;;IF([.W6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5]=&quot;&quot;;&quot;UNKNOWN&quot;;IF([.W65]&lt;&gt;&quot;REVIEW ELIGIBLE — NO AUTHORITY&quot;;&quot;BLOCKED — OUTCOME ASSERTED WITHOUT REVIEW ELIGIBILITY&quot;;IF(OR([.Y65]=&quot;REVIEWED — NO AUTHORITY&quot;;[.Y65]=&quot;REVIEW DEFERRED&quot;;[.Y6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6]=&quot;&quot;;IF(AND([.L66]=&quot;&quot;;[.N66]=&quot;&quot;);&quot;UNKNOWN&quot;;&quot;CONTRADICTION&quot;);IF([.M66]=&quot;UNMATCHED&quot;;IF(AND([.L66]=&quot;&quot;;[.N66]=&quot;&quot;);&quot;CLEAR&quot;;&quot;CONTRADICTION&quot;);IF([.M66]=&quot;SINGLE_SALE_LINKED&quot;;IF(AND([.L66]&lt;&gt;&quot;&quot;;[.N66]=&quot;&quot;);&quot;CLEAR&quot;;&quot;CONTRADICTION&quot;);IF([.M66]=&quot;MULTI_SALE_PENDING_ALLOCATION&quot;;IF([.L66]=&quot;&quot;;&quot;CLEAR&quot;;&quot;CONTRADICTION&quot;);IF([.M66]=&quot;ALLOCATED&quot;;IF(AND([.L66]=&quot;&quot;;[.N66]&lt;&gt;&quot;&quot;);&quot;CLEAR&quot;;&quot;CONTRADICTION&quot;);&quot;CONTRADICTION&quot;)))))">
            <text:p>UNKNOWN</text:p>
          </table:table-cell>
          <table:table-cell office:value-type="string" table:formula="of:=IF([.S66]=&quot;UNKNOWN&quot;;&quot;NO ACTION — linkage status is UNKNOWN / not asserted&quot;;IF([.S66]=&quot;CLEAR&quot;;&quot;NO CONTRADICTION — preserve evidence as entered&quot;;IF([.M66]=&quot;&quot;;&quot;REVIEW LINKAGE STATUS — identifiers are present while status is UNKNOWN&quot;;IF([.M66]=&quot;UNMATCHED&quot;;&quot;REMOVE LINKAGE IDENTIFIERS OR CORRECT LINKAGE STATUS&quot;;IF([.M66]=&quot;SINGLE_SALE_LINKED&quot;;&quot;REQUIRE LINKED SALE ID AND NO ALLOCATION GROUP ID&quot;;IF([.M66]=&quot;MULTI_SALE_PENDING_ALLOCATION&quot;;&quot;REMOVE LINKED SALE ID OR CORRECT LINKAGE STATUS&quot;;IF([.M66]=&quot;ALLOCATED&quot;;&quot;REQUIRE ALLOCATION GROUP ID AND NO LINKED SALE ID&quot;;&quot;REVIEW LINKAGE EVIDENCE — NO AUTHORITY CREATED&quot;)))))))">
            <text:p>NO ACTION — linkage status is UNKNOWN / not asserted</text:p>
          </table:table-cell>
          <table:table-cell office:value-type="string" table:formula="of:=IF([.S66]=&quot;CONTRADICTION&quot;;&quot;BLOCKED&quot;;IF([.S66]=&quot;UNKNOWN&quot;;&quot;UNKNOWN&quot;;IF([.S66]=&quot;CLEAR&quot;;IF(OR([.O66]=&quot;&quot;;[.P66]=&quot;&quot;);&quot;UNKNOWN&quot;;&quot;READY FOR REVIEW&quot;);&quot;BLOCKED&quot;)))">
            <text:p>UNKNOWN</text:p>
          </table:table-cell>
          <table:table-cell office:value-type="string" table:formula="of:=IF([.U66]=&quot;UNKNOWN&quot;;&quot;COMPLETE OR ASSERT REQUIRED EVIDENCE BEFORE REVIEW&quot;;IF([.U66]=&quot;BLOCKED&quot;;&quot;RESOLVE CONTRADICTION BEFORE REVIEW — NO AUTHORITY CREATED&quot;;IF([.U6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6]=&quot;READY FOR REVIEW&quot;;&quot;REVIEW ELIGIBLE — NO AUTHORITY&quot;;IF(OR([.U66]=&quot;UNKNOWN&quot;;[.U66]=&quot;BLOCKED&quot;);&quot;NOT REVIEW ELIGIBLE&quot;;&quot;NOT REVIEW ELIGIBLE&quot;))">
            <text:p>NOT REVIEW ELIGIBLE</text:p>
          </table:table-cell>
          <table:table-cell office:value-type="string" table:formula="of:=IF([.W66]=&quot;NOT REVIEW ELIGIBLE&quot;;&quot;DO NOT BEGIN SETTLEMENT REVIEW — RESOLVE READINESS OR CONTRADICTION CONDITIONS&quot;;IF([.W6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6]=&quot;&quot;;&quot;UNKNOWN&quot;;IF([.W66]&lt;&gt;&quot;REVIEW ELIGIBLE — NO AUTHORITY&quot;;&quot;BLOCKED — OUTCOME ASSERTED WITHOUT REVIEW ELIGIBILITY&quot;;IF(OR([.Y66]=&quot;REVIEWED — NO AUTHORITY&quot;;[.Y66]=&quot;REVIEW DEFERRED&quot;;[.Y6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7]=&quot;&quot;;IF(AND([.L67]=&quot;&quot;;[.N67]=&quot;&quot;);&quot;UNKNOWN&quot;;&quot;CONTRADICTION&quot;);IF([.M67]=&quot;UNMATCHED&quot;;IF(AND([.L67]=&quot;&quot;;[.N67]=&quot;&quot;);&quot;CLEAR&quot;;&quot;CONTRADICTION&quot;);IF([.M67]=&quot;SINGLE_SALE_LINKED&quot;;IF(AND([.L67]&lt;&gt;&quot;&quot;;[.N67]=&quot;&quot;);&quot;CLEAR&quot;;&quot;CONTRADICTION&quot;);IF([.M67]=&quot;MULTI_SALE_PENDING_ALLOCATION&quot;;IF([.L67]=&quot;&quot;;&quot;CLEAR&quot;;&quot;CONTRADICTION&quot;);IF([.M67]=&quot;ALLOCATED&quot;;IF(AND([.L67]=&quot;&quot;;[.N67]&lt;&gt;&quot;&quot;);&quot;CLEAR&quot;;&quot;CONTRADICTION&quot;);&quot;CONTRADICTION&quot;)))))">
            <text:p>UNKNOWN</text:p>
          </table:table-cell>
          <table:table-cell office:value-type="string" table:formula="of:=IF([.S67]=&quot;UNKNOWN&quot;;&quot;NO ACTION — linkage status is UNKNOWN / not asserted&quot;;IF([.S67]=&quot;CLEAR&quot;;&quot;NO CONTRADICTION — preserve evidence as entered&quot;;IF([.M67]=&quot;&quot;;&quot;REVIEW LINKAGE STATUS — identifiers are present while status is UNKNOWN&quot;;IF([.M67]=&quot;UNMATCHED&quot;;&quot;REMOVE LINKAGE IDENTIFIERS OR CORRECT LINKAGE STATUS&quot;;IF([.M67]=&quot;SINGLE_SALE_LINKED&quot;;&quot;REQUIRE LINKED SALE ID AND NO ALLOCATION GROUP ID&quot;;IF([.M67]=&quot;MULTI_SALE_PENDING_ALLOCATION&quot;;&quot;REMOVE LINKED SALE ID OR CORRECT LINKAGE STATUS&quot;;IF([.M67]=&quot;ALLOCATED&quot;;&quot;REQUIRE ALLOCATION GROUP ID AND NO LINKED SALE ID&quot;;&quot;REVIEW LINKAGE EVIDENCE — NO AUTHORITY CREATED&quot;)))))))">
            <text:p>NO ACTION — linkage status is UNKNOWN / not asserted</text:p>
          </table:table-cell>
          <table:table-cell office:value-type="string" table:formula="of:=IF([.S67]=&quot;CONTRADICTION&quot;;&quot;BLOCKED&quot;;IF([.S67]=&quot;UNKNOWN&quot;;&quot;UNKNOWN&quot;;IF([.S67]=&quot;CLEAR&quot;;IF(OR([.O67]=&quot;&quot;;[.P67]=&quot;&quot;);&quot;UNKNOWN&quot;;&quot;READY FOR REVIEW&quot;);&quot;BLOCKED&quot;)))">
            <text:p>UNKNOWN</text:p>
          </table:table-cell>
          <table:table-cell office:value-type="string" table:formula="of:=IF([.U67]=&quot;UNKNOWN&quot;;&quot;COMPLETE OR ASSERT REQUIRED EVIDENCE BEFORE REVIEW&quot;;IF([.U67]=&quot;BLOCKED&quot;;&quot;RESOLVE CONTRADICTION BEFORE REVIEW — NO AUTHORITY CREATED&quot;;IF([.U6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7]=&quot;READY FOR REVIEW&quot;;&quot;REVIEW ELIGIBLE — NO AUTHORITY&quot;;IF(OR([.U67]=&quot;UNKNOWN&quot;;[.U67]=&quot;BLOCKED&quot;);&quot;NOT REVIEW ELIGIBLE&quot;;&quot;NOT REVIEW ELIGIBLE&quot;))">
            <text:p>NOT REVIEW ELIGIBLE</text:p>
          </table:table-cell>
          <table:table-cell office:value-type="string" table:formula="of:=IF([.W67]=&quot;NOT REVIEW ELIGIBLE&quot;;&quot;DO NOT BEGIN SETTLEMENT REVIEW — RESOLVE READINESS OR CONTRADICTION CONDITIONS&quot;;IF([.W6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7]=&quot;&quot;;&quot;UNKNOWN&quot;;IF([.W67]&lt;&gt;&quot;REVIEW ELIGIBLE — NO AUTHORITY&quot;;&quot;BLOCKED — OUTCOME ASSERTED WITHOUT REVIEW ELIGIBILITY&quot;;IF(OR([.Y67]=&quot;REVIEWED — NO AUTHORITY&quot;;[.Y67]=&quot;REVIEW DEFERRED&quot;;[.Y6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8]=&quot;&quot;;IF(AND([.L68]=&quot;&quot;;[.N68]=&quot;&quot;);&quot;UNKNOWN&quot;;&quot;CONTRADICTION&quot;);IF([.M68]=&quot;UNMATCHED&quot;;IF(AND([.L68]=&quot;&quot;;[.N68]=&quot;&quot;);&quot;CLEAR&quot;;&quot;CONTRADICTION&quot;);IF([.M68]=&quot;SINGLE_SALE_LINKED&quot;;IF(AND([.L68]&lt;&gt;&quot;&quot;;[.N68]=&quot;&quot;);&quot;CLEAR&quot;;&quot;CONTRADICTION&quot;);IF([.M68]=&quot;MULTI_SALE_PENDING_ALLOCATION&quot;;IF([.L68]=&quot;&quot;;&quot;CLEAR&quot;;&quot;CONTRADICTION&quot;);IF([.M68]=&quot;ALLOCATED&quot;;IF(AND([.L68]=&quot;&quot;;[.N68]&lt;&gt;&quot;&quot;);&quot;CLEAR&quot;;&quot;CONTRADICTION&quot;);&quot;CONTRADICTION&quot;)))))">
            <text:p>UNKNOWN</text:p>
          </table:table-cell>
          <table:table-cell office:value-type="string" table:formula="of:=IF([.S68]=&quot;UNKNOWN&quot;;&quot;NO ACTION — linkage status is UNKNOWN / not asserted&quot;;IF([.S68]=&quot;CLEAR&quot;;&quot;NO CONTRADICTION — preserve evidence as entered&quot;;IF([.M68]=&quot;&quot;;&quot;REVIEW LINKAGE STATUS — identifiers are present while status is UNKNOWN&quot;;IF([.M68]=&quot;UNMATCHED&quot;;&quot;REMOVE LINKAGE IDENTIFIERS OR CORRECT LINKAGE STATUS&quot;;IF([.M68]=&quot;SINGLE_SALE_LINKED&quot;;&quot;REQUIRE LINKED SALE ID AND NO ALLOCATION GROUP ID&quot;;IF([.M68]=&quot;MULTI_SALE_PENDING_ALLOCATION&quot;;&quot;REMOVE LINKED SALE ID OR CORRECT LINKAGE STATUS&quot;;IF([.M68]=&quot;ALLOCATED&quot;;&quot;REQUIRE ALLOCATION GROUP ID AND NO LINKED SALE ID&quot;;&quot;REVIEW LINKAGE EVIDENCE — NO AUTHORITY CREATED&quot;)))))))">
            <text:p>NO ACTION — linkage status is UNKNOWN / not asserted</text:p>
          </table:table-cell>
          <table:table-cell office:value-type="string" table:formula="of:=IF([.S68]=&quot;CONTRADICTION&quot;;&quot;BLOCKED&quot;;IF([.S68]=&quot;UNKNOWN&quot;;&quot;UNKNOWN&quot;;IF([.S68]=&quot;CLEAR&quot;;IF(OR([.O68]=&quot;&quot;;[.P68]=&quot;&quot;);&quot;UNKNOWN&quot;;&quot;READY FOR REVIEW&quot;);&quot;BLOCKED&quot;)))">
            <text:p>UNKNOWN</text:p>
          </table:table-cell>
          <table:table-cell office:value-type="string" table:formula="of:=IF([.U68]=&quot;UNKNOWN&quot;;&quot;COMPLETE OR ASSERT REQUIRED EVIDENCE BEFORE REVIEW&quot;;IF([.U68]=&quot;BLOCKED&quot;;&quot;RESOLVE CONTRADICTION BEFORE REVIEW — NO AUTHORITY CREATED&quot;;IF([.U6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8]=&quot;READY FOR REVIEW&quot;;&quot;REVIEW ELIGIBLE — NO AUTHORITY&quot;;IF(OR([.U68]=&quot;UNKNOWN&quot;;[.U68]=&quot;BLOCKED&quot;);&quot;NOT REVIEW ELIGIBLE&quot;;&quot;NOT REVIEW ELIGIBLE&quot;))">
            <text:p>NOT REVIEW ELIGIBLE</text:p>
          </table:table-cell>
          <table:table-cell office:value-type="string" table:formula="of:=IF([.W68]=&quot;NOT REVIEW ELIGIBLE&quot;;&quot;DO NOT BEGIN SETTLEMENT REVIEW — RESOLVE READINESS OR CONTRADICTION CONDITIONS&quot;;IF([.W6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8]=&quot;&quot;;&quot;UNKNOWN&quot;;IF([.W68]&lt;&gt;&quot;REVIEW ELIGIBLE — NO AUTHORITY&quot;;&quot;BLOCKED — OUTCOME ASSERTED WITHOUT REVIEW ELIGIBILITY&quot;;IF(OR([.Y68]=&quot;REVIEWED — NO AUTHORITY&quot;;[.Y68]=&quot;REVIEW DEFERRED&quot;;[.Y6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69]=&quot;&quot;;IF(AND([.L69]=&quot;&quot;;[.N69]=&quot;&quot;);&quot;UNKNOWN&quot;;&quot;CONTRADICTION&quot;);IF([.M69]=&quot;UNMATCHED&quot;;IF(AND([.L69]=&quot;&quot;;[.N69]=&quot;&quot;);&quot;CLEAR&quot;;&quot;CONTRADICTION&quot;);IF([.M69]=&quot;SINGLE_SALE_LINKED&quot;;IF(AND([.L69]&lt;&gt;&quot;&quot;;[.N69]=&quot;&quot;);&quot;CLEAR&quot;;&quot;CONTRADICTION&quot;);IF([.M69]=&quot;MULTI_SALE_PENDING_ALLOCATION&quot;;IF([.L69]=&quot;&quot;;&quot;CLEAR&quot;;&quot;CONTRADICTION&quot;);IF([.M69]=&quot;ALLOCATED&quot;;IF(AND([.L69]=&quot;&quot;;[.N69]&lt;&gt;&quot;&quot;);&quot;CLEAR&quot;;&quot;CONTRADICTION&quot;);&quot;CONTRADICTION&quot;)))))">
            <text:p>UNKNOWN</text:p>
          </table:table-cell>
          <table:table-cell office:value-type="string" table:formula="of:=IF([.S69]=&quot;UNKNOWN&quot;;&quot;NO ACTION — linkage status is UNKNOWN / not asserted&quot;;IF([.S69]=&quot;CLEAR&quot;;&quot;NO CONTRADICTION — preserve evidence as entered&quot;;IF([.M69]=&quot;&quot;;&quot;REVIEW LINKAGE STATUS — identifiers are present while status is UNKNOWN&quot;;IF([.M69]=&quot;UNMATCHED&quot;;&quot;REMOVE LINKAGE IDENTIFIERS OR CORRECT LINKAGE STATUS&quot;;IF([.M69]=&quot;SINGLE_SALE_LINKED&quot;;&quot;REQUIRE LINKED SALE ID AND NO ALLOCATION GROUP ID&quot;;IF([.M69]=&quot;MULTI_SALE_PENDING_ALLOCATION&quot;;&quot;REMOVE LINKED SALE ID OR CORRECT LINKAGE STATUS&quot;;IF([.M69]=&quot;ALLOCATED&quot;;&quot;REQUIRE ALLOCATION GROUP ID AND NO LINKED SALE ID&quot;;&quot;REVIEW LINKAGE EVIDENCE — NO AUTHORITY CREATED&quot;)))))))">
            <text:p>NO ACTION — linkage status is UNKNOWN / not asserted</text:p>
          </table:table-cell>
          <table:table-cell office:value-type="string" table:formula="of:=IF([.S69]=&quot;CONTRADICTION&quot;;&quot;BLOCKED&quot;;IF([.S69]=&quot;UNKNOWN&quot;;&quot;UNKNOWN&quot;;IF([.S69]=&quot;CLEAR&quot;;IF(OR([.O69]=&quot;&quot;;[.P69]=&quot;&quot;);&quot;UNKNOWN&quot;;&quot;READY FOR REVIEW&quot;);&quot;BLOCKED&quot;)))">
            <text:p>UNKNOWN</text:p>
          </table:table-cell>
          <table:table-cell office:value-type="string" table:formula="of:=IF([.U69]=&quot;UNKNOWN&quot;;&quot;COMPLETE OR ASSERT REQUIRED EVIDENCE BEFORE REVIEW&quot;;IF([.U69]=&quot;BLOCKED&quot;;&quot;RESOLVE CONTRADICTION BEFORE REVIEW — NO AUTHORITY CREATED&quot;;IF([.U6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69]=&quot;READY FOR REVIEW&quot;;&quot;REVIEW ELIGIBLE — NO AUTHORITY&quot;;IF(OR([.U69]=&quot;UNKNOWN&quot;;[.U69]=&quot;BLOCKED&quot;);&quot;NOT REVIEW ELIGIBLE&quot;;&quot;NOT REVIEW ELIGIBLE&quot;))">
            <text:p>NOT REVIEW ELIGIBLE</text:p>
          </table:table-cell>
          <table:table-cell office:value-type="string" table:formula="of:=IF([.W69]=&quot;NOT REVIEW ELIGIBLE&quot;;&quot;DO NOT BEGIN SETTLEMENT REVIEW — RESOLVE READINESS OR CONTRADICTION CONDITIONS&quot;;IF([.W6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69]=&quot;&quot;;&quot;UNKNOWN&quot;;IF([.W69]&lt;&gt;&quot;REVIEW ELIGIBLE — NO AUTHORITY&quot;;&quot;BLOCKED — OUTCOME ASSERTED WITHOUT REVIEW ELIGIBILITY&quot;;IF(OR([.Y69]=&quot;REVIEWED — NO AUTHORITY&quot;;[.Y69]=&quot;REVIEW DEFERRED&quot;;[.Y6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0]=&quot;&quot;;IF(AND([.L70]=&quot;&quot;;[.N70]=&quot;&quot;);&quot;UNKNOWN&quot;;&quot;CONTRADICTION&quot;);IF([.M70]=&quot;UNMATCHED&quot;;IF(AND([.L70]=&quot;&quot;;[.N70]=&quot;&quot;);&quot;CLEAR&quot;;&quot;CONTRADICTION&quot;);IF([.M70]=&quot;SINGLE_SALE_LINKED&quot;;IF(AND([.L70]&lt;&gt;&quot;&quot;;[.N70]=&quot;&quot;);&quot;CLEAR&quot;;&quot;CONTRADICTION&quot;);IF([.M70]=&quot;MULTI_SALE_PENDING_ALLOCATION&quot;;IF([.L70]=&quot;&quot;;&quot;CLEAR&quot;;&quot;CONTRADICTION&quot;);IF([.M70]=&quot;ALLOCATED&quot;;IF(AND([.L70]=&quot;&quot;;[.N70]&lt;&gt;&quot;&quot;);&quot;CLEAR&quot;;&quot;CONTRADICTION&quot;);&quot;CONTRADICTION&quot;)))))">
            <text:p>UNKNOWN</text:p>
          </table:table-cell>
          <table:table-cell office:value-type="string" table:formula="of:=IF([.S70]=&quot;UNKNOWN&quot;;&quot;NO ACTION — linkage status is UNKNOWN / not asserted&quot;;IF([.S70]=&quot;CLEAR&quot;;&quot;NO CONTRADICTION — preserve evidence as entered&quot;;IF([.M70]=&quot;&quot;;&quot;REVIEW LINKAGE STATUS — identifiers are present while status is UNKNOWN&quot;;IF([.M70]=&quot;UNMATCHED&quot;;&quot;REMOVE LINKAGE IDENTIFIERS OR CORRECT LINKAGE STATUS&quot;;IF([.M70]=&quot;SINGLE_SALE_LINKED&quot;;&quot;REQUIRE LINKED SALE ID AND NO ALLOCATION GROUP ID&quot;;IF([.M70]=&quot;MULTI_SALE_PENDING_ALLOCATION&quot;;&quot;REMOVE LINKED SALE ID OR CORRECT LINKAGE STATUS&quot;;IF([.M70]=&quot;ALLOCATED&quot;;&quot;REQUIRE ALLOCATION GROUP ID AND NO LINKED SALE ID&quot;;&quot;REVIEW LINKAGE EVIDENCE — NO AUTHORITY CREATED&quot;)))))))">
            <text:p>NO ACTION — linkage status is UNKNOWN / not asserted</text:p>
          </table:table-cell>
          <table:table-cell office:value-type="string" table:formula="of:=IF([.S70]=&quot;CONTRADICTION&quot;;&quot;BLOCKED&quot;;IF([.S70]=&quot;UNKNOWN&quot;;&quot;UNKNOWN&quot;;IF([.S70]=&quot;CLEAR&quot;;IF(OR([.O70]=&quot;&quot;;[.P70]=&quot;&quot;);&quot;UNKNOWN&quot;;&quot;READY FOR REVIEW&quot;);&quot;BLOCKED&quot;)))">
            <text:p>UNKNOWN</text:p>
          </table:table-cell>
          <table:table-cell office:value-type="string" table:formula="of:=IF([.U70]=&quot;UNKNOWN&quot;;&quot;COMPLETE OR ASSERT REQUIRED EVIDENCE BEFORE REVIEW&quot;;IF([.U70]=&quot;BLOCKED&quot;;&quot;RESOLVE CONTRADICTION BEFORE REVIEW — NO AUTHORITY CREATED&quot;;IF([.U7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0]=&quot;READY FOR REVIEW&quot;;&quot;REVIEW ELIGIBLE — NO AUTHORITY&quot;;IF(OR([.U70]=&quot;UNKNOWN&quot;;[.U70]=&quot;BLOCKED&quot;);&quot;NOT REVIEW ELIGIBLE&quot;;&quot;NOT REVIEW ELIGIBLE&quot;))">
            <text:p>NOT REVIEW ELIGIBLE</text:p>
          </table:table-cell>
          <table:table-cell office:value-type="string" table:formula="of:=IF([.W70]=&quot;NOT REVIEW ELIGIBLE&quot;;&quot;DO NOT BEGIN SETTLEMENT REVIEW — RESOLVE READINESS OR CONTRADICTION CONDITIONS&quot;;IF([.W7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0]=&quot;&quot;;&quot;UNKNOWN&quot;;IF([.W70]&lt;&gt;&quot;REVIEW ELIGIBLE — NO AUTHORITY&quot;;&quot;BLOCKED — OUTCOME ASSERTED WITHOUT REVIEW ELIGIBILITY&quot;;IF(OR([.Y70]=&quot;REVIEWED — NO AUTHORITY&quot;;[.Y70]=&quot;REVIEW DEFERRED&quot;;[.Y7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1]=&quot;&quot;;IF(AND([.L71]=&quot;&quot;;[.N71]=&quot;&quot;);&quot;UNKNOWN&quot;;&quot;CONTRADICTION&quot;);IF([.M71]=&quot;UNMATCHED&quot;;IF(AND([.L71]=&quot;&quot;;[.N71]=&quot;&quot;);&quot;CLEAR&quot;;&quot;CONTRADICTION&quot;);IF([.M71]=&quot;SINGLE_SALE_LINKED&quot;;IF(AND([.L71]&lt;&gt;&quot;&quot;;[.N71]=&quot;&quot;);&quot;CLEAR&quot;;&quot;CONTRADICTION&quot;);IF([.M71]=&quot;MULTI_SALE_PENDING_ALLOCATION&quot;;IF([.L71]=&quot;&quot;;&quot;CLEAR&quot;;&quot;CONTRADICTION&quot;);IF([.M71]=&quot;ALLOCATED&quot;;IF(AND([.L71]=&quot;&quot;;[.N71]&lt;&gt;&quot;&quot;);&quot;CLEAR&quot;;&quot;CONTRADICTION&quot;);&quot;CONTRADICTION&quot;)))))">
            <text:p>UNKNOWN</text:p>
          </table:table-cell>
          <table:table-cell office:value-type="string" table:formula="of:=IF([.S71]=&quot;UNKNOWN&quot;;&quot;NO ACTION — linkage status is UNKNOWN / not asserted&quot;;IF([.S71]=&quot;CLEAR&quot;;&quot;NO CONTRADICTION — preserve evidence as entered&quot;;IF([.M71]=&quot;&quot;;&quot;REVIEW LINKAGE STATUS — identifiers are present while status is UNKNOWN&quot;;IF([.M71]=&quot;UNMATCHED&quot;;&quot;REMOVE LINKAGE IDENTIFIERS OR CORRECT LINKAGE STATUS&quot;;IF([.M71]=&quot;SINGLE_SALE_LINKED&quot;;&quot;REQUIRE LINKED SALE ID AND NO ALLOCATION GROUP ID&quot;;IF([.M71]=&quot;MULTI_SALE_PENDING_ALLOCATION&quot;;&quot;REMOVE LINKED SALE ID OR CORRECT LINKAGE STATUS&quot;;IF([.M71]=&quot;ALLOCATED&quot;;&quot;REQUIRE ALLOCATION GROUP ID AND NO LINKED SALE ID&quot;;&quot;REVIEW LINKAGE EVIDENCE — NO AUTHORITY CREATED&quot;)))))))">
            <text:p>NO ACTION — linkage status is UNKNOWN / not asserted</text:p>
          </table:table-cell>
          <table:table-cell office:value-type="string" table:formula="of:=IF([.S71]=&quot;CONTRADICTION&quot;;&quot;BLOCKED&quot;;IF([.S71]=&quot;UNKNOWN&quot;;&quot;UNKNOWN&quot;;IF([.S71]=&quot;CLEAR&quot;;IF(OR([.O71]=&quot;&quot;;[.P71]=&quot;&quot;);&quot;UNKNOWN&quot;;&quot;READY FOR REVIEW&quot;);&quot;BLOCKED&quot;)))">
            <text:p>UNKNOWN</text:p>
          </table:table-cell>
          <table:table-cell office:value-type="string" table:formula="of:=IF([.U71]=&quot;UNKNOWN&quot;;&quot;COMPLETE OR ASSERT REQUIRED EVIDENCE BEFORE REVIEW&quot;;IF([.U71]=&quot;BLOCKED&quot;;&quot;RESOLVE CONTRADICTION BEFORE REVIEW — NO AUTHORITY CREATED&quot;;IF([.U7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1]=&quot;READY FOR REVIEW&quot;;&quot;REVIEW ELIGIBLE — NO AUTHORITY&quot;;IF(OR([.U71]=&quot;UNKNOWN&quot;;[.U71]=&quot;BLOCKED&quot;);&quot;NOT REVIEW ELIGIBLE&quot;;&quot;NOT REVIEW ELIGIBLE&quot;))">
            <text:p>NOT REVIEW ELIGIBLE</text:p>
          </table:table-cell>
          <table:table-cell office:value-type="string" table:formula="of:=IF([.W71]=&quot;NOT REVIEW ELIGIBLE&quot;;&quot;DO NOT BEGIN SETTLEMENT REVIEW — RESOLVE READINESS OR CONTRADICTION CONDITIONS&quot;;IF([.W7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1]=&quot;&quot;;&quot;UNKNOWN&quot;;IF([.W71]&lt;&gt;&quot;REVIEW ELIGIBLE — NO AUTHORITY&quot;;&quot;BLOCKED — OUTCOME ASSERTED WITHOUT REVIEW ELIGIBILITY&quot;;IF(OR([.Y71]=&quot;REVIEWED — NO AUTHORITY&quot;;[.Y71]=&quot;REVIEW DEFERRED&quot;;[.Y71]=&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2]=&quot;&quot;;IF(AND([.L72]=&quot;&quot;;[.N72]=&quot;&quot;);&quot;UNKNOWN&quot;;&quot;CONTRADICTION&quot;);IF([.M72]=&quot;UNMATCHED&quot;;IF(AND([.L72]=&quot;&quot;;[.N72]=&quot;&quot;);&quot;CLEAR&quot;;&quot;CONTRADICTION&quot;);IF([.M72]=&quot;SINGLE_SALE_LINKED&quot;;IF(AND([.L72]&lt;&gt;&quot;&quot;;[.N72]=&quot;&quot;);&quot;CLEAR&quot;;&quot;CONTRADICTION&quot;);IF([.M72]=&quot;MULTI_SALE_PENDING_ALLOCATION&quot;;IF([.L72]=&quot;&quot;;&quot;CLEAR&quot;;&quot;CONTRADICTION&quot;);IF([.M72]=&quot;ALLOCATED&quot;;IF(AND([.L72]=&quot;&quot;;[.N72]&lt;&gt;&quot;&quot;);&quot;CLEAR&quot;;&quot;CONTRADICTION&quot;);&quot;CONTRADICTION&quot;)))))">
            <text:p>UNKNOWN</text:p>
          </table:table-cell>
          <table:table-cell office:value-type="string" table:formula="of:=IF([.S72]=&quot;UNKNOWN&quot;;&quot;NO ACTION — linkage status is UNKNOWN / not asserted&quot;;IF([.S72]=&quot;CLEAR&quot;;&quot;NO CONTRADICTION — preserve evidence as entered&quot;;IF([.M72]=&quot;&quot;;&quot;REVIEW LINKAGE STATUS — identifiers are present while status is UNKNOWN&quot;;IF([.M72]=&quot;UNMATCHED&quot;;&quot;REMOVE LINKAGE IDENTIFIERS OR CORRECT LINKAGE STATUS&quot;;IF([.M72]=&quot;SINGLE_SALE_LINKED&quot;;&quot;REQUIRE LINKED SALE ID AND NO ALLOCATION GROUP ID&quot;;IF([.M72]=&quot;MULTI_SALE_PENDING_ALLOCATION&quot;;&quot;REMOVE LINKED SALE ID OR CORRECT LINKAGE STATUS&quot;;IF([.M72]=&quot;ALLOCATED&quot;;&quot;REQUIRE ALLOCATION GROUP ID AND NO LINKED SALE ID&quot;;&quot;REVIEW LINKAGE EVIDENCE — NO AUTHORITY CREATED&quot;)))))))">
            <text:p>NO ACTION — linkage status is UNKNOWN / not asserted</text:p>
          </table:table-cell>
          <table:table-cell office:value-type="string" table:formula="of:=IF([.S72]=&quot;CONTRADICTION&quot;;&quot;BLOCKED&quot;;IF([.S72]=&quot;UNKNOWN&quot;;&quot;UNKNOWN&quot;;IF([.S72]=&quot;CLEAR&quot;;IF(OR([.O72]=&quot;&quot;;[.P72]=&quot;&quot;);&quot;UNKNOWN&quot;;&quot;READY FOR REVIEW&quot;);&quot;BLOCKED&quot;)))">
            <text:p>UNKNOWN</text:p>
          </table:table-cell>
          <table:table-cell office:value-type="string" table:formula="of:=IF([.U72]=&quot;UNKNOWN&quot;;&quot;COMPLETE OR ASSERT REQUIRED EVIDENCE BEFORE REVIEW&quot;;IF([.U72]=&quot;BLOCKED&quot;;&quot;RESOLVE CONTRADICTION BEFORE REVIEW — NO AUTHORITY CREATED&quot;;IF([.U7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2]=&quot;READY FOR REVIEW&quot;;&quot;REVIEW ELIGIBLE — NO AUTHORITY&quot;;IF(OR([.U72]=&quot;UNKNOWN&quot;;[.U72]=&quot;BLOCKED&quot;);&quot;NOT REVIEW ELIGIBLE&quot;;&quot;NOT REVIEW ELIGIBLE&quot;))">
            <text:p>NOT REVIEW ELIGIBLE</text:p>
          </table:table-cell>
          <table:table-cell office:value-type="string" table:formula="of:=IF([.W72]=&quot;NOT REVIEW ELIGIBLE&quot;;&quot;DO NOT BEGIN SETTLEMENT REVIEW — RESOLVE READINESS OR CONTRADICTION CONDITIONS&quot;;IF([.W7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2]=&quot;&quot;;&quot;UNKNOWN&quot;;IF([.W72]&lt;&gt;&quot;REVIEW ELIGIBLE — NO AUTHORITY&quot;;&quot;BLOCKED — OUTCOME ASSERTED WITHOUT REVIEW ELIGIBILITY&quot;;IF(OR([.Y72]=&quot;REVIEWED — NO AUTHORITY&quot;;[.Y72]=&quot;REVIEW DEFERRED&quot;;[.Y7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3]=&quot;&quot;;IF(AND([.L73]=&quot;&quot;;[.N73]=&quot;&quot;);&quot;UNKNOWN&quot;;&quot;CONTRADICTION&quot;);IF([.M73]=&quot;UNMATCHED&quot;;IF(AND([.L73]=&quot;&quot;;[.N73]=&quot;&quot;);&quot;CLEAR&quot;;&quot;CONTRADICTION&quot;);IF([.M73]=&quot;SINGLE_SALE_LINKED&quot;;IF(AND([.L73]&lt;&gt;&quot;&quot;;[.N73]=&quot;&quot;);&quot;CLEAR&quot;;&quot;CONTRADICTION&quot;);IF([.M73]=&quot;MULTI_SALE_PENDING_ALLOCATION&quot;;IF([.L73]=&quot;&quot;;&quot;CLEAR&quot;;&quot;CONTRADICTION&quot;);IF([.M73]=&quot;ALLOCATED&quot;;IF(AND([.L73]=&quot;&quot;;[.N73]&lt;&gt;&quot;&quot;);&quot;CLEAR&quot;;&quot;CONTRADICTION&quot;);&quot;CONTRADICTION&quot;)))))">
            <text:p>UNKNOWN</text:p>
          </table:table-cell>
          <table:table-cell office:value-type="string" table:formula="of:=IF([.S73]=&quot;UNKNOWN&quot;;&quot;NO ACTION — linkage status is UNKNOWN / not asserted&quot;;IF([.S73]=&quot;CLEAR&quot;;&quot;NO CONTRADICTION — preserve evidence as entered&quot;;IF([.M73]=&quot;&quot;;&quot;REVIEW LINKAGE STATUS — identifiers are present while status is UNKNOWN&quot;;IF([.M73]=&quot;UNMATCHED&quot;;&quot;REMOVE LINKAGE IDENTIFIERS OR CORRECT LINKAGE STATUS&quot;;IF([.M73]=&quot;SINGLE_SALE_LINKED&quot;;&quot;REQUIRE LINKED SALE ID AND NO ALLOCATION GROUP ID&quot;;IF([.M73]=&quot;MULTI_SALE_PENDING_ALLOCATION&quot;;&quot;REMOVE LINKED SALE ID OR CORRECT LINKAGE STATUS&quot;;IF([.M73]=&quot;ALLOCATED&quot;;&quot;REQUIRE ALLOCATION GROUP ID AND NO LINKED SALE ID&quot;;&quot;REVIEW LINKAGE EVIDENCE — NO AUTHORITY CREATED&quot;)))))))">
            <text:p>NO ACTION — linkage status is UNKNOWN / not asserted</text:p>
          </table:table-cell>
          <table:table-cell office:value-type="string" table:formula="of:=IF([.S73]=&quot;CONTRADICTION&quot;;&quot;BLOCKED&quot;;IF([.S73]=&quot;UNKNOWN&quot;;&quot;UNKNOWN&quot;;IF([.S73]=&quot;CLEAR&quot;;IF(OR([.O73]=&quot;&quot;;[.P73]=&quot;&quot;);&quot;UNKNOWN&quot;;&quot;READY FOR REVIEW&quot;);&quot;BLOCKED&quot;)))">
            <text:p>UNKNOWN</text:p>
          </table:table-cell>
          <table:table-cell office:value-type="string" table:formula="of:=IF([.U73]=&quot;UNKNOWN&quot;;&quot;COMPLETE OR ASSERT REQUIRED EVIDENCE BEFORE REVIEW&quot;;IF([.U73]=&quot;BLOCKED&quot;;&quot;RESOLVE CONTRADICTION BEFORE REVIEW — NO AUTHORITY CREATED&quot;;IF([.U7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3]=&quot;READY FOR REVIEW&quot;;&quot;REVIEW ELIGIBLE — NO AUTHORITY&quot;;IF(OR([.U73]=&quot;UNKNOWN&quot;;[.U73]=&quot;BLOCKED&quot;);&quot;NOT REVIEW ELIGIBLE&quot;;&quot;NOT REVIEW ELIGIBLE&quot;))">
            <text:p>NOT REVIEW ELIGIBLE</text:p>
          </table:table-cell>
          <table:table-cell office:value-type="string" table:formula="of:=IF([.W73]=&quot;NOT REVIEW ELIGIBLE&quot;;&quot;DO NOT BEGIN SETTLEMENT REVIEW — RESOLVE READINESS OR CONTRADICTION CONDITIONS&quot;;IF([.W7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3]=&quot;&quot;;&quot;UNKNOWN&quot;;IF([.W73]&lt;&gt;&quot;REVIEW ELIGIBLE — NO AUTHORITY&quot;;&quot;BLOCKED — OUTCOME ASSERTED WITHOUT REVIEW ELIGIBILITY&quot;;IF(OR([.Y73]=&quot;REVIEWED — NO AUTHORITY&quot;;[.Y73]=&quot;REVIEW DEFERRED&quot;;[.Y7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4]=&quot;&quot;;IF(AND([.L74]=&quot;&quot;;[.N74]=&quot;&quot;);&quot;UNKNOWN&quot;;&quot;CONTRADICTION&quot;);IF([.M74]=&quot;UNMATCHED&quot;;IF(AND([.L74]=&quot;&quot;;[.N74]=&quot;&quot;);&quot;CLEAR&quot;;&quot;CONTRADICTION&quot;);IF([.M74]=&quot;SINGLE_SALE_LINKED&quot;;IF(AND([.L74]&lt;&gt;&quot;&quot;;[.N74]=&quot;&quot;);&quot;CLEAR&quot;;&quot;CONTRADICTION&quot;);IF([.M74]=&quot;MULTI_SALE_PENDING_ALLOCATION&quot;;IF([.L74]=&quot;&quot;;&quot;CLEAR&quot;;&quot;CONTRADICTION&quot;);IF([.M74]=&quot;ALLOCATED&quot;;IF(AND([.L74]=&quot;&quot;;[.N74]&lt;&gt;&quot;&quot;);&quot;CLEAR&quot;;&quot;CONTRADICTION&quot;);&quot;CONTRADICTION&quot;)))))">
            <text:p>UNKNOWN</text:p>
          </table:table-cell>
          <table:table-cell office:value-type="string" table:formula="of:=IF([.S74]=&quot;UNKNOWN&quot;;&quot;NO ACTION — linkage status is UNKNOWN / not asserted&quot;;IF([.S74]=&quot;CLEAR&quot;;&quot;NO CONTRADICTION — preserve evidence as entered&quot;;IF([.M74]=&quot;&quot;;&quot;REVIEW LINKAGE STATUS — identifiers are present while status is UNKNOWN&quot;;IF([.M74]=&quot;UNMATCHED&quot;;&quot;REMOVE LINKAGE IDENTIFIERS OR CORRECT LINKAGE STATUS&quot;;IF([.M74]=&quot;SINGLE_SALE_LINKED&quot;;&quot;REQUIRE LINKED SALE ID AND NO ALLOCATION GROUP ID&quot;;IF([.M74]=&quot;MULTI_SALE_PENDING_ALLOCATION&quot;;&quot;REMOVE LINKED SALE ID OR CORRECT LINKAGE STATUS&quot;;IF([.M74]=&quot;ALLOCATED&quot;;&quot;REQUIRE ALLOCATION GROUP ID AND NO LINKED SALE ID&quot;;&quot;REVIEW LINKAGE EVIDENCE — NO AUTHORITY CREATED&quot;)))))))">
            <text:p>NO ACTION — linkage status is UNKNOWN / not asserted</text:p>
          </table:table-cell>
          <table:table-cell office:value-type="string" table:formula="of:=IF([.S74]=&quot;CONTRADICTION&quot;;&quot;BLOCKED&quot;;IF([.S74]=&quot;UNKNOWN&quot;;&quot;UNKNOWN&quot;;IF([.S74]=&quot;CLEAR&quot;;IF(OR([.O74]=&quot;&quot;;[.P74]=&quot;&quot;);&quot;UNKNOWN&quot;;&quot;READY FOR REVIEW&quot;);&quot;BLOCKED&quot;)))">
            <text:p>UNKNOWN</text:p>
          </table:table-cell>
          <table:table-cell office:value-type="string" table:formula="of:=IF([.U74]=&quot;UNKNOWN&quot;;&quot;COMPLETE OR ASSERT REQUIRED EVIDENCE BEFORE REVIEW&quot;;IF([.U74]=&quot;BLOCKED&quot;;&quot;RESOLVE CONTRADICTION BEFORE REVIEW — NO AUTHORITY CREATED&quot;;IF([.U7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4]=&quot;READY FOR REVIEW&quot;;&quot;REVIEW ELIGIBLE — NO AUTHORITY&quot;;IF(OR([.U74]=&quot;UNKNOWN&quot;;[.U74]=&quot;BLOCKED&quot;);&quot;NOT REVIEW ELIGIBLE&quot;;&quot;NOT REVIEW ELIGIBLE&quot;))">
            <text:p>NOT REVIEW ELIGIBLE</text:p>
          </table:table-cell>
          <table:table-cell office:value-type="string" table:formula="of:=IF([.W74]=&quot;NOT REVIEW ELIGIBLE&quot;;&quot;DO NOT BEGIN SETTLEMENT REVIEW — RESOLVE READINESS OR CONTRADICTION CONDITIONS&quot;;IF([.W7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4]=&quot;&quot;;&quot;UNKNOWN&quot;;IF([.W74]&lt;&gt;&quot;REVIEW ELIGIBLE — NO AUTHORITY&quot;;&quot;BLOCKED — OUTCOME ASSERTED WITHOUT REVIEW ELIGIBILITY&quot;;IF(OR([.Y74]=&quot;REVIEWED — NO AUTHORITY&quot;;[.Y74]=&quot;REVIEW DEFERRED&quot;;[.Y7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5]=&quot;&quot;;IF(AND([.L75]=&quot;&quot;;[.N75]=&quot;&quot;);&quot;UNKNOWN&quot;;&quot;CONTRADICTION&quot;);IF([.M75]=&quot;UNMATCHED&quot;;IF(AND([.L75]=&quot;&quot;;[.N75]=&quot;&quot;);&quot;CLEAR&quot;;&quot;CONTRADICTION&quot;);IF([.M75]=&quot;SINGLE_SALE_LINKED&quot;;IF(AND([.L75]&lt;&gt;&quot;&quot;;[.N75]=&quot;&quot;);&quot;CLEAR&quot;;&quot;CONTRADICTION&quot;);IF([.M75]=&quot;MULTI_SALE_PENDING_ALLOCATION&quot;;IF([.L75]=&quot;&quot;;&quot;CLEAR&quot;;&quot;CONTRADICTION&quot;);IF([.M75]=&quot;ALLOCATED&quot;;IF(AND([.L75]=&quot;&quot;;[.N75]&lt;&gt;&quot;&quot;);&quot;CLEAR&quot;;&quot;CONTRADICTION&quot;);&quot;CONTRADICTION&quot;)))))">
            <text:p>UNKNOWN</text:p>
          </table:table-cell>
          <table:table-cell office:value-type="string" table:formula="of:=IF([.S75]=&quot;UNKNOWN&quot;;&quot;NO ACTION — linkage status is UNKNOWN / not asserted&quot;;IF([.S75]=&quot;CLEAR&quot;;&quot;NO CONTRADICTION — preserve evidence as entered&quot;;IF([.M75]=&quot;&quot;;&quot;REVIEW LINKAGE STATUS — identifiers are present while status is UNKNOWN&quot;;IF([.M75]=&quot;UNMATCHED&quot;;&quot;REMOVE LINKAGE IDENTIFIERS OR CORRECT LINKAGE STATUS&quot;;IF([.M75]=&quot;SINGLE_SALE_LINKED&quot;;&quot;REQUIRE LINKED SALE ID AND NO ALLOCATION GROUP ID&quot;;IF([.M75]=&quot;MULTI_SALE_PENDING_ALLOCATION&quot;;&quot;REMOVE LINKED SALE ID OR CORRECT LINKAGE STATUS&quot;;IF([.M75]=&quot;ALLOCATED&quot;;&quot;REQUIRE ALLOCATION GROUP ID AND NO LINKED SALE ID&quot;;&quot;REVIEW LINKAGE EVIDENCE — NO AUTHORITY CREATED&quot;)))))))">
            <text:p>NO ACTION — linkage status is UNKNOWN / not asserted</text:p>
          </table:table-cell>
          <table:table-cell office:value-type="string" table:formula="of:=IF([.S75]=&quot;CONTRADICTION&quot;;&quot;BLOCKED&quot;;IF([.S75]=&quot;UNKNOWN&quot;;&quot;UNKNOWN&quot;;IF([.S75]=&quot;CLEAR&quot;;IF(OR([.O75]=&quot;&quot;;[.P75]=&quot;&quot;);&quot;UNKNOWN&quot;;&quot;READY FOR REVIEW&quot;);&quot;BLOCKED&quot;)))">
            <text:p>UNKNOWN</text:p>
          </table:table-cell>
          <table:table-cell office:value-type="string" table:formula="of:=IF([.U75]=&quot;UNKNOWN&quot;;&quot;COMPLETE OR ASSERT REQUIRED EVIDENCE BEFORE REVIEW&quot;;IF([.U75]=&quot;BLOCKED&quot;;&quot;RESOLVE CONTRADICTION BEFORE REVIEW — NO AUTHORITY CREATED&quot;;IF([.U7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5]=&quot;READY FOR REVIEW&quot;;&quot;REVIEW ELIGIBLE — NO AUTHORITY&quot;;IF(OR([.U75]=&quot;UNKNOWN&quot;;[.U75]=&quot;BLOCKED&quot;);&quot;NOT REVIEW ELIGIBLE&quot;;&quot;NOT REVIEW ELIGIBLE&quot;))">
            <text:p>NOT REVIEW ELIGIBLE</text:p>
          </table:table-cell>
          <table:table-cell office:value-type="string" table:formula="of:=IF([.W75]=&quot;NOT REVIEW ELIGIBLE&quot;;&quot;DO NOT BEGIN SETTLEMENT REVIEW — RESOLVE READINESS OR CONTRADICTION CONDITIONS&quot;;IF([.W7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5]=&quot;&quot;;&quot;UNKNOWN&quot;;IF([.W75]&lt;&gt;&quot;REVIEW ELIGIBLE — NO AUTHORITY&quot;;&quot;BLOCKED — OUTCOME ASSERTED WITHOUT REVIEW ELIGIBILITY&quot;;IF(OR([.Y75]=&quot;REVIEWED — NO AUTHORITY&quot;;[.Y75]=&quot;REVIEW DEFERRED&quot;;[.Y7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6]=&quot;&quot;;IF(AND([.L76]=&quot;&quot;;[.N76]=&quot;&quot;);&quot;UNKNOWN&quot;;&quot;CONTRADICTION&quot;);IF([.M76]=&quot;UNMATCHED&quot;;IF(AND([.L76]=&quot;&quot;;[.N76]=&quot;&quot;);&quot;CLEAR&quot;;&quot;CONTRADICTION&quot;);IF([.M76]=&quot;SINGLE_SALE_LINKED&quot;;IF(AND([.L76]&lt;&gt;&quot;&quot;;[.N76]=&quot;&quot;);&quot;CLEAR&quot;;&quot;CONTRADICTION&quot;);IF([.M76]=&quot;MULTI_SALE_PENDING_ALLOCATION&quot;;IF([.L76]=&quot;&quot;;&quot;CLEAR&quot;;&quot;CONTRADICTION&quot;);IF([.M76]=&quot;ALLOCATED&quot;;IF(AND([.L76]=&quot;&quot;;[.N76]&lt;&gt;&quot;&quot;);&quot;CLEAR&quot;;&quot;CONTRADICTION&quot;);&quot;CONTRADICTION&quot;)))))">
            <text:p>UNKNOWN</text:p>
          </table:table-cell>
          <table:table-cell office:value-type="string" table:formula="of:=IF([.S76]=&quot;UNKNOWN&quot;;&quot;NO ACTION — linkage status is UNKNOWN / not asserted&quot;;IF([.S76]=&quot;CLEAR&quot;;&quot;NO CONTRADICTION — preserve evidence as entered&quot;;IF([.M76]=&quot;&quot;;&quot;REVIEW LINKAGE STATUS — identifiers are present while status is UNKNOWN&quot;;IF([.M76]=&quot;UNMATCHED&quot;;&quot;REMOVE LINKAGE IDENTIFIERS OR CORRECT LINKAGE STATUS&quot;;IF([.M76]=&quot;SINGLE_SALE_LINKED&quot;;&quot;REQUIRE LINKED SALE ID AND NO ALLOCATION GROUP ID&quot;;IF([.M76]=&quot;MULTI_SALE_PENDING_ALLOCATION&quot;;&quot;REMOVE LINKED SALE ID OR CORRECT LINKAGE STATUS&quot;;IF([.M76]=&quot;ALLOCATED&quot;;&quot;REQUIRE ALLOCATION GROUP ID AND NO LINKED SALE ID&quot;;&quot;REVIEW LINKAGE EVIDENCE — NO AUTHORITY CREATED&quot;)))))))">
            <text:p>NO ACTION — linkage status is UNKNOWN / not asserted</text:p>
          </table:table-cell>
          <table:table-cell office:value-type="string" table:formula="of:=IF([.S76]=&quot;CONTRADICTION&quot;;&quot;BLOCKED&quot;;IF([.S76]=&quot;UNKNOWN&quot;;&quot;UNKNOWN&quot;;IF([.S76]=&quot;CLEAR&quot;;IF(OR([.O76]=&quot;&quot;;[.P76]=&quot;&quot;);&quot;UNKNOWN&quot;;&quot;READY FOR REVIEW&quot;);&quot;BLOCKED&quot;)))">
            <text:p>UNKNOWN</text:p>
          </table:table-cell>
          <table:table-cell office:value-type="string" table:formula="of:=IF([.U76]=&quot;UNKNOWN&quot;;&quot;COMPLETE OR ASSERT REQUIRED EVIDENCE BEFORE REVIEW&quot;;IF([.U76]=&quot;BLOCKED&quot;;&quot;RESOLVE CONTRADICTION BEFORE REVIEW — NO AUTHORITY CREATED&quot;;IF([.U7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6]=&quot;READY FOR REVIEW&quot;;&quot;REVIEW ELIGIBLE — NO AUTHORITY&quot;;IF(OR([.U76]=&quot;UNKNOWN&quot;;[.U76]=&quot;BLOCKED&quot;);&quot;NOT REVIEW ELIGIBLE&quot;;&quot;NOT REVIEW ELIGIBLE&quot;))">
            <text:p>NOT REVIEW ELIGIBLE</text:p>
          </table:table-cell>
          <table:table-cell office:value-type="string" table:formula="of:=IF([.W76]=&quot;NOT REVIEW ELIGIBLE&quot;;&quot;DO NOT BEGIN SETTLEMENT REVIEW — RESOLVE READINESS OR CONTRADICTION CONDITIONS&quot;;IF([.W7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6]=&quot;&quot;;&quot;UNKNOWN&quot;;IF([.W76]&lt;&gt;&quot;REVIEW ELIGIBLE — NO AUTHORITY&quot;;&quot;BLOCKED — OUTCOME ASSERTED WITHOUT REVIEW ELIGIBILITY&quot;;IF(OR([.Y76]=&quot;REVIEWED — NO AUTHORITY&quot;;[.Y76]=&quot;REVIEW DEFERRED&quot;;[.Y7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7]=&quot;&quot;;IF(AND([.L77]=&quot;&quot;;[.N77]=&quot;&quot;);&quot;UNKNOWN&quot;;&quot;CONTRADICTION&quot;);IF([.M77]=&quot;UNMATCHED&quot;;IF(AND([.L77]=&quot;&quot;;[.N77]=&quot;&quot;);&quot;CLEAR&quot;;&quot;CONTRADICTION&quot;);IF([.M77]=&quot;SINGLE_SALE_LINKED&quot;;IF(AND([.L77]&lt;&gt;&quot;&quot;;[.N77]=&quot;&quot;);&quot;CLEAR&quot;;&quot;CONTRADICTION&quot;);IF([.M77]=&quot;MULTI_SALE_PENDING_ALLOCATION&quot;;IF([.L77]=&quot;&quot;;&quot;CLEAR&quot;;&quot;CONTRADICTION&quot;);IF([.M77]=&quot;ALLOCATED&quot;;IF(AND([.L77]=&quot;&quot;;[.N77]&lt;&gt;&quot;&quot;);&quot;CLEAR&quot;;&quot;CONTRADICTION&quot;);&quot;CONTRADICTION&quot;)))))">
            <text:p>UNKNOWN</text:p>
          </table:table-cell>
          <table:table-cell office:value-type="string" table:formula="of:=IF([.S77]=&quot;UNKNOWN&quot;;&quot;NO ACTION — linkage status is UNKNOWN / not asserted&quot;;IF([.S77]=&quot;CLEAR&quot;;&quot;NO CONTRADICTION — preserve evidence as entered&quot;;IF([.M77]=&quot;&quot;;&quot;REVIEW LINKAGE STATUS — identifiers are present while status is UNKNOWN&quot;;IF([.M77]=&quot;UNMATCHED&quot;;&quot;REMOVE LINKAGE IDENTIFIERS OR CORRECT LINKAGE STATUS&quot;;IF([.M77]=&quot;SINGLE_SALE_LINKED&quot;;&quot;REQUIRE LINKED SALE ID AND NO ALLOCATION GROUP ID&quot;;IF([.M77]=&quot;MULTI_SALE_PENDING_ALLOCATION&quot;;&quot;REMOVE LINKED SALE ID OR CORRECT LINKAGE STATUS&quot;;IF([.M77]=&quot;ALLOCATED&quot;;&quot;REQUIRE ALLOCATION GROUP ID AND NO LINKED SALE ID&quot;;&quot;REVIEW LINKAGE EVIDENCE — NO AUTHORITY CREATED&quot;)))))))">
            <text:p>NO ACTION — linkage status is UNKNOWN / not asserted</text:p>
          </table:table-cell>
          <table:table-cell office:value-type="string" table:formula="of:=IF([.S77]=&quot;CONTRADICTION&quot;;&quot;BLOCKED&quot;;IF([.S77]=&quot;UNKNOWN&quot;;&quot;UNKNOWN&quot;;IF([.S77]=&quot;CLEAR&quot;;IF(OR([.O77]=&quot;&quot;;[.P77]=&quot;&quot;);&quot;UNKNOWN&quot;;&quot;READY FOR REVIEW&quot;);&quot;BLOCKED&quot;)))">
            <text:p>UNKNOWN</text:p>
          </table:table-cell>
          <table:table-cell office:value-type="string" table:formula="of:=IF([.U77]=&quot;UNKNOWN&quot;;&quot;COMPLETE OR ASSERT REQUIRED EVIDENCE BEFORE REVIEW&quot;;IF([.U77]=&quot;BLOCKED&quot;;&quot;RESOLVE CONTRADICTION BEFORE REVIEW — NO AUTHORITY CREATED&quot;;IF([.U7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7]=&quot;READY FOR REVIEW&quot;;&quot;REVIEW ELIGIBLE — NO AUTHORITY&quot;;IF(OR([.U77]=&quot;UNKNOWN&quot;;[.U77]=&quot;BLOCKED&quot;);&quot;NOT REVIEW ELIGIBLE&quot;;&quot;NOT REVIEW ELIGIBLE&quot;))">
            <text:p>NOT REVIEW ELIGIBLE</text:p>
          </table:table-cell>
          <table:table-cell office:value-type="string" table:formula="of:=IF([.W77]=&quot;NOT REVIEW ELIGIBLE&quot;;&quot;DO NOT BEGIN SETTLEMENT REVIEW — RESOLVE READINESS OR CONTRADICTION CONDITIONS&quot;;IF([.W7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7]=&quot;&quot;;&quot;UNKNOWN&quot;;IF([.W77]&lt;&gt;&quot;REVIEW ELIGIBLE — NO AUTHORITY&quot;;&quot;BLOCKED — OUTCOME ASSERTED WITHOUT REVIEW ELIGIBILITY&quot;;IF(OR([.Y77]=&quot;REVIEWED — NO AUTHORITY&quot;;[.Y77]=&quot;REVIEW DEFERRED&quot;;[.Y7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8]=&quot;&quot;;IF(AND([.L78]=&quot;&quot;;[.N78]=&quot;&quot;);&quot;UNKNOWN&quot;;&quot;CONTRADICTION&quot;);IF([.M78]=&quot;UNMATCHED&quot;;IF(AND([.L78]=&quot;&quot;;[.N78]=&quot;&quot;);&quot;CLEAR&quot;;&quot;CONTRADICTION&quot;);IF([.M78]=&quot;SINGLE_SALE_LINKED&quot;;IF(AND([.L78]&lt;&gt;&quot;&quot;;[.N78]=&quot;&quot;);&quot;CLEAR&quot;;&quot;CONTRADICTION&quot;);IF([.M78]=&quot;MULTI_SALE_PENDING_ALLOCATION&quot;;IF([.L78]=&quot;&quot;;&quot;CLEAR&quot;;&quot;CONTRADICTION&quot;);IF([.M78]=&quot;ALLOCATED&quot;;IF(AND([.L78]=&quot;&quot;;[.N78]&lt;&gt;&quot;&quot;);&quot;CLEAR&quot;;&quot;CONTRADICTION&quot;);&quot;CONTRADICTION&quot;)))))">
            <text:p>UNKNOWN</text:p>
          </table:table-cell>
          <table:table-cell office:value-type="string" table:formula="of:=IF([.S78]=&quot;UNKNOWN&quot;;&quot;NO ACTION — linkage status is UNKNOWN / not asserted&quot;;IF([.S78]=&quot;CLEAR&quot;;&quot;NO CONTRADICTION — preserve evidence as entered&quot;;IF([.M78]=&quot;&quot;;&quot;REVIEW LINKAGE STATUS — identifiers are present while status is UNKNOWN&quot;;IF([.M78]=&quot;UNMATCHED&quot;;&quot;REMOVE LINKAGE IDENTIFIERS OR CORRECT LINKAGE STATUS&quot;;IF([.M78]=&quot;SINGLE_SALE_LINKED&quot;;&quot;REQUIRE LINKED SALE ID AND NO ALLOCATION GROUP ID&quot;;IF([.M78]=&quot;MULTI_SALE_PENDING_ALLOCATION&quot;;&quot;REMOVE LINKED SALE ID OR CORRECT LINKAGE STATUS&quot;;IF([.M78]=&quot;ALLOCATED&quot;;&quot;REQUIRE ALLOCATION GROUP ID AND NO LINKED SALE ID&quot;;&quot;REVIEW LINKAGE EVIDENCE — NO AUTHORITY CREATED&quot;)))))))">
            <text:p>NO ACTION — linkage status is UNKNOWN / not asserted</text:p>
          </table:table-cell>
          <table:table-cell office:value-type="string" table:formula="of:=IF([.S78]=&quot;CONTRADICTION&quot;;&quot;BLOCKED&quot;;IF([.S78]=&quot;UNKNOWN&quot;;&quot;UNKNOWN&quot;;IF([.S78]=&quot;CLEAR&quot;;IF(OR([.O78]=&quot;&quot;;[.P78]=&quot;&quot;);&quot;UNKNOWN&quot;;&quot;READY FOR REVIEW&quot;);&quot;BLOCKED&quot;)))">
            <text:p>UNKNOWN</text:p>
          </table:table-cell>
          <table:table-cell office:value-type="string" table:formula="of:=IF([.U78]=&quot;UNKNOWN&quot;;&quot;COMPLETE OR ASSERT REQUIRED EVIDENCE BEFORE REVIEW&quot;;IF([.U78]=&quot;BLOCKED&quot;;&quot;RESOLVE CONTRADICTION BEFORE REVIEW — NO AUTHORITY CREATED&quot;;IF([.U7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8]=&quot;READY FOR REVIEW&quot;;&quot;REVIEW ELIGIBLE — NO AUTHORITY&quot;;IF(OR([.U78]=&quot;UNKNOWN&quot;;[.U78]=&quot;BLOCKED&quot;);&quot;NOT REVIEW ELIGIBLE&quot;;&quot;NOT REVIEW ELIGIBLE&quot;))">
            <text:p>NOT REVIEW ELIGIBLE</text:p>
          </table:table-cell>
          <table:table-cell office:value-type="string" table:formula="of:=IF([.W78]=&quot;NOT REVIEW ELIGIBLE&quot;;&quot;DO NOT BEGIN SETTLEMENT REVIEW — RESOLVE READINESS OR CONTRADICTION CONDITIONS&quot;;IF([.W7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8]=&quot;&quot;;&quot;UNKNOWN&quot;;IF([.W78]&lt;&gt;&quot;REVIEW ELIGIBLE — NO AUTHORITY&quot;;&quot;BLOCKED — OUTCOME ASSERTED WITHOUT REVIEW ELIGIBILITY&quot;;IF(OR([.Y78]=&quot;REVIEWED — NO AUTHORITY&quot;;[.Y78]=&quot;REVIEW DEFERRED&quot;;[.Y7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79]=&quot;&quot;;IF(AND([.L79]=&quot;&quot;;[.N79]=&quot;&quot;);&quot;UNKNOWN&quot;;&quot;CONTRADICTION&quot;);IF([.M79]=&quot;UNMATCHED&quot;;IF(AND([.L79]=&quot;&quot;;[.N79]=&quot;&quot;);&quot;CLEAR&quot;;&quot;CONTRADICTION&quot;);IF([.M79]=&quot;SINGLE_SALE_LINKED&quot;;IF(AND([.L79]&lt;&gt;&quot;&quot;;[.N79]=&quot;&quot;);&quot;CLEAR&quot;;&quot;CONTRADICTION&quot;);IF([.M79]=&quot;MULTI_SALE_PENDING_ALLOCATION&quot;;IF([.L79]=&quot;&quot;;&quot;CLEAR&quot;;&quot;CONTRADICTION&quot;);IF([.M79]=&quot;ALLOCATED&quot;;IF(AND([.L79]=&quot;&quot;;[.N79]&lt;&gt;&quot;&quot;);&quot;CLEAR&quot;;&quot;CONTRADICTION&quot;);&quot;CONTRADICTION&quot;)))))">
            <text:p>UNKNOWN</text:p>
          </table:table-cell>
          <table:table-cell office:value-type="string" table:formula="of:=IF([.S79]=&quot;UNKNOWN&quot;;&quot;NO ACTION — linkage status is UNKNOWN / not asserted&quot;;IF([.S79]=&quot;CLEAR&quot;;&quot;NO CONTRADICTION — preserve evidence as entered&quot;;IF([.M79]=&quot;&quot;;&quot;REVIEW LINKAGE STATUS — identifiers are present while status is UNKNOWN&quot;;IF([.M79]=&quot;UNMATCHED&quot;;&quot;REMOVE LINKAGE IDENTIFIERS OR CORRECT LINKAGE STATUS&quot;;IF([.M79]=&quot;SINGLE_SALE_LINKED&quot;;&quot;REQUIRE LINKED SALE ID AND NO ALLOCATION GROUP ID&quot;;IF([.M79]=&quot;MULTI_SALE_PENDING_ALLOCATION&quot;;&quot;REMOVE LINKED SALE ID OR CORRECT LINKAGE STATUS&quot;;IF([.M79]=&quot;ALLOCATED&quot;;&quot;REQUIRE ALLOCATION GROUP ID AND NO LINKED SALE ID&quot;;&quot;REVIEW LINKAGE EVIDENCE — NO AUTHORITY CREATED&quot;)))))))">
            <text:p>NO ACTION — linkage status is UNKNOWN / not asserted</text:p>
          </table:table-cell>
          <table:table-cell office:value-type="string" table:formula="of:=IF([.S79]=&quot;CONTRADICTION&quot;;&quot;BLOCKED&quot;;IF([.S79]=&quot;UNKNOWN&quot;;&quot;UNKNOWN&quot;;IF([.S79]=&quot;CLEAR&quot;;IF(OR([.O79]=&quot;&quot;;[.P79]=&quot;&quot;);&quot;UNKNOWN&quot;;&quot;READY FOR REVIEW&quot;);&quot;BLOCKED&quot;)))">
            <text:p>UNKNOWN</text:p>
          </table:table-cell>
          <table:table-cell office:value-type="string" table:formula="of:=IF([.U79]=&quot;UNKNOWN&quot;;&quot;COMPLETE OR ASSERT REQUIRED EVIDENCE BEFORE REVIEW&quot;;IF([.U79]=&quot;BLOCKED&quot;;&quot;RESOLVE CONTRADICTION BEFORE REVIEW — NO AUTHORITY CREATED&quot;;IF([.U7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79]=&quot;READY FOR REVIEW&quot;;&quot;REVIEW ELIGIBLE — NO AUTHORITY&quot;;IF(OR([.U79]=&quot;UNKNOWN&quot;;[.U79]=&quot;BLOCKED&quot;);&quot;NOT REVIEW ELIGIBLE&quot;;&quot;NOT REVIEW ELIGIBLE&quot;))">
            <text:p>NOT REVIEW ELIGIBLE</text:p>
          </table:table-cell>
          <table:table-cell office:value-type="string" table:formula="of:=IF([.W79]=&quot;NOT REVIEW ELIGIBLE&quot;;&quot;DO NOT BEGIN SETTLEMENT REVIEW — RESOLVE READINESS OR CONTRADICTION CONDITIONS&quot;;IF([.W7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79]=&quot;&quot;;&quot;UNKNOWN&quot;;IF([.W79]&lt;&gt;&quot;REVIEW ELIGIBLE — NO AUTHORITY&quot;;&quot;BLOCKED — OUTCOME ASSERTED WITHOUT REVIEW ELIGIBILITY&quot;;IF(OR([.Y79]=&quot;REVIEWED — NO AUTHORITY&quot;;[.Y79]=&quot;REVIEW DEFERRED&quot;;[.Y7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0]=&quot;&quot;;IF(AND([.L80]=&quot;&quot;;[.N80]=&quot;&quot;);&quot;UNKNOWN&quot;;&quot;CONTRADICTION&quot;);IF([.M80]=&quot;UNMATCHED&quot;;IF(AND([.L80]=&quot;&quot;;[.N80]=&quot;&quot;);&quot;CLEAR&quot;;&quot;CONTRADICTION&quot;);IF([.M80]=&quot;SINGLE_SALE_LINKED&quot;;IF(AND([.L80]&lt;&gt;&quot;&quot;;[.N80]=&quot;&quot;);&quot;CLEAR&quot;;&quot;CONTRADICTION&quot;);IF([.M80]=&quot;MULTI_SALE_PENDING_ALLOCATION&quot;;IF([.L80]=&quot;&quot;;&quot;CLEAR&quot;;&quot;CONTRADICTION&quot;);IF([.M80]=&quot;ALLOCATED&quot;;IF(AND([.L80]=&quot;&quot;;[.N80]&lt;&gt;&quot;&quot;);&quot;CLEAR&quot;;&quot;CONTRADICTION&quot;);&quot;CONTRADICTION&quot;)))))">
            <text:p>UNKNOWN</text:p>
          </table:table-cell>
          <table:table-cell office:value-type="string" table:formula="of:=IF([.S80]=&quot;UNKNOWN&quot;;&quot;NO ACTION — linkage status is UNKNOWN / not asserted&quot;;IF([.S80]=&quot;CLEAR&quot;;&quot;NO CONTRADICTION — preserve evidence as entered&quot;;IF([.M80]=&quot;&quot;;&quot;REVIEW LINKAGE STATUS — identifiers are present while status is UNKNOWN&quot;;IF([.M80]=&quot;UNMATCHED&quot;;&quot;REMOVE LINKAGE IDENTIFIERS OR CORRECT LINKAGE STATUS&quot;;IF([.M80]=&quot;SINGLE_SALE_LINKED&quot;;&quot;REQUIRE LINKED SALE ID AND NO ALLOCATION GROUP ID&quot;;IF([.M80]=&quot;MULTI_SALE_PENDING_ALLOCATION&quot;;&quot;REMOVE LINKED SALE ID OR CORRECT LINKAGE STATUS&quot;;IF([.M80]=&quot;ALLOCATED&quot;;&quot;REQUIRE ALLOCATION GROUP ID AND NO LINKED SALE ID&quot;;&quot;REVIEW LINKAGE EVIDENCE — NO AUTHORITY CREATED&quot;)))))))">
            <text:p>NO ACTION — linkage status is UNKNOWN / not asserted</text:p>
          </table:table-cell>
          <table:table-cell office:value-type="string" table:formula="of:=IF([.S80]=&quot;CONTRADICTION&quot;;&quot;BLOCKED&quot;;IF([.S80]=&quot;UNKNOWN&quot;;&quot;UNKNOWN&quot;;IF([.S80]=&quot;CLEAR&quot;;IF(OR([.O80]=&quot;&quot;;[.P80]=&quot;&quot;);&quot;UNKNOWN&quot;;&quot;READY FOR REVIEW&quot;);&quot;BLOCKED&quot;)))">
            <text:p>UNKNOWN</text:p>
          </table:table-cell>
          <table:table-cell office:value-type="string" table:formula="of:=IF([.U80]=&quot;UNKNOWN&quot;;&quot;COMPLETE OR ASSERT REQUIRED EVIDENCE BEFORE REVIEW&quot;;IF([.U80]=&quot;BLOCKED&quot;;&quot;RESOLVE CONTRADICTION BEFORE REVIEW — NO AUTHORITY CREATED&quot;;IF([.U8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0]=&quot;READY FOR REVIEW&quot;;&quot;REVIEW ELIGIBLE — NO AUTHORITY&quot;;IF(OR([.U80]=&quot;UNKNOWN&quot;;[.U80]=&quot;BLOCKED&quot;);&quot;NOT REVIEW ELIGIBLE&quot;;&quot;NOT REVIEW ELIGIBLE&quot;))">
            <text:p>NOT REVIEW ELIGIBLE</text:p>
          </table:table-cell>
          <table:table-cell office:value-type="string" table:formula="of:=IF([.W80]=&quot;NOT REVIEW ELIGIBLE&quot;;&quot;DO NOT BEGIN SETTLEMENT REVIEW — RESOLVE READINESS OR CONTRADICTION CONDITIONS&quot;;IF([.W8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0]=&quot;&quot;;&quot;UNKNOWN&quot;;IF([.W80]&lt;&gt;&quot;REVIEW ELIGIBLE — NO AUTHORITY&quot;;&quot;BLOCKED — OUTCOME ASSERTED WITHOUT REVIEW ELIGIBILITY&quot;;IF(OR([.Y80]=&quot;REVIEWED — NO AUTHORITY&quot;;[.Y80]=&quot;REVIEW DEFERRED&quot;;[.Y8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1]=&quot;&quot;;IF(AND([.L81]=&quot;&quot;;[.N81]=&quot;&quot;);&quot;UNKNOWN&quot;;&quot;CONTRADICTION&quot;);IF([.M81]=&quot;UNMATCHED&quot;;IF(AND([.L81]=&quot;&quot;;[.N81]=&quot;&quot;);&quot;CLEAR&quot;;&quot;CONTRADICTION&quot;);IF([.M81]=&quot;SINGLE_SALE_LINKED&quot;;IF(AND([.L81]&lt;&gt;&quot;&quot;;[.N81]=&quot;&quot;);&quot;CLEAR&quot;;&quot;CONTRADICTION&quot;);IF([.M81]=&quot;MULTI_SALE_PENDING_ALLOCATION&quot;;IF([.L81]=&quot;&quot;;&quot;CLEAR&quot;;&quot;CONTRADICTION&quot;);IF([.M81]=&quot;ALLOCATED&quot;;IF(AND([.L81]=&quot;&quot;;[.N81]&lt;&gt;&quot;&quot;);&quot;CLEAR&quot;;&quot;CONTRADICTION&quot;);&quot;CONTRADICTION&quot;)))))">
            <text:p>UNKNOWN</text:p>
          </table:table-cell>
          <table:table-cell office:value-type="string" table:formula="of:=IF([.S81]=&quot;UNKNOWN&quot;;&quot;NO ACTION — linkage status is UNKNOWN / not asserted&quot;;IF([.S81]=&quot;CLEAR&quot;;&quot;NO CONTRADICTION — preserve evidence as entered&quot;;IF([.M81]=&quot;&quot;;&quot;REVIEW LINKAGE STATUS — identifiers are present while status is UNKNOWN&quot;;IF([.M81]=&quot;UNMATCHED&quot;;&quot;REMOVE LINKAGE IDENTIFIERS OR CORRECT LINKAGE STATUS&quot;;IF([.M81]=&quot;SINGLE_SALE_LINKED&quot;;&quot;REQUIRE LINKED SALE ID AND NO ALLOCATION GROUP ID&quot;;IF([.M81]=&quot;MULTI_SALE_PENDING_ALLOCATION&quot;;&quot;REMOVE LINKED SALE ID OR CORRECT LINKAGE STATUS&quot;;IF([.M81]=&quot;ALLOCATED&quot;;&quot;REQUIRE ALLOCATION GROUP ID AND NO LINKED SALE ID&quot;;&quot;REVIEW LINKAGE EVIDENCE — NO AUTHORITY CREATED&quot;)))))))">
            <text:p>NO ACTION — linkage status is UNKNOWN / not asserted</text:p>
          </table:table-cell>
          <table:table-cell office:value-type="string" table:formula="of:=IF([.S81]=&quot;CONTRADICTION&quot;;&quot;BLOCKED&quot;;IF([.S81]=&quot;UNKNOWN&quot;;&quot;UNKNOWN&quot;;IF([.S81]=&quot;CLEAR&quot;;IF(OR([.O81]=&quot;&quot;;[.P81]=&quot;&quot;);&quot;UNKNOWN&quot;;&quot;READY FOR REVIEW&quot;);&quot;BLOCKED&quot;)))">
            <text:p>UNKNOWN</text:p>
          </table:table-cell>
          <table:table-cell office:value-type="string" table:formula="of:=IF([.U81]=&quot;UNKNOWN&quot;;&quot;COMPLETE OR ASSERT REQUIRED EVIDENCE BEFORE REVIEW&quot;;IF([.U81]=&quot;BLOCKED&quot;;&quot;RESOLVE CONTRADICTION BEFORE REVIEW — NO AUTHORITY CREATED&quot;;IF([.U8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1]=&quot;READY FOR REVIEW&quot;;&quot;REVIEW ELIGIBLE — NO AUTHORITY&quot;;IF(OR([.U81]=&quot;UNKNOWN&quot;;[.U81]=&quot;BLOCKED&quot;);&quot;NOT REVIEW ELIGIBLE&quot;;&quot;NOT REVIEW ELIGIBLE&quot;))">
            <text:p>NOT REVIEW ELIGIBLE</text:p>
          </table:table-cell>
          <table:table-cell office:value-type="string" table:formula="of:=IF([.W81]=&quot;NOT REVIEW ELIGIBLE&quot;;&quot;DO NOT BEGIN SETTLEMENT REVIEW — RESOLVE READINESS OR CONTRADICTION CONDITIONS&quot;;IF([.W8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1]=&quot;&quot;;&quot;UNKNOWN&quot;;IF([.W81]&lt;&gt;&quot;REVIEW ELIGIBLE — NO AUTHORITY&quot;;&quot;BLOCKED — OUTCOME ASSERTED WITHOUT REVIEW ELIGIBILITY&quot;;IF(OR([.Y81]=&quot;REVIEWED — NO AUTHORITY&quot;;[.Y81]=&quot;REVIEW DEFERRED&quot;;[.Y81]=&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2]=&quot;&quot;;IF(AND([.L82]=&quot;&quot;;[.N82]=&quot;&quot;);&quot;UNKNOWN&quot;;&quot;CONTRADICTION&quot;);IF([.M82]=&quot;UNMATCHED&quot;;IF(AND([.L82]=&quot;&quot;;[.N82]=&quot;&quot;);&quot;CLEAR&quot;;&quot;CONTRADICTION&quot;);IF([.M82]=&quot;SINGLE_SALE_LINKED&quot;;IF(AND([.L82]&lt;&gt;&quot;&quot;;[.N82]=&quot;&quot;);&quot;CLEAR&quot;;&quot;CONTRADICTION&quot;);IF([.M82]=&quot;MULTI_SALE_PENDING_ALLOCATION&quot;;IF([.L82]=&quot;&quot;;&quot;CLEAR&quot;;&quot;CONTRADICTION&quot;);IF([.M82]=&quot;ALLOCATED&quot;;IF(AND([.L82]=&quot;&quot;;[.N82]&lt;&gt;&quot;&quot;);&quot;CLEAR&quot;;&quot;CONTRADICTION&quot;);&quot;CONTRADICTION&quot;)))))">
            <text:p>UNKNOWN</text:p>
          </table:table-cell>
          <table:table-cell office:value-type="string" table:formula="of:=IF([.S82]=&quot;UNKNOWN&quot;;&quot;NO ACTION — linkage status is UNKNOWN / not asserted&quot;;IF([.S82]=&quot;CLEAR&quot;;&quot;NO CONTRADICTION — preserve evidence as entered&quot;;IF([.M82]=&quot;&quot;;&quot;REVIEW LINKAGE STATUS — identifiers are present while status is UNKNOWN&quot;;IF([.M82]=&quot;UNMATCHED&quot;;&quot;REMOVE LINKAGE IDENTIFIERS OR CORRECT LINKAGE STATUS&quot;;IF([.M82]=&quot;SINGLE_SALE_LINKED&quot;;&quot;REQUIRE LINKED SALE ID AND NO ALLOCATION GROUP ID&quot;;IF([.M82]=&quot;MULTI_SALE_PENDING_ALLOCATION&quot;;&quot;REMOVE LINKED SALE ID OR CORRECT LINKAGE STATUS&quot;;IF([.M82]=&quot;ALLOCATED&quot;;&quot;REQUIRE ALLOCATION GROUP ID AND NO LINKED SALE ID&quot;;&quot;REVIEW LINKAGE EVIDENCE — NO AUTHORITY CREATED&quot;)))))))">
            <text:p>NO ACTION — linkage status is UNKNOWN / not asserted</text:p>
          </table:table-cell>
          <table:table-cell office:value-type="string" table:formula="of:=IF([.S82]=&quot;CONTRADICTION&quot;;&quot;BLOCKED&quot;;IF([.S82]=&quot;UNKNOWN&quot;;&quot;UNKNOWN&quot;;IF([.S82]=&quot;CLEAR&quot;;IF(OR([.O82]=&quot;&quot;;[.P82]=&quot;&quot;);&quot;UNKNOWN&quot;;&quot;READY FOR REVIEW&quot;);&quot;BLOCKED&quot;)))">
            <text:p>UNKNOWN</text:p>
          </table:table-cell>
          <table:table-cell office:value-type="string" table:formula="of:=IF([.U82]=&quot;UNKNOWN&quot;;&quot;COMPLETE OR ASSERT REQUIRED EVIDENCE BEFORE REVIEW&quot;;IF([.U82]=&quot;BLOCKED&quot;;&quot;RESOLVE CONTRADICTION BEFORE REVIEW — NO AUTHORITY CREATED&quot;;IF([.U8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2]=&quot;READY FOR REVIEW&quot;;&quot;REVIEW ELIGIBLE — NO AUTHORITY&quot;;IF(OR([.U82]=&quot;UNKNOWN&quot;;[.U82]=&quot;BLOCKED&quot;);&quot;NOT REVIEW ELIGIBLE&quot;;&quot;NOT REVIEW ELIGIBLE&quot;))">
            <text:p>NOT REVIEW ELIGIBLE</text:p>
          </table:table-cell>
          <table:table-cell office:value-type="string" table:formula="of:=IF([.W82]=&quot;NOT REVIEW ELIGIBLE&quot;;&quot;DO NOT BEGIN SETTLEMENT REVIEW — RESOLVE READINESS OR CONTRADICTION CONDITIONS&quot;;IF([.W8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2]=&quot;&quot;;&quot;UNKNOWN&quot;;IF([.W82]&lt;&gt;&quot;REVIEW ELIGIBLE — NO AUTHORITY&quot;;&quot;BLOCKED — OUTCOME ASSERTED WITHOUT REVIEW ELIGIBILITY&quot;;IF(OR([.Y82]=&quot;REVIEWED — NO AUTHORITY&quot;;[.Y82]=&quot;REVIEW DEFERRED&quot;;[.Y8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3]=&quot;&quot;;IF(AND([.L83]=&quot;&quot;;[.N83]=&quot;&quot;);&quot;UNKNOWN&quot;;&quot;CONTRADICTION&quot;);IF([.M83]=&quot;UNMATCHED&quot;;IF(AND([.L83]=&quot;&quot;;[.N83]=&quot;&quot;);&quot;CLEAR&quot;;&quot;CONTRADICTION&quot;);IF([.M83]=&quot;SINGLE_SALE_LINKED&quot;;IF(AND([.L83]&lt;&gt;&quot;&quot;;[.N83]=&quot;&quot;);&quot;CLEAR&quot;;&quot;CONTRADICTION&quot;);IF([.M83]=&quot;MULTI_SALE_PENDING_ALLOCATION&quot;;IF([.L83]=&quot;&quot;;&quot;CLEAR&quot;;&quot;CONTRADICTION&quot;);IF([.M83]=&quot;ALLOCATED&quot;;IF(AND([.L83]=&quot;&quot;;[.N83]&lt;&gt;&quot;&quot;);&quot;CLEAR&quot;;&quot;CONTRADICTION&quot;);&quot;CONTRADICTION&quot;)))))">
            <text:p>UNKNOWN</text:p>
          </table:table-cell>
          <table:table-cell office:value-type="string" table:formula="of:=IF([.S83]=&quot;UNKNOWN&quot;;&quot;NO ACTION — linkage status is UNKNOWN / not asserted&quot;;IF([.S83]=&quot;CLEAR&quot;;&quot;NO CONTRADICTION — preserve evidence as entered&quot;;IF([.M83]=&quot;&quot;;&quot;REVIEW LINKAGE STATUS — identifiers are present while status is UNKNOWN&quot;;IF([.M83]=&quot;UNMATCHED&quot;;&quot;REMOVE LINKAGE IDENTIFIERS OR CORRECT LINKAGE STATUS&quot;;IF([.M83]=&quot;SINGLE_SALE_LINKED&quot;;&quot;REQUIRE LINKED SALE ID AND NO ALLOCATION GROUP ID&quot;;IF([.M83]=&quot;MULTI_SALE_PENDING_ALLOCATION&quot;;&quot;REMOVE LINKED SALE ID OR CORRECT LINKAGE STATUS&quot;;IF([.M83]=&quot;ALLOCATED&quot;;&quot;REQUIRE ALLOCATION GROUP ID AND NO LINKED SALE ID&quot;;&quot;REVIEW LINKAGE EVIDENCE — NO AUTHORITY CREATED&quot;)))))))">
            <text:p>NO ACTION — linkage status is UNKNOWN / not asserted</text:p>
          </table:table-cell>
          <table:table-cell office:value-type="string" table:formula="of:=IF([.S83]=&quot;CONTRADICTION&quot;;&quot;BLOCKED&quot;;IF([.S83]=&quot;UNKNOWN&quot;;&quot;UNKNOWN&quot;;IF([.S83]=&quot;CLEAR&quot;;IF(OR([.O83]=&quot;&quot;;[.P83]=&quot;&quot;);&quot;UNKNOWN&quot;;&quot;READY FOR REVIEW&quot;);&quot;BLOCKED&quot;)))">
            <text:p>UNKNOWN</text:p>
          </table:table-cell>
          <table:table-cell office:value-type="string" table:formula="of:=IF([.U83]=&quot;UNKNOWN&quot;;&quot;COMPLETE OR ASSERT REQUIRED EVIDENCE BEFORE REVIEW&quot;;IF([.U83]=&quot;BLOCKED&quot;;&quot;RESOLVE CONTRADICTION BEFORE REVIEW — NO AUTHORITY CREATED&quot;;IF([.U8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3]=&quot;READY FOR REVIEW&quot;;&quot;REVIEW ELIGIBLE — NO AUTHORITY&quot;;IF(OR([.U83]=&quot;UNKNOWN&quot;;[.U83]=&quot;BLOCKED&quot;);&quot;NOT REVIEW ELIGIBLE&quot;;&quot;NOT REVIEW ELIGIBLE&quot;))">
            <text:p>NOT REVIEW ELIGIBLE</text:p>
          </table:table-cell>
          <table:table-cell office:value-type="string" table:formula="of:=IF([.W83]=&quot;NOT REVIEW ELIGIBLE&quot;;&quot;DO NOT BEGIN SETTLEMENT REVIEW — RESOLVE READINESS OR CONTRADICTION CONDITIONS&quot;;IF([.W8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3]=&quot;&quot;;&quot;UNKNOWN&quot;;IF([.W83]&lt;&gt;&quot;REVIEW ELIGIBLE — NO AUTHORITY&quot;;&quot;BLOCKED — OUTCOME ASSERTED WITHOUT REVIEW ELIGIBILITY&quot;;IF(OR([.Y83]=&quot;REVIEWED — NO AUTHORITY&quot;;[.Y83]=&quot;REVIEW DEFERRED&quot;;[.Y8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4]=&quot;&quot;;IF(AND([.L84]=&quot;&quot;;[.N84]=&quot;&quot;);&quot;UNKNOWN&quot;;&quot;CONTRADICTION&quot;);IF([.M84]=&quot;UNMATCHED&quot;;IF(AND([.L84]=&quot;&quot;;[.N84]=&quot;&quot;);&quot;CLEAR&quot;;&quot;CONTRADICTION&quot;);IF([.M84]=&quot;SINGLE_SALE_LINKED&quot;;IF(AND([.L84]&lt;&gt;&quot;&quot;;[.N84]=&quot;&quot;);&quot;CLEAR&quot;;&quot;CONTRADICTION&quot;);IF([.M84]=&quot;MULTI_SALE_PENDING_ALLOCATION&quot;;IF([.L84]=&quot;&quot;;&quot;CLEAR&quot;;&quot;CONTRADICTION&quot;);IF([.M84]=&quot;ALLOCATED&quot;;IF(AND([.L84]=&quot;&quot;;[.N84]&lt;&gt;&quot;&quot;);&quot;CLEAR&quot;;&quot;CONTRADICTION&quot;);&quot;CONTRADICTION&quot;)))))">
            <text:p>UNKNOWN</text:p>
          </table:table-cell>
          <table:table-cell office:value-type="string" table:formula="of:=IF([.S84]=&quot;UNKNOWN&quot;;&quot;NO ACTION — linkage status is UNKNOWN / not asserted&quot;;IF([.S84]=&quot;CLEAR&quot;;&quot;NO CONTRADICTION — preserve evidence as entered&quot;;IF([.M84]=&quot;&quot;;&quot;REVIEW LINKAGE STATUS — identifiers are present while status is UNKNOWN&quot;;IF([.M84]=&quot;UNMATCHED&quot;;&quot;REMOVE LINKAGE IDENTIFIERS OR CORRECT LINKAGE STATUS&quot;;IF([.M84]=&quot;SINGLE_SALE_LINKED&quot;;&quot;REQUIRE LINKED SALE ID AND NO ALLOCATION GROUP ID&quot;;IF([.M84]=&quot;MULTI_SALE_PENDING_ALLOCATION&quot;;&quot;REMOVE LINKED SALE ID OR CORRECT LINKAGE STATUS&quot;;IF([.M84]=&quot;ALLOCATED&quot;;&quot;REQUIRE ALLOCATION GROUP ID AND NO LINKED SALE ID&quot;;&quot;REVIEW LINKAGE EVIDENCE — NO AUTHORITY CREATED&quot;)))))))">
            <text:p>NO ACTION — linkage status is UNKNOWN / not asserted</text:p>
          </table:table-cell>
          <table:table-cell office:value-type="string" table:formula="of:=IF([.S84]=&quot;CONTRADICTION&quot;;&quot;BLOCKED&quot;;IF([.S84]=&quot;UNKNOWN&quot;;&quot;UNKNOWN&quot;;IF([.S84]=&quot;CLEAR&quot;;IF(OR([.O84]=&quot;&quot;;[.P84]=&quot;&quot;);&quot;UNKNOWN&quot;;&quot;READY FOR REVIEW&quot;);&quot;BLOCKED&quot;)))">
            <text:p>UNKNOWN</text:p>
          </table:table-cell>
          <table:table-cell office:value-type="string" table:formula="of:=IF([.U84]=&quot;UNKNOWN&quot;;&quot;COMPLETE OR ASSERT REQUIRED EVIDENCE BEFORE REVIEW&quot;;IF([.U84]=&quot;BLOCKED&quot;;&quot;RESOLVE CONTRADICTION BEFORE REVIEW — NO AUTHORITY CREATED&quot;;IF([.U8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4]=&quot;READY FOR REVIEW&quot;;&quot;REVIEW ELIGIBLE — NO AUTHORITY&quot;;IF(OR([.U84]=&quot;UNKNOWN&quot;;[.U84]=&quot;BLOCKED&quot;);&quot;NOT REVIEW ELIGIBLE&quot;;&quot;NOT REVIEW ELIGIBLE&quot;))">
            <text:p>NOT REVIEW ELIGIBLE</text:p>
          </table:table-cell>
          <table:table-cell office:value-type="string" table:formula="of:=IF([.W84]=&quot;NOT REVIEW ELIGIBLE&quot;;&quot;DO NOT BEGIN SETTLEMENT REVIEW — RESOLVE READINESS OR CONTRADICTION CONDITIONS&quot;;IF([.W8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4]=&quot;&quot;;&quot;UNKNOWN&quot;;IF([.W84]&lt;&gt;&quot;REVIEW ELIGIBLE — NO AUTHORITY&quot;;&quot;BLOCKED — OUTCOME ASSERTED WITHOUT REVIEW ELIGIBILITY&quot;;IF(OR([.Y84]=&quot;REVIEWED — NO AUTHORITY&quot;;[.Y84]=&quot;REVIEW DEFERRED&quot;;[.Y8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5]=&quot;&quot;;IF(AND([.L85]=&quot;&quot;;[.N85]=&quot;&quot;);&quot;UNKNOWN&quot;;&quot;CONTRADICTION&quot;);IF([.M85]=&quot;UNMATCHED&quot;;IF(AND([.L85]=&quot;&quot;;[.N85]=&quot;&quot;);&quot;CLEAR&quot;;&quot;CONTRADICTION&quot;);IF([.M85]=&quot;SINGLE_SALE_LINKED&quot;;IF(AND([.L85]&lt;&gt;&quot;&quot;;[.N85]=&quot;&quot;);&quot;CLEAR&quot;;&quot;CONTRADICTION&quot;);IF([.M85]=&quot;MULTI_SALE_PENDING_ALLOCATION&quot;;IF([.L85]=&quot;&quot;;&quot;CLEAR&quot;;&quot;CONTRADICTION&quot;);IF([.M85]=&quot;ALLOCATED&quot;;IF(AND([.L85]=&quot;&quot;;[.N85]&lt;&gt;&quot;&quot;);&quot;CLEAR&quot;;&quot;CONTRADICTION&quot;);&quot;CONTRADICTION&quot;)))))">
            <text:p>UNKNOWN</text:p>
          </table:table-cell>
          <table:table-cell office:value-type="string" table:formula="of:=IF([.S85]=&quot;UNKNOWN&quot;;&quot;NO ACTION — linkage status is UNKNOWN / not asserted&quot;;IF([.S85]=&quot;CLEAR&quot;;&quot;NO CONTRADICTION — preserve evidence as entered&quot;;IF([.M85]=&quot;&quot;;&quot;REVIEW LINKAGE STATUS — identifiers are present while status is UNKNOWN&quot;;IF([.M85]=&quot;UNMATCHED&quot;;&quot;REMOVE LINKAGE IDENTIFIERS OR CORRECT LINKAGE STATUS&quot;;IF([.M85]=&quot;SINGLE_SALE_LINKED&quot;;&quot;REQUIRE LINKED SALE ID AND NO ALLOCATION GROUP ID&quot;;IF([.M85]=&quot;MULTI_SALE_PENDING_ALLOCATION&quot;;&quot;REMOVE LINKED SALE ID OR CORRECT LINKAGE STATUS&quot;;IF([.M85]=&quot;ALLOCATED&quot;;&quot;REQUIRE ALLOCATION GROUP ID AND NO LINKED SALE ID&quot;;&quot;REVIEW LINKAGE EVIDENCE — NO AUTHORITY CREATED&quot;)))))))">
            <text:p>NO ACTION — linkage status is UNKNOWN / not asserted</text:p>
          </table:table-cell>
          <table:table-cell office:value-type="string" table:formula="of:=IF([.S85]=&quot;CONTRADICTION&quot;;&quot;BLOCKED&quot;;IF([.S85]=&quot;UNKNOWN&quot;;&quot;UNKNOWN&quot;;IF([.S85]=&quot;CLEAR&quot;;IF(OR([.O85]=&quot;&quot;;[.P85]=&quot;&quot;);&quot;UNKNOWN&quot;;&quot;READY FOR REVIEW&quot;);&quot;BLOCKED&quot;)))">
            <text:p>UNKNOWN</text:p>
          </table:table-cell>
          <table:table-cell office:value-type="string" table:formula="of:=IF([.U85]=&quot;UNKNOWN&quot;;&quot;COMPLETE OR ASSERT REQUIRED EVIDENCE BEFORE REVIEW&quot;;IF([.U85]=&quot;BLOCKED&quot;;&quot;RESOLVE CONTRADICTION BEFORE REVIEW — NO AUTHORITY CREATED&quot;;IF([.U8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5]=&quot;READY FOR REVIEW&quot;;&quot;REVIEW ELIGIBLE — NO AUTHORITY&quot;;IF(OR([.U85]=&quot;UNKNOWN&quot;;[.U85]=&quot;BLOCKED&quot;);&quot;NOT REVIEW ELIGIBLE&quot;;&quot;NOT REVIEW ELIGIBLE&quot;))">
            <text:p>NOT REVIEW ELIGIBLE</text:p>
          </table:table-cell>
          <table:table-cell office:value-type="string" table:formula="of:=IF([.W85]=&quot;NOT REVIEW ELIGIBLE&quot;;&quot;DO NOT BEGIN SETTLEMENT REVIEW — RESOLVE READINESS OR CONTRADICTION CONDITIONS&quot;;IF([.W8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5]=&quot;&quot;;&quot;UNKNOWN&quot;;IF([.W85]&lt;&gt;&quot;REVIEW ELIGIBLE — NO AUTHORITY&quot;;&quot;BLOCKED — OUTCOME ASSERTED WITHOUT REVIEW ELIGIBILITY&quot;;IF(OR([.Y85]=&quot;REVIEWED — NO AUTHORITY&quot;;[.Y85]=&quot;REVIEW DEFERRED&quot;;[.Y8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6]=&quot;&quot;;IF(AND([.L86]=&quot;&quot;;[.N86]=&quot;&quot;);&quot;UNKNOWN&quot;;&quot;CONTRADICTION&quot;);IF([.M86]=&quot;UNMATCHED&quot;;IF(AND([.L86]=&quot;&quot;;[.N86]=&quot;&quot;);&quot;CLEAR&quot;;&quot;CONTRADICTION&quot;);IF([.M86]=&quot;SINGLE_SALE_LINKED&quot;;IF(AND([.L86]&lt;&gt;&quot;&quot;;[.N86]=&quot;&quot;);&quot;CLEAR&quot;;&quot;CONTRADICTION&quot;);IF([.M86]=&quot;MULTI_SALE_PENDING_ALLOCATION&quot;;IF([.L86]=&quot;&quot;;&quot;CLEAR&quot;;&quot;CONTRADICTION&quot;);IF([.M86]=&quot;ALLOCATED&quot;;IF(AND([.L86]=&quot;&quot;;[.N86]&lt;&gt;&quot;&quot;);&quot;CLEAR&quot;;&quot;CONTRADICTION&quot;);&quot;CONTRADICTION&quot;)))))">
            <text:p>UNKNOWN</text:p>
          </table:table-cell>
          <table:table-cell office:value-type="string" table:formula="of:=IF([.S86]=&quot;UNKNOWN&quot;;&quot;NO ACTION — linkage status is UNKNOWN / not asserted&quot;;IF([.S86]=&quot;CLEAR&quot;;&quot;NO CONTRADICTION — preserve evidence as entered&quot;;IF([.M86]=&quot;&quot;;&quot;REVIEW LINKAGE STATUS — identifiers are present while status is UNKNOWN&quot;;IF([.M86]=&quot;UNMATCHED&quot;;&quot;REMOVE LINKAGE IDENTIFIERS OR CORRECT LINKAGE STATUS&quot;;IF([.M86]=&quot;SINGLE_SALE_LINKED&quot;;&quot;REQUIRE LINKED SALE ID AND NO ALLOCATION GROUP ID&quot;;IF([.M86]=&quot;MULTI_SALE_PENDING_ALLOCATION&quot;;&quot;REMOVE LINKED SALE ID OR CORRECT LINKAGE STATUS&quot;;IF([.M86]=&quot;ALLOCATED&quot;;&quot;REQUIRE ALLOCATION GROUP ID AND NO LINKED SALE ID&quot;;&quot;REVIEW LINKAGE EVIDENCE — NO AUTHORITY CREATED&quot;)))))))">
            <text:p>NO ACTION — linkage status is UNKNOWN / not asserted</text:p>
          </table:table-cell>
          <table:table-cell office:value-type="string" table:formula="of:=IF([.S86]=&quot;CONTRADICTION&quot;;&quot;BLOCKED&quot;;IF([.S86]=&quot;UNKNOWN&quot;;&quot;UNKNOWN&quot;;IF([.S86]=&quot;CLEAR&quot;;IF(OR([.O86]=&quot;&quot;;[.P86]=&quot;&quot;);&quot;UNKNOWN&quot;;&quot;READY FOR REVIEW&quot;);&quot;BLOCKED&quot;)))">
            <text:p>UNKNOWN</text:p>
          </table:table-cell>
          <table:table-cell office:value-type="string" table:formula="of:=IF([.U86]=&quot;UNKNOWN&quot;;&quot;COMPLETE OR ASSERT REQUIRED EVIDENCE BEFORE REVIEW&quot;;IF([.U86]=&quot;BLOCKED&quot;;&quot;RESOLVE CONTRADICTION BEFORE REVIEW — NO AUTHORITY CREATED&quot;;IF([.U8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6]=&quot;READY FOR REVIEW&quot;;&quot;REVIEW ELIGIBLE — NO AUTHORITY&quot;;IF(OR([.U86]=&quot;UNKNOWN&quot;;[.U86]=&quot;BLOCKED&quot;);&quot;NOT REVIEW ELIGIBLE&quot;;&quot;NOT REVIEW ELIGIBLE&quot;))">
            <text:p>NOT REVIEW ELIGIBLE</text:p>
          </table:table-cell>
          <table:table-cell office:value-type="string" table:formula="of:=IF([.W86]=&quot;NOT REVIEW ELIGIBLE&quot;;&quot;DO NOT BEGIN SETTLEMENT REVIEW — RESOLVE READINESS OR CONTRADICTION CONDITIONS&quot;;IF([.W8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6]=&quot;&quot;;&quot;UNKNOWN&quot;;IF([.W86]&lt;&gt;&quot;REVIEW ELIGIBLE — NO AUTHORITY&quot;;&quot;BLOCKED — OUTCOME ASSERTED WITHOUT REVIEW ELIGIBILITY&quot;;IF(OR([.Y86]=&quot;REVIEWED — NO AUTHORITY&quot;;[.Y86]=&quot;REVIEW DEFERRED&quot;;[.Y8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7]=&quot;&quot;;IF(AND([.L87]=&quot;&quot;;[.N87]=&quot;&quot;);&quot;UNKNOWN&quot;;&quot;CONTRADICTION&quot;);IF([.M87]=&quot;UNMATCHED&quot;;IF(AND([.L87]=&quot;&quot;;[.N87]=&quot;&quot;);&quot;CLEAR&quot;;&quot;CONTRADICTION&quot;);IF([.M87]=&quot;SINGLE_SALE_LINKED&quot;;IF(AND([.L87]&lt;&gt;&quot;&quot;;[.N87]=&quot;&quot;);&quot;CLEAR&quot;;&quot;CONTRADICTION&quot;);IF([.M87]=&quot;MULTI_SALE_PENDING_ALLOCATION&quot;;IF([.L87]=&quot;&quot;;&quot;CLEAR&quot;;&quot;CONTRADICTION&quot;);IF([.M87]=&quot;ALLOCATED&quot;;IF(AND([.L87]=&quot;&quot;;[.N87]&lt;&gt;&quot;&quot;);&quot;CLEAR&quot;;&quot;CONTRADICTION&quot;);&quot;CONTRADICTION&quot;)))))">
            <text:p>UNKNOWN</text:p>
          </table:table-cell>
          <table:table-cell office:value-type="string" table:formula="of:=IF([.S87]=&quot;UNKNOWN&quot;;&quot;NO ACTION — linkage status is UNKNOWN / not asserted&quot;;IF([.S87]=&quot;CLEAR&quot;;&quot;NO CONTRADICTION — preserve evidence as entered&quot;;IF([.M87]=&quot;&quot;;&quot;REVIEW LINKAGE STATUS — identifiers are present while status is UNKNOWN&quot;;IF([.M87]=&quot;UNMATCHED&quot;;&quot;REMOVE LINKAGE IDENTIFIERS OR CORRECT LINKAGE STATUS&quot;;IF([.M87]=&quot;SINGLE_SALE_LINKED&quot;;&quot;REQUIRE LINKED SALE ID AND NO ALLOCATION GROUP ID&quot;;IF([.M87]=&quot;MULTI_SALE_PENDING_ALLOCATION&quot;;&quot;REMOVE LINKED SALE ID OR CORRECT LINKAGE STATUS&quot;;IF([.M87]=&quot;ALLOCATED&quot;;&quot;REQUIRE ALLOCATION GROUP ID AND NO LINKED SALE ID&quot;;&quot;REVIEW LINKAGE EVIDENCE — NO AUTHORITY CREATED&quot;)))))))">
            <text:p>NO ACTION — linkage status is UNKNOWN / not asserted</text:p>
          </table:table-cell>
          <table:table-cell office:value-type="string" table:formula="of:=IF([.S87]=&quot;CONTRADICTION&quot;;&quot;BLOCKED&quot;;IF([.S87]=&quot;UNKNOWN&quot;;&quot;UNKNOWN&quot;;IF([.S87]=&quot;CLEAR&quot;;IF(OR([.O87]=&quot;&quot;;[.P87]=&quot;&quot;);&quot;UNKNOWN&quot;;&quot;READY FOR REVIEW&quot;);&quot;BLOCKED&quot;)))">
            <text:p>UNKNOWN</text:p>
          </table:table-cell>
          <table:table-cell office:value-type="string" table:formula="of:=IF([.U87]=&quot;UNKNOWN&quot;;&quot;COMPLETE OR ASSERT REQUIRED EVIDENCE BEFORE REVIEW&quot;;IF([.U87]=&quot;BLOCKED&quot;;&quot;RESOLVE CONTRADICTION BEFORE REVIEW — NO AUTHORITY CREATED&quot;;IF([.U8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7]=&quot;READY FOR REVIEW&quot;;&quot;REVIEW ELIGIBLE — NO AUTHORITY&quot;;IF(OR([.U87]=&quot;UNKNOWN&quot;;[.U87]=&quot;BLOCKED&quot;);&quot;NOT REVIEW ELIGIBLE&quot;;&quot;NOT REVIEW ELIGIBLE&quot;))">
            <text:p>NOT REVIEW ELIGIBLE</text:p>
          </table:table-cell>
          <table:table-cell office:value-type="string" table:formula="of:=IF([.W87]=&quot;NOT REVIEW ELIGIBLE&quot;;&quot;DO NOT BEGIN SETTLEMENT REVIEW — RESOLVE READINESS OR CONTRADICTION CONDITIONS&quot;;IF([.W8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7]=&quot;&quot;;&quot;UNKNOWN&quot;;IF([.W87]&lt;&gt;&quot;REVIEW ELIGIBLE — NO AUTHORITY&quot;;&quot;BLOCKED — OUTCOME ASSERTED WITHOUT REVIEW ELIGIBILITY&quot;;IF(OR([.Y87]=&quot;REVIEWED — NO AUTHORITY&quot;;[.Y87]=&quot;REVIEW DEFERRED&quot;;[.Y8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8]=&quot;&quot;;IF(AND([.L88]=&quot;&quot;;[.N88]=&quot;&quot;);&quot;UNKNOWN&quot;;&quot;CONTRADICTION&quot;);IF([.M88]=&quot;UNMATCHED&quot;;IF(AND([.L88]=&quot;&quot;;[.N88]=&quot;&quot;);&quot;CLEAR&quot;;&quot;CONTRADICTION&quot;);IF([.M88]=&quot;SINGLE_SALE_LINKED&quot;;IF(AND([.L88]&lt;&gt;&quot;&quot;;[.N88]=&quot;&quot;);&quot;CLEAR&quot;;&quot;CONTRADICTION&quot;);IF([.M88]=&quot;MULTI_SALE_PENDING_ALLOCATION&quot;;IF([.L88]=&quot;&quot;;&quot;CLEAR&quot;;&quot;CONTRADICTION&quot;);IF([.M88]=&quot;ALLOCATED&quot;;IF(AND([.L88]=&quot;&quot;;[.N88]&lt;&gt;&quot;&quot;);&quot;CLEAR&quot;;&quot;CONTRADICTION&quot;);&quot;CONTRADICTION&quot;)))))">
            <text:p>UNKNOWN</text:p>
          </table:table-cell>
          <table:table-cell office:value-type="string" table:formula="of:=IF([.S88]=&quot;UNKNOWN&quot;;&quot;NO ACTION — linkage status is UNKNOWN / not asserted&quot;;IF([.S88]=&quot;CLEAR&quot;;&quot;NO CONTRADICTION — preserve evidence as entered&quot;;IF([.M88]=&quot;&quot;;&quot;REVIEW LINKAGE STATUS — identifiers are present while status is UNKNOWN&quot;;IF([.M88]=&quot;UNMATCHED&quot;;&quot;REMOVE LINKAGE IDENTIFIERS OR CORRECT LINKAGE STATUS&quot;;IF([.M88]=&quot;SINGLE_SALE_LINKED&quot;;&quot;REQUIRE LINKED SALE ID AND NO ALLOCATION GROUP ID&quot;;IF([.M88]=&quot;MULTI_SALE_PENDING_ALLOCATION&quot;;&quot;REMOVE LINKED SALE ID OR CORRECT LINKAGE STATUS&quot;;IF([.M88]=&quot;ALLOCATED&quot;;&quot;REQUIRE ALLOCATION GROUP ID AND NO LINKED SALE ID&quot;;&quot;REVIEW LINKAGE EVIDENCE — NO AUTHORITY CREATED&quot;)))))))">
            <text:p>NO ACTION — linkage status is UNKNOWN / not asserted</text:p>
          </table:table-cell>
          <table:table-cell office:value-type="string" table:formula="of:=IF([.S88]=&quot;CONTRADICTION&quot;;&quot;BLOCKED&quot;;IF([.S88]=&quot;UNKNOWN&quot;;&quot;UNKNOWN&quot;;IF([.S88]=&quot;CLEAR&quot;;IF(OR([.O88]=&quot;&quot;;[.P88]=&quot;&quot;);&quot;UNKNOWN&quot;;&quot;READY FOR REVIEW&quot;);&quot;BLOCKED&quot;)))">
            <text:p>UNKNOWN</text:p>
          </table:table-cell>
          <table:table-cell office:value-type="string" table:formula="of:=IF([.U88]=&quot;UNKNOWN&quot;;&quot;COMPLETE OR ASSERT REQUIRED EVIDENCE BEFORE REVIEW&quot;;IF([.U88]=&quot;BLOCKED&quot;;&quot;RESOLVE CONTRADICTION BEFORE REVIEW — NO AUTHORITY CREATED&quot;;IF([.U8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8]=&quot;READY FOR REVIEW&quot;;&quot;REVIEW ELIGIBLE — NO AUTHORITY&quot;;IF(OR([.U88]=&quot;UNKNOWN&quot;;[.U88]=&quot;BLOCKED&quot;);&quot;NOT REVIEW ELIGIBLE&quot;;&quot;NOT REVIEW ELIGIBLE&quot;))">
            <text:p>NOT REVIEW ELIGIBLE</text:p>
          </table:table-cell>
          <table:table-cell office:value-type="string" table:formula="of:=IF([.W88]=&quot;NOT REVIEW ELIGIBLE&quot;;&quot;DO NOT BEGIN SETTLEMENT REVIEW — RESOLVE READINESS OR CONTRADICTION CONDITIONS&quot;;IF([.W8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8]=&quot;&quot;;&quot;UNKNOWN&quot;;IF([.W88]&lt;&gt;&quot;REVIEW ELIGIBLE — NO AUTHORITY&quot;;&quot;BLOCKED — OUTCOME ASSERTED WITHOUT REVIEW ELIGIBILITY&quot;;IF(OR([.Y88]=&quot;REVIEWED — NO AUTHORITY&quot;;[.Y88]=&quot;REVIEW DEFERRED&quot;;[.Y8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89]=&quot;&quot;;IF(AND([.L89]=&quot;&quot;;[.N89]=&quot;&quot;);&quot;UNKNOWN&quot;;&quot;CONTRADICTION&quot;);IF([.M89]=&quot;UNMATCHED&quot;;IF(AND([.L89]=&quot;&quot;;[.N89]=&quot;&quot;);&quot;CLEAR&quot;;&quot;CONTRADICTION&quot;);IF([.M89]=&quot;SINGLE_SALE_LINKED&quot;;IF(AND([.L89]&lt;&gt;&quot;&quot;;[.N89]=&quot;&quot;);&quot;CLEAR&quot;;&quot;CONTRADICTION&quot;);IF([.M89]=&quot;MULTI_SALE_PENDING_ALLOCATION&quot;;IF([.L89]=&quot;&quot;;&quot;CLEAR&quot;;&quot;CONTRADICTION&quot;);IF([.M89]=&quot;ALLOCATED&quot;;IF(AND([.L89]=&quot;&quot;;[.N89]&lt;&gt;&quot;&quot;);&quot;CLEAR&quot;;&quot;CONTRADICTION&quot;);&quot;CONTRADICTION&quot;)))))">
            <text:p>UNKNOWN</text:p>
          </table:table-cell>
          <table:table-cell office:value-type="string" table:formula="of:=IF([.S89]=&quot;UNKNOWN&quot;;&quot;NO ACTION — linkage status is UNKNOWN / not asserted&quot;;IF([.S89]=&quot;CLEAR&quot;;&quot;NO CONTRADICTION — preserve evidence as entered&quot;;IF([.M89]=&quot;&quot;;&quot;REVIEW LINKAGE STATUS — identifiers are present while status is UNKNOWN&quot;;IF([.M89]=&quot;UNMATCHED&quot;;&quot;REMOVE LINKAGE IDENTIFIERS OR CORRECT LINKAGE STATUS&quot;;IF([.M89]=&quot;SINGLE_SALE_LINKED&quot;;&quot;REQUIRE LINKED SALE ID AND NO ALLOCATION GROUP ID&quot;;IF([.M89]=&quot;MULTI_SALE_PENDING_ALLOCATION&quot;;&quot;REMOVE LINKED SALE ID OR CORRECT LINKAGE STATUS&quot;;IF([.M89]=&quot;ALLOCATED&quot;;&quot;REQUIRE ALLOCATION GROUP ID AND NO LINKED SALE ID&quot;;&quot;REVIEW LINKAGE EVIDENCE — NO AUTHORITY CREATED&quot;)))))))">
            <text:p>NO ACTION — linkage status is UNKNOWN / not asserted</text:p>
          </table:table-cell>
          <table:table-cell office:value-type="string" table:formula="of:=IF([.S89]=&quot;CONTRADICTION&quot;;&quot;BLOCKED&quot;;IF([.S89]=&quot;UNKNOWN&quot;;&quot;UNKNOWN&quot;;IF([.S89]=&quot;CLEAR&quot;;IF(OR([.O89]=&quot;&quot;;[.P89]=&quot;&quot;);&quot;UNKNOWN&quot;;&quot;READY FOR REVIEW&quot;);&quot;BLOCKED&quot;)))">
            <text:p>UNKNOWN</text:p>
          </table:table-cell>
          <table:table-cell office:value-type="string" table:formula="of:=IF([.U89]=&quot;UNKNOWN&quot;;&quot;COMPLETE OR ASSERT REQUIRED EVIDENCE BEFORE REVIEW&quot;;IF([.U89]=&quot;BLOCKED&quot;;&quot;RESOLVE CONTRADICTION BEFORE REVIEW — NO AUTHORITY CREATED&quot;;IF([.U8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89]=&quot;READY FOR REVIEW&quot;;&quot;REVIEW ELIGIBLE — NO AUTHORITY&quot;;IF(OR([.U89]=&quot;UNKNOWN&quot;;[.U89]=&quot;BLOCKED&quot;);&quot;NOT REVIEW ELIGIBLE&quot;;&quot;NOT REVIEW ELIGIBLE&quot;))">
            <text:p>NOT REVIEW ELIGIBLE</text:p>
          </table:table-cell>
          <table:table-cell office:value-type="string" table:formula="of:=IF([.W89]=&quot;NOT REVIEW ELIGIBLE&quot;;&quot;DO NOT BEGIN SETTLEMENT REVIEW — RESOLVE READINESS OR CONTRADICTION CONDITIONS&quot;;IF([.W8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89]=&quot;&quot;;&quot;UNKNOWN&quot;;IF([.W89]&lt;&gt;&quot;REVIEW ELIGIBLE — NO AUTHORITY&quot;;&quot;BLOCKED — OUTCOME ASSERTED WITHOUT REVIEW ELIGIBILITY&quot;;IF(OR([.Y89]=&quot;REVIEWED — NO AUTHORITY&quot;;[.Y89]=&quot;REVIEW DEFERRED&quot;;[.Y8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0]=&quot;&quot;;IF(AND([.L90]=&quot;&quot;;[.N90]=&quot;&quot;);&quot;UNKNOWN&quot;;&quot;CONTRADICTION&quot;);IF([.M90]=&quot;UNMATCHED&quot;;IF(AND([.L90]=&quot;&quot;;[.N90]=&quot;&quot;);&quot;CLEAR&quot;;&quot;CONTRADICTION&quot;);IF([.M90]=&quot;SINGLE_SALE_LINKED&quot;;IF(AND([.L90]&lt;&gt;&quot;&quot;;[.N90]=&quot;&quot;);&quot;CLEAR&quot;;&quot;CONTRADICTION&quot;);IF([.M90]=&quot;MULTI_SALE_PENDING_ALLOCATION&quot;;IF([.L90]=&quot;&quot;;&quot;CLEAR&quot;;&quot;CONTRADICTION&quot;);IF([.M90]=&quot;ALLOCATED&quot;;IF(AND([.L90]=&quot;&quot;;[.N90]&lt;&gt;&quot;&quot;);&quot;CLEAR&quot;;&quot;CONTRADICTION&quot;);&quot;CONTRADICTION&quot;)))))">
            <text:p>UNKNOWN</text:p>
          </table:table-cell>
          <table:table-cell office:value-type="string" table:formula="of:=IF([.S90]=&quot;UNKNOWN&quot;;&quot;NO ACTION — linkage status is UNKNOWN / not asserted&quot;;IF([.S90]=&quot;CLEAR&quot;;&quot;NO CONTRADICTION — preserve evidence as entered&quot;;IF([.M90]=&quot;&quot;;&quot;REVIEW LINKAGE STATUS — identifiers are present while status is UNKNOWN&quot;;IF([.M90]=&quot;UNMATCHED&quot;;&quot;REMOVE LINKAGE IDENTIFIERS OR CORRECT LINKAGE STATUS&quot;;IF([.M90]=&quot;SINGLE_SALE_LINKED&quot;;&quot;REQUIRE LINKED SALE ID AND NO ALLOCATION GROUP ID&quot;;IF([.M90]=&quot;MULTI_SALE_PENDING_ALLOCATION&quot;;&quot;REMOVE LINKED SALE ID OR CORRECT LINKAGE STATUS&quot;;IF([.M90]=&quot;ALLOCATED&quot;;&quot;REQUIRE ALLOCATION GROUP ID AND NO LINKED SALE ID&quot;;&quot;REVIEW LINKAGE EVIDENCE — NO AUTHORITY CREATED&quot;)))))))">
            <text:p>NO ACTION — linkage status is UNKNOWN / not asserted</text:p>
          </table:table-cell>
          <table:table-cell office:value-type="string" table:formula="of:=IF([.S90]=&quot;CONTRADICTION&quot;;&quot;BLOCKED&quot;;IF([.S90]=&quot;UNKNOWN&quot;;&quot;UNKNOWN&quot;;IF([.S90]=&quot;CLEAR&quot;;IF(OR([.O90]=&quot;&quot;;[.P90]=&quot;&quot;);&quot;UNKNOWN&quot;;&quot;READY FOR REVIEW&quot;);&quot;BLOCKED&quot;)))">
            <text:p>UNKNOWN</text:p>
          </table:table-cell>
          <table:table-cell office:value-type="string" table:formula="of:=IF([.U90]=&quot;UNKNOWN&quot;;&quot;COMPLETE OR ASSERT REQUIRED EVIDENCE BEFORE REVIEW&quot;;IF([.U90]=&quot;BLOCKED&quot;;&quot;RESOLVE CONTRADICTION BEFORE REVIEW — NO AUTHORITY CREATED&quot;;IF([.U9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0]=&quot;READY FOR REVIEW&quot;;&quot;REVIEW ELIGIBLE — NO AUTHORITY&quot;;IF(OR([.U90]=&quot;UNKNOWN&quot;;[.U90]=&quot;BLOCKED&quot;);&quot;NOT REVIEW ELIGIBLE&quot;;&quot;NOT REVIEW ELIGIBLE&quot;))">
            <text:p>NOT REVIEW ELIGIBLE</text:p>
          </table:table-cell>
          <table:table-cell office:value-type="string" table:formula="of:=IF([.W90]=&quot;NOT REVIEW ELIGIBLE&quot;;&quot;DO NOT BEGIN SETTLEMENT REVIEW — RESOLVE READINESS OR CONTRADICTION CONDITIONS&quot;;IF([.W9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0]=&quot;&quot;;&quot;UNKNOWN&quot;;IF([.W90]&lt;&gt;&quot;REVIEW ELIGIBLE — NO AUTHORITY&quot;;&quot;BLOCKED — OUTCOME ASSERTED WITHOUT REVIEW ELIGIBILITY&quot;;IF(OR([.Y90]=&quot;REVIEWED — NO AUTHORITY&quot;;[.Y90]=&quot;REVIEW DEFERRED&quot;;[.Y9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1]=&quot;&quot;;IF(AND([.L91]=&quot;&quot;;[.N91]=&quot;&quot;);&quot;UNKNOWN&quot;;&quot;CONTRADICTION&quot;);IF([.M91]=&quot;UNMATCHED&quot;;IF(AND([.L91]=&quot;&quot;;[.N91]=&quot;&quot;);&quot;CLEAR&quot;;&quot;CONTRADICTION&quot;);IF([.M91]=&quot;SINGLE_SALE_LINKED&quot;;IF(AND([.L91]&lt;&gt;&quot;&quot;;[.N91]=&quot;&quot;);&quot;CLEAR&quot;;&quot;CONTRADICTION&quot;);IF([.M91]=&quot;MULTI_SALE_PENDING_ALLOCATION&quot;;IF([.L91]=&quot;&quot;;&quot;CLEAR&quot;;&quot;CONTRADICTION&quot;);IF([.M91]=&quot;ALLOCATED&quot;;IF(AND([.L91]=&quot;&quot;;[.N91]&lt;&gt;&quot;&quot;);&quot;CLEAR&quot;;&quot;CONTRADICTION&quot;);&quot;CONTRADICTION&quot;)))))">
            <text:p>UNKNOWN</text:p>
          </table:table-cell>
          <table:table-cell office:value-type="string" table:formula="of:=IF([.S91]=&quot;UNKNOWN&quot;;&quot;NO ACTION — linkage status is UNKNOWN / not asserted&quot;;IF([.S91]=&quot;CLEAR&quot;;&quot;NO CONTRADICTION — preserve evidence as entered&quot;;IF([.M91]=&quot;&quot;;&quot;REVIEW LINKAGE STATUS — identifiers are present while status is UNKNOWN&quot;;IF([.M91]=&quot;UNMATCHED&quot;;&quot;REMOVE LINKAGE IDENTIFIERS OR CORRECT LINKAGE STATUS&quot;;IF([.M91]=&quot;SINGLE_SALE_LINKED&quot;;&quot;REQUIRE LINKED SALE ID AND NO ALLOCATION GROUP ID&quot;;IF([.M91]=&quot;MULTI_SALE_PENDING_ALLOCATION&quot;;&quot;REMOVE LINKED SALE ID OR CORRECT LINKAGE STATUS&quot;;IF([.M91]=&quot;ALLOCATED&quot;;&quot;REQUIRE ALLOCATION GROUP ID AND NO LINKED SALE ID&quot;;&quot;REVIEW LINKAGE EVIDENCE — NO AUTHORITY CREATED&quot;)))))))">
            <text:p>NO ACTION — linkage status is UNKNOWN / not asserted</text:p>
          </table:table-cell>
          <table:table-cell office:value-type="string" table:formula="of:=IF([.S91]=&quot;CONTRADICTION&quot;;&quot;BLOCKED&quot;;IF([.S91]=&quot;UNKNOWN&quot;;&quot;UNKNOWN&quot;;IF([.S91]=&quot;CLEAR&quot;;IF(OR([.O91]=&quot;&quot;;[.P91]=&quot;&quot;);&quot;UNKNOWN&quot;;&quot;READY FOR REVIEW&quot;);&quot;BLOCKED&quot;)))">
            <text:p>UNKNOWN</text:p>
          </table:table-cell>
          <table:table-cell office:value-type="string" table:formula="of:=IF([.U91]=&quot;UNKNOWN&quot;;&quot;COMPLETE OR ASSERT REQUIRED EVIDENCE BEFORE REVIEW&quot;;IF([.U91]=&quot;BLOCKED&quot;;&quot;RESOLVE CONTRADICTION BEFORE REVIEW — NO AUTHORITY CREATED&quot;;IF([.U9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1]=&quot;READY FOR REVIEW&quot;;&quot;REVIEW ELIGIBLE — NO AUTHORITY&quot;;IF(OR([.U91]=&quot;UNKNOWN&quot;;[.U91]=&quot;BLOCKED&quot;);&quot;NOT REVIEW ELIGIBLE&quot;;&quot;NOT REVIEW ELIGIBLE&quot;))">
            <text:p>NOT REVIEW ELIGIBLE</text:p>
          </table:table-cell>
          <table:table-cell office:value-type="string" table:formula="of:=IF([.W91]=&quot;NOT REVIEW ELIGIBLE&quot;;&quot;DO NOT BEGIN SETTLEMENT REVIEW — RESOLVE READINESS OR CONTRADICTION CONDITIONS&quot;;IF([.W9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1]=&quot;&quot;;&quot;UNKNOWN&quot;;IF([.W91]&lt;&gt;&quot;REVIEW ELIGIBLE — NO AUTHORITY&quot;;&quot;BLOCKED — OUTCOME ASSERTED WITHOUT REVIEW ELIGIBILITY&quot;;IF(OR([.Y91]=&quot;REVIEWED — NO AUTHORITY&quot;;[.Y91]=&quot;REVIEW DEFERRED&quot;;[.Y91]=&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2]=&quot;&quot;;IF(AND([.L92]=&quot;&quot;;[.N92]=&quot;&quot;);&quot;UNKNOWN&quot;;&quot;CONTRADICTION&quot;);IF([.M92]=&quot;UNMATCHED&quot;;IF(AND([.L92]=&quot;&quot;;[.N92]=&quot;&quot;);&quot;CLEAR&quot;;&quot;CONTRADICTION&quot;);IF([.M92]=&quot;SINGLE_SALE_LINKED&quot;;IF(AND([.L92]&lt;&gt;&quot;&quot;;[.N92]=&quot;&quot;);&quot;CLEAR&quot;;&quot;CONTRADICTION&quot;);IF([.M92]=&quot;MULTI_SALE_PENDING_ALLOCATION&quot;;IF([.L92]=&quot;&quot;;&quot;CLEAR&quot;;&quot;CONTRADICTION&quot;);IF([.M92]=&quot;ALLOCATED&quot;;IF(AND([.L92]=&quot;&quot;;[.N92]&lt;&gt;&quot;&quot;);&quot;CLEAR&quot;;&quot;CONTRADICTION&quot;);&quot;CONTRADICTION&quot;)))))">
            <text:p>UNKNOWN</text:p>
          </table:table-cell>
          <table:table-cell office:value-type="string" table:formula="of:=IF([.S92]=&quot;UNKNOWN&quot;;&quot;NO ACTION — linkage status is UNKNOWN / not asserted&quot;;IF([.S92]=&quot;CLEAR&quot;;&quot;NO CONTRADICTION — preserve evidence as entered&quot;;IF([.M92]=&quot;&quot;;&quot;REVIEW LINKAGE STATUS — identifiers are present while status is UNKNOWN&quot;;IF([.M92]=&quot;UNMATCHED&quot;;&quot;REMOVE LINKAGE IDENTIFIERS OR CORRECT LINKAGE STATUS&quot;;IF([.M92]=&quot;SINGLE_SALE_LINKED&quot;;&quot;REQUIRE LINKED SALE ID AND NO ALLOCATION GROUP ID&quot;;IF([.M92]=&quot;MULTI_SALE_PENDING_ALLOCATION&quot;;&quot;REMOVE LINKED SALE ID OR CORRECT LINKAGE STATUS&quot;;IF([.M92]=&quot;ALLOCATED&quot;;&quot;REQUIRE ALLOCATION GROUP ID AND NO LINKED SALE ID&quot;;&quot;REVIEW LINKAGE EVIDENCE — NO AUTHORITY CREATED&quot;)))))))">
            <text:p>NO ACTION — linkage status is UNKNOWN / not asserted</text:p>
          </table:table-cell>
          <table:table-cell office:value-type="string" table:formula="of:=IF([.S92]=&quot;CONTRADICTION&quot;;&quot;BLOCKED&quot;;IF([.S92]=&quot;UNKNOWN&quot;;&quot;UNKNOWN&quot;;IF([.S92]=&quot;CLEAR&quot;;IF(OR([.O92]=&quot;&quot;;[.P92]=&quot;&quot;);&quot;UNKNOWN&quot;;&quot;READY FOR REVIEW&quot;);&quot;BLOCKED&quot;)))">
            <text:p>UNKNOWN</text:p>
          </table:table-cell>
          <table:table-cell office:value-type="string" table:formula="of:=IF([.U92]=&quot;UNKNOWN&quot;;&quot;COMPLETE OR ASSERT REQUIRED EVIDENCE BEFORE REVIEW&quot;;IF([.U92]=&quot;BLOCKED&quot;;&quot;RESOLVE CONTRADICTION BEFORE REVIEW — NO AUTHORITY CREATED&quot;;IF([.U9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2]=&quot;READY FOR REVIEW&quot;;&quot;REVIEW ELIGIBLE — NO AUTHORITY&quot;;IF(OR([.U92]=&quot;UNKNOWN&quot;;[.U92]=&quot;BLOCKED&quot;);&quot;NOT REVIEW ELIGIBLE&quot;;&quot;NOT REVIEW ELIGIBLE&quot;))">
            <text:p>NOT REVIEW ELIGIBLE</text:p>
          </table:table-cell>
          <table:table-cell office:value-type="string" table:formula="of:=IF([.W92]=&quot;NOT REVIEW ELIGIBLE&quot;;&quot;DO NOT BEGIN SETTLEMENT REVIEW — RESOLVE READINESS OR CONTRADICTION CONDITIONS&quot;;IF([.W9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2]=&quot;&quot;;&quot;UNKNOWN&quot;;IF([.W92]&lt;&gt;&quot;REVIEW ELIGIBLE — NO AUTHORITY&quot;;&quot;BLOCKED — OUTCOME ASSERTED WITHOUT REVIEW ELIGIBILITY&quot;;IF(OR([.Y92]=&quot;REVIEWED — NO AUTHORITY&quot;;[.Y92]=&quot;REVIEW DEFERRED&quot;;[.Y9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3]=&quot;&quot;;IF(AND([.L93]=&quot;&quot;;[.N93]=&quot;&quot;);&quot;UNKNOWN&quot;;&quot;CONTRADICTION&quot;);IF([.M93]=&quot;UNMATCHED&quot;;IF(AND([.L93]=&quot;&quot;;[.N93]=&quot;&quot;);&quot;CLEAR&quot;;&quot;CONTRADICTION&quot;);IF([.M93]=&quot;SINGLE_SALE_LINKED&quot;;IF(AND([.L93]&lt;&gt;&quot;&quot;;[.N93]=&quot;&quot;);&quot;CLEAR&quot;;&quot;CONTRADICTION&quot;);IF([.M93]=&quot;MULTI_SALE_PENDING_ALLOCATION&quot;;IF([.L93]=&quot;&quot;;&quot;CLEAR&quot;;&quot;CONTRADICTION&quot;);IF([.M93]=&quot;ALLOCATED&quot;;IF(AND([.L93]=&quot;&quot;;[.N93]&lt;&gt;&quot;&quot;);&quot;CLEAR&quot;;&quot;CONTRADICTION&quot;);&quot;CONTRADICTION&quot;)))))">
            <text:p>UNKNOWN</text:p>
          </table:table-cell>
          <table:table-cell office:value-type="string" table:formula="of:=IF([.S93]=&quot;UNKNOWN&quot;;&quot;NO ACTION — linkage status is UNKNOWN / not asserted&quot;;IF([.S93]=&quot;CLEAR&quot;;&quot;NO CONTRADICTION — preserve evidence as entered&quot;;IF([.M93]=&quot;&quot;;&quot;REVIEW LINKAGE STATUS — identifiers are present while status is UNKNOWN&quot;;IF([.M93]=&quot;UNMATCHED&quot;;&quot;REMOVE LINKAGE IDENTIFIERS OR CORRECT LINKAGE STATUS&quot;;IF([.M93]=&quot;SINGLE_SALE_LINKED&quot;;&quot;REQUIRE LINKED SALE ID AND NO ALLOCATION GROUP ID&quot;;IF([.M93]=&quot;MULTI_SALE_PENDING_ALLOCATION&quot;;&quot;REMOVE LINKED SALE ID OR CORRECT LINKAGE STATUS&quot;;IF([.M93]=&quot;ALLOCATED&quot;;&quot;REQUIRE ALLOCATION GROUP ID AND NO LINKED SALE ID&quot;;&quot;REVIEW LINKAGE EVIDENCE — NO AUTHORITY CREATED&quot;)))))))">
            <text:p>NO ACTION — linkage status is UNKNOWN / not asserted</text:p>
          </table:table-cell>
          <table:table-cell office:value-type="string" table:formula="of:=IF([.S93]=&quot;CONTRADICTION&quot;;&quot;BLOCKED&quot;;IF([.S93]=&quot;UNKNOWN&quot;;&quot;UNKNOWN&quot;;IF([.S93]=&quot;CLEAR&quot;;IF(OR([.O93]=&quot;&quot;;[.P93]=&quot;&quot;);&quot;UNKNOWN&quot;;&quot;READY FOR REVIEW&quot;);&quot;BLOCKED&quot;)))">
            <text:p>UNKNOWN</text:p>
          </table:table-cell>
          <table:table-cell office:value-type="string" table:formula="of:=IF([.U93]=&quot;UNKNOWN&quot;;&quot;COMPLETE OR ASSERT REQUIRED EVIDENCE BEFORE REVIEW&quot;;IF([.U93]=&quot;BLOCKED&quot;;&quot;RESOLVE CONTRADICTION BEFORE REVIEW — NO AUTHORITY CREATED&quot;;IF([.U9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3]=&quot;READY FOR REVIEW&quot;;&quot;REVIEW ELIGIBLE — NO AUTHORITY&quot;;IF(OR([.U93]=&quot;UNKNOWN&quot;;[.U93]=&quot;BLOCKED&quot;);&quot;NOT REVIEW ELIGIBLE&quot;;&quot;NOT REVIEW ELIGIBLE&quot;))">
            <text:p>NOT REVIEW ELIGIBLE</text:p>
          </table:table-cell>
          <table:table-cell office:value-type="string" table:formula="of:=IF([.W93]=&quot;NOT REVIEW ELIGIBLE&quot;;&quot;DO NOT BEGIN SETTLEMENT REVIEW — RESOLVE READINESS OR CONTRADICTION CONDITIONS&quot;;IF([.W9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3]=&quot;&quot;;&quot;UNKNOWN&quot;;IF([.W93]&lt;&gt;&quot;REVIEW ELIGIBLE — NO AUTHORITY&quot;;&quot;BLOCKED — OUTCOME ASSERTED WITHOUT REVIEW ELIGIBILITY&quot;;IF(OR([.Y93]=&quot;REVIEWED — NO AUTHORITY&quot;;[.Y93]=&quot;REVIEW DEFERRED&quot;;[.Y9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4]=&quot;&quot;;IF(AND([.L94]=&quot;&quot;;[.N94]=&quot;&quot;);&quot;UNKNOWN&quot;;&quot;CONTRADICTION&quot;);IF([.M94]=&quot;UNMATCHED&quot;;IF(AND([.L94]=&quot;&quot;;[.N94]=&quot;&quot;);&quot;CLEAR&quot;;&quot;CONTRADICTION&quot;);IF([.M94]=&quot;SINGLE_SALE_LINKED&quot;;IF(AND([.L94]&lt;&gt;&quot;&quot;;[.N94]=&quot;&quot;);&quot;CLEAR&quot;;&quot;CONTRADICTION&quot;);IF([.M94]=&quot;MULTI_SALE_PENDING_ALLOCATION&quot;;IF([.L94]=&quot;&quot;;&quot;CLEAR&quot;;&quot;CONTRADICTION&quot;);IF([.M94]=&quot;ALLOCATED&quot;;IF(AND([.L94]=&quot;&quot;;[.N94]&lt;&gt;&quot;&quot;);&quot;CLEAR&quot;;&quot;CONTRADICTION&quot;);&quot;CONTRADICTION&quot;)))))">
            <text:p>UNKNOWN</text:p>
          </table:table-cell>
          <table:table-cell office:value-type="string" table:formula="of:=IF([.S94]=&quot;UNKNOWN&quot;;&quot;NO ACTION — linkage status is UNKNOWN / not asserted&quot;;IF([.S94]=&quot;CLEAR&quot;;&quot;NO CONTRADICTION — preserve evidence as entered&quot;;IF([.M94]=&quot;&quot;;&quot;REVIEW LINKAGE STATUS — identifiers are present while status is UNKNOWN&quot;;IF([.M94]=&quot;UNMATCHED&quot;;&quot;REMOVE LINKAGE IDENTIFIERS OR CORRECT LINKAGE STATUS&quot;;IF([.M94]=&quot;SINGLE_SALE_LINKED&quot;;&quot;REQUIRE LINKED SALE ID AND NO ALLOCATION GROUP ID&quot;;IF([.M94]=&quot;MULTI_SALE_PENDING_ALLOCATION&quot;;&quot;REMOVE LINKED SALE ID OR CORRECT LINKAGE STATUS&quot;;IF([.M94]=&quot;ALLOCATED&quot;;&quot;REQUIRE ALLOCATION GROUP ID AND NO LINKED SALE ID&quot;;&quot;REVIEW LINKAGE EVIDENCE — NO AUTHORITY CREATED&quot;)))))))">
            <text:p>NO ACTION — linkage status is UNKNOWN / not asserted</text:p>
          </table:table-cell>
          <table:table-cell office:value-type="string" table:formula="of:=IF([.S94]=&quot;CONTRADICTION&quot;;&quot;BLOCKED&quot;;IF([.S94]=&quot;UNKNOWN&quot;;&quot;UNKNOWN&quot;;IF([.S94]=&quot;CLEAR&quot;;IF(OR([.O94]=&quot;&quot;;[.P94]=&quot;&quot;);&quot;UNKNOWN&quot;;&quot;READY FOR REVIEW&quot;);&quot;BLOCKED&quot;)))">
            <text:p>UNKNOWN</text:p>
          </table:table-cell>
          <table:table-cell office:value-type="string" table:formula="of:=IF([.U94]=&quot;UNKNOWN&quot;;&quot;COMPLETE OR ASSERT REQUIRED EVIDENCE BEFORE REVIEW&quot;;IF([.U94]=&quot;BLOCKED&quot;;&quot;RESOLVE CONTRADICTION BEFORE REVIEW — NO AUTHORITY CREATED&quot;;IF([.U9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4]=&quot;READY FOR REVIEW&quot;;&quot;REVIEW ELIGIBLE — NO AUTHORITY&quot;;IF(OR([.U94]=&quot;UNKNOWN&quot;;[.U94]=&quot;BLOCKED&quot;);&quot;NOT REVIEW ELIGIBLE&quot;;&quot;NOT REVIEW ELIGIBLE&quot;))">
            <text:p>NOT REVIEW ELIGIBLE</text:p>
          </table:table-cell>
          <table:table-cell office:value-type="string" table:formula="of:=IF([.W94]=&quot;NOT REVIEW ELIGIBLE&quot;;&quot;DO NOT BEGIN SETTLEMENT REVIEW — RESOLVE READINESS OR CONTRADICTION CONDITIONS&quot;;IF([.W9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4]=&quot;&quot;;&quot;UNKNOWN&quot;;IF([.W94]&lt;&gt;&quot;REVIEW ELIGIBLE — NO AUTHORITY&quot;;&quot;BLOCKED — OUTCOME ASSERTED WITHOUT REVIEW ELIGIBILITY&quot;;IF(OR([.Y94]=&quot;REVIEWED — NO AUTHORITY&quot;;[.Y94]=&quot;REVIEW DEFERRED&quot;;[.Y9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5]=&quot;&quot;;IF(AND([.L95]=&quot;&quot;;[.N95]=&quot;&quot;);&quot;UNKNOWN&quot;;&quot;CONTRADICTION&quot;);IF([.M95]=&quot;UNMATCHED&quot;;IF(AND([.L95]=&quot;&quot;;[.N95]=&quot;&quot;);&quot;CLEAR&quot;;&quot;CONTRADICTION&quot;);IF([.M95]=&quot;SINGLE_SALE_LINKED&quot;;IF(AND([.L95]&lt;&gt;&quot;&quot;;[.N95]=&quot;&quot;);&quot;CLEAR&quot;;&quot;CONTRADICTION&quot;);IF([.M95]=&quot;MULTI_SALE_PENDING_ALLOCATION&quot;;IF([.L95]=&quot;&quot;;&quot;CLEAR&quot;;&quot;CONTRADICTION&quot;);IF([.M95]=&quot;ALLOCATED&quot;;IF(AND([.L95]=&quot;&quot;;[.N95]&lt;&gt;&quot;&quot;);&quot;CLEAR&quot;;&quot;CONTRADICTION&quot;);&quot;CONTRADICTION&quot;)))))">
            <text:p>UNKNOWN</text:p>
          </table:table-cell>
          <table:table-cell office:value-type="string" table:formula="of:=IF([.S95]=&quot;UNKNOWN&quot;;&quot;NO ACTION — linkage status is UNKNOWN / not asserted&quot;;IF([.S95]=&quot;CLEAR&quot;;&quot;NO CONTRADICTION — preserve evidence as entered&quot;;IF([.M95]=&quot;&quot;;&quot;REVIEW LINKAGE STATUS — identifiers are present while status is UNKNOWN&quot;;IF([.M95]=&quot;UNMATCHED&quot;;&quot;REMOVE LINKAGE IDENTIFIERS OR CORRECT LINKAGE STATUS&quot;;IF([.M95]=&quot;SINGLE_SALE_LINKED&quot;;&quot;REQUIRE LINKED SALE ID AND NO ALLOCATION GROUP ID&quot;;IF([.M95]=&quot;MULTI_SALE_PENDING_ALLOCATION&quot;;&quot;REMOVE LINKED SALE ID OR CORRECT LINKAGE STATUS&quot;;IF([.M95]=&quot;ALLOCATED&quot;;&quot;REQUIRE ALLOCATION GROUP ID AND NO LINKED SALE ID&quot;;&quot;REVIEW LINKAGE EVIDENCE — NO AUTHORITY CREATED&quot;)))))))">
            <text:p>NO ACTION — linkage status is UNKNOWN / not asserted</text:p>
          </table:table-cell>
          <table:table-cell office:value-type="string" table:formula="of:=IF([.S95]=&quot;CONTRADICTION&quot;;&quot;BLOCKED&quot;;IF([.S95]=&quot;UNKNOWN&quot;;&quot;UNKNOWN&quot;;IF([.S95]=&quot;CLEAR&quot;;IF(OR([.O95]=&quot;&quot;;[.P95]=&quot;&quot;);&quot;UNKNOWN&quot;;&quot;READY FOR REVIEW&quot;);&quot;BLOCKED&quot;)))">
            <text:p>UNKNOWN</text:p>
          </table:table-cell>
          <table:table-cell office:value-type="string" table:formula="of:=IF([.U95]=&quot;UNKNOWN&quot;;&quot;COMPLETE OR ASSERT REQUIRED EVIDENCE BEFORE REVIEW&quot;;IF([.U95]=&quot;BLOCKED&quot;;&quot;RESOLVE CONTRADICTION BEFORE REVIEW — NO AUTHORITY CREATED&quot;;IF([.U9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5]=&quot;READY FOR REVIEW&quot;;&quot;REVIEW ELIGIBLE — NO AUTHORITY&quot;;IF(OR([.U95]=&quot;UNKNOWN&quot;;[.U95]=&quot;BLOCKED&quot;);&quot;NOT REVIEW ELIGIBLE&quot;;&quot;NOT REVIEW ELIGIBLE&quot;))">
            <text:p>NOT REVIEW ELIGIBLE</text:p>
          </table:table-cell>
          <table:table-cell office:value-type="string" table:formula="of:=IF([.W95]=&quot;NOT REVIEW ELIGIBLE&quot;;&quot;DO NOT BEGIN SETTLEMENT REVIEW — RESOLVE READINESS OR CONTRADICTION CONDITIONS&quot;;IF([.W9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5]=&quot;&quot;;&quot;UNKNOWN&quot;;IF([.W95]&lt;&gt;&quot;REVIEW ELIGIBLE — NO AUTHORITY&quot;;&quot;BLOCKED — OUTCOME ASSERTED WITHOUT REVIEW ELIGIBILITY&quot;;IF(OR([.Y95]=&quot;REVIEWED — NO AUTHORITY&quot;;[.Y95]=&quot;REVIEW DEFERRED&quot;;[.Y9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6]=&quot;&quot;;IF(AND([.L96]=&quot;&quot;;[.N96]=&quot;&quot;);&quot;UNKNOWN&quot;;&quot;CONTRADICTION&quot;);IF([.M96]=&quot;UNMATCHED&quot;;IF(AND([.L96]=&quot;&quot;;[.N96]=&quot;&quot;);&quot;CLEAR&quot;;&quot;CONTRADICTION&quot;);IF([.M96]=&quot;SINGLE_SALE_LINKED&quot;;IF(AND([.L96]&lt;&gt;&quot;&quot;;[.N96]=&quot;&quot;);&quot;CLEAR&quot;;&quot;CONTRADICTION&quot;);IF([.M96]=&quot;MULTI_SALE_PENDING_ALLOCATION&quot;;IF([.L96]=&quot;&quot;;&quot;CLEAR&quot;;&quot;CONTRADICTION&quot;);IF([.M96]=&quot;ALLOCATED&quot;;IF(AND([.L96]=&quot;&quot;;[.N96]&lt;&gt;&quot;&quot;);&quot;CLEAR&quot;;&quot;CONTRADICTION&quot;);&quot;CONTRADICTION&quot;)))))">
            <text:p>UNKNOWN</text:p>
          </table:table-cell>
          <table:table-cell office:value-type="string" table:formula="of:=IF([.S96]=&quot;UNKNOWN&quot;;&quot;NO ACTION — linkage status is UNKNOWN / not asserted&quot;;IF([.S96]=&quot;CLEAR&quot;;&quot;NO CONTRADICTION — preserve evidence as entered&quot;;IF([.M96]=&quot;&quot;;&quot;REVIEW LINKAGE STATUS — identifiers are present while status is UNKNOWN&quot;;IF([.M96]=&quot;UNMATCHED&quot;;&quot;REMOVE LINKAGE IDENTIFIERS OR CORRECT LINKAGE STATUS&quot;;IF([.M96]=&quot;SINGLE_SALE_LINKED&quot;;&quot;REQUIRE LINKED SALE ID AND NO ALLOCATION GROUP ID&quot;;IF([.M96]=&quot;MULTI_SALE_PENDING_ALLOCATION&quot;;&quot;REMOVE LINKED SALE ID OR CORRECT LINKAGE STATUS&quot;;IF([.M96]=&quot;ALLOCATED&quot;;&quot;REQUIRE ALLOCATION GROUP ID AND NO LINKED SALE ID&quot;;&quot;REVIEW LINKAGE EVIDENCE — NO AUTHORITY CREATED&quot;)))))))">
            <text:p>NO ACTION — linkage status is UNKNOWN / not asserted</text:p>
          </table:table-cell>
          <table:table-cell office:value-type="string" table:formula="of:=IF([.S96]=&quot;CONTRADICTION&quot;;&quot;BLOCKED&quot;;IF([.S96]=&quot;UNKNOWN&quot;;&quot;UNKNOWN&quot;;IF([.S96]=&quot;CLEAR&quot;;IF(OR([.O96]=&quot;&quot;;[.P96]=&quot;&quot;);&quot;UNKNOWN&quot;;&quot;READY FOR REVIEW&quot;);&quot;BLOCKED&quot;)))">
            <text:p>UNKNOWN</text:p>
          </table:table-cell>
          <table:table-cell office:value-type="string" table:formula="of:=IF([.U96]=&quot;UNKNOWN&quot;;&quot;COMPLETE OR ASSERT REQUIRED EVIDENCE BEFORE REVIEW&quot;;IF([.U96]=&quot;BLOCKED&quot;;&quot;RESOLVE CONTRADICTION BEFORE REVIEW — NO AUTHORITY CREATED&quot;;IF([.U9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6]=&quot;READY FOR REVIEW&quot;;&quot;REVIEW ELIGIBLE — NO AUTHORITY&quot;;IF(OR([.U96]=&quot;UNKNOWN&quot;;[.U96]=&quot;BLOCKED&quot;);&quot;NOT REVIEW ELIGIBLE&quot;;&quot;NOT REVIEW ELIGIBLE&quot;))">
            <text:p>NOT REVIEW ELIGIBLE</text:p>
          </table:table-cell>
          <table:table-cell office:value-type="string" table:formula="of:=IF([.W96]=&quot;NOT REVIEW ELIGIBLE&quot;;&quot;DO NOT BEGIN SETTLEMENT REVIEW — RESOLVE READINESS OR CONTRADICTION CONDITIONS&quot;;IF([.W9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6]=&quot;&quot;;&quot;UNKNOWN&quot;;IF([.W96]&lt;&gt;&quot;REVIEW ELIGIBLE — NO AUTHORITY&quot;;&quot;BLOCKED — OUTCOME ASSERTED WITHOUT REVIEW ELIGIBILITY&quot;;IF(OR([.Y96]=&quot;REVIEWED — NO AUTHORITY&quot;;[.Y96]=&quot;REVIEW DEFERRED&quot;;[.Y9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7]=&quot;&quot;;IF(AND([.L97]=&quot;&quot;;[.N97]=&quot;&quot;);&quot;UNKNOWN&quot;;&quot;CONTRADICTION&quot;);IF([.M97]=&quot;UNMATCHED&quot;;IF(AND([.L97]=&quot;&quot;;[.N97]=&quot;&quot;);&quot;CLEAR&quot;;&quot;CONTRADICTION&quot;);IF([.M97]=&quot;SINGLE_SALE_LINKED&quot;;IF(AND([.L97]&lt;&gt;&quot;&quot;;[.N97]=&quot;&quot;);&quot;CLEAR&quot;;&quot;CONTRADICTION&quot;);IF([.M97]=&quot;MULTI_SALE_PENDING_ALLOCATION&quot;;IF([.L97]=&quot;&quot;;&quot;CLEAR&quot;;&quot;CONTRADICTION&quot;);IF([.M97]=&quot;ALLOCATED&quot;;IF(AND([.L97]=&quot;&quot;;[.N97]&lt;&gt;&quot;&quot;);&quot;CLEAR&quot;;&quot;CONTRADICTION&quot;);&quot;CONTRADICTION&quot;)))))">
            <text:p>UNKNOWN</text:p>
          </table:table-cell>
          <table:table-cell office:value-type="string" table:formula="of:=IF([.S97]=&quot;UNKNOWN&quot;;&quot;NO ACTION — linkage status is UNKNOWN / not asserted&quot;;IF([.S97]=&quot;CLEAR&quot;;&quot;NO CONTRADICTION — preserve evidence as entered&quot;;IF([.M97]=&quot;&quot;;&quot;REVIEW LINKAGE STATUS — identifiers are present while status is UNKNOWN&quot;;IF([.M97]=&quot;UNMATCHED&quot;;&quot;REMOVE LINKAGE IDENTIFIERS OR CORRECT LINKAGE STATUS&quot;;IF([.M97]=&quot;SINGLE_SALE_LINKED&quot;;&quot;REQUIRE LINKED SALE ID AND NO ALLOCATION GROUP ID&quot;;IF([.M97]=&quot;MULTI_SALE_PENDING_ALLOCATION&quot;;&quot;REMOVE LINKED SALE ID OR CORRECT LINKAGE STATUS&quot;;IF([.M97]=&quot;ALLOCATED&quot;;&quot;REQUIRE ALLOCATION GROUP ID AND NO LINKED SALE ID&quot;;&quot;REVIEW LINKAGE EVIDENCE — NO AUTHORITY CREATED&quot;)))))))">
            <text:p>NO ACTION — linkage status is UNKNOWN / not asserted</text:p>
          </table:table-cell>
          <table:table-cell office:value-type="string" table:formula="of:=IF([.S97]=&quot;CONTRADICTION&quot;;&quot;BLOCKED&quot;;IF([.S97]=&quot;UNKNOWN&quot;;&quot;UNKNOWN&quot;;IF([.S97]=&quot;CLEAR&quot;;IF(OR([.O97]=&quot;&quot;;[.P97]=&quot;&quot;);&quot;UNKNOWN&quot;;&quot;READY FOR REVIEW&quot;);&quot;BLOCKED&quot;)))">
            <text:p>UNKNOWN</text:p>
          </table:table-cell>
          <table:table-cell office:value-type="string" table:formula="of:=IF([.U97]=&quot;UNKNOWN&quot;;&quot;COMPLETE OR ASSERT REQUIRED EVIDENCE BEFORE REVIEW&quot;;IF([.U97]=&quot;BLOCKED&quot;;&quot;RESOLVE CONTRADICTION BEFORE REVIEW — NO AUTHORITY CREATED&quot;;IF([.U9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7]=&quot;READY FOR REVIEW&quot;;&quot;REVIEW ELIGIBLE — NO AUTHORITY&quot;;IF(OR([.U97]=&quot;UNKNOWN&quot;;[.U97]=&quot;BLOCKED&quot;);&quot;NOT REVIEW ELIGIBLE&quot;;&quot;NOT REVIEW ELIGIBLE&quot;))">
            <text:p>NOT REVIEW ELIGIBLE</text:p>
          </table:table-cell>
          <table:table-cell office:value-type="string" table:formula="of:=IF([.W97]=&quot;NOT REVIEW ELIGIBLE&quot;;&quot;DO NOT BEGIN SETTLEMENT REVIEW — RESOLVE READINESS OR CONTRADICTION CONDITIONS&quot;;IF([.W9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7]=&quot;&quot;;&quot;UNKNOWN&quot;;IF([.W97]&lt;&gt;&quot;REVIEW ELIGIBLE — NO AUTHORITY&quot;;&quot;BLOCKED — OUTCOME ASSERTED WITHOUT REVIEW ELIGIBILITY&quot;;IF(OR([.Y97]=&quot;REVIEWED — NO AUTHORITY&quot;;[.Y97]=&quot;REVIEW DEFERRED&quot;;[.Y9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8]=&quot;&quot;;IF(AND([.L98]=&quot;&quot;;[.N98]=&quot;&quot;);&quot;UNKNOWN&quot;;&quot;CONTRADICTION&quot;);IF([.M98]=&quot;UNMATCHED&quot;;IF(AND([.L98]=&quot;&quot;;[.N98]=&quot;&quot;);&quot;CLEAR&quot;;&quot;CONTRADICTION&quot;);IF([.M98]=&quot;SINGLE_SALE_LINKED&quot;;IF(AND([.L98]&lt;&gt;&quot;&quot;;[.N98]=&quot;&quot;);&quot;CLEAR&quot;;&quot;CONTRADICTION&quot;);IF([.M98]=&quot;MULTI_SALE_PENDING_ALLOCATION&quot;;IF([.L98]=&quot;&quot;;&quot;CLEAR&quot;;&quot;CONTRADICTION&quot;);IF([.M98]=&quot;ALLOCATED&quot;;IF(AND([.L98]=&quot;&quot;;[.N98]&lt;&gt;&quot;&quot;);&quot;CLEAR&quot;;&quot;CONTRADICTION&quot;);&quot;CONTRADICTION&quot;)))))">
            <text:p>UNKNOWN</text:p>
          </table:table-cell>
          <table:table-cell office:value-type="string" table:formula="of:=IF([.S98]=&quot;UNKNOWN&quot;;&quot;NO ACTION — linkage status is UNKNOWN / not asserted&quot;;IF([.S98]=&quot;CLEAR&quot;;&quot;NO CONTRADICTION — preserve evidence as entered&quot;;IF([.M98]=&quot;&quot;;&quot;REVIEW LINKAGE STATUS — identifiers are present while status is UNKNOWN&quot;;IF([.M98]=&quot;UNMATCHED&quot;;&quot;REMOVE LINKAGE IDENTIFIERS OR CORRECT LINKAGE STATUS&quot;;IF([.M98]=&quot;SINGLE_SALE_LINKED&quot;;&quot;REQUIRE LINKED SALE ID AND NO ALLOCATION GROUP ID&quot;;IF([.M98]=&quot;MULTI_SALE_PENDING_ALLOCATION&quot;;&quot;REMOVE LINKED SALE ID OR CORRECT LINKAGE STATUS&quot;;IF([.M98]=&quot;ALLOCATED&quot;;&quot;REQUIRE ALLOCATION GROUP ID AND NO LINKED SALE ID&quot;;&quot;REVIEW LINKAGE EVIDENCE — NO AUTHORITY CREATED&quot;)))))))">
            <text:p>NO ACTION — linkage status is UNKNOWN / not asserted</text:p>
          </table:table-cell>
          <table:table-cell office:value-type="string" table:formula="of:=IF([.S98]=&quot;CONTRADICTION&quot;;&quot;BLOCKED&quot;;IF([.S98]=&quot;UNKNOWN&quot;;&quot;UNKNOWN&quot;;IF([.S98]=&quot;CLEAR&quot;;IF(OR([.O98]=&quot;&quot;;[.P98]=&quot;&quot;);&quot;UNKNOWN&quot;;&quot;READY FOR REVIEW&quot;);&quot;BLOCKED&quot;)))">
            <text:p>UNKNOWN</text:p>
          </table:table-cell>
          <table:table-cell office:value-type="string" table:formula="of:=IF([.U98]=&quot;UNKNOWN&quot;;&quot;COMPLETE OR ASSERT REQUIRED EVIDENCE BEFORE REVIEW&quot;;IF([.U98]=&quot;BLOCKED&quot;;&quot;RESOLVE CONTRADICTION BEFORE REVIEW — NO AUTHORITY CREATED&quot;;IF([.U9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8]=&quot;READY FOR REVIEW&quot;;&quot;REVIEW ELIGIBLE — NO AUTHORITY&quot;;IF(OR([.U98]=&quot;UNKNOWN&quot;;[.U98]=&quot;BLOCKED&quot;);&quot;NOT REVIEW ELIGIBLE&quot;;&quot;NOT REVIEW ELIGIBLE&quot;))">
            <text:p>NOT REVIEW ELIGIBLE</text:p>
          </table:table-cell>
          <table:table-cell office:value-type="string" table:formula="of:=IF([.W98]=&quot;NOT REVIEW ELIGIBLE&quot;;&quot;DO NOT BEGIN SETTLEMENT REVIEW — RESOLVE READINESS OR CONTRADICTION CONDITIONS&quot;;IF([.W9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8]=&quot;&quot;;&quot;UNKNOWN&quot;;IF([.W98]&lt;&gt;&quot;REVIEW ELIGIBLE — NO AUTHORITY&quot;;&quot;BLOCKED — OUTCOME ASSERTED WITHOUT REVIEW ELIGIBILITY&quot;;IF(OR([.Y98]=&quot;REVIEWED — NO AUTHORITY&quot;;[.Y98]=&quot;REVIEW DEFERRED&quot;;[.Y9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99]=&quot;&quot;;IF(AND([.L99]=&quot;&quot;;[.N99]=&quot;&quot;);&quot;UNKNOWN&quot;;&quot;CONTRADICTION&quot;);IF([.M99]=&quot;UNMATCHED&quot;;IF(AND([.L99]=&quot;&quot;;[.N99]=&quot;&quot;);&quot;CLEAR&quot;;&quot;CONTRADICTION&quot;);IF([.M99]=&quot;SINGLE_SALE_LINKED&quot;;IF(AND([.L99]&lt;&gt;&quot;&quot;;[.N99]=&quot;&quot;);&quot;CLEAR&quot;;&quot;CONTRADICTION&quot;);IF([.M99]=&quot;MULTI_SALE_PENDING_ALLOCATION&quot;;IF([.L99]=&quot;&quot;;&quot;CLEAR&quot;;&quot;CONTRADICTION&quot;);IF([.M99]=&quot;ALLOCATED&quot;;IF(AND([.L99]=&quot;&quot;;[.N99]&lt;&gt;&quot;&quot;);&quot;CLEAR&quot;;&quot;CONTRADICTION&quot;);&quot;CONTRADICTION&quot;)))))">
            <text:p>UNKNOWN</text:p>
          </table:table-cell>
          <table:table-cell office:value-type="string" table:formula="of:=IF([.S99]=&quot;UNKNOWN&quot;;&quot;NO ACTION — linkage status is UNKNOWN / not asserted&quot;;IF([.S99]=&quot;CLEAR&quot;;&quot;NO CONTRADICTION — preserve evidence as entered&quot;;IF([.M99]=&quot;&quot;;&quot;REVIEW LINKAGE STATUS — identifiers are present while status is UNKNOWN&quot;;IF([.M99]=&quot;UNMATCHED&quot;;&quot;REMOVE LINKAGE IDENTIFIERS OR CORRECT LINKAGE STATUS&quot;;IF([.M99]=&quot;SINGLE_SALE_LINKED&quot;;&quot;REQUIRE LINKED SALE ID AND NO ALLOCATION GROUP ID&quot;;IF([.M99]=&quot;MULTI_SALE_PENDING_ALLOCATION&quot;;&quot;REMOVE LINKED SALE ID OR CORRECT LINKAGE STATUS&quot;;IF([.M99]=&quot;ALLOCATED&quot;;&quot;REQUIRE ALLOCATION GROUP ID AND NO LINKED SALE ID&quot;;&quot;REVIEW LINKAGE EVIDENCE — NO AUTHORITY CREATED&quot;)))))))">
            <text:p>NO ACTION — linkage status is UNKNOWN / not asserted</text:p>
          </table:table-cell>
          <table:table-cell office:value-type="string" table:formula="of:=IF([.S99]=&quot;CONTRADICTION&quot;;&quot;BLOCKED&quot;;IF([.S99]=&quot;UNKNOWN&quot;;&quot;UNKNOWN&quot;;IF([.S99]=&quot;CLEAR&quot;;IF(OR([.O99]=&quot;&quot;;[.P99]=&quot;&quot;);&quot;UNKNOWN&quot;;&quot;READY FOR REVIEW&quot;);&quot;BLOCKED&quot;)))">
            <text:p>UNKNOWN</text:p>
          </table:table-cell>
          <table:table-cell office:value-type="string" table:formula="of:=IF([.U99]=&quot;UNKNOWN&quot;;&quot;COMPLETE OR ASSERT REQUIRED EVIDENCE BEFORE REVIEW&quot;;IF([.U99]=&quot;BLOCKED&quot;;&quot;RESOLVE CONTRADICTION BEFORE REVIEW — NO AUTHORITY CREATED&quot;;IF([.U9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99]=&quot;READY FOR REVIEW&quot;;&quot;REVIEW ELIGIBLE — NO AUTHORITY&quot;;IF(OR([.U99]=&quot;UNKNOWN&quot;;[.U99]=&quot;BLOCKED&quot;);&quot;NOT REVIEW ELIGIBLE&quot;;&quot;NOT REVIEW ELIGIBLE&quot;))">
            <text:p>NOT REVIEW ELIGIBLE</text:p>
          </table:table-cell>
          <table:table-cell office:value-type="string" table:formula="of:=IF([.W99]=&quot;NOT REVIEW ELIGIBLE&quot;;&quot;DO NOT BEGIN SETTLEMENT REVIEW — RESOLVE READINESS OR CONTRADICTION CONDITIONS&quot;;IF([.W9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99]=&quot;&quot;;&quot;UNKNOWN&quot;;IF([.W99]&lt;&gt;&quot;REVIEW ELIGIBLE — NO AUTHORITY&quot;;&quot;BLOCKED — OUTCOME ASSERTED WITHOUT REVIEW ELIGIBILITY&quot;;IF(OR([.Y99]=&quot;REVIEWED — NO AUTHORITY&quot;;[.Y99]=&quot;REVIEW DEFERRED&quot;;[.Y9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0]=&quot;&quot;;IF(AND([.L100]=&quot;&quot;;[.N100]=&quot;&quot;);&quot;UNKNOWN&quot;;&quot;CONTRADICTION&quot;);IF([.M100]=&quot;UNMATCHED&quot;;IF(AND([.L100]=&quot;&quot;;[.N100]=&quot;&quot;);&quot;CLEAR&quot;;&quot;CONTRADICTION&quot;);IF([.M100]=&quot;SINGLE_SALE_LINKED&quot;;IF(AND([.L100]&lt;&gt;&quot;&quot;;[.N100]=&quot;&quot;);&quot;CLEAR&quot;;&quot;CONTRADICTION&quot;);IF([.M100]=&quot;MULTI_SALE_PENDING_ALLOCATION&quot;;IF([.L100]=&quot;&quot;;&quot;CLEAR&quot;;&quot;CONTRADICTION&quot;);IF([.M100]=&quot;ALLOCATED&quot;;IF(AND([.L100]=&quot;&quot;;[.N100]&lt;&gt;&quot;&quot;);&quot;CLEAR&quot;;&quot;CONTRADICTION&quot;);&quot;CONTRADICTION&quot;)))))">
            <text:p>UNKNOWN</text:p>
          </table:table-cell>
          <table:table-cell office:value-type="string" table:formula="of:=IF([.S100]=&quot;UNKNOWN&quot;;&quot;NO ACTION — linkage status is UNKNOWN / not asserted&quot;;IF([.S100]=&quot;CLEAR&quot;;&quot;NO CONTRADICTION — preserve evidence as entered&quot;;IF([.M100]=&quot;&quot;;&quot;REVIEW LINKAGE STATUS — identifiers are present while status is UNKNOWN&quot;;IF([.M100]=&quot;UNMATCHED&quot;;&quot;REMOVE LINKAGE IDENTIFIERS OR CORRECT LINKAGE STATUS&quot;;IF([.M100]=&quot;SINGLE_SALE_LINKED&quot;;&quot;REQUIRE LINKED SALE ID AND NO ALLOCATION GROUP ID&quot;;IF([.M100]=&quot;MULTI_SALE_PENDING_ALLOCATION&quot;;&quot;REMOVE LINKED SALE ID OR CORRECT LINKAGE STATUS&quot;;IF([.M100]=&quot;ALLOCATED&quot;;&quot;REQUIRE ALLOCATION GROUP ID AND NO LINKED SALE ID&quot;;&quot;REVIEW LINKAGE EVIDENCE — NO AUTHORITY CREATED&quot;)))))))">
            <text:p>NO ACTION — linkage status is UNKNOWN / not asserted</text:p>
          </table:table-cell>
          <table:table-cell office:value-type="string" table:formula="of:=IF([.S100]=&quot;CONTRADICTION&quot;;&quot;BLOCKED&quot;;IF([.S100]=&quot;UNKNOWN&quot;;&quot;UNKNOWN&quot;;IF([.S100]=&quot;CLEAR&quot;;IF(OR([.O100]=&quot;&quot;;[.P100]=&quot;&quot;);&quot;UNKNOWN&quot;;&quot;READY FOR REVIEW&quot;);&quot;BLOCKED&quot;)))">
            <text:p>UNKNOWN</text:p>
          </table:table-cell>
          <table:table-cell office:value-type="string" table:formula="of:=IF([.U100]=&quot;UNKNOWN&quot;;&quot;COMPLETE OR ASSERT REQUIRED EVIDENCE BEFORE REVIEW&quot;;IF([.U100]=&quot;BLOCKED&quot;;&quot;RESOLVE CONTRADICTION BEFORE REVIEW — NO AUTHORITY CREATED&quot;;IF([.U10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0]=&quot;READY FOR REVIEW&quot;;&quot;REVIEW ELIGIBLE — NO AUTHORITY&quot;;IF(OR([.U100]=&quot;UNKNOWN&quot;;[.U100]=&quot;BLOCKED&quot;);&quot;NOT REVIEW ELIGIBLE&quot;;&quot;NOT REVIEW ELIGIBLE&quot;))">
            <text:p>NOT REVIEW ELIGIBLE</text:p>
          </table:table-cell>
          <table:table-cell office:value-type="string" table:formula="of:=IF([.W100]=&quot;NOT REVIEW ELIGIBLE&quot;;&quot;DO NOT BEGIN SETTLEMENT REVIEW — RESOLVE READINESS OR CONTRADICTION CONDITIONS&quot;;IF([.W10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0]=&quot;&quot;;&quot;UNKNOWN&quot;;IF([.W100]&lt;&gt;&quot;REVIEW ELIGIBLE — NO AUTHORITY&quot;;&quot;BLOCKED — OUTCOME ASSERTED WITHOUT REVIEW ELIGIBILITY&quot;;IF(OR([.Y100]=&quot;REVIEWED — NO AUTHORITY&quot;;[.Y100]=&quot;REVIEW DEFERRED&quot;;[.Y10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1]=&quot;&quot;;IF(AND([.L101]=&quot;&quot;;[.N101]=&quot;&quot;);&quot;UNKNOWN&quot;;&quot;CONTRADICTION&quot;);IF([.M101]=&quot;UNMATCHED&quot;;IF(AND([.L101]=&quot;&quot;;[.N101]=&quot;&quot;);&quot;CLEAR&quot;;&quot;CONTRADICTION&quot;);IF([.M101]=&quot;SINGLE_SALE_LINKED&quot;;IF(AND([.L101]&lt;&gt;&quot;&quot;;[.N101]=&quot;&quot;);&quot;CLEAR&quot;;&quot;CONTRADICTION&quot;);IF([.M101]=&quot;MULTI_SALE_PENDING_ALLOCATION&quot;;IF([.L101]=&quot;&quot;;&quot;CLEAR&quot;;&quot;CONTRADICTION&quot;);IF([.M101]=&quot;ALLOCATED&quot;;IF(AND([.L101]=&quot;&quot;;[.N101]&lt;&gt;&quot;&quot;);&quot;CLEAR&quot;;&quot;CONTRADICTION&quot;);&quot;CONTRADICTION&quot;)))))">
            <text:p>UNKNOWN</text:p>
          </table:table-cell>
          <table:table-cell office:value-type="string" table:formula="of:=IF([.S101]=&quot;UNKNOWN&quot;;&quot;NO ACTION — linkage status is UNKNOWN / not asserted&quot;;IF([.S101]=&quot;CLEAR&quot;;&quot;NO CONTRADICTION — preserve evidence as entered&quot;;IF([.M101]=&quot;&quot;;&quot;REVIEW LINKAGE STATUS — identifiers are present while status is UNKNOWN&quot;;IF([.M101]=&quot;UNMATCHED&quot;;&quot;REMOVE LINKAGE IDENTIFIERS OR CORRECT LINKAGE STATUS&quot;;IF([.M101]=&quot;SINGLE_SALE_LINKED&quot;;&quot;REQUIRE LINKED SALE ID AND NO ALLOCATION GROUP ID&quot;;IF([.M101]=&quot;MULTI_SALE_PENDING_ALLOCATION&quot;;&quot;REMOVE LINKED SALE ID OR CORRECT LINKAGE STATUS&quot;;IF([.M101]=&quot;ALLOCATED&quot;;&quot;REQUIRE ALLOCATION GROUP ID AND NO LINKED SALE ID&quot;;&quot;REVIEW LINKAGE EVIDENCE — NO AUTHORITY CREATED&quot;)))))))">
            <text:p>NO ACTION — linkage status is UNKNOWN / not asserted</text:p>
          </table:table-cell>
          <table:table-cell office:value-type="string" table:formula="of:=IF([.S101]=&quot;CONTRADICTION&quot;;&quot;BLOCKED&quot;;IF([.S101]=&quot;UNKNOWN&quot;;&quot;UNKNOWN&quot;;IF([.S101]=&quot;CLEAR&quot;;IF(OR([.O101]=&quot;&quot;;[.P101]=&quot;&quot;);&quot;UNKNOWN&quot;;&quot;READY FOR REVIEW&quot;);&quot;BLOCKED&quot;)))">
            <text:p>UNKNOWN</text:p>
          </table:table-cell>
          <table:table-cell office:value-type="string" table:formula="of:=IF([.U101]=&quot;UNKNOWN&quot;;&quot;COMPLETE OR ASSERT REQUIRED EVIDENCE BEFORE REVIEW&quot;;IF([.U101]=&quot;BLOCKED&quot;;&quot;RESOLVE CONTRADICTION BEFORE REVIEW — NO AUTHORITY CREATED&quot;;IF([.U10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1]=&quot;READY FOR REVIEW&quot;;&quot;REVIEW ELIGIBLE — NO AUTHORITY&quot;;IF(OR([.U101]=&quot;UNKNOWN&quot;;[.U101]=&quot;BLOCKED&quot;);&quot;NOT REVIEW ELIGIBLE&quot;;&quot;NOT REVIEW ELIGIBLE&quot;))">
            <text:p>NOT REVIEW ELIGIBLE</text:p>
          </table:table-cell>
          <table:table-cell office:value-type="string" table:formula="of:=IF([.W101]=&quot;NOT REVIEW ELIGIBLE&quot;;&quot;DO NOT BEGIN SETTLEMENT REVIEW — RESOLVE READINESS OR CONTRADICTION CONDITIONS&quot;;IF([.W10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1]=&quot;&quot;;&quot;UNKNOWN&quot;;IF([.W101]&lt;&gt;&quot;REVIEW ELIGIBLE — NO AUTHORITY&quot;;&quot;BLOCKED — OUTCOME ASSERTED WITHOUT REVIEW ELIGIBILITY&quot;;IF(OR([.Y101]=&quot;REVIEWED — NO AUTHORITY&quot;;[.Y101]=&quot;REVIEW DEFERRED&quot;;[.Y101]=&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2]=&quot;&quot;;IF(AND([.L102]=&quot;&quot;;[.N102]=&quot;&quot;);&quot;UNKNOWN&quot;;&quot;CONTRADICTION&quot;);IF([.M102]=&quot;UNMATCHED&quot;;IF(AND([.L102]=&quot;&quot;;[.N102]=&quot;&quot;);&quot;CLEAR&quot;;&quot;CONTRADICTION&quot;);IF([.M102]=&quot;SINGLE_SALE_LINKED&quot;;IF(AND([.L102]&lt;&gt;&quot;&quot;;[.N102]=&quot;&quot;);&quot;CLEAR&quot;;&quot;CONTRADICTION&quot;);IF([.M102]=&quot;MULTI_SALE_PENDING_ALLOCATION&quot;;IF([.L102]=&quot;&quot;;&quot;CLEAR&quot;;&quot;CONTRADICTION&quot;);IF([.M102]=&quot;ALLOCATED&quot;;IF(AND([.L102]=&quot;&quot;;[.N102]&lt;&gt;&quot;&quot;);&quot;CLEAR&quot;;&quot;CONTRADICTION&quot;);&quot;CONTRADICTION&quot;)))))">
            <text:p>UNKNOWN</text:p>
          </table:table-cell>
          <table:table-cell office:value-type="string" table:formula="of:=IF([.S102]=&quot;UNKNOWN&quot;;&quot;NO ACTION — linkage status is UNKNOWN / not asserted&quot;;IF([.S102]=&quot;CLEAR&quot;;&quot;NO CONTRADICTION — preserve evidence as entered&quot;;IF([.M102]=&quot;&quot;;&quot;REVIEW LINKAGE STATUS — identifiers are present while status is UNKNOWN&quot;;IF([.M102]=&quot;UNMATCHED&quot;;&quot;REMOVE LINKAGE IDENTIFIERS OR CORRECT LINKAGE STATUS&quot;;IF([.M102]=&quot;SINGLE_SALE_LINKED&quot;;&quot;REQUIRE LINKED SALE ID AND NO ALLOCATION GROUP ID&quot;;IF([.M102]=&quot;MULTI_SALE_PENDING_ALLOCATION&quot;;&quot;REMOVE LINKED SALE ID OR CORRECT LINKAGE STATUS&quot;;IF([.M102]=&quot;ALLOCATED&quot;;&quot;REQUIRE ALLOCATION GROUP ID AND NO LINKED SALE ID&quot;;&quot;REVIEW LINKAGE EVIDENCE — NO AUTHORITY CREATED&quot;)))))))">
            <text:p>NO ACTION — linkage status is UNKNOWN / not asserted</text:p>
          </table:table-cell>
          <table:table-cell office:value-type="string" table:formula="of:=IF([.S102]=&quot;CONTRADICTION&quot;;&quot;BLOCKED&quot;;IF([.S102]=&quot;UNKNOWN&quot;;&quot;UNKNOWN&quot;;IF([.S102]=&quot;CLEAR&quot;;IF(OR([.O102]=&quot;&quot;;[.P102]=&quot;&quot;);&quot;UNKNOWN&quot;;&quot;READY FOR REVIEW&quot;);&quot;BLOCKED&quot;)))">
            <text:p>UNKNOWN</text:p>
          </table:table-cell>
          <table:table-cell office:value-type="string" table:formula="of:=IF([.U102]=&quot;UNKNOWN&quot;;&quot;COMPLETE OR ASSERT REQUIRED EVIDENCE BEFORE REVIEW&quot;;IF([.U102]=&quot;BLOCKED&quot;;&quot;RESOLVE CONTRADICTION BEFORE REVIEW — NO AUTHORITY CREATED&quot;;IF([.U10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2]=&quot;READY FOR REVIEW&quot;;&quot;REVIEW ELIGIBLE — NO AUTHORITY&quot;;IF(OR([.U102]=&quot;UNKNOWN&quot;;[.U102]=&quot;BLOCKED&quot;);&quot;NOT REVIEW ELIGIBLE&quot;;&quot;NOT REVIEW ELIGIBLE&quot;))">
            <text:p>NOT REVIEW ELIGIBLE</text:p>
          </table:table-cell>
          <table:table-cell office:value-type="string" table:formula="of:=IF([.W102]=&quot;NOT REVIEW ELIGIBLE&quot;;&quot;DO NOT BEGIN SETTLEMENT REVIEW — RESOLVE READINESS OR CONTRADICTION CONDITIONS&quot;;IF([.W10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2]=&quot;&quot;;&quot;UNKNOWN&quot;;IF([.W102]&lt;&gt;&quot;REVIEW ELIGIBLE — NO AUTHORITY&quot;;&quot;BLOCKED — OUTCOME ASSERTED WITHOUT REVIEW ELIGIBILITY&quot;;IF(OR([.Y102]=&quot;REVIEWED — NO AUTHORITY&quot;;[.Y102]=&quot;REVIEW DEFERRED&quot;;[.Y10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3]=&quot;&quot;;IF(AND([.L103]=&quot;&quot;;[.N103]=&quot;&quot;);&quot;UNKNOWN&quot;;&quot;CONTRADICTION&quot;);IF([.M103]=&quot;UNMATCHED&quot;;IF(AND([.L103]=&quot;&quot;;[.N103]=&quot;&quot;);&quot;CLEAR&quot;;&quot;CONTRADICTION&quot;);IF([.M103]=&quot;SINGLE_SALE_LINKED&quot;;IF(AND([.L103]&lt;&gt;&quot;&quot;;[.N103]=&quot;&quot;);&quot;CLEAR&quot;;&quot;CONTRADICTION&quot;);IF([.M103]=&quot;MULTI_SALE_PENDING_ALLOCATION&quot;;IF([.L103]=&quot;&quot;;&quot;CLEAR&quot;;&quot;CONTRADICTION&quot;);IF([.M103]=&quot;ALLOCATED&quot;;IF(AND([.L103]=&quot;&quot;;[.N103]&lt;&gt;&quot;&quot;);&quot;CLEAR&quot;;&quot;CONTRADICTION&quot;);&quot;CONTRADICTION&quot;)))))">
            <text:p>UNKNOWN</text:p>
          </table:table-cell>
          <table:table-cell office:value-type="string" table:formula="of:=IF([.S103]=&quot;UNKNOWN&quot;;&quot;NO ACTION — linkage status is UNKNOWN / not asserted&quot;;IF([.S103]=&quot;CLEAR&quot;;&quot;NO CONTRADICTION — preserve evidence as entered&quot;;IF([.M103]=&quot;&quot;;&quot;REVIEW LINKAGE STATUS — identifiers are present while status is UNKNOWN&quot;;IF([.M103]=&quot;UNMATCHED&quot;;&quot;REMOVE LINKAGE IDENTIFIERS OR CORRECT LINKAGE STATUS&quot;;IF([.M103]=&quot;SINGLE_SALE_LINKED&quot;;&quot;REQUIRE LINKED SALE ID AND NO ALLOCATION GROUP ID&quot;;IF([.M103]=&quot;MULTI_SALE_PENDING_ALLOCATION&quot;;&quot;REMOVE LINKED SALE ID OR CORRECT LINKAGE STATUS&quot;;IF([.M103]=&quot;ALLOCATED&quot;;&quot;REQUIRE ALLOCATION GROUP ID AND NO LINKED SALE ID&quot;;&quot;REVIEW LINKAGE EVIDENCE — NO AUTHORITY CREATED&quot;)))))))">
            <text:p>NO ACTION — linkage status is UNKNOWN / not asserted</text:p>
          </table:table-cell>
          <table:table-cell office:value-type="string" table:formula="of:=IF([.S103]=&quot;CONTRADICTION&quot;;&quot;BLOCKED&quot;;IF([.S103]=&quot;UNKNOWN&quot;;&quot;UNKNOWN&quot;;IF([.S103]=&quot;CLEAR&quot;;IF(OR([.O103]=&quot;&quot;;[.P103]=&quot;&quot;);&quot;UNKNOWN&quot;;&quot;READY FOR REVIEW&quot;);&quot;BLOCKED&quot;)))">
            <text:p>UNKNOWN</text:p>
          </table:table-cell>
          <table:table-cell office:value-type="string" table:formula="of:=IF([.U103]=&quot;UNKNOWN&quot;;&quot;COMPLETE OR ASSERT REQUIRED EVIDENCE BEFORE REVIEW&quot;;IF([.U103]=&quot;BLOCKED&quot;;&quot;RESOLVE CONTRADICTION BEFORE REVIEW — NO AUTHORITY CREATED&quot;;IF([.U10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3]=&quot;READY FOR REVIEW&quot;;&quot;REVIEW ELIGIBLE — NO AUTHORITY&quot;;IF(OR([.U103]=&quot;UNKNOWN&quot;;[.U103]=&quot;BLOCKED&quot;);&quot;NOT REVIEW ELIGIBLE&quot;;&quot;NOT REVIEW ELIGIBLE&quot;))">
            <text:p>NOT REVIEW ELIGIBLE</text:p>
          </table:table-cell>
          <table:table-cell office:value-type="string" table:formula="of:=IF([.W103]=&quot;NOT REVIEW ELIGIBLE&quot;;&quot;DO NOT BEGIN SETTLEMENT REVIEW — RESOLVE READINESS OR CONTRADICTION CONDITIONS&quot;;IF([.W10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3]=&quot;&quot;;&quot;UNKNOWN&quot;;IF([.W103]&lt;&gt;&quot;REVIEW ELIGIBLE — NO AUTHORITY&quot;;&quot;BLOCKED — OUTCOME ASSERTED WITHOUT REVIEW ELIGIBILITY&quot;;IF(OR([.Y103]=&quot;REVIEWED — NO AUTHORITY&quot;;[.Y103]=&quot;REVIEW DEFERRED&quot;;[.Y10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4]=&quot;&quot;;IF(AND([.L104]=&quot;&quot;;[.N104]=&quot;&quot;);&quot;UNKNOWN&quot;;&quot;CONTRADICTION&quot;);IF([.M104]=&quot;UNMATCHED&quot;;IF(AND([.L104]=&quot;&quot;;[.N104]=&quot;&quot;);&quot;CLEAR&quot;;&quot;CONTRADICTION&quot;);IF([.M104]=&quot;SINGLE_SALE_LINKED&quot;;IF(AND([.L104]&lt;&gt;&quot;&quot;;[.N104]=&quot;&quot;);&quot;CLEAR&quot;;&quot;CONTRADICTION&quot;);IF([.M104]=&quot;MULTI_SALE_PENDING_ALLOCATION&quot;;IF([.L104]=&quot;&quot;;&quot;CLEAR&quot;;&quot;CONTRADICTION&quot;);IF([.M104]=&quot;ALLOCATED&quot;;IF(AND([.L104]=&quot;&quot;;[.N104]&lt;&gt;&quot;&quot;);&quot;CLEAR&quot;;&quot;CONTRADICTION&quot;);&quot;CONTRADICTION&quot;)))))">
            <text:p>UNKNOWN</text:p>
          </table:table-cell>
          <table:table-cell office:value-type="string" table:formula="of:=IF([.S104]=&quot;UNKNOWN&quot;;&quot;NO ACTION — linkage status is UNKNOWN / not asserted&quot;;IF([.S104]=&quot;CLEAR&quot;;&quot;NO CONTRADICTION — preserve evidence as entered&quot;;IF([.M104]=&quot;&quot;;&quot;REVIEW LINKAGE STATUS — identifiers are present while status is UNKNOWN&quot;;IF([.M104]=&quot;UNMATCHED&quot;;&quot;REMOVE LINKAGE IDENTIFIERS OR CORRECT LINKAGE STATUS&quot;;IF([.M104]=&quot;SINGLE_SALE_LINKED&quot;;&quot;REQUIRE LINKED SALE ID AND NO ALLOCATION GROUP ID&quot;;IF([.M104]=&quot;MULTI_SALE_PENDING_ALLOCATION&quot;;&quot;REMOVE LINKED SALE ID OR CORRECT LINKAGE STATUS&quot;;IF([.M104]=&quot;ALLOCATED&quot;;&quot;REQUIRE ALLOCATION GROUP ID AND NO LINKED SALE ID&quot;;&quot;REVIEW LINKAGE EVIDENCE — NO AUTHORITY CREATED&quot;)))))))">
            <text:p>NO ACTION — linkage status is UNKNOWN / not asserted</text:p>
          </table:table-cell>
          <table:table-cell office:value-type="string" table:formula="of:=IF([.S104]=&quot;CONTRADICTION&quot;;&quot;BLOCKED&quot;;IF([.S104]=&quot;UNKNOWN&quot;;&quot;UNKNOWN&quot;;IF([.S104]=&quot;CLEAR&quot;;IF(OR([.O104]=&quot;&quot;;[.P104]=&quot;&quot;);&quot;UNKNOWN&quot;;&quot;READY FOR REVIEW&quot;);&quot;BLOCKED&quot;)))">
            <text:p>UNKNOWN</text:p>
          </table:table-cell>
          <table:table-cell office:value-type="string" table:formula="of:=IF([.U104]=&quot;UNKNOWN&quot;;&quot;COMPLETE OR ASSERT REQUIRED EVIDENCE BEFORE REVIEW&quot;;IF([.U104]=&quot;BLOCKED&quot;;&quot;RESOLVE CONTRADICTION BEFORE REVIEW — NO AUTHORITY CREATED&quot;;IF([.U10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4]=&quot;READY FOR REVIEW&quot;;&quot;REVIEW ELIGIBLE — NO AUTHORITY&quot;;IF(OR([.U104]=&quot;UNKNOWN&quot;;[.U104]=&quot;BLOCKED&quot;);&quot;NOT REVIEW ELIGIBLE&quot;;&quot;NOT REVIEW ELIGIBLE&quot;))">
            <text:p>NOT REVIEW ELIGIBLE</text:p>
          </table:table-cell>
          <table:table-cell office:value-type="string" table:formula="of:=IF([.W104]=&quot;NOT REVIEW ELIGIBLE&quot;;&quot;DO NOT BEGIN SETTLEMENT REVIEW — RESOLVE READINESS OR CONTRADICTION CONDITIONS&quot;;IF([.W10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4]=&quot;&quot;;&quot;UNKNOWN&quot;;IF([.W104]&lt;&gt;&quot;REVIEW ELIGIBLE — NO AUTHORITY&quot;;&quot;BLOCKED — OUTCOME ASSERTED WITHOUT REVIEW ELIGIBILITY&quot;;IF(OR([.Y104]=&quot;REVIEWED — NO AUTHORITY&quot;;[.Y104]=&quot;REVIEW DEFERRED&quot;;[.Y10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5]=&quot;&quot;;IF(AND([.L105]=&quot;&quot;;[.N105]=&quot;&quot;);&quot;UNKNOWN&quot;;&quot;CONTRADICTION&quot;);IF([.M105]=&quot;UNMATCHED&quot;;IF(AND([.L105]=&quot;&quot;;[.N105]=&quot;&quot;);&quot;CLEAR&quot;;&quot;CONTRADICTION&quot;);IF([.M105]=&quot;SINGLE_SALE_LINKED&quot;;IF(AND([.L105]&lt;&gt;&quot;&quot;;[.N105]=&quot;&quot;);&quot;CLEAR&quot;;&quot;CONTRADICTION&quot;);IF([.M105]=&quot;MULTI_SALE_PENDING_ALLOCATION&quot;;IF([.L105]=&quot;&quot;;&quot;CLEAR&quot;;&quot;CONTRADICTION&quot;);IF([.M105]=&quot;ALLOCATED&quot;;IF(AND([.L105]=&quot;&quot;;[.N105]&lt;&gt;&quot;&quot;);&quot;CLEAR&quot;;&quot;CONTRADICTION&quot;);&quot;CONTRADICTION&quot;)))))">
            <text:p>UNKNOWN</text:p>
          </table:table-cell>
          <table:table-cell office:value-type="string" table:formula="of:=IF([.S105]=&quot;UNKNOWN&quot;;&quot;NO ACTION — linkage status is UNKNOWN / not asserted&quot;;IF([.S105]=&quot;CLEAR&quot;;&quot;NO CONTRADICTION — preserve evidence as entered&quot;;IF([.M105]=&quot;&quot;;&quot;REVIEW LINKAGE STATUS — identifiers are present while status is UNKNOWN&quot;;IF([.M105]=&quot;UNMATCHED&quot;;&quot;REMOVE LINKAGE IDENTIFIERS OR CORRECT LINKAGE STATUS&quot;;IF([.M105]=&quot;SINGLE_SALE_LINKED&quot;;&quot;REQUIRE LINKED SALE ID AND NO ALLOCATION GROUP ID&quot;;IF([.M105]=&quot;MULTI_SALE_PENDING_ALLOCATION&quot;;&quot;REMOVE LINKED SALE ID OR CORRECT LINKAGE STATUS&quot;;IF([.M105]=&quot;ALLOCATED&quot;;&quot;REQUIRE ALLOCATION GROUP ID AND NO LINKED SALE ID&quot;;&quot;REVIEW LINKAGE EVIDENCE — NO AUTHORITY CREATED&quot;)))))))">
            <text:p>NO ACTION — linkage status is UNKNOWN / not asserted</text:p>
          </table:table-cell>
          <table:table-cell office:value-type="string" table:formula="of:=IF([.S105]=&quot;CONTRADICTION&quot;;&quot;BLOCKED&quot;;IF([.S105]=&quot;UNKNOWN&quot;;&quot;UNKNOWN&quot;;IF([.S105]=&quot;CLEAR&quot;;IF(OR([.O105]=&quot;&quot;;[.P105]=&quot;&quot;);&quot;UNKNOWN&quot;;&quot;READY FOR REVIEW&quot;);&quot;BLOCKED&quot;)))">
            <text:p>UNKNOWN</text:p>
          </table:table-cell>
          <table:table-cell office:value-type="string" table:formula="of:=IF([.U105]=&quot;UNKNOWN&quot;;&quot;COMPLETE OR ASSERT REQUIRED EVIDENCE BEFORE REVIEW&quot;;IF([.U105]=&quot;BLOCKED&quot;;&quot;RESOLVE CONTRADICTION BEFORE REVIEW — NO AUTHORITY CREATED&quot;;IF([.U10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5]=&quot;READY FOR REVIEW&quot;;&quot;REVIEW ELIGIBLE — NO AUTHORITY&quot;;IF(OR([.U105]=&quot;UNKNOWN&quot;;[.U105]=&quot;BLOCKED&quot;);&quot;NOT REVIEW ELIGIBLE&quot;;&quot;NOT REVIEW ELIGIBLE&quot;))">
            <text:p>NOT REVIEW ELIGIBLE</text:p>
          </table:table-cell>
          <table:table-cell office:value-type="string" table:formula="of:=IF([.W105]=&quot;NOT REVIEW ELIGIBLE&quot;;&quot;DO NOT BEGIN SETTLEMENT REVIEW — RESOLVE READINESS OR CONTRADICTION CONDITIONS&quot;;IF([.W10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5]=&quot;&quot;;&quot;UNKNOWN&quot;;IF([.W105]&lt;&gt;&quot;REVIEW ELIGIBLE — NO AUTHORITY&quot;;&quot;BLOCKED — OUTCOME ASSERTED WITHOUT REVIEW ELIGIBILITY&quot;;IF(OR([.Y105]=&quot;REVIEWED — NO AUTHORITY&quot;;[.Y105]=&quot;REVIEW DEFERRED&quot;;[.Y10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6]=&quot;&quot;;IF(AND([.L106]=&quot;&quot;;[.N106]=&quot;&quot;);&quot;UNKNOWN&quot;;&quot;CONTRADICTION&quot;);IF([.M106]=&quot;UNMATCHED&quot;;IF(AND([.L106]=&quot;&quot;;[.N106]=&quot;&quot;);&quot;CLEAR&quot;;&quot;CONTRADICTION&quot;);IF([.M106]=&quot;SINGLE_SALE_LINKED&quot;;IF(AND([.L106]&lt;&gt;&quot;&quot;;[.N106]=&quot;&quot;);&quot;CLEAR&quot;;&quot;CONTRADICTION&quot;);IF([.M106]=&quot;MULTI_SALE_PENDING_ALLOCATION&quot;;IF([.L106]=&quot;&quot;;&quot;CLEAR&quot;;&quot;CONTRADICTION&quot;);IF([.M106]=&quot;ALLOCATED&quot;;IF(AND([.L106]=&quot;&quot;;[.N106]&lt;&gt;&quot;&quot;);&quot;CLEAR&quot;;&quot;CONTRADICTION&quot;);&quot;CONTRADICTION&quot;)))))">
            <text:p>UNKNOWN</text:p>
          </table:table-cell>
          <table:table-cell office:value-type="string" table:formula="of:=IF([.S106]=&quot;UNKNOWN&quot;;&quot;NO ACTION — linkage status is UNKNOWN / not asserted&quot;;IF([.S106]=&quot;CLEAR&quot;;&quot;NO CONTRADICTION — preserve evidence as entered&quot;;IF([.M106]=&quot;&quot;;&quot;REVIEW LINKAGE STATUS — identifiers are present while status is UNKNOWN&quot;;IF([.M106]=&quot;UNMATCHED&quot;;&quot;REMOVE LINKAGE IDENTIFIERS OR CORRECT LINKAGE STATUS&quot;;IF([.M106]=&quot;SINGLE_SALE_LINKED&quot;;&quot;REQUIRE LINKED SALE ID AND NO ALLOCATION GROUP ID&quot;;IF([.M106]=&quot;MULTI_SALE_PENDING_ALLOCATION&quot;;&quot;REMOVE LINKED SALE ID OR CORRECT LINKAGE STATUS&quot;;IF([.M106]=&quot;ALLOCATED&quot;;&quot;REQUIRE ALLOCATION GROUP ID AND NO LINKED SALE ID&quot;;&quot;REVIEW LINKAGE EVIDENCE — NO AUTHORITY CREATED&quot;)))))))">
            <text:p>NO ACTION — linkage status is UNKNOWN / not asserted</text:p>
          </table:table-cell>
          <table:table-cell office:value-type="string" table:formula="of:=IF([.S106]=&quot;CONTRADICTION&quot;;&quot;BLOCKED&quot;;IF([.S106]=&quot;UNKNOWN&quot;;&quot;UNKNOWN&quot;;IF([.S106]=&quot;CLEAR&quot;;IF(OR([.O106]=&quot;&quot;;[.P106]=&quot;&quot;);&quot;UNKNOWN&quot;;&quot;READY FOR REVIEW&quot;);&quot;BLOCKED&quot;)))">
            <text:p>UNKNOWN</text:p>
          </table:table-cell>
          <table:table-cell office:value-type="string" table:formula="of:=IF([.U106]=&quot;UNKNOWN&quot;;&quot;COMPLETE OR ASSERT REQUIRED EVIDENCE BEFORE REVIEW&quot;;IF([.U106]=&quot;BLOCKED&quot;;&quot;RESOLVE CONTRADICTION BEFORE REVIEW — NO AUTHORITY CREATED&quot;;IF([.U10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6]=&quot;READY FOR REVIEW&quot;;&quot;REVIEW ELIGIBLE — NO AUTHORITY&quot;;IF(OR([.U106]=&quot;UNKNOWN&quot;;[.U106]=&quot;BLOCKED&quot;);&quot;NOT REVIEW ELIGIBLE&quot;;&quot;NOT REVIEW ELIGIBLE&quot;))">
            <text:p>NOT REVIEW ELIGIBLE</text:p>
          </table:table-cell>
          <table:table-cell office:value-type="string" table:formula="of:=IF([.W106]=&quot;NOT REVIEW ELIGIBLE&quot;;&quot;DO NOT BEGIN SETTLEMENT REVIEW — RESOLVE READINESS OR CONTRADICTION CONDITIONS&quot;;IF([.W10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6]=&quot;&quot;;&quot;UNKNOWN&quot;;IF([.W106]&lt;&gt;&quot;REVIEW ELIGIBLE — NO AUTHORITY&quot;;&quot;BLOCKED — OUTCOME ASSERTED WITHOUT REVIEW ELIGIBILITY&quot;;IF(OR([.Y106]=&quot;REVIEWED — NO AUTHORITY&quot;;[.Y106]=&quot;REVIEW DEFERRED&quot;;[.Y10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7]=&quot;&quot;;IF(AND([.L107]=&quot;&quot;;[.N107]=&quot;&quot;);&quot;UNKNOWN&quot;;&quot;CONTRADICTION&quot;);IF([.M107]=&quot;UNMATCHED&quot;;IF(AND([.L107]=&quot;&quot;;[.N107]=&quot;&quot;);&quot;CLEAR&quot;;&quot;CONTRADICTION&quot;);IF([.M107]=&quot;SINGLE_SALE_LINKED&quot;;IF(AND([.L107]&lt;&gt;&quot;&quot;;[.N107]=&quot;&quot;);&quot;CLEAR&quot;;&quot;CONTRADICTION&quot;);IF([.M107]=&quot;MULTI_SALE_PENDING_ALLOCATION&quot;;IF([.L107]=&quot;&quot;;&quot;CLEAR&quot;;&quot;CONTRADICTION&quot;);IF([.M107]=&quot;ALLOCATED&quot;;IF(AND([.L107]=&quot;&quot;;[.N107]&lt;&gt;&quot;&quot;);&quot;CLEAR&quot;;&quot;CONTRADICTION&quot;);&quot;CONTRADICTION&quot;)))))">
            <text:p>UNKNOWN</text:p>
          </table:table-cell>
          <table:table-cell office:value-type="string" table:formula="of:=IF([.S107]=&quot;UNKNOWN&quot;;&quot;NO ACTION — linkage status is UNKNOWN / not asserted&quot;;IF([.S107]=&quot;CLEAR&quot;;&quot;NO CONTRADICTION — preserve evidence as entered&quot;;IF([.M107]=&quot;&quot;;&quot;REVIEW LINKAGE STATUS — identifiers are present while status is UNKNOWN&quot;;IF([.M107]=&quot;UNMATCHED&quot;;&quot;REMOVE LINKAGE IDENTIFIERS OR CORRECT LINKAGE STATUS&quot;;IF([.M107]=&quot;SINGLE_SALE_LINKED&quot;;&quot;REQUIRE LINKED SALE ID AND NO ALLOCATION GROUP ID&quot;;IF([.M107]=&quot;MULTI_SALE_PENDING_ALLOCATION&quot;;&quot;REMOVE LINKED SALE ID OR CORRECT LINKAGE STATUS&quot;;IF([.M107]=&quot;ALLOCATED&quot;;&quot;REQUIRE ALLOCATION GROUP ID AND NO LINKED SALE ID&quot;;&quot;REVIEW LINKAGE EVIDENCE — NO AUTHORITY CREATED&quot;)))))))">
            <text:p>NO ACTION — linkage status is UNKNOWN / not asserted</text:p>
          </table:table-cell>
          <table:table-cell office:value-type="string" table:formula="of:=IF([.S107]=&quot;CONTRADICTION&quot;;&quot;BLOCKED&quot;;IF([.S107]=&quot;UNKNOWN&quot;;&quot;UNKNOWN&quot;;IF([.S107]=&quot;CLEAR&quot;;IF(OR([.O107]=&quot;&quot;;[.P107]=&quot;&quot;);&quot;UNKNOWN&quot;;&quot;READY FOR REVIEW&quot;);&quot;BLOCKED&quot;)))">
            <text:p>UNKNOWN</text:p>
          </table:table-cell>
          <table:table-cell office:value-type="string" table:formula="of:=IF([.U107]=&quot;UNKNOWN&quot;;&quot;COMPLETE OR ASSERT REQUIRED EVIDENCE BEFORE REVIEW&quot;;IF([.U107]=&quot;BLOCKED&quot;;&quot;RESOLVE CONTRADICTION BEFORE REVIEW — NO AUTHORITY CREATED&quot;;IF([.U10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7]=&quot;READY FOR REVIEW&quot;;&quot;REVIEW ELIGIBLE — NO AUTHORITY&quot;;IF(OR([.U107]=&quot;UNKNOWN&quot;;[.U107]=&quot;BLOCKED&quot;);&quot;NOT REVIEW ELIGIBLE&quot;;&quot;NOT REVIEW ELIGIBLE&quot;))">
            <text:p>NOT REVIEW ELIGIBLE</text:p>
          </table:table-cell>
          <table:table-cell office:value-type="string" table:formula="of:=IF([.W107]=&quot;NOT REVIEW ELIGIBLE&quot;;&quot;DO NOT BEGIN SETTLEMENT REVIEW — RESOLVE READINESS OR CONTRADICTION CONDITIONS&quot;;IF([.W10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7]=&quot;&quot;;&quot;UNKNOWN&quot;;IF([.W107]&lt;&gt;&quot;REVIEW ELIGIBLE — NO AUTHORITY&quot;;&quot;BLOCKED — OUTCOME ASSERTED WITHOUT REVIEW ELIGIBILITY&quot;;IF(OR([.Y107]=&quot;REVIEWED — NO AUTHORITY&quot;;[.Y107]=&quot;REVIEW DEFERRED&quot;;[.Y10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8]=&quot;&quot;;IF(AND([.L108]=&quot;&quot;;[.N108]=&quot;&quot;);&quot;UNKNOWN&quot;;&quot;CONTRADICTION&quot;);IF([.M108]=&quot;UNMATCHED&quot;;IF(AND([.L108]=&quot;&quot;;[.N108]=&quot;&quot;);&quot;CLEAR&quot;;&quot;CONTRADICTION&quot;);IF([.M108]=&quot;SINGLE_SALE_LINKED&quot;;IF(AND([.L108]&lt;&gt;&quot;&quot;;[.N108]=&quot;&quot;);&quot;CLEAR&quot;;&quot;CONTRADICTION&quot;);IF([.M108]=&quot;MULTI_SALE_PENDING_ALLOCATION&quot;;IF([.L108]=&quot;&quot;;&quot;CLEAR&quot;;&quot;CONTRADICTION&quot;);IF([.M108]=&quot;ALLOCATED&quot;;IF(AND([.L108]=&quot;&quot;;[.N108]&lt;&gt;&quot;&quot;);&quot;CLEAR&quot;;&quot;CONTRADICTION&quot;);&quot;CONTRADICTION&quot;)))))">
            <text:p>UNKNOWN</text:p>
          </table:table-cell>
          <table:table-cell office:value-type="string" table:formula="of:=IF([.S108]=&quot;UNKNOWN&quot;;&quot;NO ACTION — linkage status is UNKNOWN / not asserted&quot;;IF([.S108]=&quot;CLEAR&quot;;&quot;NO CONTRADICTION — preserve evidence as entered&quot;;IF([.M108]=&quot;&quot;;&quot;REVIEW LINKAGE STATUS — identifiers are present while status is UNKNOWN&quot;;IF([.M108]=&quot;UNMATCHED&quot;;&quot;REMOVE LINKAGE IDENTIFIERS OR CORRECT LINKAGE STATUS&quot;;IF([.M108]=&quot;SINGLE_SALE_LINKED&quot;;&quot;REQUIRE LINKED SALE ID AND NO ALLOCATION GROUP ID&quot;;IF([.M108]=&quot;MULTI_SALE_PENDING_ALLOCATION&quot;;&quot;REMOVE LINKED SALE ID OR CORRECT LINKAGE STATUS&quot;;IF([.M108]=&quot;ALLOCATED&quot;;&quot;REQUIRE ALLOCATION GROUP ID AND NO LINKED SALE ID&quot;;&quot;REVIEW LINKAGE EVIDENCE — NO AUTHORITY CREATED&quot;)))))))">
            <text:p>NO ACTION — linkage status is UNKNOWN / not asserted</text:p>
          </table:table-cell>
          <table:table-cell office:value-type="string" table:formula="of:=IF([.S108]=&quot;CONTRADICTION&quot;;&quot;BLOCKED&quot;;IF([.S108]=&quot;UNKNOWN&quot;;&quot;UNKNOWN&quot;;IF([.S108]=&quot;CLEAR&quot;;IF(OR([.O108]=&quot;&quot;;[.P108]=&quot;&quot;);&quot;UNKNOWN&quot;;&quot;READY FOR REVIEW&quot;);&quot;BLOCKED&quot;)))">
            <text:p>UNKNOWN</text:p>
          </table:table-cell>
          <table:table-cell office:value-type="string" table:formula="of:=IF([.U108]=&quot;UNKNOWN&quot;;&quot;COMPLETE OR ASSERT REQUIRED EVIDENCE BEFORE REVIEW&quot;;IF([.U108]=&quot;BLOCKED&quot;;&quot;RESOLVE CONTRADICTION BEFORE REVIEW — NO AUTHORITY CREATED&quot;;IF([.U10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8]=&quot;READY FOR REVIEW&quot;;&quot;REVIEW ELIGIBLE — NO AUTHORITY&quot;;IF(OR([.U108]=&quot;UNKNOWN&quot;;[.U108]=&quot;BLOCKED&quot;);&quot;NOT REVIEW ELIGIBLE&quot;;&quot;NOT REVIEW ELIGIBLE&quot;))">
            <text:p>NOT REVIEW ELIGIBLE</text:p>
          </table:table-cell>
          <table:table-cell office:value-type="string" table:formula="of:=IF([.W108]=&quot;NOT REVIEW ELIGIBLE&quot;;&quot;DO NOT BEGIN SETTLEMENT REVIEW — RESOLVE READINESS OR CONTRADICTION CONDITIONS&quot;;IF([.W10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8]=&quot;&quot;;&quot;UNKNOWN&quot;;IF([.W108]&lt;&gt;&quot;REVIEW ELIGIBLE — NO AUTHORITY&quot;;&quot;BLOCKED — OUTCOME ASSERTED WITHOUT REVIEW ELIGIBILITY&quot;;IF(OR([.Y108]=&quot;REVIEWED — NO AUTHORITY&quot;;[.Y108]=&quot;REVIEW DEFERRED&quot;;[.Y10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09]=&quot;&quot;;IF(AND([.L109]=&quot;&quot;;[.N109]=&quot;&quot;);&quot;UNKNOWN&quot;;&quot;CONTRADICTION&quot;);IF([.M109]=&quot;UNMATCHED&quot;;IF(AND([.L109]=&quot;&quot;;[.N109]=&quot;&quot;);&quot;CLEAR&quot;;&quot;CONTRADICTION&quot;);IF([.M109]=&quot;SINGLE_SALE_LINKED&quot;;IF(AND([.L109]&lt;&gt;&quot;&quot;;[.N109]=&quot;&quot;);&quot;CLEAR&quot;;&quot;CONTRADICTION&quot;);IF([.M109]=&quot;MULTI_SALE_PENDING_ALLOCATION&quot;;IF([.L109]=&quot;&quot;;&quot;CLEAR&quot;;&quot;CONTRADICTION&quot;);IF([.M109]=&quot;ALLOCATED&quot;;IF(AND([.L109]=&quot;&quot;;[.N109]&lt;&gt;&quot;&quot;);&quot;CLEAR&quot;;&quot;CONTRADICTION&quot;);&quot;CONTRADICTION&quot;)))))">
            <text:p>UNKNOWN</text:p>
          </table:table-cell>
          <table:table-cell office:value-type="string" table:formula="of:=IF([.S109]=&quot;UNKNOWN&quot;;&quot;NO ACTION — linkage status is UNKNOWN / not asserted&quot;;IF([.S109]=&quot;CLEAR&quot;;&quot;NO CONTRADICTION — preserve evidence as entered&quot;;IF([.M109]=&quot;&quot;;&quot;REVIEW LINKAGE STATUS — identifiers are present while status is UNKNOWN&quot;;IF([.M109]=&quot;UNMATCHED&quot;;&quot;REMOVE LINKAGE IDENTIFIERS OR CORRECT LINKAGE STATUS&quot;;IF([.M109]=&quot;SINGLE_SALE_LINKED&quot;;&quot;REQUIRE LINKED SALE ID AND NO ALLOCATION GROUP ID&quot;;IF([.M109]=&quot;MULTI_SALE_PENDING_ALLOCATION&quot;;&quot;REMOVE LINKED SALE ID OR CORRECT LINKAGE STATUS&quot;;IF([.M109]=&quot;ALLOCATED&quot;;&quot;REQUIRE ALLOCATION GROUP ID AND NO LINKED SALE ID&quot;;&quot;REVIEW LINKAGE EVIDENCE — NO AUTHORITY CREATED&quot;)))))))">
            <text:p>NO ACTION — linkage status is UNKNOWN / not asserted</text:p>
          </table:table-cell>
          <table:table-cell office:value-type="string" table:formula="of:=IF([.S109]=&quot;CONTRADICTION&quot;;&quot;BLOCKED&quot;;IF([.S109]=&quot;UNKNOWN&quot;;&quot;UNKNOWN&quot;;IF([.S109]=&quot;CLEAR&quot;;IF(OR([.O109]=&quot;&quot;;[.P109]=&quot;&quot;);&quot;UNKNOWN&quot;;&quot;READY FOR REVIEW&quot;);&quot;BLOCKED&quot;)))">
            <text:p>UNKNOWN</text:p>
          </table:table-cell>
          <table:table-cell office:value-type="string" table:formula="of:=IF([.U109]=&quot;UNKNOWN&quot;;&quot;COMPLETE OR ASSERT REQUIRED EVIDENCE BEFORE REVIEW&quot;;IF([.U109]=&quot;BLOCKED&quot;;&quot;RESOLVE CONTRADICTION BEFORE REVIEW — NO AUTHORITY CREATED&quot;;IF([.U10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09]=&quot;READY FOR REVIEW&quot;;&quot;REVIEW ELIGIBLE — NO AUTHORITY&quot;;IF(OR([.U109]=&quot;UNKNOWN&quot;;[.U109]=&quot;BLOCKED&quot;);&quot;NOT REVIEW ELIGIBLE&quot;;&quot;NOT REVIEW ELIGIBLE&quot;))">
            <text:p>NOT REVIEW ELIGIBLE</text:p>
          </table:table-cell>
          <table:table-cell office:value-type="string" table:formula="of:=IF([.W109]=&quot;NOT REVIEW ELIGIBLE&quot;;&quot;DO NOT BEGIN SETTLEMENT REVIEW — RESOLVE READINESS OR CONTRADICTION CONDITIONS&quot;;IF([.W10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09]=&quot;&quot;;&quot;UNKNOWN&quot;;IF([.W109]&lt;&gt;&quot;REVIEW ELIGIBLE — NO AUTHORITY&quot;;&quot;BLOCKED — OUTCOME ASSERTED WITHOUT REVIEW ELIGIBILITY&quot;;IF(OR([.Y109]=&quot;REVIEWED — NO AUTHORITY&quot;;[.Y109]=&quot;REVIEW DEFERRED&quot;;[.Y10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0]=&quot;&quot;;IF(AND([.L110]=&quot;&quot;;[.N110]=&quot;&quot;);&quot;UNKNOWN&quot;;&quot;CONTRADICTION&quot;);IF([.M110]=&quot;UNMATCHED&quot;;IF(AND([.L110]=&quot;&quot;;[.N110]=&quot;&quot;);&quot;CLEAR&quot;;&quot;CONTRADICTION&quot;);IF([.M110]=&quot;SINGLE_SALE_LINKED&quot;;IF(AND([.L110]&lt;&gt;&quot;&quot;;[.N110]=&quot;&quot;);&quot;CLEAR&quot;;&quot;CONTRADICTION&quot;);IF([.M110]=&quot;MULTI_SALE_PENDING_ALLOCATION&quot;;IF([.L110]=&quot;&quot;;&quot;CLEAR&quot;;&quot;CONTRADICTION&quot;);IF([.M110]=&quot;ALLOCATED&quot;;IF(AND([.L110]=&quot;&quot;;[.N110]&lt;&gt;&quot;&quot;);&quot;CLEAR&quot;;&quot;CONTRADICTION&quot;);&quot;CONTRADICTION&quot;)))))">
            <text:p>UNKNOWN</text:p>
          </table:table-cell>
          <table:table-cell office:value-type="string" table:formula="of:=IF([.S110]=&quot;UNKNOWN&quot;;&quot;NO ACTION — linkage status is UNKNOWN / not asserted&quot;;IF([.S110]=&quot;CLEAR&quot;;&quot;NO CONTRADICTION — preserve evidence as entered&quot;;IF([.M110]=&quot;&quot;;&quot;REVIEW LINKAGE STATUS — identifiers are present while status is UNKNOWN&quot;;IF([.M110]=&quot;UNMATCHED&quot;;&quot;REMOVE LINKAGE IDENTIFIERS OR CORRECT LINKAGE STATUS&quot;;IF([.M110]=&quot;SINGLE_SALE_LINKED&quot;;&quot;REQUIRE LINKED SALE ID AND NO ALLOCATION GROUP ID&quot;;IF([.M110]=&quot;MULTI_SALE_PENDING_ALLOCATION&quot;;&quot;REMOVE LINKED SALE ID OR CORRECT LINKAGE STATUS&quot;;IF([.M110]=&quot;ALLOCATED&quot;;&quot;REQUIRE ALLOCATION GROUP ID AND NO LINKED SALE ID&quot;;&quot;REVIEW LINKAGE EVIDENCE — NO AUTHORITY CREATED&quot;)))))))">
            <text:p>NO ACTION — linkage status is UNKNOWN / not asserted</text:p>
          </table:table-cell>
          <table:table-cell office:value-type="string" table:formula="of:=IF([.S110]=&quot;CONTRADICTION&quot;;&quot;BLOCKED&quot;;IF([.S110]=&quot;UNKNOWN&quot;;&quot;UNKNOWN&quot;;IF([.S110]=&quot;CLEAR&quot;;IF(OR([.O110]=&quot;&quot;;[.P110]=&quot;&quot;);&quot;UNKNOWN&quot;;&quot;READY FOR REVIEW&quot;);&quot;BLOCKED&quot;)))">
            <text:p>UNKNOWN</text:p>
          </table:table-cell>
          <table:table-cell office:value-type="string" table:formula="of:=IF([.U110]=&quot;UNKNOWN&quot;;&quot;COMPLETE OR ASSERT REQUIRED EVIDENCE BEFORE REVIEW&quot;;IF([.U110]=&quot;BLOCKED&quot;;&quot;RESOLVE CONTRADICTION BEFORE REVIEW — NO AUTHORITY CREATED&quot;;IF([.U11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0]=&quot;READY FOR REVIEW&quot;;&quot;REVIEW ELIGIBLE — NO AUTHORITY&quot;;IF(OR([.U110]=&quot;UNKNOWN&quot;;[.U110]=&quot;BLOCKED&quot;);&quot;NOT REVIEW ELIGIBLE&quot;;&quot;NOT REVIEW ELIGIBLE&quot;))">
            <text:p>NOT REVIEW ELIGIBLE</text:p>
          </table:table-cell>
          <table:table-cell office:value-type="string" table:formula="of:=IF([.W110]=&quot;NOT REVIEW ELIGIBLE&quot;;&quot;DO NOT BEGIN SETTLEMENT REVIEW — RESOLVE READINESS OR CONTRADICTION CONDITIONS&quot;;IF([.W11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0]=&quot;&quot;;&quot;UNKNOWN&quot;;IF([.W110]&lt;&gt;&quot;REVIEW ELIGIBLE — NO AUTHORITY&quot;;&quot;BLOCKED — OUTCOME ASSERTED WITHOUT REVIEW ELIGIBILITY&quot;;IF(OR([.Y110]=&quot;REVIEWED — NO AUTHORITY&quot;;[.Y110]=&quot;REVIEW DEFERRED&quot;;[.Y11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1]=&quot;&quot;;IF(AND([.L111]=&quot;&quot;;[.N111]=&quot;&quot;);&quot;UNKNOWN&quot;;&quot;CONTRADICTION&quot;);IF([.M111]=&quot;UNMATCHED&quot;;IF(AND([.L111]=&quot;&quot;;[.N111]=&quot;&quot;);&quot;CLEAR&quot;;&quot;CONTRADICTION&quot;);IF([.M111]=&quot;SINGLE_SALE_LINKED&quot;;IF(AND([.L111]&lt;&gt;&quot;&quot;;[.N111]=&quot;&quot;);&quot;CLEAR&quot;;&quot;CONTRADICTION&quot;);IF([.M111]=&quot;MULTI_SALE_PENDING_ALLOCATION&quot;;IF([.L111]=&quot;&quot;;&quot;CLEAR&quot;;&quot;CONTRADICTION&quot;);IF([.M111]=&quot;ALLOCATED&quot;;IF(AND([.L111]=&quot;&quot;;[.N111]&lt;&gt;&quot;&quot;);&quot;CLEAR&quot;;&quot;CONTRADICTION&quot;);&quot;CONTRADICTION&quot;)))))">
            <text:p>UNKNOWN</text:p>
          </table:table-cell>
          <table:table-cell office:value-type="string" table:formula="of:=IF([.S111]=&quot;UNKNOWN&quot;;&quot;NO ACTION — linkage status is UNKNOWN / not asserted&quot;;IF([.S111]=&quot;CLEAR&quot;;&quot;NO CONTRADICTION — preserve evidence as entered&quot;;IF([.M111]=&quot;&quot;;&quot;REVIEW LINKAGE STATUS — identifiers are present while status is UNKNOWN&quot;;IF([.M111]=&quot;UNMATCHED&quot;;&quot;REMOVE LINKAGE IDENTIFIERS OR CORRECT LINKAGE STATUS&quot;;IF([.M111]=&quot;SINGLE_SALE_LINKED&quot;;&quot;REQUIRE LINKED SALE ID AND NO ALLOCATION GROUP ID&quot;;IF([.M111]=&quot;MULTI_SALE_PENDING_ALLOCATION&quot;;&quot;REMOVE LINKED SALE ID OR CORRECT LINKAGE STATUS&quot;;IF([.M111]=&quot;ALLOCATED&quot;;&quot;REQUIRE ALLOCATION GROUP ID AND NO LINKED SALE ID&quot;;&quot;REVIEW LINKAGE EVIDENCE — NO AUTHORITY CREATED&quot;)))))))">
            <text:p>NO ACTION — linkage status is UNKNOWN / not asserted</text:p>
          </table:table-cell>
          <table:table-cell office:value-type="string" table:formula="of:=IF([.S111]=&quot;CONTRADICTION&quot;;&quot;BLOCKED&quot;;IF([.S111]=&quot;UNKNOWN&quot;;&quot;UNKNOWN&quot;;IF([.S111]=&quot;CLEAR&quot;;IF(OR([.O111]=&quot;&quot;;[.P111]=&quot;&quot;);&quot;UNKNOWN&quot;;&quot;READY FOR REVIEW&quot;);&quot;BLOCKED&quot;)))">
            <text:p>UNKNOWN</text:p>
          </table:table-cell>
          <table:table-cell office:value-type="string" table:formula="of:=IF([.U111]=&quot;UNKNOWN&quot;;&quot;COMPLETE OR ASSERT REQUIRED EVIDENCE BEFORE REVIEW&quot;;IF([.U111]=&quot;BLOCKED&quot;;&quot;RESOLVE CONTRADICTION BEFORE REVIEW — NO AUTHORITY CREATED&quot;;IF([.U11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1]=&quot;READY FOR REVIEW&quot;;&quot;REVIEW ELIGIBLE — NO AUTHORITY&quot;;IF(OR([.U111]=&quot;UNKNOWN&quot;;[.U111]=&quot;BLOCKED&quot;);&quot;NOT REVIEW ELIGIBLE&quot;;&quot;NOT REVIEW ELIGIBLE&quot;))">
            <text:p>NOT REVIEW ELIGIBLE</text:p>
          </table:table-cell>
          <table:table-cell office:value-type="string" table:formula="of:=IF([.W111]=&quot;NOT REVIEW ELIGIBLE&quot;;&quot;DO NOT BEGIN SETTLEMENT REVIEW — RESOLVE READINESS OR CONTRADICTION CONDITIONS&quot;;IF([.W11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1]=&quot;&quot;;&quot;UNKNOWN&quot;;IF([.W111]&lt;&gt;&quot;REVIEW ELIGIBLE — NO AUTHORITY&quot;;&quot;BLOCKED — OUTCOME ASSERTED WITHOUT REVIEW ELIGIBILITY&quot;;IF(OR([.Y111]=&quot;REVIEWED — NO AUTHORITY&quot;;[.Y111]=&quot;REVIEW DEFERRED&quot;;[.Y111]=&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2]=&quot;&quot;;IF(AND([.L112]=&quot;&quot;;[.N112]=&quot;&quot;);&quot;UNKNOWN&quot;;&quot;CONTRADICTION&quot;);IF([.M112]=&quot;UNMATCHED&quot;;IF(AND([.L112]=&quot;&quot;;[.N112]=&quot;&quot;);&quot;CLEAR&quot;;&quot;CONTRADICTION&quot;);IF([.M112]=&quot;SINGLE_SALE_LINKED&quot;;IF(AND([.L112]&lt;&gt;&quot;&quot;;[.N112]=&quot;&quot;);&quot;CLEAR&quot;;&quot;CONTRADICTION&quot;);IF([.M112]=&quot;MULTI_SALE_PENDING_ALLOCATION&quot;;IF([.L112]=&quot;&quot;;&quot;CLEAR&quot;;&quot;CONTRADICTION&quot;);IF([.M112]=&quot;ALLOCATED&quot;;IF(AND([.L112]=&quot;&quot;;[.N112]&lt;&gt;&quot;&quot;);&quot;CLEAR&quot;;&quot;CONTRADICTION&quot;);&quot;CONTRADICTION&quot;)))))">
            <text:p>UNKNOWN</text:p>
          </table:table-cell>
          <table:table-cell office:value-type="string" table:formula="of:=IF([.S112]=&quot;UNKNOWN&quot;;&quot;NO ACTION — linkage status is UNKNOWN / not asserted&quot;;IF([.S112]=&quot;CLEAR&quot;;&quot;NO CONTRADICTION — preserve evidence as entered&quot;;IF([.M112]=&quot;&quot;;&quot;REVIEW LINKAGE STATUS — identifiers are present while status is UNKNOWN&quot;;IF([.M112]=&quot;UNMATCHED&quot;;&quot;REMOVE LINKAGE IDENTIFIERS OR CORRECT LINKAGE STATUS&quot;;IF([.M112]=&quot;SINGLE_SALE_LINKED&quot;;&quot;REQUIRE LINKED SALE ID AND NO ALLOCATION GROUP ID&quot;;IF([.M112]=&quot;MULTI_SALE_PENDING_ALLOCATION&quot;;&quot;REMOVE LINKED SALE ID OR CORRECT LINKAGE STATUS&quot;;IF([.M112]=&quot;ALLOCATED&quot;;&quot;REQUIRE ALLOCATION GROUP ID AND NO LINKED SALE ID&quot;;&quot;REVIEW LINKAGE EVIDENCE — NO AUTHORITY CREATED&quot;)))))))">
            <text:p>NO ACTION — linkage status is UNKNOWN / not asserted</text:p>
          </table:table-cell>
          <table:table-cell office:value-type="string" table:formula="of:=IF([.S112]=&quot;CONTRADICTION&quot;;&quot;BLOCKED&quot;;IF([.S112]=&quot;UNKNOWN&quot;;&quot;UNKNOWN&quot;;IF([.S112]=&quot;CLEAR&quot;;IF(OR([.O112]=&quot;&quot;;[.P112]=&quot;&quot;);&quot;UNKNOWN&quot;;&quot;READY FOR REVIEW&quot;);&quot;BLOCKED&quot;)))">
            <text:p>UNKNOWN</text:p>
          </table:table-cell>
          <table:table-cell office:value-type="string" table:formula="of:=IF([.U112]=&quot;UNKNOWN&quot;;&quot;COMPLETE OR ASSERT REQUIRED EVIDENCE BEFORE REVIEW&quot;;IF([.U112]=&quot;BLOCKED&quot;;&quot;RESOLVE CONTRADICTION BEFORE REVIEW — NO AUTHORITY CREATED&quot;;IF([.U11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2]=&quot;READY FOR REVIEW&quot;;&quot;REVIEW ELIGIBLE — NO AUTHORITY&quot;;IF(OR([.U112]=&quot;UNKNOWN&quot;;[.U112]=&quot;BLOCKED&quot;);&quot;NOT REVIEW ELIGIBLE&quot;;&quot;NOT REVIEW ELIGIBLE&quot;))">
            <text:p>NOT REVIEW ELIGIBLE</text:p>
          </table:table-cell>
          <table:table-cell office:value-type="string" table:formula="of:=IF([.W112]=&quot;NOT REVIEW ELIGIBLE&quot;;&quot;DO NOT BEGIN SETTLEMENT REVIEW — RESOLVE READINESS OR CONTRADICTION CONDITIONS&quot;;IF([.W11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2]=&quot;&quot;;&quot;UNKNOWN&quot;;IF([.W112]&lt;&gt;&quot;REVIEW ELIGIBLE — NO AUTHORITY&quot;;&quot;BLOCKED — OUTCOME ASSERTED WITHOUT REVIEW ELIGIBILITY&quot;;IF(OR([.Y112]=&quot;REVIEWED — NO AUTHORITY&quot;;[.Y112]=&quot;REVIEW DEFERRED&quot;;[.Y11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3]=&quot;&quot;;IF(AND([.L113]=&quot;&quot;;[.N113]=&quot;&quot;);&quot;UNKNOWN&quot;;&quot;CONTRADICTION&quot;);IF([.M113]=&quot;UNMATCHED&quot;;IF(AND([.L113]=&quot;&quot;;[.N113]=&quot;&quot;);&quot;CLEAR&quot;;&quot;CONTRADICTION&quot;);IF([.M113]=&quot;SINGLE_SALE_LINKED&quot;;IF(AND([.L113]&lt;&gt;&quot;&quot;;[.N113]=&quot;&quot;);&quot;CLEAR&quot;;&quot;CONTRADICTION&quot;);IF([.M113]=&quot;MULTI_SALE_PENDING_ALLOCATION&quot;;IF([.L113]=&quot;&quot;;&quot;CLEAR&quot;;&quot;CONTRADICTION&quot;);IF([.M113]=&quot;ALLOCATED&quot;;IF(AND([.L113]=&quot;&quot;;[.N113]&lt;&gt;&quot;&quot;);&quot;CLEAR&quot;;&quot;CONTRADICTION&quot;);&quot;CONTRADICTION&quot;)))))">
            <text:p>UNKNOWN</text:p>
          </table:table-cell>
          <table:table-cell office:value-type="string" table:formula="of:=IF([.S113]=&quot;UNKNOWN&quot;;&quot;NO ACTION — linkage status is UNKNOWN / not asserted&quot;;IF([.S113]=&quot;CLEAR&quot;;&quot;NO CONTRADICTION — preserve evidence as entered&quot;;IF([.M113]=&quot;&quot;;&quot;REVIEW LINKAGE STATUS — identifiers are present while status is UNKNOWN&quot;;IF([.M113]=&quot;UNMATCHED&quot;;&quot;REMOVE LINKAGE IDENTIFIERS OR CORRECT LINKAGE STATUS&quot;;IF([.M113]=&quot;SINGLE_SALE_LINKED&quot;;&quot;REQUIRE LINKED SALE ID AND NO ALLOCATION GROUP ID&quot;;IF([.M113]=&quot;MULTI_SALE_PENDING_ALLOCATION&quot;;&quot;REMOVE LINKED SALE ID OR CORRECT LINKAGE STATUS&quot;;IF([.M113]=&quot;ALLOCATED&quot;;&quot;REQUIRE ALLOCATION GROUP ID AND NO LINKED SALE ID&quot;;&quot;REVIEW LINKAGE EVIDENCE — NO AUTHORITY CREATED&quot;)))))))">
            <text:p>NO ACTION — linkage status is UNKNOWN / not asserted</text:p>
          </table:table-cell>
          <table:table-cell office:value-type="string" table:formula="of:=IF([.S113]=&quot;CONTRADICTION&quot;;&quot;BLOCKED&quot;;IF([.S113]=&quot;UNKNOWN&quot;;&quot;UNKNOWN&quot;;IF([.S113]=&quot;CLEAR&quot;;IF(OR([.O113]=&quot;&quot;;[.P113]=&quot;&quot;);&quot;UNKNOWN&quot;;&quot;READY FOR REVIEW&quot;);&quot;BLOCKED&quot;)))">
            <text:p>UNKNOWN</text:p>
          </table:table-cell>
          <table:table-cell office:value-type="string" table:formula="of:=IF([.U113]=&quot;UNKNOWN&quot;;&quot;COMPLETE OR ASSERT REQUIRED EVIDENCE BEFORE REVIEW&quot;;IF([.U113]=&quot;BLOCKED&quot;;&quot;RESOLVE CONTRADICTION BEFORE REVIEW — NO AUTHORITY CREATED&quot;;IF([.U11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3]=&quot;READY FOR REVIEW&quot;;&quot;REVIEW ELIGIBLE — NO AUTHORITY&quot;;IF(OR([.U113]=&quot;UNKNOWN&quot;;[.U113]=&quot;BLOCKED&quot;);&quot;NOT REVIEW ELIGIBLE&quot;;&quot;NOT REVIEW ELIGIBLE&quot;))">
            <text:p>NOT REVIEW ELIGIBLE</text:p>
          </table:table-cell>
          <table:table-cell office:value-type="string" table:formula="of:=IF([.W113]=&quot;NOT REVIEW ELIGIBLE&quot;;&quot;DO NOT BEGIN SETTLEMENT REVIEW — RESOLVE READINESS OR CONTRADICTION CONDITIONS&quot;;IF([.W11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3]=&quot;&quot;;&quot;UNKNOWN&quot;;IF([.W113]&lt;&gt;&quot;REVIEW ELIGIBLE — NO AUTHORITY&quot;;&quot;BLOCKED — OUTCOME ASSERTED WITHOUT REVIEW ELIGIBILITY&quot;;IF(OR([.Y113]=&quot;REVIEWED — NO AUTHORITY&quot;;[.Y113]=&quot;REVIEW DEFERRED&quot;;[.Y11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4]=&quot;&quot;;IF(AND([.L114]=&quot;&quot;;[.N114]=&quot;&quot;);&quot;UNKNOWN&quot;;&quot;CONTRADICTION&quot;);IF([.M114]=&quot;UNMATCHED&quot;;IF(AND([.L114]=&quot;&quot;;[.N114]=&quot;&quot;);&quot;CLEAR&quot;;&quot;CONTRADICTION&quot;);IF([.M114]=&quot;SINGLE_SALE_LINKED&quot;;IF(AND([.L114]&lt;&gt;&quot;&quot;;[.N114]=&quot;&quot;);&quot;CLEAR&quot;;&quot;CONTRADICTION&quot;);IF([.M114]=&quot;MULTI_SALE_PENDING_ALLOCATION&quot;;IF([.L114]=&quot;&quot;;&quot;CLEAR&quot;;&quot;CONTRADICTION&quot;);IF([.M114]=&quot;ALLOCATED&quot;;IF(AND([.L114]=&quot;&quot;;[.N114]&lt;&gt;&quot;&quot;);&quot;CLEAR&quot;;&quot;CONTRADICTION&quot;);&quot;CONTRADICTION&quot;)))))">
            <text:p>UNKNOWN</text:p>
          </table:table-cell>
          <table:table-cell office:value-type="string" table:formula="of:=IF([.S114]=&quot;UNKNOWN&quot;;&quot;NO ACTION — linkage status is UNKNOWN / not asserted&quot;;IF([.S114]=&quot;CLEAR&quot;;&quot;NO CONTRADICTION — preserve evidence as entered&quot;;IF([.M114]=&quot;&quot;;&quot;REVIEW LINKAGE STATUS — identifiers are present while status is UNKNOWN&quot;;IF([.M114]=&quot;UNMATCHED&quot;;&quot;REMOVE LINKAGE IDENTIFIERS OR CORRECT LINKAGE STATUS&quot;;IF([.M114]=&quot;SINGLE_SALE_LINKED&quot;;&quot;REQUIRE LINKED SALE ID AND NO ALLOCATION GROUP ID&quot;;IF([.M114]=&quot;MULTI_SALE_PENDING_ALLOCATION&quot;;&quot;REMOVE LINKED SALE ID OR CORRECT LINKAGE STATUS&quot;;IF([.M114]=&quot;ALLOCATED&quot;;&quot;REQUIRE ALLOCATION GROUP ID AND NO LINKED SALE ID&quot;;&quot;REVIEW LINKAGE EVIDENCE — NO AUTHORITY CREATED&quot;)))))))">
            <text:p>NO ACTION — linkage status is UNKNOWN / not asserted</text:p>
          </table:table-cell>
          <table:table-cell office:value-type="string" table:formula="of:=IF([.S114]=&quot;CONTRADICTION&quot;;&quot;BLOCKED&quot;;IF([.S114]=&quot;UNKNOWN&quot;;&quot;UNKNOWN&quot;;IF([.S114]=&quot;CLEAR&quot;;IF(OR([.O114]=&quot;&quot;;[.P114]=&quot;&quot;);&quot;UNKNOWN&quot;;&quot;READY FOR REVIEW&quot;);&quot;BLOCKED&quot;)))">
            <text:p>UNKNOWN</text:p>
          </table:table-cell>
          <table:table-cell office:value-type="string" table:formula="of:=IF([.U114]=&quot;UNKNOWN&quot;;&quot;COMPLETE OR ASSERT REQUIRED EVIDENCE BEFORE REVIEW&quot;;IF([.U114]=&quot;BLOCKED&quot;;&quot;RESOLVE CONTRADICTION BEFORE REVIEW — NO AUTHORITY CREATED&quot;;IF([.U11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4]=&quot;READY FOR REVIEW&quot;;&quot;REVIEW ELIGIBLE — NO AUTHORITY&quot;;IF(OR([.U114]=&quot;UNKNOWN&quot;;[.U114]=&quot;BLOCKED&quot;);&quot;NOT REVIEW ELIGIBLE&quot;;&quot;NOT REVIEW ELIGIBLE&quot;))">
            <text:p>NOT REVIEW ELIGIBLE</text:p>
          </table:table-cell>
          <table:table-cell office:value-type="string" table:formula="of:=IF([.W114]=&quot;NOT REVIEW ELIGIBLE&quot;;&quot;DO NOT BEGIN SETTLEMENT REVIEW — RESOLVE READINESS OR CONTRADICTION CONDITIONS&quot;;IF([.W11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4]=&quot;&quot;;&quot;UNKNOWN&quot;;IF([.W114]&lt;&gt;&quot;REVIEW ELIGIBLE — NO AUTHORITY&quot;;&quot;BLOCKED — OUTCOME ASSERTED WITHOUT REVIEW ELIGIBILITY&quot;;IF(OR([.Y114]=&quot;REVIEWED — NO AUTHORITY&quot;;[.Y114]=&quot;REVIEW DEFERRED&quot;;[.Y11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5]=&quot;&quot;;IF(AND([.L115]=&quot;&quot;;[.N115]=&quot;&quot;);&quot;UNKNOWN&quot;;&quot;CONTRADICTION&quot;);IF([.M115]=&quot;UNMATCHED&quot;;IF(AND([.L115]=&quot;&quot;;[.N115]=&quot;&quot;);&quot;CLEAR&quot;;&quot;CONTRADICTION&quot;);IF([.M115]=&quot;SINGLE_SALE_LINKED&quot;;IF(AND([.L115]&lt;&gt;&quot;&quot;;[.N115]=&quot;&quot;);&quot;CLEAR&quot;;&quot;CONTRADICTION&quot;);IF([.M115]=&quot;MULTI_SALE_PENDING_ALLOCATION&quot;;IF([.L115]=&quot;&quot;;&quot;CLEAR&quot;;&quot;CONTRADICTION&quot;);IF([.M115]=&quot;ALLOCATED&quot;;IF(AND([.L115]=&quot;&quot;;[.N115]&lt;&gt;&quot;&quot;);&quot;CLEAR&quot;;&quot;CONTRADICTION&quot;);&quot;CONTRADICTION&quot;)))))">
            <text:p>UNKNOWN</text:p>
          </table:table-cell>
          <table:table-cell office:value-type="string" table:formula="of:=IF([.S115]=&quot;UNKNOWN&quot;;&quot;NO ACTION — linkage status is UNKNOWN / not asserted&quot;;IF([.S115]=&quot;CLEAR&quot;;&quot;NO CONTRADICTION — preserve evidence as entered&quot;;IF([.M115]=&quot;&quot;;&quot;REVIEW LINKAGE STATUS — identifiers are present while status is UNKNOWN&quot;;IF([.M115]=&quot;UNMATCHED&quot;;&quot;REMOVE LINKAGE IDENTIFIERS OR CORRECT LINKAGE STATUS&quot;;IF([.M115]=&quot;SINGLE_SALE_LINKED&quot;;&quot;REQUIRE LINKED SALE ID AND NO ALLOCATION GROUP ID&quot;;IF([.M115]=&quot;MULTI_SALE_PENDING_ALLOCATION&quot;;&quot;REMOVE LINKED SALE ID OR CORRECT LINKAGE STATUS&quot;;IF([.M115]=&quot;ALLOCATED&quot;;&quot;REQUIRE ALLOCATION GROUP ID AND NO LINKED SALE ID&quot;;&quot;REVIEW LINKAGE EVIDENCE — NO AUTHORITY CREATED&quot;)))))))">
            <text:p>NO ACTION — linkage status is UNKNOWN / not asserted</text:p>
          </table:table-cell>
          <table:table-cell office:value-type="string" table:formula="of:=IF([.S115]=&quot;CONTRADICTION&quot;;&quot;BLOCKED&quot;;IF([.S115]=&quot;UNKNOWN&quot;;&quot;UNKNOWN&quot;;IF([.S115]=&quot;CLEAR&quot;;IF(OR([.O115]=&quot;&quot;;[.P115]=&quot;&quot;);&quot;UNKNOWN&quot;;&quot;READY FOR REVIEW&quot;);&quot;BLOCKED&quot;)))">
            <text:p>UNKNOWN</text:p>
          </table:table-cell>
          <table:table-cell office:value-type="string" table:formula="of:=IF([.U115]=&quot;UNKNOWN&quot;;&quot;COMPLETE OR ASSERT REQUIRED EVIDENCE BEFORE REVIEW&quot;;IF([.U115]=&quot;BLOCKED&quot;;&quot;RESOLVE CONTRADICTION BEFORE REVIEW — NO AUTHORITY CREATED&quot;;IF([.U11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5]=&quot;READY FOR REVIEW&quot;;&quot;REVIEW ELIGIBLE — NO AUTHORITY&quot;;IF(OR([.U115]=&quot;UNKNOWN&quot;;[.U115]=&quot;BLOCKED&quot;);&quot;NOT REVIEW ELIGIBLE&quot;;&quot;NOT REVIEW ELIGIBLE&quot;))">
            <text:p>NOT REVIEW ELIGIBLE</text:p>
          </table:table-cell>
          <table:table-cell office:value-type="string" table:formula="of:=IF([.W115]=&quot;NOT REVIEW ELIGIBLE&quot;;&quot;DO NOT BEGIN SETTLEMENT REVIEW — RESOLVE READINESS OR CONTRADICTION CONDITIONS&quot;;IF([.W11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5]=&quot;&quot;;&quot;UNKNOWN&quot;;IF([.W115]&lt;&gt;&quot;REVIEW ELIGIBLE — NO AUTHORITY&quot;;&quot;BLOCKED — OUTCOME ASSERTED WITHOUT REVIEW ELIGIBILITY&quot;;IF(OR([.Y115]=&quot;REVIEWED — NO AUTHORITY&quot;;[.Y115]=&quot;REVIEW DEFERRED&quot;;[.Y11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6]=&quot;&quot;;IF(AND([.L116]=&quot;&quot;;[.N116]=&quot;&quot;);&quot;UNKNOWN&quot;;&quot;CONTRADICTION&quot;);IF([.M116]=&quot;UNMATCHED&quot;;IF(AND([.L116]=&quot;&quot;;[.N116]=&quot;&quot;);&quot;CLEAR&quot;;&quot;CONTRADICTION&quot;);IF([.M116]=&quot;SINGLE_SALE_LINKED&quot;;IF(AND([.L116]&lt;&gt;&quot;&quot;;[.N116]=&quot;&quot;);&quot;CLEAR&quot;;&quot;CONTRADICTION&quot;);IF([.M116]=&quot;MULTI_SALE_PENDING_ALLOCATION&quot;;IF([.L116]=&quot;&quot;;&quot;CLEAR&quot;;&quot;CONTRADICTION&quot;);IF([.M116]=&quot;ALLOCATED&quot;;IF(AND([.L116]=&quot;&quot;;[.N116]&lt;&gt;&quot;&quot;);&quot;CLEAR&quot;;&quot;CONTRADICTION&quot;);&quot;CONTRADICTION&quot;)))))">
            <text:p>UNKNOWN</text:p>
          </table:table-cell>
          <table:table-cell office:value-type="string" table:formula="of:=IF([.S116]=&quot;UNKNOWN&quot;;&quot;NO ACTION — linkage status is UNKNOWN / not asserted&quot;;IF([.S116]=&quot;CLEAR&quot;;&quot;NO CONTRADICTION — preserve evidence as entered&quot;;IF([.M116]=&quot;&quot;;&quot;REVIEW LINKAGE STATUS — identifiers are present while status is UNKNOWN&quot;;IF([.M116]=&quot;UNMATCHED&quot;;&quot;REMOVE LINKAGE IDENTIFIERS OR CORRECT LINKAGE STATUS&quot;;IF([.M116]=&quot;SINGLE_SALE_LINKED&quot;;&quot;REQUIRE LINKED SALE ID AND NO ALLOCATION GROUP ID&quot;;IF([.M116]=&quot;MULTI_SALE_PENDING_ALLOCATION&quot;;&quot;REMOVE LINKED SALE ID OR CORRECT LINKAGE STATUS&quot;;IF([.M116]=&quot;ALLOCATED&quot;;&quot;REQUIRE ALLOCATION GROUP ID AND NO LINKED SALE ID&quot;;&quot;REVIEW LINKAGE EVIDENCE — NO AUTHORITY CREATED&quot;)))))))">
            <text:p>NO ACTION — linkage status is UNKNOWN / not asserted</text:p>
          </table:table-cell>
          <table:table-cell office:value-type="string" table:formula="of:=IF([.S116]=&quot;CONTRADICTION&quot;;&quot;BLOCKED&quot;;IF([.S116]=&quot;UNKNOWN&quot;;&quot;UNKNOWN&quot;;IF([.S116]=&quot;CLEAR&quot;;IF(OR([.O116]=&quot;&quot;;[.P116]=&quot;&quot;);&quot;UNKNOWN&quot;;&quot;READY FOR REVIEW&quot;);&quot;BLOCKED&quot;)))">
            <text:p>UNKNOWN</text:p>
          </table:table-cell>
          <table:table-cell office:value-type="string" table:formula="of:=IF([.U116]=&quot;UNKNOWN&quot;;&quot;COMPLETE OR ASSERT REQUIRED EVIDENCE BEFORE REVIEW&quot;;IF([.U116]=&quot;BLOCKED&quot;;&quot;RESOLVE CONTRADICTION BEFORE REVIEW — NO AUTHORITY CREATED&quot;;IF([.U11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6]=&quot;READY FOR REVIEW&quot;;&quot;REVIEW ELIGIBLE — NO AUTHORITY&quot;;IF(OR([.U116]=&quot;UNKNOWN&quot;;[.U116]=&quot;BLOCKED&quot;);&quot;NOT REVIEW ELIGIBLE&quot;;&quot;NOT REVIEW ELIGIBLE&quot;))">
            <text:p>NOT REVIEW ELIGIBLE</text:p>
          </table:table-cell>
          <table:table-cell office:value-type="string" table:formula="of:=IF([.W116]=&quot;NOT REVIEW ELIGIBLE&quot;;&quot;DO NOT BEGIN SETTLEMENT REVIEW — RESOLVE READINESS OR CONTRADICTION CONDITIONS&quot;;IF([.W11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6]=&quot;&quot;;&quot;UNKNOWN&quot;;IF([.W116]&lt;&gt;&quot;REVIEW ELIGIBLE — NO AUTHORITY&quot;;&quot;BLOCKED — OUTCOME ASSERTED WITHOUT REVIEW ELIGIBILITY&quot;;IF(OR([.Y116]=&quot;REVIEWED — NO AUTHORITY&quot;;[.Y116]=&quot;REVIEW DEFERRED&quot;;[.Y11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7]=&quot;&quot;;IF(AND([.L117]=&quot;&quot;;[.N117]=&quot;&quot;);&quot;UNKNOWN&quot;;&quot;CONTRADICTION&quot;);IF([.M117]=&quot;UNMATCHED&quot;;IF(AND([.L117]=&quot;&quot;;[.N117]=&quot;&quot;);&quot;CLEAR&quot;;&quot;CONTRADICTION&quot;);IF([.M117]=&quot;SINGLE_SALE_LINKED&quot;;IF(AND([.L117]&lt;&gt;&quot;&quot;;[.N117]=&quot;&quot;);&quot;CLEAR&quot;;&quot;CONTRADICTION&quot;);IF([.M117]=&quot;MULTI_SALE_PENDING_ALLOCATION&quot;;IF([.L117]=&quot;&quot;;&quot;CLEAR&quot;;&quot;CONTRADICTION&quot;);IF([.M117]=&quot;ALLOCATED&quot;;IF(AND([.L117]=&quot;&quot;;[.N117]&lt;&gt;&quot;&quot;);&quot;CLEAR&quot;;&quot;CONTRADICTION&quot;);&quot;CONTRADICTION&quot;)))))">
            <text:p>UNKNOWN</text:p>
          </table:table-cell>
          <table:table-cell office:value-type="string" table:formula="of:=IF([.S117]=&quot;UNKNOWN&quot;;&quot;NO ACTION — linkage status is UNKNOWN / not asserted&quot;;IF([.S117]=&quot;CLEAR&quot;;&quot;NO CONTRADICTION — preserve evidence as entered&quot;;IF([.M117]=&quot;&quot;;&quot;REVIEW LINKAGE STATUS — identifiers are present while status is UNKNOWN&quot;;IF([.M117]=&quot;UNMATCHED&quot;;&quot;REMOVE LINKAGE IDENTIFIERS OR CORRECT LINKAGE STATUS&quot;;IF([.M117]=&quot;SINGLE_SALE_LINKED&quot;;&quot;REQUIRE LINKED SALE ID AND NO ALLOCATION GROUP ID&quot;;IF([.M117]=&quot;MULTI_SALE_PENDING_ALLOCATION&quot;;&quot;REMOVE LINKED SALE ID OR CORRECT LINKAGE STATUS&quot;;IF([.M117]=&quot;ALLOCATED&quot;;&quot;REQUIRE ALLOCATION GROUP ID AND NO LINKED SALE ID&quot;;&quot;REVIEW LINKAGE EVIDENCE — NO AUTHORITY CREATED&quot;)))))))">
            <text:p>NO ACTION — linkage status is UNKNOWN / not asserted</text:p>
          </table:table-cell>
          <table:table-cell office:value-type="string" table:formula="of:=IF([.S117]=&quot;CONTRADICTION&quot;;&quot;BLOCKED&quot;;IF([.S117]=&quot;UNKNOWN&quot;;&quot;UNKNOWN&quot;;IF([.S117]=&quot;CLEAR&quot;;IF(OR([.O117]=&quot;&quot;;[.P117]=&quot;&quot;);&quot;UNKNOWN&quot;;&quot;READY FOR REVIEW&quot;);&quot;BLOCKED&quot;)))">
            <text:p>UNKNOWN</text:p>
          </table:table-cell>
          <table:table-cell office:value-type="string" table:formula="of:=IF([.U117]=&quot;UNKNOWN&quot;;&quot;COMPLETE OR ASSERT REQUIRED EVIDENCE BEFORE REVIEW&quot;;IF([.U117]=&quot;BLOCKED&quot;;&quot;RESOLVE CONTRADICTION BEFORE REVIEW — NO AUTHORITY CREATED&quot;;IF([.U11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7]=&quot;READY FOR REVIEW&quot;;&quot;REVIEW ELIGIBLE — NO AUTHORITY&quot;;IF(OR([.U117]=&quot;UNKNOWN&quot;;[.U117]=&quot;BLOCKED&quot;);&quot;NOT REVIEW ELIGIBLE&quot;;&quot;NOT REVIEW ELIGIBLE&quot;))">
            <text:p>NOT REVIEW ELIGIBLE</text:p>
          </table:table-cell>
          <table:table-cell office:value-type="string" table:formula="of:=IF([.W117]=&quot;NOT REVIEW ELIGIBLE&quot;;&quot;DO NOT BEGIN SETTLEMENT REVIEW — RESOLVE READINESS OR CONTRADICTION CONDITIONS&quot;;IF([.W11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7]=&quot;&quot;;&quot;UNKNOWN&quot;;IF([.W117]&lt;&gt;&quot;REVIEW ELIGIBLE — NO AUTHORITY&quot;;&quot;BLOCKED — OUTCOME ASSERTED WITHOUT REVIEW ELIGIBILITY&quot;;IF(OR([.Y117]=&quot;REVIEWED — NO AUTHORITY&quot;;[.Y117]=&quot;REVIEW DEFERRED&quot;;[.Y11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8]=&quot;&quot;;IF(AND([.L118]=&quot;&quot;;[.N118]=&quot;&quot;);&quot;UNKNOWN&quot;;&quot;CONTRADICTION&quot;);IF([.M118]=&quot;UNMATCHED&quot;;IF(AND([.L118]=&quot;&quot;;[.N118]=&quot;&quot;);&quot;CLEAR&quot;;&quot;CONTRADICTION&quot;);IF([.M118]=&quot;SINGLE_SALE_LINKED&quot;;IF(AND([.L118]&lt;&gt;&quot;&quot;;[.N118]=&quot;&quot;);&quot;CLEAR&quot;;&quot;CONTRADICTION&quot;);IF([.M118]=&quot;MULTI_SALE_PENDING_ALLOCATION&quot;;IF([.L118]=&quot;&quot;;&quot;CLEAR&quot;;&quot;CONTRADICTION&quot;);IF([.M118]=&quot;ALLOCATED&quot;;IF(AND([.L118]=&quot;&quot;;[.N118]&lt;&gt;&quot;&quot;);&quot;CLEAR&quot;;&quot;CONTRADICTION&quot;);&quot;CONTRADICTION&quot;)))))">
            <text:p>UNKNOWN</text:p>
          </table:table-cell>
          <table:table-cell office:value-type="string" table:formula="of:=IF([.S118]=&quot;UNKNOWN&quot;;&quot;NO ACTION — linkage status is UNKNOWN / not asserted&quot;;IF([.S118]=&quot;CLEAR&quot;;&quot;NO CONTRADICTION — preserve evidence as entered&quot;;IF([.M118]=&quot;&quot;;&quot;REVIEW LINKAGE STATUS — identifiers are present while status is UNKNOWN&quot;;IF([.M118]=&quot;UNMATCHED&quot;;&quot;REMOVE LINKAGE IDENTIFIERS OR CORRECT LINKAGE STATUS&quot;;IF([.M118]=&quot;SINGLE_SALE_LINKED&quot;;&quot;REQUIRE LINKED SALE ID AND NO ALLOCATION GROUP ID&quot;;IF([.M118]=&quot;MULTI_SALE_PENDING_ALLOCATION&quot;;&quot;REMOVE LINKED SALE ID OR CORRECT LINKAGE STATUS&quot;;IF([.M118]=&quot;ALLOCATED&quot;;&quot;REQUIRE ALLOCATION GROUP ID AND NO LINKED SALE ID&quot;;&quot;REVIEW LINKAGE EVIDENCE — NO AUTHORITY CREATED&quot;)))))))">
            <text:p>NO ACTION — linkage status is UNKNOWN / not asserted</text:p>
          </table:table-cell>
          <table:table-cell office:value-type="string" table:formula="of:=IF([.S118]=&quot;CONTRADICTION&quot;;&quot;BLOCKED&quot;;IF([.S118]=&quot;UNKNOWN&quot;;&quot;UNKNOWN&quot;;IF([.S118]=&quot;CLEAR&quot;;IF(OR([.O118]=&quot;&quot;;[.P118]=&quot;&quot;);&quot;UNKNOWN&quot;;&quot;READY FOR REVIEW&quot;);&quot;BLOCKED&quot;)))">
            <text:p>UNKNOWN</text:p>
          </table:table-cell>
          <table:table-cell office:value-type="string" table:formula="of:=IF([.U118]=&quot;UNKNOWN&quot;;&quot;COMPLETE OR ASSERT REQUIRED EVIDENCE BEFORE REVIEW&quot;;IF([.U118]=&quot;BLOCKED&quot;;&quot;RESOLVE CONTRADICTION BEFORE REVIEW — NO AUTHORITY CREATED&quot;;IF([.U11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8]=&quot;READY FOR REVIEW&quot;;&quot;REVIEW ELIGIBLE — NO AUTHORITY&quot;;IF(OR([.U118]=&quot;UNKNOWN&quot;;[.U118]=&quot;BLOCKED&quot;);&quot;NOT REVIEW ELIGIBLE&quot;;&quot;NOT REVIEW ELIGIBLE&quot;))">
            <text:p>NOT REVIEW ELIGIBLE</text:p>
          </table:table-cell>
          <table:table-cell office:value-type="string" table:formula="of:=IF([.W118]=&quot;NOT REVIEW ELIGIBLE&quot;;&quot;DO NOT BEGIN SETTLEMENT REVIEW — RESOLVE READINESS OR CONTRADICTION CONDITIONS&quot;;IF([.W11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8]=&quot;&quot;;&quot;UNKNOWN&quot;;IF([.W118]&lt;&gt;&quot;REVIEW ELIGIBLE — NO AUTHORITY&quot;;&quot;BLOCKED — OUTCOME ASSERTED WITHOUT REVIEW ELIGIBILITY&quot;;IF(OR([.Y118]=&quot;REVIEWED — NO AUTHORITY&quot;;[.Y118]=&quot;REVIEW DEFERRED&quot;;[.Y11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19]=&quot;&quot;;IF(AND([.L119]=&quot;&quot;;[.N119]=&quot;&quot;);&quot;UNKNOWN&quot;;&quot;CONTRADICTION&quot;);IF([.M119]=&quot;UNMATCHED&quot;;IF(AND([.L119]=&quot;&quot;;[.N119]=&quot;&quot;);&quot;CLEAR&quot;;&quot;CONTRADICTION&quot;);IF([.M119]=&quot;SINGLE_SALE_LINKED&quot;;IF(AND([.L119]&lt;&gt;&quot;&quot;;[.N119]=&quot;&quot;);&quot;CLEAR&quot;;&quot;CONTRADICTION&quot;);IF([.M119]=&quot;MULTI_SALE_PENDING_ALLOCATION&quot;;IF([.L119]=&quot;&quot;;&quot;CLEAR&quot;;&quot;CONTRADICTION&quot;);IF([.M119]=&quot;ALLOCATED&quot;;IF(AND([.L119]=&quot;&quot;;[.N119]&lt;&gt;&quot;&quot;);&quot;CLEAR&quot;;&quot;CONTRADICTION&quot;);&quot;CONTRADICTION&quot;)))))">
            <text:p>UNKNOWN</text:p>
          </table:table-cell>
          <table:table-cell office:value-type="string" table:formula="of:=IF([.S119]=&quot;UNKNOWN&quot;;&quot;NO ACTION — linkage status is UNKNOWN / not asserted&quot;;IF([.S119]=&quot;CLEAR&quot;;&quot;NO CONTRADICTION — preserve evidence as entered&quot;;IF([.M119]=&quot;&quot;;&quot;REVIEW LINKAGE STATUS — identifiers are present while status is UNKNOWN&quot;;IF([.M119]=&quot;UNMATCHED&quot;;&quot;REMOVE LINKAGE IDENTIFIERS OR CORRECT LINKAGE STATUS&quot;;IF([.M119]=&quot;SINGLE_SALE_LINKED&quot;;&quot;REQUIRE LINKED SALE ID AND NO ALLOCATION GROUP ID&quot;;IF([.M119]=&quot;MULTI_SALE_PENDING_ALLOCATION&quot;;&quot;REMOVE LINKED SALE ID OR CORRECT LINKAGE STATUS&quot;;IF([.M119]=&quot;ALLOCATED&quot;;&quot;REQUIRE ALLOCATION GROUP ID AND NO LINKED SALE ID&quot;;&quot;REVIEW LINKAGE EVIDENCE — NO AUTHORITY CREATED&quot;)))))))">
            <text:p>NO ACTION — linkage status is UNKNOWN / not asserted</text:p>
          </table:table-cell>
          <table:table-cell office:value-type="string" table:formula="of:=IF([.S119]=&quot;CONTRADICTION&quot;;&quot;BLOCKED&quot;;IF([.S119]=&quot;UNKNOWN&quot;;&quot;UNKNOWN&quot;;IF([.S119]=&quot;CLEAR&quot;;IF(OR([.O119]=&quot;&quot;;[.P119]=&quot;&quot;);&quot;UNKNOWN&quot;;&quot;READY FOR REVIEW&quot;);&quot;BLOCKED&quot;)))">
            <text:p>UNKNOWN</text:p>
          </table:table-cell>
          <table:table-cell office:value-type="string" table:formula="of:=IF([.U119]=&quot;UNKNOWN&quot;;&quot;COMPLETE OR ASSERT REQUIRED EVIDENCE BEFORE REVIEW&quot;;IF([.U119]=&quot;BLOCKED&quot;;&quot;RESOLVE CONTRADICTION BEFORE REVIEW — NO AUTHORITY CREATED&quot;;IF([.U11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19]=&quot;READY FOR REVIEW&quot;;&quot;REVIEW ELIGIBLE — NO AUTHORITY&quot;;IF(OR([.U119]=&quot;UNKNOWN&quot;;[.U119]=&quot;BLOCKED&quot;);&quot;NOT REVIEW ELIGIBLE&quot;;&quot;NOT REVIEW ELIGIBLE&quot;))">
            <text:p>NOT REVIEW ELIGIBLE</text:p>
          </table:table-cell>
          <table:table-cell office:value-type="string" table:formula="of:=IF([.W119]=&quot;NOT REVIEW ELIGIBLE&quot;;&quot;DO NOT BEGIN SETTLEMENT REVIEW — RESOLVE READINESS OR CONTRADICTION CONDITIONS&quot;;IF([.W11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19]=&quot;&quot;;&quot;UNKNOWN&quot;;IF([.W119]&lt;&gt;&quot;REVIEW ELIGIBLE — NO AUTHORITY&quot;;&quot;BLOCKED — OUTCOME ASSERTED WITHOUT REVIEW ELIGIBILITY&quot;;IF(OR([.Y119]=&quot;REVIEWED — NO AUTHORITY&quot;;[.Y119]=&quot;REVIEW DEFERRED&quot;;[.Y11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0]=&quot;&quot;;IF(AND([.L120]=&quot;&quot;;[.N120]=&quot;&quot;);&quot;UNKNOWN&quot;;&quot;CONTRADICTION&quot;);IF([.M120]=&quot;UNMATCHED&quot;;IF(AND([.L120]=&quot;&quot;;[.N120]=&quot;&quot;);&quot;CLEAR&quot;;&quot;CONTRADICTION&quot;);IF([.M120]=&quot;SINGLE_SALE_LINKED&quot;;IF(AND([.L120]&lt;&gt;&quot;&quot;;[.N120]=&quot;&quot;);&quot;CLEAR&quot;;&quot;CONTRADICTION&quot;);IF([.M120]=&quot;MULTI_SALE_PENDING_ALLOCATION&quot;;IF([.L120]=&quot;&quot;;&quot;CLEAR&quot;;&quot;CONTRADICTION&quot;);IF([.M120]=&quot;ALLOCATED&quot;;IF(AND([.L120]=&quot;&quot;;[.N120]&lt;&gt;&quot;&quot;);&quot;CLEAR&quot;;&quot;CONTRADICTION&quot;);&quot;CONTRADICTION&quot;)))))">
            <text:p>UNKNOWN</text:p>
          </table:table-cell>
          <table:table-cell office:value-type="string" table:formula="of:=IF([.S120]=&quot;UNKNOWN&quot;;&quot;NO ACTION — linkage status is UNKNOWN / not asserted&quot;;IF([.S120]=&quot;CLEAR&quot;;&quot;NO CONTRADICTION — preserve evidence as entered&quot;;IF([.M120]=&quot;&quot;;&quot;REVIEW LINKAGE STATUS — identifiers are present while status is UNKNOWN&quot;;IF([.M120]=&quot;UNMATCHED&quot;;&quot;REMOVE LINKAGE IDENTIFIERS OR CORRECT LINKAGE STATUS&quot;;IF([.M120]=&quot;SINGLE_SALE_LINKED&quot;;&quot;REQUIRE LINKED SALE ID AND NO ALLOCATION GROUP ID&quot;;IF([.M120]=&quot;MULTI_SALE_PENDING_ALLOCATION&quot;;&quot;REMOVE LINKED SALE ID OR CORRECT LINKAGE STATUS&quot;;IF([.M120]=&quot;ALLOCATED&quot;;&quot;REQUIRE ALLOCATION GROUP ID AND NO LINKED SALE ID&quot;;&quot;REVIEW LINKAGE EVIDENCE — NO AUTHORITY CREATED&quot;)))))))">
            <text:p>NO ACTION — linkage status is UNKNOWN / not asserted</text:p>
          </table:table-cell>
          <table:table-cell office:value-type="string" table:formula="of:=IF([.S120]=&quot;CONTRADICTION&quot;;&quot;BLOCKED&quot;;IF([.S120]=&quot;UNKNOWN&quot;;&quot;UNKNOWN&quot;;IF([.S120]=&quot;CLEAR&quot;;IF(OR([.O120]=&quot;&quot;;[.P120]=&quot;&quot;);&quot;UNKNOWN&quot;;&quot;READY FOR REVIEW&quot;);&quot;BLOCKED&quot;)))">
            <text:p>UNKNOWN</text:p>
          </table:table-cell>
          <table:table-cell office:value-type="string" table:formula="of:=IF([.U120]=&quot;UNKNOWN&quot;;&quot;COMPLETE OR ASSERT REQUIRED EVIDENCE BEFORE REVIEW&quot;;IF([.U120]=&quot;BLOCKED&quot;;&quot;RESOLVE CONTRADICTION BEFORE REVIEW — NO AUTHORITY CREATED&quot;;IF([.U12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0]=&quot;READY FOR REVIEW&quot;;&quot;REVIEW ELIGIBLE — NO AUTHORITY&quot;;IF(OR([.U120]=&quot;UNKNOWN&quot;;[.U120]=&quot;BLOCKED&quot;);&quot;NOT REVIEW ELIGIBLE&quot;;&quot;NOT REVIEW ELIGIBLE&quot;))">
            <text:p>NOT REVIEW ELIGIBLE</text:p>
          </table:table-cell>
          <table:table-cell office:value-type="string" table:formula="of:=IF([.W120]=&quot;NOT REVIEW ELIGIBLE&quot;;&quot;DO NOT BEGIN SETTLEMENT REVIEW — RESOLVE READINESS OR CONTRADICTION CONDITIONS&quot;;IF([.W12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0]=&quot;&quot;;&quot;UNKNOWN&quot;;IF([.W120]&lt;&gt;&quot;REVIEW ELIGIBLE — NO AUTHORITY&quot;;&quot;BLOCKED — OUTCOME ASSERTED WITHOUT REVIEW ELIGIBILITY&quot;;IF(OR([.Y120]=&quot;REVIEWED — NO AUTHORITY&quot;;[.Y120]=&quot;REVIEW DEFERRED&quot;;[.Y12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1]=&quot;&quot;;IF(AND([.L121]=&quot;&quot;;[.N121]=&quot;&quot;);&quot;UNKNOWN&quot;;&quot;CONTRADICTION&quot;);IF([.M121]=&quot;UNMATCHED&quot;;IF(AND([.L121]=&quot;&quot;;[.N121]=&quot;&quot;);&quot;CLEAR&quot;;&quot;CONTRADICTION&quot;);IF([.M121]=&quot;SINGLE_SALE_LINKED&quot;;IF(AND([.L121]&lt;&gt;&quot;&quot;;[.N121]=&quot;&quot;);&quot;CLEAR&quot;;&quot;CONTRADICTION&quot;);IF([.M121]=&quot;MULTI_SALE_PENDING_ALLOCATION&quot;;IF([.L121]=&quot;&quot;;&quot;CLEAR&quot;;&quot;CONTRADICTION&quot;);IF([.M121]=&quot;ALLOCATED&quot;;IF(AND([.L121]=&quot;&quot;;[.N121]&lt;&gt;&quot;&quot;);&quot;CLEAR&quot;;&quot;CONTRADICTION&quot;);&quot;CONTRADICTION&quot;)))))">
            <text:p>UNKNOWN</text:p>
          </table:table-cell>
          <table:table-cell office:value-type="string" table:formula="of:=IF([.S121]=&quot;UNKNOWN&quot;;&quot;NO ACTION — linkage status is UNKNOWN / not asserted&quot;;IF([.S121]=&quot;CLEAR&quot;;&quot;NO CONTRADICTION — preserve evidence as entered&quot;;IF([.M121]=&quot;&quot;;&quot;REVIEW LINKAGE STATUS — identifiers are present while status is UNKNOWN&quot;;IF([.M121]=&quot;UNMATCHED&quot;;&quot;REMOVE LINKAGE IDENTIFIERS OR CORRECT LINKAGE STATUS&quot;;IF([.M121]=&quot;SINGLE_SALE_LINKED&quot;;&quot;REQUIRE LINKED SALE ID AND NO ALLOCATION GROUP ID&quot;;IF([.M121]=&quot;MULTI_SALE_PENDING_ALLOCATION&quot;;&quot;REMOVE LINKED SALE ID OR CORRECT LINKAGE STATUS&quot;;IF([.M121]=&quot;ALLOCATED&quot;;&quot;REQUIRE ALLOCATION GROUP ID AND NO LINKED SALE ID&quot;;&quot;REVIEW LINKAGE EVIDENCE — NO AUTHORITY CREATED&quot;)))))))">
            <text:p>NO ACTION — linkage status is UNKNOWN / not asserted</text:p>
          </table:table-cell>
          <table:table-cell office:value-type="string" table:formula="of:=IF([.S121]=&quot;CONTRADICTION&quot;;&quot;BLOCKED&quot;;IF([.S121]=&quot;UNKNOWN&quot;;&quot;UNKNOWN&quot;;IF([.S121]=&quot;CLEAR&quot;;IF(OR([.O121]=&quot;&quot;;[.P121]=&quot;&quot;);&quot;UNKNOWN&quot;;&quot;READY FOR REVIEW&quot;);&quot;BLOCKED&quot;)))">
            <text:p>UNKNOWN</text:p>
          </table:table-cell>
          <table:table-cell office:value-type="string" table:formula="of:=IF([.U121]=&quot;UNKNOWN&quot;;&quot;COMPLETE OR ASSERT REQUIRED EVIDENCE BEFORE REVIEW&quot;;IF([.U121]=&quot;BLOCKED&quot;;&quot;RESOLVE CONTRADICTION BEFORE REVIEW — NO AUTHORITY CREATED&quot;;IF([.U12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1]=&quot;READY FOR REVIEW&quot;;&quot;REVIEW ELIGIBLE — NO AUTHORITY&quot;;IF(OR([.U121]=&quot;UNKNOWN&quot;;[.U121]=&quot;BLOCKED&quot;);&quot;NOT REVIEW ELIGIBLE&quot;;&quot;NOT REVIEW ELIGIBLE&quot;))">
            <text:p>NOT REVIEW ELIGIBLE</text:p>
          </table:table-cell>
          <table:table-cell office:value-type="string" table:formula="of:=IF([.W121]=&quot;NOT REVIEW ELIGIBLE&quot;;&quot;DO NOT BEGIN SETTLEMENT REVIEW — RESOLVE READINESS OR CONTRADICTION CONDITIONS&quot;;IF([.W12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1]=&quot;&quot;;&quot;UNKNOWN&quot;;IF([.W121]&lt;&gt;&quot;REVIEW ELIGIBLE — NO AUTHORITY&quot;;&quot;BLOCKED — OUTCOME ASSERTED WITHOUT REVIEW ELIGIBILITY&quot;;IF(OR([.Y121]=&quot;REVIEWED — NO AUTHORITY&quot;;[.Y121]=&quot;REVIEW DEFERRED&quot;;[.Y121]=&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2]=&quot;&quot;;IF(AND([.L122]=&quot;&quot;;[.N122]=&quot;&quot;);&quot;UNKNOWN&quot;;&quot;CONTRADICTION&quot;);IF([.M122]=&quot;UNMATCHED&quot;;IF(AND([.L122]=&quot;&quot;;[.N122]=&quot;&quot;);&quot;CLEAR&quot;;&quot;CONTRADICTION&quot;);IF([.M122]=&quot;SINGLE_SALE_LINKED&quot;;IF(AND([.L122]&lt;&gt;&quot;&quot;;[.N122]=&quot;&quot;);&quot;CLEAR&quot;;&quot;CONTRADICTION&quot;);IF([.M122]=&quot;MULTI_SALE_PENDING_ALLOCATION&quot;;IF([.L122]=&quot;&quot;;&quot;CLEAR&quot;;&quot;CONTRADICTION&quot;);IF([.M122]=&quot;ALLOCATED&quot;;IF(AND([.L122]=&quot;&quot;;[.N122]&lt;&gt;&quot;&quot;);&quot;CLEAR&quot;;&quot;CONTRADICTION&quot;);&quot;CONTRADICTION&quot;)))))">
            <text:p>UNKNOWN</text:p>
          </table:table-cell>
          <table:table-cell office:value-type="string" table:formula="of:=IF([.S122]=&quot;UNKNOWN&quot;;&quot;NO ACTION — linkage status is UNKNOWN / not asserted&quot;;IF([.S122]=&quot;CLEAR&quot;;&quot;NO CONTRADICTION — preserve evidence as entered&quot;;IF([.M122]=&quot;&quot;;&quot;REVIEW LINKAGE STATUS — identifiers are present while status is UNKNOWN&quot;;IF([.M122]=&quot;UNMATCHED&quot;;&quot;REMOVE LINKAGE IDENTIFIERS OR CORRECT LINKAGE STATUS&quot;;IF([.M122]=&quot;SINGLE_SALE_LINKED&quot;;&quot;REQUIRE LINKED SALE ID AND NO ALLOCATION GROUP ID&quot;;IF([.M122]=&quot;MULTI_SALE_PENDING_ALLOCATION&quot;;&quot;REMOVE LINKED SALE ID OR CORRECT LINKAGE STATUS&quot;;IF([.M122]=&quot;ALLOCATED&quot;;&quot;REQUIRE ALLOCATION GROUP ID AND NO LINKED SALE ID&quot;;&quot;REVIEW LINKAGE EVIDENCE — NO AUTHORITY CREATED&quot;)))))))">
            <text:p>NO ACTION — linkage status is UNKNOWN / not asserted</text:p>
          </table:table-cell>
          <table:table-cell office:value-type="string" table:formula="of:=IF([.S122]=&quot;CONTRADICTION&quot;;&quot;BLOCKED&quot;;IF([.S122]=&quot;UNKNOWN&quot;;&quot;UNKNOWN&quot;;IF([.S122]=&quot;CLEAR&quot;;IF(OR([.O122]=&quot;&quot;;[.P122]=&quot;&quot;);&quot;UNKNOWN&quot;;&quot;READY FOR REVIEW&quot;);&quot;BLOCKED&quot;)))">
            <text:p>UNKNOWN</text:p>
          </table:table-cell>
          <table:table-cell office:value-type="string" table:formula="of:=IF([.U122]=&quot;UNKNOWN&quot;;&quot;COMPLETE OR ASSERT REQUIRED EVIDENCE BEFORE REVIEW&quot;;IF([.U122]=&quot;BLOCKED&quot;;&quot;RESOLVE CONTRADICTION BEFORE REVIEW — NO AUTHORITY CREATED&quot;;IF([.U12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2]=&quot;READY FOR REVIEW&quot;;&quot;REVIEW ELIGIBLE — NO AUTHORITY&quot;;IF(OR([.U122]=&quot;UNKNOWN&quot;;[.U122]=&quot;BLOCKED&quot;);&quot;NOT REVIEW ELIGIBLE&quot;;&quot;NOT REVIEW ELIGIBLE&quot;))">
            <text:p>NOT REVIEW ELIGIBLE</text:p>
          </table:table-cell>
          <table:table-cell office:value-type="string" table:formula="of:=IF([.W122]=&quot;NOT REVIEW ELIGIBLE&quot;;&quot;DO NOT BEGIN SETTLEMENT REVIEW — RESOLVE READINESS OR CONTRADICTION CONDITIONS&quot;;IF([.W12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2]=&quot;&quot;;&quot;UNKNOWN&quot;;IF([.W122]&lt;&gt;&quot;REVIEW ELIGIBLE — NO AUTHORITY&quot;;&quot;BLOCKED — OUTCOME ASSERTED WITHOUT REVIEW ELIGIBILITY&quot;;IF(OR([.Y122]=&quot;REVIEWED — NO AUTHORITY&quot;;[.Y122]=&quot;REVIEW DEFERRED&quot;;[.Y12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3]=&quot;&quot;;IF(AND([.L123]=&quot;&quot;;[.N123]=&quot;&quot;);&quot;UNKNOWN&quot;;&quot;CONTRADICTION&quot;);IF([.M123]=&quot;UNMATCHED&quot;;IF(AND([.L123]=&quot;&quot;;[.N123]=&quot;&quot;);&quot;CLEAR&quot;;&quot;CONTRADICTION&quot;);IF([.M123]=&quot;SINGLE_SALE_LINKED&quot;;IF(AND([.L123]&lt;&gt;&quot;&quot;;[.N123]=&quot;&quot;);&quot;CLEAR&quot;;&quot;CONTRADICTION&quot;);IF([.M123]=&quot;MULTI_SALE_PENDING_ALLOCATION&quot;;IF([.L123]=&quot;&quot;;&quot;CLEAR&quot;;&quot;CONTRADICTION&quot;);IF([.M123]=&quot;ALLOCATED&quot;;IF(AND([.L123]=&quot;&quot;;[.N123]&lt;&gt;&quot;&quot;);&quot;CLEAR&quot;;&quot;CONTRADICTION&quot;);&quot;CONTRADICTION&quot;)))))">
            <text:p>UNKNOWN</text:p>
          </table:table-cell>
          <table:table-cell office:value-type="string" table:formula="of:=IF([.S123]=&quot;UNKNOWN&quot;;&quot;NO ACTION — linkage status is UNKNOWN / not asserted&quot;;IF([.S123]=&quot;CLEAR&quot;;&quot;NO CONTRADICTION — preserve evidence as entered&quot;;IF([.M123]=&quot;&quot;;&quot;REVIEW LINKAGE STATUS — identifiers are present while status is UNKNOWN&quot;;IF([.M123]=&quot;UNMATCHED&quot;;&quot;REMOVE LINKAGE IDENTIFIERS OR CORRECT LINKAGE STATUS&quot;;IF([.M123]=&quot;SINGLE_SALE_LINKED&quot;;&quot;REQUIRE LINKED SALE ID AND NO ALLOCATION GROUP ID&quot;;IF([.M123]=&quot;MULTI_SALE_PENDING_ALLOCATION&quot;;&quot;REMOVE LINKED SALE ID OR CORRECT LINKAGE STATUS&quot;;IF([.M123]=&quot;ALLOCATED&quot;;&quot;REQUIRE ALLOCATION GROUP ID AND NO LINKED SALE ID&quot;;&quot;REVIEW LINKAGE EVIDENCE — NO AUTHORITY CREATED&quot;)))))))">
            <text:p>NO ACTION — linkage status is UNKNOWN / not asserted</text:p>
          </table:table-cell>
          <table:table-cell office:value-type="string" table:formula="of:=IF([.S123]=&quot;CONTRADICTION&quot;;&quot;BLOCKED&quot;;IF([.S123]=&quot;UNKNOWN&quot;;&quot;UNKNOWN&quot;;IF([.S123]=&quot;CLEAR&quot;;IF(OR([.O123]=&quot;&quot;;[.P123]=&quot;&quot;);&quot;UNKNOWN&quot;;&quot;READY FOR REVIEW&quot;);&quot;BLOCKED&quot;)))">
            <text:p>UNKNOWN</text:p>
          </table:table-cell>
          <table:table-cell office:value-type="string" table:formula="of:=IF([.U123]=&quot;UNKNOWN&quot;;&quot;COMPLETE OR ASSERT REQUIRED EVIDENCE BEFORE REVIEW&quot;;IF([.U123]=&quot;BLOCKED&quot;;&quot;RESOLVE CONTRADICTION BEFORE REVIEW — NO AUTHORITY CREATED&quot;;IF([.U12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3]=&quot;READY FOR REVIEW&quot;;&quot;REVIEW ELIGIBLE — NO AUTHORITY&quot;;IF(OR([.U123]=&quot;UNKNOWN&quot;;[.U123]=&quot;BLOCKED&quot;);&quot;NOT REVIEW ELIGIBLE&quot;;&quot;NOT REVIEW ELIGIBLE&quot;))">
            <text:p>NOT REVIEW ELIGIBLE</text:p>
          </table:table-cell>
          <table:table-cell office:value-type="string" table:formula="of:=IF([.W123]=&quot;NOT REVIEW ELIGIBLE&quot;;&quot;DO NOT BEGIN SETTLEMENT REVIEW — RESOLVE READINESS OR CONTRADICTION CONDITIONS&quot;;IF([.W12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3]=&quot;&quot;;&quot;UNKNOWN&quot;;IF([.W123]&lt;&gt;&quot;REVIEW ELIGIBLE — NO AUTHORITY&quot;;&quot;BLOCKED — OUTCOME ASSERTED WITHOUT REVIEW ELIGIBILITY&quot;;IF(OR([.Y123]=&quot;REVIEWED — NO AUTHORITY&quot;;[.Y123]=&quot;REVIEW DEFERRED&quot;;[.Y12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4]=&quot;&quot;;IF(AND([.L124]=&quot;&quot;;[.N124]=&quot;&quot;);&quot;UNKNOWN&quot;;&quot;CONTRADICTION&quot;);IF([.M124]=&quot;UNMATCHED&quot;;IF(AND([.L124]=&quot;&quot;;[.N124]=&quot;&quot;);&quot;CLEAR&quot;;&quot;CONTRADICTION&quot;);IF([.M124]=&quot;SINGLE_SALE_LINKED&quot;;IF(AND([.L124]&lt;&gt;&quot;&quot;;[.N124]=&quot;&quot;);&quot;CLEAR&quot;;&quot;CONTRADICTION&quot;);IF([.M124]=&quot;MULTI_SALE_PENDING_ALLOCATION&quot;;IF([.L124]=&quot;&quot;;&quot;CLEAR&quot;;&quot;CONTRADICTION&quot;);IF([.M124]=&quot;ALLOCATED&quot;;IF(AND([.L124]=&quot;&quot;;[.N124]&lt;&gt;&quot;&quot;);&quot;CLEAR&quot;;&quot;CONTRADICTION&quot;);&quot;CONTRADICTION&quot;)))))">
            <text:p>UNKNOWN</text:p>
          </table:table-cell>
          <table:table-cell office:value-type="string" table:formula="of:=IF([.S124]=&quot;UNKNOWN&quot;;&quot;NO ACTION — linkage status is UNKNOWN / not asserted&quot;;IF([.S124]=&quot;CLEAR&quot;;&quot;NO CONTRADICTION — preserve evidence as entered&quot;;IF([.M124]=&quot;&quot;;&quot;REVIEW LINKAGE STATUS — identifiers are present while status is UNKNOWN&quot;;IF([.M124]=&quot;UNMATCHED&quot;;&quot;REMOVE LINKAGE IDENTIFIERS OR CORRECT LINKAGE STATUS&quot;;IF([.M124]=&quot;SINGLE_SALE_LINKED&quot;;&quot;REQUIRE LINKED SALE ID AND NO ALLOCATION GROUP ID&quot;;IF([.M124]=&quot;MULTI_SALE_PENDING_ALLOCATION&quot;;&quot;REMOVE LINKED SALE ID OR CORRECT LINKAGE STATUS&quot;;IF([.M124]=&quot;ALLOCATED&quot;;&quot;REQUIRE ALLOCATION GROUP ID AND NO LINKED SALE ID&quot;;&quot;REVIEW LINKAGE EVIDENCE — NO AUTHORITY CREATED&quot;)))))))">
            <text:p>NO ACTION — linkage status is UNKNOWN / not asserted</text:p>
          </table:table-cell>
          <table:table-cell office:value-type="string" table:formula="of:=IF([.S124]=&quot;CONTRADICTION&quot;;&quot;BLOCKED&quot;;IF([.S124]=&quot;UNKNOWN&quot;;&quot;UNKNOWN&quot;;IF([.S124]=&quot;CLEAR&quot;;IF(OR([.O124]=&quot;&quot;;[.P124]=&quot;&quot;);&quot;UNKNOWN&quot;;&quot;READY FOR REVIEW&quot;);&quot;BLOCKED&quot;)))">
            <text:p>UNKNOWN</text:p>
          </table:table-cell>
          <table:table-cell office:value-type="string" table:formula="of:=IF([.U124]=&quot;UNKNOWN&quot;;&quot;COMPLETE OR ASSERT REQUIRED EVIDENCE BEFORE REVIEW&quot;;IF([.U124]=&quot;BLOCKED&quot;;&quot;RESOLVE CONTRADICTION BEFORE REVIEW — NO AUTHORITY CREATED&quot;;IF([.U12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4]=&quot;READY FOR REVIEW&quot;;&quot;REVIEW ELIGIBLE — NO AUTHORITY&quot;;IF(OR([.U124]=&quot;UNKNOWN&quot;;[.U124]=&quot;BLOCKED&quot;);&quot;NOT REVIEW ELIGIBLE&quot;;&quot;NOT REVIEW ELIGIBLE&quot;))">
            <text:p>NOT REVIEW ELIGIBLE</text:p>
          </table:table-cell>
          <table:table-cell office:value-type="string" table:formula="of:=IF([.W124]=&quot;NOT REVIEW ELIGIBLE&quot;;&quot;DO NOT BEGIN SETTLEMENT REVIEW — RESOLVE READINESS OR CONTRADICTION CONDITIONS&quot;;IF([.W12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4]=&quot;&quot;;&quot;UNKNOWN&quot;;IF([.W124]&lt;&gt;&quot;REVIEW ELIGIBLE — NO AUTHORITY&quot;;&quot;BLOCKED — OUTCOME ASSERTED WITHOUT REVIEW ELIGIBILITY&quot;;IF(OR([.Y124]=&quot;REVIEWED — NO AUTHORITY&quot;;[.Y124]=&quot;REVIEW DEFERRED&quot;;[.Y12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5]=&quot;&quot;;IF(AND([.L125]=&quot;&quot;;[.N125]=&quot;&quot;);&quot;UNKNOWN&quot;;&quot;CONTRADICTION&quot;);IF([.M125]=&quot;UNMATCHED&quot;;IF(AND([.L125]=&quot;&quot;;[.N125]=&quot;&quot;);&quot;CLEAR&quot;;&quot;CONTRADICTION&quot;);IF([.M125]=&quot;SINGLE_SALE_LINKED&quot;;IF(AND([.L125]&lt;&gt;&quot;&quot;;[.N125]=&quot;&quot;);&quot;CLEAR&quot;;&quot;CONTRADICTION&quot;);IF([.M125]=&quot;MULTI_SALE_PENDING_ALLOCATION&quot;;IF([.L125]=&quot;&quot;;&quot;CLEAR&quot;;&quot;CONTRADICTION&quot;);IF([.M125]=&quot;ALLOCATED&quot;;IF(AND([.L125]=&quot;&quot;;[.N125]&lt;&gt;&quot;&quot;);&quot;CLEAR&quot;;&quot;CONTRADICTION&quot;);&quot;CONTRADICTION&quot;)))))">
            <text:p>UNKNOWN</text:p>
          </table:table-cell>
          <table:table-cell office:value-type="string" table:formula="of:=IF([.S125]=&quot;UNKNOWN&quot;;&quot;NO ACTION — linkage status is UNKNOWN / not asserted&quot;;IF([.S125]=&quot;CLEAR&quot;;&quot;NO CONTRADICTION — preserve evidence as entered&quot;;IF([.M125]=&quot;&quot;;&quot;REVIEW LINKAGE STATUS — identifiers are present while status is UNKNOWN&quot;;IF([.M125]=&quot;UNMATCHED&quot;;&quot;REMOVE LINKAGE IDENTIFIERS OR CORRECT LINKAGE STATUS&quot;;IF([.M125]=&quot;SINGLE_SALE_LINKED&quot;;&quot;REQUIRE LINKED SALE ID AND NO ALLOCATION GROUP ID&quot;;IF([.M125]=&quot;MULTI_SALE_PENDING_ALLOCATION&quot;;&quot;REMOVE LINKED SALE ID OR CORRECT LINKAGE STATUS&quot;;IF([.M125]=&quot;ALLOCATED&quot;;&quot;REQUIRE ALLOCATION GROUP ID AND NO LINKED SALE ID&quot;;&quot;REVIEW LINKAGE EVIDENCE — NO AUTHORITY CREATED&quot;)))))))">
            <text:p>NO ACTION — linkage status is UNKNOWN / not asserted</text:p>
          </table:table-cell>
          <table:table-cell office:value-type="string" table:formula="of:=IF([.S125]=&quot;CONTRADICTION&quot;;&quot;BLOCKED&quot;;IF([.S125]=&quot;UNKNOWN&quot;;&quot;UNKNOWN&quot;;IF([.S125]=&quot;CLEAR&quot;;IF(OR([.O125]=&quot;&quot;;[.P125]=&quot;&quot;);&quot;UNKNOWN&quot;;&quot;READY FOR REVIEW&quot;);&quot;BLOCKED&quot;)))">
            <text:p>UNKNOWN</text:p>
          </table:table-cell>
          <table:table-cell office:value-type="string" table:formula="of:=IF([.U125]=&quot;UNKNOWN&quot;;&quot;COMPLETE OR ASSERT REQUIRED EVIDENCE BEFORE REVIEW&quot;;IF([.U125]=&quot;BLOCKED&quot;;&quot;RESOLVE CONTRADICTION BEFORE REVIEW — NO AUTHORITY CREATED&quot;;IF([.U12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5]=&quot;READY FOR REVIEW&quot;;&quot;REVIEW ELIGIBLE — NO AUTHORITY&quot;;IF(OR([.U125]=&quot;UNKNOWN&quot;;[.U125]=&quot;BLOCKED&quot;);&quot;NOT REVIEW ELIGIBLE&quot;;&quot;NOT REVIEW ELIGIBLE&quot;))">
            <text:p>NOT REVIEW ELIGIBLE</text:p>
          </table:table-cell>
          <table:table-cell office:value-type="string" table:formula="of:=IF([.W125]=&quot;NOT REVIEW ELIGIBLE&quot;;&quot;DO NOT BEGIN SETTLEMENT REVIEW — RESOLVE READINESS OR CONTRADICTION CONDITIONS&quot;;IF([.W12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5]=&quot;&quot;;&quot;UNKNOWN&quot;;IF([.W125]&lt;&gt;&quot;REVIEW ELIGIBLE — NO AUTHORITY&quot;;&quot;BLOCKED — OUTCOME ASSERTED WITHOUT REVIEW ELIGIBILITY&quot;;IF(OR([.Y125]=&quot;REVIEWED — NO AUTHORITY&quot;;[.Y125]=&quot;REVIEW DEFERRED&quot;;[.Y12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6]=&quot;&quot;;IF(AND([.L126]=&quot;&quot;;[.N126]=&quot;&quot;);&quot;UNKNOWN&quot;;&quot;CONTRADICTION&quot;);IF([.M126]=&quot;UNMATCHED&quot;;IF(AND([.L126]=&quot;&quot;;[.N126]=&quot;&quot;);&quot;CLEAR&quot;;&quot;CONTRADICTION&quot;);IF([.M126]=&quot;SINGLE_SALE_LINKED&quot;;IF(AND([.L126]&lt;&gt;&quot;&quot;;[.N126]=&quot;&quot;);&quot;CLEAR&quot;;&quot;CONTRADICTION&quot;);IF([.M126]=&quot;MULTI_SALE_PENDING_ALLOCATION&quot;;IF([.L126]=&quot;&quot;;&quot;CLEAR&quot;;&quot;CONTRADICTION&quot;);IF([.M126]=&quot;ALLOCATED&quot;;IF(AND([.L126]=&quot;&quot;;[.N126]&lt;&gt;&quot;&quot;);&quot;CLEAR&quot;;&quot;CONTRADICTION&quot;);&quot;CONTRADICTION&quot;)))))">
            <text:p>UNKNOWN</text:p>
          </table:table-cell>
          <table:table-cell office:value-type="string" table:formula="of:=IF([.S126]=&quot;UNKNOWN&quot;;&quot;NO ACTION — linkage status is UNKNOWN / not asserted&quot;;IF([.S126]=&quot;CLEAR&quot;;&quot;NO CONTRADICTION — preserve evidence as entered&quot;;IF([.M126]=&quot;&quot;;&quot;REVIEW LINKAGE STATUS — identifiers are present while status is UNKNOWN&quot;;IF([.M126]=&quot;UNMATCHED&quot;;&quot;REMOVE LINKAGE IDENTIFIERS OR CORRECT LINKAGE STATUS&quot;;IF([.M126]=&quot;SINGLE_SALE_LINKED&quot;;&quot;REQUIRE LINKED SALE ID AND NO ALLOCATION GROUP ID&quot;;IF([.M126]=&quot;MULTI_SALE_PENDING_ALLOCATION&quot;;&quot;REMOVE LINKED SALE ID OR CORRECT LINKAGE STATUS&quot;;IF([.M126]=&quot;ALLOCATED&quot;;&quot;REQUIRE ALLOCATION GROUP ID AND NO LINKED SALE ID&quot;;&quot;REVIEW LINKAGE EVIDENCE — NO AUTHORITY CREATED&quot;)))))))">
            <text:p>NO ACTION — linkage status is UNKNOWN / not asserted</text:p>
          </table:table-cell>
          <table:table-cell office:value-type="string" table:formula="of:=IF([.S126]=&quot;CONTRADICTION&quot;;&quot;BLOCKED&quot;;IF([.S126]=&quot;UNKNOWN&quot;;&quot;UNKNOWN&quot;;IF([.S126]=&quot;CLEAR&quot;;IF(OR([.O126]=&quot;&quot;;[.P126]=&quot;&quot;);&quot;UNKNOWN&quot;;&quot;READY FOR REVIEW&quot;);&quot;BLOCKED&quot;)))">
            <text:p>UNKNOWN</text:p>
          </table:table-cell>
          <table:table-cell office:value-type="string" table:formula="of:=IF([.U126]=&quot;UNKNOWN&quot;;&quot;COMPLETE OR ASSERT REQUIRED EVIDENCE BEFORE REVIEW&quot;;IF([.U126]=&quot;BLOCKED&quot;;&quot;RESOLVE CONTRADICTION BEFORE REVIEW — NO AUTHORITY CREATED&quot;;IF([.U12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6]=&quot;READY FOR REVIEW&quot;;&quot;REVIEW ELIGIBLE — NO AUTHORITY&quot;;IF(OR([.U126]=&quot;UNKNOWN&quot;;[.U126]=&quot;BLOCKED&quot;);&quot;NOT REVIEW ELIGIBLE&quot;;&quot;NOT REVIEW ELIGIBLE&quot;))">
            <text:p>NOT REVIEW ELIGIBLE</text:p>
          </table:table-cell>
          <table:table-cell office:value-type="string" table:formula="of:=IF([.W126]=&quot;NOT REVIEW ELIGIBLE&quot;;&quot;DO NOT BEGIN SETTLEMENT REVIEW — RESOLVE READINESS OR CONTRADICTION CONDITIONS&quot;;IF([.W12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6]=&quot;&quot;;&quot;UNKNOWN&quot;;IF([.W126]&lt;&gt;&quot;REVIEW ELIGIBLE — NO AUTHORITY&quot;;&quot;BLOCKED — OUTCOME ASSERTED WITHOUT REVIEW ELIGIBILITY&quot;;IF(OR([.Y126]=&quot;REVIEWED — NO AUTHORITY&quot;;[.Y126]=&quot;REVIEW DEFERRED&quot;;[.Y12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7]=&quot;&quot;;IF(AND([.L127]=&quot;&quot;;[.N127]=&quot;&quot;);&quot;UNKNOWN&quot;;&quot;CONTRADICTION&quot;);IF([.M127]=&quot;UNMATCHED&quot;;IF(AND([.L127]=&quot;&quot;;[.N127]=&quot;&quot;);&quot;CLEAR&quot;;&quot;CONTRADICTION&quot;);IF([.M127]=&quot;SINGLE_SALE_LINKED&quot;;IF(AND([.L127]&lt;&gt;&quot;&quot;;[.N127]=&quot;&quot;);&quot;CLEAR&quot;;&quot;CONTRADICTION&quot;);IF([.M127]=&quot;MULTI_SALE_PENDING_ALLOCATION&quot;;IF([.L127]=&quot;&quot;;&quot;CLEAR&quot;;&quot;CONTRADICTION&quot;);IF([.M127]=&quot;ALLOCATED&quot;;IF(AND([.L127]=&quot;&quot;;[.N127]&lt;&gt;&quot;&quot;);&quot;CLEAR&quot;;&quot;CONTRADICTION&quot;);&quot;CONTRADICTION&quot;)))))">
            <text:p>UNKNOWN</text:p>
          </table:table-cell>
          <table:table-cell office:value-type="string" table:formula="of:=IF([.S127]=&quot;UNKNOWN&quot;;&quot;NO ACTION — linkage status is UNKNOWN / not asserted&quot;;IF([.S127]=&quot;CLEAR&quot;;&quot;NO CONTRADICTION — preserve evidence as entered&quot;;IF([.M127]=&quot;&quot;;&quot;REVIEW LINKAGE STATUS — identifiers are present while status is UNKNOWN&quot;;IF([.M127]=&quot;UNMATCHED&quot;;&quot;REMOVE LINKAGE IDENTIFIERS OR CORRECT LINKAGE STATUS&quot;;IF([.M127]=&quot;SINGLE_SALE_LINKED&quot;;&quot;REQUIRE LINKED SALE ID AND NO ALLOCATION GROUP ID&quot;;IF([.M127]=&quot;MULTI_SALE_PENDING_ALLOCATION&quot;;&quot;REMOVE LINKED SALE ID OR CORRECT LINKAGE STATUS&quot;;IF([.M127]=&quot;ALLOCATED&quot;;&quot;REQUIRE ALLOCATION GROUP ID AND NO LINKED SALE ID&quot;;&quot;REVIEW LINKAGE EVIDENCE — NO AUTHORITY CREATED&quot;)))))))">
            <text:p>NO ACTION — linkage status is UNKNOWN / not asserted</text:p>
          </table:table-cell>
          <table:table-cell office:value-type="string" table:formula="of:=IF([.S127]=&quot;CONTRADICTION&quot;;&quot;BLOCKED&quot;;IF([.S127]=&quot;UNKNOWN&quot;;&quot;UNKNOWN&quot;;IF([.S127]=&quot;CLEAR&quot;;IF(OR([.O127]=&quot;&quot;;[.P127]=&quot;&quot;);&quot;UNKNOWN&quot;;&quot;READY FOR REVIEW&quot;);&quot;BLOCKED&quot;)))">
            <text:p>UNKNOWN</text:p>
          </table:table-cell>
          <table:table-cell office:value-type="string" table:formula="of:=IF([.U127]=&quot;UNKNOWN&quot;;&quot;COMPLETE OR ASSERT REQUIRED EVIDENCE BEFORE REVIEW&quot;;IF([.U127]=&quot;BLOCKED&quot;;&quot;RESOLVE CONTRADICTION BEFORE REVIEW — NO AUTHORITY CREATED&quot;;IF([.U12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7]=&quot;READY FOR REVIEW&quot;;&quot;REVIEW ELIGIBLE — NO AUTHORITY&quot;;IF(OR([.U127]=&quot;UNKNOWN&quot;;[.U127]=&quot;BLOCKED&quot;);&quot;NOT REVIEW ELIGIBLE&quot;;&quot;NOT REVIEW ELIGIBLE&quot;))">
            <text:p>NOT REVIEW ELIGIBLE</text:p>
          </table:table-cell>
          <table:table-cell office:value-type="string" table:formula="of:=IF([.W127]=&quot;NOT REVIEW ELIGIBLE&quot;;&quot;DO NOT BEGIN SETTLEMENT REVIEW — RESOLVE READINESS OR CONTRADICTION CONDITIONS&quot;;IF([.W12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7]=&quot;&quot;;&quot;UNKNOWN&quot;;IF([.W127]&lt;&gt;&quot;REVIEW ELIGIBLE — NO AUTHORITY&quot;;&quot;BLOCKED — OUTCOME ASSERTED WITHOUT REVIEW ELIGIBILITY&quot;;IF(OR([.Y127]=&quot;REVIEWED — NO AUTHORITY&quot;;[.Y127]=&quot;REVIEW DEFERRED&quot;;[.Y12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8]=&quot;&quot;;IF(AND([.L128]=&quot;&quot;;[.N128]=&quot;&quot;);&quot;UNKNOWN&quot;;&quot;CONTRADICTION&quot;);IF([.M128]=&quot;UNMATCHED&quot;;IF(AND([.L128]=&quot;&quot;;[.N128]=&quot;&quot;);&quot;CLEAR&quot;;&quot;CONTRADICTION&quot;);IF([.M128]=&quot;SINGLE_SALE_LINKED&quot;;IF(AND([.L128]&lt;&gt;&quot;&quot;;[.N128]=&quot;&quot;);&quot;CLEAR&quot;;&quot;CONTRADICTION&quot;);IF([.M128]=&quot;MULTI_SALE_PENDING_ALLOCATION&quot;;IF([.L128]=&quot;&quot;;&quot;CLEAR&quot;;&quot;CONTRADICTION&quot;);IF([.M128]=&quot;ALLOCATED&quot;;IF(AND([.L128]=&quot;&quot;;[.N128]&lt;&gt;&quot;&quot;);&quot;CLEAR&quot;;&quot;CONTRADICTION&quot;);&quot;CONTRADICTION&quot;)))))">
            <text:p>UNKNOWN</text:p>
          </table:table-cell>
          <table:table-cell office:value-type="string" table:formula="of:=IF([.S128]=&quot;UNKNOWN&quot;;&quot;NO ACTION — linkage status is UNKNOWN / not asserted&quot;;IF([.S128]=&quot;CLEAR&quot;;&quot;NO CONTRADICTION — preserve evidence as entered&quot;;IF([.M128]=&quot;&quot;;&quot;REVIEW LINKAGE STATUS — identifiers are present while status is UNKNOWN&quot;;IF([.M128]=&quot;UNMATCHED&quot;;&quot;REMOVE LINKAGE IDENTIFIERS OR CORRECT LINKAGE STATUS&quot;;IF([.M128]=&quot;SINGLE_SALE_LINKED&quot;;&quot;REQUIRE LINKED SALE ID AND NO ALLOCATION GROUP ID&quot;;IF([.M128]=&quot;MULTI_SALE_PENDING_ALLOCATION&quot;;&quot;REMOVE LINKED SALE ID OR CORRECT LINKAGE STATUS&quot;;IF([.M128]=&quot;ALLOCATED&quot;;&quot;REQUIRE ALLOCATION GROUP ID AND NO LINKED SALE ID&quot;;&quot;REVIEW LINKAGE EVIDENCE — NO AUTHORITY CREATED&quot;)))))))">
            <text:p>NO ACTION — linkage status is UNKNOWN / not asserted</text:p>
          </table:table-cell>
          <table:table-cell office:value-type="string" table:formula="of:=IF([.S128]=&quot;CONTRADICTION&quot;;&quot;BLOCKED&quot;;IF([.S128]=&quot;UNKNOWN&quot;;&quot;UNKNOWN&quot;;IF([.S128]=&quot;CLEAR&quot;;IF(OR([.O128]=&quot;&quot;;[.P128]=&quot;&quot;);&quot;UNKNOWN&quot;;&quot;READY FOR REVIEW&quot;);&quot;BLOCKED&quot;)))">
            <text:p>UNKNOWN</text:p>
          </table:table-cell>
          <table:table-cell office:value-type="string" table:formula="of:=IF([.U128]=&quot;UNKNOWN&quot;;&quot;COMPLETE OR ASSERT REQUIRED EVIDENCE BEFORE REVIEW&quot;;IF([.U128]=&quot;BLOCKED&quot;;&quot;RESOLVE CONTRADICTION BEFORE REVIEW — NO AUTHORITY CREATED&quot;;IF([.U12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8]=&quot;READY FOR REVIEW&quot;;&quot;REVIEW ELIGIBLE — NO AUTHORITY&quot;;IF(OR([.U128]=&quot;UNKNOWN&quot;;[.U128]=&quot;BLOCKED&quot;);&quot;NOT REVIEW ELIGIBLE&quot;;&quot;NOT REVIEW ELIGIBLE&quot;))">
            <text:p>NOT REVIEW ELIGIBLE</text:p>
          </table:table-cell>
          <table:table-cell office:value-type="string" table:formula="of:=IF([.W128]=&quot;NOT REVIEW ELIGIBLE&quot;;&quot;DO NOT BEGIN SETTLEMENT REVIEW — RESOLVE READINESS OR CONTRADICTION CONDITIONS&quot;;IF([.W12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8]=&quot;&quot;;&quot;UNKNOWN&quot;;IF([.W128]&lt;&gt;&quot;REVIEW ELIGIBLE — NO AUTHORITY&quot;;&quot;BLOCKED — OUTCOME ASSERTED WITHOUT REVIEW ELIGIBILITY&quot;;IF(OR([.Y128]=&quot;REVIEWED — NO AUTHORITY&quot;;[.Y128]=&quot;REVIEW DEFERRED&quot;;[.Y12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29]=&quot;&quot;;IF(AND([.L129]=&quot;&quot;;[.N129]=&quot;&quot;);&quot;UNKNOWN&quot;;&quot;CONTRADICTION&quot;);IF([.M129]=&quot;UNMATCHED&quot;;IF(AND([.L129]=&quot;&quot;;[.N129]=&quot;&quot;);&quot;CLEAR&quot;;&quot;CONTRADICTION&quot;);IF([.M129]=&quot;SINGLE_SALE_LINKED&quot;;IF(AND([.L129]&lt;&gt;&quot;&quot;;[.N129]=&quot;&quot;);&quot;CLEAR&quot;;&quot;CONTRADICTION&quot;);IF([.M129]=&quot;MULTI_SALE_PENDING_ALLOCATION&quot;;IF([.L129]=&quot;&quot;;&quot;CLEAR&quot;;&quot;CONTRADICTION&quot;);IF([.M129]=&quot;ALLOCATED&quot;;IF(AND([.L129]=&quot;&quot;;[.N129]&lt;&gt;&quot;&quot;);&quot;CLEAR&quot;;&quot;CONTRADICTION&quot;);&quot;CONTRADICTION&quot;)))))">
            <text:p>UNKNOWN</text:p>
          </table:table-cell>
          <table:table-cell office:value-type="string" table:formula="of:=IF([.S129]=&quot;UNKNOWN&quot;;&quot;NO ACTION — linkage status is UNKNOWN / not asserted&quot;;IF([.S129]=&quot;CLEAR&quot;;&quot;NO CONTRADICTION — preserve evidence as entered&quot;;IF([.M129]=&quot;&quot;;&quot;REVIEW LINKAGE STATUS — identifiers are present while status is UNKNOWN&quot;;IF([.M129]=&quot;UNMATCHED&quot;;&quot;REMOVE LINKAGE IDENTIFIERS OR CORRECT LINKAGE STATUS&quot;;IF([.M129]=&quot;SINGLE_SALE_LINKED&quot;;&quot;REQUIRE LINKED SALE ID AND NO ALLOCATION GROUP ID&quot;;IF([.M129]=&quot;MULTI_SALE_PENDING_ALLOCATION&quot;;&quot;REMOVE LINKED SALE ID OR CORRECT LINKAGE STATUS&quot;;IF([.M129]=&quot;ALLOCATED&quot;;&quot;REQUIRE ALLOCATION GROUP ID AND NO LINKED SALE ID&quot;;&quot;REVIEW LINKAGE EVIDENCE — NO AUTHORITY CREATED&quot;)))))))">
            <text:p>NO ACTION — linkage status is UNKNOWN / not asserted</text:p>
          </table:table-cell>
          <table:table-cell office:value-type="string" table:formula="of:=IF([.S129]=&quot;CONTRADICTION&quot;;&quot;BLOCKED&quot;;IF([.S129]=&quot;UNKNOWN&quot;;&quot;UNKNOWN&quot;;IF([.S129]=&quot;CLEAR&quot;;IF(OR([.O129]=&quot;&quot;;[.P129]=&quot;&quot;);&quot;UNKNOWN&quot;;&quot;READY FOR REVIEW&quot;);&quot;BLOCKED&quot;)))">
            <text:p>UNKNOWN</text:p>
          </table:table-cell>
          <table:table-cell office:value-type="string" table:formula="of:=IF([.U129]=&quot;UNKNOWN&quot;;&quot;COMPLETE OR ASSERT REQUIRED EVIDENCE BEFORE REVIEW&quot;;IF([.U129]=&quot;BLOCKED&quot;;&quot;RESOLVE CONTRADICTION BEFORE REVIEW — NO AUTHORITY CREATED&quot;;IF([.U12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29]=&quot;READY FOR REVIEW&quot;;&quot;REVIEW ELIGIBLE — NO AUTHORITY&quot;;IF(OR([.U129]=&quot;UNKNOWN&quot;;[.U129]=&quot;BLOCKED&quot;);&quot;NOT REVIEW ELIGIBLE&quot;;&quot;NOT REVIEW ELIGIBLE&quot;))">
            <text:p>NOT REVIEW ELIGIBLE</text:p>
          </table:table-cell>
          <table:table-cell office:value-type="string" table:formula="of:=IF([.W129]=&quot;NOT REVIEW ELIGIBLE&quot;;&quot;DO NOT BEGIN SETTLEMENT REVIEW — RESOLVE READINESS OR CONTRADICTION CONDITIONS&quot;;IF([.W12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29]=&quot;&quot;;&quot;UNKNOWN&quot;;IF([.W129]&lt;&gt;&quot;REVIEW ELIGIBLE — NO AUTHORITY&quot;;&quot;BLOCKED — OUTCOME ASSERTED WITHOUT REVIEW ELIGIBILITY&quot;;IF(OR([.Y129]=&quot;REVIEWED — NO AUTHORITY&quot;;[.Y129]=&quot;REVIEW DEFERRED&quot;;[.Y12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0]=&quot;&quot;;IF(AND([.L130]=&quot;&quot;;[.N130]=&quot;&quot;);&quot;UNKNOWN&quot;;&quot;CONTRADICTION&quot;);IF([.M130]=&quot;UNMATCHED&quot;;IF(AND([.L130]=&quot;&quot;;[.N130]=&quot;&quot;);&quot;CLEAR&quot;;&quot;CONTRADICTION&quot;);IF([.M130]=&quot;SINGLE_SALE_LINKED&quot;;IF(AND([.L130]&lt;&gt;&quot;&quot;;[.N130]=&quot;&quot;);&quot;CLEAR&quot;;&quot;CONTRADICTION&quot;);IF([.M130]=&quot;MULTI_SALE_PENDING_ALLOCATION&quot;;IF([.L130]=&quot;&quot;;&quot;CLEAR&quot;;&quot;CONTRADICTION&quot;);IF([.M130]=&quot;ALLOCATED&quot;;IF(AND([.L130]=&quot;&quot;;[.N130]&lt;&gt;&quot;&quot;);&quot;CLEAR&quot;;&quot;CONTRADICTION&quot;);&quot;CONTRADICTION&quot;)))))">
            <text:p>UNKNOWN</text:p>
          </table:table-cell>
          <table:table-cell office:value-type="string" table:formula="of:=IF([.S130]=&quot;UNKNOWN&quot;;&quot;NO ACTION — linkage status is UNKNOWN / not asserted&quot;;IF([.S130]=&quot;CLEAR&quot;;&quot;NO CONTRADICTION — preserve evidence as entered&quot;;IF([.M130]=&quot;&quot;;&quot;REVIEW LINKAGE STATUS — identifiers are present while status is UNKNOWN&quot;;IF([.M130]=&quot;UNMATCHED&quot;;&quot;REMOVE LINKAGE IDENTIFIERS OR CORRECT LINKAGE STATUS&quot;;IF([.M130]=&quot;SINGLE_SALE_LINKED&quot;;&quot;REQUIRE LINKED SALE ID AND NO ALLOCATION GROUP ID&quot;;IF([.M130]=&quot;MULTI_SALE_PENDING_ALLOCATION&quot;;&quot;REMOVE LINKED SALE ID OR CORRECT LINKAGE STATUS&quot;;IF([.M130]=&quot;ALLOCATED&quot;;&quot;REQUIRE ALLOCATION GROUP ID AND NO LINKED SALE ID&quot;;&quot;REVIEW LINKAGE EVIDENCE — NO AUTHORITY CREATED&quot;)))))))">
            <text:p>NO ACTION — linkage status is UNKNOWN / not asserted</text:p>
          </table:table-cell>
          <table:table-cell office:value-type="string" table:formula="of:=IF([.S130]=&quot;CONTRADICTION&quot;;&quot;BLOCKED&quot;;IF([.S130]=&quot;UNKNOWN&quot;;&quot;UNKNOWN&quot;;IF([.S130]=&quot;CLEAR&quot;;IF(OR([.O130]=&quot;&quot;;[.P130]=&quot;&quot;);&quot;UNKNOWN&quot;;&quot;READY FOR REVIEW&quot;);&quot;BLOCKED&quot;)))">
            <text:p>UNKNOWN</text:p>
          </table:table-cell>
          <table:table-cell office:value-type="string" table:formula="of:=IF([.U130]=&quot;UNKNOWN&quot;;&quot;COMPLETE OR ASSERT REQUIRED EVIDENCE BEFORE REVIEW&quot;;IF([.U130]=&quot;BLOCKED&quot;;&quot;RESOLVE CONTRADICTION BEFORE REVIEW — NO AUTHORITY CREATED&quot;;IF([.U13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0]=&quot;READY FOR REVIEW&quot;;&quot;REVIEW ELIGIBLE — NO AUTHORITY&quot;;IF(OR([.U130]=&quot;UNKNOWN&quot;;[.U130]=&quot;BLOCKED&quot;);&quot;NOT REVIEW ELIGIBLE&quot;;&quot;NOT REVIEW ELIGIBLE&quot;))">
            <text:p>NOT REVIEW ELIGIBLE</text:p>
          </table:table-cell>
          <table:table-cell office:value-type="string" table:formula="of:=IF([.W130]=&quot;NOT REVIEW ELIGIBLE&quot;;&quot;DO NOT BEGIN SETTLEMENT REVIEW — RESOLVE READINESS OR CONTRADICTION CONDITIONS&quot;;IF([.W13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0]=&quot;&quot;;&quot;UNKNOWN&quot;;IF([.W130]&lt;&gt;&quot;REVIEW ELIGIBLE — NO AUTHORITY&quot;;&quot;BLOCKED — OUTCOME ASSERTED WITHOUT REVIEW ELIGIBILITY&quot;;IF(OR([.Y130]=&quot;REVIEWED — NO AUTHORITY&quot;;[.Y130]=&quot;REVIEW DEFERRED&quot;;[.Y13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1]=&quot;&quot;;IF(AND([.L131]=&quot;&quot;;[.N131]=&quot;&quot;);&quot;UNKNOWN&quot;;&quot;CONTRADICTION&quot;);IF([.M131]=&quot;UNMATCHED&quot;;IF(AND([.L131]=&quot;&quot;;[.N131]=&quot;&quot;);&quot;CLEAR&quot;;&quot;CONTRADICTION&quot;);IF([.M131]=&quot;SINGLE_SALE_LINKED&quot;;IF(AND([.L131]&lt;&gt;&quot;&quot;;[.N131]=&quot;&quot;);&quot;CLEAR&quot;;&quot;CONTRADICTION&quot;);IF([.M131]=&quot;MULTI_SALE_PENDING_ALLOCATION&quot;;IF([.L131]=&quot;&quot;;&quot;CLEAR&quot;;&quot;CONTRADICTION&quot;);IF([.M131]=&quot;ALLOCATED&quot;;IF(AND([.L131]=&quot;&quot;;[.N131]&lt;&gt;&quot;&quot;);&quot;CLEAR&quot;;&quot;CONTRADICTION&quot;);&quot;CONTRADICTION&quot;)))))">
            <text:p>UNKNOWN</text:p>
          </table:table-cell>
          <table:table-cell office:value-type="string" table:formula="of:=IF([.S131]=&quot;UNKNOWN&quot;;&quot;NO ACTION — linkage status is UNKNOWN / not asserted&quot;;IF([.S131]=&quot;CLEAR&quot;;&quot;NO CONTRADICTION — preserve evidence as entered&quot;;IF([.M131]=&quot;&quot;;&quot;REVIEW LINKAGE STATUS — identifiers are present while status is UNKNOWN&quot;;IF([.M131]=&quot;UNMATCHED&quot;;&quot;REMOVE LINKAGE IDENTIFIERS OR CORRECT LINKAGE STATUS&quot;;IF([.M131]=&quot;SINGLE_SALE_LINKED&quot;;&quot;REQUIRE LINKED SALE ID AND NO ALLOCATION GROUP ID&quot;;IF([.M131]=&quot;MULTI_SALE_PENDING_ALLOCATION&quot;;&quot;REMOVE LINKED SALE ID OR CORRECT LINKAGE STATUS&quot;;IF([.M131]=&quot;ALLOCATED&quot;;&quot;REQUIRE ALLOCATION GROUP ID AND NO LINKED SALE ID&quot;;&quot;REVIEW LINKAGE EVIDENCE — NO AUTHORITY CREATED&quot;)))))))">
            <text:p>NO ACTION — linkage status is UNKNOWN / not asserted</text:p>
          </table:table-cell>
          <table:table-cell office:value-type="string" table:formula="of:=IF([.S131]=&quot;CONTRADICTION&quot;;&quot;BLOCKED&quot;;IF([.S131]=&quot;UNKNOWN&quot;;&quot;UNKNOWN&quot;;IF([.S131]=&quot;CLEAR&quot;;IF(OR([.O131]=&quot;&quot;;[.P131]=&quot;&quot;);&quot;UNKNOWN&quot;;&quot;READY FOR REVIEW&quot;);&quot;BLOCKED&quot;)))">
            <text:p>UNKNOWN</text:p>
          </table:table-cell>
          <table:table-cell office:value-type="string" table:formula="of:=IF([.U131]=&quot;UNKNOWN&quot;;&quot;COMPLETE OR ASSERT REQUIRED EVIDENCE BEFORE REVIEW&quot;;IF([.U131]=&quot;BLOCKED&quot;;&quot;RESOLVE CONTRADICTION BEFORE REVIEW — NO AUTHORITY CREATED&quot;;IF([.U13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1]=&quot;READY FOR REVIEW&quot;;&quot;REVIEW ELIGIBLE — NO AUTHORITY&quot;;IF(OR([.U131]=&quot;UNKNOWN&quot;;[.U131]=&quot;BLOCKED&quot;);&quot;NOT REVIEW ELIGIBLE&quot;;&quot;NOT REVIEW ELIGIBLE&quot;))">
            <text:p>NOT REVIEW ELIGIBLE</text:p>
          </table:table-cell>
          <table:table-cell office:value-type="string" table:formula="of:=IF([.W131]=&quot;NOT REVIEW ELIGIBLE&quot;;&quot;DO NOT BEGIN SETTLEMENT REVIEW — RESOLVE READINESS OR CONTRADICTION CONDITIONS&quot;;IF([.W13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1]=&quot;&quot;;&quot;UNKNOWN&quot;;IF([.W131]&lt;&gt;&quot;REVIEW ELIGIBLE — NO AUTHORITY&quot;;&quot;BLOCKED — OUTCOME ASSERTED WITHOUT REVIEW ELIGIBILITY&quot;;IF(OR([.Y131]=&quot;REVIEWED — NO AUTHORITY&quot;;[.Y131]=&quot;REVIEW DEFERRED&quot;;[.Y131]=&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2]=&quot;&quot;;IF(AND([.L132]=&quot;&quot;;[.N132]=&quot;&quot;);&quot;UNKNOWN&quot;;&quot;CONTRADICTION&quot;);IF([.M132]=&quot;UNMATCHED&quot;;IF(AND([.L132]=&quot;&quot;;[.N132]=&quot;&quot;);&quot;CLEAR&quot;;&quot;CONTRADICTION&quot;);IF([.M132]=&quot;SINGLE_SALE_LINKED&quot;;IF(AND([.L132]&lt;&gt;&quot;&quot;;[.N132]=&quot;&quot;);&quot;CLEAR&quot;;&quot;CONTRADICTION&quot;);IF([.M132]=&quot;MULTI_SALE_PENDING_ALLOCATION&quot;;IF([.L132]=&quot;&quot;;&quot;CLEAR&quot;;&quot;CONTRADICTION&quot;);IF([.M132]=&quot;ALLOCATED&quot;;IF(AND([.L132]=&quot;&quot;;[.N132]&lt;&gt;&quot;&quot;);&quot;CLEAR&quot;;&quot;CONTRADICTION&quot;);&quot;CONTRADICTION&quot;)))))">
            <text:p>UNKNOWN</text:p>
          </table:table-cell>
          <table:table-cell office:value-type="string" table:formula="of:=IF([.S132]=&quot;UNKNOWN&quot;;&quot;NO ACTION — linkage status is UNKNOWN / not asserted&quot;;IF([.S132]=&quot;CLEAR&quot;;&quot;NO CONTRADICTION — preserve evidence as entered&quot;;IF([.M132]=&quot;&quot;;&quot;REVIEW LINKAGE STATUS — identifiers are present while status is UNKNOWN&quot;;IF([.M132]=&quot;UNMATCHED&quot;;&quot;REMOVE LINKAGE IDENTIFIERS OR CORRECT LINKAGE STATUS&quot;;IF([.M132]=&quot;SINGLE_SALE_LINKED&quot;;&quot;REQUIRE LINKED SALE ID AND NO ALLOCATION GROUP ID&quot;;IF([.M132]=&quot;MULTI_SALE_PENDING_ALLOCATION&quot;;&quot;REMOVE LINKED SALE ID OR CORRECT LINKAGE STATUS&quot;;IF([.M132]=&quot;ALLOCATED&quot;;&quot;REQUIRE ALLOCATION GROUP ID AND NO LINKED SALE ID&quot;;&quot;REVIEW LINKAGE EVIDENCE — NO AUTHORITY CREATED&quot;)))))))">
            <text:p>NO ACTION — linkage status is UNKNOWN / not asserted</text:p>
          </table:table-cell>
          <table:table-cell office:value-type="string" table:formula="of:=IF([.S132]=&quot;CONTRADICTION&quot;;&quot;BLOCKED&quot;;IF([.S132]=&quot;UNKNOWN&quot;;&quot;UNKNOWN&quot;;IF([.S132]=&quot;CLEAR&quot;;IF(OR([.O132]=&quot;&quot;;[.P132]=&quot;&quot;);&quot;UNKNOWN&quot;;&quot;READY FOR REVIEW&quot;);&quot;BLOCKED&quot;)))">
            <text:p>UNKNOWN</text:p>
          </table:table-cell>
          <table:table-cell office:value-type="string" table:formula="of:=IF([.U132]=&quot;UNKNOWN&quot;;&quot;COMPLETE OR ASSERT REQUIRED EVIDENCE BEFORE REVIEW&quot;;IF([.U132]=&quot;BLOCKED&quot;;&quot;RESOLVE CONTRADICTION BEFORE REVIEW — NO AUTHORITY CREATED&quot;;IF([.U13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2]=&quot;READY FOR REVIEW&quot;;&quot;REVIEW ELIGIBLE — NO AUTHORITY&quot;;IF(OR([.U132]=&quot;UNKNOWN&quot;;[.U132]=&quot;BLOCKED&quot;);&quot;NOT REVIEW ELIGIBLE&quot;;&quot;NOT REVIEW ELIGIBLE&quot;))">
            <text:p>NOT REVIEW ELIGIBLE</text:p>
          </table:table-cell>
          <table:table-cell office:value-type="string" table:formula="of:=IF([.W132]=&quot;NOT REVIEW ELIGIBLE&quot;;&quot;DO NOT BEGIN SETTLEMENT REVIEW — RESOLVE READINESS OR CONTRADICTION CONDITIONS&quot;;IF([.W13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2]=&quot;&quot;;&quot;UNKNOWN&quot;;IF([.W132]&lt;&gt;&quot;REVIEW ELIGIBLE — NO AUTHORITY&quot;;&quot;BLOCKED — OUTCOME ASSERTED WITHOUT REVIEW ELIGIBILITY&quot;;IF(OR([.Y132]=&quot;REVIEWED — NO AUTHORITY&quot;;[.Y132]=&quot;REVIEW DEFERRED&quot;;[.Y13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3]=&quot;&quot;;IF(AND([.L133]=&quot;&quot;;[.N133]=&quot;&quot;);&quot;UNKNOWN&quot;;&quot;CONTRADICTION&quot;);IF([.M133]=&quot;UNMATCHED&quot;;IF(AND([.L133]=&quot;&quot;;[.N133]=&quot;&quot;);&quot;CLEAR&quot;;&quot;CONTRADICTION&quot;);IF([.M133]=&quot;SINGLE_SALE_LINKED&quot;;IF(AND([.L133]&lt;&gt;&quot;&quot;;[.N133]=&quot;&quot;);&quot;CLEAR&quot;;&quot;CONTRADICTION&quot;);IF([.M133]=&quot;MULTI_SALE_PENDING_ALLOCATION&quot;;IF([.L133]=&quot;&quot;;&quot;CLEAR&quot;;&quot;CONTRADICTION&quot;);IF([.M133]=&quot;ALLOCATED&quot;;IF(AND([.L133]=&quot;&quot;;[.N133]&lt;&gt;&quot;&quot;);&quot;CLEAR&quot;;&quot;CONTRADICTION&quot;);&quot;CONTRADICTION&quot;)))))">
            <text:p>UNKNOWN</text:p>
          </table:table-cell>
          <table:table-cell office:value-type="string" table:formula="of:=IF([.S133]=&quot;UNKNOWN&quot;;&quot;NO ACTION — linkage status is UNKNOWN / not asserted&quot;;IF([.S133]=&quot;CLEAR&quot;;&quot;NO CONTRADICTION — preserve evidence as entered&quot;;IF([.M133]=&quot;&quot;;&quot;REVIEW LINKAGE STATUS — identifiers are present while status is UNKNOWN&quot;;IF([.M133]=&quot;UNMATCHED&quot;;&quot;REMOVE LINKAGE IDENTIFIERS OR CORRECT LINKAGE STATUS&quot;;IF([.M133]=&quot;SINGLE_SALE_LINKED&quot;;&quot;REQUIRE LINKED SALE ID AND NO ALLOCATION GROUP ID&quot;;IF([.M133]=&quot;MULTI_SALE_PENDING_ALLOCATION&quot;;&quot;REMOVE LINKED SALE ID OR CORRECT LINKAGE STATUS&quot;;IF([.M133]=&quot;ALLOCATED&quot;;&quot;REQUIRE ALLOCATION GROUP ID AND NO LINKED SALE ID&quot;;&quot;REVIEW LINKAGE EVIDENCE — NO AUTHORITY CREATED&quot;)))))))">
            <text:p>NO ACTION — linkage status is UNKNOWN / not asserted</text:p>
          </table:table-cell>
          <table:table-cell office:value-type="string" table:formula="of:=IF([.S133]=&quot;CONTRADICTION&quot;;&quot;BLOCKED&quot;;IF([.S133]=&quot;UNKNOWN&quot;;&quot;UNKNOWN&quot;;IF([.S133]=&quot;CLEAR&quot;;IF(OR([.O133]=&quot;&quot;;[.P133]=&quot;&quot;);&quot;UNKNOWN&quot;;&quot;READY FOR REVIEW&quot;);&quot;BLOCKED&quot;)))">
            <text:p>UNKNOWN</text:p>
          </table:table-cell>
          <table:table-cell office:value-type="string" table:formula="of:=IF([.U133]=&quot;UNKNOWN&quot;;&quot;COMPLETE OR ASSERT REQUIRED EVIDENCE BEFORE REVIEW&quot;;IF([.U133]=&quot;BLOCKED&quot;;&quot;RESOLVE CONTRADICTION BEFORE REVIEW — NO AUTHORITY CREATED&quot;;IF([.U13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3]=&quot;READY FOR REVIEW&quot;;&quot;REVIEW ELIGIBLE — NO AUTHORITY&quot;;IF(OR([.U133]=&quot;UNKNOWN&quot;;[.U133]=&quot;BLOCKED&quot;);&quot;NOT REVIEW ELIGIBLE&quot;;&quot;NOT REVIEW ELIGIBLE&quot;))">
            <text:p>NOT REVIEW ELIGIBLE</text:p>
          </table:table-cell>
          <table:table-cell office:value-type="string" table:formula="of:=IF([.W133]=&quot;NOT REVIEW ELIGIBLE&quot;;&quot;DO NOT BEGIN SETTLEMENT REVIEW — RESOLVE READINESS OR CONTRADICTION CONDITIONS&quot;;IF([.W13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3]=&quot;&quot;;&quot;UNKNOWN&quot;;IF([.W133]&lt;&gt;&quot;REVIEW ELIGIBLE — NO AUTHORITY&quot;;&quot;BLOCKED — OUTCOME ASSERTED WITHOUT REVIEW ELIGIBILITY&quot;;IF(OR([.Y133]=&quot;REVIEWED — NO AUTHORITY&quot;;[.Y133]=&quot;REVIEW DEFERRED&quot;;[.Y13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4]=&quot;&quot;;IF(AND([.L134]=&quot;&quot;;[.N134]=&quot;&quot;);&quot;UNKNOWN&quot;;&quot;CONTRADICTION&quot;);IF([.M134]=&quot;UNMATCHED&quot;;IF(AND([.L134]=&quot;&quot;;[.N134]=&quot;&quot;);&quot;CLEAR&quot;;&quot;CONTRADICTION&quot;);IF([.M134]=&quot;SINGLE_SALE_LINKED&quot;;IF(AND([.L134]&lt;&gt;&quot;&quot;;[.N134]=&quot;&quot;);&quot;CLEAR&quot;;&quot;CONTRADICTION&quot;);IF([.M134]=&quot;MULTI_SALE_PENDING_ALLOCATION&quot;;IF([.L134]=&quot;&quot;;&quot;CLEAR&quot;;&quot;CONTRADICTION&quot;);IF([.M134]=&quot;ALLOCATED&quot;;IF(AND([.L134]=&quot;&quot;;[.N134]&lt;&gt;&quot;&quot;);&quot;CLEAR&quot;;&quot;CONTRADICTION&quot;);&quot;CONTRADICTION&quot;)))))">
            <text:p>UNKNOWN</text:p>
          </table:table-cell>
          <table:table-cell office:value-type="string" table:formula="of:=IF([.S134]=&quot;UNKNOWN&quot;;&quot;NO ACTION — linkage status is UNKNOWN / not asserted&quot;;IF([.S134]=&quot;CLEAR&quot;;&quot;NO CONTRADICTION — preserve evidence as entered&quot;;IF([.M134]=&quot;&quot;;&quot;REVIEW LINKAGE STATUS — identifiers are present while status is UNKNOWN&quot;;IF([.M134]=&quot;UNMATCHED&quot;;&quot;REMOVE LINKAGE IDENTIFIERS OR CORRECT LINKAGE STATUS&quot;;IF([.M134]=&quot;SINGLE_SALE_LINKED&quot;;&quot;REQUIRE LINKED SALE ID AND NO ALLOCATION GROUP ID&quot;;IF([.M134]=&quot;MULTI_SALE_PENDING_ALLOCATION&quot;;&quot;REMOVE LINKED SALE ID OR CORRECT LINKAGE STATUS&quot;;IF([.M134]=&quot;ALLOCATED&quot;;&quot;REQUIRE ALLOCATION GROUP ID AND NO LINKED SALE ID&quot;;&quot;REVIEW LINKAGE EVIDENCE — NO AUTHORITY CREATED&quot;)))))))">
            <text:p>NO ACTION — linkage status is UNKNOWN / not asserted</text:p>
          </table:table-cell>
          <table:table-cell office:value-type="string" table:formula="of:=IF([.S134]=&quot;CONTRADICTION&quot;;&quot;BLOCKED&quot;;IF([.S134]=&quot;UNKNOWN&quot;;&quot;UNKNOWN&quot;;IF([.S134]=&quot;CLEAR&quot;;IF(OR([.O134]=&quot;&quot;;[.P134]=&quot;&quot;);&quot;UNKNOWN&quot;;&quot;READY FOR REVIEW&quot;);&quot;BLOCKED&quot;)))">
            <text:p>UNKNOWN</text:p>
          </table:table-cell>
          <table:table-cell office:value-type="string" table:formula="of:=IF([.U134]=&quot;UNKNOWN&quot;;&quot;COMPLETE OR ASSERT REQUIRED EVIDENCE BEFORE REVIEW&quot;;IF([.U134]=&quot;BLOCKED&quot;;&quot;RESOLVE CONTRADICTION BEFORE REVIEW — NO AUTHORITY CREATED&quot;;IF([.U13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4]=&quot;READY FOR REVIEW&quot;;&quot;REVIEW ELIGIBLE — NO AUTHORITY&quot;;IF(OR([.U134]=&quot;UNKNOWN&quot;;[.U134]=&quot;BLOCKED&quot;);&quot;NOT REVIEW ELIGIBLE&quot;;&quot;NOT REVIEW ELIGIBLE&quot;))">
            <text:p>NOT REVIEW ELIGIBLE</text:p>
          </table:table-cell>
          <table:table-cell office:value-type="string" table:formula="of:=IF([.W134]=&quot;NOT REVIEW ELIGIBLE&quot;;&quot;DO NOT BEGIN SETTLEMENT REVIEW — RESOLVE READINESS OR CONTRADICTION CONDITIONS&quot;;IF([.W13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4]=&quot;&quot;;&quot;UNKNOWN&quot;;IF([.W134]&lt;&gt;&quot;REVIEW ELIGIBLE — NO AUTHORITY&quot;;&quot;BLOCKED — OUTCOME ASSERTED WITHOUT REVIEW ELIGIBILITY&quot;;IF(OR([.Y134]=&quot;REVIEWED — NO AUTHORITY&quot;;[.Y134]=&quot;REVIEW DEFERRED&quot;;[.Y13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5]=&quot;&quot;;IF(AND([.L135]=&quot;&quot;;[.N135]=&quot;&quot;);&quot;UNKNOWN&quot;;&quot;CONTRADICTION&quot;);IF([.M135]=&quot;UNMATCHED&quot;;IF(AND([.L135]=&quot;&quot;;[.N135]=&quot;&quot;);&quot;CLEAR&quot;;&quot;CONTRADICTION&quot;);IF([.M135]=&quot;SINGLE_SALE_LINKED&quot;;IF(AND([.L135]&lt;&gt;&quot;&quot;;[.N135]=&quot;&quot;);&quot;CLEAR&quot;;&quot;CONTRADICTION&quot;);IF([.M135]=&quot;MULTI_SALE_PENDING_ALLOCATION&quot;;IF([.L135]=&quot;&quot;;&quot;CLEAR&quot;;&quot;CONTRADICTION&quot;);IF([.M135]=&quot;ALLOCATED&quot;;IF(AND([.L135]=&quot;&quot;;[.N135]&lt;&gt;&quot;&quot;);&quot;CLEAR&quot;;&quot;CONTRADICTION&quot;);&quot;CONTRADICTION&quot;)))))">
            <text:p>UNKNOWN</text:p>
          </table:table-cell>
          <table:table-cell office:value-type="string" table:formula="of:=IF([.S135]=&quot;UNKNOWN&quot;;&quot;NO ACTION — linkage status is UNKNOWN / not asserted&quot;;IF([.S135]=&quot;CLEAR&quot;;&quot;NO CONTRADICTION — preserve evidence as entered&quot;;IF([.M135]=&quot;&quot;;&quot;REVIEW LINKAGE STATUS — identifiers are present while status is UNKNOWN&quot;;IF([.M135]=&quot;UNMATCHED&quot;;&quot;REMOVE LINKAGE IDENTIFIERS OR CORRECT LINKAGE STATUS&quot;;IF([.M135]=&quot;SINGLE_SALE_LINKED&quot;;&quot;REQUIRE LINKED SALE ID AND NO ALLOCATION GROUP ID&quot;;IF([.M135]=&quot;MULTI_SALE_PENDING_ALLOCATION&quot;;&quot;REMOVE LINKED SALE ID OR CORRECT LINKAGE STATUS&quot;;IF([.M135]=&quot;ALLOCATED&quot;;&quot;REQUIRE ALLOCATION GROUP ID AND NO LINKED SALE ID&quot;;&quot;REVIEW LINKAGE EVIDENCE — NO AUTHORITY CREATED&quot;)))))))">
            <text:p>NO ACTION — linkage status is UNKNOWN / not asserted</text:p>
          </table:table-cell>
          <table:table-cell office:value-type="string" table:formula="of:=IF([.S135]=&quot;CONTRADICTION&quot;;&quot;BLOCKED&quot;;IF([.S135]=&quot;UNKNOWN&quot;;&quot;UNKNOWN&quot;;IF([.S135]=&quot;CLEAR&quot;;IF(OR([.O135]=&quot;&quot;;[.P135]=&quot;&quot;);&quot;UNKNOWN&quot;;&quot;READY FOR REVIEW&quot;);&quot;BLOCKED&quot;)))">
            <text:p>UNKNOWN</text:p>
          </table:table-cell>
          <table:table-cell office:value-type="string" table:formula="of:=IF([.U135]=&quot;UNKNOWN&quot;;&quot;COMPLETE OR ASSERT REQUIRED EVIDENCE BEFORE REVIEW&quot;;IF([.U135]=&quot;BLOCKED&quot;;&quot;RESOLVE CONTRADICTION BEFORE REVIEW — NO AUTHORITY CREATED&quot;;IF([.U13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5]=&quot;READY FOR REVIEW&quot;;&quot;REVIEW ELIGIBLE — NO AUTHORITY&quot;;IF(OR([.U135]=&quot;UNKNOWN&quot;;[.U135]=&quot;BLOCKED&quot;);&quot;NOT REVIEW ELIGIBLE&quot;;&quot;NOT REVIEW ELIGIBLE&quot;))">
            <text:p>NOT REVIEW ELIGIBLE</text:p>
          </table:table-cell>
          <table:table-cell office:value-type="string" table:formula="of:=IF([.W135]=&quot;NOT REVIEW ELIGIBLE&quot;;&quot;DO NOT BEGIN SETTLEMENT REVIEW — RESOLVE READINESS OR CONTRADICTION CONDITIONS&quot;;IF([.W13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5]=&quot;&quot;;&quot;UNKNOWN&quot;;IF([.W135]&lt;&gt;&quot;REVIEW ELIGIBLE — NO AUTHORITY&quot;;&quot;BLOCKED — OUTCOME ASSERTED WITHOUT REVIEW ELIGIBILITY&quot;;IF(OR([.Y135]=&quot;REVIEWED — NO AUTHORITY&quot;;[.Y135]=&quot;REVIEW DEFERRED&quot;;[.Y13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6]=&quot;&quot;;IF(AND([.L136]=&quot;&quot;;[.N136]=&quot;&quot;);&quot;UNKNOWN&quot;;&quot;CONTRADICTION&quot;);IF([.M136]=&quot;UNMATCHED&quot;;IF(AND([.L136]=&quot;&quot;;[.N136]=&quot;&quot;);&quot;CLEAR&quot;;&quot;CONTRADICTION&quot;);IF([.M136]=&quot;SINGLE_SALE_LINKED&quot;;IF(AND([.L136]&lt;&gt;&quot;&quot;;[.N136]=&quot;&quot;);&quot;CLEAR&quot;;&quot;CONTRADICTION&quot;);IF([.M136]=&quot;MULTI_SALE_PENDING_ALLOCATION&quot;;IF([.L136]=&quot;&quot;;&quot;CLEAR&quot;;&quot;CONTRADICTION&quot;);IF([.M136]=&quot;ALLOCATED&quot;;IF(AND([.L136]=&quot;&quot;;[.N136]&lt;&gt;&quot;&quot;);&quot;CLEAR&quot;;&quot;CONTRADICTION&quot;);&quot;CONTRADICTION&quot;)))))">
            <text:p>UNKNOWN</text:p>
          </table:table-cell>
          <table:table-cell office:value-type="string" table:formula="of:=IF([.S136]=&quot;UNKNOWN&quot;;&quot;NO ACTION — linkage status is UNKNOWN / not asserted&quot;;IF([.S136]=&quot;CLEAR&quot;;&quot;NO CONTRADICTION — preserve evidence as entered&quot;;IF([.M136]=&quot;&quot;;&quot;REVIEW LINKAGE STATUS — identifiers are present while status is UNKNOWN&quot;;IF([.M136]=&quot;UNMATCHED&quot;;&quot;REMOVE LINKAGE IDENTIFIERS OR CORRECT LINKAGE STATUS&quot;;IF([.M136]=&quot;SINGLE_SALE_LINKED&quot;;&quot;REQUIRE LINKED SALE ID AND NO ALLOCATION GROUP ID&quot;;IF([.M136]=&quot;MULTI_SALE_PENDING_ALLOCATION&quot;;&quot;REMOVE LINKED SALE ID OR CORRECT LINKAGE STATUS&quot;;IF([.M136]=&quot;ALLOCATED&quot;;&quot;REQUIRE ALLOCATION GROUP ID AND NO LINKED SALE ID&quot;;&quot;REVIEW LINKAGE EVIDENCE — NO AUTHORITY CREATED&quot;)))))))">
            <text:p>NO ACTION — linkage status is UNKNOWN / not asserted</text:p>
          </table:table-cell>
          <table:table-cell office:value-type="string" table:formula="of:=IF([.S136]=&quot;CONTRADICTION&quot;;&quot;BLOCKED&quot;;IF([.S136]=&quot;UNKNOWN&quot;;&quot;UNKNOWN&quot;;IF([.S136]=&quot;CLEAR&quot;;IF(OR([.O136]=&quot;&quot;;[.P136]=&quot;&quot;);&quot;UNKNOWN&quot;;&quot;READY FOR REVIEW&quot;);&quot;BLOCKED&quot;)))">
            <text:p>UNKNOWN</text:p>
          </table:table-cell>
          <table:table-cell office:value-type="string" table:formula="of:=IF([.U136]=&quot;UNKNOWN&quot;;&quot;COMPLETE OR ASSERT REQUIRED EVIDENCE BEFORE REVIEW&quot;;IF([.U136]=&quot;BLOCKED&quot;;&quot;RESOLVE CONTRADICTION BEFORE REVIEW — NO AUTHORITY CREATED&quot;;IF([.U13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6]=&quot;READY FOR REVIEW&quot;;&quot;REVIEW ELIGIBLE — NO AUTHORITY&quot;;IF(OR([.U136]=&quot;UNKNOWN&quot;;[.U136]=&quot;BLOCKED&quot;);&quot;NOT REVIEW ELIGIBLE&quot;;&quot;NOT REVIEW ELIGIBLE&quot;))">
            <text:p>NOT REVIEW ELIGIBLE</text:p>
          </table:table-cell>
          <table:table-cell office:value-type="string" table:formula="of:=IF([.W136]=&quot;NOT REVIEW ELIGIBLE&quot;;&quot;DO NOT BEGIN SETTLEMENT REVIEW — RESOLVE READINESS OR CONTRADICTION CONDITIONS&quot;;IF([.W13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6]=&quot;&quot;;&quot;UNKNOWN&quot;;IF([.W136]&lt;&gt;&quot;REVIEW ELIGIBLE — NO AUTHORITY&quot;;&quot;BLOCKED — OUTCOME ASSERTED WITHOUT REVIEW ELIGIBILITY&quot;;IF(OR([.Y136]=&quot;REVIEWED — NO AUTHORITY&quot;;[.Y136]=&quot;REVIEW DEFERRED&quot;;[.Y13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7]=&quot;&quot;;IF(AND([.L137]=&quot;&quot;;[.N137]=&quot;&quot;);&quot;UNKNOWN&quot;;&quot;CONTRADICTION&quot;);IF([.M137]=&quot;UNMATCHED&quot;;IF(AND([.L137]=&quot;&quot;;[.N137]=&quot;&quot;);&quot;CLEAR&quot;;&quot;CONTRADICTION&quot;);IF([.M137]=&quot;SINGLE_SALE_LINKED&quot;;IF(AND([.L137]&lt;&gt;&quot;&quot;;[.N137]=&quot;&quot;);&quot;CLEAR&quot;;&quot;CONTRADICTION&quot;);IF([.M137]=&quot;MULTI_SALE_PENDING_ALLOCATION&quot;;IF([.L137]=&quot;&quot;;&quot;CLEAR&quot;;&quot;CONTRADICTION&quot;);IF([.M137]=&quot;ALLOCATED&quot;;IF(AND([.L137]=&quot;&quot;;[.N137]&lt;&gt;&quot;&quot;);&quot;CLEAR&quot;;&quot;CONTRADICTION&quot;);&quot;CONTRADICTION&quot;)))))">
            <text:p>UNKNOWN</text:p>
          </table:table-cell>
          <table:table-cell office:value-type="string" table:formula="of:=IF([.S137]=&quot;UNKNOWN&quot;;&quot;NO ACTION — linkage status is UNKNOWN / not asserted&quot;;IF([.S137]=&quot;CLEAR&quot;;&quot;NO CONTRADICTION — preserve evidence as entered&quot;;IF([.M137]=&quot;&quot;;&quot;REVIEW LINKAGE STATUS — identifiers are present while status is UNKNOWN&quot;;IF([.M137]=&quot;UNMATCHED&quot;;&quot;REMOVE LINKAGE IDENTIFIERS OR CORRECT LINKAGE STATUS&quot;;IF([.M137]=&quot;SINGLE_SALE_LINKED&quot;;&quot;REQUIRE LINKED SALE ID AND NO ALLOCATION GROUP ID&quot;;IF([.M137]=&quot;MULTI_SALE_PENDING_ALLOCATION&quot;;&quot;REMOVE LINKED SALE ID OR CORRECT LINKAGE STATUS&quot;;IF([.M137]=&quot;ALLOCATED&quot;;&quot;REQUIRE ALLOCATION GROUP ID AND NO LINKED SALE ID&quot;;&quot;REVIEW LINKAGE EVIDENCE — NO AUTHORITY CREATED&quot;)))))))">
            <text:p>NO ACTION — linkage status is UNKNOWN / not asserted</text:p>
          </table:table-cell>
          <table:table-cell office:value-type="string" table:formula="of:=IF([.S137]=&quot;CONTRADICTION&quot;;&quot;BLOCKED&quot;;IF([.S137]=&quot;UNKNOWN&quot;;&quot;UNKNOWN&quot;;IF([.S137]=&quot;CLEAR&quot;;IF(OR([.O137]=&quot;&quot;;[.P137]=&quot;&quot;);&quot;UNKNOWN&quot;;&quot;READY FOR REVIEW&quot;);&quot;BLOCKED&quot;)))">
            <text:p>UNKNOWN</text:p>
          </table:table-cell>
          <table:table-cell office:value-type="string" table:formula="of:=IF([.U137]=&quot;UNKNOWN&quot;;&quot;COMPLETE OR ASSERT REQUIRED EVIDENCE BEFORE REVIEW&quot;;IF([.U137]=&quot;BLOCKED&quot;;&quot;RESOLVE CONTRADICTION BEFORE REVIEW — NO AUTHORITY CREATED&quot;;IF([.U13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7]=&quot;READY FOR REVIEW&quot;;&quot;REVIEW ELIGIBLE — NO AUTHORITY&quot;;IF(OR([.U137]=&quot;UNKNOWN&quot;;[.U137]=&quot;BLOCKED&quot;);&quot;NOT REVIEW ELIGIBLE&quot;;&quot;NOT REVIEW ELIGIBLE&quot;))">
            <text:p>NOT REVIEW ELIGIBLE</text:p>
          </table:table-cell>
          <table:table-cell office:value-type="string" table:formula="of:=IF([.W137]=&quot;NOT REVIEW ELIGIBLE&quot;;&quot;DO NOT BEGIN SETTLEMENT REVIEW — RESOLVE READINESS OR CONTRADICTION CONDITIONS&quot;;IF([.W13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7]=&quot;&quot;;&quot;UNKNOWN&quot;;IF([.W137]&lt;&gt;&quot;REVIEW ELIGIBLE — NO AUTHORITY&quot;;&quot;BLOCKED — OUTCOME ASSERTED WITHOUT REVIEW ELIGIBILITY&quot;;IF(OR([.Y137]=&quot;REVIEWED — NO AUTHORITY&quot;;[.Y137]=&quot;REVIEW DEFERRED&quot;;[.Y13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8]=&quot;&quot;;IF(AND([.L138]=&quot;&quot;;[.N138]=&quot;&quot;);&quot;UNKNOWN&quot;;&quot;CONTRADICTION&quot;);IF([.M138]=&quot;UNMATCHED&quot;;IF(AND([.L138]=&quot;&quot;;[.N138]=&quot;&quot;);&quot;CLEAR&quot;;&quot;CONTRADICTION&quot;);IF([.M138]=&quot;SINGLE_SALE_LINKED&quot;;IF(AND([.L138]&lt;&gt;&quot;&quot;;[.N138]=&quot;&quot;);&quot;CLEAR&quot;;&quot;CONTRADICTION&quot;);IF([.M138]=&quot;MULTI_SALE_PENDING_ALLOCATION&quot;;IF([.L138]=&quot;&quot;;&quot;CLEAR&quot;;&quot;CONTRADICTION&quot;);IF([.M138]=&quot;ALLOCATED&quot;;IF(AND([.L138]=&quot;&quot;;[.N138]&lt;&gt;&quot;&quot;);&quot;CLEAR&quot;;&quot;CONTRADICTION&quot;);&quot;CONTRADICTION&quot;)))))">
            <text:p>UNKNOWN</text:p>
          </table:table-cell>
          <table:table-cell office:value-type="string" table:formula="of:=IF([.S138]=&quot;UNKNOWN&quot;;&quot;NO ACTION — linkage status is UNKNOWN / not asserted&quot;;IF([.S138]=&quot;CLEAR&quot;;&quot;NO CONTRADICTION — preserve evidence as entered&quot;;IF([.M138]=&quot;&quot;;&quot;REVIEW LINKAGE STATUS — identifiers are present while status is UNKNOWN&quot;;IF([.M138]=&quot;UNMATCHED&quot;;&quot;REMOVE LINKAGE IDENTIFIERS OR CORRECT LINKAGE STATUS&quot;;IF([.M138]=&quot;SINGLE_SALE_LINKED&quot;;&quot;REQUIRE LINKED SALE ID AND NO ALLOCATION GROUP ID&quot;;IF([.M138]=&quot;MULTI_SALE_PENDING_ALLOCATION&quot;;&quot;REMOVE LINKED SALE ID OR CORRECT LINKAGE STATUS&quot;;IF([.M138]=&quot;ALLOCATED&quot;;&quot;REQUIRE ALLOCATION GROUP ID AND NO LINKED SALE ID&quot;;&quot;REVIEW LINKAGE EVIDENCE — NO AUTHORITY CREATED&quot;)))))))">
            <text:p>NO ACTION — linkage status is UNKNOWN / not asserted</text:p>
          </table:table-cell>
          <table:table-cell office:value-type="string" table:formula="of:=IF([.S138]=&quot;CONTRADICTION&quot;;&quot;BLOCKED&quot;;IF([.S138]=&quot;UNKNOWN&quot;;&quot;UNKNOWN&quot;;IF([.S138]=&quot;CLEAR&quot;;IF(OR([.O138]=&quot;&quot;;[.P138]=&quot;&quot;);&quot;UNKNOWN&quot;;&quot;READY FOR REVIEW&quot;);&quot;BLOCKED&quot;)))">
            <text:p>UNKNOWN</text:p>
          </table:table-cell>
          <table:table-cell office:value-type="string" table:formula="of:=IF([.U138]=&quot;UNKNOWN&quot;;&quot;COMPLETE OR ASSERT REQUIRED EVIDENCE BEFORE REVIEW&quot;;IF([.U138]=&quot;BLOCKED&quot;;&quot;RESOLVE CONTRADICTION BEFORE REVIEW — NO AUTHORITY CREATED&quot;;IF([.U13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8]=&quot;READY FOR REVIEW&quot;;&quot;REVIEW ELIGIBLE — NO AUTHORITY&quot;;IF(OR([.U138]=&quot;UNKNOWN&quot;;[.U138]=&quot;BLOCKED&quot;);&quot;NOT REVIEW ELIGIBLE&quot;;&quot;NOT REVIEW ELIGIBLE&quot;))">
            <text:p>NOT REVIEW ELIGIBLE</text:p>
          </table:table-cell>
          <table:table-cell office:value-type="string" table:formula="of:=IF([.W138]=&quot;NOT REVIEW ELIGIBLE&quot;;&quot;DO NOT BEGIN SETTLEMENT REVIEW — RESOLVE READINESS OR CONTRADICTION CONDITIONS&quot;;IF([.W13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8]=&quot;&quot;;&quot;UNKNOWN&quot;;IF([.W138]&lt;&gt;&quot;REVIEW ELIGIBLE — NO AUTHORITY&quot;;&quot;BLOCKED — OUTCOME ASSERTED WITHOUT REVIEW ELIGIBILITY&quot;;IF(OR([.Y138]=&quot;REVIEWED — NO AUTHORITY&quot;;[.Y138]=&quot;REVIEW DEFERRED&quot;;[.Y13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39]=&quot;&quot;;IF(AND([.L139]=&quot;&quot;;[.N139]=&quot;&quot;);&quot;UNKNOWN&quot;;&quot;CONTRADICTION&quot;);IF([.M139]=&quot;UNMATCHED&quot;;IF(AND([.L139]=&quot;&quot;;[.N139]=&quot;&quot;);&quot;CLEAR&quot;;&quot;CONTRADICTION&quot;);IF([.M139]=&quot;SINGLE_SALE_LINKED&quot;;IF(AND([.L139]&lt;&gt;&quot;&quot;;[.N139]=&quot;&quot;);&quot;CLEAR&quot;;&quot;CONTRADICTION&quot;);IF([.M139]=&quot;MULTI_SALE_PENDING_ALLOCATION&quot;;IF([.L139]=&quot;&quot;;&quot;CLEAR&quot;;&quot;CONTRADICTION&quot;);IF([.M139]=&quot;ALLOCATED&quot;;IF(AND([.L139]=&quot;&quot;;[.N139]&lt;&gt;&quot;&quot;);&quot;CLEAR&quot;;&quot;CONTRADICTION&quot;);&quot;CONTRADICTION&quot;)))))">
            <text:p>UNKNOWN</text:p>
          </table:table-cell>
          <table:table-cell office:value-type="string" table:formula="of:=IF([.S139]=&quot;UNKNOWN&quot;;&quot;NO ACTION — linkage status is UNKNOWN / not asserted&quot;;IF([.S139]=&quot;CLEAR&quot;;&quot;NO CONTRADICTION — preserve evidence as entered&quot;;IF([.M139]=&quot;&quot;;&quot;REVIEW LINKAGE STATUS — identifiers are present while status is UNKNOWN&quot;;IF([.M139]=&quot;UNMATCHED&quot;;&quot;REMOVE LINKAGE IDENTIFIERS OR CORRECT LINKAGE STATUS&quot;;IF([.M139]=&quot;SINGLE_SALE_LINKED&quot;;&quot;REQUIRE LINKED SALE ID AND NO ALLOCATION GROUP ID&quot;;IF([.M139]=&quot;MULTI_SALE_PENDING_ALLOCATION&quot;;&quot;REMOVE LINKED SALE ID OR CORRECT LINKAGE STATUS&quot;;IF([.M139]=&quot;ALLOCATED&quot;;&quot;REQUIRE ALLOCATION GROUP ID AND NO LINKED SALE ID&quot;;&quot;REVIEW LINKAGE EVIDENCE — NO AUTHORITY CREATED&quot;)))))))">
            <text:p>NO ACTION — linkage status is UNKNOWN / not asserted</text:p>
          </table:table-cell>
          <table:table-cell office:value-type="string" table:formula="of:=IF([.S139]=&quot;CONTRADICTION&quot;;&quot;BLOCKED&quot;;IF([.S139]=&quot;UNKNOWN&quot;;&quot;UNKNOWN&quot;;IF([.S139]=&quot;CLEAR&quot;;IF(OR([.O139]=&quot;&quot;;[.P139]=&quot;&quot;);&quot;UNKNOWN&quot;;&quot;READY FOR REVIEW&quot;);&quot;BLOCKED&quot;)))">
            <text:p>UNKNOWN</text:p>
          </table:table-cell>
          <table:table-cell office:value-type="string" table:formula="of:=IF([.U139]=&quot;UNKNOWN&quot;;&quot;COMPLETE OR ASSERT REQUIRED EVIDENCE BEFORE REVIEW&quot;;IF([.U139]=&quot;BLOCKED&quot;;&quot;RESOLVE CONTRADICTION BEFORE REVIEW — NO AUTHORITY CREATED&quot;;IF([.U13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39]=&quot;READY FOR REVIEW&quot;;&quot;REVIEW ELIGIBLE — NO AUTHORITY&quot;;IF(OR([.U139]=&quot;UNKNOWN&quot;;[.U139]=&quot;BLOCKED&quot;);&quot;NOT REVIEW ELIGIBLE&quot;;&quot;NOT REVIEW ELIGIBLE&quot;))">
            <text:p>NOT REVIEW ELIGIBLE</text:p>
          </table:table-cell>
          <table:table-cell office:value-type="string" table:formula="of:=IF([.W139]=&quot;NOT REVIEW ELIGIBLE&quot;;&quot;DO NOT BEGIN SETTLEMENT REVIEW — RESOLVE READINESS OR CONTRADICTION CONDITIONS&quot;;IF([.W13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39]=&quot;&quot;;&quot;UNKNOWN&quot;;IF([.W139]&lt;&gt;&quot;REVIEW ELIGIBLE — NO AUTHORITY&quot;;&quot;BLOCKED — OUTCOME ASSERTED WITHOUT REVIEW ELIGIBILITY&quot;;IF(OR([.Y139]=&quot;REVIEWED — NO AUTHORITY&quot;;[.Y139]=&quot;REVIEW DEFERRED&quot;;[.Y13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0]=&quot;&quot;;IF(AND([.L140]=&quot;&quot;;[.N140]=&quot;&quot;);&quot;UNKNOWN&quot;;&quot;CONTRADICTION&quot;);IF([.M140]=&quot;UNMATCHED&quot;;IF(AND([.L140]=&quot;&quot;;[.N140]=&quot;&quot;);&quot;CLEAR&quot;;&quot;CONTRADICTION&quot;);IF([.M140]=&quot;SINGLE_SALE_LINKED&quot;;IF(AND([.L140]&lt;&gt;&quot;&quot;;[.N140]=&quot;&quot;);&quot;CLEAR&quot;;&quot;CONTRADICTION&quot;);IF([.M140]=&quot;MULTI_SALE_PENDING_ALLOCATION&quot;;IF([.L140]=&quot;&quot;;&quot;CLEAR&quot;;&quot;CONTRADICTION&quot;);IF([.M140]=&quot;ALLOCATED&quot;;IF(AND([.L140]=&quot;&quot;;[.N140]&lt;&gt;&quot;&quot;);&quot;CLEAR&quot;;&quot;CONTRADICTION&quot;);&quot;CONTRADICTION&quot;)))))">
            <text:p>UNKNOWN</text:p>
          </table:table-cell>
          <table:table-cell office:value-type="string" table:formula="of:=IF([.S140]=&quot;UNKNOWN&quot;;&quot;NO ACTION — linkage status is UNKNOWN / not asserted&quot;;IF([.S140]=&quot;CLEAR&quot;;&quot;NO CONTRADICTION — preserve evidence as entered&quot;;IF([.M140]=&quot;&quot;;&quot;REVIEW LINKAGE STATUS — identifiers are present while status is UNKNOWN&quot;;IF([.M140]=&quot;UNMATCHED&quot;;&quot;REMOVE LINKAGE IDENTIFIERS OR CORRECT LINKAGE STATUS&quot;;IF([.M140]=&quot;SINGLE_SALE_LINKED&quot;;&quot;REQUIRE LINKED SALE ID AND NO ALLOCATION GROUP ID&quot;;IF([.M140]=&quot;MULTI_SALE_PENDING_ALLOCATION&quot;;&quot;REMOVE LINKED SALE ID OR CORRECT LINKAGE STATUS&quot;;IF([.M140]=&quot;ALLOCATED&quot;;&quot;REQUIRE ALLOCATION GROUP ID AND NO LINKED SALE ID&quot;;&quot;REVIEW LINKAGE EVIDENCE — NO AUTHORITY CREATED&quot;)))))))">
            <text:p>NO ACTION — linkage status is UNKNOWN / not asserted</text:p>
          </table:table-cell>
          <table:table-cell office:value-type="string" table:formula="of:=IF([.S140]=&quot;CONTRADICTION&quot;;&quot;BLOCKED&quot;;IF([.S140]=&quot;UNKNOWN&quot;;&quot;UNKNOWN&quot;;IF([.S140]=&quot;CLEAR&quot;;IF(OR([.O140]=&quot;&quot;;[.P140]=&quot;&quot;);&quot;UNKNOWN&quot;;&quot;READY FOR REVIEW&quot;);&quot;BLOCKED&quot;)))">
            <text:p>UNKNOWN</text:p>
          </table:table-cell>
          <table:table-cell office:value-type="string" table:formula="of:=IF([.U140]=&quot;UNKNOWN&quot;;&quot;COMPLETE OR ASSERT REQUIRED EVIDENCE BEFORE REVIEW&quot;;IF([.U140]=&quot;BLOCKED&quot;;&quot;RESOLVE CONTRADICTION BEFORE REVIEW — NO AUTHORITY CREATED&quot;;IF([.U14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0]=&quot;READY FOR REVIEW&quot;;&quot;REVIEW ELIGIBLE — NO AUTHORITY&quot;;IF(OR([.U140]=&quot;UNKNOWN&quot;;[.U140]=&quot;BLOCKED&quot;);&quot;NOT REVIEW ELIGIBLE&quot;;&quot;NOT REVIEW ELIGIBLE&quot;))">
            <text:p>NOT REVIEW ELIGIBLE</text:p>
          </table:table-cell>
          <table:table-cell office:value-type="string" table:formula="of:=IF([.W140]=&quot;NOT REVIEW ELIGIBLE&quot;;&quot;DO NOT BEGIN SETTLEMENT REVIEW — RESOLVE READINESS OR CONTRADICTION CONDITIONS&quot;;IF([.W14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0]=&quot;&quot;;&quot;UNKNOWN&quot;;IF([.W140]&lt;&gt;&quot;REVIEW ELIGIBLE — NO AUTHORITY&quot;;&quot;BLOCKED — OUTCOME ASSERTED WITHOUT REVIEW ELIGIBILITY&quot;;IF(OR([.Y140]=&quot;REVIEWED — NO AUTHORITY&quot;;[.Y140]=&quot;REVIEW DEFERRED&quot;;[.Y14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1]=&quot;&quot;;IF(AND([.L141]=&quot;&quot;;[.N141]=&quot;&quot;);&quot;UNKNOWN&quot;;&quot;CONTRADICTION&quot;);IF([.M141]=&quot;UNMATCHED&quot;;IF(AND([.L141]=&quot;&quot;;[.N141]=&quot;&quot;);&quot;CLEAR&quot;;&quot;CONTRADICTION&quot;);IF([.M141]=&quot;SINGLE_SALE_LINKED&quot;;IF(AND([.L141]&lt;&gt;&quot;&quot;;[.N141]=&quot;&quot;);&quot;CLEAR&quot;;&quot;CONTRADICTION&quot;);IF([.M141]=&quot;MULTI_SALE_PENDING_ALLOCATION&quot;;IF([.L141]=&quot;&quot;;&quot;CLEAR&quot;;&quot;CONTRADICTION&quot;);IF([.M141]=&quot;ALLOCATED&quot;;IF(AND([.L141]=&quot;&quot;;[.N141]&lt;&gt;&quot;&quot;);&quot;CLEAR&quot;;&quot;CONTRADICTION&quot;);&quot;CONTRADICTION&quot;)))))">
            <text:p>UNKNOWN</text:p>
          </table:table-cell>
          <table:table-cell office:value-type="string" table:formula="of:=IF([.S141]=&quot;UNKNOWN&quot;;&quot;NO ACTION — linkage status is UNKNOWN / not asserted&quot;;IF([.S141]=&quot;CLEAR&quot;;&quot;NO CONTRADICTION — preserve evidence as entered&quot;;IF([.M141]=&quot;&quot;;&quot;REVIEW LINKAGE STATUS — identifiers are present while status is UNKNOWN&quot;;IF([.M141]=&quot;UNMATCHED&quot;;&quot;REMOVE LINKAGE IDENTIFIERS OR CORRECT LINKAGE STATUS&quot;;IF([.M141]=&quot;SINGLE_SALE_LINKED&quot;;&quot;REQUIRE LINKED SALE ID AND NO ALLOCATION GROUP ID&quot;;IF([.M141]=&quot;MULTI_SALE_PENDING_ALLOCATION&quot;;&quot;REMOVE LINKED SALE ID OR CORRECT LINKAGE STATUS&quot;;IF([.M141]=&quot;ALLOCATED&quot;;&quot;REQUIRE ALLOCATION GROUP ID AND NO LINKED SALE ID&quot;;&quot;REVIEW LINKAGE EVIDENCE — NO AUTHORITY CREATED&quot;)))))))">
            <text:p>NO ACTION — linkage status is UNKNOWN / not asserted</text:p>
          </table:table-cell>
          <table:table-cell office:value-type="string" table:formula="of:=IF([.S141]=&quot;CONTRADICTION&quot;;&quot;BLOCKED&quot;;IF([.S141]=&quot;UNKNOWN&quot;;&quot;UNKNOWN&quot;;IF([.S141]=&quot;CLEAR&quot;;IF(OR([.O141]=&quot;&quot;;[.P141]=&quot;&quot;);&quot;UNKNOWN&quot;;&quot;READY FOR REVIEW&quot;);&quot;BLOCKED&quot;)))">
            <text:p>UNKNOWN</text:p>
          </table:table-cell>
          <table:table-cell office:value-type="string" table:formula="of:=IF([.U141]=&quot;UNKNOWN&quot;;&quot;COMPLETE OR ASSERT REQUIRED EVIDENCE BEFORE REVIEW&quot;;IF([.U141]=&quot;BLOCKED&quot;;&quot;RESOLVE CONTRADICTION BEFORE REVIEW — NO AUTHORITY CREATED&quot;;IF([.U14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1]=&quot;READY FOR REVIEW&quot;;&quot;REVIEW ELIGIBLE — NO AUTHORITY&quot;;IF(OR([.U141]=&quot;UNKNOWN&quot;;[.U141]=&quot;BLOCKED&quot;);&quot;NOT REVIEW ELIGIBLE&quot;;&quot;NOT REVIEW ELIGIBLE&quot;))">
            <text:p>NOT REVIEW ELIGIBLE</text:p>
          </table:table-cell>
          <table:table-cell office:value-type="string" table:formula="of:=IF([.W141]=&quot;NOT REVIEW ELIGIBLE&quot;;&quot;DO NOT BEGIN SETTLEMENT REVIEW — RESOLVE READINESS OR CONTRADICTION CONDITIONS&quot;;IF([.W14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1]=&quot;&quot;;&quot;UNKNOWN&quot;;IF([.W141]&lt;&gt;&quot;REVIEW ELIGIBLE — NO AUTHORITY&quot;;&quot;BLOCKED — OUTCOME ASSERTED WITHOUT REVIEW ELIGIBILITY&quot;;IF(OR([.Y141]=&quot;REVIEWED — NO AUTHORITY&quot;;[.Y141]=&quot;REVIEW DEFERRED&quot;;[.Y141]=&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2]=&quot;&quot;;IF(AND([.L142]=&quot;&quot;;[.N142]=&quot;&quot;);&quot;UNKNOWN&quot;;&quot;CONTRADICTION&quot;);IF([.M142]=&quot;UNMATCHED&quot;;IF(AND([.L142]=&quot;&quot;;[.N142]=&quot;&quot;);&quot;CLEAR&quot;;&quot;CONTRADICTION&quot;);IF([.M142]=&quot;SINGLE_SALE_LINKED&quot;;IF(AND([.L142]&lt;&gt;&quot;&quot;;[.N142]=&quot;&quot;);&quot;CLEAR&quot;;&quot;CONTRADICTION&quot;);IF([.M142]=&quot;MULTI_SALE_PENDING_ALLOCATION&quot;;IF([.L142]=&quot;&quot;;&quot;CLEAR&quot;;&quot;CONTRADICTION&quot;);IF([.M142]=&quot;ALLOCATED&quot;;IF(AND([.L142]=&quot;&quot;;[.N142]&lt;&gt;&quot;&quot;);&quot;CLEAR&quot;;&quot;CONTRADICTION&quot;);&quot;CONTRADICTION&quot;)))))">
            <text:p>UNKNOWN</text:p>
          </table:table-cell>
          <table:table-cell office:value-type="string" table:formula="of:=IF([.S142]=&quot;UNKNOWN&quot;;&quot;NO ACTION — linkage status is UNKNOWN / not asserted&quot;;IF([.S142]=&quot;CLEAR&quot;;&quot;NO CONTRADICTION — preserve evidence as entered&quot;;IF([.M142]=&quot;&quot;;&quot;REVIEW LINKAGE STATUS — identifiers are present while status is UNKNOWN&quot;;IF([.M142]=&quot;UNMATCHED&quot;;&quot;REMOVE LINKAGE IDENTIFIERS OR CORRECT LINKAGE STATUS&quot;;IF([.M142]=&quot;SINGLE_SALE_LINKED&quot;;&quot;REQUIRE LINKED SALE ID AND NO ALLOCATION GROUP ID&quot;;IF([.M142]=&quot;MULTI_SALE_PENDING_ALLOCATION&quot;;&quot;REMOVE LINKED SALE ID OR CORRECT LINKAGE STATUS&quot;;IF([.M142]=&quot;ALLOCATED&quot;;&quot;REQUIRE ALLOCATION GROUP ID AND NO LINKED SALE ID&quot;;&quot;REVIEW LINKAGE EVIDENCE — NO AUTHORITY CREATED&quot;)))))))">
            <text:p>NO ACTION — linkage status is UNKNOWN / not asserted</text:p>
          </table:table-cell>
          <table:table-cell office:value-type="string" table:formula="of:=IF([.S142]=&quot;CONTRADICTION&quot;;&quot;BLOCKED&quot;;IF([.S142]=&quot;UNKNOWN&quot;;&quot;UNKNOWN&quot;;IF([.S142]=&quot;CLEAR&quot;;IF(OR([.O142]=&quot;&quot;;[.P142]=&quot;&quot;);&quot;UNKNOWN&quot;;&quot;READY FOR REVIEW&quot;);&quot;BLOCKED&quot;)))">
            <text:p>UNKNOWN</text:p>
          </table:table-cell>
          <table:table-cell office:value-type="string" table:formula="of:=IF([.U142]=&quot;UNKNOWN&quot;;&quot;COMPLETE OR ASSERT REQUIRED EVIDENCE BEFORE REVIEW&quot;;IF([.U142]=&quot;BLOCKED&quot;;&quot;RESOLVE CONTRADICTION BEFORE REVIEW — NO AUTHORITY CREATED&quot;;IF([.U14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2]=&quot;READY FOR REVIEW&quot;;&quot;REVIEW ELIGIBLE — NO AUTHORITY&quot;;IF(OR([.U142]=&quot;UNKNOWN&quot;;[.U142]=&quot;BLOCKED&quot;);&quot;NOT REVIEW ELIGIBLE&quot;;&quot;NOT REVIEW ELIGIBLE&quot;))">
            <text:p>NOT REVIEW ELIGIBLE</text:p>
          </table:table-cell>
          <table:table-cell office:value-type="string" table:formula="of:=IF([.W142]=&quot;NOT REVIEW ELIGIBLE&quot;;&quot;DO NOT BEGIN SETTLEMENT REVIEW — RESOLVE READINESS OR CONTRADICTION CONDITIONS&quot;;IF([.W14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2]=&quot;&quot;;&quot;UNKNOWN&quot;;IF([.W142]&lt;&gt;&quot;REVIEW ELIGIBLE — NO AUTHORITY&quot;;&quot;BLOCKED — OUTCOME ASSERTED WITHOUT REVIEW ELIGIBILITY&quot;;IF(OR([.Y142]=&quot;REVIEWED — NO AUTHORITY&quot;;[.Y142]=&quot;REVIEW DEFERRED&quot;;[.Y14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3]=&quot;&quot;;IF(AND([.L143]=&quot;&quot;;[.N143]=&quot;&quot;);&quot;UNKNOWN&quot;;&quot;CONTRADICTION&quot;);IF([.M143]=&quot;UNMATCHED&quot;;IF(AND([.L143]=&quot;&quot;;[.N143]=&quot;&quot;);&quot;CLEAR&quot;;&quot;CONTRADICTION&quot;);IF([.M143]=&quot;SINGLE_SALE_LINKED&quot;;IF(AND([.L143]&lt;&gt;&quot;&quot;;[.N143]=&quot;&quot;);&quot;CLEAR&quot;;&quot;CONTRADICTION&quot;);IF([.M143]=&quot;MULTI_SALE_PENDING_ALLOCATION&quot;;IF([.L143]=&quot;&quot;;&quot;CLEAR&quot;;&quot;CONTRADICTION&quot;);IF([.M143]=&quot;ALLOCATED&quot;;IF(AND([.L143]=&quot;&quot;;[.N143]&lt;&gt;&quot;&quot;);&quot;CLEAR&quot;;&quot;CONTRADICTION&quot;);&quot;CONTRADICTION&quot;)))))">
            <text:p>UNKNOWN</text:p>
          </table:table-cell>
          <table:table-cell office:value-type="string" table:formula="of:=IF([.S143]=&quot;UNKNOWN&quot;;&quot;NO ACTION — linkage status is UNKNOWN / not asserted&quot;;IF([.S143]=&quot;CLEAR&quot;;&quot;NO CONTRADICTION — preserve evidence as entered&quot;;IF([.M143]=&quot;&quot;;&quot;REVIEW LINKAGE STATUS — identifiers are present while status is UNKNOWN&quot;;IF([.M143]=&quot;UNMATCHED&quot;;&quot;REMOVE LINKAGE IDENTIFIERS OR CORRECT LINKAGE STATUS&quot;;IF([.M143]=&quot;SINGLE_SALE_LINKED&quot;;&quot;REQUIRE LINKED SALE ID AND NO ALLOCATION GROUP ID&quot;;IF([.M143]=&quot;MULTI_SALE_PENDING_ALLOCATION&quot;;&quot;REMOVE LINKED SALE ID OR CORRECT LINKAGE STATUS&quot;;IF([.M143]=&quot;ALLOCATED&quot;;&quot;REQUIRE ALLOCATION GROUP ID AND NO LINKED SALE ID&quot;;&quot;REVIEW LINKAGE EVIDENCE — NO AUTHORITY CREATED&quot;)))))))">
            <text:p>NO ACTION — linkage status is UNKNOWN / not asserted</text:p>
          </table:table-cell>
          <table:table-cell office:value-type="string" table:formula="of:=IF([.S143]=&quot;CONTRADICTION&quot;;&quot;BLOCKED&quot;;IF([.S143]=&quot;UNKNOWN&quot;;&quot;UNKNOWN&quot;;IF([.S143]=&quot;CLEAR&quot;;IF(OR([.O143]=&quot;&quot;;[.P143]=&quot;&quot;);&quot;UNKNOWN&quot;;&quot;READY FOR REVIEW&quot;);&quot;BLOCKED&quot;)))">
            <text:p>UNKNOWN</text:p>
          </table:table-cell>
          <table:table-cell office:value-type="string" table:formula="of:=IF([.U143]=&quot;UNKNOWN&quot;;&quot;COMPLETE OR ASSERT REQUIRED EVIDENCE BEFORE REVIEW&quot;;IF([.U143]=&quot;BLOCKED&quot;;&quot;RESOLVE CONTRADICTION BEFORE REVIEW — NO AUTHORITY CREATED&quot;;IF([.U14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3]=&quot;READY FOR REVIEW&quot;;&quot;REVIEW ELIGIBLE — NO AUTHORITY&quot;;IF(OR([.U143]=&quot;UNKNOWN&quot;;[.U143]=&quot;BLOCKED&quot;);&quot;NOT REVIEW ELIGIBLE&quot;;&quot;NOT REVIEW ELIGIBLE&quot;))">
            <text:p>NOT REVIEW ELIGIBLE</text:p>
          </table:table-cell>
          <table:table-cell office:value-type="string" table:formula="of:=IF([.W143]=&quot;NOT REVIEW ELIGIBLE&quot;;&quot;DO NOT BEGIN SETTLEMENT REVIEW — RESOLVE READINESS OR CONTRADICTION CONDITIONS&quot;;IF([.W14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3]=&quot;&quot;;&quot;UNKNOWN&quot;;IF([.W143]&lt;&gt;&quot;REVIEW ELIGIBLE — NO AUTHORITY&quot;;&quot;BLOCKED — OUTCOME ASSERTED WITHOUT REVIEW ELIGIBILITY&quot;;IF(OR([.Y143]=&quot;REVIEWED — NO AUTHORITY&quot;;[.Y143]=&quot;REVIEW DEFERRED&quot;;[.Y14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4]=&quot;&quot;;IF(AND([.L144]=&quot;&quot;;[.N144]=&quot;&quot;);&quot;UNKNOWN&quot;;&quot;CONTRADICTION&quot;);IF([.M144]=&quot;UNMATCHED&quot;;IF(AND([.L144]=&quot;&quot;;[.N144]=&quot;&quot;);&quot;CLEAR&quot;;&quot;CONTRADICTION&quot;);IF([.M144]=&quot;SINGLE_SALE_LINKED&quot;;IF(AND([.L144]&lt;&gt;&quot;&quot;;[.N144]=&quot;&quot;);&quot;CLEAR&quot;;&quot;CONTRADICTION&quot;);IF([.M144]=&quot;MULTI_SALE_PENDING_ALLOCATION&quot;;IF([.L144]=&quot;&quot;;&quot;CLEAR&quot;;&quot;CONTRADICTION&quot;);IF([.M144]=&quot;ALLOCATED&quot;;IF(AND([.L144]=&quot;&quot;;[.N144]&lt;&gt;&quot;&quot;);&quot;CLEAR&quot;;&quot;CONTRADICTION&quot;);&quot;CONTRADICTION&quot;)))))">
            <text:p>UNKNOWN</text:p>
          </table:table-cell>
          <table:table-cell office:value-type="string" table:formula="of:=IF([.S144]=&quot;UNKNOWN&quot;;&quot;NO ACTION — linkage status is UNKNOWN / not asserted&quot;;IF([.S144]=&quot;CLEAR&quot;;&quot;NO CONTRADICTION — preserve evidence as entered&quot;;IF([.M144]=&quot;&quot;;&quot;REVIEW LINKAGE STATUS — identifiers are present while status is UNKNOWN&quot;;IF([.M144]=&quot;UNMATCHED&quot;;&quot;REMOVE LINKAGE IDENTIFIERS OR CORRECT LINKAGE STATUS&quot;;IF([.M144]=&quot;SINGLE_SALE_LINKED&quot;;&quot;REQUIRE LINKED SALE ID AND NO ALLOCATION GROUP ID&quot;;IF([.M144]=&quot;MULTI_SALE_PENDING_ALLOCATION&quot;;&quot;REMOVE LINKED SALE ID OR CORRECT LINKAGE STATUS&quot;;IF([.M144]=&quot;ALLOCATED&quot;;&quot;REQUIRE ALLOCATION GROUP ID AND NO LINKED SALE ID&quot;;&quot;REVIEW LINKAGE EVIDENCE — NO AUTHORITY CREATED&quot;)))))))">
            <text:p>NO ACTION — linkage status is UNKNOWN / not asserted</text:p>
          </table:table-cell>
          <table:table-cell office:value-type="string" table:formula="of:=IF([.S144]=&quot;CONTRADICTION&quot;;&quot;BLOCKED&quot;;IF([.S144]=&quot;UNKNOWN&quot;;&quot;UNKNOWN&quot;;IF([.S144]=&quot;CLEAR&quot;;IF(OR([.O144]=&quot;&quot;;[.P144]=&quot;&quot;);&quot;UNKNOWN&quot;;&quot;READY FOR REVIEW&quot;);&quot;BLOCKED&quot;)))">
            <text:p>UNKNOWN</text:p>
          </table:table-cell>
          <table:table-cell office:value-type="string" table:formula="of:=IF([.U144]=&quot;UNKNOWN&quot;;&quot;COMPLETE OR ASSERT REQUIRED EVIDENCE BEFORE REVIEW&quot;;IF([.U144]=&quot;BLOCKED&quot;;&quot;RESOLVE CONTRADICTION BEFORE REVIEW — NO AUTHORITY CREATED&quot;;IF([.U14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4]=&quot;READY FOR REVIEW&quot;;&quot;REVIEW ELIGIBLE — NO AUTHORITY&quot;;IF(OR([.U144]=&quot;UNKNOWN&quot;;[.U144]=&quot;BLOCKED&quot;);&quot;NOT REVIEW ELIGIBLE&quot;;&quot;NOT REVIEW ELIGIBLE&quot;))">
            <text:p>NOT REVIEW ELIGIBLE</text:p>
          </table:table-cell>
          <table:table-cell office:value-type="string" table:formula="of:=IF([.W144]=&quot;NOT REVIEW ELIGIBLE&quot;;&quot;DO NOT BEGIN SETTLEMENT REVIEW — RESOLVE READINESS OR CONTRADICTION CONDITIONS&quot;;IF([.W14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4]=&quot;&quot;;&quot;UNKNOWN&quot;;IF([.W144]&lt;&gt;&quot;REVIEW ELIGIBLE — NO AUTHORITY&quot;;&quot;BLOCKED — OUTCOME ASSERTED WITHOUT REVIEW ELIGIBILITY&quot;;IF(OR([.Y144]=&quot;REVIEWED — NO AUTHORITY&quot;;[.Y144]=&quot;REVIEW DEFERRED&quot;;[.Y14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5]=&quot;&quot;;IF(AND([.L145]=&quot;&quot;;[.N145]=&quot;&quot;);&quot;UNKNOWN&quot;;&quot;CONTRADICTION&quot;);IF([.M145]=&quot;UNMATCHED&quot;;IF(AND([.L145]=&quot;&quot;;[.N145]=&quot;&quot;);&quot;CLEAR&quot;;&quot;CONTRADICTION&quot;);IF([.M145]=&quot;SINGLE_SALE_LINKED&quot;;IF(AND([.L145]&lt;&gt;&quot;&quot;;[.N145]=&quot;&quot;);&quot;CLEAR&quot;;&quot;CONTRADICTION&quot;);IF([.M145]=&quot;MULTI_SALE_PENDING_ALLOCATION&quot;;IF([.L145]=&quot;&quot;;&quot;CLEAR&quot;;&quot;CONTRADICTION&quot;);IF([.M145]=&quot;ALLOCATED&quot;;IF(AND([.L145]=&quot;&quot;;[.N145]&lt;&gt;&quot;&quot;);&quot;CLEAR&quot;;&quot;CONTRADICTION&quot;);&quot;CONTRADICTION&quot;)))))">
            <text:p>UNKNOWN</text:p>
          </table:table-cell>
          <table:table-cell office:value-type="string" table:formula="of:=IF([.S145]=&quot;UNKNOWN&quot;;&quot;NO ACTION — linkage status is UNKNOWN / not asserted&quot;;IF([.S145]=&quot;CLEAR&quot;;&quot;NO CONTRADICTION — preserve evidence as entered&quot;;IF([.M145]=&quot;&quot;;&quot;REVIEW LINKAGE STATUS — identifiers are present while status is UNKNOWN&quot;;IF([.M145]=&quot;UNMATCHED&quot;;&quot;REMOVE LINKAGE IDENTIFIERS OR CORRECT LINKAGE STATUS&quot;;IF([.M145]=&quot;SINGLE_SALE_LINKED&quot;;&quot;REQUIRE LINKED SALE ID AND NO ALLOCATION GROUP ID&quot;;IF([.M145]=&quot;MULTI_SALE_PENDING_ALLOCATION&quot;;&quot;REMOVE LINKED SALE ID OR CORRECT LINKAGE STATUS&quot;;IF([.M145]=&quot;ALLOCATED&quot;;&quot;REQUIRE ALLOCATION GROUP ID AND NO LINKED SALE ID&quot;;&quot;REVIEW LINKAGE EVIDENCE — NO AUTHORITY CREATED&quot;)))))))">
            <text:p>NO ACTION — linkage status is UNKNOWN / not asserted</text:p>
          </table:table-cell>
          <table:table-cell office:value-type="string" table:formula="of:=IF([.S145]=&quot;CONTRADICTION&quot;;&quot;BLOCKED&quot;;IF([.S145]=&quot;UNKNOWN&quot;;&quot;UNKNOWN&quot;;IF([.S145]=&quot;CLEAR&quot;;IF(OR([.O145]=&quot;&quot;;[.P145]=&quot;&quot;);&quot;UNKNOWN&quot;;&quot;READY FOR REVIEW&quot;);&quot;BLOCKED&quot;)))">
            <text:p>UNKNOWN</text:p>
          </table:table-cell>
          <table:table-cell office:value-type="string" table:formula="of:=IF([.U145]=&quot;UNKNOWN&quot;;&quot;COMPLETE OR ASSERT REQUIRED EVIDENCE BEFORE REVIEW&quot;;IF([.U145]=&quot;BLOCKED&quot;;&quot;RESOLVE CONTRADICTION BEFORE REVIEW — NO AUTHORITY CREATED&quot;;IF([.U14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5]=&quot;READY FOR REVIEW&quot;;&quot;REVIEW ELIGIBLE — NO AUTHORITY&quot;;IF(OR([.U145]=&quot;UNKNOWN&quot;;[.U145]=&quot;BLOCKED&quot;);&quot;NOT REVIEW ELIGIBLE&quot;;&quot;NOT REVIEW ELIGIBLE&quot;))">
            <text:p>NOT REVIEW ELIGIBLE</text:p>
          </table:table-cell>
          <table:table-cell office:value-type="string" table:formula="of:=IF([.W145]=&quot;NOT REVIEW ELIGIBLE&quot;;&quot;DO NOT BEGIN SETTLEMENT REVIEW — RESOLVE READINESS OR CONTRADICTION CONDITIONS&quot;;IF([.W14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5]=&quot;&quot;;&quot;UNKNOWN&quot;;IF([.W145]&lt;&gt;&quot;REVIEW ELIGIBLE — NO AUTHORITY&quot;;&quot;BLOCKED — OUTCOME ASSERTED WITHOUT REVIEW ELIGIBILITY&quot;;IF(OR([.Y145]=&quot;REVIEWED — NO AUTHORITY&quot;;[.Y145]=&quot;REVIEW DEFERRED&quot;;[.Y14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6]=&quot;&quot;;IF(AND([.L146]=&quot;&quot;;[.N146]=&quot;&quot;);&quot;UNKNOWN&quot;;&quot;CONTRADICTION&quot;);IF([.M146]=&quot;UNMATCHED&quot;;IF(AND([.L146]=&quot;&quot;;[.N146]=&quot;&quot;);&quot;CLEAR&quot;;&quot;CONTRADICTION&quot;);IF([.M146]=&quot;SINGLE_SALE_LINKED&quot;;IF(AND([.L146]&lt;&gt;&quot;&quot;;[.N146]=&quot;&quot;);&quot;CLEAR&quot;;&quot;CONTRADICTION&quot;);IF([.M146]=&quot;MULTI_SALE_PENDING_ALLOCATION&quot;;IF([.L146]=&quot;&quot;;&quot;CLEAR&quot;;&quot;CONTRADICTION&quot;);IF([.M146]=&quot;ALLOCATED&quot;;IF(AND([.L146]=&quot;&quot;;[.N146]&lt;&gt;&quot;&quot;);&quot;CLEAR&quot;;&quot;CONTRADICTION&quot;);&quot;CONTRADICTION&quot;)))))">
            <text:p>UNKNOWN</text:p>
          </table:table-cell>
          <table:table-cell office:value-type="string" table:formula="of:=IF([.S146]=&quot;UNKNOWN&quot;;&quot;NO ACTION — linkage status is UNKNOWN / not asserted&quot;;IF([.S146]=&quot;CLEAR&quot;;&quot;NO CONTRADICTION — preserve evidence as entered&quot;;IF([.M146]=&quot;&quot;;&quot;REVIEW LINKAGE STATUS — identifiers are present while status is UNKNOWN&quot;;IF([.M146]=&quot;UNMATCHED&quot;;&quot;REMOVE LINKAGE IDENTIFIERS OR CORRECT LINKAGE STATUS&quot;;IF([.M146]=&quot;SINGLE_SALE_LINKED&quot;;&quot;REQUIRE LINKED SALE ID AND NO ALLOCATION GROUP ID&quot;;IF([.M146]=&quot;MULTI_SALE_PENDING_ALLOCATION&quot;;&quot;REMOVE LINKED SALE ID OR CORRECT LINKAGE STATUS&quot;;IF([.M146]=&quot;ALLOCATED&quot;;&quot;REQUIRE ALLOCATION GROUP ID AND NO LINKED SALE ID&quot;;&quot;REVIEW LINKAGE EVIDENCE — NO AUTHORITY CREATED&quot;)))))))">
            <text:p>NO ACTION — linkage status is UNKNOWN / not asserted</text:p>
          </table:table-cell>
          <table:table-cell office:value-type="string" table:formula="of:=IF([.S146]=&quot;CONTRADICTION&quot;;&quot;BLOCKED&quot;;IF([.S146]=&quot;UNKNOWN&quot;;&quot;UNKNOWN&quot;;IF([.S146]=&quot;CLEAR&quot;;IF(OR([.O146]=&quot;&quot;;[.P146]=&quot;&quot;);&quot;UNKNOWN&quot;;&quot;READY FOR REVIEW&quot;);&quot;BLOCKED&quot;)))">
            <text:p>UNKNOWN</text:p>
          </table:table-cell>
          <table:table-cell office:value-type="string" table:formula="of:=IF([.U146]=&quot;UNKNOWN&quot;;&quot;COMPLETE OR ASSERT REQUIRED EVIDENCE BEFORE REVIEW&quot;;IF([.U146]=&quot;BLOCKED&quot;;&quot;RESOLVE CONTRADICTION BEFORE REVIEW — NO AUTHORITY CREATED&quot;;IF([.U14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6]=&quot;READY FOR REVIEW&quot;;&quot;REVIEW ELIGIBLE — NO AUTHORITY&quot;;IF(OR([.U146]=&quot;UNKNOWN&quot;;[.U146]=&quot;BLOCKED&quot;);&quot;NOT REVIEW ELIGIBLE&quot;;&quot;NOT REVIEW ELIGIBLE&quot;))">
            <text:p>NOT REVIEW ELIGIBLE</text:p>
          </table:table-cell>
          <table:table-cell office:value-type="string" table:formula="of:=IF([.W146]=&quot;NOT REVIEW ELIGIBLE&quot;;&quot;DO NOT BEGIN SETTLEMENT REVIEW — RESOLVE READINESS OR CONTRADICTION CONDITIONS&quot;;IF([.W14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6]=&quot;&quot;;&quot;UNKNOWN&quot;;IF([.W146]&lt;&gt;&quot;REVIEW ELIGIBLE — NO AUTHORITY&quot;;&quot;BLOCKED — OUTCOME ASSERTED WITHOUT REVIEW ELIGIBILITY&quot;;IF(OR([.Y146]=&quot;REVIEWED — NO AUTHORITY&quot;;[.Y146]=&quot;REVIEW DEFERRED&quot;;[.Y14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7]=&quot;&quot;;IF(AND([.L147]=&quot;&quot;;[.N147]=&quot;&quot;);&quot;UNKNOWN&quot;;&quot;CONTRADICTION&quot;);IF([.M147]=&quot;UNMATCHED&quot;;IF(AND([.L147]=&quot;&quot;;[.N147]=&quot;&quot;);&quot;CLEAR&quot;;&quot;CONTRADICTION&quot;);IF([.M147]=&quot;SINGLE_SALE_LINKED&quot;;IF(AND([.L147]&lt;&gt;&quot;&quot;;[.N147]=&quot;&quot;);&quot;CLEAR&quot;;&quot;CONTRADICTION&quot;);IF([.M147]=&quot;MULTI_SALE_PENDING_ALLOCATION&quot;;IF([.L147]=&quot;&quot;;&quot;CLEAR&quot;;&quot;CONTRADICTION&quot;);IF([.M147]=&quot;ALLOCATED&quot;;IF(AND([.L147]=&quot;&quot;;[.N147]&lt;&gt;&quot;&quot;);&quot;CLEAR&quot;;&quot;CONTRADICTION&quot;);&quot;CONTRADICTION&quot;)))))">
            <text:p>UNKNOWN</text:p>
          </table:table-cell>
          <table:table-cell office:value-type="string" table:formula="of:=IF([.S147]=&quot;UNKNOWN&quot;;&quot;NO ACTION — linkage status is UNKNOWN / not asserted&quot;;IF([.S147]=&quot;CLEAR&quot;;&quot;NO CONTRADICTION — preserve evidence as entered&quot;;IF([.M147]=&quot;&quot;;&quot;REVIEW LINKAGE STATUS — identifiers are present while status is UNKNOWN&quot;;IF([.M147]=&quot;UNMATCHED&quot;;&quot;REMOVE LINKAGE IDENTIFIERS OR CORRECT LINKAGE STATUS&quot;;IF([.M147]=&quot;SINGLE_SALE_LINKED&quot;;&quot;REQUIRE LINKED SALE ID AND NO ALLOCATION GROUP ID&quot;;IF([.M147]=&quot;MULTI_SALE_PENDING_ALLOCATION&quot;;&quot;REMOVE LINKED SALE ID OR CORRECT LINKAGE STATUS&quot;;IF([.M147]=&quot;ALLOCATED&quot;;&quot;REQUIRE ALLOCATION GROUP ID AND NO LINKED SALE ID&quot;;&quot;REVIEW LINKAGE EVIDENCE — NO AUTHORITY CREATED&quot;)))))))">
            <text:p>NO ACTION — linkage status is UNKNOWN / not asserted</text:p>
          </table:table-cell>
          <table:table-cell office:value-type="string" table:formula="of:=IF([.S147]=&quot;CONTRADICTION&quot;;&quot;BLOCKED&quot;;IF([.S147]=&quot;UNKNOWN&quot;;&quot;UNKNOWN&quot;;IF([.S147]=&quot;CLEAR&quot;;IF(OR([.O147]=&quot;&quot;;[.P147]=&quot;&quot;);&quot;UNKNOWN&quot;;&quot;READY FOR REVIEW&quot;);&quot;BLOCKED&quot;)))">
            <text:p>UNKNOWN</text:p>
          </table:table-cell>
          <table:table-cell office:value-type="string" table:formula="of:=IF([.U147]=&quot;UNKNOWN&quot;;&quot;COMPLETE OR ASSERT REQUIRED EVIDENCE BEFORE REVIEW&quot;;IF([.U147]=&quot;BLOCKED&quot;;&quot;RESOLVE CONTRADICTION BEFORE REVIEW — NO AUTHORITY CREATED&quot;;IF([.U14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7]=&quot;READY FOR REVIEW&quot;;&quot;REVIEW ELIGIBLE — NO AUTHORITY&quot;;IF(OR([.U147]=&quot;UNKNOWN&quot;;[.U147]=&quot;BLOCKED&quot;);&quot;NOT REVIEW ELIGIBLE&quot;;&quot;NOT REVIEW ELIGIBLE&quot;))">
            <text:p>NOT REVIEW ELIGIBLE</text:p>
          </table:table-cell>
          <table:table-cell office:value-type="string" table:formula="of:=IF([.W147]=&quot;NOT REVIEW ELIGIBLE&quot;;&quot;DO NOT BEGIN SETTLEMENT REVIEW — RESOLVE READINESS OR CONTRADICTION CONDITIONS&quot;;IF([.W14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7]=&quot;&quot;;&quot;UNKNOWN&quot;;IF([.W147]&lt;&gt;&quot;REVIEW ELIGIBLE — NO AUTHORITY&quot;;&quot;BLOCKED — OUTCOME ASSERTED WITHOUT REVIEW ELIGIBILITY&quot;;IF(OR([.Y147]=&quot;REVIEWED — NO AUTHORITY&quot;;[.Y147]=&quot;REVIEW DEFERRED&quot;;[.Y14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8]=&quot;&quot;;IF(AND([.L148]=&quot;&quot;;[.N148]=&quot;&quot;);&quot;UNKNOWN&quot;;&quot;CONTRADICTION&quot;);IF([.M148]=&quot;UNMATCHED&quot;;IF(AND([.L148]=&quot;&quot;;[.N148]=&quot;&quot;);&quot;CLEAR&quot;;&quot;CONTRADICTION&quot;);IF([.M148]=&quot;SINGLE_SALE_LINKED&quot;;IF(AND([.L148]&lt;&gt;&quot;&quot;;[.N148]=&quot;&quot;);&quot;CLEAR&quot;;&quot;CONTRADICTION&quot;);IF([.M148]=&quot;MULTI_SALE_PENDING_ALLOCATION&quot;;IF([.L148]=&quot;&quot;;&quot;CLEAR&quot;;&quot;CONTRADICTION&quot;);IF([.M148]=&quot;ALLOCATED&quot;;IF(AND([.L148]=&quot;&quot;;[.N148]&lt;&gt;&quot;&quot;);&quot;CLEAR&quot;;&quot;CONTRADICTION&quot;);&quot;CONTRADICTION&quot;)))))">
            <text:p>UNKNOWN</text:p>
          </table:table-cell>
          <table:table-cell office:value-type="string" table:formula="of:=IF([.S148]=&quot;UNKNOWN&quot;;&quot;NO ACTION — linkage status is UNKNOWN / not asserted&quot;;IF([.S148]=&quot;CLEAR&quot;;&quot;NO CONTRADICTION — preserve evidence as entered&quot;;IF([.M148]=&quot;&quot;;&quot;REVIEW LINKAGE STATUS — identifiers are present while status is UNKNOWN&quot;;IF([.M148]=&quot;UNMATCHED&quot;;&quot;REMOVE LINKAGE IDENTIFIERS OR CORRECT LINKAGE STATUS&quot;;IF([.M148]=&quot;SINGLE_SALE_LINKED&quot;;&quot;REQUIRE LINKED SALE ID AND NO ALLOCATION GROUP ID&quot;;IF([.M148]=&quot;MULTI_SALE_PENDING_ALLOCATION&quot;;&quot;REMOVE LINKED SALE ID OR CORRECT LINKAGE STATUS&quot;;IF([.M148]=&quot;ALLOCATED&quot;;&quot;REQUIRE ALLOCATION GROUP ID AND NO LINKED SALE ID&quot;;&quot;REVIEW LINKAGE EVIDENCE — NO AUTHORITY CREATED&quot;)))))))">
            <text:p>NO ACTION — linkage status is UNKNOWN / not asserted</text:p>
          </table:table-cell>
          <table:table-cell office:value-type="string" table:formula="of:=IF([.S148]=&quot;CONTRADICTION&quot;;&quot;BLOCKED&quot;;IF([.S148]=&quot;UNKNOWN&quot;;&quot;UNKNOWN&quot;;IF([.S148]=&quot;CLEAR&quot;;IF(OR([.O148]=&quot;&quot;;[.P148]=&quot;&quot;);&quot;UNKNOWN&quot;;&quot;READY FOR REVIEW&quot;);&quot;BLOCKED&quot;)))">
            <text:p>UNKNOWN</text:p>
          </table:table-cell>
          <table:table-cell office:value-type="string" table:formula="of:=IF([.U148]=&quot;UNKNOWN&quot;;&quot;COMPLETE OR ASSERT REQUIRED EVIDENCE BEFORE REVIEW&quot;;IF([.U148]=&quot;BLOCKED&quot;;&quot;RESOLVE CONTRADICTION BEFORE REVIEW — NO AUTHORITY CREATED&quot;;IF([.U14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8]=&quot;READY FOR REVIEW&quot;;&quot;REVIEW ELIGIBLE — NO AUTHORITY&quot;;IF(OR([.U148]=&quot;UNKNOWN&quot;;[.U148]=&quot;BLOCKED&quot;);&quot;NOT REVIEW ELIGIBLE&quot;;&quot;NOT REVIEW ELIGIBLE&quot;))">
            <text:p>NOT REVIEW ELIGIBLE</text:p>
          </table:table-cell>
          <table:table-cell office:value-type="string" table:formula="of:=IF([.W148]=&quot;NOT REVIEW ELIGIBLE&quot;;&quot;DO NOT BEGIN SETTLEMENT REVIEW — RESOLVE READINESS OR CONTRADICTION CONDITIONS&quot;;IF([.W14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8]=&quot;&quot;;&quot;UNKNOWN&quot;;IF([.W148]&lt;&gt;&quot;REVIEW ELIGIBLE — NO AUTHORITY&quot;;&quot;BLOCKED — OUTCOME ASSERTED WITHOUT REVIEW ELIGIBILITY&quot;;IF(OR([.Y148]=&quot;REVIEWED — NO AUTHORITY&quot;;[.Y148]=&quot;REVIEW DEFERRED&quot;;[.Y14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49]=&quot;&quot;;IF(AND([.L149]=&quot;&quot;;[.N149]=&quot;&quot;);&quot;UNKNOWN&quot;;&quot;CONTRADICTION&quot;);IF([.M149]=&quot;UNMATCHED&quot;;IF(AND([.L149]=&quot;&quot;;[.N149]=&quot;&quot;);&quot;CLEAR&quot;;&quot;CONTRADICTION&quot;);IF([.M149]=&quot;SINGLE_SALE_LINKED&quot;;IF(AND([.L149]&lt;&gt;&quot;&quot;;[.N149]=&quot;&quot;);&quot;CLEAR&quot;;&quot;CONTRADICTION&quot;);IF([.M149]=&quot;MULTI_SALE_PENDING_ALLOCATION&quot;;IF([.L149]=&quot;&quot;;&quot;CLEAR&quot;;&quot;CONTRADICTION&quot;);IF([.M149]=&quot;ALLOCATED&quot;;IF(AND([.L149]=&quot;&quot;;[.N149]&lt;&gt;&quot;&quot;);&quot;CLEAR&quot;;&quot;CONTRADICTION&quot;);&quot;CONTRADICTION&quot;)))))">
            <text:p>UNKNOWN</text:p>
          </table:table-cell>
          <table:table-cell office:value-type="string" table:formula="of:=IF([.S149]=&quot;UNKNOWN&quot;;&quot;NO ACTION — linkage status is UNKNOWN / not asserted&quot;;IF([.S149]=&quot;CLEAR&quot;;&quot;NO CONTRADICTION — preserve evidence as entered&quot;;IF([.M149]=&quot;&quot;;&quot;REVIEW LINKAGE STATUS — identifiers are present while status is UNKNOWN&quot;;IF([.M149]=&quot;UNMATCHED&quot;;&quot;REMOVE LINKAGE IDENTIFIERS OR CORRECT LINKAGE STATUS&quot;;IF([.M149]=&quot;SINGLE_SALE_LINKED&quot;;&quot;REQUIRE LINKED SALE ID AND NO ALLOCATION GROUP ID&quot;;IF([.M149]=&quot;MULTI_SALE_PENDING_ALLOCATION&quot;;&quot;REMOVE LINKED SALE ID OR CORRECT LINKAGE STATUS&quot;;IF([.M149]=&quot;ALLOCATED&quot;;&quot;REQUIRE ALLOCATION GROUP ID AND NO LINKED SALE ID&quot;;&quot;REVIEW LINKAGE EVIDENCE — NO AUTHORITY CREATED&quot;)))))))">
            <text:p>NO ACTION — linkage status is UNKNOWN / not asserted</text:p>
          </table:table-cell>
          <table:table-cell office:value-type="string" table:formula="of:=IF([.S149]=&quot;CONTRADICTION&quot;;&quot;BLOCKED&quot;;IF([.S149]=&quot;UNKNOWN&quot;;&quot;UNKNOWN&quot;;IF([.S149]=&quot;CLEAR&quot;;IF(OR([.O149]=&quot;&quot;;[.P149]=&quot;&quot;);&quot;UNKNOWN&quot;;&quot;READY FOR REVIEW&quot;);&quot;BLOCKED&quot;)))">
            <text:p>UNKNOWN</text:p>
          </table:table-cell>
          <table:table-cell office:value-type="string" table:formula="of:=IF([.U149]=&quot;UNKNOWN&quot;;&quot;COMPLETE OR ASSERT REQUIRED EVIDENCE BEFORE REVIEW&quot;;IF([.U149]=&quot;BLOCKED&quot;;&quot;RESOLVE CONTRADICTION BEFORE REVIEW — NO AUTHORITY CREATED&quot;;IF([.U14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49]=&quot;READY FOR REVIEW&quot;;&quot;REVIEW ELIGIBLE — NO AUTHORITY&quot;;IF(OR([.U149]=&quot;UNKNOWN&quot;;[.U149]=&quot;BLOCKED&quot;);&quot;NOT REVIEW ELIGIBLE&quot;;&quot;NOT REVIEW ELIGIBLE&quot;))">
            <text:p>NOT REVIEW ELIGIBLE</text:p>
          </table:table-cell>
          <table:table-cell office:value-type="string" table:formula="of:=IF([.W149]=&quot;NOT REVIEW ELIGIBLE&quot;;&quot;DO NOT BEGIN SETTLEMENT REVIEW — RESOLVE READINESS OR CONTRADICTION CONDITIONS&quot;;IF([.W14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49]=&quot;&quot;;&quot;UNKNOWN&quot;;IF([.W149]&lt;&gt;&quot;REVIEW ELIGIBLE — NO AUTHORITY&quot;;&quot;BLOCKED — OUTCOME ASSERTED WITHOUT REVIEW ELIGIBILITY&quot;;IF(OR([.Y149]=&quot;REVIEWED — NO AUTHORITY&quot;;[.Y149]=&quot;REVIEW DEFERRED&quot;;[.Y14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0]=&quot;&quot;;IF(AND([.L150]=&quot;&quot;;[.N150]=&quot;&quot;);&quot;UNKNOWN&quot;;&quot;CONTRADICTION&quot;);IF([.M150]=&quot;UNMATCHED&quot;;IF(AND([.L150]=&quot;&quot;;[.N150]=&quot;&quot;);&quot;CLEAR&quot;;&quot;CONTRADICTION&quot;);IF([.M150]=&quot;SINGLE_SALE_LINKED&quot;;IF(AND([.L150]&lt;&gt;&quot;&quot;;[.N150]=&quot;&quot;);&quot;CLEAR&quot;;&quot;CONTRADICTION&quot;);IF([.M150]=&quot;MULTI_SALE_PENDING_ALLOCATION&quot;;IF([.L150]=&quot;&quot;;&quot;CLEAR&quot;;&quot;CONTRADICTION&quot;);IF([.M150]=&quot;ALLOCATED&quot;;IF(AND([.L150]=&quot;&quot;;[.N150]&lt;&gt;&quot;&quot;);&quot;CLEAR&quot;;&quot;CONTRADICTION&quot;);&quot;CONTRADICTION&quot;)))))">
            <text:p>UNKNOWN</text:p>
          </table:table-cell>
          <table:table-cell office:value-type="string" table:formula="of:=IF([.S150]=&quot;UNKNOWN&quot;;&quot;NO ACTION — linkage status is UNKNOWN / not asserted&quot;;IF([.S150]=&quot;CLEAR&quot;;&quot;NO CONTRADICTION — preserve evidence as entered&quot;;IF([.M150]=&quot;&quot;;&quot;REVIEW LINKAGE STATUS — identifiers are present while status is UNKNOWN&quot;;IF([.M150]=&quot;UNMATCHED&quot;;&quot;REMOVE LINKAGE IDENTIFIERS OR CORRECT LINKAGE STATUS&quot;;IF([.M150]=&quot;SINGLE_SALE_LINKED&quot;;&quot;REQUIRE LINKED SALE ID AND NO ALLOCATION GROUP ID&quot;;IF([.M150]=&quot;MULTI_SALE_PENDING_ALLOCATION&quot;;&quot;REMOVE LINKED SALE ID OR CORRECT LINKAGE STATUS&quot;;IF([.M150]=&quot;ALLOCATED&quot;;&quot;REQUIRE ALLOCATION GROUP ID AND NO LINKED SALE ID&quot;;&quot;REVIEW LINKAGE EVIDENCE — NO AUTHORITY CREATED&quot;)))))))">
            <text:p>NO ACTION — linkage status is UNKNOWN / not asserted</text:p>
          </table:table-cell>
          <table:table-cell office:value-type="string" table:formula="of:=IF([.S150]=&quot;CONTRADICTION&quot;;&quot;BLOCKED&quot;;IF([.S150]=&quot;UNKNOWN&quot;;&quot;UNKNOWN&quot;;IF([.S150]=&quot;CLEAR&quot;;IF(OR([.O150]=&quot;&quot;;[.P150]=&quot;&quot;);&quot;UNKNOWN&quot;;&quot;READY FOR REVIEW&quot;);&quot;BLOCKED&quot;)))">
            <text:p>UNKNOWN</text:p>
          </table:table-cell>
          <table:table-cell office:value-type="string" table:formula="of:=IF([.U150]=&quot;UNKNOWN&quot;;&quot;COMPLETE OR ASSERT REQUIRED EVIDENCE BEFORE REVIEW&quot;;IF([.U150]=&quot;BLOCKED&quot;;&quot;RESOLVE CONTRADICTION BEFORE REVIEW — NO AUTHORITY CREATED&quot;;IF([.U15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0]=&quot;READY FOR REVIEW&quot;;&quot;REVIEW ELIGIBLE — NO AUTHORITY&quot;;IF(OR([.U150]=&quot;UNKNOWN&quot;;[.U150]=&quot;BLOCKED&quot;);&quot;NOT REVIEW ELIGIBLE&quot;;&quot;NOT REVIEW ELIGIBLE&quot;))">
            <text:p>NOT REVIEW ELIGIBLE</text:p>
          </table:table-cell>
          <table:table-cell office:value-type="string" table:formula="of:=IF([.W150]=&quot;NOT REVIEW ELIGIBLE&quot;;&quot;DO NOT BEGIN SETTLEMENT REVIEW — RESOLVE READINESS OR CONTRADICTION CONDITIONS&quot;;IF([.W15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0]=&quot;&quot;;&quot;UNKNOWN&quot;;IF([.W150]&lt;&gt;&quot;REVIEW ELIGIBLE — NO AUTHORITY&quot;;&quot;BLOCKED — OUTCOME ASSERTED WITHOUT REVIEW ELIGIBILITY&quot;;IF(OR([.Y150]=&quot;REVIEWED — NO AUTHORITY&quot;;[.Y150]=&quot;REVIEW DEFERRED&quot;;[.Y15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1]=&quot;&quot;;IF(AND([.L151]=&quot;&quot;;[.N151]=&quot;&quot;);&quot;UNKNOWN&quot;;&quot;CONTRADICTION&quot;);IF([.M151]=&quot;UNMATCHED&quot;;IF(AND([.L151]=&quot;&quot;;[.N151]=&quot;&quot;);&quot;CLEAR&quot;;&quot;CONTRADICTION&quot;);IF([.M151]=&quot;SINGLE_SALE_LINKED&quot;;IF(AND([.L151]&lt;&gt;&quot;&quot;;[.N151]=&quot;&quot;);&quot;CLEAR&quot;;&quot;CONTRADICTION&quot;);IF([.M151]=&quot;MULTI_SALE_PENDING_ALLOCATION&quot;;IF([.L151]=&quot;&quot;;&quot;CLEAR&quot;;&quot;CONTRADICTION&quot;);IF([.M151]=&quot;ALLOCATED&quot;;IF(AND([.L151]=&quot;&quot;;[.N151]&lt;&gt;&quot;&quot;);&quot;CLEAR&quot;;&quot;CONTRADICTION&quot;);&quot;CONTRADICTION&quot;)))))">
            <text:p>UNKNOWN</text:p>
          </table:table-cell>
          <table:table-cell office:value-type="string" table:formula="of:=IF([.S151]=&quot;UNKNOWN&quot;;&quot;NO ACTION — linkage status is UNKNOWN / not asserted&quot;;IF([.S151]=&quot;CLEAR&quot;;&quot;NO CONTRADICTION — preserve evidence as entered&quot;;IF([.M151]=&quot;&quot;;&quot;REVIEW LINKAGE STATUS — identifiers are present while status is UNKNOWN&quot;;IF([.M151]=&quot;UNMATCHED&quot;;&quot;REMOVE LINKAGE IDENTIFIERS OR CORRECT LINKAGE STATUS&quot;;IF([.M151]=&quot;SINGLE_SALE_LINKED&quot;;&quot;REQUIRE LINKED SALE ID AND NO ALLOCATION GROUP ID&quot;;IF([.M151]=&quot;MULTI_SALE_PENDING_ALLOCATION&quot;;&quot;REMOVE LINKED SALE ID OR CORRECT LINKAGE STATUS&quot;;IF([.M151]=&quot;ALLOCATED&quot;;&quot;REQUIRE ALLOCATION GROUP ID AND NO LINKED SALE ID&quot;;&quot;REVIEW LINKAGE EVIDENCE — NO AUTHORITY CREATED&quot;)))))))">
            <text:p>NO ACTION — linkage status is UNKNOWN / not asserted</text:p>
          </table:table-cell>
          <table:table-cell office:value-type="string" table:formula="of:=IF([.S151]=&quot;CONTRADICTION&quot;;&quot;BLOCKED&quot;;IF([.S151]=&quot;UNKNOWN&quot;;&quot;UNKNOWN&quot;;IF([.S151]=&quot;CLEAR&quot;;IF(OR([.O151]=&quot;&quot;;[.P151]=&quot;&quot;);&quot;UNKNOWN&quot;;&quot;READY FOR REVIEW&quot;);&quot;BLOCKED&quot;)))">
            <text:p>UNKNOWN</text:p>
          </table:table-cell>
          <table:table-cell office:value-type="string" table:formula="of:=IF([.U151]=&quot;UNKNOWN&quot;;&quot;COMPLETE OR ASSERT REQUIRED EVIDENCE BEFORE REVIEW&quot;;IF([.U151]=&quot;BLOCKED&quot;;&quot;RESOLVE CONTRADICTION BEFORE REVIEW — NO AUTHORITY CREATED&quot;;IF([.U15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1]=&quot;READY FOR REVIEW&quot;;&quot;REVIEW ELIGIBLE — NO AUTHORITY&quot;;IF(OR([.U151]=&quot;UNKNOWN&quot;;[.U151]=&quot;BLOCKED&quot;);&quot;NOT REVIEW ELIGIBLE&quot;;&quot;NOT REVIEW ELIGIBLE&quot;))">
            <text:p>NOT REVIEW ELIGIBLE</text:p>
          </table:table-cell>
          <table:table-cell office:value-type="string" table:formula="of:=IF([.W151]=&quot;NOT REVIEW ELIGIBLE&quot;;&quot;DO NOT BEGIN SETTLEMENT REVIEW — RESOLVE READINESS OR CONTRADICTION CONDITIONS&quot;;IF([.W15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1]=&quot;&quot;;&quot;UNKNOWN&quot;;IF([.W151]&lt;&gt;&quot;REVIEW ELIGIBLE — NO AUTHORITY&quot;;&quot;BLOCKED — OUTCOME ASSERTED WITHOUT REVIEW ELIGIBILITY&quot;;IF(OR([.Y151]=&quot;REVIEWED — NO AUTHORITY&quot;;[.Y151]=&quot;REVIEW DEFERRED&quot;;[.Y151]=&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2]=&quot;&quot;;IF(AND([.L152]=&quot;&quot;;[.N152]=&quot;&quot;);&quot;UNKNOWN&quot;;&quot;CONTRADICTION&quot;);IF([.M152]=&quot;UNMATCHED&quot;;IF(AND([.L152]=&quot;&quot;;[.N152]=&quot;&quot;);&quot;CLEAR&quot;;&quot;CONTRADICTION&quot;);IF([.M152]=&quot;SINGLE_SALE_LINKED&quot;;IF(AND([.L152]&lt;&gt;&quot;&quot;;[.N152]=&quot;&quot;);&quot;CLEAR&quot;;&quot;CONTRADICTION&quot;);IF([.M152]=&quot;MULTI_SALE_PENDING_ALLOCATION&quot;;IF([.L152]=&quot;&quot;;&quot;CLEAR&quot;;&quot;CONTRADICTION&quot;);IF([.M152]=&quot;ALLOCATED&quot;;IF(AND([.L152]=&quot;&quot;;[.N152]&lt;&gt;&quot;&quot;);&quot;CLEAR&quot;;&quot;CONTRADICTION&quot;);&quot;CONTRADICTION&quot;)))))">
            <text:p>UNKNOWN</text:p>
          </table:table-cell>
          <table:table-cell office:value-type="string" table:formula="of:=IF([.S152]=&quot;UNKNOWN&quot;;&quot;NO ACTION — linkage status is UNKNOWN / not asserted&quot;;IF([.S152]=&quot;CLEAR&quot;;&quot;NO CONTRADICTION — preserve evidence as entered&quot;;IF([.M152]=&quot;&quot;;&quot;REVIEW LINKAGE STATUS — identifiers are present while status is UNKNOWN&quot;;IF([.M152]=&quot;UNMATCHED&quot;;&quot;REMOVE LINKAGE IDENTIFIERS OR CORRECT LINKAGE STATUS&quot;;IF([.M152]=&quot;SINGLE_SALE_LINKED&quot;;&quot;REQUIRE LINKED SALE ID AND NO ALLOCATION GROUP ID&quot;;IF([.M152]=&quot;MULTI_SALE_PENDING_ALLOCATION&quot;;&quot;REMOVE LINKED SALE ID OR CORRECT LINKAGE STATUS&quot;;IF([.M152]=&quot;ALLOCATED&quot;;&quot;REQUIRE ALLOCATION GROUP ID AND NO LINKED SALE ID&quot;;&quot;REVIEW LINKAGE EVIDENCE — NO AUTHORITY CREATED&quot;)))))))">
            <text:p>NO ACTION — linkage status is UNKNOWN / not asserted</text:p>
          </table:table-cell>
          <table:table-cell office:value-type="string" table:formula="of:=IF([.S152]=&quot;CONTRADICTION&quot;;&quot;BLOCKED&quot;;IF([.S152]=&quot;UNKNOWN&quot;;&quot;UNKNOWN&quot;;IF([.S152]=&quot;CLEAR&quot;;IF(OR([.O152]=&quot;&quot;;[.P152]=&quot;&quot;);&quot;UNKNOWN&quot;;&quot;READY FOR REVIEW&quot;);&quot;BLOCKED&quot;)))">
            <text:p>UNKNOWN</text:p>
          </table:table-cell>
          <table:table-cell office:value-type="string" table:formula="of:=IF([.U152]=&quot;UNKNOWN&quot;;&quot;COMPLETE OR ASSERT REQUIRED EVIDENCE BEFORE REVIEW&quot;;IF([.U152]=&quot;BLOCKED&quot;;&quot;RESOLVE CONTRADICTION BEFORE REVIEW — NO AUTHORITY CREATED&quot;;IF([.U15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2]=&quot;READY FOR REVIEW&quot;;&quot;REVIEW ELIGIBLE — NO AUTHORITY&quot;;IF(OR([.U152]=&quot;UNKNOWN&quot;;[.U152]=&quot;BLOCKED&quot;);&quot;NOT REVIEW ELIGIBLE&quot;;&quot;NOT REVIEW ELIGIBLE&quot;))">
            <text:p>NOT REVIEW ELIGIBLE</text:p>
          </table:table-cell>
          <table:table-cell office:value-type="string" table:formula="of:=IF([.W152]=&quot;NOT REVIEW ELIGIBLE&quot;;&quot;DO NOT BEGIN SETTLEMENT REVIEW — RESOLVE READINESS OR CONTRADICTION CONDITIONS&quot;;IF([.W15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2]=&quot;&quot;;&quot;UNKNOWN&quot;;IF([.W152]&lt;&gt;&quot;REVIEW ELIGIBLE — NO AUTHORITY&quot;;&quot;BLOCKED — OUTCOME ASSERTED WITHOUT REVIEW ELIGIBILITY&quot;;IF(OR([.Y152]=&quot;REVIEWED — NO AUTHORITY&quot;;[.Y152]=&quot;REVIEW DEFERRED&quot;;[.Y15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3]=&quot;&quot;;IF(AND([.L153]=&quot;&quot;;[.N153]=&quot;&quot;);&quot;UNKNOWN&quot;;&quot;CONTRADICTION&quot;);IF([.M153]=&quot;UNMATCHED&quot;;IF(AND([.L153]=&quot;&quot;;[.N153]=&quot;&quot;);&quot;CLEAR&quot;;&quot;CONTRADICTION&quot;);IF([.M153]=&quot;SINGLE_SALE_LINKED&quot;;IF(AND([.L153]&lt;&gt;&quot;&quot;;[.N153]=&quot;&quot;);&quot;CLEAR&quot;;&quot;CONTRADICTION&quot;);IF([.M153]=&quot;MULTI_SALE_PENDING_ALLOCATION&quot;;IF([.L153]=&quot;&quot;;&quot;CLEAR&quot;;&quot;CONTRADICTION&quot;);IF([.M153]=&quot;ALLOCATED&quot;;IF(AND([.L153]=&quot;&quot;;[.N153]&lt;&gt;&quot;&quot;);&quot;CLEAR&quot;;&quot;CONTRADICTION&quot;);&quot;CONTRADICTION&quot;)))))">
            <text:p>UNKNOWN</text:p>
          </table:table-cell>
          <table:table-cell office:value-type="string" table:formula="of:=IF([.S153]=&quot;UNKNOWN&quot;;&quot;NO ACTION — linkage status is UNKNOWN / not asserted&quot;;IF([.S153]=&quot;CLEAR&quot;;&quot;NO CONTRADICTION — preserve evidence as entered&quot;;IF([.M153]=&quot;&quot;;&quot;REVIEW LINKAGE STATUS — identifiers are present while status is UNKNOWN&quot;;IF([.M153]=&quot;UNMATCHED&quot;;&quot;REMOVE LINKAGE IDENTIFIERS OR CORRECT LINKAGE STATUS&quot;;IF([.M153]=&quot;SINGLE_SALE_LINKED&quot;;&quot;REQUIRE LINKED SALE ID AND NO ALLOCATION GROUP ID&quot;;IF([.M153]=&quot;MULTI_SALE_PENDING_ALLOCATION&quot;;&quot;REMOVE LINKED SALE ID OR CORRECT LINKAGE STATUS&quot;;IF([.M153]=&quot;ALLOCATED&quot;;&quot;REQUIRE ALLOCATION GROUP ID AND NO LINKED SALE ID&quot;;&quot;REVIEW LINKAGE EVIDENCE — NO AUTHORITY CREATED&quot;)))))))">
            <text:p>NO ACTION — linkage status is UNKNOWN / not asserted</text:p>
          </table:table-cell>
          <table:table-cell office:value-type="string" table:formula="of:=IF([.S153]=&quot;CONTRADICTION&quot;;&quot;BLOCKED&quot;;IF([.S153]=&quot;UNKNOWN&quot;;&quot;UNKNOWN&quot;;IF([.S153]=&quot;CLEAR&quot;;IF(OR([.O153]=&quot;&quot;;[.P153]=&quot;&quot;);&quot;UNKNOWN&quot;;&quot;READY FOR REVIEW&quot;);&quot;BLOCKED&quot;)))">
            <text:p>UNKNOWN</text:p>
          </table:table-cell>
          <table:table-cell office:value-type="string" table:formula="of:=IF([.U153]=&quot;UNKNOWN&quot;;&quot;COMPLETE OR ASSERT REQUIRED EVIDENCE BEFORE REVIEW&quot;;IF([.U153]=&quot;BLOCKED&quot;;&quot;RESOLVE CONTRADICTION BEFORE REVIEW — NO AUTHORITY CREATED&quot;;IF([.U15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3]=&quot;READY FOR REVIEW&quot;;&quot;REVIEW ELIGIBLE — NO AUTHORITY&quot;;IF(OR([.U153]=&quot;UNKNOWN&quot;;[.U153]=&quot;BLOCKED&quot;);&quot;NOT REVIEW ELIGIBLE&quot;;&quot;NOT REVIEW ELIGIBLE&quot;))">
            <text:p>NOT REVIEW ELIGIBLE</text:p>
          </table:table-cell>
          <table:table-cell office:value-type="string" table:formula="of:=IF([.W153]=&quot;NOT REVIEW ELIGIBLE&quot;;&quot;DO NOT BEGIN SETTLEMENT REVIEW — RESOLVE READINESS OR CONTRADICTION CONDITIONS&quot;;IF([.W15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3]=&quot;&quot;;&quot;UNKNOWN&quot;;IF([.W153]&lt;&gt;&quot;REVIEW ELIGIBLE — NO AUTHORITY&quot;;&quot;BLOCKED — OUTCOME ASSERTED WITHOUT REVIEW ELIGIBILITY&quot;;IF(OR([.Y153]=&quot;REVIEWED — NO AUTHORITY&quot;;[.Y153]=&quot;REVIEW DEFERRED&quot;;[.Y15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4]=&quot;&quot;;IF(AND([.L154]=&quot;&quot;;[.N154]=&quot;&quot;);&quot;UNKNOWN&quot;;&quot;CONTRADICTION&quot;);IF([.M154]=&quot;UNMATCHED&quot;;IF(AND([.L154]=&quot;&quot;;[.N154]=&quot;&quot;);&quot;CLEAR&quot;;&quot;CONTRADICTION&quot;);IF([.M154]=&quot;SINGLE_SALE_LINKED&quot;;IF(AND([.L154]&lt;&gt;&quot;&quot;;[.N154]=&quot;&quot;);&quot;CLEAR&quot;;&quot;CONTRADICTION&quot;);IF([.M154]=&quot;MULTI_SALE_PENDING_ALLOCATION&quot;;IF([.L154]=&quot;&quot;;&quot;CLEAR&quot;;&quot;CONTRADICTION&quot;);IF([.M154]=&quot;ALLOCATED&quot;;IF(AND([.L154]=&quot;&quot;;[.N154]&lt;&gt;&quot;&quot;);&quot;CLEAR&quot;;&quot;CONTRADICTION&quot;);&quot;CONTRADICTION&quot;)))))">
            <text:p>UNKNOWN</text:p>
          </table:table-cell>
          <table:table-cell office:value-type="string" table:formula="of:=IF([.S154]=&quot;UNKNOWN&quot;;&quot;NO ACTION — linkage status is UNKNOWN / not asserted&quot;;IF([.S154]=&quot;CLEAR&quot;;&quot;NO CONTRADICTION — preserve evidence as entered&quot;;IF([.M154]=&quot;&quot;;&quot;REVIEW LINKAGE STATUS — identifiers are present while status is UNKNOWN&quot;;IF([.M154]=&quot;UNMATCHED&quot;;&quot;REMOVE LINKAGE IDENTIFIERS OR CORRECT LINKAGE STATUS&quot;;IF([.M154]=&quot;SINGLE_SALE_LINKED&quot;;&quot;REQUIRE LINKED SALE ID AND NO ALLOCATION GROUP ID&quot;;IF([.M154]=&quot;MULTI_SALE_PENDING_ALLOCATION&quot;;&quot;REMOVE LINKED SALE ID OR CORRECT LINKAGE STATUS&quot;;IF([.M154]=&quot;ALLOCATED&quot;;&quot;REQUIRE ALLOCATION GROUP ID AND NO LINKED SALE ID&quot;;&quot;REVIEW LINKAGE EVIDENCE — NO AUTHORITY CREATED&quot;)))))))">
            <text:p>NO ACTION — linkage status is UNKNOWN / not asserted</text:p>
          </table:table-cell>
          <table:table-cell office:value-type="string" table:formula="of:=IF([.S154]=&quot;CONTRADICTION&quot;;&quot;BLOCKED&quot;;IF([.S154]=&quot;UNKNOWN&quot;;&quot;UNKNOWN&quot;;IF([.S154]=&quot;CLEAR&quot;;IF(OR([.O154]=&quot;&quot;;[.P154]=&quot;&quot;);&quot;UNKNOWN&quot;;&quot;READY FOR REVIEW&quot;);&quot;BLOCKED&quot;)))">
            <text:p>UNKNOWN</text:p>
          </table:table-cell>
          <table:table-cell office:value-type="string" table:formula="of:=IF([.U154]=&quot;UNKNOWN&quot;;&quot;COMPLETE OR ASSERT REQUIRED EVIDENCE BEFORE REVIEW&quot;;IF([.U154]=&quot;BLOCKED&quot;;&quot;RESOLVE CONTRADICTION BEFORE REVIEW — NO AUTHORITY CREATED&quot;;IF([.U15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4]=&quot;READY FOR REVIEW&quot;;&quot;REVIEW ELIGIBLE — NO AUTHORITY&quot;;IF(OR([.U154]=&quot;UNKNOWN&quot;;[.U154]=&quot;BLOCKED&quot;);&quot;NOT REVIEW ELIGIBLE&quot;;&quot;NOT REVIEW ELIGIBLE&quot;))">
            <text:p>NOT REVIEW ELIGIBLE</text:p>
          </table:table-cell>
          <table:table-cell office:value-type="string" table:formula="of:=IF([.W154]=&quot;NOT REVIEW ELIGIBLE&quot;;&quot;DO NOT BEGIN SETTLEMENT REVIEW — RESOLVE READINESS OR CONTRADICTION CONDITIONS&quot;;IF([.W15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4]=&quot;&quot;;&quot;UNKNOWN&quot;;IF([.W154]&lt;&gt;&quot;REVIEW ELIGIBLE — NO AUTHORITY&quot;;&quot;BLOCKED — OUTCOME ASSERTED WITHOUT REVIEW ELIGIBILITY&quot;;IF(OR([.Y154]=&quot;REVIEWED — NO AUTHORITY&quot;;[.Y154]=&quot;REVIEW DEFERRED&quot;;[.Y15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5]=&quot;&quot;;IF(AND([.L155]=&quot;&quot;;[.N155]=&quot;&quot;);&quot;UNKNOWN&quot;;&quot;CONTRADICTION&quot;);IF([.M155]=&quot;UNMATCHED&quot;;IF(AND([.L155]=&quot;&quot;;[.N155]=&quot;&quot;);&quot;CLEAR&quot;;&quot;CONTRADICTION&quot;);IF([.M155]=&quot;SINGLE_SALE_LINKED&quot;;IF(AND([.L155]&lt;&gt;&quot;&quot;;[.N155]=&quot;&quot;);&quot;CLEAR&quot;;&quot;CONTRADICTION&quot;);IF([.M155]=&quot;MULTI_SALE_PENDING_ALLOCATION&quot;;IF([.L155]=&quot;&quot;;&quot;CLEAR&quot;;&quot;CONTRADICTION&quot;);IF([.M155]=&quot;ALLOCATED&quot;;IF(AND([.L155]=&quot;&quot;;[.N155]&lt;&gt;&quot;&quot;);&quot;CLEAR&quot;;&quot;CONTRADICTION&quot;);&quot;CONTRADICTION&quot;)))))">
            <text:p>UNKNOWN</text:p>
          </table:table-cell>
          <table:table-cell office:value-type="string" table:formula="of:=IF([.S155]=&quot;UNKNOWN&quot;;&quot;NO ACTION — linkage status is UNKNOWN / not asserted&quot;;IF([.S155]=&quot;CLEAR&quot;;&quot;NO CONTRADICTION — preserve evidence as entered&quot;;IF([.M155]=&quot;&quot;;&quot;REVIEW LINKAGE STATUS — identifiers are present while status is UNKNOWN&quot;;IF([.M155]=&quot;UNMATCHED&quot;;&quot;REMOVE LINKAGE IDENTIFIERS OR CORRECT LINKAGE STATUS&quot;;IF([.M155]=&quot;SINGLE_SALE_LINKED&quot;;&quot;REQUIRE LINKED SALE ID AND NO ALLOCATION GROUP ID&quot;;IF([.M155]=&quot;MULTI_SALE_PENDING_ALLOCATION&quot;;&quot;REMOVE LINKED SALE ID OR CORRECT LINKAGE STATUS&quot;;IF([.M155]=&quot;ALLOCATED&quot;;&quot;REQUIRE ALLOCATION GROUP ID AND NO LINKED SALE ID&quot;;&quot;REVIEW LINKAGE EVIDENCE — NO AUTHORITY CREATED&quot;)))))))">
            <text:p>NO ACTION — linkage status is UNKNOWN / not asserted</text:p>
          </table:table-cell>
          <table:table-cell office:value-type="string" table:formula="of:=IF([.S155]=&quot;CONTRADICTION&quot;;&quot;BLOCKED&quot;;IF([.S155]=&quot;UNKNOWN&quot;;&quot;UNKNOWN&quot;;IF([.S155]=&quot;CLEAR&quot;;IF(OR([.O155]=&quot;&quot;;[.P155]=&quot;&quot;);&quot;UNKNOWN&quot;;&quot;READY FOR REVIEW&quot;);&quot;BLOCKED&quot;)))">
            <text:p>UNKNOWN</text:p>
          </table:table-cell>
          <table:table-cell office:value-type="string" table:formula="of:=IF([.U155]=&quot;UNKNOWN&quot;;&quot;COMPLETE OR ASSERT REQUIRED EVIDENCE BEFORE REVIEW&quot;;IF([.U155]=&quot;BLOCKED&quot;;&quot;RESOLVE CONTRADICTION BEFORE REVIEW — NO AUTHORITY CREATED&quot;;IF([.U15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5]=&quot;READY FOR REVIEW&quot;;&quot;REVIEW ELIGIBLE — NO AUTHORITY&quot;;IF(OR([.U155]=&quot;UNKNOWN&quot;;[.U155]=&quot;BLOCKED&quot;);&quot;NOT REVIEW ELIGIBLE&quot;;&quot;NOT REVIEW ELIGIBLE&quot;))">
            <text:p>NOT REVIEW ELIGIBLE</text:p>
          </table:table-cell>
          <table:table-cell office:value-type="string" table:formula="of:=IF([.W155]=&quot;NOT REVIEW ELIGIBLE&quot;;&quot;DO NOT BEGIN SETTLEMENT REVIEW — RESOLVE READINESS OR CONTRADICTION CONDITIONS&quot;;IF([.W15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5]=&quot;&quot;;&quot;UNKNOWN&quot;;IF([.W155]&lt;&gt;&quot;REVIEW ELIGIBLE — NO AUTHORITY&quot;;&quot;BLOCKED — OUTCOME ASSERTED WITHOUT REVIEW ELIGIBILITY&quot;;IF(OR([.Y155]=&quot;REVIEWED — NO AUTHORITY&quot;;[.Y155]=&quot;REVIEW DEFERRED&quot;;[.Y15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6]=&quot;&quot;;IF(AND([.L156]=&quot;&quot;;[.N156]=&quot;&quot;);&quot;UNKNOWN&quot;;&quot;CONTRADICTION&quot;);IF([.M156]=&quot;UNMATCHED&quot;;IF(AND([.L156]=&quot;&quot;;[.N156]=&quot;&quot;);&quot;CLEAR&quot;;&quot;CONTRADICTION&quot;);IF([.M156]=&quot;SINGLE_SALE_LINKED&quot;;IF(AND([.L156]&lt;&gt;&quot;&quot;;[.N156]=&quot;&quot;);&quot;CLEAR&quot;;&quot;CONTRADICTION&quot;);IF([.M156]=&quot;MULTI_SALE_PENDING_ALLOCATION&quot;;IF([.L156]=&quot;&quot;;&quot;CLEAR&quot;;&quot;CONTRADICTION&quot;);IF([.M156]=&quot;ALLOCATED&quot;;IF(AND([.L156]=&quot;&quot;;[.N156]&lt;&gt;&quot;&quot;);&quot;CLEAR&quot;;&quot;CONTRADICTION&quot;);&quot;CONTRADICTION&quot;)))))">
            <text:p>UNKNOWN</text:p>
          </table:table-cell>
          <table:table-cell office:value-type="string" table:formula="of:=IF([.S156]=&quot;UNKNOWN&quot;;&quot;NO ACTION — linkage status is UNKNOWN / not asserted&quot;;IF([.S156]=&quot;CLEAR&quot;;&quot;NO CONTRADICTION — preserve evidence as entered&quot;;IF([.M156]=&quot;&quot;;&quot;REVIEW LINKAGE STATUS — identifiers are present while status is UNKNOWN&quot;;IF([.M156]=&quot;UNMATCHED&quot;;&quot;REMOVE LINKAGE IDENTIFIERS OR CORRECT LINKAGE STATUS&quot;;IF([.M156]=&quot;SINGLE_SALE_LINKED&quot;;&quot;REQUIRE LINKED SALE ID AND NO ALLOCATION GROUP ID&quot;;IF([.M156]=&quot;MULTI_SALE_PENDING_ALLOCATION&quot;;&quot;REMOVE LINKED SALE ID OR CORRECT LINKAGE STATUS&quot;;IF([.M156]=&quot;ALLOCATED&quot;;&quot;REQUIRE ALLOCATION GROUP ID AND NO LINKED SALE ID&quot;;&quot;REVIEW LINKAGE EVIDENCE — NO AUTHORITY CREATED&quot;)))))))">
            <text:p>NO ACTION — linkage status is UNKNOWN / not asserted</text:p>
          </table:table-cell>
          <table:table-cell office:value-type="string" table:formula="of:=IF([.S156]=&quot;CONTRADICTION&quot;;&quot;BLOCKED&quot;;IF([.S156]=&quot;UNKNOWN&quot;;&quot;UNKNOWN&quot;;IF([.S156]=&quot;CLEAR&quot;;IF(OR([.O156]=&quot;&quot;;[.P156]=&quot;&quot;);&quot;UNKNOWN&quot;;&quot;READY FOR REVIEW&quot;);&quot;BLOCKED&quot;)))">
            <text:p>UNKNOWN</text:p>
          </table:table-cell>
          <table:table-cell office:value-type="string" table:formula="of:=IF([.U156]=&quot;UNKNOWN&quot;;&quot;COMPLETE OR ASSERT REQUIRED EVIDENCE BEFORE REVIEW&quot;;IF([.U156]=&quot;BLOCKED&quot;;&quot;RESOLVE CONTRADICTION BEFORE REVIEW — NO AUTHORITY CREATED&quot;;IF([.U15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6]=&quot;READY FOR REVIEW&quot;;&quot;REVIEW ELIGIBLE — NO AUTHORITY&quot;;IF(OR([.U156]=&quot;UNKNOWN&quot;;[.U156]=&quot;BLOCKED&quot;);&quot;NOT REVIEW ELIGIBLE&quot;;&quot;NOT REVIEW ELIGIBLE&quot;))">
            <text:p>NOT REVIEW ELIGIBLE</text:p>
          </table:table-cell>
          <table:table-cell office:value-type="string" table:formula="of:=IF([.W156]=&quot;NOT REVIEW ELIGIBLE&quot;;&quot;DO NOT BEGIN SETTLEMENT REVIEW — RESOLVE READINESS OR CONTRADICTION CONDITIONS&quot;;IF([.W15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6]=&quot;&quot;;&quot;UNKNOWN&quot;;IF([.W156]&lt;&gt;&quot;REVIEW ELIGIBLE — NO AUTHORITY&quot;;&quot;BLOCKED — OUTCOME ASSERTED WITHOUT REVIEW ELIGIBILITY&quot;;IF(OR([.Y156]=&quot;REVIEWED — NO AUTHORITY&quot;;[.Y156]=&quot;REVIEW DEFERRED&quot;;[.Y15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7]=&quot;&quot;;IF(AND([.L157]=&quot;&quot;;[.N157]=&quot;&quot;);&quot;UNKNOWN&quot;;&quot;CONTRADICTION&quot;);IF([.M157]=&quot;UNMATCHED&quot;;IF(AND([.L157]=&quot;&quot;;[.N157]=&quot;&quot;);&quot;CLEAR&quot;;&quot;CONTRADICTION&quot;);IF([.M157]=&quot;SINGLE_SALE_LINKED&quot;;IF(AND([.L157]&lt;&gt;&quot;&quot;;[.N157]=&quot;&quot;);&quot;CLEAR&quot;;&quot;CONTRADICTION&quot;);IF([.M157]=&quot;MULTI_SALE_PENDING_ALLOCATION&quot;;IF([.L157]=&quot;&quot;;&quot;CLEAR&quot;;&quot;CONTRADICTION&quot;);IF([.M157]=&quot;ALLOCATED&quot;;IF(AND([.L157]=&quot;&quot;;[.N157]&lt;&gt;&quot;&quot;);&quot;CLEAR&quot;;&quot;CONTRADICTION&quot;);&quot;CONTRADICTION&quot;)))))">
            <text:p>UNKNOWN</text:p>
          </table:table-cell>
          <table:table-cell office:value-type="string" table:formula="of:=IF([.S157]=&quot;UNKNOWN&quot;;&quot;NO ACTION — linkage status is UNKNOWN / not asserted&quot;;IF([.S157]=&quot;CLEAR&quot;;&quot;NO CONTRADICTION — preserve evidence as entered&quot;;IF([.M157]=&quot;&quot;;&quot;REVIEW LINKAGE STATUS — identifiers are present while status is UNKNOWN&quot;;IF([.M157]=&quot;UNMATCHED&quot;;&quot;REMOVE LINKAGE IDENTIFIERS OR CORRECT LINKAGE STATUS&quot;;IF([.M157]=&quot;SINGLE_SALE_LINKED&quot;;&quot;REQUIRE LINKED SALE ID AND NO ALLOCATION GROUP ID&quot;;IF([.M157]=&quot;MULTI_SALE_PENDING_ALLOCATION&quot;;&quot;REMOVE LINKED SALE ID OR CORRECT LINKAGE STATUS&quot;;IF([.M157]=&quot;ALLOCATED&quot;;&quot;REQUIRE ALLOCATION GROUP ID AND NO LINKED SALE ID&quot;;&quot;REVIEW LINKAGE EVIDENCE — NO AUTHORITY CREATED&quot;)))))))">
            <text:p>NO ACTION — linkage status is UNKNOWN / not asserted</text:p>
          </table:table-cell>
          <table:table-cell office:value-type="string" table:formula="of:=IF([.S157]=&quot;CONTRADICTION&quot;;&quot;BLOCKED&quot;;IF([.S157]=&quot;UNKNOWN&quot;;&quot;UNKNOWN&quot;;IF([.S157]=&quot;CLEAR&quot;;IF(OR([.O157]=&quot;&quot;;[.P157]=&quot;&quot;);&quot;UNKNOWN&quot;;&quot;READY FOR REVIEW&quot;);&quot;BLOCKED&quot;)))">
            <text:p>UNKNOWN</text:p>
          </table:table-cell>
          <table:table-cell office:value-type="string" table:formula="of:=IF([.U157]=&quot;UNKNOWN&quot;;&quot;COMPLETE OR ASSERT REQUIRED EVIDENCE BEFORE REVIEW&quot;;IF([.U157]=&quot;BLOCKED&quot;;&quot;RESOLVE CONTRADICTION BEFORE REVIEW — NO AUTHORITY CREATED&quot;;IF([.U15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7]=&quot;READY FOR REVIEW&quot;;&quot;REVIEW ELIGIBLE — NO AUTHORITY&quot;;IF(OR([.U157]=&quot;UNKNOWN&quot;;[.U157]=&quot;BLOCKED&quot;);&quot;NOT REVIEW ELIGIBLE&quot;;&quot;NOT REVIEW ELIGIBLE&quot;))">
            <text:p>NOT REVIEW ELIGIBLE</text:p>
          </table:table-cell>
          <table:table-cell office:value-type="string" table:formula="of:=IF([.W157]=&quot;NOT REVIEW ELIGIBLE&quot;;&quot;DO NOT BEGIN SETTLEMENT REVIEW — RESOLVE READINESS OR CONTRADICTION CONDITIONS&quot;;IF([.W15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7]=&quot;&quot;;&quot;UNKNOWN&quot;;IF([.W157]&lt;&gt;&quot;REVIEW ELIGIBLE — NO AUTHORITY&quot;;&quot;BLOCKED — OUTCOME ASSERTED WITHOUT REVIEW ELIGIBILITY&quot;;IF(OR([.Y157]=&quot;REVIEWED — NO AUTHORITY&quot;;[.Y157]=&quot;REVIEW DEFERRED&quot;;[.Y15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8]=&quot;&quot;;IF(AND([.L158]=&quot;&quot;;[.N158]=&quot;&quot;);&quot;UNKNOWN&quot;;&quot;CONTRADICTION&quot;);IF([.M158]=&quot;UNMATCHED&quot;;IF(AND([.L158]=&quot;&quot;;[.N158]=&quot;&quot;);&quot;CLEAR&quot;;&quot;CONTRADICTION&quot;);IF([.M158]=&quot;SINGLE_SALE_LINKED&quot;;IF(AND([.L158]&lt;&gt;&quot;&quot;;[.N158]=&quot;&quot;);&quot;CLEAR&quot;;&quot;CONTRADICTION&quot;);IF([.M158]=&quot;MULTI_SALE_PENDING_ALLOCATION&quot;;IF([.L158]=&quot;&quot;;&quot;CLEAR&quot;;&quot;CONTRADICTION&quot;);IF([.M158]=&quot;ALLOCATED&quot;;IF(AND([.L158]=&quot;&quot;;[.N158]&lt;&gt;&quot;&quot;);&quot;CLEAR&quot;;&quot;CONTRADICTION&quot;);&quot;CONTRADICTION&quot;)))))">
            <text:p>UNKNOWN</text:p>
          </table:table-cell>
          <table:table-cell office:value-type="string" table:formula="of:=IF([.S158]=&quot;UNKNOWN&quot;;&quot;NO ACTION — linkage status is UNKNOWN / not asserted&quot;;IF([.S158]=&quot;CLEAR&quot;;&quot;NO CONTRADICTION — preserve evidence as entered&quot;;IF([.M158]=&quot;&quot;;&quot;REVIEW LINKAGE STATUS — identifiers are present while status is UNKNOWN&quot;;IF([.M158]=&quot;UNMATCHED&quot;;&quot;REMOVE LINKAGE IDENTIFIERS OR CORRECT LINKAGE STATUS&quot;;IF([.M158]=&quot;SINGLE_SALE_LINKED&quot;;&quot;REQUIRE LINKED SALE ID AND NO ALLOCATION GROUP ID&quot;;IF([.M158]=&quot;MULTI_SALE_PENDING_ALLOCATION&quot;;&quot;REMOVE LINKED SALE ID OR CORRECT LINKAGE STATUS&quot;;IF([.M158]=&quot;ALLOCATED&quot;;&quot;REQUIRE ALLOCATION GROUP ID AND NO LINKED SALE ID&quot;;&quot;REVIEW LINKAGE EVIDENCE — NO AUTHORITY CREATED&quot;)))))))">
            <text:p>NO ACTION — linkage status is UNKNOWN / not asserted</text:p>
          </table:table-cell>
          <table:table-cell office:value-type="string" table:formula="of:=IF([.S158]=&quot;CONTRADICTION&quot;;&quot;BLOCKED&quot;;IF([.S158]=&quot;UNKNOWN&quot;;&quot;UNKNOWN&quot;;IF([.S158]=&quot;CLEAR&quot;;IF(OR([.O158]=&quot;&quot;;[.P158]=&quot;&quot;);&quot;UNKNOWN&quot;;&quot;READY FOR REVIEW&quot;);&quot;BLOCKED&quot;)))">
            <text:p>UNKNOWN</text:p>
          </table:table-cell>
          <table:table-cell office:value-type="string" table:formula="of:=IF([.U158]=&quot;UNKNOWN&quot;;&quot;COMPLETE OR ASSERT REQUIRED EVIDENCE BEFORE REVIEW&quot;;IF([.U158]=&quot;BLOCKED&quot;;&quot;RESOLVE CONTRADICTION BEFORE REVIEW — NO AUTHORITY CREATED&quot;;IF([.U15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8]=&quot;READY FOR REVIEW&quot;;&quot;REVIEW ELIGIBLE — NO AUTHORITY&quot;;IF(OR([.U158]=&quot;UNKNOWN&quot;;[.U158]=&quot;BLOCKED&quot;);&quot;NOT REVIEW ELIGIBLE&quot;;&quot;NOT REVIEW ELIGIBLE&quot;))">
            <text:p>NOT REVIEW ELIGIBLE</text:p>
          </table:table-cell>
          <table:table-cell office:value-type="string" table:formula="of:=IF([.W158]=&quot;NOT REVIEW ELIGIBLE&quot;;&quot;DO NOT BEGIN SETTLEMENT REVIEW — RESOLVE READINESS OR CONTRADICTION CONDITIONS&quot;;IF([.W15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8]=&quot;&quot;;&quot;UNKNOWN&quot;;IF([.W158]&lt;&gt;&quot;REVIEW ELIGIBLE — NO AUTHORITY&quot;;&quot;BLOCKED — OUTCOME ASSERTED WITHOUT REVIEW ELIGIBILITY&quot;;IF(OR([.Y158]=&quot;REVIEWED — NO AUTHORITY&quot;;[.Y158]=&quot;REVIEW DEFERRED&quot;;[.Y15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59]=&quot;&quot;;IF(AND([.L159]=&quot;&quot;;[.N159]=&quot;&quot;);&quot;UNKNOWN&quot;;&quot;CONTRADICTION&quot;);IF([.M159]=&quot;UNMATCHED&quot;;IF(AND([.L159]=&quot;&quot;;[.N159]=&quot;&quot;);&quot;CLEAR&quot;;&quot;CONTRADICTION&quot;);IF([.M159]=&quot;SINGLE_SALE_LINKED&quot;;IF(AND([.L159]&lt;&gt;&quot;&quot;;[.N159]=&quot;&quot;);&quot;CLEAR&quot;;&quot;CONTRADICTION&quot;);IF([.M159]=&quot;MULTI_SALE_PENDING_ALLOCATION&quot;;IF([.L159]=&quot;&quot;;&quot;CLEAR&quot;;&quot;CONTRADICTION&quot;);IF([.M159]=&quot;ALLOCATED&quot;;IF(AND([.L159]=&quot;&quot;;[.N159]&lt;&gt;&quot;&quot;);&quot;CLEAR&quot;;&quot;CONTRADICTION&quot;);&quot;CONTRADICTION&quot;)))))">
            <text:p>UNKNOWN</text:p>
          </table:table-cell>
          <table:table-cell office:value-type="string" table:formula="of:=IF([.S159]=&quot;UNKNOWN&quot;;&quot;NO ACTION — linkage status is UNKNOWN / not asserted&quot;;IF([.S159]=&quot;CLEAR&quot;;&quot;NO CONTRADICTION — preserve evidence as entered&quot;;IF([.M159]=&quot;&quot;;&quot;REVIEW LINKAGE STATUS — identifiers are present while status is UNKNOWN&quot;;IF([.M159]=&quot;UNMATCHED&quot;;&quot;REMOVE LINKAGE IDENTIFIERS OR CORRECT LINKAGE STATUS&quot;;IF([.M159]=&quot;SINGLE_SALE_LINKED&quot;;&quot;REQUIRE LINKED SALE ID AND NO ALLOCATION GROUP ID&quot;;IF([.M159]=&quot;MULTI_SALE_PENDING_ALLOCATION&quot;;&quot;REMOVE LINKED SALE ID OR CORRECT LINKAGE STATUS&quot;;IF([.M159]=&quot;ALLOCATED&quot;;&quot;REQUIRE ALLOCATION GROUP ID AND NO LINKED SALE ID&quot;;&quot;REVIEW LINKAGE EVIDENCE — NO AUTHORITY CREATED&quot;)))))))">
            <text:p>NO ACTION — linkage status is UNKNOWN / not asserted</text:p>
          </table:table-cell>
          <table:table-cell office:value-type="string" table:formula="of:=IF([.S159]=&quot;CONTRADICTION&quot;;&quot;BLOCKED&quot;;IF([.S159]=&quot;UNKNOWN&quot;;&quot;UNKNOWN&quot;;IF([.S159]=&quot;CLEAR&quot;;IF(OR([.O159]=&quot;&quot;;[.P159]=&quot;&quot;);&quot;UNKNOWN&quot;;&quot;READY FOR REVIEW&quot;);&quot;BLOCKED&quot;)))">
            <text:p>UNKNOWN</text:p>
          </table:table-cell>
          <table:table-cell office:value-type="string" table:formula="of:=IF([.U159]=&quot;UNKNOWN&quot;;&quot;COMPLETE OR ASSERT REQUIRED EVIDENCE BEFORE REVIEW&quot;;IF([.U159]=&quot;BLOCKED&quot;;&quot;RESOLVE CONTRADICTION BEFORE REVIEW — NO AUTHORITY CREATED&quot;;IF([.U15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59]=&quot;READY FOR REVIEW&quot;;&quot;REVIEW ELIGIBLE — NO AUTHORITY&quot;;IF(OR([.U159]=&quot;UNKNOWN&quot;;[.U159]=&quot;BLOCKED&quot;);&quot;NOT REVIEW ELIGIBLE&quot;;&quot;NOT REVIEW ELIGIBLE&quot;))">
            <text:p>NOT REVIEW ELIGIBLE</text:p>
          </table:table-cell>
          <table:table-cell office:value-type="string" table:formula="of:=IF([.W159]=&quot;NOT REVIEW ELIGIBLE&quot;;&quot;DO NOT BEGIN SETTLEMENT REVIEW — RESOLVE READINESS OR CONTRADICTION CONDITIONS&quot;;IF([.W15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59]=&quot;&quot;;&quot;UNKNOWN&quot;;IF([.W159]&lt;&gt;&quot;REVIEW ELIGIBLE — NO AUTHORITY&quot;;&quot;BLOCKED — OUTCOME ASSERTED WITHOUT REVIEW ELIGIBILITY&quot;;IF(OR([.Y159]=&quot;REVIEWED — NO AUTHORITY&quot;;[.Y159]=&quot;REVIEW DEFERRED&quot;;[.Y15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0]=&quot;&quot;;IF(AND([.L160]=&quot;&quot;;[.N160]=&quot;&quot;);&quot;UNKNOWN&quot;;&quot;CONTRADICTION&quot;);IF([.M160]=&quot;UNMATCHED&quot;;IF(AND([.L160]=&quot;&quot;;[.N160]=&quot;&quot;);&quot;CLEAR&quot;;&quot;CONTRADICTION&quot;);IF([.M160]=&quot;SINGLE_SALE_LINKED&quot;;IF(AND([.L160]&lt;&gt;&quot;&quot;;[.N160]=&quot;&quot;);&quot;CLEAR&quot;;&quot;CONTRADICTION&quot;);IF([.M160]=&quot;MULTI_SALE_PENDING_ALLOCATION&quot;;IF([.L160]=&quot;&quot;;&quot;CLEAR&quot;;&quot;CONTRADICTION&quot;);IF([.M160]=&quot;ALLOCATED&quot;;IF(AND([.L160]=&quot;&quot;;[.N160]&lt;&gt;&quot;&quot;);&quot;CLEAR&quot;;&quot;CONTRADICTION&quot;);&quot;CONTRADICTION&quot;)))))">
            <text:p>UNKNOWN</text:p>
          </table:table-cell>
          <table:table-cell office:value-type="string" table:formula="of:=IF([.S160]=&quot;UNKNOWN&quot;;&quot;NO ACTION — linkage status is UNKNOWN / not asserted&quot;;IF([.S160]=&quot;CLEAR&quot;;&quot;NO CONTRADICTION — preserve evidence as entered&quot;;IF([.M160]=&quot;&quot;;&quot;REVIEW LINKAGE STATUS — identifiers are present while status is UNKNOWN&quot;;IF([.M160]=&quot;UNMATCHED&quot;;&quot;REMOVE LINKAGE IDENTIFIERS OR CORRECT LINKAGE STATUS&quot;;IF([.M160]=&quot;SINGLE_SALE_LINKED&quot;;&quot;REQUIRE LINKED SALE ID AND NO ALLOCATION GROUP ID&quot;;IF([.M160]=&quot;MULTI_SALE_PENDING_ALLOCATION&quot;;&quot;REMOVE LINKED SALE ID OR CORRECT LINKAGE STATUS&quot;;IF([.M160]=&quot;ALLOCATED&quot;;&quot;REQUIRE ALLOCATION GROUP ID AND NO LINKED SALE ID&quot;;&quot;REVIEW LINKAGE EVIDENCE — NO AUTHORITY CREATED&quot;)))))))">
            <text:p>NO ACTION — linkage status is UNKNOWN / not asserted</text:p>
          </table:table-cell>
          <table:table-cell office:value-type="string" table:formula="of:=IF([.S160]=&quot;CONTRADICTION&quot;;&quot;BLOCKED&quot;;IF([.S160]=&quot;UNKNOWN&quot;;&quot;UNKNOWN&quot;;IF([.S160]=&quot;CLEAR&quot;;IF(OR([.O160]=&quot;&quot;;[.P160]=&quot;&quot;);&quot;UNKNOWN&quot;;&quot;READY FOR REVIEW&quot;);&quot;BLOCKED&quot;)))">
            <text:p>UNKNOWN</text:p>
          </table:table-cell>
          <table:table-cell office:value-type="string" table:formula="of:=IF([.U160]=&quot;UNKNOWN&quot;;&quot;COMPLETE OR ASSERT REQUIRED EVIDENCE BEFORE REVIEW&quot;;IF([.U160]=&quot;BLOCKED&quot;;&quot;RESOLVE CONTRADICTION BEFORE REVIEW — NO AUTHORITY CREATED&quot;;IF([.U16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0]=&quot;READY FOR REVIEW&quot;;&quot;REVIEW ELIGIBLE — NO AUTHORITY&quot;;IF(OR([.U160]=&quot;UNKNOWN&quot;;[.U160]=&quot;BLOCKED&quot;);&quot;NOT REVIEW ELIGIBLE&quot;;&quot;NOT REVIEW ELIGIBLE&quot;))">
            <text:p>NOT REVIEW ELIGIBLE</text:p>
          </table:table-cell>
          <table:table-cell office:value-type="string" table:formula="of:=IF([.W160]=&quot;NOT REVIEW ELIGIBLE&quot;;&quot;DO NOT BEGIN SETTLEMENT REVIEW — RESOLVE READINESS OR CONTRADICTION CONDITIONS&quot;;IF([.W16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0]=&quot;&quot;;&quot;UNKNOWN&quot;;IF([.W160]&lt;&gt;&quot;REVIEW ELIGIBLE — NO AUTHORITY&quot;;&quot;BLOCKED — OUTCOME ASSERTED WITHOUT REVIEW ELIGIBILITY&quot;;IF(OR([.Y160]=&quot;REVIEWED — NO AUTHORITY&quot;;[.Y160]=&quot;REVIEW DEFERRED&quot;;[.Y16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1]=&quot;&quot;;IF(AND([.L161]=&quot;&quot;;[.N161]=&quot;&quot;);&quot;UNKNOWN&quot;;&quot;CONTRADICTION&quot;);IF([.M161]=&quot;UNMATCHED&quot;;IF(AND([.L161]=&quot;&quot;;[.N161]=&quot;&quot;);&quot;CLEAR&quot;;&quot;CONTRADICTION&quot;);IF([.M161]=&quot;SINGLE_SALE_LINKED&quot;;IF(AND([.L161]&lt;&gt;&quot;&quot;;[.N161]=&quot;&quot;);&quot;CLEAR&quot;;&quot;CONTRADICTION&quot;);IF([.M161]=&quot;MULTI_SALE_PENDING_ALLOCATION&quot;;IF([.L161]=&quot;&quot;;&quot;CLEAR&quot;;&quot;CONTRADICTION&quot;);IF([.M161]=&quot;ALLOCATED&quot;;IF(AND([.L161]=&quot;&quot;;[.N161]&lt;&gt;&quot;&quot;);&quot;CLEAR&quot;;&quot;CONTRADICTION&quot;);&quot;CONTRADICTION&quot;)))))">
            <text:p>UNKNOWN</text:p>
          </table:table-cell>
          <table:table-cell office:value-type="string" table:formula="of:=IF([.S161]=&quot;UNKNOWN&quot;;&quot;NO ACTION — linkage status is UNKNOWN / not asserted&quot;;IF([.S161]=&quot;CLEAR&quot;;&quot;NO CONTRADICTION — preserve evidence as entered&quot;;IF([.M161]=&quot;&quot;;&quot;REVIEW LINKAGE STATUS — identifiers are present while status is UNKNOWN&quot;;IF([.M161]=&quot;UNMATCHED&quot;;&quot;REMOVE LINKAGE IDENTIFIERS OR CORRECT LINKAGE STATUS&quot;;IF([.M161]=&quot;SINGLE_SALE_LINKED&quot;;&quot;REQUIRE LINKED SALE ID AND NO ALLOCATION GROUP ID&quot;;IF([.M161]=&quot;MULTI_SALE_PENDING_ALLOCATION&quot;;&quot;REMOVE LINKED SALE ID OR CORRECT LINKAGE STATUS&quot;;IF([.M161]=&quot;ALLOCATED&quot;;&quot;REQUIRE ALLOCATION GROUP ID AND NO LINKED SALE ID&quot;;&quot;REVIEW LINKAGE EVIDENCE — NO AUTHORITY CREATED&quot;)))))))">
            <text:p>NO ACTION — linkage status is UNKNOWN / not asserted</text:p>
          </table:table-cell>
          <table:table-cell office:value-type="string" table:formula="of:=IF([.S161]=&quot;CONTRADICTION&quot;;&quot;BLOCKED&quot;;IF([.S161]=&quot;UNKNOWN&quot;;&quot;UNKNOWN&quot;;IF([.S161]=&quot;CLEAR&quot;;IF(OR([.O161]=&quot;&quot;;[.P161]=&quot;&quot;);&quot;UNKNOWN&quot;;&quot;READY FOR REVIEW&quot;);&quot;BLOCKED&quot;)))">
            <text:p>UNKNOWN</text:p>
          </table:table-cell>
          <table:table-cell office:value-type="string" table:formula="of:=IF([.U161]=&quot;UNKNOWN&quot;;&quot;COMPLETE OR ASSERT REQUIRED EVIDENCE BEFORE REVIEW&quot;;IF([.U161]=&quot;BLOCKED&quot;;&quot;RESOLVE CONTRADICTION BEFORE REVIEW — NO AUTHORITY CREATED&quot;;IF([.U16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1]=&quot;READY FOR REVIEW&quot;;&quot;REVIEW ELIGIBLE — NO AUTHORITY&quot;;IF(OR([.U161]=&quot;UNKNOWN&quot;;[.U161]=&quot;BLOCKED&quot;);&quot;NOT REVIEW ELIGIBLE&quot;;&quot;NOT REVIEW ELIGIBLE&quot;))">
            <text:p>NOT REVIEW ELIGIBLE</text:p>
          </table:table-cell>
          <table:table-cell office:value-type="string" table:formula="of:=IF([.W161]=&quot;NOT REVIEW ELIGIBLE&quot;;&quot;DO NOT BEGIN SETTLEMENT REVIEW — RESOLVE READINESS OR CONTRADICTION CONDITIONS&quot;;IF([.W16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1]=&quot;&quot;;&quot;UNKNOWN&quot;;IF([.W161]&lt;&gt;&quot;REVIEW ELIGIBLE — NO AUTHORITY&quot;;&quot;BLOCKED — OUTCOME ASSERTED WITHOUT REVIEW ELIGIBILITY&quot;;IF(OR([.Y161]=&quot;REVIEWED — NO AUTHORITY&quot;;[.Y161]=&quot;REVIEW DEFERRED&quot;;[.Y161]=&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2]=&quot;&quot;;IF(AND([.L162]=&quot;&quot;;[.N162]=&quot;&quot;);&quot;UNKNOWN&quot;;&quot;CONTRADICTION&quot;);IF([.M162]=&quot;UNMATCHED&quot;;IF(AND([.L162]=&quot;&quot;;[.N162]=&quot;&quot;);&quot;CLEAR&quot;;&quot;CONTRADICTION&quot;);IF([.M162]=&quot;SINGLE_SALE_LINKED&quot;;IF(AND([.L162]&lt;&gt;&quot;&quot;;[.N162]=&quot;&quot;);&quot;CLEAR&quot;;&quot;CONTRADICTION&quot;);IF([.M162]=&quot;MULTI_SALE_PENDING_ALLOCATION&quot;;IF([.L162]=&quot;&quot;;&quot;CLEAR&quot;;&quot;CONTRADICTION&quot;);IF([.M162]=&quot;ALLOCATED&quot;;IF(AND([.L162]=&quot;&quot;;[.N162]&lt;&gt;&quot;&quot;);&quot;CLEAR&quot;;&quot;CONTRADICTION&quot;);&quot;CONTRADICTION&quot;)))))">
            <text:p>UNKNOWN</text:p>
          </table:table-cell>
          <table:table-cell office:value-type="string" table:formula="of:=IF([.S162]=&quot;UNKNOWN&quot;;&quot;NO ACTION — linkage status is UNKNOWN / not asserted&quot;;IF([.S162]=&quot;CLEAR&quot;;&quot;NO CONTRADICTION — preserve evidence as entered&quot;;IF([.M162]=&quot;&quot;;&quot;REVIEW LINKAGE STATUS — identifiers are present while status is UNKNOWN&quot;;IF([.M162]=&quot;UNMATCHED&quot;;&quot;REMOVE LINKAGE IDENTIFIERS OR CORRECT LINKAGE STATUS&quot;;IF([.M162]=&quot;SINGLE_SALE_LINKED&quot;;&quot;REQUIRE LINKED SALE ID AND NO ALLOCATION GROUP ID&quot;;IF([.M162]=&quot;MULTI_SALE_PENDING_ALLOCATION&quot;;&quot;REMOVE LINKED SALE ID OR CORRECT LINKAGE STATUS&quot;;IF([.M162]=&quot;ALLOCATED&quot;;&quot;REQUIRE ALLOCATION GROUP ID AND NO LINKED SALE ID&quot;;&quot;REVIEW LINKAGE EVIDENCE — NO AUTHORITY CREATED&quot;)))))))">
            <text:p>NO ACTION — linkage status is UNKNOWN / not asserted</text:p>
          </table:table-cell>
          <table:table-cell office:value-type="string" table:formula="of:=IF([.S162]=&quot;CONTRADICTION&quot;;&quot;BLOCKED&quot;;IF([.S162]=&quot;UNKNOWN&quot;;&quot;UNKNOWN&quot;;IF([.S162]=&quot;CLEAR&quot;;IF(OR([.O162]=&quot;&quot;;[.P162]=&quot;&quot;);&quot;UNKNOWN&quot;;&quot;READY FOR REVIEW&quot;);&quot;BLOCKED&quot;)))">
            <text:p>UNKNOWN</text:p>
          </table:table-cell>
          <table:table-cell office:value-type="string" table:formula="of:=IF([.U162]=&quot;UNKNOWN&quot;;&quot;COMPLETE OR ASSERT REQUIRED EVIDENCE BEFORE REVIEW&quot;;IF([.U162]=&quot;BLOCKED&quot;;&quot;RESOLVE CONTRADICTION BEFORE REVIEW — NO AUTHORITY CREATED&quot;;IF([.U16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2]=&quot;READY FOR REVIEW&quot;;&quot;REVIEW ELIGIBLE — NO AUTHORITY&quot;;IF(OR([.U162]=&quot;UNKNOWN&quot;;[.U162]=&quot;BLOCKED&quot;);&quot;NOT REVIEW ELIGIBLE&quot;;&quot;NOT REVIEW ELIGIBLE&quot;))">
            <text:p>NOT REVIEW ELIGIBLE</text:p>
          </table:table-cell>
          <table:table-cell office:value-type="string" table:formula="of:=IF([.W162]=&quot;NOT REVIEW ELIGIBLE&quot;;&quot;DO NOT BEGIN SETTLEMENT REVIEW — RESOLVE READINESS OR CONTRADICTION CONDITIONS&quot;;IF([.W16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2]=&quot;&quot;;&quot;UNKNOWN&quot;;IF([.W162]&lt;&gt;&quot;REVIEW ELIGIBLE — NO AUTHORITY&quot;;&quot;BLOCKED — OUTCOME ASSERTED WITHOUT REVIEW ELIGIBILITY&quot;;IF(OR([.Y162]=&quot;REVIEWED — NO AUTHORITY&quot;;[.Y162]=&quot;REVIEW DEFERRED&quot;;[.Y16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3]=&quot;&quot;;IF(AND([.L163]=&quot;&quot;;[.N163]=&quot;&quot;);&quot;UNKNOWN&quot;;&quot;CONTRADICTION&quot;);IF([.M163]=&quot;UNMATCHED&quot;;IF(AND([.L163]=&quot;&quot;;[.N163]=&quot;&quot;);&quot;CLEAR&quot;;&quot;CONTRADICTION&quot;);IF([.M163]=&quot;SINGLE_SALE_LINKED&quot;;IF(AND([.L163]&lt;&gt;&quot;&quot;;[.N163]=&quot;&quot;);&quot;CLEAR&quot;;&quot;CONTRADICTION&quot;);IF([.M163]=&quot;MULTI_SALE_PENDING_ALLOCATION&quot;;IF([.L163]=&quot;&quot;;&quot;CLEAR&quot;;&quot;CONTRADICTION&quot;);IF([.M163]=&quot;ALLOCATED&quot;;IF(AND([.L163]=&quot;&quot;;[.N163]&lt;&gt;&quot;&quot;);&quot;CLEAR&quot;;&quot;CONTRADICTION&quot;);&quot;CONTRADICTION&quot;)))))">
            <text:p>UNKNOWN</text:p>
          </table:table-cell>
          <table:table-cell office:value-type="string" table:formula="of:=IF([.S163]=&quot;UNKNOWN&quot;;&quot;NO ACTION — linkage status is UNKNOWN / not asserted&quot;;IF([.S163]=&quot;CLEAR&quot;;&quot;NO CONTRADICTION — preserve evidence as entered&quot;;IF([.M163]=&quot;&quot;;&quot;REVIEW LINKAGE STATUS — identifiers are present while status is UNKNOWN&quot;;IF([.M163]=&quot;UNMATCHED&quot;;&quot;REMOVE LINKAGE IDENTIFIERS OR CORRECT LINKAGE STATUS&quot;;IF([.M163]=&quot;SINGLE_SALE_LINKED&quot;;&quot;REQUIRE LINKED SALE ID AND NO ALLOCATION GROUP ID&quot;;IF([.M163]=&quot;MULTI_SALE_PENDING_ALLOCATION&quot;;&quot;REMOVE LINKED SALE ID OR CORRECT LINKAGE STATUS&quot;;IF([.M163]=&quot;ALLOCATED&quot;;&quot;REQUIRE ALLOCATION GROUP ID AND NO LINKED SALE ID&quot;;&quot;REVIEW LINKAGE EVIDENCE — NO AUTHORITY CREATED&quot;)))))))">
            <text:p>NO ACTION — linkage status is UNKNOWN / not asserted</text:p>
          </table:table-cell>
          <table:table-cell office:value-type="string" table:formula="of:=IF([.S163]=&quot;CONTRADICTION&quot;;&quot;BLOCKED&quot;;IF([.S163]=&quot;UNKNOWN&quot;;&quot;UNKNOWN&quot;;IF([.S163]=&quot;CLEAR&quot;;IF(OR([.O163]=&quot;&quot;;[.P163]=&quot;&quot;);&quot;UNKNOWN&quot;;&quot;READY FOR REVIEW&quot;);&quot;BLOCKED&quot;)))">
            <text:p>UNKNOWN</text:p>
          </table:table-cell>
          <table:table-cell office:value-type="string" table:formula="of:=IF([.U163]=&quot;UNKNOWN&quot;;&quot;COMPLETE OR ASSERT REQUIRED EVIDENCE BEFORE REVIEW&quot;;IF([.U163]=&quot;BLOCKED&quot;;&quot;RESOLVE CONTRADICTION BEFORE REVIEW — NO AUTHORITY CREATED&quot;;IF([.U16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3]=&quot;READY FOR REVIEW&quot;;&quot;REVIEW ELIGIBLE — NO AUTHORITY&quot;;IF(OR([.U163]=&quot;UNKNOWN&quot;;[.U163]=&quot;BLOCKED&quot;);&quot;NOT REVIEW ELIGIBLE&quot;;&quot;NOT REVIEW ELIGIBLE&quot;))">
            <text:p>NOT REVIEW ELIGIBLE</text:p>
          </table:table-cell>
          <table:table-cell office:value-type="string" table:formula="of:=IF([.W163]=&quot;NOT REVIEW ELIGIBLE&quot;;&quot;DO NOT BEGIN SETTLEMENT REVIEW — RESOLVE READINESS OR CONTRADICTION CONDITIONS&quot;;IF([.W16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3]=&quot;&quot;;&quot;UNKNOWN&quot;;IF([.W163]&lt;&gt;&quot;REVIEW ELIGIBLE — NO AUTHORITY&quot;;&quot;BLOCKED — OUTCOME ASSERTED WITHOUT REVIEW ELIGIBILITY&quot;;IF(OR([.Y163]=&quot;REVIEWED — NO AUTHORITY&quot;;[.Y163]=&quot;REVIEW DEFERRED&quot;;[.Y16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4]=&quot;&quot;;IF(AND([.L164]=&quot;&quot;;[.N164]=&quot;&quot;);&quot;UNKNOWN&quot;;&quot;CONTRADICTION&quot;);IF([.M164]=&quot;UNMATCHED&quot;;IF(AND([.L164]=&quot;&quot;;[.N164]=&quot;&quot;);&quot;CLEAR&quot;;&quot;CONTRADICTION&quot;);IF([.M164]=&quot;SINGLE_SALE_LINKED&quot;;IF(AND([.L164]&lt;&gt;&quot;&quot;;[.N164]=&quot;&quot;);&quot;CLEAR&quot;;&quot;CONTRADICTION&quot;);IF([.M164]=&quot;MULTI_SALE_PENDING_ALLOCATION&quot;;IF([.L164]=&quot;&quot;;&quot;CLEAR&quot;;&quot;CONTRADICTION&quot;);IF([.M164]=&quot;ALLOCATED&quot;;IF(AND([.L164]=&quot;&quot;;[.N164]&lt;&gt;&quot;&quot;);&quot;CLEAR&quot;;&quot;CONTRADICTION&quot;);&quot;CONTRADICTION&quot;)))))">
            <text:p>UNKNOWN</text:p>
          </table:table-cell>
          <table:table-cell office:value-type="string" table:formula="of:=IF([.S164]=&quot;UNKNOWN&quot;;&quot;NO ACTION — linkage status is UNKNOWN / not asserted&quot;;IF([.S164]=&quot;CLEAR&quot;;&quot;NO CONTRADICTION — preserve evidence as entered&quot;;IF([.M164]=&quot;&quot;;&quot;REVIEW LINKAGE STATUS — identifiers are present while status is UNKNOWN&quot;;IF([.M164]=&quot;UNMATCHED&quot;;&quot;REMOVE LINKAGE IDENTIFIERS OR CORRECT LINKAGE STATUS&quot;;IF([.M164]=&quot;SINGLE_SALE_LINKED&quot;;&quot;REQUIRE LINKED SALE ID AND NO ALLOCATION GROUP ID&quot;;IF([.M164]=&quot;MULTI_SALE_PENDING_ALLOCATION&quot;;&quot;REMOVE LINKED SALE ID OR CORRECT LINKAGE STATUS&quot;;IF([.M164]=&quot;ALLOCATED&quot;;&quot;REQUIRE ALLOCATION GROUP ID AND NO LINKED SALE ID&quot;;&quot;REVIEW LINKAGE EVIDENCE — NO AUTHORITY CREATED&quot;)))))))">
            <text:p>NO ACTION — linkage status is UNKNOWN / not asserted</text:p>
          </table:table-cell>
          <table:table-cell office:value-type="string" table:formula="of:=IF([.S164]=&quot;CONTRADICTION&quot;;&quot;BLOCKED&quot;;IF([.S164]=&quot;UNKNOWN&quot;;&quot;UNKNOWN&quot;;IF([.S164]=&quot;CLEAR&quot;;IF(OR([.O164]=&quot;&quot;;[.P164]=&quot;&quot;);&quot;UNKNOWN&quot;;&quot;READY FOR REVIEW&quot;);&quot;BLOCKED&quot;)))">
            <text:p>UNKNOWN</text:p>
          </table:table-cell>
          <table:table-cell office:value-type="string" table:formula="of:=IF([.U164]=&quot;UNKNOWN&quot;;&quot;COMPLETE OR ASSERT REQUIRED EVIDENCE BEFORE REVIEW&quot;;IF([.U164]=&quot;BLOCKED&quot;;&quot;RESOLVE CONTRADICTION BEFORE REVIEW — NO AUTHORITY CREATED&quot;;IF([.U16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4]=&quot;READY FOR REVIEW&quot;;&quot;REVIEW ELIGIBLE — NO AUTHORITY&quot;;IF(OR([.U164]=&quot;UNKNOWN&quot;;[.U164]=&quot;BLOCKED&quot;);&quot;NOT REVIEW ELIGIBLE&quot;;&quot;NOT REVIEW ELIGIBLE&quot;))">
            <text:p>NOT REVIEW ELIGIBLE</text:p>
          </table:table-cell>
          <table:table-cell office:value-type="string" table:formula="of:=IF([.W164]=&quot;NOT REVIEW ELIGIBLE&quot;;&quot;DO NOT BEGIN SETTLEMENT REVIEW — RESOLVE READINESS OR CONTRADICTION CONDITIONS&quot;;IF([.W16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4]=&quot;&quot;;&quot;UNKNOWN&quot;;IF([.W164]&lt;&gt;&quot;REVIEW ELIGIBLE — NO AUTHORITY&quot;;&quot;BLOCKED — OUTCOME ASSERTED WITHOUT REVIEW ELIGIBILITY&quot;;IF(OR([.Y164]=&quot;REVIEWED — NO AUTHORITY&quot;;[.Y164]=&quot;REVIEW DEFERRED&quot;;[.Y16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5]=&quot;&quot;;IF(AND([.L165]=&quot;&quot;;[.N165]=&quot;&quot;);&quot;UNKNOWN&quot;;&quot;CONTRADICTION&quot;);IF([.M165]=&quot;UNMATCHED&quot;;IF(AND([.L165]=&quot;&quot;;[.N165]=&quot;&quot;);&quot;CLEAR&quot;;&quot;CONTRADICTION&quot;);IF([.M165]=&quot;SINGLE_SALE_LINKED&quot;;IF(AND([.L165]&lt;&gt;&quot;&quot;;[.N165]=&quot;&quot;);&quot;CLEAR&quot;;&quot;CONTRADICTION&quot;);IF([.M165]=&quot;MULTI_SALE_PENDING_ALLOCATION&quot;;IF([.L165]=&quot;&quot;;&quot;CLEAR&quot;;&quot;CONTRADICTION&quot;);IF([.M165]=&quot;ALLOCATED&quot;;IF(AND([.L165]=&quot;&quot;;[.N165]&lt;&gt;&quot;&quot;);&quot;CLEAR&quot;;&quot;CONTRADICTION&quot;);&quot;CONTRADICTION&quot;)))))">
            <text:p>UNKNOWN</text:p>
          </table:table-cell>
          <table:table-cell office:value-type="string" table:formula="of:=IF([.S165]=&quot;UNKNOWN&quot;;&quot;NO ACTION — linkage status is UNKNOWN / not asserted&quot;;IF([.S165]=&quot;CLEAR&quot;;&quot;NO CONTRADICTION — preserve evidence as entered&quot;;IF([.M165]=&quot;&quot;;&quot;REVIEW LINKAGE STATUS — identifiers are present while status is UNKNOWN&quot;;IF([.M165]=&quot;UNMATCHED&quot;;&quot;REMOVE LINKAGE IDENTIFIERS OR CORRECT LINKAGE STATUS&quot;;IF([.M165]=&quot;SINGLE_SALE_LINKED&quot;;&quot;REQUIRE LINKED SALE ID AND NO ALLOCATION GROUP ID&quot;;IF([.M165]=&quot;MULTI_SALE_PENDING_ALLOCATION&quot;;&quot;REMOVE LINKED SALE ID OR CORRECT LINKAGE STATUS&quot;;IF([.M165]=&quot;ALLOCATED&quot;;&quot;REQUIRE ALLOCATION GROUP ID AND NO LINKED SALE ID&quot;;&quot;REVIEW LINKAGE EVIDENCE — NO AUTHORITY CREATED&quot;)))))))">
            <text:p>NO ACTION — linkage status is UNKNOWN / not asserted</text:p>
          </table:table-cell>
          <table:table-cell office:value-type="string" table:formula="of:=IF([.S165]=&quot;CONTRADICTION&quot;;&quot;BLOCKED&quot;;IF([.S165]=&quot;UNKNOWN&quot;;&quot;UNKNOWN&quot;;IF([.S165]=&quot;CLEAR&quot;;IF(OR([.O165]=&quot;&quot;;[.P165]=&quot;&quot;);&quot;UNKNOWN&quot;;&quot;READY FOR REVIEW&quot;);&quot;BLOCKED&quot;)))">
            <text:p>UNKNOWN</text:p>
          </table:table-cell>
          <table:table-cell office:value-type="string" table:formula="of:=IF([.U165]=&quot;UNKNOWN&quot;;&quot;COMPLETE OR ASSERT REQUIRED EVIDENCE BEFORE REVIEW&quot;;IF([.U165]=&quot;BLOCKED&quot;;&quot;RESOLVE CONTRADICTION BEFORE REVIEW — NO AUTHORITY CREATED&quot;;IF([.U16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5]=&quot;READY FOR REVIEW&quot;;&quot;REVIEW ELIGIBLE — NO AUTHORITY&quot;;IF(OR([.U165]=&quot;UNKNOWN&quot;;[.U165]=&quot;BLOCKED&quot;);&quot;NOT REVIEW ELIGIBLE&quot;;&quot;NOT REVIEW ELIGIBLE&quot;))">
            <text:p>NOT REVIEW ELIGIBLE</text:p>
          </table:table-cell>
          <table:table-cell office:value-type="string" table:formula="of:=IF([.W165]=&quot;NOT REVIEW ELIGIBLE&quot;;&quot;DO NOT BEGIN SETTLEMENT REVIEW — RESOLVE READINESS OR CONTRADICTION CONDITIONS&quot;;IF([.W16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5]=&quot;&quot;;&quot;UNKNOWN&quot;;IF([.W165]&lt;&gt;&quot;REVIEW ELIGIBLE — NO AUTHORITY&quot;;&quot;BLOCKED — OUTCOME ASSERTED WITHOUT REVIEW ELIGIBILITY&quot;;IF(OR([.Y165]=&quot;REVIEWED — NO AUTHORITY&quot;;[.Y165]=&quot;REVIEW DEFERRED&quot;;[.Y16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6]=&quot;&quot;;IF(AND([.L166]=&quot;&quot;;[.N166]=&quot;&quot;);&quot;UNKNOWN&quot;;&quot;CONTRADICTION&quot;);IF([.M166]=&quot;UNMATCHED&quot;;IF(AND([.L166]=&quot;&quot;;[.N166]=&quot;&quot;);&quot;CLEAR&quot;;&quot;CONTRADICTION&quot;);IF([.M166]=&quot;SINGLE_SALE_LINKED&quot;;IF(AND([.L166]&lt;&gt;&quot;&quot;;[.N166]=&quot;&quot;);&quot;CLEAR&quot;;&quot;CONTRADICTION&quot;);IF([.M166]=&quot;MULTI_SALE_PENDING_ALLOCATION&quot;;IF([.L166]=&quot;&quot;;&quot;CLEAR&quot;;&quot;CONTRADICTION&quot;);IF([.M166]=&quot;ALLOCATED&quot;;IF(AND([.L166]=&quot;&quot;;[.N166]&lt;&gt;&quot;&quot;);&quot;CLEAR&quot;;&quot;CONTRADICTION&quot;);&quot;CONTRADICTION&quot;)))))">
            <text:p>UNKNOWN</text:p>
          </table:table-cell>
          <table:table-cell office:value-type="string" table:formula="of:=IF([.S166]=&quot;UNKNOWN&quot;;&quot;NO ACTION — linkage status is UNKNOWN / not asserted&quot;;IF([.S166]=&quot;CLEAR&quot;;&quot;NO CONTRADICTION — preserve evidence as entered&quot;;IF([.M166]=&quot;&quot;;&quot;REVIEW LINKAGE STATUS — identifiers are present while status is UNKNOWN&quot;;IF([.M166]=&quot;UNMATCHED&quot;;&quot;REMOVE LINKAGE IDENTIFIERS OR CORRECT LINKAGE STATUS&quot;;IF([.M166]=&quot;SINGLE_SALE_LINKED&quot;;&quot;REQUIRE LINKED SALE ID AND NO ALLOCATION GROUP ID&quot;;IF([.M166]=&quot;MULTI_SALE_PENDING_ALLOCATION&quot;;&quot;REMOVE LINKED SALE ID OR CORRECT LINKAGE STATUS&quot;;IF([.M166]=&quot;ALLOCATED&quot;;&quot;REQUIRE ALLOCATION GROUP ID AND NO LINKED SALE ID&quot;;&quot;REVIEW LINKAGE EVIDENCE — NO AUTHORITY CREATED&quot;)))))))">
            <text:p>NO ACTION — linkage status is UNKNOWN / not asserted</text:p>
          </table:table-cell>
          <table:table-cell office:value-type="string" table:formula="of:=IF([.S166]=&quot;CONTRADICTION&quot;;&quot;BLOCKED&quot;;IF([.S166]=&quot;UNKNOWN&quot;;&quot;UNKNOWN&quot;;IF([.S166]=&quot;CLEAR&quot;;IF(OR([.O166]=&quot;&quot;;[.P166]=&quot;&quot;);&quot;UNKNOWN&quot;;&quot;READY FOR REVIEW&quot;);&quot;BLOCKED&quot;)))">
            <text:p>UNKNOWN</text:p>
          </table:table-cell>
          <table:table-cell office:value-type="string" table:formula="of:=IF([.U166]=&quot;UNKNOWN&quot;;&quot;COMPLETE OR ASSERT REQUIRED EVIDENCE BEFORE REVIEW&quot;;IF([.U166]=&quot;BLOCKED&quot;;&quot;RESOLVE CONTRADICTION BEFORE REVIEW — NO AUTHORITY CREATED&quot;;IF([.U16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6]=&quot;READY FOR REVIEW&quot;;&quot;REVIEW ELIGIBLE — NO AUTHORITY&quot;;IF(OR([.U166]=&quot;UNKNOWN&quot;;[.U166]=&quot;BLOCKED&quot;);&quot;NOT REVIEW ELIGIBLE&quot;;&quot;NOT REVIEW ELIGIBLE&quot;))">
            <text:p>NOT REVIEW ELIGIBLE</text:p>
          </table:table-cell>
          <table:table-cell office:value-type="string" table:formula="of:=IF([.W166]=&quot;NOT REVIEW ELIGIBLE&quot;;&quot;DO NOT BEGIN SETTLEMENT REVIEW — RESOLVE READINESS OR CONTRADICTION CONDITIONS&quot;;IF([.W16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6]=&quot;&quot;;&quot;UNKNOWN&quot;;IF([.W166]&lt;&gt;&quot;REVIEW ELIGIBLE — NO AUTHORITY&quot;;&quot;BLOCKED — OUTCOME ASSERTED WITHOUT REVIEW ELIGIBILITY&quot;;IF(OR([.Y166]=&quot;REVIEWED — NO AUTHORITY&quot;;[.Y166]=&quot;REVIEW DEFERRED&quot;;[.Y16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7]=&quot;&quot;;IF(AND([.L167]=&quot;&quot;;[.N167]=&quot;&quot;);&quot;UNKNOWN&quot;;&quot;CONTRADICTION&quot;);IF([.M167]=&quot;UNMATCHED&quot;;IF(AND([.L167]=&quot;&quot;;[.N167]=&quot;&quot;);&quot;CLEAR&quot;;&quot;CONTRADICTION&quot;);IF([.M167]=&quot;SINGLE_SALE_LINKED&quot;;IF(AND([.L167]&lt;&gt;&quot;&quot;;[.N167]=&quot;&quot;);&quot;CLEAR&quot;;&quot;CONTRADICTION&quot;);IF([.M167]=&quot;MULTI_SALE_PENDING_ALLOCATION&quot;;IF([.L167]=&quot;&quot;;&quot;CLEAR&quot;;&quot;CONTRADICTION&quot;);IF([.M167]=&quot;ALLOCATED&quot;;IF(AND([.L167]=&quot;&quot;;[.N167]&lt;&gt;&quot;&quot;);&quot;CLEAR&quot;;&quot;CONTRADICTION&quot;);&quot;CONTRADICTION&quot;)))))">
            <text:p>UNKNOWN</text:p>
          </table:table-cell>
          <table:table-cell office:value-type="string" table:formula="of:=IF([.S167]=&quot;UNKNOWN&quot;;&quot;NO ACTION — linkage status is UNKNOWN / not asserted&quot;;IF([.S167]=&quot;CLEAR&quot;;&quot;NO CONTRADICTION — preserve evidence as entered&quot;;IF([.M167]=&quot;&quot;;&quot;REVIEW LINKAGE STATUS — identifiers are present while status is UNKNOWN&quot;;IF([.M167]=&quot;UNMATCHED&quot;;&quot;REMOVE LINKAGE IDENTIFIERS OR CORRECT LINKAGE STATUS&quot;;IF([.M167]=&quot;SINGLE_SALE_LINKED&quot;;&quot;REQUIRE LINKED SALE ID AND NO ALLOCATION GROUP ID&quot;;IF([.M167]=&quot;MULTI_SALE_PENDING_ALLOCATION&quot;;&quot;REMOVE LINKED SALE ID OR CORRECT LINKAGE STATUS&quot;;IF([.M167]=&quot;ALLOCATED&quot;;&quot;REQUIRE ALLOCATION GROUP ID AND NO LINKED SALE ID&quot;;&quot;REVIEW LINKAGE EVIDENCE — NO AUTHORITY CREATED&quot;)))))))">
            <text:p>NO ACTION — linkage status is UNKNOWN / not asserted</text:p>
          </table:table-cell>
          <table:table-cell office:value-type="string" table:formula="of:=IF([.S167]=&quot;CONTRADICTION&quot;;&quot;BLOCKED&quot;;IF([.S167]=&quot;UNKNOWN&quot;;&quot;UNKNOWN&quot;;IF([.S167]=&quot;CLEAR&quot;;IF(OR([.O167]=&quot;&quot;;[.P167]=&quot;&quot;);&quot;UNKNOWN&quot;;&quot;READY FOR REVIEW&quot;);&quot;BLOCKED&quot;)))">
            <text:p>UNKNOWN</text:p>
          </table:table-cell>
          <table:table-cell office:value-type="string" table:formula="of:=IF([.U167]=&quot;UNKNOWN&quot;;&quot;COMPLETE OR ASSERT REQUIRED EVIDENCE BEFORE REVIEW&quot;;IF([.U167]=&quot;BLOCKED&quot;;&quot;RESOLVE CONTRADICTION BEFORE REVIEW — NO AUTHORITY CREATED&quot;;IF([.U16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7]=&quot;READY FOR REVIEW&quot;;&quot;REVIEW ELIGIBLE — NO AUTHORITY&quot;;IF(OR([.U167]=&quot;UNKNOWN&quot;;[.U167]=&quot;BLOCKED&quot;);&quot;NOT REVIEW ELIGIBLE&quot;;&quot;NOT REVIEW ELIGIBLE&quot;))">
            <text:p>NOT REVIEW ELIGIBLE</text:p>
          </table:table-cell>
          <table:table-cell office:value-type="string" table:formula="of:=IF([.W167]=&quot;NOT REVIEW ELIGIBLE&quot;;&quot;DO NOT BEGIN SETTLEMENT REVIEW — RESOLVE READINESS OR CONTRADICTION CONDITIONS&quot;;IF([.W16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7]=&quot;&quot;;&quot;UNKNOWN&quot;;IF([.W167]&lt;&gt;&quot;REVIEW ELIGIBLE — NO AUTHORITY&quot;;&quot;BLOCKED — OUTCOME ASSERTED WITHOUT REVIEW ELIGIBILITY&quot;;IF(OR([.Y167]=&quot;REVIEWED — NO AUTHORITY&quot;;[.Y167]=&quot;REVIEW DEFERRED&quot;;[.Y16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8]=&quot;&quot;;IF(AND([.L168]=&quot;&quot;;[.N168]=&quot;&quot;);&quot;UNKNOWN&quot;;&quot;CONTRADICTION&quot;);IF([.M168]=&quot;UNMATCHED&quot;;IF(AND([.L168]=&quot;&quot;;[.N168]=&quot;&quot;);&quot;CLEAR&quot;;&quot;CONTRADICTION&quot;);IF([.M168]=&quot;SINGLE_SALE_LINKED&quot;;IF(AND([.L168]&lt;&gt;&quot;&quot;;[.N168]=&quot;&quot;);&quot;CLEAR&quot;;&quot;CONTRADICTION&quot;);IF([.M168]=&quot;MULTI_SALE_PENDING_ALLOCATION&quot;;IF([.L168]=&quot;&quot;;&quot;CLEAR&quot;;&quot;CONTRADICTION&quot;);IF([.M168]=&quot;ALLOCATED&quot;;IF(AND([.L168]=&quot;&quot;;[.N168]&lt;&gt;&quot;&quot;);&quot;CLEAR&quot;;&quot;CONTRADICTION&quot;);&quot;CONTRADICTION&quot;)))))">
            <text:p>UNKNOWN</text:p>
          </table:table-cell>
          <table:table-cell office:value-type="string" table:formula="of:=IF([.S168]=&quot;UNKNOWN&quot;;&quot;NO ACTION — linkage status is UNKNOWN / not asserted&quot;;IF([.S168]=&quot;CLEAR&quot;;&quot;NO CONTRADICTION — preserve evidence as entered&quot;;IF([.M168]=&quot;&quot;;&quot;REVIEW LINKAGE STATUS — identifiers are present while status is UNKNOWN&quot;;IF([.M168]=&quot;UNMATCHED&quot;;&quot;REMOVE LINKAGE IDENTIFIERS OR CORRECT LINKAGE STATUS&quot;;IF([.M168]=&quot;SINGLE_SALE_LINKED&quot;;&quot;REQUIRE LINKED SALE ID AND NO ALLOCATION GROUP ID&quot;;IF([.M168]=&quot;MULTI_SALE_PENDING_ALLOCATION&quot;;&quot;REMOVE LINKED SALE ID OR CORRECT LINKAGE STATUS&quot;;IF([.M168]=&quot;ALLOCATED&quot;;&quot;REQUIRE ALLOCATION GROUP ID AND NO LINKED SALE ID&quot;;&quot;REVIEW LINKAGE EVIDENCE — NO AUTHORITY CREATED&quot;)))))))">
            <text:p>NO ACTION — linkage status is UNKNOWN / not asserted</text:p>
          </table:table-cell>
          <table:table-cell office:value-type="string" table:formula="of:=IF([.S168]=&quot;CONTRADICTION&quot;;&quot;BLOCKED&quot;;IF([.S168]=&quot;UNKNOWN&quot;;&quot;UNKNOWN&quot;;IF([.S168]=&quot;CLEAR&quot;;IF(OR([.O168]=&quot;&quot;;[.P168]=&quot;&quot;);&quot;UNKNOWN&quot;;&quot;READY FOR REVIEW&quot;);&quot;BLOCKED&quot;)))">
            <text:p>UNKNOWN</text:p>
          </table:table-cell>
          <table:table-cell office:value-type="string" table:formula="of:=IF([.U168]=&quot;UNKNOWN&quot;;&quot;COMPLETE OR ASSERT REQUIRED EVIDENCE BEFORE REVIEW&quot;;IF([.U168]=&quot;BLOCKED&quot;;&quot;RESOLVE CONTRADICTION BEFORE REVIEW — NO AUTHORITY CREATED&quot;;IF([.U16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8]=&quot;READY FOR REVIEW&quot;;&quot;REVIEW ELIGIBLE — NO AUTHORITY&quot;;IF(OR([.U168]=&quot;UNKNOWN&quot;;[.U168]=&quot;BLOCKED&quot;);&quot;NOT REVIEW ELIGIBLE&quot;;&quot;NOT REVIEW ELIGIBLE&quot;))">
            <text:p>NOT REVIEW ELIGIBLE</text:p>
          </table:table-cell>
          <table:table-cell office:value-type="string" table:formula="of:=IF([.W168]=&quot;NOT REVIEW ELIGIBLE&quot;;&quot;DO NOT BEGIN SETTLEMENT REVIEW — RESOLVE READINESS OR CONTRADICTION CONDITIONS&quot;;IF([.W16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8]=&quot;&quot;;&quot;UNKNOWN&quot;;IF([.W168]&lt;&gt;&quot;REVIEW ELIGIBLE — NO AUTHORITY&quot;;&quot;BLOCKED — OUTCOME ASSERTED WITHOUT REVIEW ELIGIBILITY&quot;;IF(OR([.Y168]=&quot;REVIEWED — NO AUTHORITY&quot;;[.Y168]=&quot;REVIEW DEFERRED&quot;;[.Y16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69]=&quot;&quot;;IF(AND([.L169]=&quot;&quot;;[.N169]=&quot;&quot;);&quot;UNKNOWN&quot;;&quot;CONTRADICTION&quot;);IF([.M169]=&quot;UNMATCHED&quot;;IF(AND([.L169]=&quot;&quot;;[.N169]=&quot;&quot;);&quot;CLEAR&quot;;&quot;CONTRADICTION&quot;);IF([.M169]=&quot;SINGLE_SALE_LINKED&quot;;IF(AND([.L169]&lt;&gt;&quot;&quot;;[.N169]=&quot;&quot;);&quot;CLEAR&quot;;&quot;CONTRADICTION&quot;);IF([.M169]=&quot;MULTI_SALE_PENDING_ALLOCATION&quot;;IF([.L169]=&quot;&quot;;&quot;CLEAR&quot;;&quot;CONTRADICTION&quot;);IF([.M169]=&quot;ALLOCATED&quot;;IF(AND([.L169]=&quot;&quot;;[.N169]&lt;&gt;&quot;&quot;);&quot;CLEAR&quot;;&quot;CONTRADICTION&quot;);&quot;CONTRADICTION&quot;)))))">
            <text:p>UNKNOWN</text:p>
          </table:table-cell>
          <table:table-cell office:value-type="string" table:formula="of:=IF([.S169]=&quot;UNKNOWN&quot;;&quot;NO ACTION — linkage status is UNKNOWN / not asserted&quot;;IF([.S169]=&quot;CLEAR&quot;;&quot;NO CONTRADICTION — preserve evidence as entered&quot;;IF([.M169]=&quot;&quot;;&quot;REVIEW LINKAGE STATUS — identifiers are present while status is UNKNOWN&quot;;IF([.M169]=&quot;UNMATCHED&quot;;&quot;REMOVE LINKAGE IDENTIFIERS OR CORRECT LINKAGE STATUS&quot;;IF([.M169]=&quot;SINGLE_SALE_LINKED&quot;;&quot;REQUIRE LINKED SALE ID AND NO ALLOCATION GROUP ID&quot;;IF([.M169]=&quot;MULTI_SALE_PENDING_ALLOCATION&quot;;&quot;REMOVE LINKED SALE ID OR CORRECT LINKAGE STATUS&quot;;IF([.M169]=&quot;ALLOCATED&quot;;&quot;REQUIRE ALLOCATION GROUP ID AND NO LINKED SALE ID&quot;;&quot;REVIEW LINKAGE EVIDENCE — NO AUTHORITY CREATED&quot;)))))))">
            <text:p>NO ACTION — linkage status is UNKNOWN / not asserted</text:p>
          </table:table-cell>
          <table:table-cell office:value-type="string" table:formula="of:=IF([.S169]=&quot;CONTRADICTION&quot;;&quot;BLOCKED&quot;;IF([.S169]=&quot;UNKNOWN&quot;;&quot;UNKNOWN&quot;;IF([.S169]=&quot;CLEAR&quot;;IF(OR([.O169]=&quot;&quot;;[.P169]=&quot;&quot;);&quot;UNKNOWN&quot;;&quot;READY FOR REVIEW&quot;);&quot;BLOCKED&quot;)))">
            <text:p>UNKNOWN</text:p>
          </table:table-cell>
          <table:table-cell office:value-type="string" table:formula="of:=IF([.U169]=&quot;UNKNOWN&quot;;&quot;COMPLETE OR ASSERT REQUIRED EVIDENCE BEFORE REVIEW&quot;;IF([.U169]=&quot;BLOCKED&quot;;&quot;RESOLVE CONTRADICTION BEFORE REVIEW — NO AUTHORITY CREATED&quot;;IF([.U16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69]=&quot;READY FOR REVIEW&quot;;&quot;REVIEW ELIGIBLE — NO AUTHORITY&quot;;IF(OR([.U169]=&quot;UNKNOWN&quot;;[.U169]=&quot;BLOCKED&quot;);&quot;NOT REVIEW ELIGIBLE&quot;;&quot;NOT REVIEW ELIGIBLE&quot;))">
            <text:p>NOT REVIEW ELIGIBLE</text:p>
          </table:table-cell>
          <table:table-cell office:value-type="string" table:formula="of:=IF([.W169]=&quot;NOT REVIEW ELIGIBLE&quot;;&quot;DO NOT BEGIN SETTLEMENT REVIEW — RESOLVE READINESS OR CONTRADICTION CONDITIONS&quot;;IF([.W16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69]=&quot;&quot;;&quot;UNKNOWN&quot;;IF([.W169]&lt;&gt;&quot;REVIEW ELIGIBLE — NO AUTHORITY&quot;;&quot;BLOCKED — OUTCOME ASSERTED WITHOUT REVIEW ELIGIBILITY&quot;;IF(OR([.Y169]=&quot;REVIEWED — NO AUTHORITY&quot;;[.Y169]=&quot;REVIEW DEFERRED&quot;;[.Y16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0]=&quot;&quot;;IF(AND([.L170]=&quot;&quot;;[.N170]=&quot;&quot;);&quot;UNKNOWN&quot;;&quot;CONTRADICTION&quot;);IF([.M170]=&quot;UNMATCHED&quot;;IF(AND([.L170]=&quot;&quot;;[.N170]=&quot;&quot;);&quot;CLEAR&quot;;&quot;CONTRADICTION&quot;);IF([.M170]=&quot;SINGLE_SALE_LINKED&quot;;IF(AND([.L170]&lt;&gt;&quot;&quot;;[.N170]=&quot;&quot;);&quot;CLEAR&quot;;&quot;CONTRADICTION&quot;);IF([.M170]=&quot;MULTI_SALE_PENDING_ALLOCATION&quot;;IF([.L170]=&quot;&quot;;&quot;CLEAR&quot;;&quot;CONTRADICTION&quot;);IF([.M170]=&quot;ALLOCATED&quot;;IF(AND([.L170]=&quot;&quot;;[.N170]&lt;&gt;&quot;&quot;);&quot;CLEAR&quot;;&quot;CONTRADICTION&quot;);&quot;CONTRADICTION&quot;)))))">
            <text:p>UNKNOWN</text:p>
          </table:table-cell>
          <table:table-cell office:value-type="string" table:formula="of:=IF([.S170]=&quot;UNKNOWN&quot;;&quot;NO ACTION — linkage status is UNKNOWN / not asserted&quot;;IF([.S170]=&quot;CLEAR&quot;;&quot;NO CONTRADICTION — preserve evidence as entered&quot;;IF([.M170]=&quot;&quot;;&quot;REVIEW LINKAGE STATUS — identifiers are present while status is UNKNOWN&quot;;IF([.M170]=&quot;UNMATCHED&quot;;&quot;REMOVE LINKAGE IDENTIFIERS OR CORRECT LINKAGE STATUS&quot;;IF([.M170]=&quot;SINGLE_SALE_LINKED&quot;;&quot;REQUIRE LINKED SALE ID AND NO ALLOCATION GROUP ID&quot;;IF([.M170]=&quot;MULTI_SALE_PENDING_ALLOCATION&quot;;&quot;REMOVE LINKED SALE ID OR CORRECT LINKAGE STATUS&quot;;IF([.M170]=&quot;ALLOCATED&quot;;&quot;REQUIRE ALLOCATION GROUP ID AND NO LINKED SALE ID&quot;;&quot;REVIEW LINKAGE EVIDENCE — NO AUTHORITY CREATED&quot;)))))))">
            <text:p>NO ACTION — linkage status is UNKNOWN / not asserted</text:p>
          </table:table-cell>
          <table:table-cell office:value-type="string" table:formula="of:=IF([.S170]=&quot;CONTRADICTION&quot;;&quot;BLOCKED&quot;;IF([.S170]=&quot;UNKNOWN&quot;;&quot;UNKNOWN&quot;;IF([.S170]=&quot;CLEAR&quot;;IF(OR([.O170]=&quot;&quot;;[.P170]=&quot;&quot;);&quot;UNKNOWN&quot;;&quot;READY FOR REVIEW&quot;);&quot;BLOCKED&quot;)))">
            <text:p>UNKNOWN</text:p>
          </table:table-cell>
          <table:table-cell office:value-type="string" table:formula="of:=IF([.U170]=&quot;UNKNOWN&quot;;&quot;COMPLETE OR ASSERT REQUIRED EVIDENCE BEFORE REVIEW&quot;;IF([.U170]=&quot;BLOCKED&quot;;&quot;RESOLVE CONTRADICTION BEFORE REVIEW — NO AUTHORITY CREATED&quot;;IF([.U17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0]=&quot;READY FOR REVIEW&quot;;&quot;REVIEW ELIGIBLE — NO AUTHORITY&quot;;IF(OR([.U170]=&quot;UNKNOWN&quot;;[.U170]=&quot;BLOCKED&quot;);&quot;NOT REVIEW ELIGIBLE&quot;;&quot;NOT REVIEW ELIGIBLE&quot;))">
            <text:p>NOT REVIEW ELIGIBLE</text:p>
          </table:table-cell>
          <table:table-cell office:value-type="string" table:formula="of:=IF([.W170]=&quot;NOT REVIEW ELIGIBLE&quot;;&quot;DO NOT BEGIN SETTLEMENT REVIEW — RESOLVE READINESS OR CONTRADICTION CONDITIONS&quot;;IF([.W17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0]=&quot;&quot;;&quot;UNKNOWN&quot;;IF([.W170]&lt;&gt;&quot;REVIEW ELIGIBLE — NO AUTHORITY&quot;;&quot;BLOCKED — OUTCOME ASSERTED WITHOUT REVIEW ELIGIBILITY&quot;;IF(OR([.Y170]=&quot;REVIEWED — NO AUTHORITY&quot;;[.Y170]=&quot;REVIEW DEFERRED&quot;;[.Y17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1]=&quot;&quot;;IF(AND([.L171]=&quot;&quot;;[.N171]=&quot;&quot;);&quot;UNKNOWN&quot;;&quot;CONTRADICTION&quot;);IF([.M171]=&quot;UNMATCHED&quot;;IF(AND([.L171]=&quot;&quot;;[.N171]=&quot;&quot;);&quot;CLEAR&quot;;&quot;CONTRADICTION&quot;);IF([.M171]=&quot;SINGLE_SALE_LINKED&quot;;IF(AND([.L171]&lt;&gt;&quot;&quot;;[.N171]=&quot;&quot;);&quot;CLEAR&quot;;&quot;CONTRADICTION&quot;);IF([.M171]=&quot;MULTI_SALE_PENDING_ALLOCATION&quot;;IF([.L171]=&quot;&quot;;&quot;CLEAR&quot;;&quot;CONTRADICTION&quot;);IF([.M171]=&quot;ALLOCATED&quot;;IF(AND([.L171]=&quot;&quot;;[.N171]&lt;&gt;&quot;&quot;);&quot;CLEAR&quot;;&quot;CONTRADICTION&quot;);&quot;CONTRADICTION&quot;)))))">
            <text:p>UNKNOWN</text:p>
          </table:table-cell>
          <table:table-cell office:value-type="string" table:formula="of:=IF([.S171]=&quot;UNKNOWN&quot;;&quot;NO ACTION — linkage status is UNKNOWN / not asserted&quot;;IF([.S171]=&quot;CLEAR&quot;;&quot;NO CONTRADICTION — preserve evidence as entered&quot;;IF([.M171]=&quot;&quot;;&quot;REVIEW LINKAGE STATUS — identifiers are present while status is UNKNOWN&quot;;IF([.M171]=&quot;UNMATCHED&quot;;&quot;REMOVE LINKAGE IDENTIFIERS OR CORRECT LINKAGE STATUS&quot;;IF([.M171]=&quot;SINGLE_SALE_LINKED&quot;;&quot;REQUIRE LINKED SALE ID AND NO ALLOCATION GROUP ID&quot;;IF([.M171]=&quot;MULTI_SALE_PENDING_ALLOCATION&quot;;&quot;REMOVE LINKED SALE ID OR CORRECT LINKAGE STATUS&quot;;IF([.M171]=&quot;ALLOCATED&quot;;&quot;REQUIRE ALLOCATION GROUP ID AND NO LINKED SALE ID&quot;;&quot;REVIEW LINKAGE EVIDENCE — NO AUTHORITY CREATED&quot;)))))))">
            <text:p>NO ACTION — linkage status is UNKNOWN / not asserted</text:p>
          </table:table-cell>
          <table:table-cell office:value-type="string" table:formula="of:=IF([.S171]=&quot;CONTRADICTION&quot;;&quot;BLOCKED&quot;;IF([.S171]=&quot;UNKNOWN&quot;;&quot;UNKNOWN&quot;;IF([.S171]=&quot;CLEAR&quot;;IF(OR([.O171]=&quot;&quot;;[.P171]=&quot;&quot;);&quot;UNKNOWN&quot;;&quot;READY FOR REVIEW&quot;);&quot;BLOCKED&quot;)))">
            <text:p>UNKNOWN</text:p>
          </table:table-cell>
          <table:table-cell office:value-type="string" table:formula="of:=IF([.U171]=&quot;UNKNOWN&quot;;&quot;COMPLETE OR ASSERT REQUIRED EVIDENCE BEFORE REVIEW&quot;;IF([.U171]=&quot;BLOCKED&quot;;&quot;RESOLVE CONTRADICTION BEFORE REVIEW — NO AUTHORITY CREATED&quot;;IF([.U17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1]=&quot;READY FOR REVIEW&quot;;&quot;REVIEW ELIGIBLE — NO AUTHORITY&quot;;IF(OR([.U171]=&quot;UNKNOWN&quot;;[.U171]=&quot;BLOCKED&quot;);&quot;NOT REVIEW ELIGIBLE&quot;;&quot;NOT REVIEW ELIGIBLE&quot;))">
            <text:p>NOT REVIEW ELIGIBLE</text:p>
          </table:table-cell>
          <table:table-cell office:value-type="string" table:formula="of:=IF([.W171]=&quot;NOT REVIEW ELIGIBLE&quot;;&quot;DO NOT BEGIN SETTLEMENT REVIEW — RESOLVE READINESS OR CONTRADICTION CONDITIONS&quot;;IF([.W17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1]=&quot;&quot;;&quot;UNKNOWN&quot;;IF([.W171]&lt;&gt;&quot;REVIEW ELIGIBLE — NO AUTHORITY&quot;;&quot;BLOCKED — OUTCOME ASSERTED WITHOUT REVIEW ELIGIBILITY&quot;;IF(OR([.Y171]=&quot;REVIEWED — NO AUTHORITY&quot;;[.Y171]=&quot;REVIEW DEFERRED&quot;;[.Y171]=&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2]=&quot;&quot;;IF(AND([.L172]=&quot;&quot;;[.N172]=&quot;&quot;);&quot;UNKNOWN&quot;;&quot;CONTRADICTION&quot;);IF([.M172]=&quot;UNMATCHED&quot;;IF(AND([.L172]=&quot;&quot;;[.N172]=&quot;&quot;);&quot;CLEAR&quot;;&quot;CONTRADICTION&quot;);IF([.M172]=&quot;SINGLE_SALE_LINKED&quot;;IF(AND([.L172]&lt;&gt;&quot;&quot;;[.N172]=&quot;&quot;);&quot;CLEAR&quot;;&quot;CONTRADICTION&quot;);IF([.M172]=&quot;MULTI_SALE_PENDING_ALLOCATION&quot;;IF([.L172]=&quot;&quot;;&quot;CLEAR&quot;;&quot;CONTRADICTION&quot;);IF([.M172]=&quot;ALLOCATED&quot;;IF(AND([.L172]=&quot;&quot;;[.N172]&lt;&gt;&quot;&quot;);&quot;CLEAR&quot;;&quot;CONTRADICTION&quot;);&quot;CONTRADICTION&quot;)))))">
            <text:p>UNKNOWN</text:p>
          </table:table-cell>
          <table:table-cell office:value-type="string" table:formula="of:=IF([.S172]=&quot;UNKNOWN&quot;;&quot;NO ACTION — linkage status is UNKNOWN / not asserted&quot;;IF([.S172]=&quot;CLEAR&quot;;&quot;NO CONTRADICTION — preserve evidence as entered&quot;;IF([.M172]=&quot;&quot;;&quot;REVIEW LINKAGE STATUS — identifiers are present while status is UNKNOWN&quot;;IF([.M172]=&quot;UNMATCHED&quot;;&quot;REMOVE LINKAGE IDENTIFIERS OR CORRECT LINKAGE STATUS&quot;;IF([.M172]=&quot;SINGLE_SALE_LINKED&quot;;&quot;REQUIRE LINKED SALE ID AND NO ALLOCATION GROUP ID&quot;;IF([.M172]=&quot;MULTI_SALE_PENDING_ALLOCATION&quot;;&quot;REMOVE LINKED SALE ID OR CORRECT LINKAGE STATUS&quot;;IF([.M172]=&quot;ALLOCATED&quot;;&quot;REQUIRE ALLOCATION GROUP ID AND NO LINKED SALE ID&quot;;&quot;REVIEW LINKAGE EVIDENCE — NO AUTHORITY CREATED&quot;)))))))">
            <text:p>NO ACTION — linkage status is UNKNOWN / not asserted</text:p>
          </table:table-cell>
          <table:table-cell office:value-type="string" table:formula="of:=IF([.S172]=&quot;CONTRADICTION&quot;;&quot;BLOCKED&quot;;IF([.S172]=&quot;UNKNOWN&quot;;&quot;UNKNOWN&quot;;IF([.S172]=&quot;CLEAR&quot;;IF(OR([.O172]=&quot;&quot;;[.P172]=&quot;&quot;);&quot;UNKNOWN&quot;;&quot;READY FOR REVIEW&quot;);&quot;BLOCKED&quot;)))">
            <text:p>UNKNOWN</text:p>
          </table:table-cell>
          <table:table-cell office:value-type="string" table:formula="of:=IF([.U172]=&quot;UNKNOWN&quot;;&quot;COMPLETE OR ASSERT REQUIRED EVIDENCE BEFORE REVIEW&quot;;IF([.U172]=&quot;BLOCKED&quot;;&quot;RESOLVE CONTRADICTION BEFORE REVIEW — NO AUTHORITY CREATED&quot;;IF([.U17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2]=&quot;READY FOR REVIEW&quot;;&quot;REVIEW ELIGIBLE — NO AUTHORITY&quot;;IF(OR([.U172]=&quot;UNKNOWN&quot;;[.U172]=&quot;BLOCKED&quot;);&quot;NOT REVIEW ELIGIBLE&quot;;&quot;NOT REVIEW ELIGIBLE&quot;))">
            <text:p>NOT REVIEW ELIGIBLE</text:p>
          </table:table-cell>
          <table:table-cell office:value-type="string" table:formula="of:=IF([.W172]=&quot;NOT REVIEW ELIGIBLE&quot;;&quot;DO NOT BEGIN SETTLEMENT REVIEW — RESOLVE READINESS OR CONTRADICTION CONDITIONS&quot;;IF([.W17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2]=&quot;&quot;;&quot;UNKNOWN&quot;;IF([.W172]&lt;&gt;&quot;REVIEW ELIGIBLE — NO AUTHORITY&quot;;&quot;BLOCKED — OUTCOME ASSERTED WITHOUT REVIEW ELIGIBILITY&quot;;IF(OR([.Y172]=&quot;REVIEWED — NO AUTHORITY&quot;;[.Y172]=&quot;REVIEW DEFERRED&quot;;[.Y17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3]=&quot;&quot;;IF(AND([.L173]=&quot;&quot;;[.N173]=&quot;&quot;);&quot;UNKNOWN&quot;;&quot;CONTRADICTION&quot;);IF([.M173]=&quot;UNMATCHED&quot;;IF(AND([.L173]=&quot;&quot;;[.N173]=&quot;&quot;);&quot;CLEAR&quot;;&quot;CONTRADICTION&quot;);IF([.M173]=&quot;SINGLE_SALE_LINKED&quot;;IF(AND([.L173]&lt;&gt;&quot;&quot;;[.N173]=&quot;&quot;);&quot;CLEAR&quot;;&quot;CONTRADICTION&quot;);IF([.M173]=&quot;MULTI_SALE_PENDING_ALLOCATION&quot;;IF([.L173]=&quot;&quot;;&quot;CLEAR&quot;;&quot;CONTRADICTION&quot;);IF([.M173]=&quot;ALLOCATED&quot;;IF(AND([.L173]=&quot;&quot;;[.N173]&lt;&gt;&quot;&quot;);&quot;CLEAR&quot;;&quot;CONTRADICTION&quot;);&quot;CONTRADICTION&quot;)))))">
            <text:p>UNKNOWN</text:p>
          </table:table-cell>
          <table:table-cell office:value-type="string" table:formula="of:=IF([.S173]=&quot;UNKNOWN&quot;;&quot;NO ACTION — linkage status is UNKNOWN / not asserted&quot;;IF([.S173]=&quot;CLEAR&quot;;&quot;NO CONTRADICTION — preserve evidence as entered&quot;;IF([.M173]=&quot;&quot;;&quot;REVIEW LINKAGE STATUS — identifiers are present while status is UNKNOWN&quot;;IF([.M173]=&quot;UNMATCHED&quot;;&quot;REMOVE LINKAGE IDENTIFIERS OR CORRECT LINKAGE STATUS&quot;;IF([.M173]=&quot;SINGLE_SALE_LINKED&quot;;&quot;REQUIRE LINKED SALE ID AND NO ALLOCATION GROUP ID&quot;;IF([.M173]=&quot;MULTI_SALE_PENDING_ALLOCATION&quot;;&quot;REMOVE LINKED SALE ID OR CORRECT LINKAGE STATUS&quot;;IF([.M173]=&quot;ALLOCATED&quot;;&quot;REQUIRE ALLOCATION GROUP ID AND NO LINKED SALE ID&quot;;&quot;REVIEW LINKAGE EVIDENCE — NO AUTHORITY CREATED&quot;)))))))">
            <text:p>NO ACTION — linkage status is UNKNOWN / not asserted</text:p>
          </table:table-cell>
          <table:table-cell office:value-type="string" table:formula="of:=IF([.S173]=&quot;CONTRADICTION&quot;;&quot;BLOCKED&quot;;IF([.S173]=&quot;UNKNOWN&quot;;&quot;UNKNOWN&quot;;IF([.S173]=&quot;CLEAR&quot;;IF(OR([.O173]=&quot;&quot;;[.P173]=&quot;&quot;);&quot;UNKNOWN&quot;;&quot;READY FOR REVIEW&quot;);&quot;BLOCKED&quot;)))">
            <text:p>UNKNOWN</text:p>
          </table:table-cell>
          <table:table-cell office:value-type="string" table:formula="of:=IF([.U173]=&quot;UNKNOWN&quot;;&quot;COMPLETE OR ASSERT REQUIRED EVIDENCE BEFORE REVIEW&quot;;IF([.U173]=&quot;BLOCKED&quot;;&quot;RESOLVE CONTRADICTION BEFORE REVIEW — NO AUTHORITY CREATED&quot;;IF([.U17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3]=&quot;READY FOR REVIEW&quot;;&quot;REVIEW ELIGIBLE — NO AUTHORITY&quot;;IF(OR([.U173]=&quot;UNKNOWN&quot;;[.U173]=&quot;BLOCKED&quot;);&quot;NOT REVIEW ELIGIBLE&quot;;&quot;NOT REVIEW ELIGIBLE&quot;))">
            <text:p>NOT REVIEW ELIGIBLE</text:p>
          </table:table-cell>
          <table:table-cell office:value-type="string" table:formula="of:=IF([.W173]=&quot;NOT REVIEW ELIGIBLE&quot;;&quot;DO NOT BEGIN SETTLEMENT REVIEW — RESOLVE READINESS OR CONTRADICTION CONDITIONS&quot;;IF([.W17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3]=&quot;&quot;;&quot;UNKNOWN&quot;;IF([.W173]&lt;&gt;&quot;REVIEW ELIGIBLE — NO AUTHORITY&quot;;&quot;BLOCKED — OUTCOME ASSERTED WITHOUT REVIEW ELIGIBILITY&quot;;IF(OR([.Y173]=&quot;REVIEWED — NO AUTHORITY&quot;;[.Y173]=&quot;REVIEW DEFERRED&quot;;[.Y17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4]=&quot;&quot;;IF(AND([.L174]=&quot;&quot;;[.N174]=&quot;&quot;);&quot;UNKNOWN&quot;;&quot;CONTRADICTION&quot;);IF([.M174]=&quot;UNMATCHED&quot;;IF(AND([.L174]=&quot;&quot;;[.N174]=&quot;&quot;);&quot;CLEAR&quot;;&quot;CONTRADICTION&quot;);IF([.M174]=&quot;SINGLE_SALE_LINKED&quot;;IF(AND([.L174]&lt;&gt;&quot;&quot;;[.N174]=&quot;&quot;);&quot;CLEAR&quot;;&quot;CONTRADICTION&quot;);IF([.M174]=&quot;MULTI_SALE_PENDING_ALLOCATION&quot;;IF([.L174]=&quot;&quot;;&quot;CLEAR&quot;;&quot;CONTRADICTION&quot;);IF([.M174]=&quot;ALLOCATED&quot;;IF(AND([.L174]=&quot;&quot;;[.N174]&lt;&gt;&quot;&quot;);&quot;CLEAR&quot;;&quot;CONTRADICTION&quot;);&quot;CONTRADICTION&quot;)))))">
            <text:p>UNKNOWN</text:p>
          </table:table-cell>
          <table:table-cell office:value-type="string" table:formula="of:=IF([.S174]=&quot;UNKNOWN&quot;;&quot;NO ACTION — linkage status is UNKNOWN / not asserted&quot;;IF([.S174]=&quot;CLEAR&quot;;&quot;NO CONTRADICTION — preserve evidence as entered&quot;;IF([.M174]=&quot;&quot;;&quot;REVIEW LINKAGE STATUS — identifiers are present while status is UNKNOWN&quot;;IF([.M174]=&quot;UNMATCHED&quot;;&quot;REMOVE LINKAGE IDENTIFIERS OR CORRECT LINKAGE STATUS&quot;;IF([.M174]=&quot;SINGLE_SALE_LINKED&quot;;&quot;REQUIRE LINKED SALE ID AND NO ALLOCATION GROUP ID&quot;;IF([.M174]=&quot;MULTI_SALE_PENDING_ALLOCATION&quot;;&quot;REMOVE LINKED SALE ID OR CORRECT LINKAGE STATUS&quot;;IF([.M174]=&quot;ALLOCATED&quot;;&quot;REQUIRE ALLOCATION GROUP ID AND NO LINKED SALE ID&quot;;&quot;REVIEW LINKAGE EVIDENCE — NO AUTHORITY CREATED&quot;)))))))">
            <text:p>NO ACTION — linkage status is UNKNOWN / not asserted</text:p>
          </table:table-cell>
          <table:table-cell office:value-type="string" table:formula="of:=IF([.S174]=&quot;CONTRADICTION&quot;;&quot;BLOCKED&quot;;IF([.S174]=&quot;UNKNOWN&quot;;&quot;UNKNOWN&quot;;IF([.S174]=&quot;CLEAR&quot;;IF(OR([.O174]=&quot;&quot;;[.P174]=&quot;&quot;);&quot;UNKNOWN&quot;;&quot;READY FOR REVIEW&quot;);&quot;BLOCKED&quot;)))">
            <text:p>UNKNOWN</text:p>
          </table:table-cell>
          <table:table-cell office:value-type="string" table:formula="of:=IF([.U174]=&quot;UNKNOWN&quot;;&quot;COMPLETE OR ASSERT REQUIRED EVIDENCE BEFORE REVIEW&quot;;IF([.U174]=&quot;BLOCKED&quot;;&quot;RESOLVE CONTRADICTION BEFORE REVIEW — NO AUTHORITY CREATED&quot;;IF([.U17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4]=&quot;READY FOR REVIEW&quot;;&quot;REVIEW ELIGIBLE — NO AUTHORITY&quot;;IF(OR([.U174]=&quot;UNKNOWN&quot;;[.U174]=&quot;BLOCKED&quot;);&quot;NOT REVIEW ELIGIBLE&quot;;&quot;NOT REVIEW ELIGIBLE&quot;))">
            <text:p>NOT REVIEW ELIGIBLE</text:p>
          </table:table-cell>
          <table:table-cell office:value-type="string" table:formula="of:=IF([.W174]=&quot;NOT REVIEW ELIGIBLE&quot;;&quot;DO NOT BEGIN SETTLEMENT REVIEW — RESOLVE READINESS OR CONTRADICTION CONDITIONS&quot;;IF([.W17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4]=&quot;&quot;;&quot;UNKNOWN&quot;;IF([.W174]&lt;&gt;&quot;REVIEW ELIGIBLE — NO AUTHORITY&quot;;&quot;BLOCKED — OUTCOME ASSERTED WITHOUT REVIEW ELIGIBILITY&quot;;IF(OR([.Y174]=&quot;REVIEWED — NO AUTHORITY&quot;;[.Y174]=&quot;REVIEW DEFERRED&quot;;[.Y17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5]=&quot;&quot;;IF(AND([.L175]=&quot;&quot;;[.N175]=&quot;&quot;);&quot;UNKNOWN&quot;;&quot;CONTRADICTION&quot;);IF([.M175]=&quot;UNMATCHED&quot;;IF(AND([.L175]=&quot;&quot;;[.N175]=&quot;&quot;);&quot;CLEAR&quot;;&quot;CONTRADICTION&quot;);IF([.M175]=&quot;SINGLE_SALE_LINKED&quot;;IF(AND([.L175]&lt;&gt;&quot;&quot;;[.N175]=&quot;&quot;);&quot;CLEAR&quot;;&quot;CONTRADICTION&quot;);IF([.M175]=&quot;MULTI_SALE_PENDING_ALLOCATION&quot;;IF([.L175]=&quot;&quot;;&quot;CLEAR&quot;;&quot;CONTRADICTION&quot;);IF([.M175]=&quot;ALLOCATED&quot;;IF(AND([.L175]=&quot;&quot;;[.N175]&lt;&gt;&quot;&quot;);&quot;CLEAR&quot;;&quot;CONTRADICTION&quot;);&quot;CONTRADICTION&quot;)))))">
            <text:p>UNKNOWN</text:p>
          </table:table-cell>
          <table:table-cell office:value-type="string" table:formula="of:=IF([.S175]=&quot;UNKNOWN&quot;;&quot;NO ACTION — linkage status is UNKNOWN / not asserted&quot;;IF([.S175]=&quot;CLEAR&quot;;&quot;NO CONTRADICTION — preserve evidence as entered&quot;;IF([.M175]=&quot;&quot;;&quot;REVIEW LINKAGE STATUS — identifiers are present while status is UNKNOWN&quot;;IF([.M175]=&quot;UNMATCHED&quot;;&quot;REMOVE LINKAGE IDENTIFIERS OR CORRECT LINKAGE STATUS&quot;;IF([.M175]=&quot;SINGLE_SALE_LINKED&quot;;&quot;REQUIRE LINKED SALE ID AND NO ALLOCATION GROUP ID&quot;;IF([.M175]=&quot;MULTI_SALE_PENDING_ALLOCATION&quot;;&quot;REMOVE LINKED SALE ID OR CORRECT LINKAGE STATUS&quot;;IF([.M175]=&quot;ALLOCATED&quot;;&quot;REQUIRE ALLOCATION GROUP ID AND NO LINKED SALE ID&quot;;&quot;REVIEW LINKAGE EVIDENCE — NO AUTHORITY CREATED&quot;)))))))">
            <text:p>NO ACTION — linkage status is UNKNOWN / not asserted</text:p>
          </table:table-cell>
          <table:table-cell office:value-type="string" table:formula="of:=IF([.S175]=&quot;CONTRADICTION&quot;;&quot;BLOCKED&quot;;IF([.S175]=&quot;UNKNOWN&quot;;&quot;UNKNOWN&quot;;IF([.S175]=&quot;CLEAR&quot;;IF(OR([.O175]=&quot;&quot;;[.P175]=&quot;&quot;);&quot;UNKNOWN&quot;;&quot;READY FOR REVIEW&quot;);&quot;BLOCKED&quot;)))">
            <text:p>UNKNOWN</text:p>
          </table:table-cell>
          <table:table-cell office:value-type="string" table:formula="of:=IF([.U175]=&quot;UNKNOWN&quot;;&quot;COMPLETE OR ASSERT REQUIRED EVIDENCE BEFORE REVIEW&quot;;IF([.U175]=&quot;BLOCKED&quot;;&quot;RESOLVE CONTRADICTION BEFORE REVIEW — NO AUTHORITY CREATED&quot;;IF([.U17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5]=&quot;READY FOR REVIEW&quot;;&quot;REVIEW ELIGIBLE — NO AUTHORITY&quot;;IF(OR([.U175]=&quot;UNKNOWN&quot;;[.U175]=&quot;BLOCKED&quot;);&quot;NOT REVIEW ELIGIBLE&quot;;&quot;NOT REVIEW ELIGIBLE&quot;))">
            <text:p>NOT REVIEW ELIGIBLE</text:p>
          </table:table-cell>
          <table:table-cell office:value-type="string" table:formula="of:=IF([.W175]=&quot;NOT REVIEW ELIGIBLE&quot;;&quot;DO NOT BEGIN SETTLEMENT REVIEW — RESOLVE READINESS OR CONTRADICTION CONDITIONS&quot;;IF([.W17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5]=&quot;&quot;;&quot;UNKNOWN&quot;;IF([.W175]&lt;&gt;&quot;REVIEW ELIGIBLE — NO AUTHORITY&quot;;&quot;BLOCKED — OUTCOME ASSERTED WITHOUT REVIEW ELIGIBILITY&quot;;IF(OR([.Y175]=&quot;REVIEWED — NO AUTHORITY&quot;;[.Y175]=&quot;REVIEW DEFERRED&quot;;[.Y17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6]=&quot;&quot;;IF(AND([.L176]=&quot;&quot;;[.N176]=&quot;&quot;);&quot;UNKNOWN&quot;;&quot;CONTRADICTION&quot;);IF([.M176]=&quot;UNMATCHED&quot;;IF(AND([.L176]=&quot;&quot;;[.N176]=&quot;&quot;);&quot;CLEAR&quot;;&quot;CONTRADICTION&quot;);IF([.M176]=&quot;SINGLE_SALE_LINKED&quot;;IF(AND([.L176]&lt;&gt;&quot;&quot;;[.N176]=&quot;&quot;);&quot;CLEAR&quot;;&quot;CONTRADICTION&quot;);IF([.M176]=&quot;MULTI_SALE_PENDING_ALLOCATION&quot;;IF([.L176]=&quot;&quot;;&quot;CLEAR&quot;;&quot;CONTRADICTION&quot;);IF([.M176]=&quot;ALLOCATED&quot;;IF(AND([.L176]=&quot;&quot;;[.N176]&lt;&gt;&quot;&quot;);&quot;CLEAR&quot;;&quot;CONTRADICTION&quot;);&quot;CONTRADICTION&quot;)))))">
            <text:p>UNKNOWN</text:p>
          </table:table-cell>
          <table:table-cell office:value-type="string" table:formula="of:=IF([.S176]=&quot;UNKNOWN&quot;;&quot;NO ACTION — linkage status is UNKNOWN / not asserted&quot;;IF([.S176]=&quot;CLEAR&quot;;&quot;NO CONTRADICTION — preserve evidence as entered&quot;;IF([.M176]=&quot;&quot;;&quot;REVIEW LINKAGE STATUS — identifiers are present while status is UNKNOWN&quot;;IF([.M176]=&quot;UNMATCHED&quot;;&quot;REMOVE LINKAGE IDENTIFIERS OR CORRECT LINKAGE STATUS&quot;;IF([.M176]=&quot;SINGLE_SALE_LINKED&quot;;&quot;REQUIRE LINKED SALE ID AND NO ALLOCATION GROUP ID&quot;;IF([.M176]=&quot;MULTI_SALE_PENDING_ALLOCATION&quot;;&quot;REMOVE LINKED SALE ID OR CORRECT LINKAGE STATUS&quot;;IF([.M176]=&quot;ALLOCATED&quot;;&quot;REQUIRE ALLOCATION GROUP ID AND NO LINKED SALE ID&quot;;&quot;REVIEW LINKAGE EVIDENCE — NO AUTHORITY CREATED&quot;)))))))">
            <text:p>NO ACTION — linkage status is UNKNOWN / not asserted</text:p>
          </table:table-cell>
          <table:table-cell office:value-type="string" table:formula="of:=IF([.S176]=&quot;CONTRADICTION&quot;;&quot;BLOCKED&quot;;IF([.S176]=&quot;UNKNOWN&quot;;&quot;UNKNOWN&quot;;IF([.S176]=&quot;CLEAR&quot;;IF(OR([.O176]=&quot;&quot;;[.P176]=&quot;&quot;);&quot;UNKNOWN&quot;;&quot;READY FOR REVIEW&quot;);&quot;BLOCKED&quot;)))">
            <text:p>UNKNOWN</text:p>
          </table:table-cell>
          <table:table-cell office:value-type="string" table:formula="of:=IF([.U176]=&quot;UNKNOWN&quot;;&quot;COMPLETE OR ASSERT REQUIRED EVIDENCE BEFORE REVIEW&quot;;IF([.U176]=&quot;BLOCKED&quot;;&quot;RESOLVE CONTRADICTION BEFORE REVIEW — NO AUTHORITY CREATED&quot;;IF([.U17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6]=&quot;READY FOR REVIEW&quot;;&quot;REVIEW ELIGIBLE — NO AUTHORITY&quot;;IF(OR([.U176]=&quot;UNKNOWN&quot;;[.U176]=&quot;BLOCKED&quot;);&quot;NOT REVIEW ELIGIBLE&quot;;&quot;NOT REVIEW ELIGIBLE&quot;))">
            <text:p>NOT REVIEW ELIGIBLE</text:p>
          </table:table-cell>
          <table:table-cell office:value-type="string" table:formula="of:=IF([.W176]=&quot;NOT REVIEW ELIGIBLE&quot;;&quot;DO NOT BEGIN SETTLEMENT REVIEW — RESOLVE READINESS OR CONTRADICTION CONDITIONS&quot;;IF([.W17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6]=&quot;&quot;;&quot;UNKNOWN&quot;;IF([.W176]&lt;&gt;&quot;REVIEW ELIGIBLE — NO AUTHORITY&quot;;&quot;BLOCKED — OUTCOME ASSERTED WITHOUT REVIEW ELIGIBILITY&quot;;IF(OR([.Y176]=&quot;REVIEWED — NO AUTHORITY&quot;;[.Y176]=&quot;REVIEW DEFERRED&quot;;[.Y17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7]=&quot;&quot;;IF(AND([.L177]=&quot;&quot;;[.N177]=&quot;&quot;);&quot;UNKNOWN&quot;;&quot;CONTRADICTION&quot;);IF([.M177]=&quot;UNMATCHED&quot;;IF(AND([.L177]=&quot;&quot;;[.N177]=&quot;&quot;);&quot;CLEAR&quot;;&quot;CONTRADICTION&quot;);IF([.M177]=&quot;SINGLE_SALE_LINKED&quot;;IF(AND([.L177]&lt;&gt;&quot;&quot;;[.N177]=&quot;&quot;);&quot;CLEAR&quot;;&quot;CONTRADICTION&quot;);IF([.M177]=&quot;MULTI_SALE_PENDING_ALLOCATION&quot;;IF([.L177]=&quot;&quot;;&quot;CLEAR&quot;;&quot;CONTRADICTION&quot;);IF([.M177]=&quot;ALLOCATED&quot;;IF(AND([.L177]=&quot;&quot;;[.N177]&lt;&gt;&quot;&quot;);&quot;CLEAR&quot;;&quot;CONTRADICTION&quot;);&quot;CONTRADICTION&quot;)))))">
            <text:p>UNKNOWN</text:p>
          </table:table-cell>
          <table:table-cell office:value-type="string" table:formula="of:=IF([.S177]=&quot;UNKNOWN&quot;;&quot;NO ACTION — linkage status is UNKNOWN / not asserted&quot;;IF([.S177]=&quot;CLEAR&quot;;&quot;NO CONTRADICTION — preserve evidence as entered&quot;;IF([.M177]=&quot;&quot;;&quot;REVIEW LINKAGE STATUS — identifiers are present while status is UNKNOWN&quot;;IF([.M177]=&quot;UNMATCHED&quot;;&quot;REMOVE LINKAGE IDENTIFIERS OR CORRECT LINKAGE STATUS&quot;;IF([.M177]=&quot;SINGLE_SALE_LINKED&quot;;&quot;REQUIRE LINKED SALE ID AND NO ALLOCATION GROUP ID&quot;;IF([.M177]=&quot;MULTI_SALE_PENDING_ALLOCATION&quot;;&quot;REMOVE LINKED SALE ID OR CORRECT LINKAGE STATUS&quot;;IF([.M177]=&quot;ALLOCATED&quot;;&quot;REQUIRE ALLOCATION GROUP ID AND NO LINKED SALE ID&quot;;&quot;REVIEW LINKAGE EVIDENCE — NO AUTHORITY CREATED&quot;)))))))">
            <text:p>NO ACTION — linkage status is UNKNOWN / not asserted</text:p>
          </table:table-cell>
          <table:table-cell office:value-type="string" table:formula="of:=IF([.S177]=&quot;CONTRADICTION&quot;;&quot;BLOCKED&quot;;IF([.S177]=&quot;UNKNOWN&quot;;&quot;UNKNOWN&quot;;IF([.S177]=&quot;CLEAR&quot;;IF(OR([.O177]=&quot;&quot;;[.P177]=&quot;&quot;);&quot;UNKNOWN&quot;;&quot;READY FOR REVIEW&quot;);&quot;BLOCKED&quot;)))">
            <text:p>UNKNOWN</text:p>
          </table:table-cell>
          <table:table-cell office:value-type="string" table:formula="of:=IF([.U177]=&quot;UNKNOWN&quot;;&quot;COMPLETE OR ASSERT REQUIRED EVIDENCE BEFORE REVIEW&quot;;IF([.U177]=&quot;BLOCKED&quot;;&quot;RESOLVE CONTRADICTION BEFORE REVIEW — NO AUTHORITY CREATED&quot;;IF([.U17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7]=&quot;READY FOR REVIEW&quot;;&quot;REVIEW ELIGIBLE — NO AUTHORITY&quot;;IF(OR([.U177]=&quot;UNKNOWN&quot;;[.U177]=&quot;BLOCKED&quot;);&quot;NOT REVIEW ELIGIBLE&quot;;&quot;NOT REVIEW ELIGIBLE&quot;))">
            <text:p>NOT REVIEW ELIGIBLE</text:p>
          </table:table-cell>
          <table:table-cell office:value-type="string" table:formula="of:=IF([.W177]=&quot;NOT REVIEW ELIGIBLE&quot;;&quot;DO NOT BEGIN SETTLEMENT REVIEW — RESOLVE READINESS OR CONTRADICTION CONDITIONS&quot;;IF([.W17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7]=&quot;&quot;;&quot;UNKNOWN&quot;;IF([.W177]&lt;&gt;&quot;REVIEW ELIGIBLE — NO AUTHORITY&quot;;&quot;BLOCKED — OUTCOME ASSERTED WITHOUT REVIEW ELIGIBILITY&quot;;IF(OR([.Y177]=&quot;REVIEWED — NO AUTHORITY&quot;;[.Y177]=&quot;REVIEW DEFERRED&quot;;[.Y17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8]=&quot;&quot;;IF(AND([.L178]=&quot;&quot;;[.N178]=&quot;&quot;);&quot;UNKNOWN&quot;;&quot;CONTRADICTION&quot;);IF([.M178]=&quot;UNMATCHED&quot;;IF(AND([.L178]=&quot;&quot;;[.N178]=&quot;&quot;);&quot;CLEAR&quot;;&quot;CONTRADICTION&quot;);IF([.M178]=&quot;SINGLE_SALE_LINKED&quot;;IF(AND([.L178]&lt;&gt;&quot;&quot;;[.N178]=&quot;&quot;);&quot;CLEAR&quot;;&quot;CONTRADICTION&quot;);IF([.M178]=&quot;MULTI_SALE_PENDING_ALLOCATION&quot;;IF([.L178]=&quot;&quot;;&quot;CLEAR&quot;;&quot;CONTRADICTION&quot;);IF([.M178]=&quot;ALLOCATED&quot;;IF(AND([.L178]=&quot;&quot;;[.N178]&lt;&gt;&quot;&quot;);&quot;CLEAR&quot;;&quot;CONTRADICTION&quot;);&quot;CONTRADICTION&quot;)))))">
            <text:p>UNKNOWN</text:p>
          </table:table-cell>
          <table:table-cell office:value-type="string" table:formula="of:=IF([.S178]=&quot;UNKNOWN&quot;;&quot;NO ACTION — linkage status is UNKNOWN / not asserted&quot;;IF([.S178]=&quot;CLEAR&quot;;&quot;NO CONTRADICTION — preserve evidence as entered&quot;;IF([.M178]=&quot;&quot;;&quot;REVIEW LINKAGE STATUS — identifiers are present while status is UNKNOWN&quot;;IF([.M178]=&quot;UNMATCHED&quot;;&quot;REMOVE LINKAGE IDENTIFIERS OR CORRECT LINKAGE STATUS&quot;;IF([.M178]=&quot;SINGLE_SALE_LINKED&quot;;&quot;REQUIRE LINKED SALE ID AND NO ALLOCATION GROUP ID&quot;;IF([.M178]=&quot;MULTI_SALE_PENDING_ALLOCATION&quot;;&quot;REMOVE LINKED SALE ID OR CORRECT LINKAGE STATUS&quot;;IF([.M178]=&quot;ALLOCATED&quot;;&quot;REQUIRE ALLOCATION GROUP ID AND NO LINKED SALE ID&quot;;&quot;REVIEW LINKAGE EVIDENCE — NO AUTHORITY CREATED&quot;)))))))">
            <text:p>NO ACTION — linkage status is UNKNOWN / not asserted</text:p>
          </table:table-cell>
          <table:table-cell office:value-type="string" table:formula="of:=IF([.S178]=&quot;CONTRADICTION&quot;;&quot;BLOCKED&quot;;IF([.S178]=&quot;UNKNOWN&quot;;&quot;UNKNOWN&quot;;IF([.S178]=&quot;CLEAR&quot;;IF(OR([.O178]=&quot;&quot;;[.P178]=&quot;&quot;);&quot;UNKNOWN&quot;;&quot;READY FOR REVIEW&quot;);&quot;BLOCKED&quot;)))">
            <text:p>UNKNOWN</text:p>
          </table:table-cell>
          <table:table-cell office:value-type="string" table:formula="of:=IF([.U178]=&quot;UNKNOWN&quot;;&quot;COMPLETE OR ASSERT REQUIRED EVIDENCE BEFORE REVIEW&quot;;IF([.U178]=&quot;BLOCKED&quot;;&quot;RESOLVE CONTRADICTION BEFORE REVIEW — NO AUTHORITY CREATED&quot;;IF([.U17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8]=&quot;READY FOR REVIEW&quot;;&quot;REVIEW ELIGIBLE — NO AUTHORITY&quot;;IF(OR([.U178]=&quot;UNKNOWN&quot;;[.U178]=&quot;BLOCKED&quot;);&quot;NOT REVIEW ELIGIBLE&quot;;&quot;NOT REVIEW ELIGIBLE&quot;))">
            <text:p>NOT REVIEW ELIGIBLE</text:p>
          </table:table-cell>
          <table:table-cell office:value-type="string" table:formula="of:=IF([.W178]=&quot;NOT REVIEW ELIGIBLE&quot;;&quot;DO NOT BEGIN SETTLEMENT REVIEW — RESOLVE READINESS OR CONTRADICTION CONDITIONS&quot;;IF([.W17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8]=&quot;&quot;;&quot;UNKNOWN&quot;;IF([.W178]&lt;&gt;&quot;REVIEW ELIGIBLE — NO AUTHORITY&quot;;&quot;BLOCKED — OUTCOME ASSERTED WITHOUT REVIEW ELIGIBILITY&quot;;IF(OR([.Y178]=&quot;REVIEWED — NO AUTHORITY&quot;;[.Y178]=&quot;REVIEW DEFERRED&quot;;[.Y17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79]=&quot;&quot;;IF(AND([.L179]=&quot;&quot;;[.N179]=&quot;&quot;);&quot;UNKNOWN&quot;;&quot;CONTRADICTION&quot;);IF([.M179]=&quot;UNMATCHED&quot;;IF(AND([.L179]=&quot;&quot;;[.N179]=&quot;&quot;);&quot;CLEAR&quot;;&quot;CONTRADICTION&quot;);IF([.M179]=&quot;SINGLE_SALE_LINKED&quot;;IF(AND([.L179]&lt;&gt;&quot;&quot;;[.N179]=&quot;&quot;);&quot;CLEAR&quot;;&quot;CONTRADICTION&quot;);IF([.M179]=&quot;MULTI_SALE_PENDING_ALLOCATION&quot;;IF([.L179]=&quot;&quot;;&quot;CLEAR&quot;;&quot;CONTRADICTION&quot;);IF([.M179]=&quot;ALLOCATED&quot;;IF(AND([.L179]=&quot;&quot;;[.N179]&lt;&gt;&quot;&quot;);&quot;CLEAR&quot;;&quot;CONTRADICTION&quot;);&quot;CONTRADICTION&quot;)))))">
            <text:p>UNKNOWN</text:p>
          </table:table-cell>
          <table:table-cell office:value-type="string" table:formula="of:=IF([.S179]=&quot;UNKNOWN&quot;;&quot;NO ACTION — linkage status is UNKNOWN / not asserted&quot;;IF([.S179]=&quot;CLEAR&quot;;&quot;NO CONTRADICTION — preserve evidence as entered&quot;;IF([.M179]=&quot;&quot;;&quot;REVIEW LINKAGE STATUS — identifiers are present while status is UNKNOWN&quot;;IF([.M179]=&quot;UNMATCHED&quot;;&quot;REMOVE LINKAGE IDENTIFIERS OR CORRECT LINKAGE STATUS&quot;;IF([.M179]=&quot;SINGLE_SALE_LINKED&quot;;&quot;REQUIRE LINKED SALE ID AND NO ALLOCATION GROUP ID&quot;;IF([.M179]=&quot;MULTI_SALE_PENDING_ALLOCATION&quot;;&quot;REMOVE LINKED SALE ID OR CORRECT LINKAGE STATUS&quot;;IF([.M179]=&quot;ALLOCATED&quot;;&quot;REQUIRE ALLOCATION GROUP ID AND NO LINKED SALE ID&quot;;&quot;REVIEW LINKAGE EVIDENCE — NO AUTHORITY CREATED&quot;)))))))">
            <text:p>NO ACTION — linkage status is UNKNOWN / not asserted</text:p>
          </table:table-cell>
          <table:table-cell office:value-type="string" table:formula="of:=IF([.S179]=&quot;CONTRADICTION&quot;;&quot;BLOCKED&quot;;IF([.S179]=&quot;UNKNOWN&quot;;&quot;UNKNOWN&quot;;IF([.S179]=&quot;CLEAR&quot;;IF(OR([.O179]=&quot;&quot;;[.P179]=&quot;&quot;);&quot;UNKNOWN&quot;;&quot;READY FOR REVIEW&quot;);&quot;BLOCKED&quot;)))">
            <text:p>UNKNOWN</text:p>
          </table:table-cell>
          <table:table-cell office:value-type="string" table:formula="of:=IF([.U179]=&quot;UNKNOWN&quot;;&quot;COMPLETE OR ASSERT REQUIRED EVIDENCE BEFORE REVIEW&quot;;IF([.U179]=&quot;BLOCKED&quot;;&quot;RESOLVE CONTRADICTION BEFORE REVIEW — NO AUTHORITY CREATED&quot;;IF([.U17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79]=&quot;READY FOR REVIEW&quot;;&quot;REVIEW ELIGIBLE — NO AUTHORITY&quot;;IF(OR([.U179]=&quot;UNKNOWN&quot;;[.U179]=&quot;BLOCKED&quot;);&quot;NOT REVIEW ELIGIBLE&quot;;&quot;NOT REVIEW ELIGIBLE&quot;))">
            <text:p>NOT REVIEW ELIGIBLE</text:p>
          </table:table-cell>
          <table:table-cell office:value-type="string" table:formula="of:=IF([.W179]=&quot;NOT REVIEW ELIGIBLE&quot;;&quot;DO NOT BEGIN SETTLEMENT REVIEW — RESOLVE READINESS OR CONTRADICTION CONDITIONS&quot;;IF([.W17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79]=&quot;&quot;;&quot;UNKNOWN&quot;;IF([.W179]&lt;&gt;&quot;REVIEW ELIGIBLE — NO AUTHORITY&quot;;&quot;BLOCKED — OUTCOME ASSERTED WITHOUT REVIEW ELIGIBILITY&quot;;IF(OR([.Y179]=&quot;REVIEWED — NO AUTHORITY&quot;;[.Y179]=&quot;REVIEW DEFERRED&quot;;[.Y17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0]=&quot;&quot;;IF(AND([.L180]=&quot;&quot;;[.N180]=&quot;&quot;);&quot;UNKNOWN&quot;;&quot;CONTRADICTION&quot;);IF([.M180]=&quot;UNMATCHED&quot;;IF(AND([.L180]=&quot;&quot;;[.N180]=&quot;&quot;);&quot;CLEAR&quot;;&quot;CONTRADICTION&quot;);IF([.M180]=&quot;SINGLE_SALE_LINKED&quot;;IF(AND([.L180]&lt;&gt;&quot;&quot;;[.N180]=&quot;&quot;);&quot;CLEAR&quot;;&quot;CONTRADICTION&quot;);IF([.M180]=&quot;MULTI_SALE_PENDING_ALLOCATION&quot;;IF([.L180]=&quot;&quot;;&quot;CLEAR&quot;;&quot;CONTRADICTION&quot;);IF([.M180]=&quot;ALLOCATED&quot;;IF(AND([.L180]=&quot;&quot;;[.N180]&lt;&gt;&quot;&quot;);&quot;CLEAR&quot;;&quot;CONTRADICTION&quot;);&quot;CONTRADICTION&quot;)))))">
            <text:p>UNKNOWN</text:p>
          </table:table-cell>
          <table:table-cell office:value-type="string" table:formula="of:=IF([.S180]=&quot;UNKNOWN&quot;;&quot;NO ACTION — linkage status is UNKNOWN / not asserted&quot;;IF([.S180]=&quot;CLEAR&quot;;&quot;NO CONTRADICTION — preserve evidence as entered&quot;;IF([.M180]=&quot;&quot;;&quot;REVIEW LINKAGE STATUS — identifiers are present while status is UNKNOWN&quot;;IF([.M180]=&quot;UNMATCHED&quot;;&quot;REMOVE LINKAGE IDENTIFIERS OR CORRECT LINKAGE STATUS&quot;;IF([.M180]=&quot;SINGLE_SALE_LINKED&quot;;&quot;REQUIRE LINKED SALE ID AND NO ALLOCATION GROUP ID&quot;;IF([.M180]=&quot;MULTI_SALE_PENDING_ALLOCATION&quot;;&quot;REMOVE LINKED SALE ID OR CORRECT LINKAGE STATUS&quot;;IF([.M180]=&quot;ALLOCATED&quot;;&quot;REQUIRE ALLOCATION GROUP ID AND NO LINKED SALE ID&quot;;&quot;REVIEW LINKAGE EVIDENCE — NO AUTHORITY CREATED&quot;)))))))">
            <text:p>NO ACTION — linkage status is UNKNOWN / not asserted</text:p>
          </table:table-cell>
          <table:table-cell office:value-type="string" table:formula="of:=IF([.S180]=&quot;CONTRADICTION&quot;;&quot;BLOCKED&quot;;IF([.S180]=&quot;UNKNOWN&quot;;&quot;UNKNOWN&quot;;IF([.S180]=&quot;CLEAR&quot;;IF(OR([.O180]=&quot;&quot;;[.P180]=&quot;&quot;);&quot;UNKNOWN&quot;;&quot;READY FOR REVIEW&quot;);&quot;BLOCKED&quot;)))">
            <text:p>UNKNOWN</text:p>
          </table:table-cell>
          <table:table-cell office:value-type="string" table:formula="of:=IF([.U180]=&quot;UNKNOWN&quot;;&quot;COMPLETE OR ASSERT REQUIRED EVIDENCE BEFORE REVIEW&quot;;IF([.U180]=&quot;BLOCKED&quot;;&quot;RESOLVE CONTRADICTION BEFORE REVIEW — NO AUTHORITY CREATED&quot;;IF([.U18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0]=&quot;READY FOR REVIEW&quot;;&quot;REVIEW ELIGIBLE — NO AUTHORITY&quot;;IF(OR([.U180]=&quot;UNKNOWN&quot;;[.U180]=&quot;BLOCKED&quot;);&quot;NOT REVIEW ELIGIBLE&quot;;&quot;NOT REVIEW ELIGIBLE&quot;))">
            <text:p>NOT REVIEW ELIGIBLE</text:p>
          </table:table-cell>
          <table:table-cell office:value-type="string" table:formula="of:=IF([.W180]=&quot;NOT REVIEW ELIGIBLE&quot;;&quot;DO NOT BEGIN SETTLEMENT REVIEW — RESOLVE READINESS OR CONTRADICTION CONDITIONS&quot;;IF([.W18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0]=&quot;&quot;;&quot;UNKNOWN&quot;;IF([.W180]&lt;&gt;&quot;REVIEW ELIGIBLE — NO AUTHORITY&quot;;&quot;BLOCKED — OUTCOME ASSERTED WITHOUT REVIEW ELIGIBILITY&quot;;IF(OR([.Y180]=&quot;REVIEWED — NO AUTHORITY&quot;;[.Y180]=&quot;REVIEW DEFERRED&quot;;[.Y18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1]=&quot;&quot;;IF(AND([.L181]=&quot;&quot;;[.N181]=&quot;&quot;);&quot;UNKNOWN&quot;;&quot;CONTRADICTION&quot;);IF([.M181]=&quot;UNMATCHED&quot;;IF(AND([.L181]=&quot;&quot;;[.N181]=&quot;&quot;);&quot;CLEAR&quot;;&quot;CONTRADICTION&quot;);IF([.M181]=&quot;SINGLE_SALE_LINKED&quot;;IF(AND([.L181]&lt;&gt;&quot;&quot;;[.N181]=&quot;&quot;);&quot;CLEAR&quot;;&quot;CONTRADICTION&quot;);IF([.M181]=&quot;MULTI_SALE_PENDING_ALLOCATION&quot;;IF([.L181]=&quot;&quot;;&quot;CLEAR&quot;;&quot;CONTRADICTION&quot;);IF([.M181]=&quot;ALLOCATED&quot;;IF(AND([.L181]=&quot;&quot;;[.N181]&lt;&gt;&quot;&quot;);&quot;CLEAR&quot;;&quot;CONTRADICTION&quot;);&quot;CONTRADICTION&quot;)))))">
            <text:p>UNKNOWN</text:p>
          </table:table-cell>
          <table:table-cell office:value-type="string" table:formula="of:=IF([.S181]=&quot;UNKNOWN&quot;;&quot;NO ACTION — linkage status is UNKNOWN / not asserted&quot;;IF([.S181]=&quot;CLEAR&quot;;&quot;NO CONTRADICTION — preserve evidence as entered&quot;;IF([.M181]=&quot;&quot;;&quot;REVIEW LINKAGE STATUS — identifiers are present while status is UNKNOWN&quot;;IF([.M181]=&quot;UNMATCHED&quot;;&quot;REMOVE LINKAGE IDENTIFIERS OR CORRECT LINKAGE STATUS&quot;;IF([.M181]=&quot;SINGLE_SALE_LINKED&quot;;&quot;REQUIRE LINKED SALE ID AND NO ALLOCATION GROUP ID&quot;;IF([.M181]=&quot;MULTI_SALE_PENDING_ALLOCATION&quot;;&quot;REMOVE LINKED SALE ID OR CORRECT LINKAGE STATUS&quot;;IF([.M181]=&quot;ALLOCATED&quot;;&quot;REQUIRE ALLOCATION GROUP ID AND NO LINKED SALE ID&quot;;&quot;REVIEW LINKAGE EVIDENCE — NO AUTHORITY CREATED&quot;)))))))">
            <text:p>NO ACTION — linkage status is UNKNOWN / not asserted</text:p>
          </table:table-cell>
          <table:table-cell office:value-type="string" table:formula="of:=IF([.S181]=&quot;CONTRADICTION&quot;;&quot;BLOCKED&quot;;IF([.S181]=&quot;UNKNOWN&quot;;&quot;UNKNOWN&quot;;IF([.S181]=&quot;CLEAR&quot;;IF(OR([.O181]=&quot;&quot;;[.P181]=&quot;&quot;);&quot;UNKNOWN&quot;;&quot;READY FOR REVIEW&quot;);&quot;BLOCKED&quot;)))">
            <text:p>UNKNOWN</text:p>
          </table:table-cell>
          <table:table-cell office:value-type="string" table:formula="of:=IF([.U181]=&quot;UNKNOWN&quot;;&quot;COMPLETE OR ASSERT REQUIRED EVIDENCE BEFORE REVIEW&quot;;IF([.U181]=&quot;BLOCKED&quot;;&quot;RESOLVE CONTRADICTION BEFORE REVIEW — NO AUTHORITY CREATED&quot;;IF([.U18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1]=&quot;READY FOR REVIEW&quot;;&quot;REVIEW ELIGIBLE — NO AUTHORITY&quot;;IF(OR([.U181]=&quot;UNKNOWN&quot;;[.U181]=&quot;BLOCKED&quot;);&quot;NOT REVIEW ELIGIBLE&quot;;&quot;NOT REVIEW ELIGIBLE&quot;))">
            <text:p>NOT REVIEW ELIGIBLE</text:p>
          </table:table-cell>
          <table:table-cell office:value-type="string" table:formula="of:=IF([.W181]=&quot;NOT REVIEW ELIGIBLE&quot;;&quot;DO NOT BEGIN SETTLEMENT REVIEW — RESOLVE READINESS OR CONTRADICTION CONDITIONS&quot;;IF([.W18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1]=&quot;&quot;;&quot;UNKNOWN&quot;;IF([.W181]&lt;&gt;&quot;REVIEW ELIGIBLE — NO AUTHORITY&quot;;&quot;BLOCKED — OUTCOME ASSERTED WITHOUT REVIEW ELIGIBILITY&quot;;IF(OR([.Y181]=&quot;REVIEWED — NO AUTHORITY&quot;;[.Y181]=&quot;REVIEW DEFERRED&quot;;[.Y181]=&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2]=&quot;&quot;;IF(AND([.L182]=&quot;&quot;;[.N182]=&quot;&quot;);&quot;UNKNOWN&quot;;&quot;CONTRADICTION&quot;);IF([.M182]=&quot;UNMATCHED&quot;;IF(AND([.L182]=&quot;&quot;;[.N182]=&quot;&quot;);&quot;CLEAR&quot;;&quot;CONTRADICTION&quot;);IF([.M182]=&quot;SINGLE_SALE_LINKED&quot;;IF(AND([.L182]&lt;&gt;&quot;&quot;;[.N182]=&quot;&quot;);&quot;CLEAR&quot;;&quot;CONTRADICTION&quot;);IF([.M182]=&quot;MULTI_SALE_PENDING_ALLOCATION&quot;;IF([.L182]=&quot;&quot;;&quot;CLEAR&quot;;&quot;CONTRADICTION&quot;);IF([.M182]=&quot;ALLOCATED&quot;;IF(AND([.L182]=&quot;&quot;;[.N182]&lt;&gt;&quot;&quot;);&quot;CLEAR&quot;;&quot;CONTRADICTION&quot;);&quot;CONTRADICTION&quot;)))))">
            <text:p>UNKNOWN</text:p>
          </table:table-cell>
          <table:table-cell office:value-type="string" table:formula="of:=IF([.S182]=&quot;UNKNOWN&quot;;&quot;NO ACTION — linkage status is UNKNOWN / not asserted&quot;;IF([.S182]=&quot;CLEAR&quot;;&quot;NO CONTRADICTION — preserve evidence as entered&quot;;IF([.M182]=&quot;&quot;;&quot;REVIEW LINKAGE STATUS — identifiers are present while status is UNKNOWN&quot;;IF([.M182]=&quot;UNMATCHED&quot;;&quot;REMOVE LINKAGE IDENTIFIERS OR CORRECT LINKAGE STATUS&quot;;IF([.M182]=&quot;SINGLE_SALE_LINKED&quot;;&quot;REQUIRE LINKED SALE ID AND NO ALLOCATION GROUP ID&quot;;IF([.M182]=&quot;MULTI_SALE_PENDING_ALLOCATION&quot;;&quot;REMOVE LINKED SALE ID OR CORRECT LINKAGE STATUS&quot;;IF([.M182]=&quot;ALLOCATED&quot;;&quot;REQUIRE ALLOCATION GROUP ID AND NO LINKED SALE ID&quot;;&quot;REVIEW LINKAGE EVIDENCE — NO AUTHORITY CREATED&quot;)))))))">
            <text:p>NO ACTION — linkage status is UNKNOWN / not asserted</text:p>
          </table:table-cell>
          <table:table-cell office:value-type="string" table:formula="of:=IF([.S182]=&quot;CONTRADICTION&quot;;&quot;BLOCKED&quot;;IF([.S182]=&quot;UNKNOWN&quot;;&quot;UNKNOWN&quot;;IF([.S182]=&quot;CLEAR&quot;;IF(OR([.O182]=&quot;&quot;;[.P182]=&quot;&quot;);&quot;UNKNOWN&quot;;&quot;READY FOR REVIEW&quot;);&quot;BLOCKED&quot;)))">
            <text:p>UNKNOWN</text:p>
          </table:table-cell>
          <table:table-cell office:value-type="string" table:formula="of:=IF([.U182]=&quot;UNKNOWN&quot;;&quot;COMPLETE OR ASSERT REQUIRED EVIDENCE BEFORE REVIEW&quot;;IF([.U182]=&quot;BLOCKED&quot;;&quot;RESOLVE CONTRADICTION BEFORE REVIEW — NO AUTHORITY CREATED&quot;;IF([.U18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2]=&quot;READY FOR REVIEW&quot;;&quot;REVIEW ELIGIBLE — NO AUTHORITY&quot;;IF(OR([.U182]=&quot;UNKNOWN&quot;;[.U182]=&quot;BLOCKED&quot;);&quot;NOT REVIEW ELIGIBLE&quot;;&quot;NOT REVIEW ELIGIBLE&quot;))">
            <text:p>NOT REVIEW ELIGIBLE</text:p>
          </table:table-cell>
          <table:table-cell office:value-type="string" table:formula="of:=IF([.W182]=&quot;NOT REVIEW ELIGIBLE&quot;;&quot;DO NOT BEGIN SETTLEMENT REVIEW — RESOLVE READINESS OR CONTRADICTION CONDITIONS&quot;;IF([.W18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2]=&quot;&quot;;&quot;UNKNOWN&quot;;IF([.W182]&lt;&gt;&quot;REVIEW ELIGIBLE — NO AUTHORITY&quot;;&quot;BLOCKED — OUTCOME ASSERTED WITHOUT REVIEW ELIGIBILITY&quot;;IF(OR([.Y182]=&quot;REVIEWED — NO AUTHORITY&quot;;[.Y182]=&quot;REVIEW DEFERRED&quot;;[.Y18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3]=&quot;&quot;;IF(AND([.L183]=&quot;&quot;;[.N183]=&quot;&quot;);&quot;UNKNOWN&quot;;&quot;CONTRADICTION&quot;);IF([.M183]=&quot;UNMATCHED&quot;;IF(AND([.L183]=&quot;&quot;;[.N183]=&quot;&quot;);&quot;CLEAR&quot;;&quot;CONTRADICTION&quot;);IF([.M183]=&quot;SINGLE_SALE_LINKED&quot;;IF(AND([.L183]&lt;&gt;&quot;&quot;;[.N183]=&quot;&quot;);&quot;CLEAR&quot;;&quot;CONTRADICTION&quot;);IF([.M183]=&quot;MULTI_SALE_PENDING_ALLOCATION&quot;;IF([.L183]=&quot;&quot;;&quot;CLEAR&quot;;&quot;CONTRADICTION&quot;);IF([.M183]=&quot;ALLOCATED&quot;;IF(AND([.L183]=&quot;&quot;;[.N183]&lt;&gt;&quot;&quot;);&quot;CLEAR&quot;;&quot;CONTRADICTION&quot;);&quot;CONTRADICTION&quot;)))))">
            <text:p>UNKNOWN</text:p>
          </table:table-cell>
          <table:table-cell office:value-type="string" table:formula="of:=IF([.S183]=&quot;UNKNOWN&quot;;&quot;NO ACTION — linkage status is UNKNOWN / not asserted&quot;;IF([.S183]=&quot;CLEAR&quot;;&quot;NO CONTRADICTION — preserve evidence as entered&quot;;IF([.M183]=&quot;&quot;;&quot;REVIEW LINKAGE STATUS — identifiers are present while status is UNKNOWN&quot;;IF([.M183]=&quot;UNMATCHED&quot;;&quot;REMOVE LINKAGE IDENTIFIERS OR CORRECT LINKAGE STATUS&quot;;IF([.M183]=&quot;SINGLE_SALE_LINKED&quot;;&quot;REQUIRE LINKED SALE ID AND NO ALLOCATION GROUP ID&quot;;IF([.M183]=&quot;MULTI_SALE_PENDING_ALLOCATION&quot;;&quot;REMOVE LINKED SALE ID OR CORRECT LINKAGE STATUS&quot;;IF([.M183]=&quot;ALLOCATED&quot;;&quot;REQUIRE ALLOCATION GROUP ID AND NO LINKED SALE ID&quot;;&quot;REVIEW LINKAGE EVIDENCE — NO AUTHORITY CREATED&quot;)))))))">
            <text:p>NO ACTION — linkage status is UNKNOWN / not asserted</text:p>
          </table:table-cell>
          <table:table-cell office:value-type="string" table:formula="of:=IF([.S183]=&quot;CONTRADICTION&quot;;&quot;BLOCKED&quot;;IF([.S183]=&quot;UNKNOWN&quot;;&quot;UNKNOWN&quot;;IF([.S183]=&quot;CLEAR&quot;;IF(OR([.O183]=&quot;&quot;;[.P183]=&quot;&quot;);&quot;UNKNOWN&quot;;&quot;READY FOR REVIEW&quot;);&quot;BLOCKED&quot;)))">
            <text:p>UNKNOWN</text:p>
          </table:table-cell>
          <table:table-cell office:value-type="string" table:formula="of:=IF([.U183]=&quot;UNKNOWN&quot;;&quot;COMPLETE OR ASSERT REQUIRED EVIDENCE BEFORE REVIEW&quot;;IF([.U183]=&quot;BLOCKED&quot;;&quot;RESOLVE CONTRADICTION BEFORE REVIEW — NO AUTHORITY CREATED&quot;;IF([.U18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3]=&quot;READY FOR REVIEW&quot;;&quot;REVIEW ELIGIBLE — NO AUTHORITY&quot;;IF(OR([.U183]=&quot;UNKNOWN&quot;;[.U183]=&quot;BLOCKED&quot;);&quot;NOT REVIEW ELIGIBLE&quot;;&quot;NOT REVIEW ELIGIBLE&quot;))">
            <text:p>NOT REVIEW ELIGIBLE</text:p>
          </table:table-cell>
          <table:table-cell office:value-type="string" table:formula="of:=IF([.W183]=&quot;NOT REVIEW ELIGIBLE&quot;;&quot;DO NOT BEGIN SETTLEMENT REVIEW — RESOLVE READINESS OR CONTRADICTION CONDITIONS&quot;;IF([.W18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3]=&quot;&quot;;&quot;UNKNOWN&quot;;IF([.W183]&lt;&gt;&quot;REVIEW ELIGIBLE — NO AUTHORITY&quot;;&quot;BLOCKED — OUTCOME ASSERTED WITHOUT REVIEW ELIGIBILITY&quot;;IF(OR([.Y183]=&quot;REVIEWED — NO AUTHORITY&quot;;[.Y183]=&quot;REVIEW DEFERRED&quot;;[.Y18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4]=&quot;&quot;;IF(AND([.L184]=&quot;&quot;;[.N184]=&quot;&quot;);&quot;UNKNOWN&quot;;&quot;CONTRADICTION&quot;);IF([.M184]=&quot;UNMATCHED&quot;;IF(AND([.L184]=&quot;&quot;;[.N184]=&quot;&quot;);&quot;CLEAR&quot;;&quot;CONTRADICTION&quot;);IF([.M184]=&quot;SINGLE_SALE_LINKED&quot;;IF(AND([.L184]&lt;&gt;&quot;&quot;;[.N184]=&quot;&quot;);&quot;CLEAR&quot;;&quot;CONTRADICTION&quot;);IF([.M184]=&quot;MULTI_SALE_PENDING_ALLOCATION&quot;;IF([.L184]=&quot;&quot;;&quot;CLEAR&quot;;&quot;CONTRADICTION&quot;);IF([.M184]=&quot;ALLOCATED&quot;;IF(AND([.L184]=&quot;&quot;;[.N184]&lt;&gt;&quot;&quot;);&quot;CLEAR&quot;;&quot;CONTRADICTION&quot;);&quot;CONTRADICTION&quot;)))))">
            <text:p>UNKNOWN</text:p>
          </table:table-cell>
          <table:table-cell office:value-type="string" table:formula="of:=IF([.S184]=&quot;UNKNOWN&quot;;&quot;NO ACTION — linkage status is UNKNOWN / not asserted&quot;;IF([.S184]=&quot;CLEAR&quot;;&quot;NO CONTRADICTION — preserve evidence as entered&quot;;IF([.M184]=&quot;&quot;;&quot;REVIEW LINKAGE STATUS — identifiers are present while status is UNKNOWN&quot;;IF([.M184]=&quot;UNMATCHED&quot;;&quot;REMOVE LINKAGE IDENTIFIERS OR CORRECT LINKAGE STATUS&quot;;IF([.M184]=&quot;SINGLE_SALE_LINKED&quot;;&quot;REQUIRE LINKED SALE ID AND NO ALLOCATION GROUP ID&quot;;IF([.M184]=&quot;MULTI_SALE_PENDING_ALLOCATION&quot;;&quot;REMOVE LINKED SALE ID OR CORRECT LINKAGE STATUS&quot;;IF([.M184]=&quot;ALLOCATED&quot;;&quot;REQUIRE ALLOCATION GROUP ID AND NO LINKED SALE ID&quot;;&quot;REVIEW LINKAGE EVIDENCE — NO AUTHORITY CREATED&quot;)))))))">
            <text:p>NO ACTION — linkage status is UNKNOWN / not asserted</text:p>
          </table:table-cell>
          <table:table-cell office:value-type="string" table:formula="of:=IF([.S184]=&quot;CONTRADICTION&quot;;&quot;BLOCKED&quot;;IF([.S184]=&quot;UNKNOWN&quot;;&quot;UNKNOWN&quot;;IF([.S184]=&quot;CLEAR&quot;;IF(OR([.O184]=&quot;&quot;;[.P184]=&quot;&quot;);&quot;UNKNOWN&quot;;&quot;READY FOR REVIEW&quot;);&quot;BLOCKED&quot;)))">
            <text:p>UNKNOWN</text:p>
          </table:table-cell>
          <table:table-cell office:value-type="string" table:formula="of:=IF([.U184]=&quot;UNKNOWN&quot;;&quot;COMPLETE OR ASSERT REQUIRED EVIDENCE BEFORE REVIEW&quot;;IF([.U184]=&quot;BLOCKED&quot;;&quot;RESOLVE CONTRADICTION BEFORE REVIEW — NO AUTHORITY CREATED&quot;;IF([.U18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4]=&quot;READY FOR REVIEW&quot;;&quot;REVIEW ELIGIBLE — NO AUTHORITY&quot;;IF(OR([.U184]=&quot;UNKNOWN&quot;;[.U184]=&quot;BLOCKED&quot;);&quot;NOT REVIEW ELIGIBLE&quot;;&quot;NOT REVIEW ELIGIBLE&quot;))">
            <text:p>NOT REVIEW ELIGIBLE</text:p>
          </table:table-cell>
          <table:table-cell office:value-type="string" table:formula="of:=IF([.W184]=&quot;NOT REVIEW ELIGIBLE&quot;;&quot;DO NOT BEGIN SETTLEMENT REVIEW — RESOLVE READINESS OR CONTRADICTION CONDITIONS&quot;;IF([.W18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4]=&quot;&quot;;&quot;UNKNOWN&quot;;IF([.W184]&lt;&gt;&quot;REVIEW ELIGIBLE — NO AUTHORITY&quot;;&quot;BLOCKED — OUTCOME ASSERTED WITHOUT REVIEW ELIGIBILITY&quot;;IF(OR([.Y184]=&quot;REVIEWED — NO AUTHORITY&quot;;[.Y184]=&quot;REVIEW DEFERRED&quot;;[.Y18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5]=&quot;&quot;;IF(AND([.L185]=&quot;&quot;;[.N185]=&quot;&quot;);&quot;UNKNOWN&quot;;&quot;CONTRADICTION&quot;);IF([.M185]=&quot;UNMATCHED&quot;;IF(AND([.L185]=&quot;&quot;;[.N185]=&quot;&quot;);&quot;CLEAR&quot;;&quot;CONTRADICTION&quot;);IF([.M185]=&quot;SINGLE_SALE_LINKED&quot;;IF(AND([.L185]&lt;&gt;&quot;&quot;;[.N185]=&quot;&quot;);&quot;CLEAR&quot;;&quot;CONTRADICTION&quot;);IF([.M185]=&quot;MULTI_SALE_PENDING_ALLOCATION&quot;;IF([.L185]=&quot;&quot;;&quot;CLEAR&quot;;&quot;CONTRADICTION&quot;);IF([.M185]=&quot;ALLOCATED&quot;;IF(AND([.L185]=&quot;&quot;;[.N185]&lt;&gt;&quot;&quot;);&quot;CLEAR&quot;;&quot;CONTRADICTION&quot;);&quot;CONTRADICTION&quot;)))))">
            <text:p>UNKNOWN</text:p>
          </table:table-cell>
          <table:table-cell office:value-type="string" table:formula="of:=IF([.S185]=&quot;UNKNOWN&quot;;&quot;NO ACTION — linkage status is UNKNOWN / not asserted&quot;;IF([.S185]=&quot;CLEAR&quot;;&quot;NO CONTRADICTION — preserve evidence as entered&quot;;IF([.M185]=&quot;&quot;;&quot;REVIEW LINKAGE STATUS — identifiers are present while status is UNKNOWN&quot;;IF([.M185]=&quot;UNMATCHED&quot;;&quot;REMOVE LINKAGE IDENTIFIERS OR CORRECT LINKAGE STATUS&quot;;IF([.M185]=&quot;SINGLE_SALE_LINKED&quot;;&quot;REQUIRE LINKED SALE ID AND NO ALLOCATION GROUP ID&quot;;IF([.M185]=&quot;MULTI_SALE_PENDING_ALLOCATION&quot;;&quot;REMOVE LINKED SALE ID OR CORRECT LINKAGE STATUS&quot;;IF([.M185]=&quot;ALLOCATED&quot;;&quot;REQUIRE ALLOCATION GROUP ID AND NO LINKED SALE ID&quot;;&quot;REVIEW LINKAGE EVIDENCE — NO AUTHORITY CREATED&quot;)))))))">
            <text:p>NO ACTION — linkage status is UNKNOWN / not asserted</text:p>
          </table:table-cell>
          <table:table-cell office:value-type="string" table:formula="of:=IF([.S185]=&quot;CONTRADICTION&quot;;&quot;BLOCKED&quot;;IF([.S185]=&quot;UNKNOWN&quot;;&quot;UNKNOWN&quot;;IF([.S185]=&quot;CLEAR&quot;;IF(OR([.O185]=&quot;&quot;;[.P185]=&quot;&quot;);&quot;UNKNOWN&quot;;&quot;READY FOR REVIEW&quot;);&quot;BLOCKED&quot;)))">
            <text:p>UNKNOWN</text:p>
          </table:table-cell>
          <table:table-cell office:value-type="string" table:formula="of:=IF([.U185]=&quot;UNKNOWN&quot;;&quot;COMPLETE OR ASSERT REQUIRED EVIDENCE BEFORE REVIEW&quot;;IF([.U185]=&quot;BLOCKED&quot;;&quot;RESOLVE CONTRADICTION BEFORE REVIEW — NO AUTHORITY CREATED&quot;;IF([.U18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5]=&quot;READY FOR REVIEW&quot;;&quot;REVIEW ELIGIBLE — NO AUTHORITY&quot;;IF(OR([.U185]=&quot;UNKNOWN&quot;;[.U185]=&quot;BLOCKED&quot;);&quot;NOT REVIEW ELIGIBLE&quot;;&quot;NOT REVIEW ELIGIBLE&quot;))">
            <text:p>NOT REVIEW ELIGIBLE</text:p>
          </table:table-cell>
          <table:table-cell office:value-type="string" table:formula="of:=IF([.W185]=&quot;NOT REVIEW ELIGIBLE&quot;;&quot;DO NOT BEGIN SETTLEMENT REVIEW — RESOLVE READINESS OR CONTRADICTION CONDITIONS&quot;;IF([.W18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5]=&quot;&quot;;&quot;UNKNOWN&quot;;IF([.W185]&lt;&gt;&quot;REVIEW ELIGIBLE — NO AUTHORITY&quot;;&quot;BLOCKED — OUTCOME ASSERTED WITHOUT REVIEW ELIGIBILITY&quot;;IF(OR([.Y185]=&quot;REVIEWED — NO AUTHORITY&quot;;[.Y185]=&quot;REVIEW DEFERRED&quot;;[.Y18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6]=&quot;&quot;;IF(AND([.L186]=&quot;&quot;;[.N186]=&quot;&quot;);&quot;UNKNOWN&quot;;&quot;CONTRADICTION&quot;);IF([.M186]=&quot;UNMATCHED&quot;;IF(AND([.L186]=&quot;&quot;;[.N186]=&quot;&quot;);&quot;CLEAR&quot;;&quot;CONTRADICTION&quot;);IF([.M186]=&quot;SINGLE_SALE_LINKED&quot;;IF(AND([.L186]&lt;&gt;&quot;&quot;;[.N186]=&quot;&quot;);&quot;CLEAR&quot;;&quot;CONTRADICTION&quot;);IF([.M186]=&quot;MULTI_SALE_PENDING_ALLOCATION&quot;;IF([.L186]=&quot;&quot;;&quot;CLEAR&quot;;&quot;CONTRADICTION&quot;);IF([.M186]=&quot;ALLOCATED&quot;;IF(AND([.L186]=&quot;&quot;;[.N186]&lt;&gt;&quot;&quot;);&quot;CLEAR&quot;;&quot;CONTRADICTION&quot;);&quot;CONTRADICTION&quot;)))))">
            <text:p>UNKNOWN</text:p>
          </table:table-cell>
          <table:table-cell office:value-type="string" table:formula="of:=IF([.S186]=&quot;UNKNOWN&quot;;&quot;NO ACTION — linkage status is UNKNOWN / not asserted&quot;;IF([.S186]=&quot;CLEAR&quot;;&quot;NO CONTRADICTION — preserve evidence as entered&quot;;IF([.M186]=&quot;&quot;;&quot;REVIEW LINKAGE STATUS — identifiers are present while status is UNKNOWN&quot;;IF([.M186]=&quot;UNMATCHED&quot;;&quot;REMOVE LINKAGE IDENTIFIERS OR CORRECT LINKAGE STATUS&quot;;IF([.M186]=&quot;SINGLE_SALE_LINKED&quot;;&quot;REQUIRE LINKED SALE ID AND NO ALLOCATION GROUP ID&quot;;IF([.M186]=&quot;MULTI_SALE_PENDING_ALLOCATION&quot;;&quot;REMOVE LINKED SALE ID OR CORRECT LINKAGE STATUS&quot;;IF([.M186]=&quot;ALLOCATED&quot;;&quot;REQUIRE ALLOCATION GROUP ID AND NO LINKED SALE ID&quot;;&quot;REVIEW LINKAGE EVIDENCE — NO AUTHORITY CREATED&quot;)))))))">
            <text:p>NO ACTION — linkage status is UNKNOWN / not asserted</text:p>
          </table:table-cell>
          <table:table-cell office:value-type="string" table:formula="of:=IF([.S186]=&quot;CONTRADICTION&quot;;&quot;BLOCKED&quot;;IF([.S186]=&quot;UNKNOWN&quot;;&quot;UNKNOWN&quot;;IF([.S186]=&quot;CLEAR&quot;;IF(OR([.O186]=&quot;&quot;;[.P186]=&quot;&quot;);&quot;UNKNOWN&quot;;&quot;READY FOR REVIEW&quot;);&quot;BLOCKED&quot;)))">
            <text:p>UNKNOWN</text:p>
          </table:table-cell>
          <table:table-cell office:value-type="string" table:formula="of:=IF([.U186]=&quot;UNKNOWN&quot;;&quot;COMPLETE OR ASSERT REQUIRED EVIDENCE BEFORE REVIEW&quot;;IF([.U186]=&quot;BLOCKED&quot;;&quot;RESOLVE CONTRADICTION BEFORE REVIEW — NO AUTHORITY CREATED&quot;;IF([.U18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6]=&quot;READY FOR REVIEW&quot;;&quot;REVIEW ELIGIBLE — NO AUTHORITY&quot;;IF(OR([.U186]=&quot;UNKNOWN&quot;;[.U186]=&quot;BLOCKED&quot;);&quot;NOT REVIEW ELIGIBLE&quot;;&quot;NOT REVIEW ELIGIBLE&quot;))">
            <text:p>NOT REVIEW ELIGIBLE</text:p>
          </table:table-cell>
          <table:table-cell office:value-type="string" table:formula="of:=IF([.W186]=&quot;NOT REVIEW ELIGIBLE&quot;;&quot;DO NOT BEGIN SETTLEMENT REVIEW — RESOLVE READINESS OR CONTRADICTION CONDITIONS&quot;;IF([.W18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6]=&quot;&quot;;&quot;UNKNOWN&quot;;IF([.W186]&lt;&gt;&quot;REVIEW ELIGIBLE — NO AUTHORITY&quot;;&quot;BLOCKED — OUTCOME ASSERTED WITHOUT REVIEW ELIGIBILITY&quot;;IF(OR([.Y186]=&quot;REVIEWED — NO AUTHORITY&quot;;[.Y186]=&quot;REVIEW DEFERRED&quot;;[.Y18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7]=&quot;&quot;;IF(AND([.L187]=&quot;&quot;;[.N187]=&quot;&quot;);&quot;UNKNOWN&quot;;&quot;CONTRADICTION&quot;);IF([.M187]=&quot;UNMATCHED&quot;;IF(AND([.L187]=&quot;&quot;;[.N187]=&quot;&quot;);&quot;CLEAR&quot;;&quot;CONTRADICTION&quot;);IF([.M187]=&quot;SINGLE_SALE_LINKED&quot;;IF(AND([.L187]&lt;&gt;&quot;&quot;;[.N187]=&quot;&quot;);&quot;CLEAR&quot;;&quot;CONTRADICTION&quot;);IF([.M187]=&quot;MULTI_SALE_PENDING_ALLOCATION&quot;;IF([.L187]=&quot;&quot;;&quot;CLEAR&quot;;&quot;CONTRADICTION&quot;);IF([.M187]=&quot;ALLOCATED&quot;;IF(AND([.L187]=&quot;&quot;;[.N187]&lt;&gt;&quot;&quot;);&quot;CLEAR&quot;;&quot;CONTRADICTION&quot;);&quot;CONTRADICTION&quot;)))))">
            <text:p>UNKNOWN</text:p>
          </table:table-cell>
          <table:table-cell office:value-type="string" table:formula="of:=IF([.S187]=&quot;UNKNOWN&quot;;&quot;NO ACTION — linkage status is UNKNOWN / not asserted&quot;;IF([.S187]=&quot;CLEAR&quot;;&quot;NO CONTRADICTION — preserve evidence as entered&quot;;IF([.M187]=&quot;&quot;;&quot;REVIEW LINKAGE STATUS — identifiers are present while status is UNKNOWN&quot;;IF([.M187]=&quot;UNMATCHED&quot;;&quot;REMOVE LINKAGE IDENTIFIERS OR CORRECT LINKAGE STATUS&quot;;IF([.M187]=&quot;SINGLE_SALE_LINKED&quot;;&quot;REQUIRE LINKED SALE ID AND NO ALLOCATION GROUP ID&quot;;IF([.M187]=&quot;MULTI_SALE_PENDING_ALLOCATION&quot;;&quot;REMOVE LINKED SALE ID OR CORRECT LINKAGE STATUS&quot;;IF([.M187]=&quot;ALLOCATED&quot;;&quot;REQUIRE ALLOCATION GROUP ID AND NO LINKED SALE ID&quot;;&quot;REVIEW LINKAGE EVIDENCE — NO AUTHORITY CREATED&quot;)))))))">
            <text:p>NO ACTION — linkage status is UNKNOWN / not asserted</text:p>
          </table:table-cell>
          <table:table-cell office:value-type="string" table:formula="of:=IF([.S187]=&quot;CONTRADICTION&quot;;&quot;BLOCKED&quot;;IF([.S187]=&quot;UNKNOWN&quot;;&quot;UNKNOWN&quot;;IF([.S187]=&quot;CLEAR&quot;;IF(OR([.O187]=&quot;&quot;;[.P187]=&quot;&quot;);&quot;UNKNOWN&quot;;&quot;READY FOR REVIEW&quot;);&quot;BLOCKED&quot;)))">
            <text:p>UNKNOWN</text:p>
          </table:table-cell>
          <table:table-cell office:value-type="string" table:formula="of:=IF([.U187]=&quot;UNKNOWN&quot;;&quot;COMPLETE OR ASSERT REQUIRED EVIDENCE BEFORE REVIEW&quot;;IF([.U187]=&quot;BLOCKED&quot;;&quot;RESOLVE CONTRADICTION BEFORE REVIEW — NO AUTHORITY CREATED&quot;;IF([.U18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7]=&quot;READY FOR REVIEW&quot;;&quot;REVIEW ELIGIBLE — NO AUTHORITY&quot;;IF(OR([.U187]=&quot;UNKNOWN&quot;;[.U187]=&quot;BLOCKED&quot;);&quot;NOT REVIEW ELIGIBLE&quot;;&quot;NOT REVIEW ELIGIBLE&quot;))">
            <text:p>NOT REVIEW ELIGIBLE</text:p>
          </table:table-cell>
          <table:table-cell office:value-type="string" table:formula="of:=IF([.W187]=&quot;NOT REVIEW ELIGIBLE&quot;;&quot;DO NOT BEGIN SETTLEMENT REVIEW — RESOLVE READINESS OR CONTRADICTION CONDITIONS&quot;;IF([.W18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7]=&quot;&quot;;&quot;UNKNOWN&quot;;IF([.W187]&lt;&gt;&quot;REVIEW ELIGIBLE — NO AUTHORITY&quot;;&quot;BLOCKED — OUTCOME ASSERTED WITHOUT REVIEW ELIGIBILITY&quot;;IF(OR([.Y187]=&quot;REVIEWED — NO AUTHORITY&quot;;[.Y187]=&quot;REVIEW DEFERRED&quot;;[.Y18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8]=&quot;&quot;;IF(AND([.L188]=&quot;&quot;;[.N188]=&quot;&quot;);&quot;UNKNOWN&quot;;&quot;CONTRADICTION&quot;);IF([.M188]=&quot;UNMATCHED&quot;;IF(AND([.L188]=&quot;&quot;;[.N188]=&quot;&quot;);&quot;CLEAR&quot;;&quot;CONTRADICTION&quot;);IF([.M188]=&quot;SINGLE_SALE_LINKED&quot;;IF(AND([.L188]&lt;&gt;&quot;&quot;;[.N188]=&quot;&quot;);&quot;CLEAR&quot;;&quot;CONTRADICTION&quot;);IF([.M188]=&quot;MULTI_SALE_PENDING_ALLOCATION&quot;;IF([.L188]=&quot;&quot;;&quot;CLEAR&quot;;&quot;CONTRADICTION&quot;);IF([.M188]=&quot;ALLOCATED&quot;;IF(AND([.L188]=&quot;&quot;;[.N188]&lt;&gt;&quot;&quot;);&quot;CLEAR&quot;;&quot;CONTRADICTION&quot;);&quot;CONTRADICTION&quot;)))))">
            <text:p>UNKNOWN</text:p>
          </table:table-cell>
          <table:table-cell office:value-type="string" table:formula="of:=IF([.S188]=&quot;UNKNOWN&quot;;&quot;NO ACTION — linkage status is UNKNOWN / not asserted&quot;;IF([.S188]=&quot;CLEAR&quot;;&quot;NO CONTRADICTION — preserve evidence as entered&quot;;IF([.M188]=&quot;&quot;;&quot;REVIEW LINKAGE STATUS — identifiers are present while status is UNKNOWN&quot;;IF([.M188]=&quot;UNMATCHED&quot;;&quot;REMOVE LINKAGE IDENTIFIERS OR CORRECT LINKAGE STATUS&quot;;IF([.M188]=&quot;SINGLE_SALE_LINKED&quot;;&quot;REQUIRE LINKED SALE ID AND NO ALLOCATION GROUP ID&quot;;IF([.M188]=&quot;MULTI_SALE_PENDING_ALLOCATION&quot;;&quot;REMOVE LINKED SALE ID OR CORRECT LINKAGE STATUS&quot;;IF([.M188]=&quot;ALLOCATED&quot;;&quot;REQUIRE ALLOCATION GROUP ID AND NO LINKED SALE ID&quot;;&quot;REVIEW LINKAGE EVIDENCE — NO AUTHORITY CREATED&quot;)))))))">
            <text:p>NO ACTION — linkage status is UNKNOWN / not asserted</text:p>
          </table:table-cell>
          <table:table-cell office:value-type="string" table:formula="of:=IF([.S188]=&quot;CONTRADICTION&quot;;&quot;BLOCKED&quot;;IF([.S188]=&quot;UNKNOWN&quot;;&quot;UNKNOWN&quot;;IF([.S188]=&quot;CLEAR&quot;;IF(OR([.O188]=&quot;&quot;;[.P188]=&quot;&quot;);&quot;UNKNOWN&quot;;&quot;READY FOR REVIEW&quot;);&quot;BLOCKED&quot;)))">
            <text:p>UNKNOWN</text:p>
          </table:table-cell>
          <table:table-cell office:value-type="string" table:formula="of:=IF([.U188]=&quot;UNKNOWN&quot;;&quot;COMPLETE OR ASSERT REQUIRED EVIDENCE BEFORE REVIEW&quot;;IF([.U188]=&quot;BLOCKED&quot;;&quot;RESOLVE CONTRADICTION BEFORE REVIEW — NO AUTHORITY CREATED&quot;;IF([.U18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8]=&quot;READY FOR REVIEW&quot;;&quot;REVIEW ELIGIBLE — NO AUTHORITY&quot;;IF(OR([.U188]=&quot;UNKNOWN&quot;;[.U188]=&quot;BLOCKED&quot;);&quot;NOT REVIEW ELIGIBLE&quot;;&quot;NOT REVIEW ELIGIBLE&quot;))">
            <text:p>NOT REVIEW ELIGIBLE</text:p>
          </table:table-cell>
          <table:table-cell office:value-type="string" table:formula="of:=IF([.W188]=&quot;NOT REVIEW ELIGIBLE&quot;;&quot;DO NOT BEGIN SETTLEMENT REVIEW — RESOLVE READINESS OR CONTRADICTION CONDITIONS&quot;;IF([.W18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8]=&quot;&quot;;&quot;UNKNOWN&quot;;IF([.W188]&lt;&gt;&quot;REVIEW ELIGIBLE — NO AUTHORITY&quot;;&quot;BLOCKED — OUTCOME ASSERTED WITHOUT REVIEW ELIGIBILITY&quot;;IF(OR([.Y188]=&quot;REVIEWED — NO AUTHORITY&quot;;[.Y188]=&quot;REVIEW DEFERRED&quot;;[.Y18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89]=&quot;&quot;;IF(AND([.L189]=&quot;&quot;;[.N189]=&quot;&quot;);&quot;UNKNOWN&quot;;&quot;CONTRADICTION&quot;);IF([.M189]=&quot;UNMATCHED&quot;;IF(AND([.L189]=&quot;&quot;;[.N189]=&quot;&quot;);&quot;CLEAR&quot;;&quot;CONTRADICTION&quot;);IF([.M189]=&quot;SINGLE_SALE_LINKED&quot;;IF(AND([.L189]&lt;&gt;&quot;&quot;;[.N189]=&quot;&quot;);&quot;CLEAR&quot;;&quot;CONTRADICTION&quot;);IF([.M189]=&quot;MULTI_SALE_PENDING_ALLOCATION&quot;;IF([.L189]=&quot;&quot;;&quot;CLEAR&quot;;&quot;CONTRADICTION&quot;);IF([.M189]=&quot;ALLOCATED&quot;;IF(AND([.L189]=&quot;&quot;;[.N189]&lt;&gt;&quot;&quot;);&quot;CLEAR&quot;;&quot;CONTRADICTION&quot;);&quot;CONTRADICTION&quot;)))))">
            <text:p>UNKNOWN</text:p>
          </table:table-cell>
          <table:table-cell office:value-type="string" table:formula="of:=IF([.S189]=&quot;UNKNOWN&quot;;&quot;NO ACTION — linkage status is UNKNOWN / not asserted&quot;;IF([.S189]=&quot;CLEAR&quot;;&quot;NO CONTRADICTION — preserve evidence as entered&quot;;IF([.M189]=&quot;&quot;;&quot;REVIEW LINKAGE STATUS — identifiers are present while status is UNKNOWN&quot;;IF([.M189]=&quot;UNMATCHED&quot;;&quot;REMOVE LINKAGE IDENTIFIERS OR CORRECT LINKAGE STATUS&quot;;IF([.M189]=&quot;SINGLE_SALE_LINKED&quot;;&quot;REQUIRE LINKED SALE ID AND NO ALLOCATION GROUP ID&quot;;IF([.M189]=&quot;MULTI_SALE_PENDING_ALLOCATION&quot;;&quot;REMOVE LINKED SALE ID OR CORRECT LINKAGE STATUS&quot;;IF([.M189]=&quot;ALLOCATED&quot;;&quot;REQUIRE ALLOCATION GROUP ID AND NO LINKED SALE ID&quot;;&quot;REVIEW LINKAGE EVIDENCE — NO AUTHORITY CREATED&quot;)))))))">
            <text:p>NO ACTION — linkage status is UNKNOWN / not asserted</text:p>
          </table:table-cell>
          <table:table-cell office:value-type="string" table:formula="of:=IF([.S189]=&quot;CONTRADICTION&quot;;&quot;BLOCKED&quot;;IF([.S189]=&quot;UNKNOWN&quot;;&quot;UNKNOWN&quot;;IF([.S189]=&quot;CLEAR&quot;;IF(OR([.O189]=&quot;&quot;;[.P189]=&quot;&quot;);&quot;UNKNOWN&quot;;&quot;READY FOR REVIEW&quot;);&quot;BLOCKED&quot;)))">
            <text:p>UNKNOWN</text:p>
          </table:table-cell>
          <table:table-cell office:value-type="string" table:formula="of:=IF([.U189]=&quot;UNKNOWN&quot;;&quot;COMPLETE OR ASSERT REQUIRED EVIDENCE BEFORE REVIEW&quot;;IF([.U189]=&quot;BLOCKED&quot;;&quot;RESOLVE CONTRADICTION BEFORE REVIEW — NO AUTHORITY CREATED&quot;;IF([.U18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89]=&quot;READY FOR REVIEW&quot;;&quot;REVIEW ELIGIBLE — NO AUTHORITY&quot;;IF(OR([.U189]=&quot;UNKNOWN&quot;;[.U189]=&quot;BLOCKED&quot;);&quot;NOT REVIEW ELIGIBLE&quot;;&quot;NOT REVIEW ELIGIBLE&quot;))">
            <text:p>NOT REVIEW ELIGIBLE</text:p>
          </table:table-cell>
          <table:table-cell office:value-type="string" table:formula="of:=IF([.W189]=&quot;NOT REVIEW ELIGIBLE&quot;;&quot;DO NOT BEGIN SETTLEMENT REVIEW — RESOLVE READINESS OR CONTRADICTION CONDITIONS&quot;;IF([.W18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89]=&quot;&quot;;&quot;UNKNOWN&quot;;IF([.W189]&lt;&gt;&quot;REVIEW ELIGIBLE — NO AUTHORITY&quot;;&quot;BLOCKED — OUTCOME ASSERTED WITHOUT REVIEW ELIGIBILITY&quot;;IF(OR([.Y189]=&quot;REVIEWED — NO AUTHORITY&quot;;[.Y189]=&quot;REVIEW DEFERRED&quot;;[.Y18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0]=&quot;&quot;;IF(AND([.L190]=&quot;&quot;;[.N190]=&quot;&quot;);&quot;UNKNOWN&quot;;&quot;CONTRADICTION&quot;);IF([.M190]=&quot;UNMATCHED&quot;;IF(AND([.L190]=&quot;&quot;;[.N190]=&quot;&quot;);&quot;CLEAR&quot;;&quot;CONTRADICTION&quot;);IF([.M190]=&quot;SINGLE_SALE_LINKED&quot;;IF(AND([.L190]&lt;&gt;&quot;&quot;;[.N190]=&quot;&quot;);&quot;CLEAR&quot;;&quot;CONTRADICTION&quot;);IF([.M190]=&quot;MULTI_SALE_PENDING_ALLOCATION&quot;;IF([.L190]=&quot;&quot;;&quot;CLEAR&quot;;&quot;CONTRADICTION&quot;);IF([.M190]=&quot;ALLOCATED&quot;;IF(AND([.L190]=&quot;&quot;;[.N190]&lt;&gt;&quot;&quot;);&quot;CLEAR&quot;;&quot;CONTRADICTION&quot;);&quot;CONTRADICTION&quot;)))))">
            <text:p>UNKNOWN</text:p>
          </table:table-cell>
          <table:table-cell office:value-type="string" table:formula="of:=IF([.S190]=&quot;UNKNOWN&quot;;&quot;NO ACTION — linkage status is UNKNOWN / not asserted&quot;;IF([.S190]=&quot;CLEAR&quot;;&quot;NO CONTRADICTION — preserve evidence as entered&quot;;IF([.M190]=&quot;&quot;;&quot;REVIEW LINKAGE STATUS — identifiers are present while status is UNKNOWN&quot;;IF([.M190]=&quot;UNMATCHED&quot;;&quot;REMOVE LINKAGE IDENTIFIERS OR CORRECT LINKAGE STATUS&quot;;IF([.M190]=&quot;SINGLE_SALE_LINKED&quot;;&quot;REQUIRE LINKED SALE ID AND NO ALLOCATION GROUP ID&quot;;IF([.M190]=&quot;MULTI_SALE_PENDING_ALLOCATION&quot;;&quot;REMOVE LINKED SALE ID OR CORRECT LINKAGE STATUS&quot;;IF([.M190]=&quot;ALLOCATED&quot;;&quot;REQUIRE ALLOCATION GROUP ID AND NO LINKED SALE ID&quot;;&quot;REVIEW LINKAGE EVIDENCE — NO AUTHORITY CREATED&quot;)))))))">
            <text:p>NO ACTION — linkage status is UNKNOWN / not asserted</text:p>
          </table:table-cell>
          <table:table-cell office:value-type="string" table:formula="of:=IF([.S190]=&quot;CONTRADICTION&quot;;&quot;BLOCKED&quot;;IF([.S190]=&quot;UNKNOWN&quot;;&quot;UNKNOWN&quot;;IF([.S190]=&quot;CLEAR&quot;;IF(OR([.O190]=&quot;&quot;;[.P190]=&quot;&quot;);&quot;UNKNOWN&quot;;&quot;READY FOR REVIEW&quot;);&quot;BLOCKED&quot;)))">
            <text:p>UNKNOWN</text:p>
          </table:table-cell>
          <table:table-cell office:value-type="string" table:formula="of:=IF([.U190]=&quot;UNKNOWN&quot;;&quot;COMPLETE OR ASSERT REQUIRED EVIDENCE BEFORE REVIEW&quot;;IF([.U190]=&quot;BLOCKED&quot;;&quot;RESOLVE CONTRADICTION BEFORE REVIEW — NO AUTHORITY CREATED&quot;;IF([.U19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0]=&quot;READY FOR REVIEW&quot;;&quot;REVIEW ELIGIBLE — NO AUTHORITY&quot;;IF(OR([.U190]=&quot;UNKNOWN&quot;;[.U190]=&quot;BLOCKED&quot;);&quot;NOT REVIEW ELIGIBLE&quot;;&quot;NOT REVIEW ELIGIBLE&quot;))">
            <text:p>NOT REVIEW ELIGIBLE</text:p>
          </table:table-cell>
          <table:table-cell office:value-type="string" table:formula="of:=IF([.W190]=&quot;NOT REVIEW ELIGIBLE&quot;;&quot;DO NOT BEGIN SETTLEMENT REVIEW — RESOLVE READINESS OR CONTRADICTION CONDITIONS&quot;;IF([.W19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0]=&quot;&quot;;&quot;UNKNOWN&quot;;IF([.W190]&lt;&gt;&quot;REVIEW ELIGIBLE — NO AUTHORITY&quot;;&quot;BLOCKED — OUTCOME ASSERTED WITHOUT REVIEW ELIGIBILITY&quot;;IF(OR([.Y190]=&quot;REVIEWED — NO AUTHORITY&quot;;[.Y190]=&quot;REVIEW DEFERRED&quot;;[.Y19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1]=&quot;&quot;;IF(AND([.L191]=&quot;&quot;;[.N191]=&quot;&quot;);&quot;UNKNOWN&quot;;&quot;CONTRADICTION&quot;);IF([.M191]=&quot;UNMATCHED&quot;;IF(AND([.L191]=&quot;&quot;;[.N191]=&quot;&quot;);&quot;CLEAR&quot;;&quot;CONTRADICTION&quot;);IF([.M191]=&quot;SINGLE_SALE_LINKED&quot;;IF(AND([.L191]&lt;&gt;&quot;&quot;;[.N191]=&quot;&quot;);&quot;CLEAR&quot;;&quot;CONTRADICTION&quot;);IF([.M191]=&quot;MULTI_SALE_PENDING_ALLOCATION&quot;;IF([.L191]=&quot;&quot;;&quot;CLEAR&quot;;&quot;CONTRADICTION&quot;);IF([.M191]=&quot;ALLOCATED&quot;;IF(AND([.L191]=&quot;&quot;;[.N191]&lt;&gt;&quot;&quot;);&quot;CLEAR&quot;;&quot;CONTRADICTION&quot;);&quot;CONTRADICTION&quot;)))))">
            <text:p>UNKNOWN</text:p>
          </table:table-cell>
          <table:table-cell office:value-type="string" table:formula="of:=IF([.S191]=&quot;UNKNOWN&quot;;&quot;NO ACTION — linkage status is UNKNOWN / not asserted&quot;;IF([.S191]=&quot;CLEAR&quot;;&quot;NO CONTRADICTION — preserve evidence as entered&quot;;IF([.M191]=&quot;&quot;;&quot;REVIEW LINKAGE STATUS — identifiers are present while status is UNKNOWN&quot;;IF([.M191]=&quot;UNMATCHED&quot;;&quot;REMOVE LINKAGE IDENTIFIERS OR CORRECT LINKAGE STATUS&quot;;IF([.M191]=&quot;SINGLE_SALE_LINKED&quot;;&quot;REQUIRE LINKED SALE ID AND NO ALLOCATION GROUP ID&quot;;IF([.M191]=&quot;MULTI_SALE_PENDING_ALLOCATION&quot;;&quot;REMOVE LINKED SALE ID OR CORRECT LINKAGE STATUS&quot;;IF([.M191]=&quot;ALLOCATED&quot;;&quot;REQUIRE ALLOCATION GROUP ID AND NO LINKED SALE ID&quot;;&quot;REVIEW LINKAGE EVIDENCE — NO AUTHORITY CREATED&quot;)))))))">
            <text:p>NO ACTION — linkage status is UNKNOWN / not asserted</text:p>
          </table:table-cell>
          <table:table-cell office:value-type="string" table:formula="of:=IF([.S191]=&quot;CONTRADICTION&quot;;&quot;BLOCKED&quot;;IF([.S191]=&quot;UNKNOWN&quot;;&quot;UNKNOWN&quot;;IF([.S191]=&quot;CLEAR&quot;;IF(OR([.O191]=&quot;&quot;;[.P191]=&quot;&quot;);&quot;UNKNOWN&quot;;&quot;READY FOR REVIEW&quot;);&quot;BLOCKED&quot;)))">
            <text:p>UNKNOWN</text:p>
          </table:table-cell>
          <table:table-cell office:value-type="string" table:formula="of:=IF([.U191]=&quot;UNKNOWN&quot;;&quot;COMPLETE OR ASSERT REQUIRED EVIDENCE BEFORE REVIEW&quot;;IF([.U191]=&quot;BLOCKED&quot;;&quot;RESOLVE CONTRADICTION BEFORE REVIEW — NO AUTHORITY CREATED&quot;;IF([.U19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1]=&quot;READY FOR REVIEW&quot;;&quot;REVIEW ELIGIBLE — NO AUTHORITY&quot;;IF(OR([.U191]=&quot;UNKNOWN&quot;;[.U191]=&quot;BLOCKED&quot;);&quot;NOT REVIEW ELIGIBLE&quot;;&quot;NOT REVIEW ELIGIBLE&quot;))">
            <text:p>NOT REVIEW ELIGIBLE</text:p>
          </table:table-cell>
          <table:table-cell office:value-type="string" table:formula="of:=IF([.W191]=&quot;NOT REVIEW ELIGIBLE&quot;;&quot;DO NOT BEGIN SETTLEMENT REVIEW — RESOLVE READINESS OR CONTRADICTION CONDITIONS&quot;;IF([.W19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1]=&quot;&quot;;&quot;UNKNOWN&quot;;IF([.W191]&lt;&gt;&quot;REVIEW ELIGIBLE — NO AUTHORITY&quot;;&quot;BLOCKED — OUTCOME ASSERTED WITHOUT REVIEW ELIGIBILITY&quot;;IF(OR([.Y191]=&quot;REVIEWED — NO AUTHORITY&quot;;[.Y191]=&quot;REVIEW DEFERRED&quot;;[.Y191]=&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2]=&quot;&quot;;IF(AND([.L192]=&quot;&quot;;[.N192]=&quot;&quot;);&quot;UNKNOWN&quot;;&quot;CONTRADICTION&quot;);IF([.M192]=&quot;UNMATCHED&quot;;IF(AND([.L192]=&quot;&quot;;[.N192]=&quot;&quot;);&quot;CLEAR&quot;;&quot;CONTRADICTION&quot;);IF([.M192]=&quot;SINGLE_SALE_LINKED&quot;;IF(AND([.L192]&lt;&gt;&quot;&quot;;[.N192]=&quot;&quot;);&quot;CLEAR&quot;;&quot;CONTRADICTION&quot;);IF([.M192]=&quot;MULTI_SALE_PENDING_ALLOCATION&quot;;IF([.L192]=&quot;&quot;;&quot;CLEAR&quot;;&quot;CONTRADICTION&quot;);IF([.M192]=&quot;ALLOCATED&quot;;IF(AND([.L192]=&quot;&quot;;[.N192]&lt;&gt;&quot;&quot;);&quot;CLEAR&quot;;&quot;CONTRADICTION&quot;);&quot;CONTRADICTION&quot;)))))">
            <text:p>UNKNOWN</text:p>
          </table:table-cell>
          <table:table-cell office:value-type="string" table:formula="of:=IF([.S192]=&quot;UNKNOWN&quot;;&quot;NO ACTION — linkage status is UNKNOWN / not asserted&quot;;IF([.S192]=&quot;CLEAR&quot;;&quot;NO CONTRADICTION — preserve evidence as entered&quot;;IF([.M192]=&quot;&quot;;&quot;REVIEW LINKAGE STATUS — identifiers are present while status is UNKNOWN&quot;;IF([.M192]=&quot;UNMATCHED&quot;;&quot;REMOVE LINKAGE IDENTIFIERS OR CORRECT LINKAGE STATUS&quot;;IF([.M192]=&quot;SINGLE_SALE_LINKED&quot;;&quot;REQUIRE LINKED SALE ID AND NO ALLOCATION GROUP ID&quot;;IF([.M192]=&quot;MULTI_SALE_PENDING_ALLOCATION&quot;;&quot;REMOVE LINKED SALE ID OR CORRECT LINKAGE STATUS&quot;;IF([.M192]=&quot;ALLOCATED&quot;;&quot;REQUIRE ALLOCATION GROUP ID AND NO LINKED SALE ID&quot;;&quot;REVIEW LINKAGE EVIDENCE — NO AUTHORITY CREATED&quot;)))))))">
            <text:p>NO ACTION — linkage status is UNKNOWN / not asserted</text:p>
          </table:table-cell>
          <table:table-cell office:value-type="string" table:formula="of:=IF([.S192]=&quot;CONTRADICTION&quot;;&quot;BLOCKED&quot;;IF([.S192]=&quot;UNKNOWN&quot;;&quot;UNKNOWN&quot;;IF([.S192]=&quot;CLEAR&quot;;IF(OR([.O192]=&quot;&quot;;[.P192]=&quot;&quot;);&quot;UNKNOWN&quot;;&quot;READY FOR REVIEW&quot;);&quot;BLOCKED&quot;)))">
            <text:p>UNKNOWN</text:p>
          </table:table-cell>
          <table:table-cell office:value-type="string" table:formula="of:=IF([.U192]=&quot;UNKNOWN&quot;;&quot;COMPLETE OR ASSERT REQUIRED EVIDENCE BEFORE REVIEW&quot;;IF([.U192]=&quot;BLOCKED&quot;;&quot;RESOLVE CONTRADICTION BEFORE REVIEW — NO AUTHORITY CREATED&quot;;IF([.U19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2]=&quot;READY FOR REVIEW&quot;;&quot;REVIEW ELIGIBLE — NO AUTHORITY&quot;;IF(OR([.U192]=&quot;UNKNOWN&quot;;[.U192]=&quot;BLOCKED&quot;);&quot;NOT REVIEW ELIGIBLE&quot;;&quot;NOT REVIEW ELIGIBLE&quot;))">
            <text:p>NOT REVIEW ELIGIBLE</text:p>
          </table:table-cell>
          <table:table-cell office:value-type="string" table:formula="of:=IF([.W192]=&quot;NOT REVIEW ELIGIBLE&quot;;&quot;DO NOT BEGIN SETTLEMENT REVIEW — RESOLVE READINESS OR CONTRADICTION CONDITIONS&quot;;IF([.W19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2]=&quot;&quot;;&quot;UNKNOWN&quot;;IF([.W192]&lt;&gt;&quot;REVIEW ELIGIBLE — NO AUTHORITY&quot;;&quot;BLOCKED — OUTCOME ASSERTED WITHOUT REVIEW ELIGIBILITY&quot;;IF(OR([.Y192]=&quot;REVIEWED — NO AUTHORITY&quot;;[.Y192]=&quot;REVIEW DEFERRED&quot;;[.Y19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3]=&quot;&quot;;IF(AND([.L193]=&quot;&quot;;[.N193]=&quot;&quot;);&quot;UNKNOWN&quot;;&quot;CONTRADICTION&quot;);IF([.M193]=&quot;UNMATCHED&quot;;IF(AND([.L193]=&quot;&quot;;[.N193]=&quot;&quot;);&quot;CLEAR&quot;;&quot;CONTRADICTION&quot;);IF([.M193]=&quot;SINGLE_SALE_LINKED&quot;;IF(AND([.L193]&lt;&gt;&quot;&quot;;[.N193]=&quot;&quot;);&quot;CLEAR&quot;;&quot;CONTRADICTION&quot;);IF([.M193]=&quot;MULTI_SALE_PENDING_ALLOCATION&quot;;IF([.L193]=&quot;&quot;;&quot;CLEAR&quot;;&quot;CONTRADICTION&quot;);IF([.M193]=&quot;ALLOCATED&quot;;IF(AND([.L193]=&quot;&quot;;[.N193]&lt;&gt;&quot;&quot;);&quot;CLEAR&quot;;&quot;CONTRADICTION&quot;);&quot;CONTRADICTION&quot;)))))">
            <text:p>UNKNOWN</text:p>
          </table:table-cell>
          <table:table-cell office:value-type="string" table:formula="of:=IF([.S193]=&quot;UNKNOWN&quot;;&quot;NO ACTION — linkage status is UNKNOWN / not asserted&quot;;IF([.S193]=&quot;CLEAR&quot;;&quot;NO CONTRADICTION — preserve evidence as entered&quot;;IF([.M193]=&quot;&quot;;&quot;REVIEW LINKAGE STATUS — identifiers are present while status is UNKNOWN&quot;;IF([.M193]=&quot;UNMATCHED&quot;;&quot;REMOVE LINKAGE IDENTIFIERS OR CORRECT LINKAGE STATUS&quot;;IF([.M193]=&quot;SINGLE_SALE_LINKED&quot;;&quot;REQUIRE LINKED SALE ID AND NO ALLOCATION GROUP ID&quot;;IF([.M193]=&quot;MULTI_SALE_PENDING_ALLOCATION&quot;;&quot;REMOVE LINKED SALE ID OR CORRECT LINKAGE STATUS&quot;;IF([.M193]=&quot;ALLOCATED&quot;;&quot;REQUIRE ALLOCATION GROUP ID AND NO LINKED SALE ID&quot;;&quot;REVIEW LINKAGE EVIDENCE — NO AUTHORITY CREATED&quot;)))))))">
            <text:p>NO ACTION — linkage status is UNKNOWN / not asserted</text:p>
          </table:table-cell>
          <table:table-cell office:value-type="string" table:formula="of:=IF([.S193]=&quot;CONTRADICTION&quot;;&quot;BLOCKED&quot;;IF([.S193]=&quot;UNKNOWN&quot;;&quot;UNKNOWN&quot;;IF([.S193]=&quot;CLEAR&quot;;IF(OR([.O193]=&quot;&quot;;[.P193]=&quot;&quot;);&quot;UNKNOWN&quot;;&quot;READY FOR REVIEW&quot;);&quot;BLOCKED&quot;)))">
            <text:p>UNKNOWN</text:p>
          </table:table-cell>
          <table:table-cell office:value-type="string" table:formula="of:=IF([.U193]=&quot;UNKNOWN&quot;;&quot;COMPLETE OR ASSERT REQUIRED EVIDENCE BEFORE REVIEW&quot;;IF([.U193]=&quot;BLOCKED&quot;;&quot;RESOLVE CONTRADICTION BEFORE REVIEW — NO AUTHORITY CREATED&quot;;IF([.U19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3]=&quot;READY FOR REVIEW&quot;;&quot;REVIEW ELIGIBLE — NO AUTHORITY&quot;;IF(OR([.U193]=&quot;UNKNOWN&quot;;[.U193]=&quot;BLOCKED&quot;);&quot;NOT REVIEW ELIGIBLE&quot;;&quot;NOT REVIEW ELIGIBLE&quot;))">
            <text:p>NOT REVIEW ELIGIBLE</text:p>
          </table:table-cell>
          <table:table-cell office:value-type="string" table:formula="of:=IF([.W193]=&quot;NOT REVIEW ELIGIBLE&quot;;&quot;DO NOT BEGIN SETTLEMENT REVIEW — RESOLVE READINESS OR CONTRADICTION CONDITIONS&quot;;IF([.W19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3]=&quot;&quot;;&quot;UNKNOWN&quot;;IF([.W193]&lt;&gt;&quot;REVIEW ELIGIBLE — NO AUTHORITY&quot;;&quot;BLOCKED — OUTCOME ASSERTED WITHOUT REVIEW ELIGIBILITY&quot;;IF(OR([.Y193]=&quot;REVIEWED — NO AUTHORITY&quot;;[.Y193]=&quot;REVIEW DEFERRED&quot;;[.Y19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4]=&quot;&quot;;IF(AND([.L194]=&quot;&quot;;[.N194]=&quot;&quot;);&quot;UNKNOWN&quot;;&quot;CONTRADICTION&quot;);IF([.M194]=&quot;UNMATCHED&quot;;IF(AND([.L194]=&quot;&quot;;[.N194]=&quot;&quot;);&quot;CLEAR&quot;;&quot;CONTRADICTION&quot;);IF([.M194]=&quot;SINGLE_SALE_LINKED&quot;;IF(AND([.L194]&lt;&gt;&quot;&quot;;[.N194]=&quot;&quot;);&quot;CLEAR&quot;;&quot;CONTRADICTION&quot;);IF([.M194]=&quot;MULTI_SALE_PENDING_ALLOCATION&quot;;IF([.L194]=&quot;&quot;;&quot;CLEAR&quot;;&quot;CONTRADICTION&quot;);IF([.M194]=&quot;ALLOCATED&quot;;IF(AND([.L194]=&quot;&quot;;[.N194]&lt;&gt;&quot;&quot;);&quot;CLEAR&quot;;&quot;CONTRADICTION&quot;);&quot;CONTRADICTION&quot;)))))">
            <text:p>UNKNOWN</text:p>
          </table:table-cell>
          <table:table-cell office:value-type="string" table:formula="of:=IF([.S194]=&quot;UNKNOWN&quot;;&quot;NO ACTION — linkage status is UNKNOWN / not asserted&quot;;IF([.S194]=&quot;CLEAR&quot;;&quot;NO CONTRADICTION — preserve evidence as entered&quot;;IF([.M194]=&quot;&quot;;&quot;REVIEW LINKAGE STATUS — identifiers are present while status is UNKNOWN&quot;;IF([.M194]=&quot;UNMATCHED&quot;;&quot;REMOVE LINKAGE IDENTIFIERS OR CORRECT LINKAGE STATUS&quot;;IF([.M194]=&quot;SINGLE_SALE_LINKED&quot;;&quot;REQUIRE LINKED SALE ID AND NO ALLOCATION GROUP ID&quot;;IF([.M194]=&quot;MULTI_SALE_PENDING_ALLOCATION&quot;;&quot;REMOVE LINKED SALE ID OR CORRECT LINKAGE STATUS&quot;;IF([.M194]=&quot;ALLOCATED&quot;;&quot;REQUIRE ALLOCATION GROUP ID AND NO LINKED SALE ID&quot;;&quot;REVIEW LINKAGE EVIDENCE — NO AUTHORITY CREATED&quot;)))))))">
            <text:p>NO ACTION — linkage status is UNKNOWN / not asserted</text:p>
          </table:table-cell>
          <table:table-cell office:value-type="string" table:formula="of:=IF([.S194]=&quot;CONTRADICTION&quot;;&quot;BLOCKED&quot;;IF([.S194]=&quot;UNKNOWN&quot;;&quot;UNKNOWN&quot;;IF([.S194]=&quot;CLEAR&quot;;IF(OR([.O194]=&quot;&quot;;[.P194]=&quot;&quot;);&quot;UNKNOWN&quot;;&quot;READY FOR REVIEW&quot;);&quot;BLOCKED&quot;)))">
            <text:p>UNKNOWN</text:p>
          </table:table-cell>
          <table:table-cell office:value-type="string" table:formula="of:=IF([.U194]=&quot;UNKNOWN&quot;;&quot;COMPLETE OR ASSERT REQUIRED EVIDENCE BEFORE REVIEW&quot;;IF([.U194]=&quot;BLOCKED&quot;;&quot;RESOLVE CONTRADICTION BEFORE REVIEW — NO AUTHORITY CREATED&quot;;IF([.U19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4]=&quot;READY FOR REVIEW&quot;;&quot;REVIEW ELIGIBLE — NO AUTHORITY&quot;;IF(OR([.U194]=&quot;UNKNOWN&quot;;[.U194]=&quot;BLOCKED&quot;);&quot;NOT REVIEW ELIGIBLE&quot;;&quot;NOT REVIEW ELIGIBLE&quot;))">
            <text:p>NOT REVIEW ELIGIBLE</text:p>
          </table:table-cell>
          <table:table-cell office:value-type="string" table:formula="of:=IF([.W194]=&quot;NOT REVIEW ELIGIBLE&quot;;&quot;DO NOT BEGIN SETTLEMENT REVIEW — RESOLVE READINESS OR CONTRADICTION CONDITIONS&quot;;IF([.W19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4]=&quot;&quot;;&quot;UNKNOWN&quot;;IF([.W194]&lt;&gt;&quot;REVIEW ELIGIBLE — NO AUTHORITY&quot;;&quot;BLOCKED — OUTCOME ASSERTED WITHOUT REVIEW ELIGIBILITY&quot;;IF(OR([.Y194]=&quot;REVIEWED — NO AUTHORITY&quot;;[.Y194]=&quot;REVIEW DEFERRED&quot;;[.Y19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5]=&quot;&quot;;IF(AND([.L195]=&quot;&quot;;[.N195]=&quot;&quot;);&quot;UNKNOWN&quot;;&quot;CONTRADICTION&quot;);IF([.M195]=&quot;UNMATCHED&quot;;IF(AND([.L195]=&quot;&quot;;[.N195]=&quot;&quot;);&quot;CLEAR&quot;;&quot;CONTRADICTION&quot;);IF([.M195]=&quot;SINGLE_SALE_LINKED&quot;;IF(AND([.L195]&lt;&gt;&quot;&quot;;[.N195]=&quot;&quot;);&quot;CLEAR&quot;;&quot;CONTRADICTION&quot;);IF([.M195]=&quot;MULTI_SALE_PENDING_ALLOCATION&quot;;IF([.L195]=&quot;&quot;;&quot;CLEAR&quot;;&quot;CONTRADICTION&quot;);IF([.M195]=&quot;ALLOCATED&quot;;IF(AND([.L195]=&quot;&quot;;[.N195]&lt;&gt;&quot;&quot;);&quot;CLEAR&quot;;&quot;CONTRADICTION&quot;);&quot;CONTRADICTION&quot;)))))">
            <text:p>UNKNOWN</text:p>
          </table:table-cell>
          <table:table-cell office:value-type="string" table:formula="of:=IF([.S195]=&quot;UNKNOWN&quot;;&quot;NO ACTION — linkage status is UNKNOWN / not asserted&quot;;IF([.S195]=&quot;CLEAR&quot;;&quot;NO CONTRADICTION — preserve evidence as entered&quot;;IF([.M195]=&quot;&quot;;&quot;REVIEW LINKAGE STATUS — identifiers are present while status is UNKNOWN&quot;;IF([.M195]=&quot;UNMATCHED&quot;;&quot;REMOVE LINKAGE IDENTIFIERS OR CORRECT LINKAGE STATUS&quot;;IF([.M195]=&quot;SINGLE_SALE_LINKED&quot;;&quot;REQUIRE LINKED SALE ID AND NO ALLOCATION GROUP ID&quot;;IF([.M195]=&quot;MULTI_SALE_PENDING_ALLOCATION&quot;;&quot;REMOVE LINKED SALE ID OR CORRECT LINKAGE STATUS&quot;;IF([.M195]=&quot;ALLOCATED&quot;;&quot;REQUIRE ALLOCATION GROUP ID AND NO LINKED SALE ID&quot;;&quot;REVIEW LINKAGE EVIDENCE — NO AUTHORITY CREATED&quot;)))))))">
            <text:p>NO ACTION — linkage status is UNKNOWN / not asserted</text:p>
          </table:table-cell>
          <table:table-cell office:value-type="string" table:formula="of:=IF([.S195]=&quot;CONTRADICTION&quot;;&quot;BLOCKED&quot;;IF([.S195]=&quot;UNKNOWN&quot;;&quot;UNKNOWN&quot;;IF([.S195]=&quot;CLEAR&quot;;IF(OR([.O195]=&quot;&quot;;[.P195]=&quot;&quot;);&quot;UNKNOWN&quot;;&quot;READY FOR REVIEW&quot;);&quot;BLOCKED&quot;)))">
            <text:p>UNKNOWN</text:p>
          </table:table-cell>
          <table:table-cell office:value-type="string" table:formula="of:=IF([.U195]=&quot;UNKNOWN&quot;;&quot;COMPLETE OR ASSERT REQUIRED EVIDENCE BEFORE REVIEW&quot;;IF([.U195]=&quot;BLOCKED&quot;;&quot;RESOLVE CONTRADICTION BEFORE REVIEW — NO AUTHORITY CREATED&quot;;IF([.U19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5]=&quot;READY FOR REVIEW&quot;;&quot;REVIEW ELIGIBLE — NO AUTHORITY&quot;;IF(OR([.U195]=&quot;UNKNOWN&quot;;[.U195]=&quot;BLOCKED&quot;);&quot;NOT REVIEW ELIGIBLE&quot;;&quot;NOT REVIEW ELIGIBLE&quot;))">
            <text:p>NOT REVIEW ELIGIBLE</text:p>
          </table:table-cell>
          <table:table-cell office:value-type="string" table:formula="of:=IF([.W195]=&quot;NOT REVIEW ELIGIBLE&quot;;&quot;DO NOT BEGIN SETTLEMENT REVIEW — RESOLVE READINESS OR CONTRADICTION CONDITIONS&quot;;IF([.W19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5]=&quot;&quot;;&quot;UNKNOWN&quot;;IF([.W195]&lt;&gt;&quot;REVIEW ELIGIBLE — NO AUTHORITY&quot;;&quot;BLOCKED — OUTCOME ASSERTED WITHOUT REVIEW ELIGIBILITY&quot;;IF(OR([.Y195]=&quot;REVIEWED — NO AUTHORITY&quot;;[.Y195]=&quot;REVIEW DEFERRED&quot;;[.Y19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6]=&quot;&quot;;IF(AND([.L196]=&quot;&quot;;[.N196]=&quot;&quot;);&quot;UNKNOWN&quot;;&quot;CONTRADICTION&quot;);IF([.M196]=&quot;UNMATCHED&quot;;IF(AND([.L196]=&quot;&quot;;[.N196]=&quot;&quot;);&quot;CLEAR&quot;;&quot;CONTRADICTION&quot;);IF([.M196]=&quot;SINGLE_SALE_LINKED&quot;;IF(AND([.L196]&lt;&gt;&quot;&quot;;[.N196]=&quot;&quot;);&quot;CLEAR&quot;;&quot;CONTRADICTION&quot;);IF([.M196]=&quot;MULTI_SALE_PENDING_ALLOCATION&quot;;IF([.L196]=&quot;&quot;;&quot;CLEAR&quot;;&quot;CONTRADICTION&quot;);IF([.M196]=&quot;ALLOCATED&quot;;IF(AND([.L196]=&quot;&quot;;[.N196]&lt;&gt;&quot;&quot;);&quot;CLEAR&quot;;&quot;CONTRADICTION&quot;);&quot;CONTRADICTION&quot;)))))">
            <text:p>UNKNOWN</text:p>
          </table:table-cell>
          <table:table-cell office:value-type="string" table:formula="of:=IF([.S196]=&quot;UNKNOWN&quot;;&quot;NO ACTION — linkage status is UNKNOWN / not asserted&quot;;IF([.S196]=&quot;CLEAR&quot;;&quot;NO CONTRADICTION — preserve evidence as entered&quot;;IF([.M196]=&quot;&quot;;&quot;REVIEW LINKAGE STATUS — identifiers are present while status is UNKNOWN&quot;;IF([.M196]=&quot;UNMATCHED&quot;;&quot;REMOVE LINKAGE IDENTIFIERS OR CORRECT LINKAGE STATUS&quot;;IF([.M196]=&quot;SINGLE_SALE_LINKED&quot;;&quot;REQUIRE LINKED SALE ID AND NO ALLOCATION GROUP ID&quot;;IF([.M196]=&quot;MULTI_SALE_PENDING_ALLOCATION&quot;;&quot;REMOVE LINKED SALE ID OR CORRECT LINKAGE STATUS&quot;;IF([.M196]=&quot;ALLOCATED&quot;;&quot;REQUIRE ALLOCATION GROUP ID AND NO LINKED SALE ID&quot;;&quot;REVIEW LINKAGE EVIDENCE — NO AUTHORITY CREATED&quot;)))))))">
            <text:p>NO ACTION — linkage status is UNKNOWN / not asserted</text:p>
          </table:table-cell>
          <table:table-cell office:value-type="string" table:formula="of:=IF([.S196]=&quot;CONTRADICTION&quot;;&quot;BLOCKED&quot;;IF([.S196]=&quot;UNKNOWN&quot;;&quot;UNKNOWN&quot;;IF([.S196]=&quot;CLEAR&quot;;IF(OR([.O196]=&quot;&quot;;[.P196]=&quot;&quot;);&quot;UNKNOWN&quot;;&quot;READY FOR REVIEW&quot;);&quot;BLOCKED&quot;)))">
            <text:p>UNKNOWN</text:p>
          </table:table-cell>
          <table:table-cell office:value-type="string" table:formula="of:=IF([.U196]=&quot;UNKNOWN&quot;;&quot;COMPLETE OR ASSERT REQUIRED EVIDENCE BEFORE REVIEW&quot;;IF([.U196]=&quot;BLOCKED&quot;;&quot;RESOLVE CONTRADICTION BEFORE REVIEW — NO AUTHORITY CREATED&quot;;IF([.U19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6]=&quot;READY FOR REVIEW&quot;;&quot;REVIEW ELIGIBLE — NO AUTHORITY&quot;;IF(OR([.U196]=&quot;UNKNOWN&quot;;[.U196]=&quot;BLOCKED&quot;);&quot;NOT REVIEW ELIGIBLE&quot;;&quot;NOT REVIEW ELIGIBLE&quot;))">
            <text:p>NOT REVIEW ELIGIBLE</text:p>
          </table:table-cell>
          <table:table-cell office:value-type="string" table:formula="of:=IF([.W196]=&quot;NOT REVIEW ELIGIBLE&quot;;&quot;DO NOT BEGIN SETTLEMENT REVIEW — RESOLVE READINESS OR CONTRADICTION CONDITIONS&quot;;IF([.W19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6]=&quot;&quot;;&quot;UNKNOWN&quot;;IF([.W196]&lt;&gt;&quot;REVIEW ELIGIBLE — NO AUTHORITY&quot;;&quot;BLOCKED — OUTCOME ASSERTED WITHOUT REVIEW ELIGIBILITY&quot;;IF(OR([.Y196]=&quot;REVIEWED — NO AUTHORITY&quot;;[.Y196]=&quot;REVIEW DEFERRED&quot;;[.Y19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7]=&quot;&quot;;IF(AND([.L197]=&quot;&quot;;[.N197]=&quot;&quot;);&quot;UNKNOWN&quot;;&quot;CONTRADICTION&quot;);IF([.M197]=&quot;UNMATCHED&quot;;IF(AND([.L197]=&quot;&quot;;[.N197]=&quot;&quot;);&quot;CLEAR&quot;;&quot;CONTRADICTION&quot;);IF([.M197]=&quot;SINGLE_SALE_LINKED&quot;;IF(AND([.L197]&lt;&gt;&quot;&quot;;[.N197]=&quot;&quot;);&quot;CLEAR&quot;;&quot;CONTRADICTION&quot;);IF([.M197]=&quot;MULTI_SALE_PENDING_ALLOCATION&quot;;IF([.L197]=&quot;&quot;;&quot;CLEAR&quot;;&quot;CONTRADICTION&quot;);IF([.M197]=&quot;ALLOCATED&quot;;IF(AND([.L197]=&quot;&quot;;[.N197]&lt;&gt;&quot;&quot;);&quot;CLEAR&quot;;&quot;CONTRADICTION&quot;);&quot;CONTRADICTION&quot;)))))">
            <text:p>UNKNOWN</text:p>
          </table:table-cell>
          <table:table-cell office:value-type="string" table:formula="of:=IF([.S197]=&quot;UNKNOWN&quot;;&quot;NO ACTION — linkage status is UNKNOWN / not asserted&quot;;IF([.S197]=&quot;CLEAR&quot;;&quot;NO CONTRADICTION — preserve evidence as entered&quot;;IF([.M197]=&quot;&quot;;&quot;REVIEW LINKAGE STATUS — identifiers are present while status is UNKNOWN&quot;;IF([.M197]=&quot;UNMATCHED&quot;;&quot;REMOVE LINKAGE IDENTIFIERS OR CORRECT LINKAGE STATUS&quot;;IF([.M197]=&quot;SINGLE_SALE_LINKED&quot;;&quot;REQUIRE LINKED SALE ID AND NO ALLOCATION GROUP ID&quot;;IF([.M197]=&quot;MULTI_SALE_PENDING_ALLOCATION&quot;;&quot;REMOVE LINKED SALE ID OR CORRECT LINKAGE STATUS&quot;;IF([.M197]=&quot;ALLOCATED&quot;;&quot;REQUIRE ALLOCATION GROUP ID AND NO LINKED SALE ID&quot;;&quot;REVIEW LINKAGE EVIDENCE — NO AUTHORITY CREATED&quot;)))))))">
            <text:p>NO ACTION — linkage status is UNKNOWN / not asserted</text:p>
          </table:table-cell>
          <table:table-cell office:value-type="string" table:formula="of:=IF([.S197]=&quot;CONTRADICTION&quot;;&quot;BLOCKED&quot;;IF([.S197]=&quot;UNKNOWN&quot;;&quot;UNKNOWN&quot;;IF([.S197]=&quot;CLEAR&quot;;IF(OR([.O197]=&quot;&quot;;[.P197]=&quot;&quot;);&quot;UNKNOWN&quot;;&quot;READY FOR REVIEW&quot;);&quot;BLOCKED&quot;)))">
            <text:p>UNKNOWN</text:p>
          </table:table-cell>
          <table:table-cell office:value-type="string" table:formula="of:=IF([.U197]=&quot;UNKNOWN&quot;;&quot;COMPLETE OR ASSERT REQUIRED EVIDENCE BEFORE REVIEW&quot;;IF([.U197]=&quot;BLOCKED&quot;;&quot;RESOLVE CONTRADICTION BEFORE REVIEW — NO AUTHORITY CREATED&quot;;IF([.U19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7]=&quot;READY FOR REVIEW&quot;;&quot;REVIEW ELIGIBLE — NO AUTHORITY&quot;;IF(OR([.U197]=&quot;UNKNOWN&quot;;[.U197]=&quot;BLOCKED&quot;);&quot;NOT REVIEW ELIGIBLE&quot;;&quot;NOT REVIEW ELIGIBLE&quot;))">
            <text:p>NOT REVIEW ELIGIBLE</text:p>
          </table:table-cell>
          <table:table-cell office:value-type="string" table:formula="of:=IF([.W197]=&quot;NOT REVIEW ELIGIBLE&quot;;&quot;DO NOT BEGIN SETTLEMENT REVIEW — RESOLVE READINESS OR CONTRADICTION CONDITIONS&quot;;IF([.W19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7]=&quot;&quot;;&quot;UNKNOWN&quot;;IF([.W197]&lt;&gt;&quot;REVIEW ELIGIBLE — NO AUTHORITY&quot;;&quot;BLOCKED — OUTCOME ASSERTED WITHOUT REVIEW ELIGIBILITY&quot;;IF(OR([.Y197]=&quot;REVIEWED — NO AUTHORITY&quot;;[.Y197]=&quot;REVIEW DEFERRED&quot;;[.Y19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8]=&quot;&quot;;IF(AND([.L198]=&quot;&quot;;[.N198]=&quot;&quot;);&quot;UNKNOWN&quot;;&quot;CONTRADICTION&quot;);IF([.M198]=&quot;UNMATCHED&quot;;IF(AND([.L198]=&quot;&quot;;[.N198]=&quot;&quot;);&quot;CLEAR&quot;;&quot;CONTRADICTION&quot;);IF([.M198]=&quot;SINGLE_SALE_LINKED&quot;;IF(AND([.L198]&lt;&gt;&quot;&quot;;[.N198]=&quot;&quot;);&quot;CLEAR&quot;;&quot;CONTRADICTION&quot;);IF([.M198]=&quot;MULTI_SALE_PENDING_ALLOCATION&quot;;IF([.L198]=&quot;&quot;;&quot;CLEAR&quot;;&quot;CONTRADICTION&quot;);IF([.M198]=&quot;ALLOCATED&quot;;IF(AND([.L198]=&quot;&quot;;[.N198]&lt;&gt;&quot;&quot;);&quot;CLEAR&quot;;&quot;CONTRADICTION&quot;);&quot;CONTRADICTION&quot;)))))">
            <text:p>UNKNOWN</text:p>
          </table:table-cell>
          <table:table-cell office:value-type="string" table:formula="of:=IF([.S198]=&quot;UNKNOWN&quot;;&quot;NO ACTION — linkage status is UNKNOWN / not asserted&quot;;IF([.S198]=&quot;CLEAR&quot;;&quot;NO CONTRADICTION — preserve evidence as entered&quot;;IF([.M198]=&quot;&quot;;&quot;REVIEW LINKAGE STATUS — identifiers are present while status is UNKNOWN&quot;;IF([.M198]=&quot;UNMATCHED&quot;;&quot;REMOVE LINKAGE IDENTIFIERS OR CORRECT LINKAGE STATUS&quot;;IF([.M198]=&quot;SINGLE_SALE_LINKED&quot;;&quot;REQUIRE LINKED SALE ID AND NO ALLOCATION GROUP ID&quot;;IF([.M198]=&quot;MULTI_SALE_PENDING_ALLOCATION&quot;;&quot;REMOVE LINKED SALE ID OR CORRECT LINKAGE STATUS&quot;;IF([.M198]=&quot;ALLOCATED&quot;;&quot;REQUIRE ALLOCATION GROUP ID AND NO LINKED SALE ID&quot;;&quot;REVIEW LINKAGE EVIDENCE — NO AUTHORITY CREATED&quot;)))))))">
            <text:p>NO ACTION — linkage status is UNKNOWN / not asserted</text:p>
          </table:table-cell>
          <table:table-cell office:value-type="string" table:formula="of:=IF([.S198]=&quot;CONTRADICTION&quot;;&quot;BLOCKED&quot;;IF([.S198]=&quot;UNKNOWN&quot;;&quot;UNKNOWN&quot;;IF([.S198]=&quot;CLEAR&quot;;IF(OR([.O198]=&quot;&quot;;[.P198]=&quot;&quot;);&quot;UNKNOWN&quot;;&quot;READY FOR REVIEW&quot;);&quot;BLOCKED&quot;)))">
            <text:p>UNKNOWN</text:p>
          </table:table-cell>
          <table:table-cell office:value-type="string" table:formula="of:=IF([.U198]=&quot;UNKNOWN&quot;;&quot;COMPLETE OR ASSERT REQUIRED EVIDENCE BEFORE REVIEW&quot;;IF([.U198]=&quot;BLOCKED&quot;;&quot;RESOLVE CONTRADICTION BEFORE REVIEW — NO AUTHORITY CREATED&quot;;IF([.U19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8]=&quot;READY FOR REVIEW&quot;;&quot;REVIEW ELIGIBLE — NO AUTHORITY&quot;;IF(OR([.U198]=&quot;UNKNOWN&quot;;[.U198]=&quot;BLOCKED&quot;);&quot;NOT REVIEW ELIGIBLE&quot;;&quot;NOT REVIEW ELIGIBLE&quot;))">
            <text:p>NOT REVIEW ELIGIBLE</text:p>
          </table:table-cell>
          <table:table-cell office:value-type="string" table:formula="of:=IF([.W198]=&quot;NOT REVIEW ELIGIBLE&quot;;&quot;DO NOT BEGIN SETTLEMENT REVIEW — RESOLVE READINESS OR CONTRADICTION CONDITIONS&quot;;IF([.W19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8]=&quot;&quot;;&quot;UNKNOWN&quot;;IF([.W198]&lt;&gt;&quot;REVIEW ELIGIBLE — NO AUTHORITY&quot;;&quot;BLOCKED — OUTCOME ASSERTED WITHOUT REVIEW ELIGIBILITY&quot;;IF(OR([.Y198]=&quot;REVIEWED — NO AUTHORITY&quot;;[.Y198]=&quot;REVIEW DEFERRED&quot;;[.Y19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199]=&quot;&quot;;IF(AND([.L199]=&quot;&quot;;[.N199]=&quot;&quot;);&quot;UNKNOWN&quot;;&quot;CONTRADICTION&quot;);IF([.M199]=&quot;UNMATCHED&quot;;IF(AND([.L199]=&quot;&quot;;[.N199]=&quot;&quot;);&quot;CLEAR&quot;;&quot;CONTRADICTION&quot;);IF([.M199]=&quot;SINGLE_SALE_LINKED&quot;;IF(AND([.L199]&lt;&gt;&quot;&quot;;[.N199]=&quot;&quot;);&quot;CLEAR&quot;;&quot;CONTRADICTION&quot;);IF([.M199]=&quot;MULTI_SALE_PENDING_ALLOCATION&quot;;IF([.L199]=&quot;&quot;;&quot;CLEAR&quot;;&quot;CONTRADICTION&quot;);IF([.M199]=&quot;ALLOCATED&quot;;IF(AND([.L199]=&quot;&quot;;[.N199]&lt;&gt;&quot;&quot;);&quot;CLEAR&quot;;&quot;CONTRADICTION&quot;);&quot;CONTRADICTION&quot;)))))">
            <text:p>UNKNOWN</text:p>
          </table:table-cell>
          <table:table-cell office:value-type="string" table:formula="of:=IF([.S199]=&quot;UNKNOWN&quot;;&quot;NO ACTION — linkage status is UNKNOWN / not asserted&quot;;IF([.S199]=&quot;CLEAR&quot;;&quot;NO CONTRADICTION — preserve evidence as entered&quot;;IF([.M199]=&quot;&quot;;&quot;REVIEW LINKAGE STATUS — identifiers are present while status is UNKNOWN&quot;;IF([.M199]=&quot;UNMATCHED&quot;;&quot;REMOVE LINKAGE IDENTIFIERS OR CORRECT LINKAGE STATUS&quot;;IF([.M199]=&quot;SINGLE_SALE_LINKED&quot;;&quot;REQUIRE LINKED SALE ID AND NO ALLOCATION GROUP ID&quot;;IF([.M199]=&quot;MULTI_SALE_PENDING_ALLOCATION&quot;;&quot;REMOVE LINKED SALE ID OR CORRECT LINKAGE STATUS&quot;;IF([.M199]=&quot;ALLOCATED&quot;;&quot;REQUIRE ALLOCATION GROUP ID AND NO LINKED SALE ID&quot;;&quot;REVIEW LINKAGE EVIDENCE — NO AUTHORITY CREATED&quot;)))))))">
            <text:p>NO ACTION — linkage status is UNKNOWN / not asserted</text:p>
          </table:table-cell>
          <table:table-cell office:value-type="string" table:formula="of:=IF([.S199]=&quot;CONTRADICTION&quot;;&quot;BLOCKED&quot;;IF([.S199]=&quot;UNKNOWN&quot;;&quot;UNKNOWN&quot;;IF([.S199]=&quot;CLEAR&quot;;IF(OR([.O199]=&quot;&quot;;[.P199]=&quot;&quot;);&quot;UNKNOWN&quot;;&quot;READY FOR REVIEW&quot;);&quot;BLOCKED&quot;)))">
            <text:p>UNKNOWN</text:p>
          </table:table-cell>
          <table:table-cell office:value-type="string" table:formula="of:=IF([.U199]=&quot;UNKNOWN&quot;;&quot;COMPLETE OR ASSERT REQUIRED EVIDENCE BEFORE REVIEW&quot;;IF([.U199]=&quot;BLOCKED&quot;;&quot;RESOLVE CONTRADICTION BEFORE REVIEW — NO AUTHORITY CREATED&quot;;IF([.U19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199]=&quot;READY FOR REVIEW&quot;;&quot;REVIEW ELIGIBLE — NO AUTHORITY&quot;;IF(OR([.U199]=&quot;UNKNOWN&quot;;[.U199]=&quot;BLOCKED&quot;);&quot;NOT REVIEW ELIGIBLE&quot;;&quot;NOT REVIEW ELIGIBLE&quot;))">
            <text:p>NOT REVIEW ELIGIBLE</text:p>
          </table:table-cell>
          <table:table-cell office:value-type="string" table:formula="of:=IF([.W199]=&quot;NOT REVIEW ELIGIBLE&quot;;&quot;DO NOT BEGIN SETTLEMENT REVIEW — RESOLVE READINESS OR CONTRADICTION CONDITIONS&quot;;IF([.W19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199]=&quot;&quot;;&quot;UNKNOWN&quot;;IF([.W199]&lt;&gt;&quot;REVIEW ELIGIBLE — NO AUTHORITY&quot;;&quot;BLOCKED — OUTCOME ASSERTED WITHOUT REVIEW ELIGIBILITY&quot;;IF(OR([.Y199]=&quot;REVIEWED — NO AUTHORITY&quot;;[.Y199]=&quot;REVIEW DEFERRED&quot;;[.Y19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0]=&quot;&quot;;IF(AND([.L200]=&quot;&quot;;[.N200]=&quot;&quot;);&quot;UNKNOWN&quot;;&quot;CONTRADICTION&quot;);IF([.M200]=&quot;UNMATCHED&quot;;IF(AND([.L200]=&quot;&quot;;[.N200]=&quot;&quot;);&quot;CLEAR&quot;;&quot;CONTRADICTION&quot;);IF([.M200]=&quot;SINGLE_SALE_LINKED&quot;;IF(AND([.L200]&lt;&gt;&quot;&quot;;[.N200]=&quot;&quot;);&quot;CLEAR&quot;;&quot;CONTRADICTION&quot;);IF([.M200]=&quot;MULTI_SALE_PENDING_ALLOCATION&quot;;IF([.L200]=&quot;&quot;;&quot;CLEAR&quot;;&quot;CONTRADICTION&quot;);IF([.M200]=&quot;ALLOCATED&quot;;IF(AND([.L200]=&quot;&quot;;[.N200]&lt;&gt;&quot;&quot;);&quot;CLEAR&quot;;&quot;CONTRADICTION&quot;);&quot;CONTRADICTION&quot;)))))">
            <text:p>UNKNOWN</text:p>
          </table:table-cell>
          <table:table-cell office:value-type="string" table:formula="of:=IF([.S200]=&quot;UNKNOWN&quot;;&quot;NO ACTION — linkage status is UNKNOWN / not asserted&quot;;IF([.S200]=&quot;CLEAR&quot;;&quot;NO CONTRADICTION — preserve evidence as entered&quot;;IF([.M200]=&quot;&quot;;&quot;REVIEW LINKAGE STATUS — identifiers are present while status is UNKNOWN&quot;;IF([.M200]=&quot;UNMATCHED&quot;;&quot;REMOVE LINKAGE IDENTIFIERS OR CORRECT LINKAGE STATUS&quot;;IF([.M200]=&quot;SINGLE_SALE_LINKED&quot;;&quot;REQUIRE LINKED SALE ID AND NO ALLOCATION GROUP ID&quot;;IF([.M200]=&quot;MULTI_SALE_PENDING_ALLOCATION&quot;;&quot;REMOVE LINKED SALE ID OR CORRECT LINKAGE STATUS&quot;;IF([.M200]=&quot;ALLOCATED&quot;;&quot;REQUIRE ALLOCATION GROUP ID AND NO LINKED SALE ID&quot;;&quot;REVIEW LINKAGE EVIDENCE — NO AUTHORITY CREATED&quot;)))))))">
            <text:p>NO ACTION — linkage status is UNKNOWN / not asserted</text:p>
          </table:table-cell>
          <table:table-cell office:value-type="string" table:formula="of:=IF([.S200]=&quot;CONTRADICTION&quot;;&quot;BLOCKED&quot;;IF([.S200]=&quot;UNKNOWN&quot;;&quot;UNKNOWN&quot;;IF([.S200]=&quot;CLEAR&quot;;IF(OR([.O200]=&quot;&quot;;[.P200]=&quot;&quot;);&quot;UNKNOWN&quot;;&quot;READY FOR REVIEW&quot;);&quot;BLOCKED&quot;)))">
            <text:p>UNKNOWN</text:p>
          </table:table-cell>
          <table:table-cell office:value-type="string" table:formula="of:=IF([.U200]=&quot;UNKNOWN&quot;;&quot;COMPLETE OR ASSERT REQUIRED EVIDENCE BEFORE REVIEW&quot;;IF([.U200]=&quot;BLOCKED&quot;;&quot;RESOLVE CONTRADICTION BEFORE REVIEW — NO AUTHORITY CREATED&quot;;IF([.U20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0]=&quot;READY FOR REVIEW&quot;;&quot;REVIEW ELIGIBLE — NO AUTHORITY&quot;;IF(OR([.U200]=&quot;UNKNOWN&quot;;[.U200]=&quot;BLOCKED&quot;);&quot;NOT REVIEW ELIGIBLE&quot;;&quot;NOT REVIEW ELIGIBLE&quot;))">
            <text:p>NOT REVIEW ELIGIBLE</text:p>
          </table:table-cell>
          <table:table-cell office:value-type="string" table:formula="of:=IF([.W200]=&quot;NOT REVIEW ELIGIBLE&quot;;&quot;DO NOT BEGIN SETTLEMENT REVIEW — RESOLVE READINESS OR CONTRADICTION CONDITIONS&quot;;IF([.W20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0]=&quot;&quot;;&quot;UNKNOWN&quot;;IF([.W200]&lt;&gt;&quot;REVIEW ELIGIBLE — NO AUTHORITY&quot;;&quot;BLOCKED — OUTCOME ASSERTED WITHOUT REVIEW ELIGIBILITY&quot;;IF(OR([.Y200]=&quot;REVIEWED — NO AUTHORITY&quot;;[.Y200]=&quot;REVIEW DEFERRED&quot;;[.Y20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1]=&quot;&quot;;IF(AND([.L201]=&quot;&quot;;[.N201]=&quot;&quot;);&quot;UNKNOWN&quot;;&quot;CONTRADICTION&quot;);IF([.M201]=&quot;UNMATCHED&quot;;IF(AND([.L201]=&quot;&quot;;[.N201]=&quot;&quot;);&quot;CLEAR&quot;;&quot;CONTRADICTION&quot;);IF([.M201]=&quot;SINGLE_SALE_LINKED&quot;;IF(AND([.L201]&lt;&gt;&quot;&quot;;[.N201]=&quot;&quot;);&quot;CLEAR&quot;;&quot;CONTRADICTION&quot;);IF([.M201]=&quot;MULTI_SALE_PENDING_ALLOCATION&quot;;IF([.L201]=&quot;&quot;;&quot;CLEAR&quot;;&quot;CONTRADICTION&quot;);IF([.M201]=&quot;ALLOCATED&quot;;IF(AND([.L201]=&quot;&quot;;[.N201]&lt;&gt;&quot;&quot;);&quot;CLEAR&quot;;&quot;CONTRADICTION&quot;);&quot;CONTRADICTION&quot;)))))">
            <text:p>UNKNOWN</text:p>
          </table:table-cell>
          <table:table-cell office:value-type="string" table:formula="of:=IF([.S201]=&quot;UNKNOWN&quot;;&quot;NO ACTION — linkage status is UNKNOWN / not asserted&quot;;IF([.S201]=&quot;CLEAR&quot;;&quot;NO CONTRADICTION — preserve evidence as entered&quot;;IF([.M201]=&quot;&quot;;&quot;REVIEW LINKAGE STATUS — identifiers are present while status is UNKNOWN&quot;;IF([.M201]=&quot;UNMATCHED&quot;;&quot;REMOVE LINKAGE IDENTIFIERS OR CORRECT LINKAGE STATUS&quot;;IF([.M201]=&quot;SINGLE_SALE_LINKED&quot;;&quot;REQUIRE LINKED SALE ID AND NO ALLOCATION GROUP ID&quot;;IF([.M201]=&quot;MULTI_SALE_PENDING_ALLOCATION&quot;;&quot;REMOVE LINKED SALE ID OR CORRECT LINKAGE STATUS&quot;;IF([.M201]=&quot;ALLOCATED&quot;;&quot;REQUIRE ALLOCATION GROUP ID AND NO LINKED SALE ID&quot;;&quot;REVIEW LINKAGE EVIDENCE — NO AUTHORITY CREATED&quot;)))))))">
            <text:p>NO ACTION — linkage status is UNKNOWN / not asserted</text:p>
          </table:table-cell>
          <table:table-cell office:value-type="string" table:formula="of:=IF([.S201]=&quot;CONTRADICTION&quot;;&quot;BLOCKED&quot;;IF([.S201]=&quot;UNKNOWN&quot;;&quot;UNKNOWN&quot;;IF([.S201]=&quot;CLEAR&quot;;IF(OR([.O201]=&quot;&quot;;[.P201]=&quot;&quot;);&quot;UNKNOWN&quot;;&quot;READY FOR REVIEW&quot;);&quot;BLOCKED&quot;)))">
            <text:p>UNKNOWN</text:p>
          </table:table-cell>
          <table:table-cell office:value-type="string" table:formula="of:=IF([.U201]=&quot;UNKNOWN&quot;;&quot;COMPLETE OR ASSERT REQUIRED EVIDENCE BEFORE REVIEW&quot;;IF([.U201]=&quot;BLOCKED&quot;;&quot;RESOLVE CONTRADICTION BEFORE REVIEW — NO AUTHORITY CREATED&quot;;IF([.U20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1]=&quot;READY FOR REVIEW&quot;;&quot;REVIEW ELIGIBLE — NO AUTHORITY&quot;;IF(OR([.U201]=&quot;UNKNOWN&quot;;[.U201]=&quot;BLOCKED&quot;);&quot;NOT REVIEW ELIGIBLE&quot;;&quot;NOT REVIEW ELIGIBLE&quot;))">
            <text:p>NOT REVIEW ELIGIBLE</text:p>
          </table:table-cell>
          <table:table-cell office:value-type="string" table:formula="of:=IF([.W201]=&quot;NOT REVIEW ELIGIBLE&quot;;&quot;DO NOT BEGIN SETTLEMENT REVIEW — RESOLVE READINESS OR CONTRADICTION CONDITIONS&quot;;IF([.W20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1]=&quot;&quot;;&quot;UNKNOWN&quot;;IF([.W201]&lt;&gt;&quot;REVIEW ELIGIBLE — NO AUTHORITY&quot;;&quot;BLOCKED — OUTCOME ASSERTED WITHOUT REVIEW ELIGIBILITY&quot;;IF(OR([.Y201]=&quot;REVIEWED — NO AUTHORITY&quot;;[.Y201]=&quot;REVIEW DEFERRED&quot;;[.Y201]=&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2]=&quot;&quot;;IF(AND([.L202]=&quot;&quot;;[.N202]=&quot;&quot;);&quot;UNKNOWN&quot;;&quot;CONTRADICTION&quot;);IF([.M202]=&quot;UNMATCHED&quot;;IF(AND([.L202]=&quot;&quot;;[.N202]=&quot;&quot;);&quot;CLEAR&quot;;&quot;CONTRADICTION&quot;);IF([.M202]=&quot;SINGLE_SALE_LINKED&quot;;IF(AND([.L202]&lt;&gt;&quot;&quot;;[.N202]=&quot;&quot;);&quot;CLEAR&quot;;&quot;CONTRADICTION&quot;);IF([.M202]=&quot;MULTI_SALE_PENDING_ALLOCATION&quot;;IF([.L202]=&quot;&quot;;&quot;CLEAR&quot;;&quot;CONTRADICTION&quot;);IF([.M202]=&quot;ALLOCATED&quot;;IF(AND([.L202]=&quot;&quot;;[.N202]&lt;&gt;&quot;&quot;);&quot;CLEAR&quot;;&quot;CONTRADICTION&quot;);&quot;CONTRADICTION&quot;)))))">
            <text:p>UNKNOWN</text:p>
          </table:table-cell>
          <table:table-cell office:value-type="string" table:formula="of:=IF([.S202]=&quot;UNKNOWN&quot;;&quot;NO ACTION — linkage status is UNKNOWN / not asserted&quot;;IF([.S202]=&quot;CLEAR&quot;;&quot;NO CONTRADICTION — preserve evidence as entered&quot;;IF([.M202]=&quot;&quot;;&quot;REVIEW LINKAGE STATUS — identifiers are present while status is UNKNOWN&quot;;IF([.M202]=&quot;UNMATCHED&quot;;&quot;REMOVE LINKAGE IDENTIFIERS OR CORRECT LINKAGE STATUS&quot;;IF([.M202]=&quot;SINGLE_SALE_LINKED&quot;;&quot;REQUIRE LINKED SALE ID AND NO ALLOCATION GROUP ID&quot;;IF([.M202]=&quot;MULTI_SALE_PENDING_ALLOCATION&quot;;&quot;REMOVE LINKED SALE ID OR CORRECT LINKAGE STATUS&quot;;IF([.M202]=&quot;ALLOCATED&quot;;&quot;REQUIRE ALLOCATION GROUP ID AND NO LINKED SALE ID&quot;;&quot;REVIEW LINKAGE EVIDENCE — NO AUTHORITY CREATED&quot;)))))))">
            <text:p>NO ACTION — linkage status is UNKNOWN / not asserted</text:p>
          </table:table-cell>
          <table:table-cell office:value-type="string" table:formula="of:=IF([.S202]=&quot;CONTRADICTION&quot;;&quot;BLOCKED&quot;;IF([.S202]=&quot;UNKNOWN&quot;;&quot;UNKNOWN&quot;;IF([.S202]=&quot;CLEAR&quot;;IF(OR([.O202]=&quot;&quot;;[.P202]=&quot;&quot;);&quot;UNKNOWN&quot;;&quot;READY FOR REVIEW&quot;);&quot;BLOCKED&quot;)))">
            <text:p>UNKNOWN</text:p>
          </table:table-cell>
          <table:table-cell office:value-type="string" table:formula="of:=IF([.U202]=&quot;UNKNOWN&quot;;&quot;COMPLETE OR ASSERT REQUIRED EVIDENCE BEFORE REVIEW&quot;;IF([.U202]=&quot;BLOCKED&quot;;&quot;RESOLVE CONTRADICTION BEFORE REVIEW — NO AUTHORITY CREATED&quot;;IF([.U20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2]=&quot;READY FOR REVIEW&quot;;&quot;REVIEW ELIGIBLE — NO AUTHORITY&quot;;IF(OR([.U202]=&quot;UNKNOWN&quot;;[.U202]=&quot;BLOCKED&quot;);&quot;NOT REVIEW ELIGIBLE&quot;;&quot;NOT REVIEW ELIGIBLE&quot;))">
            <text:p>NOT REVIEW ELIGIBLE</text:p>
          </table:table-cell>
          <table:table-cell office:value-type="string" table:formula="of:=IF([.W202]=&quot;NOT REVIEW ELIGIBLE&quot;;&quot;DO NOT BEGIN SETTLEMENT REVIEW — RESOLVE READINESS OR CONTRADICTION CONDITIONS&quot;;IF([.W20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2]=&quot;&quot;;&quot;UNKNOWN&quot;;IF([.W202]&lt;&gt;&quot;REVIEW ELIGIBLE — NO AUTHORITY&quot;;&quot;BLOCKED — OUTCOME ASSERTED WITHOUT REVIEW ELIGIBILITY&quot;;IF(OR([.Y202]=&quot;REVIEWED — NO AUTHORITY&quot;;[.Y202]=&quot;REVIEW DEFERRED&quot;;[.Y20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3]=&quot;&quot;;IF(AND([.L203]=&quot;&quot;;[.N203]=&quot;&quot;);&quot;UNKNOWN&quot;;&quot;CONTRADICTION&quot;);IF([.M203]=&quot;UNMATCHED&quot;;IF(AND([.L203]=&quot;&quot;;[.N203]=&quot;&quot;);&quot;CLEAR&quot;;&quot;CONTRADICTION&quot;);IF([.M203]=&quot;SINGLE_SALE_LINKED&quot;;IF(AND([.L203]&lt;&gt;&quot;&quot;;[.N203]=&quot;&quot;);&quot;CLEAR&quot;;&quot;CONTRADICTION&quot;);IF([.M203]=&quot;MULTI_SALE_PENDING_ALLOCATION&quot;;IF([.L203]=&quot;&quot;;&quot;CLEAR&quot;;&quot;CONTRADICTION&quot;);IF([.M203]=&quot;ALLOCATED&quot;;IF(AND([.L203]=&quot;&quot;;[.N203]&lt;&gt;&quot;&quot;);&quot;CLEAR&quot;;&quot;CONTRADICTION&quot;);&quot;CONTRADICTION&quot;)))))">
            <text:p>UNKNOWN</text:p>
          </table:table-cell>
          <table:table-cell office:value-type="string" table:formula="of:=IF([.S203]=&quot;UNKNOWN&quot;;&quot;NO ACTION — linkage status is UNKNOWN / not asserted&quot;;IF([.S203]=&quot;CLEAR&quot;;&quot;NO CONTRADICTION — preserve evidence as entered&quot;;IF([.M203]=&quot;&quot;;&quot;REVIEW LINKAGE STATUS — identifiers are present while status is UNKNOWN&quot;;IF([.M203]=&quot;UNMATCHED&quot;;&quot;REMOVE LINKAGE IDENTIFIERS OR CORRECT LINKAGE STATUS&quot;;IF([.M203]=&quot;SINGLE_SALE_LINKED&quot;;&quot;REQUIRE LINKED SALE ID AND NO ALLOCATION GROUP ID&quot;;IF([.M203]=&quot;MULTI_SALE_PENDING_ALLOCATION&quot;;&quot;REMOVE LINKED SALE ID OR CORRECT LINKAGE STATUS&quot;;IF([.M203]=&quot;ALLOCATED&quot;;&quot;REQUIRE ALLOCATION GROUP ID AND NO LINKED SALE ID&quot;;&quot;REVIEW LINKAGE EVIDENCE — NO AUTHORITY CREATED&quot;)))))))">
            <text:p>NO ACTION — linkage status is UNKNOWN / not asserted</text:p>
          </table:table-cell>
          <table:table-cell office:value-type="string" table:formula="of:=IF([.S203]=&quot;CONTRADICTION&quot;;&quot;BLOCKED&quot;;IF([.S203]=&quot;UNKNOWN&quot;;&quot;UNKNOWN&quot;;IF([.S203]=&quot;CLEAR&quot;;IF(OR([.O203]=&quot;&quot;;[.P203]=&quot;&quot;);&quot;UNKNOWN&quot;;&quot;READY FOR REVIEW&quot;);&quot;BLOCKED&quot;)))">
            <text:p>UNKNOWN</text:p>
          </table:table-cell>
          <table:table-cell office:value-type="string" table:formula="of:=IF([.U203]=&quot;UNKNOWN&quot;;&quot;COMPLETE OR ASSERT REQUIRED EVIDENCE BEFORE REVIEW&quot;;IF([.U203]=&quot;BLOCKED&quot;;&quot;RESOLVE CONTRADICTION BEFORE REVIEW — NO AUTHORITY CREATED&quot;;IF([.U20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3]=&quot;READY FOR REVIEW&quot;;&quot;REVIEW ELIGIBLE — NO AUTHORITY&quot;;IF(OR([.U203]=&quot;UNKNOWN&quot;;[.U203]=&quot;BLOCKED&quot;);&quot;NOT REVIEW ELIGIBLE&quot;;&quot;NOT REVIEW ELIGIBLE&quot;))">
            <text:p>NOT REVIEW ELIGIBLE</text:p>
          </table:table-cell>
          <table:table-cell office:value-type="string" table:formula="of:=IF([.W203]=&quot;NOT REVIEW ELIGIBLE&quot;;&quot;DO NOT BEGIN SETTLEMENT REVIEW — RESOLVE READINESS OR CONTRADICTION CONDITIONS&quot;;IF([.W20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3]=&quot;&quot;;&quot;UNKNOWN&quot;;IF([.W203]&lt;&gt;&quot;REVIEW ELIGIBLE — NO AUTHORITY&quot;;&quot;BLOCKED — OUTCOME ASSERTED WITHOUT REVIEW ELIGIBILITY&quot;;IF(OR([.Y203]=&quot;REVIEWED — NO AUTHORITY&quot;;[.Y203]=&quot;REVIEW DEFERRED&quot;;[.Y20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4]=&quot;&quot;;IF(AND([.L204]=&quot;&quot;;[.N204]=&quot;&quot;);&quot;UNKNOWN&quot;;&quot;CONTRADICTION&quot;);IF([.M204]=&quot;UNMATCHED&quot;;IF(AND([.L204]=&quot;&quot;;[.N204]=&quot;&quot;);&quot;CLEAR&quot;;&quot;CONTRADICTION&quot;);IF([.M204]=&quot;SINGLE_SALE_LINKED&quot;;IF(AND([.L204]&lt;&gt;&quot;&quot;;[.N204]=&quot;&quot;);&quot;CLEAR&quot;;&quot;CONTRADICTION&quot;);IF([.M204]=&quot;MULTI_SALE_PENDING_ALLOCATION&quot;;IF([.L204]=&quot;&quot;;&quot;CLEAR&quot;;&quot;CONTRADICTION&quot;);IF([.M204]=&quot;ALLOCATED&quot;;IF(AND([.L204]=&quot;&quot;;[.N204]&lt;&gt;&quot;&quot;);&quot;CLEAR&quot;;&quot;CONTRADICTION&quot;);&quot;CONTRADICTION&quot;)))))">
            <text:p>UNKNOWN</text:p>
          </table:table-cell>
          <table:table-cell office:value-type="string" table:formula="of:=IF([.S204]=&quot;UNKNOWN&quot;;&quot;NO ACTION — linkage status is UNKNOWN / not asserted&quot;;IF([.S204]=&quot;CLEAR&quot;;&quot;NO CONTRADICTION — preserve evidence as entered&quot;;IF([.M204]=&quot;&quot;;&quot;REVIEW LINKAGE STATUS — identifiers are present while status is UNKNOWN&quot;;IF([.M204]=&quot;UNMATCHED&quot;;&quot;REMOVE LINKAGE IDENTIFIERS OR CORRECT LINKAGE STATUS&quot;;IF([.M204]=&quot;SINGLE_SALE_LINKED&quot;;&quot;REQUIRE LINKED SALE ID AND NO ALLOCATION GROUP ID&quot;;IF([.M204]=&quot;MULTI_SALE_PENDING_ALLOCATION&quot;;&quot;REMOVE LINKED SALE ID OR CORRECT LINKAGE STATUS&quot;;IF([.M204]=&quot;ALLOCATED&quot;;&quot;REQUIRE ALLOCATION GROUP ID AND NO LINKED SALE ID&quot;;&quot;REVIEW LINKAGE EVIDENCE — NO AUTHORITY CREATED&quot;)))))))">
            <text:p>NO ACTION — linkage status is UNKNOWN / not asserted</text:p>
          </table:table-cell>
          <table:table-cell office:value-type="string" table:formula="of:=IF([.S204]=&quot;CONTRADICTION&quot;;&quot;BLOCKED&quot;;IF([.S204]=&quot;UNKNOWN&quot;;&quot;UNKNOWN&quot;;IF([.S204]=&quot;CLEAR&quot;;IF(OR([.O204]=&quot;&quot;;[.P204]=&quot;&quot;);&quot;UNKNOWN&quot;;&quot;READY FOR REVIEW&quot;);&quot;BLOCKED&quot;)))">
            <text:p>UNKNOWN</text:p>
          </table:table-cell>
          <table:table-cell office:value-type="string" table:formula="of:=IF([.U204]=&quot;UNKNOWN&quot;;&quot;COMPLETE OR ASSERT REQUIRED EVIDENCE BEFORE REVIEW&quot;;IF([.U204]=&quot;BLOCKED&quot;;&quot;RESOLVE CONTRADICTION BEFORE REVIEW — NO AUTHORITY CREATED&quot;;IF([.U20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4]=&quot;READY FOR REVIEW&quot;;&quot;REVIEW ELIGIBLE — NO AUTHORITY&quot;;IF(OR([.U204]=&quot;UNKNOWN&quot;;[.U204]=&quot;BLOCKED&quot;);&quot;NOT REVIEW ELIGIBLE&quot;;&quot;NOT REVIEW ELIGIBLE&quot;))">
            <text:p>NOT REVIEW ELIGIBLE</text:p>
          </table:table-cell>
          <table:table-cell office:value-type="string" table:formula="of:=IF([.W204]=&quot;NOT REVIEW ELIGIBLE&quot;;&quot;DO NOT BEGIN SETTLEMENT REVIEW — RESOLVE READINESS OR CONTRADICTION CONDITIONS&quot;;IF([.W20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4]=&quot;&quot;;&quot;UNKNOWN&quot;;IF([.W204]&lt;&gt;&quot;REVIEW ELIGIBLE — NO AUTHORITY&quot;;&quot;BLOCKED — OUTCOME ASSERTED WITHOUT REVIEW ELIGIBILITY&quot;;IF(OR([.Y204]=&quot;REVIEWED — NO AUTHORITY&quot;;[.Y204]=&quot;REVIEW DEFERRED&quot;;[.Y20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5]=&quot;&quot;;IF(AND([.L205]=&quot;&quot;;[.N205]=&quot;&quot;);&quot;UNKNOWN&quot;;&quot;CONTRADICTION&quot;);IF([.M205]=&quot;UNMATCHED&quot;;IF(AND([.L205]=&quot;&quot;;[.N205]=&quot;&quot;);&quot;CLEAR&quot;;&quot;CONTRADICTION&quot;);IF([.M205]=&quot;SINGLE_SALE_LINKED&quot;;IF(AND([.L205]&lt;&gt;&quot;&quot;;[.N205]=&quot;&quot;);&quot;CLEAR&quot;;&quot;CONTRADICTION&quot;);IF([.M205]=&quot;MULTI_SALE_PENDING_ALLOCATION&quot;;IF([.L205]=&quot;&quot;;&quot;CLEAR&quot;;&quot;CONTRADICTION&quot;);IF([.M205]=&quot;ALLOCATED&quot;;IF(AND([.L205]=&quot;&quot;;[.N205]&lt;&gt;&quot;&quot;);&quot;CLEAR&quot;;&quot;CONTRADICTION&quot;);&quot;CONTRADICTION&quot;)))))">
            <text:p>UNKNOWN</text:p>
          </table:table-cell>
          <table:table-cell office:value-type="string" table:formula="of:=IF([.S205]=&quot;UNKNOWN&quot;;&quot;NO ACTION — linkage status is UNKNOWN / not asserted&quot;;IF([.S205]=&quot;CLEAR&quot;;&quot;NO CONTRADICTION — preserve evidence as entered&quot;;IF([.M205]=&quot;&quot;;&quot;REVIEW LINKAGE STATUS — identifiers are present while status is UNKNOWN&quot;;IF([.M205]=&quot;UNMATCHED&quot;;&quot;REMOVE LINKAGE IDENTIFIERS OR CORRECT LINKAGE STATUS&quot;;IF([.M205]=&quot;SINGLE_SALE_LINKED&quot;;&quot;REQUIRE LINKED SALE ID AND NO ALLOCATION GROUP ID&quot;;IF([.M205]=&quot;MULTI_SALE_PENDING_ALLOCATION&quot;;&quot;REMOVE LINKED SALE ID OR CORRECT LINKAGE STATUS&quot;;IF([.M205]=&quot;ALLOCATED&quot;;&quot;REQUIRE ALLOCATION GROUP ID AND NO LINKED SALE ID&quot;;&quot;REVIEW LINKAGE EVIDENCE — NO AUTHORITY CREATED&quot;)))))))">
            <text:p>NO ACTION — linkage status is UNKNOWN / not asserted</text:p>
          </table:table-cell>
          <table:table-cell office:value-type="string" table:formula="of:=IF([.S205]=&quot;CONTRADICTION&quot;;&quot;BLOCKED&quot;;IF([.S205]=&quot;UNKNOWN&quot;;&quot;UNKNOWN&quot;;IF([.S205]=&quot;CLEAR&quot;;IF(OR([.O205]=&quot;&quot;;[.P205]=&quot;&quot;);&quot;UNKNOWN&quot;;&quot;READY FOR REVIEW&quot;);&quot;BLOCKED&quot;)))">
            <text:p>UNKNOWN</text:p>
          </table:table-cell>
          <table:table-cell office:value-type="string" table:formula="of:=IF([.U205]=&quot;UNKNOWN&quot;;&quot;COMPLETE OR ASSERT REQUIRED EVIDENCE BEFORE REVIEW&quot;;IF([.U205]=&quot;BLOCKED&quot;;&quot;RESOLVE CONTRADICTION BEFORE REVIEW — NO AUTHORITY CREATED&quot;;IF([.U20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5]=&quot;READY FOR REVIEW&quot;;&quot;REVIEW ELIGIBLE — NO AUTHORITY&quot;;IF(OR([.U205]=&quot;UNKNOWN&quot;;[.U205]=&quot;BLOCKED&quot;);&quot;NOT REVIEW ELIGIBLE&quot;;&quot;NOT REVIEW ELIGIBLE&quot;))">
            <text:p>NOT REVIEW ELIGIBLE</text:p>
          </table:table-cell>
          <table:table-cell office:value-type="string" table:formula="of:=IF([.W205]=&quot;NOT REVIEW ELIGIBLE&quot;;&quot;DO NOT BEGIN SETTLEMENT REVIEW — RESOLVE READINESS OR CONTRADICTION CONDITIONS&quot;;IF([.W20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5]=&quot;&quot;;&quot;UNKNOWN&quot;;IF([.W205]&lt;&gt;&quot;REVIEW ELIGIBLE — NO AUTHORITY&quot;;&quot;BLOCKED — OUTCOME ASSERTED WITHOUT REVIEW ELIGIBILITY&quot;;IF(OR([.Y205]=&quot;REVIEWED — NO AUTHORITY&quot;;[.Y205]=&quot;REVIEW DEFERRED&quot;;[.Y20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6]=&quot;&quot;;IF(AND([.L206]=&quot;&quot;;[.N206]=&quot;&quot;);&quot;UNKNOWN&quot;;&quot;CONTRADICTION&quot;);IF([.M206]=&quot;UNMATCHED&quot;;IF(AND([.L206]=&quot;&quot;;[.N206]=&quot;&quot;);&quot;CLEAR&quot;;&quot;CONTRADICTION&quot;);IF([.M206]=&quot;SINGLE_SALE_LINKED&quot;;IF(AND([.L206]&lt;&gt;&quot;&quot;;[.N206]=&quot;&quot;);&quot;CLEAR&quot;;&quot;CONTRADICTION&quot;);IF([.M206]=&quot;MULTI_SALE_PENDING_ALLOCATION&quot;;IF([.L206]=&quot;&quot;;&quot;CLEAR&quot;;&quot;CONTRADICTION&quot;);IF([.M206]=&quot;ALLOCATED&quot;;IF(AND([.L206]=&quot;&quot;;[.N206]&lt;&gt;&quot;&quot;);&quot;CLEAR&quot;;&quot;CONTRADICTION&quot;);&quot;CONTRADICTION&quot;)))))">
            <text:p>UNKNOWN</text:p>
          </table:table-cell>
          <table:table-cell office:value-type="string" table:formula="of:=IF([.S206]=&quot;UNKNOWN&quot;;&quot;NO ACTION — linkage status is UNKNOWN / not asserted&quot;;IF([.S206]=&quot;CLEAR&quot;;&quot;NO CONTRADICTION — preserve evidence as entered&quot;;IF([.M206]=&quot;&quot;;&quot;REVIEW LINKAGE STATUS — identifiers are present while status is UNKNOWN&quot;;IF([.M206]=&quot;UNMATCHED&quot;;&quot;REMOVE LINKAGE IDENTIFIERS OR CORRECT LINKAGE STATUS&quot;;IF([.M206]=&quot;SINGLE_SALE_LINKED&quot;;&quot;REQUIRE LINKED SALE ID AND NO ALLOCATION GROUP ID&quot;;IF([.M206]=&quot;MULTI_SALE_PENDING_ALLOCATION&quot;;&quot;REMOVE LINKED SALE ID OR CORRECT LINKAGE STATUS&quot;;IF([.M206]=&quot;ALLOCATED&quot;;&quot;REQUIRE ALLOCATION GROUP ID AND NO LINKED SALE ID&quot;;&quot;REVIEW LINKAGE EVIDENCE — NO AUTHORITY CREATED&quot;)))))))">
            <text:p>NO ACTION — linkage status is UNKNOWN / not asserted</text:p>
          </table:table-cell>
          <table:table-cell office:value-type="string" table:formula="of:=IF([.S206]=&quot;CONTRADICTION&quot;;&quot;BLOCKED&quot;;IF([.S206]=&quot;UNKNOWN&quot;;&quot;UNKNOWN&quot;;IF([.S206]=&quot;CLEAR&quot;;IF(OR([.O206]=&quot;&quot;;[.P206]=&quot;&quot;);&quot;UNKNOWN&quot;;&quot;READY FOR REVIEW&quot;);&quot;BLOCKED&quot;)))">
            <text:p>UNKNOWN</text:p>
          </table:table-cell>
          <table:table-cell office:value-type="string" table:formula="of:=IF([.U206]=&quot;UNKNOWN&quot;;&quot;COMPLETE OR ASSERT REQUIRED EVIDENCE BEFORE REVIEW&quot;;IF([.U206]=&quot;BLOCKED&quot;;&quot;RESOLVE CONTRADICTION BEFORE REVIEW — NO AUTHORITY CREATED&quot;;IF([.U20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6]=&quot;READY FOR REVIEW&quot;;&quot;REVIEW ELIGIBLE — NO AUTHORITY&quot;;IF(OR([.U206]=&quot;UNKNOWN&quot;;[.U206]=&quot;BLOCKED&quot;);&quot;NOT REVIEW ELIGIBLE&quot;;&quot;NOT REVIEW ELIGIBLE&quot;))">
            <text:p>NOT REVIEW ELIGIBLE</text:p>
          </table:table-cell>
          <table:table-cell office:value-type="string" table:formula="of:=IF([.W206]=&quot;NOT REVIEW ELIGIBLE&quot;;&quot;DO NOT BEGIN SETTLEMENT REVIEW — RESOLVE READINESS OR CONTRADICTION CONDITIONS&quot;;IF([.W20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6]=&quot;&quot;;&quot;UNKNOWN&quot;;IF([.W206]&lt;&gt;&quot;REVIEW ELIGIBLE — NO AUTHORITY&quot;;&quot;BLOCKED — OUTCOME ASSERTED WITHOUT REVIEW ELIGIBILITY&quot;;IF(OR([.Y206]=&quot;REVIEWED — NO AUTHORITY&quot;;[.Y206]=&quot;REVIEW DEFERRED&quot;;[.Y20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7]=&quot;&quot;;IF(AND([.L207]=&quot;&quot;;[.N207]=&quot;&quot;);&quot;UNKNOWN&quot;;&quot;CONTRADICTION&quot;);IF([.M207]=&quot;UNMATCHED&quot;;IF(AND([.L207]=&quot;&quot;;[.N207]=&quot;&quot;);&quot;CLEAR&quot;;&quot;CONTRADICTION&quot;);IF([.M207]=&quot;SINGLE_SALE_LINKED&quot;;IF(AND([.L207]&lt;&gt;&quot;&quot;;[.N207]=&quot;&quot;);&quot;CLEAR&quot;;&quot;CONTRADICTION&quot;);IF([.M207]=&quot;MULTI_SALE_PENDING_ALLOCATION&quot;;IF([.L207]=&quot;&quot;;&quot;CLEAR&quot;;&quot;CONTRADICTION&quot;);IF([.M207]=&quot;ALLOCATED&quot;;IF(AND([.L207]=&quot;&quot;;[.N207]&lt;&gt;&quot;&quot;);&quot;CLEAR&quot;;&quot;CONTRADICTION&quot;);&quot;CONTRADICTION&quot;)))))">
            <text:p>UNKNOWN</text:p>
          </table:table-cell>
          <table:table-cell office:value-type="string" table:formula="of:=IF([.S207]=&quot;UNKNOWN&quot;;&quot;NO ACTION — linkage status is UNKNOWN / not asserted&quot;;IF([.S207]=&quot;CLEAR&quot;;&quot;NO CONTRADICTION — preserve evidence as entered&quot;;IF([.M207]=&quot;&quot;;&quot;REVIEW LINKAGE STATUS — identifiers are present while status is UNKNOWN&quot;;IF([.M207]=&quot;UNMATCHED&quot;;&quot;REMOVE LINKAGE IDENTIFIERS OR CORRECT LINKAGE STATUS&quot;;IF([.M207]=&quot;SINGLE_SALE_LINKED&quot;;&quot;REQUIRE LINKED SALE ID AND NO ALLOCATION GROUP ID&quot;;IF([.M207]=&quot;MULTI_SALE_PENDING_ALLOCATION&quot;;&quot;REMOVE LINKED SALE ID OR CORRECT LINKAGE STATUS&quot;;IF([.M207]=&quot;ALLOCATED&quot;;&quot;REQUIRE ALLOCATION GROUP ID AND NO LINKED SALE ID&quot;;&quot;REVIEW LINKAGE EVIDENCE — NO AUTHORITY CREATED&quot;)))))))">
            <text:p>NO ACTION — linkage status is UNKNOWN / not asserted</text:p>
          </table:table-cell>
          <table:table-cell office:value-type="string" table:formula="of:=IF([.S207]=&quot;CONTRADICTION&quot;;&quot;BLOCKED&quot;;IF([.S207]=&quot;UNKNOWN&quot;;&quot;UNKNOWN&quot;;IF([.S207]=&quot;CLEAR&quot;;IF(OR([.O207]=&quot;&quot;;[.P207]=&quot;&quot;);&quot;UNKNOWN&quot;;&quot;READY FOR REVIEW&quot;);&quot;BLOCKED&quot;)))">
            <text:p>UNKNOWN</text:p>
          </table:table-cell>
          <table:table-cell office:value-type="string" table:formula="of:=IF([.U207]=&quot;UNKNOWN&quot;;&quot;COMPLETE OR ASSERT REQUIRED EVIDENCE BEFORE REVIEW&quot;;IF([.U207]=&quot;BLOCKED&quot;;&quot;RESOLVE CONTRADICTION BEFORE REVIEW — NO AUTHORITY CREATED&quot;;IF([.U20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7]=&quot;READY FOR REVIEW&quot;;&quot;REVIEW ELIGIBLE — NO AUTHORITY&quot;;IF(OR([.U207]=&quot;UNKNOWN&quot;;[.U207]=&quot;BLOCKED&quot;);&quot;NOT REVIEW ELIGIBLE&quot;;&quot;NOT REVIEW ELIGIBLE&quot;))">
            <text:p>NOT REVIEW ELIGIBLE</text:p>
          </table:table-cell>
          <table:table-cell office:value-type="string" table:formula="of:=IF([.W207]=&quot;NOT REVIEW ELIGIBLE&quot;;&quot;DO NOT BEGIN SETTLEMENT REVIEW — RESOLVE READINESS OR CONTRADICTION CONDITIONS&quot;;IF([.W20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7]=&quot;&quot;;&quot;UNKNOWN&quot;;IF([.W207]&lt;&gt;&quot;REVIEW ELIGIBLE — NO AUTHORITY&quot;;&quot;BLOCKED — OUTCOME ASSERTED WITHOUT REVIEW ELIGIBILITY&quot;;IF(OR([.Y207]=&quot;REVIEWED — NO AUTHORITY&quot;;[.Y207]=&quot;REVIEW DEFERRED&quot;;[.Y20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8]=&quot;&quot;;IF(AND([.L208]=&quot;&quot;;[.N208]=&quot;&quot;);&quot;UNKNOWN&quot;;&quot;CONTRADICTION&quot;);IF([.M208]=&quot;UNMATCHED&quot;;IF(AND([.L208]=&quot;&quot;;[.N208]=&quot;&quot;);&quot;CLEAR&quot;;&quot;CONTRADICTION&quot;);IF([.M208]=&quot;SINGLE_SALE_LINKED&quot;;IF(AND([.L208]&lt;&gt;&quot;&quot;;[.N208]=&quot;&quot;);&quot;CLEAR&quot;;&quot;CONTRADICTION&quot;);IF([.M208]=&quot;MULTI_SALE_PENDING_ALLOCATION&quot;;IF([.L208]=&quot;&quot;;&quot;CLEAR&quot;;&quot;CONTRADICTION&quot;);IF([.M208]=&quot;ALLOCATED&quot;;IF(AND([.L208]=&quot;&quot;;[.N208]&lt;&gt;&quot;&quot;);&quot;CLEAR&quot;;&quot;CONTRADICTION&quot;);&quot;CONTRADICTION&quot;)))))">
            <text:p>UNKNOWN</text:p>
          </table:table-cell>
          <table:table-cell office:value-type="string" table:formula="of:=IF([.S208]=&quot;UNKNOWN&quot;;&quot;NO ACTION — linkage status is UNKNOWN / not asserted&quot;;IF([.S208]=&quot;CLEAR&quot;;&quot;NO CONTRADICTION — preserve evidence as entered&quot;;IF([.M208]=&quot;&quot;;&quot;REVIEW LINKAGE STATUS — identifiers are present while status is UNKNOWN&quot;;IF([.M208]=&quot;UNMATCHED&quot;;&quot;REMOVE LINKAGE IDENTIFIERS OR CORRECT LINKAGE STATUS&quot;;IF([.M208]=&quot;SINGLE_SALE_LINKED&quot;;&quot;REQUIRE LINKED SALE ID AND NO ALLOCATION GROUP ID&quot;;IF([.M208]=&quot;MULTI_SALE_PENDING_ALLOCATION&quot;;&quot;REMOVE LINKED SALE ID OR CORRECT LINKAGE STATUS&quot;;IF([.M208]=&quot;ALLOCATED&quot;;&quot;REQUIRE ALLOCATION GROUP ID AND NO LINKED SALE ID&quot;;&quot;REVIEW LINKAGE EVIDENCE — NO AUTHORITY CREATED&quot;)))))))">
            <text:p>NO ACTION — linkage status is UNKNOWN / not asserted</text:p>
          </table:table-cell>
          <table:table-cell office:value-type="string" table:formula="of:=IF([.S208]=&quot;CONTRADICTION&quot;;&quot;BLOCKED&quot;;IF([.S208]=&quot;UNKNOWN&quot;;&quot;UNKNOWN&quot;;IF([.S208]=&quot;CLEAR&quot;;IF(OR([.O208]=&quot;&quot;;[.P208]=&quot;&quot;);&quot;UNKNOWN&quot;;&quot;READY FOR REVIEW&quot;);&quot;BLOCKED&quot;)))">
            <text:p>UNKNOWN</text:p>
          </table:table-cell>
          <table:table-cell office:value-type="string" table:formula="of:=IF([.U208]=&quot;UNKNOWN&quot;;&quot;COMPLETE OR ASSERT REQUIRED EVIDENCE BEFORE REVIEW&quot;;IF([.U208]=&quot;BLOCKED&quot;;&quot;RESOLVE CONTRADICTION BEFORE REVIEW — NO AUTHORITY CREATED&quot;;IF([.U20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8]=&quot;READY FOR REVIEW&quot;;&quot;REVIEW ELIGIBLE — NO AUTHORITY&quot;;IF(OR([.U208]=&quot;UNKNOWN&quot;;[.U208]=&quot;BLOCKED&quot;);&quot;NOT REVIEW ELIGIBLE&quot;;&quot;NOT REVIEW ELIGIBLE&quot;))">
            <text:p>NOT REVIEW ELIGIBLE</text:p>
          </table:table-cell>
          <table:table-cell office:value-type="string" table:formula="of:=IF([.W208]=&quot;NOT REVIEW ELIGIBLE&quot;;&quot;DO NOT BEGIN SETTLEMENT REVIEW — RESOLVE READINESS OR CONTRADICTION CONDITIONS&quot;;IF([.W20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8]=&quot;&quot;;&quot;UNKNOWN&quot;;IF([.W208]&lt;&gt;&quot;REVIEW ELIGIBLE — NO AUTHORITY&quot;;&quot;BLOCKED — OUTCOME ASSERTED WITHOUT REVIEW ELIGIBILITY&quot;;IF(OR([.Y208]=&quot;REVIEWED — NO AUTHORITY&quot;;[.Y208]=&quot;REVIEW DEFERRED&quot;;[.Y20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09]=&quot;&quot;;IF(AND([.L209]=&quot;&quot;;[.N209]=&quot;&quot;);&quot;UNKNOWN&quot;;&quot;CONTRADICTION&quot;);IF([.M209]=&quot;UNMATCHED&quot;;IF(AND([.L209]=&quot;&quot;;[.N209]=&quot;&quot;);&quot;CLEAR&quot;;&quot;CONTRADICTION&quot;);IF([.M209]=&quot;SINGLE_SALE_LINKED&quot;;IF(AND([.L209]&lt;&gt;&quot;&quot;;[.N209]=&quot;&quot;);&quot;CLEAR&quot;;&quot;CONTRADICTION&quot;);IF([.M209]=&quot;MULTI_SALE_PENDING_ALLOCATION&quot;;IF([.L209]=&quot;&quot;;&quot;CLEAR&quot;;&quot;CONTRADICTION&quot;);IF([.M209]=&quot;ALLOCATED&quot;;IF(AND([.L209]=&quot;&quot;;[.N209]&lt;&gt;&quot;&quot;);&quot;CLEAR&quot;;&quot;CONTRADICTION&quot;);&quot;CONTRADICTION&quot;)))))">
            <text:p>UNKNOWN</text:p>
          </table:table-cell>
          <table:table-cell office:value-type="string" table:formula="of:=IF([.S209]=&quot;UNKNOWN&quot;;&quot;NO ACTION — linkage status is UNKNOWN / not asserted&quot;;IF([.S209]=&quot;CLEAR&quot;;&quot;NO CONTRADICTION — preserve evidence as entered&quot;;IF([.M209]=&quot;&quot;;&quot;REVIEW LINKAGE STATUS — identifiers are present while status is UNKNOWN&quot;;IF([.M209]=&quot;UNMATCHED&quot;;&quot;REMOVE LINKAGE IDENTIFIERS OR CORRECT LINKAGE STATUS&quot;;IF([.M209]=&quot;SINGLE_SALE_LINKED&quot;;&quot;REQUIRE LINKED SALE ID AND NO ALLOCATION GROUP ID&quot;;IF([.M209]=&quot;MULTI_SALE_PENDING_ALLOCATION&quot;;&quot;REMOVE LINKED SALE ID OR CORRECT LINKAGE STATUS&quot;;IF([.M209]=&quot;ALLOCATED&quot;;&quot;REQUIRE ALLOCATION GROUP ID AND NO LINKED SALE ID&quot;;&quot;REVIEW LINKAGE EVIDENCE — NO AUTHORITY CREATED&quot;)))))))">
            <text:p>NO ACTION — linkage status is UNKNOWN / not asserted</text:p>
          </table:table-cell>
          <table:table-cell office:value-type="string" table:formula="of:=IF([.S209]=&quot;CONTRADICTION&quot;;&quot;BLOCKED&quot;;IF([.S209]=&quot;UNKNOWN&quot;;&quot;UNKNOWN&quot;;IF([.S209]=&quot;CLEAR&quot;;IF(OR([.O209]=&quot;&quot;;[.P209]=&quot;&quot;);&quot;UNKNOWN&quot;;&quot;READY FOR REVIEW&quot;);&quot;BLOCKED&quot;)))">
            <text:p>UNKNOWN</text:p>
          </table:table-cell>
          <table:table-cell office:value-type="string" table:formula="of:=IF([.U209]=&quot;UNKNOWN&quot;;&quot;COMPLETE OR ASSERT REQUIRED EVIDENCE BEFORE REVIEW&quot;;IF([.U209]=&quot;BLOCKED&quot;;&quot;RESOLVE CONTRADICTION BEFORE REVIEW — NO AUTHORITY CREATED&quot;;IF([.U20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09]=&quot;READY FOR REVIEW&quot;;&quot;REVIEW ELIGIBLE — NO AUTHORITY&quot;;IF(OR([.U209]=&quot;UNKNOWN&quot;;[.U209]=&quot;BLOCKED&quot;);&quot;NOT REVIEW ELIGIBLE&quot;;&quot;NOT REVIEW ELIGIBLE&quot;))">
            <text:p>NOT REVIEW ELIGIBLE</text:p>
          </table:table-cell>
          <table:table-cell office:value-type="string" table:formula="of:=IF([.W209]=&quot;NOT REVIEW ELIGIBLE&quot;;&quot;DO NOT BEGIN SETTLEMENT REVIEW — RESOLVE READINESS OR CONTRADICTION CONDITIONS&quot;;IF([.W20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09]=&quot;&quot;;&quot;UNKNOWN&quot;;IF([.W209]&lt;&gt;&quot;REVIEW ELIGIBLE — NO AUTHORITY&quot;;&quot;BLOCKED — OUTCOME ASSERTED WITHOUT REVIEW ELIGIBILITY&quot;;IF(OR([.Y209]=&quot;REVIEWED — NO AUTHORITY&quot;;[.Y209]=&quot;REVIEW DEFERRED&quot;;[.Y20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0]=&quot;&quot;;IF(AND([.L210]=&quot;&quot;;[.N210]=&quot;&quot;);&quot;UNKNOWN&quot;;&quot;CONTRADICTION&quot;);IF([.M210]=&quot;UNMATCHED&quot;;IF(AND([.L210]=&quot;&quot;;[.N210]=&quot;&quot;);&quot;CLEAR&quot;;&quot;CONTRADICTION&quot;);IF([.M210]=&quot;SINGLE_SALE_LINKED&quot;;IF(AND([.L210]&lt;&gt;&quot;&quot;;[.N210]=&quot;&quot;);&quot;CLEAR&quot;;&quot;CONTRADICTION&quot;);IF([.M210]=&quot;MULTI_SALE_PENDING_ALLOCATION&quot;;IF([.L210]=&quot;&quot;;&quot;CLEAR&quot;;&quot;CONTRADICTION&quot;);IF([.M210]=&quot;ALLOCATED&quot;;IF(AND([.L210]=&quot;&quot;;[.N210]&lt;&gt;&quot;&quot;);&quot;CLEAR&quot;;&quot;CONTRADICTION&quot;);&quot;CONTRADICTION&quot;)))))">
            <text:p>UNKNOWN</text:p>
          </table:table-cell>
          <table:table-cell office:value-type="string" table:formula="of:=IF([.S210]=&quot;UNKNOWN&quot;;&quot;NO ACTION — linkage status is UNKNOWN / not asserted&quot;;IF([.S210]=&quot;CLEAR&quot;;&quot;NO CONTRADICTION — preserve evidence as entered&quot;;IF([.M210]=&quot;&quot;;&quot;REVIEW LINKAGE STATUS — identifiers are present while status is UNKNOWN&quot;;IF([.M210]=&quot;UNMATCHED&quot;;&quot;REMOVE LINKAGE IDENTIFIERS OR CORRECT LINKAGE STATUS&quot;;IF([.M210]=&quot;SINGLE_SALE_LINKED&quot;;&quot;REQUIRE LINKED SALE ID AND NO ALLOCATION GROUP ID&quot;;IF([.M210]=&quot;MULTI_SALE_PENDING_ALLOCATION&quot;;&quot;REMOVE LINKED SALE ID OR CORRECT LINKAGE STATUS&quot;;IF([.M210]=&quot;ALLOCATED&quot;;&quot;REQUIRE ALLOCATION GROUP ID AND NO LINKED SALE ID&quot;;&quot;REVIEW LINKAGE EVIDENCE — NO AUTHORITY CREATED&quot;)))))))">
            <text:p>NO ACTION — linkage status is UNKNOWN / not asserted</text:p>
          </table:table-cell>
          <table:table-cell office:value-type="string" table:formula="of:=IF([.S210]=&quot;CONTRADICTION&quot;;&quot;BLOCKED&quot;;IF([.S210]=&quot;UNKNOWN&quot;;&quot;UNKNOWN&quot;;IF([.S210]=&quot;CLEAR&quot;;IF(OR([.O210]=&quot;&quot;;[.P210]=&quot;&quot;);&quot;UNKNOWN&quot;;&quot;READY FOR REVIEW&quot;);&quot;BLOCKED&quot;)))">
            <text:p>UNKNOWN</text:p>
          </table:table-cell>
          <table:table-cell office:value-type="string" table:formula="of:=IF([.U210]=&quot;UNKNOWN&quot;;&quot;COMPLETE OR ASSERT REQUIRED EVIDENCE BEFORE REVIEW&quot;;IF([.U210]=&quot;BLOCKED&quot;;&quot;RESOLVE CONTRADICTION BEFORE REVIEW — NO AUTHORITY CREATED&quot;;IF([.U21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0]=&quot;READY FOR REVIEW&quot;;&quot;REVIEW ELIGIBLE — NO AUTHORITY&quot;;IF(OR([.U210]=&quot;UNKNOWN&quot;;[.U210]=&quot;BLOCKED&quot;);&quot;NOT REVIEW ELIGIBLE&quot;;&quot;NOT REVIEW ELIGIBLE&quot;))">
            <text:p>NOT REVIEW ELIGIBLE</text:p>
          </table:table-cell>
          <table:table-cell office:value-type="string" table:formula="of:=IF([.W210]=&quot;NOT REVIEW ELIGIBLE&quot;;&quot;DO NOT BEGIN SETTLEMENT REVIEW — RESOLVE READINESS OR CONTRADICTION CONDITIONS&quot;;IF([.W21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0]=&quot;&quot;;&quot;UNKNOWN&quot;;IF([.W210]&lt;&gt;&quot;REVIEW ELIGIBLE — NO AUTHORITY&quot;;&quot;BLOCKED — OUTCOME ASSERTED WITHOUT REVIEW ELIGIBILITY&quot;;IF(OR([.Y210]=&quot;REVIEWED — NO AUTHORITY&quot;;[.Y210]=&quot;REVIEW DEFERRED&quot;;[.Y21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1]=&quot;&quot;;IF(AND([.L211]=&quot;&quot;;[.N211]=&quot;&quot;);&quot;UNKNOWN&quot;;&quot;CONTRADICTION&quot;);IF([.M211]=&quot;UNMATCHED&quot;;IF(AND([.L211]=&quot;&quot;;[.N211]=&quot;&quot;);&quot;CLEAR&quot;;&quot;CONTRADICTION&quot;);IF([.M211]=&quot;SINGLE_SALE_LINKED&quot;;IF(AND([.L211]&lt;&gt;&quot;&quot;;[.N211]=&quot;&quot;);&quot;CLEAR&quot;;&quot;CONTRADICTION&quot;);IF([.M211]=&quot;MULTI_SALE_PENDING_ALLOCATION&quot;;IF([.L211]=&quot;&quot;;&quot;CLEAR&quot;;&quot;CONTRADICTION&quot;);IF([.M211]=&quot;ALLOCATED&quot;;IF(AND([.L211]=&quot;&quot;;[.N211]&lt;&gt;&quot;&quot;);&quot;CLEAR&quot;;&quot;CONTRADICTION&quot;);&quot;CONTRADICTION&quot;)))))">
            <text:p>UNKNOWN</text:p>
          </table:table-cell>
          <table:table-cell office:value-type="string" table:formula="of:=IF([.S211]=&quot;UNKNOWN&quot;;&quot;NO ACTION — linkage status is UNKNOWN / not asserted&quot;;IF([.S211]=&quot;CLEAR&quot;;&quot;NO CONTRADICTION — preserve evidence as entered&quot;;IF([.M211]=&quot;&quot;;&quot;REVIEW LINKAGE STATUS — identifiers are present while status is UNKNOWN&quot;;IF([.M211]=&quot;UNMATCHED&quot;;&quot;REMOVE LINKAGE IDENTIFIERS OR CORRECT LINKAGE STATUS&quot;;IF([.M211]=&quot;SINGLE_SALE_LINKED&quot;;&quot;REQUIRE LINKED SALE ID AND NO ALLOCATION GROUP ID&quot;;IF([.M211]=&quot;MULTI_SALE_PENDING_ALLOCATION&quot;;&quot;REMOVE LINKED SALE ID OR CORRECT LINKAGE STATUS&quot;;IF([.M211]=&quot;ALLOCATED&quot;;&quot;REQUIRE ALLOCATION GROUP ID AND NO LINKED SALE ID&quot;;&quot;REVIEW LINKAGE EVIDENCE — NO AUTHORITY CREATED&quot;)))))))">
            <text:p>NO ACTION — linkage status is UNKNOWN / not asserted</text:p>
          </table:table-cell>
          <table:table-cell office:value-type="string" table:formula="of:=IF([.S211]=&quot;CONTRADICTION&quot;;&quot;BLOCKED&quot;;IF([.S211]=&quot;UNKNOWN&quot;;&quot;UNKNOWN&quot;;IF([.S211]=&quot;CLEAR&quot;;IF(OR([.O211]=&quot;&quot;;[.P211]=&quot;&quot;);&quot;UNKNOWN&quot;;&quot;READY FOR REVIEW&quot;);&quot;BLOCKED&quot;)))">
            <text:p>UNKNOWN</text:p>
          </table:table-cell>
          <table:table-cell office:value-type="string" table:formula="of:=IF([.U211]=&quot;UNKNOWN&quot;;&quot;COMPLETE OR ASSERT REQUIRED EVIDENCE BEFORE REVIEW&quot;;IF([.U211]=&quot;BLOCKED&quot;;&quot;RESOLVE CONTRADICTION BEFORE REVIEW — NO AUTHORITY CREATED&quot;;IF([.U21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1]=&quot;READY FOR REVIEW&quot;;&quot;REVIEW ELIGIBLE — NO AUTHORITY&quot;;IF(OR([.U211]=&quot;UNKNOWN&quot;;[.U211]=&quot;BLOCKED&quot;);&quot;NOT REVIEW ELIGIBLE&quot;;&quot;NOT REVIEW ELIGIBLE&quot;))">
            <text:p>NOT REVIEW ELIGIBLE</text:p>
          </table:table-cell>
          <table:table-cell office:value-type="string" table:formula="of:=IF([.W211]=&quot;NOT REVIEW ELIGIBLE&quot;;&quot;DO NOT BEGIN SETTLEMENT REVIEW — RESOLVE READINESS OR CONTRADICTION CONDITIONS&quot;;IF([.W21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1]=&quot;&quot;;&quot;UNKNOWN&quot;;IF([.W211]&lt;&gt;&quot;REVIEW ELIGIBLE — NO AUTHORITY&quot;;&quot;BLOCKED — OUTCOME ASSERTED WITHOUT REVIEW ELIGIBILITY&quot;;IF(OR([.Y211]=&quot;REVIEWED — NO AUTHORITY&quot;;[.Y211]=&quot;REVIEW DEFERRED&quot;;[.Y211]=&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2]=&quot;&quot;;IF(AND([.L212]=&quot;&quot;;[.N212]=&quot;&quot;);&quot;UNKNOWN&quot;;&quot;CONTRADICTION&quot;);IF([.M212]=&quot;UNMATCHED&quot;;IF(AND([.L212]=&quot;&quot;;[.N212]=&quot;&quot;);&quot;CLEAR&quot;;&quot;CONTRADICTION&quot;);IF([.M212]=&quot;SINGLE_SALE_LINKED&quot;;IF(AND([.L212]&lt;&gt;&quot;&quot;;[.N212]=&quot;&quot;);&quot;CLEAR&quot;;&quot;CONTRADICTION&quot;);IF([.M212]=&quot;MULTI_SALE_PENDING_ALLOCATION&quot;;IF([.L212]=&quot;&quot;;&quot;CLEAR&quot;;&quot;CONTRADICTION&quot;);IF([.M212]=&quot;ALLOCATED&quot;;IF(AND([.L212]=&quot;&quot;;[.N212]&lt;&gt;&quot;&quot;);&quot;CLEAR&quot;;&quot;CONTRADICTION&quot;);&quot;CONTRADICTION&quot;)))))">
            <text:p>UNKNOWN</text:p>
          </table:table-cell>
          <table:table-cell office:value-type="string" table:formula="of:=IF([.S212]=&quot;UNKNOWN&quot;;&quot;NO ACTION — linkage status is UNKNOWN / not asserted&quot;;IF([.S212]=&quot;CLEAR&quot;;&quot;NO CONTRADICTION — preserve evidence as entered&quot;;IF([.M212]=&quot;&quot;;&quot;REVIEW LINKAGE STATUS — identifiers are present while status is UNKNOWN&quot;;IF([.M212]=&quot;UNMATCHED&quot;;&quot;REMOVE LINKAGE IDENTIFIERS OR CORRECT LINKAGE STATUS&quot;;IF([.M212]=&quot;SINGLE_SALE_LINKED&quot;;&quot;REQUIRE LINKED SALE ID AND NO ALLOCATION GROUP ID&quot;;IF([.M212]=&quot;MULTI_SALE_PENDING_ALLOCATION&quot;;&quot;REMOVE LINKED SALE ID OR CORRECT LINKAGE STATUS&quot;;IF([.M212]=&quot;ALLOCATED&quot;;&quot;REQUIRE ALLOCATION GROUP ID AND NO LINKED SALE ID&quot;;&quot;REVIEW LINKAGE EVIDENCE — NO AUTHORITY CREATED&quot;)))))))">
            <text:p>NO ACTION — linkage status is UNKNOWN / not asserted</text:p>
          </table:table-cell>
          <table:table-cell office:value-type="string" table:formula="of:=IF([.S212]=&quot;CONTRADICTION&quot;;&quot;BLOCKED&quot;;IF([.S212]=&quot;UNKNOWN&quot;;&quot;UNKNOWN&quot;;IF([.S212]=&quot;CLEAR&quot;;IF(OR([.O212]=&quot;&quot;;[.P212]=&quot;&quot;);&quot;UNKNOWN&quot;;&quot;READY FOR REVIEW&quot;);&quot;BLOCKED&quot;)))">
            <text:p>UNKNOWN</text:p>
          </table:table-cell>
          <table:table-cell office:value-type="string" table:formula="of:=IF([.U212]=&quot;UNKNOWN&quot;;&quot;COMPLETE OR ASSERT REQUIRED EVIDENCE BEFORE REVIEW&quot;;IF([.U212]=&quot;BLOCKED&quot;;&quot;RESOLVE CONTRADICTION BEFORE REVIEW — NO AUTHORITY CREATED&quot;;IF([.U21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2]=&quot;READY FOR REVIEW&quot;;&quot;REVIEW ELIGIBLE — NO AUTHORITY&quot;;IF(OR([.U212]=&quot;UNKNOWN&quot;;[.U212]=&quot;BLOCKED&quot;);&quot;NOT REVIEW ELIGIBLE&quot;;&quot;NOT REVIEW ELIGIBLE&quot;))">
            <text:p>NOT REVIEW ELIGIBLE</text:p>
          </table:table-cell>
          <table:table-cell office:value-type="string" table:formula="of:=IF([.W212]=&quot;NOT REVIEW ELIGIBLE&quot;;&quot;DO NOT BEGIN SETTLEMENT REVIEW — RESOLVE READINESS OR CONTRADICTION CONDITIONS&quot;;IF([.W21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2]=&quot;&quot;;&quot;UNKNOWN&quot;;IF([.W212]&lt;&gt;&quot;REVIEW ELIGIBLE — NO AUTHORITY&quot;;&quot;BLOCKED — OUTCOME ASSERTED WITHOUT REVIEW ELIGIBILITY&quot;;IF(OR([.Y212]=&quot;REVIEWED — NO AUTHORITY&quot;;[.Y212]=&quot;REVIEW DEFERRED&quot;;[.Y21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3]=&quot;&quot;;IF(AND([.L213]=&quot;&quot;;[.N213]=&quot;&quot;);&quot;UNKNOWN&quot;;&quot;CONTRADICTION&quot;);IF([.M213]=&quot;UNMATCHED&quot;;IF(AND([.L213]=&quot;&quot;;[.N213]=&quot;&quot;);&quot;CLEAR&quot;;&quot;CONTRADICTION&quot;);IF([.M213]=&quot;SINGLE_SALE_LINKED&quot;;IF(AND([.L213]&lt;&gt;&quot;&quot;;[.N213]=&quot;&quot;);&quot;CLEAR&quot;;&quot;CONTRADICTION&quot;);IF([.M213]=&quot;MULTI_SALE_PENDING_ALLOCATION&quot;;IF([.L213]=&quot;&quot;;&quot;CLEAR&quot;;&quot;CONTRADICTION&quot;);IF([.M213]=&quot;ALLOCATED&quot;;IF(AND([.L213]=&quot;&quot;;[.N213]&lt;&gt;&quot;&quot;);&quot;CLEAR&quot;;&quot;CONTRADICTION&quot;);&quot;CONTRADICTION&quot;)))))">
            <text:p>UNKNOWN</text:p>
          </table:table-cell>
          <table:table-cell office:value-type="string" table:formula="of:=IF([.S213]=&quot;UNKNOWN&quot;;&quot;NO ACTION — linkage status is UNKNOWN / not asserted&quot;;IF([.S213]=&quot;CLEAR&quot;;&quot;NO CONTRADICTION — preserve evidence as entered&quot;;IF([.M213]=&quot;&quot;;&quot;REVIEW LINKAGE STATUS — identifiers are present while status is UNKNOWN&quot;;IF([.M213]=&quot;UNMATCHED&quot;;&quot;REMOVE LINKAGE IDENTIFIERS OR CORRECT LINKAGE STATUS&quot;;IF([.M213]=&quot;SINGLE_SALE_LINKED&quot;;&quot;REQUIRE LINKED SALE ID AND NO ALLOCATION GROUP ID&quot;;IF([.M213]=&quot;MULTI_SALE_PENDING_ALLOCATION&quot;;&quot;REMOVE LINKED SALE ID OR CORRECT LINKAGE STATUS&quot;;IF([.M213]=&quot;ALLOCATED&quot;;&quot;REQUIRE ALLOCATION GROUP ID AND NO LINKED SALE ID&quot;;&quot;REVIEW LINKAGE EVIDENCE — NO AUTHORITY CREATED&quot;)))))))">
            <text:p>NO ACTION — linkage status is UNKNOWN / not asserted</text:p>
          </table:table-cell>
          <table:table-cell office:value-type="string" table:formula="of:=IF([.S213]=&quot;CONTRADICTION&quot;;&quot;BLOCKED&quot;;IF([.S213]=&quot;UNKNOWN&quot;;&quot;UNKNOWN&quot;;IF([.S213]=&quot;CLEAR&quot;;IF(OR([.O213]=&quot;&quot;;[.P213]=&quot;&quot;);&quot;UNKNOWN&quot;;&quot;READY FOR REVIEW&quot;);&quot;BLOCKED&quot;)))">
            <text:p>UNKNOWN</text:p>
          </table:table-cell>
          <table:table-cell office:value-type="string" table:formula="of:=IF([.U213]=&quot;UNKNOWN&quot;;&quot;COMPLETE OR ASSERT REQUIRED EVIDENCE BEFORE REVIEW&quot;;IF([.U213]=&quot;BLOCKED&quot;;&quot;RESOLVE CONTRADICTION BEFORE REVIEW — NO AUTHORITY CREATED&quot;;IF([.U21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3]=&quot;READY FOR REVIEW&quot;;&quot;REVIEW ELIGIBLE — NO AUTHORITY&quot;;IF(OR([.U213]=&quot;UNKNOWN&quot;;[.U213]=&quot;BLOCKED&quot;);&quot;NOT REVIEW ELIGIBLE&quot;;&quot;NOT REVIEW ELIGIBLE&quot;))">
            <text:p>NOT REVIEW ELIGIBLE</text:p>
          </table:table-cell>
          <table:table-cell office:value-type="string" table:formula="of:=IF([.W213]=&quot;NOT REVIEW ELIGIBLE&quot;;&quot;DO NOT BEGIN SETTLEMENT REVIEW — RESOLVE READINESS OR CONTRADICTION CONDITIONS&quot;;IF([.W21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3]=&quot;&quot;;&quot;UNKNOWN&quot;;IF([.W213]&lt;&gt;&quot;REVIEW ELIGIBLE — NO AUTHORITY&quot;;&quot;BLOCKED — OUTCOME ASSERTED WITHOUT REVIEW ELIGIBILITY&quot;;IF(OR([.Y213]=&quot;REVIEWED — NO AUTHORITY&quot;;[.Y213]=&quot;REVIEW DEFERRED&quot;;[.Y21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4]=&quot;&quot;;IF(AND([.L214]=&quot;&quot;;[.N214]=&quot;&quot;);&quot;UNKNOWN&quot;;&quot;CONTRADICTION&quot;);IF([.M214]=&quot;UNMATCHED&quot;;IF(AND([.L214]=&quot;&quot;;[.N214]=&quot;&quot;);&quot;CLEAR&quot;;&quot;CONTRADICTION&quot;);IF([.M214]=&quot;SINGLE_SALE_LINKED&quot;;IF(AND([.L214]&lt;&gt;&quot;&quot;;[.N214]=&quot;&quot;);&quot;CLEAR&quot;;&quot;CONTRADICTION&quot;);IF([.M214]=&quot;MULTI_SALE_PENDING_ALLOCATION&quot;;IF([.L214]=&quot;&quot;;&quot;CLEAR&quot;;&quot;CONTRADICTION&quot;);IF([.M214]=&quot;ALLOCATED&quot;;IF(AND([.L214]=&quot;&quot;;[.N214]&lt;&gt;&quot;&quot;);&quot;CLEAR&quot;;&quot;CONTRADICTION&quot;);&quot;CONTRADICTION&quot;)))))">
            <text:p>UNKNOWN</text:p>
          </table:table-cell>
          <table:table-cell office:value-type="string" table:formula="of:=IF([.S214]=&quot;UNKNOWN&quot;;&quot;NO ACTION — linkage status is UNKNOWN / not asserted&quot;;IF([.S214]=&quot;CLEAR&quot;;&quot;NO CONTRADICTION — preserve evidence as entered&quot;;IF([.M214]=&quot;&quot;;&quot;REVIEW LINKAGE STATUS — identifiers are present while status is UNKNOWN&quot;;IF([.M214]=&quot;UNMATCHED&quot;;&quot;REMOVE LINKAGE IDENTIFIERS OR CORRECT LINKAGE STATUS&quot;;IF([.M214]=&quot;SINGLE_SALE_LINKED&quot;;&quot;REQUIRE LINKED SALE ID AND NO ALLOCATION GROUP ID&quot;;IF([.M214]=&quot;MULTI_SALE_PENDING_ALLOCATION&quot;;&quot;REMOVE LINKED SALE ID OR CORRECT LINKAGE STATUS&quot;;IF([.M214]=&quot;ALLOCATED&quot;;&quot;REQUIRE ALLOCATION GROUP ID AND NO LINKED SALE ID&quot;;&quot;REVIEW LINKAGE EVIDENCE — NO AUTHORITY CREATED&quot;)))))))">
            <text:p>NO ACTION — linkage status is UNKNOWN / not asserted</text:p>
          </table:table-cell>
          <table:table-cell office:value-type="string" table:formula="of:=IF([.S214]=&quot;CONTRADICTION&quot;;&quot;BLOCKED&quot;;IF([.S214]=&quot;UNKNOWN&quot;;&quot;UNKNOWN&quot;;IF([.S214]=&quot;CLEAR&quot;;IF(OR([.O214]=&quot;&quot;;[.P214]=&quot;&quot;);&quot;UNKNOWN&quot;;&quot;READY FOR REVIEW&quot;);&quot;BLOCKED&quot;)))">
            <text:p>UNKNOWN</text:p>
          </table:table-cell>
          <table:table-cell office:value-type="string" table:formula="of:=IF([.U214]=&quot;UNKNOWN&quot;;&quot;COMPLETE OR ASSERT REQUIRED EVIDENCE BEFORE REVIEW&quot;;IF([.U214]=&quot;BLOCKED&quot;;&quot;RESOLVE CONTRADICTION BEFORE REVIEW — NO AUTHORITY CREATED&quot;;IF([.U21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4]=&quot;READY FOR REVIEW&quot;;&quot;REVIEW ELIGIBLE — NO AUTHORITY&quot;;IF(OR([.U214]=&quot;UNKNOWN&quot;;[.U214]=&quot;BLOCKED&quot;);&quot;NOT REVIEW ELIGIBLE&quot;;&quot;NOT REVIEW ELIGIBLE&quot;))">
            <text:p>NOT REVIEW ELIGIBLE</text:p>
          </table:table-cell>
          <table:table-cell office:value-type="string" table:formula="of:=IF([.W214]=&quot;NOT REVIEW ELIGIBLE&quot;;&quot;DO NOT BEGIN SETTLEMENT REVIEW — RESOLVE READINESS OR CONTRADICTION CONDITIONS&quot;;IF([.W21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4]=&quot;&quot;;&quot;UNKNOWN&quot;;IF([.W214]&lt;&gt;&quot;REVIEW ELIGIBLE — NO AUTHORITY&quot;;&quot;BLOCKED — OUTCOME ASSERTED WITHOUT REVIEW ELIGIBILITY&quot;;IF(OR([.Y214]=&quot;REVIEWED — NO AUTHORITY&quot;;[.Y214]=&quot;REVIEW DEFERRED&quot;;[.Y21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5]=&quot;&quot;;IF(AND([.L215]=&quot;&quot;;[.N215]=&quot;&quot;);&quot;UNKNOWN&quot;;&quot;CONTRADICTION&quot;);IF([.M215]=&quot;UNMATCHED&quot;;IF(AND([.L215]=&quot;&quot;;[.N215]=&quot;&quot;);&quot;CLEAR&quot;;&quot;CONTRADICTION&quot;);IF([.M215]=&quot;SINGLE_SALE_LINKED&quot;;IF(AND([.L215]&lt;&gt;&quot;&quot;;[.N215]=&quot;&quot;);&quot;CLEAR&quot;;&quot;CONTRADICTION&quot;);IF([.M215]=&quot;MULTI_SALE_PENDING_ALLOCATION&quot;;IF([.L215]=&quot;&quot;;&quot;CLEAR&quot;;&quot;CONTRADICTION&quot;);IF([.M215]=&quot;ALLOCATED&quot;;IF(AND([.L215]=&quot;&quot;;[.N215]&lt;&gt;&quot;&quot;);&quot;CLEAR&quot;;&quot;CONTRADICTION&quot;);&quot;CONTRADICTION&quot;)))))">
            <text:p>UNKNOWN</text:p>
          </table:table-cell>
          <table:table-cell office:value-type="string" table:formula="of:=IF([.S215]=&quot;UNKNOWN&quot;;&quot;NO ACTION — linkage status is UNKNOWN / not asserted&quot;;IF([.S215]=&quot;CLEAR&quot;;&quot;NO CONTRADICTION — preserve evidence as entered&quot;;IF([.M215]=&quot;&quot;;&quot;REVIEW LINKAGE STATUS — identifiers are present while status is UNKNOWN&quot;;IF([.M215]=&quot;UNMATCHED&quot;;&quot;REMOVE LINKAGE IDENTIFIERS OR CORRECT LINKAGE STATUS&quot;;IF([.M215]=&quot;SINGLE_SALE_LINKED&quot;;&quot;REQUIRE LINKED SALE ID AND NO ALLOCATION GROUP ID&quot;;IF([.M215]=&quot;MULTI_SALE_PENDING_ALLOCATION&quot;;&quot;REMOVE LINKED SALE ID OR CORRECT LINKAGE STATUS&quot;;IF([.M215]=&quot;ALLOCATED&quot;;&quot;REQUIRE ALLOCATION GROUP ID AND NO LINKED SALE ID&quot;;&quot;REVIEW LINKAGE EVIDENCE — NO AUTHORITY CREATED&quot;)))))))">
            <text:p>NO ACTION — linkage status is UNKNOWN / not asserted</text:p>
          </table:table-cell>
          <table:table-cell office:value-type="string" table:formula="of:=IF([.S215]=&quot;CONTRADICTION&quot;;&quot;BLOCKED&quot;;IF([.S215]=&quot;UNKNOWN&quot;;&quot;UNKNOWN&quot;;IF([.S215]=&quot;CLEAR&quot;;IF(OR([.O215]=&quot;&quot;;[.P215]=&quot;&quot;);&quot;UNKNOWN&quot;;&quot;READY FOR REVIEW&quot;);&quot;BLOCKED&quot;)))">
            <text:p>UNKNOWN</text:p>
          </table:table-cell>
          <table:table-cell office:value-type="string" table:formula="of:=IF([.U215]=&quot;UNKNOWN&quot;;&quot;COMPLETE OR ASSERT REQUIRED EVIDENCE BEFORE REVIEW&quot;;IF([.U215]=&quot;BLOCKED&quot;;&quot;RESOLVE CONTRADICTION BEFORE REVIEW — NO AUTHORITY CREATED&quot;;IF([.U21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5]=&quot;READY FOR REVIEW&quot;;&quot;REVIEW ELIGIBLE — NO AUTHORITY&quot;;IF(OR([.U215]=&quot;UNKNOWN&quot;;[.U215]=&quot;BLOCKED&quot;);&quot;NOT REVIEW ELIGIBLE&quot;;&quot;NOT REVIEW ELIGIBLE&quot;))">
            <text:p>NOT REVIEW ELIGIBLE</text:p>
          </table:table-cell>
          <table:table-cell office:value-type="string" table:formula="of:=IF([.W215]=&quot;NOT REVIEW ELIGIBLE&quot;;&quot;DO NOT BEGIN SETTLEMENT REVIEW — RESOLVE READINESS OR CONTRADICTION CONDITIONS&quot;;IF([.W21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5]=&quot;&quot;;&quot;UNKNOWN&quot;;IF([.W215]&lt;&gt;&quot;REVIEW ELIGIBLE — NO AUTHORITY&quot;;&quot;BLOCKED — OUTCOME ASSERTED WITHOUT REVIEW ELIGIBILITY&quot;;IF(OR([.Y215]=&quot;REVIEWED — NO AUTHORITY&quot;;[.Y215]=&quot;REVIEW DEFERRED&quot;;[.Y21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6]=&quot;&quot;;IF(AND([.L216]=&quot;&quot;;[.N216]=&quot;&quot;);&quot;UNKNOWN&quot;;&quot;CONTRADICTION&quot;);IF([.M216]=&quot;UNMATCHED&quot;;IF(AND([.L216]=&quot;&quot;;[.N216]=&quot;&quot;);&quot;CLEAR&quot;;&quot;CONTRADICTION&quot;);IF([.M216]=&quot;SINGLE_SALE_LINKED&quot;;IF(AND([.L216]&lt;&gt;&quot;&quot;;[.N216]=&quot;&quot;);&quot;CLEAR&quot;;&quot;CONTRADICTION&quot;);IF([.M216]=&quot;MULTI_SALE_PENDING_ALLOCATION&quot;;IF([.L216]=&quot;&quot;;&quot;CLEAR&quot;;&quot;CONTRADICTION&quot;);IF([.M216]=&quot;ALLOCATED&quot;;IF(AND([.L216]=&quot;&quot;;[.N216]&lt;&gt;&quot;&quot;);&quot;CLEAR&quot;;&quot;CONTRADICTION&quot;);&quot;CONTRADICTION&quot;)))))">
            <text:p>UNKNOWN</text:p>
          </table:table-cell>
          <table:table-cell office:value-type="string" table:formula="of:=IF([.S216]=&quot;UNKNOWN&quot;;&quot;NO ACTION — linkage status is UNKNOWN / not asserted&quot;;IF([.S216]=&quot;CLEAR&quot;;&quot;NO CONTRADICTION — preserve evidence as entered&quot;;IF([.M216]=&quot;&quot;;&quot;REVIEW LINKAGE STATUS — identifiers are present while status is UNKNOWN&quot;;IF([.M216]=&quot;UNMATCHED&quot;;&quot;REMOVE LINKAGE IDENTIFIERS OR CORRECT LINKAGE STATUS&quot;;IF([.M216]=&quot;SINGLE_SALE_LINKED&quot;;&quot;REQUIRE LINKED SALE ID AND NO ALLOCATION GROUP ID&quot;;IF([.M216]=&quot;MULTI_SALE_PENDING_ALLOCATION&quot;;&quot;REMOVE LINKED SALE ID OR CORRECT LINKAGE STATUS&quot;;IF([.M216]=&quot;ALLOCATED&quot;;&quot;REQUIRE ALLOCATION GROUP ID AND NO LINKED SALE ID&quot;;&quot;REVIEW LINKAGE EVIDENCE — NO AUTHORITY CREATED&quot;)))))))">
            <text:p>NO ACTION — linkage status is UNKNOWN / not asserted</text:p>
          </table:table-cell>
          <table:table-cell office:value-type="string" table:formula="of:=IF([.S216]=&quot;CONTRADICTION&quot;;&quot;BLOCKED&quot;;IF([.S216]=&quot;UNKNOWN&quot;;&quot;UNKNOWN&quot;;IF([.S216]=&quot;CLEAR&quot;;IF(OR([.O216]=&quot;&quot;;[.P216]=&quot;&quot;);&quot;UNKNOWN&quot;;&quot;READY FOR REVIEW&quot;);&quot;BLOCKED&quot;)))">
            <text:p>UNKNOWN</text:p>
          </table:table-cell>
          <table:table-cell office:value-type="string" table:formula="of:=IF([.U216]=&quot;UNKNOWN&quot;;&quot;COMPLETE OR ASSERT REQUIRED EVIDENCE BEFORE REVIEW&quot;;IF([.U216]=&quot;BLOCKED&quot;;&quot;RESOLVE CONTRADICTION BEFORE REVIEW — NO AUTHORITY CREATED&quot;;IF([.U21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6]=&quot;READY FOR REVIEW&quot;;&quot;REVIEW ELIGIBLE — NO AUTHORITY&quot;;IF(OR([.U216]=&quot;UNKNOWN&quot;;[.U216]=&quot;BLOCKED&quot;);&quot;NOT REVIEW ELIGIBLE&quot;;&quot;NOT REVIEW ELIGIBLE&quot;))">
            <text:p>NOT REVIEW ELIGIBLE</text:p>
          </table:table-cell>
          <table:table-cell office:value-type="string" table:formula="of:=IF([.W216]=&quot;NOT REVIEW ELIGIBLE&quot;;&quot;DO NOT BEGIN SETTLEMENT REVIEW — RESOLVE READINESS OR CONTRADICTION CONDITIONS&quot;;IF([.W21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6]=&quot;&quot;;&quot;UNKNOWN&quot;;IF([.W216]&lt;&gt;&quot;REVIEW ELIGIBLE — NO AUTHORITY&quot;;&quot;BLOCKED — OUTCOME ASSERTED WITHOUT REVIEW ELIGIBILITY&quot;;IF(OR([.Y216]=&quot;REVIEWED — NO AUTHORITY&quot;;[.Y216]=&quot;REVIEW DEFERRED&quot;;[.Y21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7]=&quot;&quot;;IF(AND([.L217]=&quot;&quot;;[.N217]=&quot;&quot;);&quot;UNKNOWN&quot;;&quot;CONTRADICTION&quot;);IF([.M217]=&quot;UNMATCHED&quot;;IF(AND([.L217]=&quot;&quot;;[.N217]=&quot;&quot;);&quot;CLEAR&quot;;&quot;CONTRADICTION&quot;);IF([.M217]=&quot;SINGLE_SALE_LINKED&quot;;IF(AND([.L217]&lt;&gt;&quot;&quot;;[.N217]=&quot;&quot;);&quot;CLEAR&quot;;&quot;CONTRADICTION&quot;);IF([.M217]=&quot;MULTI_SALE_PENDING_ALLOCATION&quot;;IF([.L217]=&quot;&quot;;&quot;CLEAR&quot;;&quot;CONTRADICTION&quot;);IF([.M217]=&quot;ALLOCATED&quot;;IF(AND([.L217]=&quot;&quot;;[.N217]&lt;&gt;&quot;&quot;);&quot;CLEAR&quot;;&quot;CONTRADICTION&quot;);&quot;CONTRADICTION&quot;)))))">
            <text:p>UNKNOWN</text:p>
          </table:table-cell>
          <table:table-cell office:value-type="string" table:formula="of:=IF([.S217]=&quot;UNKNOWN&quot;;&quot;NO ACTION — linkage status is UNKNOWN / not asserted&quot;;IF([.S217]=&quot;CLEAR&quot;;&quot;NO CONTRADICTION — preserve evidence as entered&quot;;IF([.M217]=&quot;&quot;;&quot;REVIEW LINKAGE STATUS — identifiers are present while status is UNKNOWN&quot;;IF([.M217]=&quot;UNMATCHED&quot;;&quot;REMOVE LINKAGE IDENTIFIERS OR CORRECT LINKAGE STATUS&quot;;IF([.M217]=&quot;SINGLE_SALE_LINKED&quot;;&quot;REQUIRE LINKED SALE ID AND NO ALLOCATION GROUP ID&quot;;IF([.M217]=&quot;MULTI_SALE_PENDING_ALLOCATION&quot;;&quot;REMOVE LINKED SALE ID OR CORRECT LINKAGE STATUS&quot;;IF([.M217]=&quot;ALLOCATED&quot;;&quot;REQUIRE ALLOCATION GROUP ID AND NO LINKED SALE ID&quot;;&quot;REVIEW LINKAGE EVIDENCE — NO AUTHORITY CREATED&quot;)))))))">
            <text:p>NO ACTION — linkage status is UNKNOWN / not asserted</text:p>
          </table:table-cell>
          <table:table-cell office:value-type="string" table:formula="of:=IF([.S217]=&quot;CONTRADICTION&quot;;&quot;BLOCKED&quot;;IF([.S217]=&quot;UNKNOWN&quot;;&quot;UNKNOWN&quot;;IF([.S217]=&quot;CLEAR&quot;;IF(OR([.O217]=&quot;&quot;;[.P217]=&quot;&quot;);&quot;UNKNOWN&quot;;&quot;READY FOR REVIEW&quot;);&quot;BLOCKED&quot;)))">
            <text:p>UNKNOWN</text:p>
          </table:table-cell>
          <table:table-cell office:value-type="string" table:formula="of:=IF([.U217]=&quot;UNKNOWN&quot;;&quot;COMPLETE OR ASSERT REQUIRED EVIDENCE BEFORE REVIEW&quot;;IF([.U217]=&quot;BLOCKED&quot;;&quot;RESOLVE CONTRADICTION BEFORE REVIEW — NO AUTHORITY CREATED&quot;;IF([.U21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7]=&quot;READY FOR REVIEW&quot;;&quot;REVIEW ELIGIBLE — NO AUTHORITY&quot;;IF(OR([.U217]=&quot;UNKNOWN&quot;;[.U217]=&quot;BLOCKED&quot;);&quot;NOT REVIEW ELIGIBLE&quot;;&quot;NOT REVIEW ELIGIBLE&quot;))">
            <text:p>NOT REVIEW ELIGIBLE</text:p>
          </table:table-cell>
          <table:table-cell office:value-type="string" table:formula="of:=IF([.W217]=&quot;NOT REVIEW ELIGIBLE&quot;;&quot;DO NOT BEGIN SETTLEMENT REVIEW — RESOLVE READINESS OR CONTRADICTION CONDITIONS&quot;;IF([.W21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7]=&quot;&quot;;&quot;UNKNOWN&quot;;IF([.W217]&lt;&gt;&quot;REVIEW ELIGIBLE — NO AUTHORITY&quot;;&quot;BLOCKED — OUTCOME ASSERTED WITHOUT REVIEW ELIGIBILITY&quot;;IF(OR([.Y217]=&quot;REVIEWED — NO AUTHORITY&quot;;[.Y217]=&quot;REVIEW DEFERRED&quot;;[.Y21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8]=&quot;&quot;;IF(AND([.L218]=&quot;&quot;;[.N218]=&quot;&quot;);&quot;UNKNOWN&quot;;&quot;CONTRADICTION&quot;);IF([.M218]=&quot;UNMATCHED&quot;;IF(AND([.L218]=&quot;&quot;;[.N218]=&quot;&quot;);&quot;CLEAR&quot;;&quot;CONTRADICTION&quot;);IF([.M218]=&quot;SINGLE_SALE_LINKED&quot;;IF(AND([.L218]&lt;&gt;&quot;&quot;;[.N218]=&quot;&quot;);&quot;CLEAR&quot;;&quot;CONTRADICTION&quot;);IF([.M218]=&quot;MULTI_SALE_PENDING_ALLOCATION&quot;;IF([.L218]=&quot;&quot;;&quot;CLEAR&quot;;&quot;CONTRADICTION&quot;);IF([.M218]=&quot;ALLOCATED&quot;;IF(AND([.L218]=&quot;&quot;;[.N218]&lt;&gt;&quot;&quot;);&quot;CLEAR&quot;;&quot;CONTRADICTION&quot;);&quot;CONTRADICTION&quot;)))))">
            <text:p>UNKNOWN</text:p>
          </table:table-cell>
          <table:table-cell office:value-type="string" table:formula="of:=IF([.S218]=&quot;UNKNOWN&quot;;&quot;NO ACTION — linkage status is UNKNOWN / not asserted&quot;;IF([.S218]=&quot;CLEAR&quot;;&quot;NO CONTRADICTION — preserve evidence as entered&quot;;IF([.M218]=&quot;&quot;;&quot;REVIEW LINKAGE STATUS — identifiers are present while status is UNKNOWN&quot;;IF([.M218]=&quot;UNMATCHED&quot;;&quot;REMOVE LINKAGE IDENTIFIERS OR CORRECT LINKAGE STATUS&quot;;IF([.M218]=&quot;SINGLE_SALE_LINKED&quot;;&quot;REQUIRE LINKED SALE ID AND NO ALLOCATION GROUP ID&quot;;IF([.M218]=&quot;MULTI_SALE_PENDING_ALLOCATION&quot;;&quot;REMOVE LINKED SALE ID OR CORRECT LINKAGE STATUS&quot;;IF([.M218]=&quot;ALLOCATED&quot;;&quot;REQUIRE ALLOCATION GROUP ID AND NO LINKED SALE ID&quot;;&quot;REVIEW LINKAGE EVIDENCE — NO AUTHORITY CREATED&quot;)))))))">
            <text:p>NO ACTION — linkage status is UNKNOWN / not asserted</text:p>
          </table:table-cell>
          <table:table-cell office:value-type="string" table:formula="of:=IF([.S218]=&quot;CONTRADICTION&quot;;&quot;BLOCKED&quot;;IF([.S218]=&quot;UNKNOWN&quot;;&quot;UNKNOWN&quot;;IF([.S218]=&quot;CLEAR&quot;;IF(OR([.O218]=&quot;&quot;;[.P218]=&quot;&quot;);&quot;UNKNOWN&quot;;&quot;READY FOR REVIEW&quot;);&quot;BLOCKED&quot;)))">
            <text:p>UNKNOWN</text:p>
          </table:table-cell>
          <table:table-cell office:value-type="string" table:formula="of:=IF([.U218]=&quot;UNKNOWN&quot;;&quot;COMPLETE OR ASSERT REQUIRED EVIDENCE BEFORE REVIEW&quot;;IF([.U218]=&quot;BLOCKED&quot;;&quot;RESOLVE CONTRADICTION BEFORE REVIEW — NO AUTHORITY CREATED&quot;;IF([.U21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8]=&quot;READY FOR REVIEW&quot;;&quot;REVIEW ELIGIBLE — NO AUTHORITY&quot;;IF(OR([.U218]=&quot;UNKNOWN&quot;;[.U218]=&quot;BLOCKED&quot;);&quot;NOT REVIEW ELIGIBLE&quot;;&quot;NOT REVIEW ELIGIBLE&quot;))">
            <text:p>NOT REVIEW ELIGIBLE</text:p>
          </table:table-cell>
          <table:table-cell office:value-type="string" table:formula="of:=IF([.W218]=&quot;NOT REVIEW ELIGIBLE&quot;;&quot;DO NOT BEGIN SETTLEMENT REVIEW — RESOLVE READINESS OR CONTRADICTION CONDITIONS&quot;;IF([.W21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8]=&quot;&quot;;&quot;UNKNOWN&quot;;IF([.W218]&lt;&gt;&quot;REVIEW ELIGIBLE — NO AUTHORITY&quot;;&quot;BLOCKED — OUTCOME ASSERTED WITHOUT REVIEW ELIGIBILITY&quot;;IF(OR([.Y218]=&quot;REVIEWED — NO AUTHORITY&quot;;[.Y218]=&quot;REVIEW DEFERRED&quot;;[.Y21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19]=&quot;&quot;;IF(AND([.L219]=&quot;&quot;;[.N219]=&quot;&quot;);&quot;UNKNOWN&quot;;&quot;CONTRADICTION&quot;);IF([.M219]=&quot;UNMATCHED&quot;;IF(AND([.L219]=&quot;&quot;;[.N219]=&quot;&quot;);&quot;CLEAR&quot;;&quot;CONTRADICTION&quot;);IF([.M219]=&quot;SINGLE_SALE_LINKED&quot;;IF(AND([.L219]&lt;&gt;&quot;&quot;;[.N219]=&quot;&quot;);&quot;CLEAR&quot;;&quot;CONTRADICTION&quot;);IF([.M219]=&quot;MULTI_SALE_PENDING_ALLOCATION&quot;;IF([.L219]=&quot;&quot;;&quot;CLEAR&quot;;&quot;CONTRADICTION&quot;);IF([.M219]=&quot;ALLOCATED&quot;;IF(AND([.L219]=&quot;&quot;;[.N219]&lt;&gt;&quot;&quot;);&quot;CLEAR&quot;;&quot;CONTRADICTION&quot;);&quot;CONTRADICTION&quot;)))))">
            <text:p>UNKNOWN</text:p>
          </table:table-cell>
          <table:table-cell office:value-type="string" table:formula="of:=IF([.S219]=&quot;UNKNOWN&quot;;&quot;NO ACTION — linkage status is UNKNOWN / not asserted&quot;;IF([.S219]=&quot;CLEAR&quot;;&quot;NO CONTRADICTION — preserve evidence as entered&quot;;IF([.M219]=&quot;&quot;;&quot;REVIEW LINKAGE STATUS — identifiers are present while status is UNKNOWN&quot;;IF([.M219]=&quot;UNMATCHED&quot;;&quot;REMOVE LINKAGE IDENTIFIERS OR CORRECT LINKAGE STATUS&quot;;IF([.M219]=&quot;SINGLE_SALE_LINKED&quot;;&quot;REQUIRE LINKED SALE ID AND NO ALLOCATION GROUP ID&quot;;IF([.M219]=&quot;MULTI_SALE_PENDING_ALLOCATION&quot;;&quot;REMOVE LINKED SALE ID OR CORRECT LINKAGE STATUS&quot;;IF([.M219]=&quot;ALLOCATED&quot;;&quot;REQUIRE ALLOCATION GROUP ID AND NO LINKED SALE ID&quot;;&quot;REVIEW LINKAGE EVIDENCE — NO AUTHORITY CREATED&quot;)))))))">
            <text:p>NO ACTION — linkage status is UNKNOWN / not asserted</text:p>
          </table:table-cell>
          <table:table-cell office:value-type="string" table:formula="of:=IF([.S219]=&quot;CONTRADICTION&quot;;&quot;BLOCKED&quot;;IF([.S219]=&quot;UNKNOWN&quot;;&quot;UNKNOWN&quot;;IF([.S219]=&quot;CLEAR&quot;;IF(OR([.O219]=&quot;&quot;;[.P219]=&quot;&quot;);&quot;UNKNOWN&quot;;&quot;READY FOR REVIEW&quot;);&quot;BLOCKED&quot;)))">
            <text:p>UNKNOWN</text:p>
          </table:table-cell>
          <table:table-cell office:value-type="string" table:formula="of:=IF([.U219]=&quot;UNKNOWN&quot;;&quot;COMPLETE OR ASSERT REQUIRED EVIDENCE BEFORE REVIEW&quot;;IF([.U219]=&quot;BLOCKED&quot;;&quot;RESOLVE CONTRADICTION BEFORE REVIEW — NO AUTHORITY CREATED&quot;;IF([.U21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19]=&quot;READY FOR REVIEW&quot;;&quot;REVIEW ELIGIBLE — NO AUTHORITY&quot;;IF(OR([.U219]=&quot;UNKNOWN&quot;;[.U219]=&quot;BLOCKED&quot;);&quot;NOT REVIEW ELIGIBLE&quot;;&quot;NOT REVIEW ELIGIBLE&quot;))">
            <text:p>NOT REVIEW ELIGIBLE</text:p>
          </table:table-cell>
          <table:table-cell office:value-type="string" table:formula="of:=IF([.W219]=&quot;NOT REVIEW ELIGIBLE&quot;;&quot;DO NOT BEGIN SETTLEMENT REVIEW — RESOLVE READINESS OR CONTRADICTION CONDITIONS&quot;;IF([.W21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19]=&quot;&quot;;&quot;UNKNOWN&quot;;IF([.W219]&lt;&gt;&quot;REVIEW ELIGIBLE — NO AUTHORITY&quot;;&quot;BLOCKED — OUTCOME ASSERTED WITHOUT REVIEW ELIGIBILITY&quot;;IF(OR([.Y219]=&quot;REVIEWED — NO AUTHORITY&quot;;[.Y219]=&quot;REVIEW DEFERRED&quot;;[.Y21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0]=&quot;&quot;;IF(AND([.L220]=&quot;&quot;;[.N220]=&quot;&quot;);&quot;UNKNOWN&quot;;&quot;CONTRADICTION&quot;);IF([.M220]=&quot;UNMATCHED&quot;;IF(AND([.L220]=&quot;&quot;;[.N220]=&quot;&quot;);&quot;CLEAR&quot;;&quot;CONTRADICTION&quot;);IF([.M220]=&quot;SINGLE_SALE_LINKED&quot;;IF(AND([.L220]&lt;&gt;&quot;&quot;;[.N220]=&quot;&quot;);&quot;CLEAR&quot;;&quot;CONTRADICTION&quot;);IF([.M220]=&quot;MULTI_SALE_PENDING_ALLOCATION&quot;;IF([.L220]=&quot;&quot;;&quot;CLEAR&quot;;&quot;CONTRADICTION&quot;);IF([.M220]=&quot;ALLOCATED&quot;;IF(AND([.L220]=&quot;&quot;;[.N220]&lt;&gt;&quot;&quot;);&quot;CLEAR&quot;;&quot;CONTRADICTION&quot;);&quot;CONTRADICTION&quot;)))))">
            <text:p>UNKNOWN</text:p>
          </table:table-cell>
          <table:table-cell office:value-type="string" table:formula="of:=IF([.S220]=&quot;UNKNOWN&quot;;&quot;NO ACTION — linkage status is UNKNOWN / not asserted&quot;;IF([.S220]=&quot;CLEAR&quot;;&quot;NO CONTRADICTION — preserve evidence as entered&quot;;IF([.M220]=&quot;&quot;;&quot;REVIEW LINKAGE STATUS — identifiers are present while status is UNKNOWN&quot;;IF([.M220]=&quot;UNMATCHED&quot;;&quot;REMOVE LINKAGE IDENTIFIERS OR CORRECT LINKAGE STATUS&quot;;IF([.M220]=&quot;SINGLE_SALE_LINKED&quot;;&quot;REQUIRE LINKED SALE ID AND NO ALLOCATION GROUP ID&quot;;IF([.M220]=&quot;MULTI_SALE_PENDING_ALLOCATION&quot;;&quot;REMOVE LINKED SALE ID OR CORRECT LINKAGE STATUS&quot;;IF([.M220]=&quot;ALLOCATED&quot;;&quot;REQUIRE ALLOCATION GROUP ID AND NO LINKED SALE ID&quot;;&quot;REVIEW LINKAGE EVIDENCE — NO AUTHORITY CREATED&quot;)))))))">
            <text:p>NO ACTION — linkage status is UNKNOWN / not asserted</text:p>
          </table:table-cell>
          <table:table-cell office:value-type="string" table:formula="of:=IF([.S220]=&quot;CONTRADICTION&quot;;&quot;BLOCKED&quot;;IF([.S220]=&quot;UNKNOWN&quot;;&quot;UNKNOWN&quot;;IF([.S220]=&quot;CLEAR&quot;;IF(OR([.O220]=&quot;&quot;;[.P220]=&quot;&quot;);&quot;UNKNOWN&quot;;&quot;READY FOR REVIEW&quot;);&quot;BLOCKED&quot;)))">
            <text:p>UNKNOWN</text:p>
          </table:table-cell>
          <table:table-cell office:value-type="string" table:formula="of:=IF([.U220]=&quot;UNKNOWN&quot;;&quot;COMPLETE OR ASSERT REQUIRED EVIDENCE BEFORE REVIEW&quot;;IF([.U220]=&quot;BLOCKED&quot;;&quot;RESOLVE CONTRADICTION BEFORE REVIEW — NO AUTHORITY CREATED&quot;;IF([.U22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0]=&quot;READY FOR REVIEW&quot;;&quot;REVIEW ELIGIBLE — NO AUTHORITY&quot;;IF(OR([.U220]=&quot;UNKNOWN&quot;;[.U220]=&quot;BLOCKED&quot;);&quot;NOT REVIEW ELIGIBLE&quot;;&quot;NOT REVIEW ELIGIBLE&quot;))">
            <text:p>NOT REVIEW ELIGIBLE</text:p>
          </table:table-cell>
          <table:table-cell office:value-type="string" table:formula="of:=IF([.W220]=&quot;NOT REVIEW ELIGIBLE&quot;;&quot;DO NOT BEGIN SETTLEMENT REVIEW — RESOLVE READINESS OR CONTRADICTION CONDITIONS&quot;;IF([.W22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0]=&quot;&quot;;&quot;UNKNOWN&quot;;IF([.W220]&lt;&gt;&quot;REVIEW ELIGIBLE — NO AUTHORITY&quot;;&quot;BLOCKED — OUTCOME ASSERTED WITHOUT REVIEW ELIGIBILITY&quot;;IF(OR([.Y220]=&quot;REVIEWED — NO AUTHORITY&quot;;[.Y220]=&quot;REVIEW DEFERRED&quot;;[.Y22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1]=&quot;&quot;;IF(AND([.L221]=&quot;&quot;;[.N221]=&quot;&quot;);&quot;UNKNOWN&quot;;&quot;CONTRADICTION&quot;);IF([.M221]=&quot;UNMATCHED&quot;;IF(AND([.L221]=&quot;&quot;;[.N221]=&quot;&quot;);&quot;CLEAR&quot;;&quot;CONTRADICTION&quot;);IF([.M221]=&quot;SINGLE_SALE_LINKED&quot;;IF(AND([.L221]&lt;&gt;&quot;&quot;;[.N221]=&quot;&quot;);&quot;CLEAR&quot;;&quot;CONTRADICTION&quot;);IF([.M221]=&quot;MULTI_SALE_PENDING_ALLOCATION&quot;;IF([.L221]=&quot;&quot;;&quot;CLEAR&quot;;&quot;CONTRADICTION&quot;);IF([.M221]=&quot;ALLOCATED&quot;;IF(AND([.L221]=&quot;&quot;;[.N221]&lt;&gt;&quot;&quot;);&quot;CLEAR&quot;;&quot;CONTRADICTION&quot;);&quot;CONTRADICTION&quot;)))))">
            <text:p>UNKNOWN</text:p>
          </table:table-cell>
          <table:table-cell office:value-type="string" table:formula="of:=IF([.S221]=&quot;UNKNOWN&quot;;&quot;NO ACTION — linkage status is UNKNOWN / not asserted&quot;;IF([.S221]=&quot;CLEAR&quot;;&quot;NO CONTRADICTION — preserve evidence as entered&quot;;IF([.M221]=&quot;&quot;;&quot;REVIEW LINKAGE STATUS — identifiers are present while status is UNKNOWN&quot;;IF([.M221]=&quot;UNMATCHED&quot;;&quot;REMOVE LINKAGE IDENTIFIERS OR CORRECT LINKAGE STATUS&quot;;IF([.M221]=&quot;SINGLE_SALE_LINKED&quot;;&quot;REQUIRE LINKED SALE ID AND NO ALLOCATION GROUP ID&quot;;IF([.M221]=&quot;MULTI_SALE_PENDING_ALLOCATION&quot;;&quot;REMOVE LINKED SALE ID OR CORRECT LINKAGE STATUS&quot;;IF([.M221]=&quot;ALLOCATED&quot;;&quot;REQUIRE ALLOCATION GROUP ID AND NO LINKED SALE ID&quot;;&quot;REVIEW LINKAGE EVIDENCE — NO AUTHORITY CREATED&quot;)))))))">
            <text:p>NO ACTION — linkage status is UNKNOWN / not asserted</text:p>
          </table:table-cell>
          <table:table-cell office:value-type="string" table:formula="of:=IF([.S221]=&quot;CONTRADICTION&quot;;&quot;BLOCKED&quot;;IF([.S221]=&quot;UNKNOWN&quot;;&quot;UNKNOWN&quot;;IF([.S221]=&quot;CLEAR&quot;;IF(OR([.O221]=&quot;&quot;;[.P221]=&quot;&quot;);&quot;UNKNOWN&quot;;&quot;READY FOR REVIEW&quot;);&quot;BLOCKED&quot;)))">
            <text:p>UNKNOWN</text:p>
          </table:table-cell>
          <table:table-cell office:value-type="string" table:formula="of:=IF([.U221]=&quot;UNKNOWN&quot;;&quot;COMPLETE OR ASSERT REQUIRED EVIDENCE BEFORE REVIEW&quot;;IF([.U221]=&quot;BLOCKED&quot;;&quot;RESOLVE CONTRADICTION BEFORE REVIEW — NO AUTHORITY CREATED&quot;;IF([.U22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1]=&quot;READY FOR REVIEW&quot;;&quot;REVIEW ELIGIBLE — NO AUTHORITY&quot;;IF(OR([.U221]=&quot;UNKNOWN&quot;;[.U221]=&quot;BLOCKED&quot;);&quot;NOT REVIEW ELIGIBLE&quot;;&quot;NOT REVIEW ELIGIBLE&quot;))">
            <text:p>NOT REVIEW ELIGIBLE</text:p>
          </table:table-cell>
          <table:table-cell office:value-type="string" table:formula="of:=IF([.W221]=&quot;NOT REVIEW ELIGIBLE&quot;;&quot;DO NOT BEGIN SETTLEMENT REVIEW — RESOLVE READINESS OR CONTRADICTION CONDITIONS&quot;;IF([.W22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1]=&quot;&quot;;&quot;UNKNOWN&quot;;IF([.W221]&lt;&gt;&quot;REVIEW ELIGIBLE — NO AUTHORITY&quot;;&quot;BLOCKED — OUTCOME ASSERTED WITHOUT REVIEW ELIGIBILITY&quot;;IF(OR([.Y221]=&quot;REVIEWED — NO AUTHORITY&quot;;[.Y221]=&quot;REVIEW DEFERRED&quot;;[.Y221]=&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2]=&quot;&quot;;IF(AND([.L222]=&quot;&quot;;[.N222]=&quot;&quot;);&quot;UNKNOWN&quot;;&quot;CONTRADICTION&quot;);IF([.M222]=&quot;UNMATCHED&quot;;IF(AND([.L222]=&quot;&quot;;[.N222]=&quot;&quot;);&quot;CLEAR&quot;;&quot;CONTRADICTION&quot;);IF([.M222]=&quot;SINGLE_SALE_LINKED&quot;;IF(AND([.L222]&lt;&gt;&quot;&quot;;[.N222]=&quot;&quot;);&quot;CLEAR&quot;;&quot;CONTRADICTION&quot;);IF([.M222]=&quot;MULTI_SALE_PENDING_ALLOCATION&quot;;IF([.L222]=&quot;&quot;;&quot;CLEAR&quot;;&quot;CONTRADICTION&quot;);IF([.M222]=&quot;ALLOCATED&quot;;IF(AND([.L222]=&quot;&quot;;[.N222]&lt;&gt;&quot;&quot;);&quot;CLEAR&quot;;&quot;CONTRADICTION&quot;);&quot;CONTRADICTION&quot;)))))">
            <text:p>UNKNOWN</text:p>
          </table:table-cell>
          <table:table-cell office:value-type="string" table:formula="of:=IF([.S222]=&quot;UNKNOWN&quot;;&quot;NO ACTION — linkage status is UNKNOWN / not asserted&quot;;IF([.S222]=&quot;CLEAR&quot;;&quot;NO CONTRADICTION — preserve evidence as entered&quot;;IF([.M222]=&quot;&quot;;&quot;REVIEW LINKAGE STATUS — identifiers are present while status is UNKNOWN&quot;;IF([.M222]=&quot;UNMATCHED&quot;;&quot;REMOVE LINKAGE IDENTIFIERS OR CORRECT LINKAGE STATUS&quot;;IF([.M222]=&quot;SINGLE_SALE_LINKED&quot;;&quot;REQUIRE LINKED SALE ID AND NO ALLOCATION GROUP ID&quot;;IF([.M222]=&quot;MULTI_SALE_PENDING_ALLOCATION&quot;;&quot;REMOVE LINKED SALE ID OR CORRECT LINKAGE STATUS&quot;;IF([.M222]=&quot;ALLOCATED&quot;;&quot;REQUIRE ALLOCATION GROUP ID AND NO LINKED SALE ID&quot;;&quot;REVIEW LINKAGE EVIDENCE — NO AUTHORITY CREATED&quot;)))))))">
            <text:p>NO ACTION — linkage status is UNKNOWN / not asserted</text:p>
          </table:table-cell>
          <table:table-cell office:value-type="string" table:formula="of:=IF([.S222]=&quot;CONTRADICTION&quot;;&quot;BLOCKED&quot;;IF([.S222]=&quot;UNKNOWN&quot;;&quot;UNKNOWN&quot;;IF([.S222]=&quot;CLEAR&quot;;IF(OR([.O222]=&quot;&quot;;[.P222]=&quot;&quot;);&quot;UNKNOWN&quot;;&quot;READY FOR REVIEW&quot;);&quot;BLOCKED&quot;)))">
            <text:p>UNKNOWN</text:p>
          </table:table-cell>
          <table:table-cell office:value-type="string" table:formula="of:=IF([.U222]=&quot;UNKNOWN&quot;;&quot;COMPLETE OR ASSERT REQUIRED EVIDENCE BEFORE REVIEW&quot;;IF([.U222]=&quot;BLOCKED&quot;;&quot;RESOLVE CONTRADICTION BEFORE REVIEW — NO AUTHORITY CREATED&quot;;IF([.U22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2]=&quot;READY FOR REVIEW&quot;;&quot;REVIEW ELIGIBLE — NO AUTHORITY&quot;;IF(OR([.U222]=&quot;UNKNOWN&quot;;[.U222]=&quot;BLOCKED&quot;);&quot;NOT REVIEW ELIGIBLE&quot;;&quot;NOT REVIEW ELIGIBLE&quot;))">
            <text:p>NOT REVIEW ELIGIBLE</text:p>
          </table:table-cell>
          <table:table-cell office:value-type="string" table:formula="of:=IF([.W222]=&quot;NOT REVIEW ELIGIBLE&quot;;&quot;DO NOT BEGIN SETTLEMENT REVIEW — RESOLVE READINESS OR CONTRADICTION CONDITIONS&quot;;IF([.W22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2]=&quot;&quot;;&quot;UNKNOWN&quot;;IF([.W222]&lt;&gt;&quot;REVIEW ELIGIBLE — NO AUTHORITY&quot;;&quot;BLOCKED — OUTCOME ASSERTED WITHOUT REVIEW ELIGIBILITY&quot;;IF(OR([.Y222]=&quot;REVIEWED — NO AUTHORITY&quot;;[.Y222]=&quot;REVIEW DEFERRED&quot;;[.Y22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3]=&quot;&quot;;IF(AND([.L223]=&quot;&quot;;[.N223]=&quot;&quot;);&quot;UNKNOWN&quot;;&quot;CONTRADICTION&quot;);IF([.M223]=&quot;UNMATCHED&quot;;IF(AND([.L223]=&quot;&quot;;[.N223]=&quot;&quot;);&quot;CLEAR&quot;;&quot;CONTRADICTION&quot;);IF([.M223]=&quot;SINGLE_SALE_LINKED&quot;;IF(AND([.L223]&lt;&gt;&quot;&quot;;[.N223]=&quot;&quot;);&quot;CLEAR&quot;;&quot;CONTRADICTION&quot;);IF([.M223]=&quot;MULTI_SALE_PENDING_ALLOCATION&quot;;IF([.L223]=&quot;&quot;;&quot;CLEAR&quot;;&quot;CONTRADICTION&quot;);IF([.M223]=&quot;ALLOCATED&quot;;IF(AND([.L223]=&quot;&quot;;[.N223]&lt;&gt;&quot;&quot;);&quot;CLEAR&quot;;&quot;CONTRADICTION&quot;);&quot;CONTRADICTION&quot;)))))">
            <text:p>UNKNOWN</text:p>
          </table:table-cell>
          <table:table-cell office:value-type="string" table:formula="of:=IF([.S223]=&quot;UNKNOWN&quot;;&quot;NO ACTION — linkage status is UNKNOWN / not asserted&quot;;IF([.S223]=&quot;CLEAR&quot;;&quot;NO CONTRADICTION — preserve evidence as entered&quot;;IF([.M223]=&quot;&quot;;&quot;REVIEW LINKAGE STATUS — identifiers are present while status is UNKNOWN&quot;;IF([.M223]=&quot;UNMATCHED&quot;;&quot;REMOVE LINKAGE IDENTIFIERS OR CORRECT LINKAGE STATUS&quot;;IF([.M223]=&quot;SINGLE_SALE_LINKED&quot;;&quot;REQUIRE LINKED SALE ID AND NO ALLOCATION GROUP ID&quot;;IF([.M223]=&quot;MULTI_SALE_PENDING_ALLOCATION&quot;;&quot;REMOVE LINKED SALE ID OR CORRECT LINKAGE STATUS&quot;;IF([.M223]=&quot;ALLOCATED&quot;;&quot;REQUIRE ALLOCATION GROUP ID AND NO LINKED SALE ID&quot;;&quot;REVIEW LINKAGE EVIDENCE — NO AUTHORITY CREATED&quot;)))))))">
            <text:p>NO ACTION — linkage status is UNKNOWN / not asserted</text:p>
          </table:table-cell>
          <table:table-cell office:value-type="string" table:formula="of:=IF([.S223]=&quot;CONTRADICTION&quot;;&quot;BLOCKED&quot;;IF([.S223]=&quot;UNKNOWN&quot;;&quot;UNKNOWN&quot;;IF([.S223]=&quot;CLEAR&quot;;IF(OR([.O223]=&quot;&quot;;[.P223]=&quot;&quot;);&quot;UNKNOWN&quot;;&quot;READY FOR REVIEW&quot;);&quot;BLOCKED&quot;)))">
            <text:p>UNKNOWN</text:p>
          </table:table-cell>
          <table:table-cell office:value-type="string" table:formula="of:=IF([.U223]=&quot;UNKNOWN&quot;;&quot;COMPLETE OR ASSERT REQUIRED EVIDENCE BEFORE REVIEW&quot;;IF([.U223]=&quot;BLOCKED&quot;;&quot;RESOLVE CONTRADICTION BEFORE REVIEW — NO AUTHORITY CREATED&quot;;IF([.U22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3]=&quot;READY FOR REVIEW&quot;;&quot;REVIEW ELIGIBLE — NO AUTHORITY&quot;;IF(OR([.U223]=&quot;UNKNOWN&quot;;[.U223]=&quot;BLOCKED&quot;);&quot;NOT REVIEW ELIGIBLE&quot;;&quot;NOT REVIEW ELIGIBLE&quot;))">
            <text:p>NOT REVIEW ELIGIBLE</text:p>
          </table:table-cell>
          <table:table-cell office:value-type="string" table:formula="of:=IF([.W223]=&quot;NOT REVIEW ELIGIBLE&quot;;&quot;DO NOT BEGIN SETTLEMENT REVIEW — RESOLVE READINESS OR CONTRADICTION CONDITIONS&quot;;IF([.W22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3]=&quot;&quot;;&quot;UNKNOWN&quot;;IF([.W223]&lt;&gt;&quot;REVIEW ELIGIBLE — NO AUTHORITY&quot;;&quot;BLOCKED — OUTCOME ASSERTED WITHOUT REVIEW ELIGIBILITY&quot;;IF(OR([.Y223]=&quot;REVIEWED — NO AUTHORITY&quot;;[.Y223]=&quot;REVIEW DEFERRED&quot;;[.Y22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4]=&quot;&quot;;IF(AND([.L224]=&quot;&quot;;[.N224]=&quot;&quot;);&quot;UNKNOWN&quot;;&quot;CONTRADICTION&quot;);IF([.M224]=&quot;UNMATCHED&quot;;IF(AND([.L224]=&quot;&quot;;[.N224]=&quot;&quot;);&quot;CLEAR&quot;;&quot;CONTRADICTION&quot;);IF([.M224]=&quot;SINGLE_SALE_LINKED&quot;;IF(AND([.L224]&lt;&gt;&quot;&quot;;[.N224]=&quot;&quot;);&quot;CLEAR&quot;;&quot;CONTRADICTION&quot;);IF([.M224]=&quot;MULTI_SALE_PENDING_ALLOCATION&quot;;IF([.L224]=&quot;&quot;;&quot;CLEAR&quot;;&quot;CONTRADICTION&quot;);IF([.M224]=&quot;ALLOCATED&quot;;IF(AND([.L224]=&quot;&quot;;[.N224]&lt;&gt;&quot;&quot;);&quot;CLEAR&quot;;&quot;CONTRADICTION&quot;);&quot;CONTRADICTION&quot;)))))">
            <text:p>UNKNOWN</text:p>
          </table:table-cell>
          <table:table-cell office:value-type="string" table:formula="of:=IF([.S224]=&quot;UNKNOWN&quot;;&quot;NO ACTION — linkage status is UNKNOWN / not asserted&quot;;IF([.S224]=&quot;CLEAR&quot;;&quot;NO CONTRADICTION — preserve evidence as entered&quot;;IF([.M224]=&quot;&quot;;&quot;REVIEW LINKAGE STATUS — identifiers are present while status is UNKNOWN&quot;;IF([.M224]=&quot;UNMATCHED&quot;;&quot;REMOVE LINKAGE IDENTIFIERS OR CORRECT LINKAGE STATUS&quot;;IF([.M224]=&quot;SINGLE_SALE_LINKED&quot;;&quot;REQUIRE LINKED SALE ID AND NO ALLOCATION GROUP ID&quot;;IF([.M224]=&quot;MULTI_SALE_PENDING_ALLOCATION&quot;;&quot;REMOVE LINKED SALE ID OR CORRECT LINKAGE STATUS&quot;;IF([.M224]=&quot;ALLOCATED&quot;;&quot;REQUIRE ALLOCATION GROUP ID AND NO LINKED SALE ID&quot;;&quot;REVIEW LINKAGE EVIDENCE — NO AUTHORITY CREATED&quot;)))))))">
            <text:p>NO ACTION — linkage status is UNKNOWN / not asserted</text:p>
          </table:table-cell>
          <table:table-cell office:value-type="string" table:formula="of:=IF([.S224]=&quot;CONTRADICTION&quot;;&quot;BLOCKED&quot;;IF([.S224]=&quot;UNKNOWN&quot;;&quot;UNKNOWN&quot;;IF([.S224]=&quot;CLEAR&quot;;IF(OR([.O224]=&quot;&quot;;[.P224]=&quot;&quot;);&quot;UNKNOWN&quot;;&quot;READY FOR REVIEW&quot;);&quot;BLOCKED&quot;)))">
            <text:p>UNKNOWN</text:p>
          </table:table-cell>
          <table:table-cell office:value-type="string" table:formula="of:=IF([.U224]=&quot;UNKNOWN&quot;;&quot;COMPLETE OR ASSERT REQUIRED EVIDENCE BEFORE REVIEW&quot;;IF([.U224]=&quot;BLOCKED&quot;;&quot;RESOLVE CONTRADICTION BEFORE REVIEW — NO AUTHORITY CREATED&quot;;IF([.U22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4]=&quot;READY FOR REVIEW&quot;;&quot;REVIEW ELIGIBLE — NO AUTHORITY&quot;;IF(OR([.U224]=&quot;UNKNOWN&quot;;[.U224]=&quot;BLOCKED&quot;);&quot;NOT REVIEW ELIGIBLE&quot;;&quot;NOT REVIEW ELIGIBLE&quot;))">
            <text:p>NOT REVIEW ELIGIBLE</text:p>
          </table:table-cell>
          <table:table-cell office:value-type="string" table:formula="of:=IF([.W224]=&quot;NOT REVIEW ELIGIBLE&quot;;&quot;DO NOT BEGIN SETTLEMENT REVIEW — RESOLVE READINESS OR CONTRADICTION CONDITIONS&quot;;IF([.W22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4]=&quot;&quot;;&quot;UNKNOWN&quot;;IF([.W224]&lt;&gt;&quot;REVIEW ELIGIBLE — NO AUTHORITY&quot;;&quot;BLOCKED — OUTCOME ASSERTED WITHOUT REVIEW ELIGIBILITY&quot;;IF(OR([.Y224]=&quot;REVIEWED — NO AUTHORITY&quot;;[.Y224]=&quot;REVIEW DEFERRED&quot;;[.Y22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5]=&quot;&quot;;IF(AND([.L225]=&quot;&quot;;[.N225]=&quot;&quot;);&quot;UNKNOWN&quot;;&quot;CONTRADICTION&quot;);IF([.M225]=&quot;UNMATCHED&quot;;IF(AND([.L225]=&quot;&quot;;[.N225]=&quot;&quot;);&quot;CLEAR&quot;;&quot;CONTRADICTION&quot;);IF([.M225]=&quot;SINGLE_SALE_LINKED&quot;;IF(AND([.L225]&lt;&gt;&quot;&quot;;[.N225]=&quot;&quot;);&quot;CLEAR&quot;;&quot;CONTRADICTION&quot;);IF([.M225]=&quot;MULTI_SALE_PENDING_ALLOCATION&quot;;IF([.L225]=&quot;&quot;;&quot;CLEAR&quot;;&quot;CONTRADICTION&quot;);IF([.M225]=&quot;ALLOCATED&quot;;IF(AND([.L225]=&quot;&quot;;[.N225]&lt;&gt;&quot;&quot;);&quot;CLEAR&quot;;&quot;CONTRADICTION&quot;);&quot;CONTRADICTION&quot;)))))">
            <text:p>UNKNOWN</text:p>
          </table:table-cell>
          <table:table-cell office:value-type="string" table:formula="of:=IF([.S225]=&quot;UNKNOWN&quot;;&quot;NO ACTION — linkage status is UNKNOWN / not asserted&quot;;IF([.S225]=&quot;CLEAR&quot;;&quot;NO CONTRADICTION — preserve evidence as entered&quot;;IF([.M225]=&quot;&quot;;&quot;REVIEW LINKAGE STATUS — identifiers are present while status is UNKNOWN&quot;;IF([.M225]=&quot;UNMATCHED&quot;;&quot;REMOVE LINKAGE IDENTIFIERS OR CORRECT LINKAGE STATUS&quot;;IF([.M225]=&quot;SINGLE_SALE_LINKED&quot;;&quot;REQUIRE LINKED SALE ID AND NO ALLOCATION GROUP ID&quot;;IF([.M225]=&quot;MULTI_SALE_PENDING_ALLOCATION&quot;;&quot;REMOVE LINKED SALE ID OR CORRECT LINKAGE STATUS&quot;;IF([.M225]=&quot;ALLOCATED&quot;;&quot;REQUIRE ALLOCATION GROUP ID AND NO LINKED SALE ID&quot;;&quot;REVIEW LINKAGE EVIDENCE — NO AUTHORITY CREATED&quot;)))))))">
            <text:p>NO ACTION — linkage status is UNKNOWN / not asserted</text:p>
          </table:table-cell>
          <table:table-cell office:value-type="string" table:formula="of:=IF([.S225]=&quot;CONTRADICTION&quot;;&quot;BLOCKED&quot;;IF([.S225]=&quot;UNKNOWN&quot;;&quot;UNKNOWN&quot;;IF([.S225]=&quot;CLEAR&quot;;IF(OR([.O225]=&quot;&quot;;[.P225]=&quot;&quot;);&quot;UNKNOWN&quot;;&quot;READY FOR REVIEW&quot;);&quot;BLOCKED&quot;)))">
            <text:p>UNKNOWN</text:p>
          </table:table-cell>
          <table:table-cell office:value-type="string" table:formula="of:=IF([.U225]=&quot;UNKNOWN&quot;;&quot;COMPLETE OR ASSERT REQUIRED EVIDENCE BEFORE REVIEW&quot;;IF([.U225]=&quot;BLOCKED&quot;;&quot;RESOLVE CONTRADICTION BEFORE REVIEW — NO AUTHORITY CREATED&quot;;IF([.U22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5]=&quot;READY FOR REVIEW&quot;;&quot;REVIEW ELIGIBLE — NO AUTHORITY&quot;;IF(OR([.U225]=&quot;UNKNOWN&quot;;[.U225]=&quot;BLOCKED&quot;);&quot;NOT REVIEW ELIGIBLE&quot;;&quot;NOT REVIEW ELIGIBLE&quot;))">
            <text:p>NOT REVIEW ELIGIBLE</text:p>
          </table:table-cell>
          <table:table-cell office:value-type="string" table:formula="of:=IF([.W225]=&quot;NOT REVIEW ELIGIBLE&quot;;&quot;DO NOT BEGIN SETTLEMENT REVIEW — RESOLVE READINESS OR CONTRADICTION CONDITIONS&quot;;IF([.W22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5]=&quot;&quot;;&quot;UNKNOWN&quot;;IF([.W225]&lt;&gt;&quot;REVIEW ELIGIBLE — NO AUTHORITY&quot;;&quot;BLOCKED — OUTCOME ASSERTED WITHOUT REVIEW ELIGIBILITY&quot;;IF(OR([.Y225]=&quot;REVIEWED — NO AUTHORITY&quot;;[.Y225]=&quot;REVIEW DEFERRED&quot;;[.Y22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6]=&quot;&quot;;IF(AND([.L226]=&quot;&quot;;[.N226]=&quot;&quot;);&quot;UNKNOWN&quot;;&quot;CONTRADICTION&quot;);IF([.M226]=&quot;UNMATCHED&quot;;IF(AND([.L226]=&quot;&quot;;[.N226]=&quot;&quot;);&quot;CLEAR&quot;;&quot;CONTRADICTION&quot;);IF([.M226]=&quot;SINGLE_SALE_LINKED&quot;;IF(AND([.L226]&lt;&gt;&quot;&quot;;[.N226]=&quot;&quot;);&quot;CLEAR&quot;;&quot;CONTRADICTION&quot;);IF([.M226]=&quot;MULTI_SALE_PENDING_ALLOCATION&quot;;IF([.L226]=&quot;&quot;;&quot;CLEAR&quot;;&quot;CONTRADICTION&quot;);IF([.M226]=&quot;ALLOCATED&quot;;IF(AND([.L226]=&quot;&quot;;[.N226]&lt;&gt;&quot;&quot;);&quot;CLEAR&quot;;&quot;CONTRADICTION&quot;);&quot;CONTRADICTION&quot;)))))">
            <text:p>UNKNOWN</text:p>
          </table:table-cell>
          <table:table-cell office:value-type="string" table:formula="of:=IF([.S226]=&quot;UNKNOWN&quot;;&quot;NO ACTION — linkage status is UNKNOWN / not asserted&quot;;IF([.S226]=&quot;CLEAR&quot;;&quot;NO CONTRADICTION — preserve evidence as entered&quot;;IF([.M226]=&quot;&quot;;&quot;REVIEW LINKAGE STATUS — identifiers are present while status is UNKNOWN&quot;;IF([.M226]=&quot;UNMATCHED&quot;;&quot;REMOVE LINKAGE IDENTIFIERS OR CORRECT LINKAGE STATUS&quot;;IF([.M226]=&quot;SINGLE_SALE_LINKED&quot;;&quot;REQUIRE LINKED SALE ID AND NO ALLOCATION GROUP ID&quot;;IF([.M226]=&quot;MULTI_SALE_PENDING_ALLOCATION&quot;;&quot;REMOVE LINKED SALE ID OR CORRECT LINKAGE STATUS&quot;;IF([.M226]=&quot;ALLOCATED&quot;;&quot;REQUIRE ALLOCATION GROUP ID AND NO LINKED SALE ID&quot;;&quot;REVIEW LINKAGE EVIDENCE — NO AUTHORITY CREATED&quot;)))))))">
            <text:p>NO ACTION — linkage status is UNKNOWN / not asserted</text:p>
          </table:table-cell>
          <table:table-cell office:value-type="string" table:formula="of:=IF([.S226]=&quot;CONTRADICTION&quot;;&quot;BLOCKED&quot;;IF([.S226]=&quot;UNKNOWN&quot;;&quot;UNKNOWN&quot;;IF([.S226]=&quot;CLEAR&quot;;IF(OR([.O226]=&quot;&quot;;[.P226]=&quot;&quot;);&quot;UNKNOWN&quot;;&quot;READY FOR REVIEW&quot;);&quot;BLOCKED&quot;)))">
            <text:p>UNKNOWN</text:p>
          </table:table-cell>
          <table:table-cell office:value-type="string" table:formula="of:=IF([.U226]=&quot;UNKNOWN&quot;;&quot;COMPLETE OR ASSERT REQUIRED EVIDENCE BEFORE REVIEW&quot;;IF([.U226]=&quot;BLOCKED&quot;;&quot;RESOLVE CONTRADICTION BEFORE REVIEW — NO AUTHORITY CREATED&quot;;IF([.U22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6]=&quot;READY FOR REVIEW&quot;;&quot;REVIEW ELIGIBLE — NO AUTHORITY&quot;;IF(OR([.U226]=&quot;UNKNOWN&quot;;[.U226]=&quot;BLOCKED&quot;);&quot;NOT REVIEW ELIGIBLE&quot;;&quot;NOT REVIEW ELIGIBLE&quot;))">
            <text:p>NOT REVIEW ELIGIBLE</text:p>
          </table:table-cell>
          <table:table-cell office:value-type="string" table:formula="of:=IF([.W226]=&quot;NOT REVIEW ELIGIBLE&quot;;&quot;DO NOT BEGIN SETTLEMENT REVIEW — RESOLVE READINESS OR CONTRADICTION CONDITIONS&quot;;IF([.W22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6]=&quot;&quot;;&quot;UNKNOWN&quot;;IF([.W226]&lt;&gt;&quot;REVIEW ELIGIBLE — NO AUTHORITY&quot;;&quot;BLOCKED — OUTCOME ASSERTED WITHOUT REVIEW ELIGIBILITY&quot;;IF(OR([.Y226]=&quot;REVIEWED — NO AUTHORITY&quot;;[.Y226]=&quot;REVIEW DEFERRED&quot;;[.Y22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7]=&quot;&quot;;IF(AND([.L227]=&quot;&quot;;[.N227]=&quot;&quot;);&quot;UNKNOWN&quot;;&quot;CONTRADICTION&quot;);IF([.M227]=&quot;UNMATCHED&quot;;IF(AND([.L227]=&quot;&quot;;[.N227]=&quot;&quot;);&quot;CLEAR&quot;;&quot;CONTRADICTION&quot;);IF([.M227]=&quot;SINGLE_SALE_LINKED&quot;;IF(AND([.L227]&lt;&gt;&quot;&quot;;[.N227]=&quot;&quot;);&quot;CLEAR&quot;;&quot;CONTRADICTION&quot;);IF([.M227]=&quot;MULTI_SALE_PENDING_ALLOCATION&quot;;IF([.L227]=&quot;&quot;;&quot;CLEAR&quot;;&quot;CONTRADICTION&quot;);IF([.M227]=&quot;ALLOCATED&quot;;IF(AND([.L227]=&quot;&quot;;[.N227]&lt;&gt;&quot;&quot;);&quot;CLEAR&quot;;&quot;CONTRADICTION&quot;);&quot;CONTRADICTION&quot;)))))">
            <text:p>UNKNOWN</text:p>
          </table:table-cell>
          <table:table-cell office:value-type="string" table:formula="of:=IF([.S227]=&quot;UNKNOWN&quot;;&quot;NO ACTION — linkage status is UNKNOWN / not asserted&quot;;IF([.S227]=&quot;CLEAR&quot;;&quot;NO CONTRADICTION — preserve evidence as entered&quot;;IF([.M227]=&quot;&quot;;&quot;REVIEW LINKAGE STATUS — identifiers are present while status is UNKNOWN&quot;;IF([.M227]=&quot;UNMATCHED&quot;;&quot;REMOVE LINKAGE IDENTIFIERS OR CORRECT LINKAGE STATUS&quot;;IF([.M227]=&quot;SINGLE_SALE_LINKED&quot;;&quot;REQUIRE LINKED SALE ID AND NO ALLOCATION GROUP ID&quot;;IF([.M227]=&quot;MULTI_SALE_PENDING_ALLOCATION&quot;;&quot;REMOVE LINKED SALE ID OR CORRECT LINKAGE STATUS&quot;;IF([.M227]=&quot;ALLOCATED&quot;;&quot;REQUIRE ALLOCATION GROUP ID AND NO LINKED SALE ID&quot;;&quot;REVIEW LINKAGE EVIDENCE — NO AUTHORITY CREATED&quot;)))))))">
            <text:p>NO ACTION — linkage status is UNKNOWN / not asserted</text:p>
          </table:table-cell>
          <table:table-cell office:value-type="string" table:formula="of:=IF([.S227]=&quot;CONTRADICTION&quot;;&quot;BLOCKED&quot;;IF([.S227]=&quot;UNKNOWN&quot;;&quot;UNKNOWN&quot;;IF([.S227]=&quot;CLEAR&quot;;IF(OR([.O227]=&quot;&quot;;[.P227]=&quot;&quot;);&quot;UNKNOWN&quot;;&quot;READY FOR REVIEW&quot;);&quot;BLOCKED&quot;)))">
            <text:p>UNKNOWN</text:p>
          </table:table-cell>
          <table:table-cell office:value-type="string" table:formula="of:=IF([.U227]=&quot;UNKNOWN&quot;;&quot;COMPLETE OR ASSERT REQUIRED EVIDENCE BEFORE REVIEW&quot;;IF([.U227]=&quot;BLOCKED&quot;;&quot;RESOLVE CONTRADICTION BEFORE REVIEW — NO AUTHORITY CREATED&quot;;IF([.U22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7]=&quot;READY FOR REVIEW&quot;;&quot;REVIEW ELIGIBLE — NO AUTHORITY&quot;;IF(OR([.U227]=&quot;UNKNOWN&quot;;[.U227]=&quot;BLOCKED&quot;);&quot;NOT REVIEW ELIGIBLE&quot;;&quot;NOT REVIEW ELIGIBLE&quot;))">
            <text:p>NOT REVIEW ELIGIBLE</text:p>
          </table:table-cell>
          <table:table-cell office:value-type="string" table:formula="of:=IF([.W227]=&quot;NOT REVIEW ELIGIBLE&quot;;&quot;DO NOT BEGIN SETTLEMENT REVIEW — RESOLVE READINESS OR CONTRADICTION CONDITIONS&quot;;IF([.W22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7]=&quot;&quot;;&quot;UNKNOWN&quot;;IF([.W227]&lt;&gt;&quot;REVIEW ELIGIBLE — NO AUTHORITY&quot;;&quot;BLOCKED — OUTCOME ASSERTED WITHOUT REVIEW ELIGIBILITY&quot;;IF(OR([.Y227]=&quot;REVIEWED — NO AUTHORITY&quot;;[.Y227]=&quot;REVIEW DEFERRED&quot;;[.Y22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8]=&quot;&quot;;IF(AND([.L228]=&quot;&quot;;[.N228]=&quot;&quot;);&quot;UNKNOWN&quot;;&quot;CONTRADICTION&quot;);IF([.M228]=&quot;UNMATCHED&quot;;IF(AND([.L228]=&quot;&quot;;[.N228]=&quot;&quot;);&quot;CLEAR&quot;;&quot;CONTRADICTION&quot;);IF([.M228]=&quot;SINGLE_SALE_LINKED&quot;;IF(AND([.L228]&lt;&gt;&quot;&quot;;[.N228]=&quot;&quot;);&quot;CLEAR&quot;;&quot;CONTRADICTION&quot;);IF([.M228]=&quot;MULTI_SALE_PENDING_ALLOCATION&quot;;IF([.L228]=&quot;&quot;;&quot;CLEAR&quot;;&quot;CONTRADICTION&quot;);IF([.M228]=&quot;ALLOCATED&quot;;IF(AND([.L228]=&quot;&quot;;[.N228]&lt;&gt;&quot;&quot;);&quot;CLEAR&quot;;&quot;CONTRADICTION&quot;);&quot;CONTRADICTION&quot;)))))">
            <text:p>UNKNOWN</text:p>
          </table:table-cell>
          <table:table-cell office:value-type="string" table:formula="of:=IF([.S228]=&quot;UNKNOWN&quot;;&quot;NO ACTION — linkage status is UNKNOWN / not asserted&quot;;IF([.S228]=&quot;CLEAR&quot;;&quot;NO CONTRADICTION — preserve evidence as entered&quot;;IF([.M228]=&quot;&quot;;&quot;REVIEW LINKAGE STATUS — identifiers are present while status is UNKNOWN&quot;;IF([.M228]=&quot;UNMATCHED&quot;;&quot;REMOVE LINKAGE IDENTIFIERS OR CORRECT LINKAGE STATUS&quot;;IF([.M228]=&quot;SINGLE_SALE_LINKED&quot;;&quot;REQUIRE LINKED SALE ID AND NO ALLOCATION GROUP ID&quot;;IF([.M228]=&quot;MULTI_SALE_PENDING_ALLOCATION&quot;;&quot;REMOVE LINKED SALE ID OR CORRECT LINKAGE STATUS&quot;;IF([.M228]=&quot;ALLOCATED&quot;;&quot;REQUIRE ALLOCATION GROUP ID AND NO LINKED SALE ID&quot;;&quot;REVIEW LINKAGE EVIDENCE — NO AUTHORITY CREATED&quot;)))))))">
            <text:p>NO ACTION — linkage status is UNKNOWN / not asserted</text:p>
          </table:table-cell>
          <table:table-cell office:value-type="string" table:formula="of:=IF([.S228]=&quot;CONTRADICTION&quot;;&quot;BLOCKED&quot;;IF([.S228]=&quot;UNKNOWN&quot;;&quot;UNKNOWN&quot;;IF([.S228]=&quot;CLEAR&quot;;IF(OR([.O228]=&quot;&quot;;[.P228]=&quot;&quot;);&quot;UNKNOWN&quot;;&quot;READY FOR REVIEW&quot;);&quot;BLOCKED&quot;)))">
            <text:p>UNKNOWN</text:p>
          </table:table-cell>
          <table:table-cell office:value-type="string" table:formula="of:=IF([.U228]=&quot;UNKNOWN&quot;;&quot;COMPLETE OR ASSERT REQUIRED EVIDENCE BEFORE REVIEW&quot;;IF([.U228]=&quot;BLOCKED&quot;;&quot;RESOLVE CONTRADICTION BEFORE REVIEW — NO AUTHORITY CREATED&quot;;IF([.U22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8]=&quot;READY FOR REVIEW&quot;;&quot;REVIEW ELIGIBLE — NO AUTHORITY&quot;;IF(OR([.U228]=&quot;UNKNOWN&quot;;[.U228]=&quot;BLOCKED&quot;);&quot;NOT REVIEW ELIGIBLE&quot;;&quot;NOT REVIEW ELIGIBLE&quot;))">
            <text:p>NOT REVIEW ELIGIBLE</text:p>
          </table:table-cell>
          <table:table-cell office:value-type="string" table:formula="of:=IF([.W228]=&quot;NOT REVIEW ELIGIBLE&quot;;&quot;DO NOT BEGIN SETTLEMENT REVIEW — RESOLVE READINESS OR CONTRADICTION CONDITIONS&quot;;IF([.W22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8]=&quot;&quot;;&quot;UNKNOWN&quot;;IF([.W228]&lt;&gt;&quot;REVIEW ELIGIBLE — NO AUTHORITY&quot;;&quot;BLOCKED — OUTCOME ASSERTED WITHOUT REVIEW ELIGIBILITY&quot;;IF(OR([.Y228]=&quot;REVIEWED — NO AUTHORITY&quot;;[.Y228]=&quot;REVIEW DEFERRED&quot;;[.Y22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29]=&quot;&quot;;IF(AND([.L229]=&quot;&quot;;[.N229]=&quot;&quot;);&quot;UNKNOWN&quot;;&quot;CONTRADICTION&quot;);IF([.M229]=&quot;UNMATCHED&quot;;IF(AND([.L229]=&quot;&quot;;[.N229]=&quot;&quot;);&quot;CLEAR&quot;;&quot;CONTRADICTION&quot;);IF([.M229]=&quot;SINGLE_SALE_LINKED&quot;;IF(AND([.L229]&lt;&gt;&quot;&quot;;[.N229]=&quot;&quot;);&quot;CLEAR&quot;;&quot;CONTRADICTION&quot;);IF([.M229]=&quot;MULTI_SALE_PENDING_ALLOCATION&quot;;IF([.L229]=&quot;&quot;;&quot;CLEAR&quot;;&quot;CONTRADICTION&quot;);IF([.M229]=&quot;ALLOCATED&quot;;IF(AND([.L229]=&quot;&quot;;[.N229]&lt;&gt;&quot;&quot;);&quot;CLEAR&quot;;&quot;CONTRADICTION&quot;);&quot;CONTRADICTION&quot;)))))">
            <text:p>UNKNOWN</text:p>
          </table:table-cell>
          <table:table-cell office:value-type="string" table:formula="of:=IF([.S229]=&quot;UNKNOWN&quot;;&quot;NO ACTION — linkage status is UNKNOWN / not asserted&quot;;IF([.S229]=&quot;CLEAR&quot;;&quot;NO CONTRADICTION — preserve evidence as entered&quot;;IF([.M229]=&quot;&quot;;&quot;REVIEW LINKAGE STATUS — identifiers are present while status is UNKNOWN&quot;;IF([.M229]=&quot;UNMATCHED&quot;;&quot;REMOVE LINKAGE IDENTIFIERS OR CORRECT LINKAGE STATUS&quot;;IF([.M229]=&quot;SINGLE_SALE_LINKED&quot;;&quot;REQUIRE LINKED SALE ID AND NO ALLOCATION GROUP ID&quot;;IF([.M229]=&quot;MULTI_SALE_PENDING_ALLOCATION&quot;;&quot;REMOVE LINKED SALE ID OR CORRECT LINKAGE STATUS&quot;;IF([.M229]=&quot;ALLOCATED&quot;;&quot;REQUIRE ALLOCATION GROUP ID AND NO LINKED SALE ID&quot;;&quot;REVIEW LINKAGE EVIDENCE — NO AUTHORITY CREATED&quot;)))))))">
            <text:p>NO ACTION — linkage status is UNKNOWN / not asserted</text:p>
          </table:table-cell>
          <table:table-cell office:value-type="string" table:formula="of:=IF([.S229]=&quot;CONTRADICTION&quot;;&quot;BLOCKED&quot;;IF([.S229]=&quot;UNKNOWN&quot;;&quot;UNKNOWN&quot;;IF([.S229]=&quot;CLEAR&quot;;IF(OR([.O229]=&quot;&quot;;[.P229]=&quot;&quot;);&quot;UNKNOWN&quot;;&quot;READY FOR REVIEW&quot;);&quot;BLOCKED&quot;)))">
            <text:p>UNKNOWN</text:p>
          </table:table-cell>
          <table:table-cell office:value-type="string" table:formula="of:=IF([.U229]=&quot;UNKNOWN&quot;;&quot;COMPLETE OR ASSERT REQUIRED EVIDENCE BEFORE REVIEW&quot;;IF([.U229]=&quot;BLOCKED&quot;;&quot;RESOLVE CONTRADICTION BEFORE REVIEW — NO AUTHORITY CREATED&quot;;IF([.U22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29]=&quot;READY FOR REVIEW&quot;;&quot;REVIEW ELIGIBLE — NO AUTHORITY&quot;;IF(OR([.U229]=&quot;UNKNOWN&quot;;[.U229]=&quot;BLOCKED&quot;);&quot;NOT REVIEW ELIGIBLE&quot;;&quot;NOT REVIEW ELIGIBLE&quot;))">
            <text:p>NOT REVIEW ELIGIBLE</text:p>
          </table:table-cell>
          <table:table-cell office:value-type="string" table:formula="of:=IF([.W229]=&quot;NOT REVIEW ELIGIBLE&quot;;&quot;DO NOT BEGIN SETTLEMENT REVIEW — RESOLVE READINESS OR CONTRADICTION CONDITIONS&quot;;IF([.W22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29]=&quot;&quot;;&quot;UNKNOWN&quot;;IF([.W229]&lt;&gt;&quot;REVIEW ELIGIBLE — NO AUTHORITY&quot;;&quot;BLOCKED — OUTCOME ASSERTED WITHOUT REVIEW ELIGIBILITY&quot;;IF(OR([.Y229]=&quot;REVIEWED — NO AUTHORITY&quot;;[.Y229]=&quot;REVIEW DEFERRED&quot;;[.Y22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0]=&quot;&quot;;IF(AND([.L230]=&quot;&quot;;[.N230]=&quot;&quot;);&quot;UNKNOWN&quot;;&quot;CONTRADICTION&quot;);IF([.M230]=&quot;UNMATCHED&quot;;IF(AND([.L230]=&quot;&quot;;[.N230]=&quot;&quot;);&quot;CLEAR&quot;;&quot;CONTRADICTION&quot;);IF([.M230]=&quot;SINGLE_SALE_LINKED&quot;;IF(AND([.L230]&lt;&gt;&quot;&quot;;[.N230]=&quot;&quot;);&quot;CLEAR&quot;;&quot;CONTRADICTION&quot;);IF([.M230]=&quot;MULTI_SALE_PENDING_ALLOCATION&quot;;IF([.L230]=&quot;&quot;;&quot;CLEAR&quot;;&quot;CONTRADICTION&quot;);IF([.M230]=&quot;ALLOCATED&quot;;IF(AND([.L230]=&quot;&quot;;[.N230]&lt;&gt;&quot;&quot;);&quot;CLEAR&quot;;&quot;CONTRADICTION&quot;);&quot;CONTRADICTION&quot;)))))">
            <text:p>UNKNOWN</text:p>
          </table:table-cell>
          <table:table-cell office:value-type="string" table:formula="of:=IF([.S230]=&quot;UNKNOWN&quot;;&quot;NO ACTION — linkage status is UNKNOWN / not asserted&quot;;IF([.S230]=&quot;CLEAR&quot;;&quot;NO CONTRADICTION — preserve evidence as entered&quot;;IF([.M230]=&quot;&quot;;&quot;REVIEW LINKAGE STATUS — identifiers are present while status is UNKNOWN&quot;;IF([.M230]=&quot;UNMATCHED&quot;;&quot;REMOVE LINKAGE IDENTIFIERS OR CORRECT LINKAGE STATUS&quot;;IF([.M230]=&quot;SINGLE_SALE_LINKED&quot;;&quot;REQUIRE LINKED SALE ID AND NO ALLOCATION GROUP ID&quot;;IF([.M230]=&quot;MULTI_SALE_PENDING_ALLOCATION&quot;;&quot;REMOVE LINKED SALE ID OR CORRECT LINKAGE STATUS&quot;;IF([.M230]=&quot;ALLOCATED&quot;;&quot;REQUIRE ALLOCATION GROUP ID AND NO LINKED SALE ID&quot;;&quot;REVIEW LINKAGE EVIDENCE — NO AUTHORITY CREATED&quot;)))))))">
            <text:p>NO ACTION — linkage status is UNKNOWN / not asserted</text:p>
          </table:table-cell>
          <table:table-cell office:value-type="string" table:formula="of:=IF([.S230]=&quot;CONTRADICTION&quot;;&quot;BLOCKED&quot;;IF([.S230]=&quot;UNKNOWN&quot;;&quot;UNKNOWN&quot;;IF([.S230]=&quot;CLEAR&quot;;IF(OR([.O230]=&quot;&quot;;[.P230]=&quot;&quot;);&quot;UNKNOWN&quot;;&quot;READY FOR REVIEW&quot;);&quot;BLOCKED&quot;)))">
            <text:p>UNKNOWN</text:p>
          </table:table-cell>
          <table:table-cell office:value-type="string" table:formula="of:=IF([.U230]=&quot;UNKNOWN&quot;;&quot;COMPLETE OR ASSERT REQUIRED EVIDENCE BEFORE REVIEW&quot;;IF([.U230]=&quot;BLOCKED&quot;;&quot;RESOLVE CONTRADICTION BEFORE REVIEW — NO AUTHORITY CREATED&quot;;IF([.U23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0]=&quot;READY FOR REVIEW&quot;;&quot;REVIEW ELIGIBLE — NO AUTHORITY&quot;;IF(OR([.U230]=&quot;UNKNOWN&quot;;[.U230]=&quot;BLOCKED&quot;);&quot;NOT REVIEW ELIGIBLE&quot;;&quot;NOT REVIEW ELIGIBLE&quot;))">
            <text:p>NOT REVIEW ELIGIBLE</text:p>
          </table:table-cell>
          <table:table-cell office:value-type="string" table:formula="of:=IF([.W230]=&quot;NOT REVIEW ELIGIBLE&quot;;&quot;DO NOT BEGIN SETTLEMENT REVIEW — RESOLVE READINESS OR CONTRADICTION CONDITIONS&quot;;IF([.W23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0]=&quot;&quot;;&quot;UNKNOWN&quot;;IF([.W230]&lt;&gt;&quot;REVIEW ELIGIBLE — NO AUTHORITY&quot;;&quot;BLOCKED — OUTCOME ASSERTED WITHOUT REVIEW ELIGIBILITY&quot;;IF(OR([.Y230]=&quot;REVIEWED — NO AUTHORITY&quot;;[.Y230]=&quot;REVIEW DEFERRED&quot;;[.Y23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1]=&quot;&quot;;IF(AND([.L231]=&quot;&quot;;[.N231]=&quot;&quot;);&quot;UNKNOWN&quot;;&quot;CONTRADICTION&quot;);IF([.M231]=&quot;UNMATCHED&quot;;IF(AND([.L231]=&quot;&quot;;[.N231]=&quot;&quot;);&quot;CLEAR&quot;;&quot;CONTRADICTION&quot;);IF([.M231]=&quot;SINGLE_SALE_LINKED&quot;;IF(AND([.L231]&lt;&gt;&quot;&quot;;[.N231]=&quot;&quot;);&quot;CLEAR&quot;;&quot;CONTRADICTION&quot;);IF([.M231]=&quot;MULTI_SALE_PENDING_ALLOCATION&quot;;IF([.L231]=&quot;&quot;;&quot;CLEAR&quot;;&quot;CONTRADICTION&quot;);IF([.M231]=&quot;ALLOCATED&quot;;IF(AND([.L231]=&quot;&quot;;[.N231]&lt;&gt;&quot;&quot;);&quot;CLEAR&quot;;&quot;CONTRADICTION&quot;);&quot;CONTRADICTION&quot;)))))">
            <text:p>UNKNOWN</text:p>
          </table:table-cell>
          <table:table-cell office:value-type="string" table:formula="of:=IF([.S231]=&quot;UNKNOWN&quot;;&quot;NO ACTION — linkage status is UNKNOWN / not asserted&quot;;IF([.S231]=&quot;CLEAR&quot;;&quot;NO CONTRADICTION — preserve evidence as entered&quot;;IF([.M231]=&quot;&quot;;&quot;REVIEW LINKAGE STATUS — identifiers are present while status is UNKNOWN&quot;;IF([.M231]=&quot;UNMATCHED&quot;;&quot;REMOVE LINKAGE IDENTIFIERS OR CORRECT LINKAGE STATUS&quot;;IF([.M231]=&quot;SINGLE_SALE_LINKED&quot;;&quot;REQUIRE LINKED SALE ID AND NO ALLOCATION GROUP ID&quot;;IF([.M231]=&quot;MULTI_SALE_PENDING_ALLOCATION&quot;;&quot;REMOVE LINKED SALE ID OR CORRECT LINKAGE STATUS&quot;;IF([.M231]=&quot;ALLOCATED&quot;;&quot;REQUIRE ALLOCATION GROUP ID AND NO LINKED SALE ID&quot;;&quot;REVIEW LINKAGE EVIDENCE — NO AUTHORITY CREATED&quot;)))))))">
            <text:p>NO ACTION — linkage status is UNKNOWN / not asserted</text:p>
          </table:table-cell>
          <table:table-cell office:value-type="string" table:formula="of:=IF([.S231]=&quot;CONTRADICTION&quot;;&quot;BLOCKED&quot;;IF([.S231]=&quot;UNKNOWN&quot;;&quot;UNKNOWN&quot;;IF([.S231]=&quot;CLEAR&quot;;IF(OR([.O231]=&quot;&quot;;[.P231]=&quot;&quot;);&quot;UNKNOWN&quot;;&quot;READY FOR REVIEW&quot;);&quot;BLOCKED&quot;)))">
            <text:p>UNKNOWN</text:p>
          </table:table-cell>
          <table:table-cell office:value-type="string" table:formula="of:=IF([.U231]=&quot;UNKNOWN&quot;;&quot;COMPLETE OR ASSERT REQUIRED EVIDENCE BEFORE REVIEW&quot;;IF([.U231]=&quot;BLOCKED&quot;;&quot;RESOLVE CONTRADICTION BEFORE REVIEW — NO AUTHORITY CREATED&quot;;IF([.U23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1]=&quot;READY FOR REVIEW&quot;;&quot;REVIEW ELIGIBLE — NO AUTHORITY&quot;;IF(OR([.U231]=&quot;UNKNOWN&quot;;[.U231]=&quot;BLOCKED&quot;);&quot;NOT REVIEW ELIGIBLE&quot;;&quot;NOT REVIEW ELIGIBLE&quot;))">
            <text:p>NOT REVIEW ELIGIBLE</text:p>
          </table:table-cell>
          <table:table-cell office:value-type="string" table:formula="of:=IF([.W231]=&quot;NOT REVIEW ELIGIBLE&quot;;&quot;DO NOT BEGIN SETTLEMENT REVIEW — RESOLVE READINESS OR CONTRADICTION CONDITIONS&quot;;IF([.W23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1]=&quot;&quot;;&quot;UNKNOWN&quot;;IF([.W231]&lt;&gt;&quot;REVIEW ELIGIBLE — NO AUTHORITY&quot;;&quot;BLOCKED — OUTCOME ASSERTED WITHOUT REVIEW ELIGIBILITY&quot;;IF(OR([.Y231]=&quot;REVIEWED — NO AUTHORITY&quot;;[.Y231]=&quot;REVIEW DEFERRED&quot;;[.Y231]=&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2]=&quot;&quot;;IF(AND([.L232]=&quot;&quot;;[.N232]=&quot;&quot;);&quot;UNKNOWN&quot;;&quot;CONTRADICTION&quot;);IF([.M232]=&quot;UNMATCHED&quot;;IF(AND([.L232]=&quot;&quot;;[.N232]=&quot;&quot;);&quot;CLEAR&quot;;&quot;CONTRADICTION&quot;);IF([.M232]=&quot;SINGLE_SALE_LINKED&quot;;IF(AND([.L232]&lt;&gt;&quot;&quot;;[.N232]=&quot;&quot;);&quot;CLEAR&quot;;&quot;CONTRADICTION&quot;);IF([.M232]=&quot;MULTI_SALE_PENDING_ALLOCATION&quot;;IF([.L232]=&quot;&quot;;&quot;CLEAR&quot;;&quot;CONTRADICTION&quot;);IF([.M232]=&quot;ALLOCATED&quot;;IF(AND([.L232]=&quot;&quot;;[.N232]&lt;&gt;&quot;&quot;);&quot;CLEAR&quot;;&quot;CONTRADICTION&quot;);&quot;CONTRADICTION&quot;)))))">
            <text:p>UNKNOWN</text:p>
          </table:table-cell>
          <table:table-cell office:value-type="string" table:formula="of:=IF([.S232]=&quot;UNKNOWN&quot;;&quot;NO ACTION — linkage status is UNKNOWN / not asserted&quot;;IF([.S232]=&quot;CLEAR&quot;;&quot;NO CONTRADICTION — preserve evidence as entered&quot;;IF([.M232]=&quot;&quot;;&quot;REVIEW LINKAGE STATUS — identifiers are present while status is UNKNOWN&quot;;IF([.M232]=&quot;UNMATCHED&quot;;&quot;REMOVE LINKAGE IDENTIFIERS OR CORRECT LINKAGE STATUS&quot;;IF([.M232]=&quot;SINGLE_SALE_LINKED&quot;;&quot;REQUIRE LINKED SALE ID AND NO ALLOCATION GROUP ID&quot;;IF([.M232]=&quot;MULTI_SALE_PENDING_ALLOCATION&quot;;&quot;REMOVE LINKED SALE ID OR CORRECT LINKAGE STATUS&quot;;IF([.M232]=&quot;ALLOCATED&quot;;&quot;REQUIRE ALLOCATION GROUP ID AND NO LINKED SALE ID&quot;;&quot;REVIEW LINKAGE EVIDENCE — NO AUTHORITY CREATED&quot;)))))))">
            <text:p>NO ACTION — linkage status is UNKNOWN / not asserted</text:p>
          </table:table-cell>
          <table:table-cell office:value-type="string" table:formula="of:=IF([.S232]=&quot;CONTRADICTION&quot;;&quot;BLOCKED&quot;;IF([.S232]=&quot;UNKNOWN&quot;;&quot;UNKNOWN&quot;;IF([.S232]=&quot;CLEAR&quot;;IF(OR([.O232]=&quot;&quot;;[.P232]=&quot;&quot;);&quot;UNKNOWN&quot;;&quot;READY FOR REVIEW&quot;);&quot;BLOCKED&quot;)))">
            <text:p>UNKNOWN</text:p>
          </table:table-cell>
          <table:table-cell office:value-type="string" table:formula="of:=IF([.U232]=&quot;UNKNOWN&quot;;&quot;COMPLETE OR ASSERT REQUIRED EVIDENCE BEFORE REVIEW&quot;;IF([.U232]=&quot;BLOCKED&quot;;&quot;RESOLVE CONTRADICTION BEFORE REVIEW — NO AUTHORITY CREATED&quot;;IF([.U23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2]=&quot;READY FOR REVIEW&quot;;&quot;REVIEW ELIGIBLE — NO AUTHORITY&quot;;IF(OR([.U232]=&quot;UNKNOWN&quot;;[.U232]=&quot;BLOCKED&quot;);&quot;NOT REVIEW ELIGIBLE&quot;;&quot;NOT REVIEW ELIGIBLE&quot;))">
            <text:p>NOT REVIEW ELIGIBLE</text:p>
          </table:table-cell>
          <table:table-cell office:value-type="string" table:formula="of:=IF([.W232]=&quot;NOT REVIEW ELIGIBLE&quot;;&quot;DO NOT BEGIN SETTLEMENT REVIEW — RESOLVE READINESS OR CONTRADICTION CONDITIONS&quot;;IF([.W23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2]=&quot;&quot;;&quot;UNKNOWN&quot;;IF([.W232]&lt;&gt;&quot;REVIEW ELIGIBLE — NO AUTHORITY&quot;;&quot;BLOCKED — OUTCOME ASSERTED WITHOUT REVIEW ELIGIBILITY&quot;;IF(OR([.Y232]=&quot;REVIEWED — NO AUTHORITY&quot;;[.Y232]=&quot;REVIEW DEFERRED&quot;;[.Y23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3]=&quot;&quot;;IF(AND([.L233]=&quot;&quot;;[.N233]=&quot;&quot;);&quot;UNKNOWN&quot;;&quot;CONTRADICTION&quot;);IF([.M233]=&quot;UNMATCHED&quot;;IF(AND([.L233]=&quot;&quot;;[.N233]=&quot;&quot;);&quot;CLEAR&quot;;&quot;CONTRADICTION&quot;);IF([.M233]=&quot;SINGLE_SALE_LINKED&quot;;IF(AND([.L233]&lt;&gt;&quot;&quot;;[.N233]=&quot;&quot;);&quot;CLEAR&quot;;&quot;CONTRADICTION&quot;);IF([.M233]=&quot;MULTI_SALE_PENDING_ALLOCATION&quot;;IF([.L233]=&quot;&quot;;&quot;CLEAR&quot;;&quot;CONTRADICTION&quot;);IF([.M233]=&quot;ALLOCATED&quot;;IF(AND([.L233]=&quot;&quot;;[.N233]&lt;&gt;&quot;&quot;);&quot;CLEAR&quot;;&quot;CONTRADICTION&quot;);&quot;CONTRADICTION&quot;)))))">
            <text:p>UNKNOWN</text:p>
          </table:table-cell>
          <table:table-cell office:value-type="string" table:formula="of:=IF([.S233]=&quot;UNKNOWN&quot;;&quot;NO ACTION — linkage status is UNKNOWN / not asserted&quot;;IF([.S233]=&quot;CLEAR&quot;;&quot;NO CONTRADICTION — preserve evidence as entered&quot;;IF([.M233]=&quot;&quot;;&quot;REVIEW LINKAGE STATUS — identifiers are present while status is UNKNOWN&quot;;IF([.M233]=&quot;UNMATCHED&quot;;&quot;REMOVE LINKAGE IDENTIFIERS OR CORRECT LINKAGE STATUS&quot;;IF([.M233]=&quot;SINGLE_SALE_LINKED&quot;;&quot;REQUIRE LINKED SALE ID AND NO ALLOCATION GROUP ID&quot;;IF([.M233]=&quot;MULTI_SALE_PENDING_ALLOCATION&quot;;&quot;REMOVE LINKED SALE ID OR CORRECT LINKAGE STATUS&quot;;IF([.M233]=&quot;ALLOCATED&quot;;&quot;REQUIRE ALLOCATION GROUP ID AND NO LINKED SALE ID&quot;;&quot;REVIEW LINKAGE EVIDENCE — NO AUTHORITY CREATED&quot;)))))))">
            <text:p>NO ACTION — linkage status is UNKNOWN / not asserted</text:p>
          </table:table-cell>
          <table:table-cell office:value-type="string" table:formula="of:=IF([.S233]=&quot;CONTRADICTION&quot;;&quot;BLOCKED&quot;;IF([.S233]=&quot;UNKNOWN&quot;;&quot;UNKNOWN&quot;;IF([.S233]=&quot;CLEAR&quot;;IF(OR([.O233]=&quot;&quot;;[.P233]=&quot;&quot;);&quot;UNKNOWN&quot;;&quot;READY FOR REVIEW&quot;);&quot;BLOCKED&quot;)))">
            <text:p>UNKNOWN</text:p>
          </table:table-cell>
          <table:table-cell office:value-type="string" table:formula="of:=IF([.U233]=&quot;UNKNOWN&quot;;&quot;COMPLETE OR ASSERT REQUIRED EVIDENCE BEFORE REVIEW&quot;;IF([.U233]=&quot;BLOCKED&quot;;&quot;RESOLVE CONTRADICTION BEFORE REVIEW — NO AUTHORITY CREATED&quot;;IF([.U23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3]=&quot;READY FOR REVIEW&quot;;&quot;REVIEW ELIGIBLE — NO AUTHORITY&quot;;IF(OR([.U233]=&quot;UNKNOWN&quot;;[.U233]=&quot;BLOCKED&quot;);&quot;NOT REVIEW ELIGIBLE&quot;;&quot;NOT REVIEW ELIGIBLE&quot;))">
            <text:p>NOT REVIEW ELIGIBLE</text:p>
          </table:table-cell>
          <table:table-cell office:value-type="string" table:formula="of:=IF([.W233]=&quot;NOT REVIEW ELIGIBLE&quot;;&quot;DO NOT BEGIN SETTLEMENT REVIEW — RESOLVE READINESS OR CONTRADICTION CONDITIONS&quot;;IF([.W23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3]=&quot;&quot;;&quot;UNKNOWN&quot;;IF([.W233]&lt;&gt;&quot;REVIEW ELIGIBLE — NO AUTHORITY&quot;;&quot;BLOCKED — OUTCOME ASSERTED WITHOUT REVIEW ELIGIBILITY&quot;;IF(OR([.Y233]=&quot;REVIEWED — NO AUTHORITY&quot;;[.Y233]=&quot;REVIEW DEFERRED&quot;;[.Y23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4]=&quot;&quot;;IF(AND([.L234]=&quot;&quot;;[.N234]=&quot;&quot;);&quot;UNKNOWN&quot;;&quot;CONTRADICTION&quot;);IF([.M234]=&quot;UNMATCHED&quot;;IF(AND([.L234]=&quot;&quot;;[.N234]=&quot;&quot;);&quot;CLEAR&quot;;&quot;CONTRADICTION&quot;);IF([.M234]=&quot;SINGLE_SALE_LINKED&quot;;IF(AND([.L234]&lt;&gt;&quot;&quot;;[.N234]=&quot;&quot;);&quot;CLEAR&quot;;&quot;CONTRADICTION&quot;);IF([.M234]=&quot;MULTI_SALE_PENDING_ALLOCATION&quot;;IF([.L234]=&quot;&quot;;&quot;CLEAR&quot;;&quot;CONTRADICTION&quot;);IF([.M234]=&quot;ALLOCATED&quot;;IF(AND([.L234]=&quot;&quot;;[.N234]&lt;&gt;&quot;&quot;);&quot;CLEAR&quot;;&quot;CONTRADICTION&quot;);&quot;CONTRADICTION&quot;)))))">
            <text:p>UNKNOWN</text:p>
          </table:table-cell>
          <table:table-cell office:value-type="string" table:formula="of:=IF([.S234]=&quot;UNKNOWN&quot;;&quot;NO ACTION — linkage status is UNKNOWN / not asserted&quot;;IF([.S234]=&quot;CLEAR&quot;;&quot;NO CONTRADICTION — preserve evidence as entered&quot;;IF([.M234]=&quot;&quot;;&quot;REVIEW LINKAGE STATUS — identifiers are present while status is UNKNOWN&quot;;IF([.M234]=&quot;UNMATCHED&quot;;&quot;REMOVE LINKAGE IDENTIFIERS OR CORRECT LINKAGE STATUS&quot;;IF([.M234]=&quot;SINGLE_SALE_LINKED&quot;;&quot;REQUIRE LINKED SALE ID AND NO ALLOCATION GROUP ID&quot;;IF([.M234]=&quot;MULTI_SALE_PENDING_ALLOCATION&quot;;&quot;REMOVE LINKED SALE ID OR CORRECT LINKAGE STATUS&quot;;IF([.M234]=&quot;ALLOCATED&quot;;&quot;REQUIRE ALLOCATION GROUP ID AND NO LINKED SALE ID&quot;;&quot;REVIEW LINKAGE EVIDENCE — NO AUTHORITY CREATED&quot;)))))))">
            <text:p>NO ACTION — linkage status is UNKNOWN / not asserted</text:p>
          </table:table-cell>
          <table:table-cell office:value-type="string" table:formula="of:=IF([.S234]=&quot;CONTRADICTION&quot;;&quot;BLOCKED&quot;;IF([.S234]=&quot;UNKNOWN&quot;;&quot;UNKNOWN&quot;;IF([.S234]=&quot;CLEAR&quot;;IF(OR([.O234]=&quot;&quot;;[.P234]=&quot;&quot;);&quot;UNKNOWN&quot;;&quot;READY FOR REVIEW&quot;);&quot;BLOCKED&quot;)))">
            <text:p>UNKNOWN</text:p>
          </table:table-cell>
          <table:table-cell office:value-type="string" table:formula="of:=IF([.U234]=&quot;UNKNOWN&quot;;&quot;COMPLETE OR ASSERT REQUIRED EVIDENCE BEFORE REVIEW&quot;;IF([.U234]=&quot;BLOCKED&quot;;&quot;RESOLVE CONTRADICTION BEFORE REVIEW — NO AUTHORITY CREATED&quot;;IF([.U23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4]=&quot;READY FOR REVIEW&quot;;&quot;REVIEW ELIGIBLE — NO AUTHORITY&quot;;IF(OR([.U234]=&quot;UNKNOWN&quot;;[.U234]=&quot;BLOCKED&quot;);&quot;NOT REVIEW ELIGIBLE&quot;;&quot;NOT REVIEW ELIGIBLE&quot;))">
            <text:p>NOT REVIEW ELIGIBLE</text:p>
          </table:table-cell>
          <table:table-cell office:value-type="string" table:formula="of:=IF([.W234]=&quot;NOT REVIEW ELIGIBLE&quot;;&quot;DO NOT BEGIN SETTLEMENT REVIEW — RESOLVE READINESS OR CONTRADICTION CONDITIONS&quot;;IF([.W23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4]=&quot;&quot;;&quot;UNKNOWN&quot;;IF([.W234]&lt;&gt;&quot;REVIEW ELIGIBLE — NO AUTHORITY&quot;;&quot;BLOCKED — OUTCOME ASSERTED WITHOUT REVIEW ELIGIBILITY&quot;;IF(OR([.Y234]=&quot;REVIEWED — NO AUTHORITY&quot;;[.Y234]=&quot;REVIEW DEFERRED&quot;;[.Y23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5]=&quot;&quot;;IF(AND([.L235]=&quot;&quot;;[.N235]=&quot;&quot;);&quot;UNKNOWN&quot;;&quot;CONTRADICTION&quot;);IF([.M235]=&quot;UNMATCHED&quot;;IF(AND([.L235]=&quot;&quot;;[.N235]=&quot;&quot;);&quot;CLEAR&quot;;&quot;CONTRADICTION&quot;);IF([.M235]=&quot;SINGLE_SALE_LINKED&quot;;IF(AND([.L235]&lt;&gt;&quot;&quot;;[.N235]=&quot;&quot;);&quot;CLEAR&quot;;&quot;CONTRADICTION&quot;);IF([.M235]=&quot;MULTI_SALE_PENDING_ALLOCATION&quot;;IF([.L235]=&quot;&quot;;&quot;CLEAR&quot;;&quot;CONTRADICTION&quot;);IF([.M235]=&quot;ALLOCATED&quot;;IF(AND([.L235]=&quot;&quot;;[.N235]&lt;&gt;&quot;&quot;);&quot;CLEAR&quot;;&quot;CONTRADICTION&quot;);&quot;CONTRADICTION&quot;)))))">
            <text:p>UNKNOWN</text:p>
          </table:table-cell>
          <table:table-cell office:value-type="string" table:formula="of:=IF([.S235]=&quot;UNKNOWN&quot;;&quot;NO ACTION — linkage status is UNKNOWN / not asserted&quot;;IF([.S235]=&quot;CLEAR&quot;;&quot;NO CONTRADICTION — preserve evidence as entered&quot;;IF([.M235]=&quot;&quot;;&quot;REVIEW LINKAGE STATUS — identifiers are present while status is UNKNOWN&quot;;IF([.M235]=&quot;UNMATCHED&quot;;&quot;REMOVE LINKAGE IDENTIFIERS OR CORRECT LINKAGE STATUS&quot;;IF([.M235]=&quot;SINGLE_SALE_LINKED&quot;;&quot;REQUIRE LINKED SALE ID AND NO ALLOCATION GROUP ID&quot;;IF([.M235]=&quot;MULTI_SALE_PENDING_ALLOCATION&quot;;&quot;REMOVE LINKED SALE ID OR CORRECT LINKAGE STATUS&quot;;IF([.M235]=&quot;ALLOCATED&quot;;&quot;REQUIRE ALLOCATION GROUP ID AND NO LINKED SALE ID&quot;;&quot;REVIEW LINKAGE EVIDENCE — NO AUTHORITY CREATED&quot;)))))))">
            <text:p>NO ACTION — linkage status is UNKNOWN / not asserted</text:p>
          </table:table-cell>
          <table:table-cell office:value-type="string" table:formula="of:=IF([.S235]=&quot;CONTRADICTION&quot;;&quot;BLOCKED&quot;;IF([.S235]=&quot;UNKNOWN&quot;;&quot;UNKNOWN&quot;;IF([.S235]=&quot;CLEAR&quot;;IF(OR([.O235]=&quot;&quot;;[.P235]=&quot;&quot;);&quot;UNKNOWN&quot;;&quot;READY FOR REVIEW&quot;);&quot;BLOCKED&quot;)))">
            <text:p>UNKNOWN</text:p>
          </table:table-cell>
          <table:table-cell office:value-type="string" table:formula="of:=IF([.U235]=&quot;UNKNOWN&quot;;&quot;COMPLETE OR ASSERT REQUIRED EVIDENCE BEFORE REVIEW&quot;;IF([.U235]=&quot;BLOCKED&quot;;&quot;RESOLVE CONTRADICTION BEFORE REVIEW — NO AUTHORITY CREATED&quot;;IF([.U23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5]=&quot;READY FOR REVIEW&quot;;&quot;REVIEW ELIGIBLE — NO AUTHORITY&quot;;IF(OR([.U235]=&quot;UNKNOWN&quot;;[.U235]=&quot;BLOCKED&quot;);&quot;NOT REVIEW ELIGIBLE&quot;;&quot;NOT REVIEW ELIGIBLE&quot;))">
            <text:p>NOT REVIEW ELIGIBLE</text:p>
          </table:table-cell>
          <table:table-cell office:value-type="string" table:formula="of:=IF([.W235]=&quot;NOT REVIEW ELIGIBLE&quot;;&quot;DO NOT BEGIN SETTLEMENT REVIEW — RESOLVE READINESS OR CONTRADICTION CONDITIONS&quot;;IF([.W23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5]=&quot;&quot;;&quot;UNKNOWN&quot;;IF([.W235]&lt;&gt;&quot;REVIEW ELIGIBLE — NO AUTHORITY&quot;;&quot;BLOCKED — OUTCOME ASSERTED WITHOUT REVIEW ELIGIBILITY&quot;;IF(OR([.Y235]=&quot;REVIEWED — NO AUTHORITY&quot;;[.Y235]=&quot;REVIEW DEFERRED&quot;;[.Y23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6]=&quot;&quot;;IF(AND([.L236]=&quot;&quot;;[.N236]=&quot;&quot;);&quot;UNKNOWN&quot;;&quot;CONTRADICTION&quot;);IF([.M236]=&quot;UNMATCHED&quot;;IF(AND([.L236]=&quot;&quot;;[.N236]=&quot;&quot;);&quot;CLEAR&quot;;&quot;CONTRADICTION&quot;);IF([.M236]=&quot;SINGLE_SALE_LINKED&quot;;IF(AND([.L236]&lt;&gt;&quot;&quot;;[.N236]=&quot;&quot;);&quot;CLEAR&quot;;&quot;CONTRADICTION&quot;);IF([.M236]=&quot;MULTI_SALE_PENDING_ALLOCATION&quot;;IF([.L236]=&quot;&quot;;&quot;CLEAR&quot;;&quot;CONTRADICTION&quot;);IF([.M236]=&quot;ALLOCATED&quot;;IF(AND([.L236]=&quot;&quot;;[.N236]&lt;&gt;&quot;&quot;);&quot;CLEAR&quot;;&quot;CONTRADICTION&quot;);&quot;CONTRADICTION&quot;)))))">
            <text:p>UNKNOWN</text:p>
          </table:table-cell>
          <table:table-cell office:value-type="string" table:formula="of:=IF([.S236]=&quot;UNKNOWN&quot;;&quot;NO ACTION — linkage status is UNKNOWN / not asserted&quot;;IF([.S236]=&quot;CLEAR&quot;;&quot;NO CONTRADICTION — preserve evidence as entered&quot;;IF([.M236]=&quot;&quot;;&quot;REVIEW LINKAGE STATUS — identifiers are present while status is UNKNOWN&quot;;IF([.M236]=&quot;UNMATCHED&quot;;&quot;REMOVE LINKAGE IDENTIFIERS OR CORRECT LINKAGE STATUS&quot;;IF([.M236]=&quot;SINGLE_SALE_LINKED&quot;;&quot;REQUIRE LINKED SALE ID AND NO ALLOCATION GROUP ID&quot;;IF([.M236]=&quot;MULTI_SALE_PENDING_ALLOCATION&quot;;&quot;REMOVE LINKED SALE ID OR CORRECT LINKAGE STATUS&quot;;IF([.M236]=&quot;ALLOCATED&quot;;&quot;REQUIRE ALLOCATION GROUP ID AND NO LINKED SALE ID&quot;;&quot;REVIEW LINKAGE EVIDENCE — NO AUTHORITY CREATED&quot;)))))))">
            <text:p>NO ACTION — linkage status is UNKNOWN / not asserted</text:p>
          </table:table-cell>
          <table:table-cell office:value-type="string" table:formula="of:=IF([.S236]=&quot;CONTRADICTION&quot;;&quot;BLOCKED&quot;;IF([.S236]=&quot;UNKNOWN&quot;;&quot;UNKNOWN&quot;;IF([.S236]=&quot;CLEAR&quot;;IF(OR([.O236]=&quot;&quot;;[.P236]=&quot;&quot;);&quot;UNKNOWN&quot;;&quot;READY FOR REVIEW&quot;);&quot;BLOCKED&quot;)))">
            <text:p>UNKNOWN</text:p>
          </table:table-cell>
          <table:table-cell office:value-type="string" table:formula="of:=IF([.U236]=&quot;UNKNOWN&quot;;&quot;COMPLETE OR ASSERT REQUIRED EVIDENCE BEFORE REVIEW&quot;;IF([.U236]=&quot;BLOCKED&quot;;&quot;RESOLVE CONTRADICTION BEFORE REVIEW — NO AUTHORITY CREATED&quot;;IF([.U23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6]=&quot;READY FOR REVIEW&quot;;&quot;REVIEW ELIGIBLE — NO AUTHORITY&quot;;IF(OR([.U236]=&quot;UNKNOWN&quot;;[.U236]=&quot;BLOCKED&quot;);&quot;NOT REVIEW ELIGIBLE&quot;;&quot;NOT REVIEW ELIGIBLE&quot;))">
            <text:p>NOT REVIEW ELIGIBLE</text:p>
          </table:table-cell>
          <table:table-cell office:value-type="string" table:formula="of:=IF([.W236]=&quot;NOT REVIEW ELIGIBLE&quot;;&quot;DO NOT BEGIN SETTLEMENT REVIEW — RESOLVE READINESS OR CONTRADICTION CONDITIONS&quot;;IF([.W23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6]=&quot;&quot;;&quot;UNKNOWN&quot;;IF([.W236]&lt;&gt;&quot;REVIEW ELIGIBLE — NO AUTHORITY&quot;;&quot;BLOCKED — OUTCOME ASSERTED WITHOUT REVIEW ELIGIBILITY&quot;;IF(OR([.Y236]=&quot;REVIEWED — NO AUTHORITY&quot;;[.Y236]=&quot;REVIEW DEFERRED&quot;;[.Y23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7]=&quot;&quot;;IF(AND([.L237]=&quot;&quot;;[.N237]=&quot;&quot;);&quot;UNKNOWN&quot;;&quot;CONTRADICTION&quot;);IF([.M237]=&quot;UNMATCHED&quot;;IF(AND([.L237]=&quot;&quot;;[.N237]=&quot;&quot;);&quot;CLEAR&quot;;&quot;CONTRADICTION&quot;);IF([.M237]=&quot;SINGLE_SALE_LINKED&quot;;IF(AND([.L237]&lt;&gt;&quot;&quot;;[.N237]=&quot;&quot;);&quot;CLEAR&quot;;&quot;CONTRADICTION&quot;);IF([.M237]=&quot;MULTI_SALE_PENDING_ALLOCATION&quot;;IF([.L237]=&quot;&quot;;&quot;CLEAR&quot;;&quot;CONTRADICTION&quot;);IF([.M237]=&quot;ALLOCATED&quot;;IF(AND([.L237]=&quot;&quot;;[.N237]&lt;&gt;&quot;&quot;);&quot;CLEAR&quot;;&quot;CONTRADICTION&quot;);&quot;CONTRADICTION&quot;)))))">
            <text:p>UNKNOWN</text:p>
          </table:table-cell>
          <table:table-cell office:value-type="string" table:formula="of:=IF([.S237]=&quot;UNKNOWN&quot;;&quot;NO ACTION — linkage status is UNKNOWN / not asserted&quot;;IF([.S237]=&quot;CLEAR&quot;;&quot;NO CONTRADICTION — preserve evidence as entered&quot;;IF([.M237]=&quot;&quot;;&quot;REVIEW LINKAGE STATUS — identifiers are present while status is UNKNOWN&quot;;IF([.M237]=&quot;UNMATCHED&quot;;&quot;REMOVE LINKAGE IDENTIFIERS OR CORRECT LINKAGE STATUS&quot;;IF([.M237]=&quot;SINGLE_SALE_LINKED&quot;;&quot;REQUIRE LINKED SALE ID AND NO ALLOCATION GROUP ID&quot;;IF([.M237]=&quot;MULTI_SALE_PENDING_ALLOCATION&quot;;&quot;REMOVE LINKED SALE ID OR CORRECT LINKAGE STATUS&quot;;IF([.M237]=&quot;ALLOCATED&quot;;&quot;REQUIRE ALLOCATION GROUP ID AND NO LINKED SALE ID&quot;;&quot;REVIEW LINKAGE EVIDENCE — NO AUTHORITY CREATED&quot;)))))))">
            <text:p>NO ACTION — linkage status is UNKNOWN / not asserted</text:p>
          </table:table-cell>
          <table:table-cell office:value-type="string" table:formula="of:=IF([.S237]=&quot;CONTRADICTION&quot;;&quot;BLOCKED&quot;;IF([.S237]=&quot;UNKNOWN&quot;;&quot;UNKNOWN&quot;;IF([.S237]=&quot;CLEAR&quot;;IF(OR([.O237]=&quot;&quot;;[.P237]=&quot;&quot;);&quot;UNKNOWN&quot;;&quot;READY FOR REVIEW&quot;);&quot;BLOCKED&quot;)))">
            <text:p>UNKNOWN</text:p>
          </table:table-cell>
          <table:table-cell office:value-type="string" table:formula="of:=IF([.U237]=&quot;UNKNOWN&quot;;&quot;COMPLETE OR ASSERT REQUIRED EVIDENCE BEFORE REVIEW&quot;;IF([.U237]=&quot;BLOCKED&quot;;&quot;RESOLVE CONTRADICTION BEFORE REVIEW — NO AUTHORITY CREATED&quot;;IF([.U23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7]=&quot;READY FOR REVIEW&quot;;&quot;REVIEW ELIGIBLE — NO AUTHORITY&quot;;IF(OR([.U237]=&quot;UNKNOWN&quot;;[.U237]=&quot;BLOCKED&quot;);&quot;NOT REVIEW ELIGIBLE&quot;;&quot;NOT REVIEW ELIGIBLE&quot;))">
            <text:p>NOT REVIEW ELIGIBLE</text:p>
          </table:table-cell>
          <table:table-cell office:value-type="string" table:formula="of:=IF([.W237]=&quot;NOT REVIEW ELIGIBLE&quot;;&quot;DO NOT BEGIN SETTLEMENT REVIEW — RESOLVE READINESS OR CONTRADICTION CONDITIONS&quot;;IF([.W23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7]=&quot;&quot;;&quot;UNKNOWN&quot;;IF([.W237]&lt;&gt;&quot;REVIEW ELIGIBLE — NO AUTHORITY&quot;;&quot;BLOCKED — OUTCOME ASSERTED WITHOUT REVIEW ELIGIBILITY&quot;;IF(OR([.Y237]=&quot;REVIEWED — NO AUTHORITY&quot;;[.Y237]=&quot;REVIEW DEFERRED&quot;;[.Y23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8]=&quot;&quot;;IF(AND([.L238]=&quot;&quot;;[.N238]=&quot;&quot;);&quot;UNKNOWN&quot;;&quot;CONTRADICTION&quot;);IF([.M238]=&quot;UNMATCHED&quot;;IF(AND([.L238]=&quot;&quot;;[.N238]=&quot;&quot;);&quot;CLEAR&quot;;&quot;CONTRADICTION&quot;);IF([.M238]=&quot;SINGLE_SALE_LINKED&quot;;IF(AND([.L238]&lt;&gt;&quot;&quot;;[.N238]=&quot;&quot;);&quot;CLEAR&quot;;&quot;CONTRADICTION&quot;);IF([.M238]=&quot;MULTI_SALE_PENDING_ALLOCATION&quot;;IF([.L238]=&quot;&quot;;&quot;CLEAR&quot;;&quot;CONTRADICTION&quot;);IF([.M238]=&quot;ALLOCATED&quot;;IF(AND([.L238]=&quot;&quot;;[.N238]&lt;&gt;&quot;&quot;);&quot;CLEAR&quot;;&quot;CONTRADICTION&quot;);&quot;CONTRADICTION&quot;)))))">
            <text:p>UNKNOWN</text:p>
          </table:table-cell>
          <table:table-cell office:value-type="string" table:formula="of:=IF([.S238]=&quot;UNKNOWN&quot;;&quot;NO ACTION — linkage status is UNKNOWN / not asserted&quot;;IF([.S238]=&quot;CLEAR&quot;;&quot;NO CONTRADICTION — preserve evidence as entered&quot;;IF([.M238]=&quot;&quot;;&quot;REVIEW LINKAGE STATUS — identifiers are present while status is UNKNOWN&quot;;IF([.M238]=&quot;UNMATCHED&quot;;&quot;REMOVE LINKAGE IDENTIFIERS OR CORRECT LINKAGE STATUS&quot;;IF([.M238]=&quot;SINGLE_SALE_LINKED&quot;;&quot;REQUIRE LINKED SALE ID AND NO ALLOCATION GROUP ID&quot;;IF([.M238]=&quot;MULTI_SALE_PENDING_ALLOCATION&quot;;&quot;REMOVE LINKED SALE ID OR CORRECT LINKAGE STATUS&quot;;IF([.M238]=&quot;ALLOCATED&quot;;&quot;REQUIRE ALLOCATION GROUP ID AND NO LINKED SALE ID&quot;;&quot;REVIEW LINKAGE EVIDENCE — NO AUTHORITY CREATED&quot;)))))))">
            <text:p>NO ACTION — linkage status is UNKNOWN / not asserted</text:p>
          </table:table-cell>
          <table:table-cell office:value-type="string" table:formula="of:=IF([.S238]=&quot;CONTRADICTION&quot;;&quot;BLOCKED&quot;;IF([.S238]=&quot;UNKNOWN&quot;;&quot;UNKNOWN&quot;;IF([.S238]=&quot;CLEAR&quot;;IF(OR([.O238]=&quot;&quot;;[.P238]=&quot;&quot;);&quot;UNKNOWN&quot;;&quot;READY FOR REVIEW&quot;);&quot;BLOCKED&quot;)))">
            <text:p>UNKNOWN</text:p>
          </table:table-cell>
          <table:table-cell office:value-type="string" table:formula="of:=IF([.U238]=&quot;UNKNOWN&quot;;&quot;COMPLETE OR ASSERT REQUIRED EVIDENCE BEFORE REVIEW&quot;;IF([.U238]=&quot;BLOCKED&quot;;&quot;RESOLVE CONTRADICTION BEFORE REVIEW — NO AUTHORITY CREATED&quot;;IF([.U23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8]=&quot;READY FOR REVIEW&quot;;&quot;REVIEW ELIGIBLE — NO AUTHORITY&quot;;IF(OR([.U238]=&quot;UNKNOWN&quot;;[.U238]=&quot;BLOCKED&quot;);&quot;NOT REVIEW ELIGIBLE&quot;;&quot;NOT REVIEW ELIGIBLE&quot;))">
            <text:p>NOT REVIEW ELIGIBLE</text:p>
          </table:table-cell>
          <table:table-cell office:value-type="string" table:formula="of:=IF([.W238]=&quot;NOT REVIEW ELIGIBLE&quot;;&quot;DO NOT BEGIN SETTLEMENT REVIEW — RESOLVE READINESS OR CONTRADICTION CONDITIONS&quot;;IF([.W23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8]=&quot;&quot;;&quot;UNKNOWN&quot;;IF([.W238]&lt;&gt;&quot;REVIEW ELIGIBLE — NO AUTHORITY&quot;;&quot;BLOCKED — OUTCOME ASSERTED WITHOUT REVIEW ELIGIBILITY&quot;;IF(OR([.Y238]=&quot;REVIEWED — NO AUTHORITY&quot;;[.Y238]=&quot;REVIEW DEFERRED&quot;;[.Y23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39]=&quot;&quot;;IF(AND([.L239]=&quot;&quot;;[.N239]=&quot;&quot;);&quot;UNKNOWN&quot;;&quot;CONTRADICTION&quot;);IF([.M239]=&quot;UNMATCHED&quot;;IF(AND([.L239]=&quot;&quot;;[.N239]=&quot;&quot;);&quot;CLEAR&quot;;&quot;CONTRADICTION&quot;);IF([.M239]=&quot;SINGLE_SALE_LINKED&quot;;IF(AND([.L239]&lt;&gt;&quot;&quot;;[.N239]=&quot;&quot;);&quot;CLEAR&quot;;&quot;CONTRADICTION&quot;);IF([.M239]=&quot;MULTI_SALE_PENDING_ALLOCATION&quot;;IF([.L239]=&quot;&quot;;&quot;CLEAR&quot;;&quot;CONTRADICTION&quot;);IF([.M239]=&quot;ALLOCATED&quot;;IF(AND([.L239]=&quot;&quot;;[.N239]&lt;&gt;&quot;&quot;);&quot;CLEAR&quot;;&quot;CONTRADICTION&quot;);&quot;CONTRADICTION&quot;)))))">
            <text:p>UNKNOWN</text:p>
          </table:table-cell>
          <table:table-cell office:value-type="string" table:formula="of:=IF([.S239]=&quot;UNKNOWN&quot;;&quot;NO ACTION — linkage status is UNKNOWN / not asserted&quot;;IF([.S239]=&quot;CLEAR&quot;;&quot;NO CONTRADICTION — preserve evidence as entered&quot;;IF([.M239]=&quot;&quot;;&quot;REVIEW LINKAGE STATUS — identifiers are present while status is UNKNOWN&quot;;IF([.M239]=&quot;UNMATCHED&quot;;&quot;REMOVE LINKAGE IDENTIFIERS OR CORRECT LINKAGE STATUS&quot;;IF([.M239]=&quot;SINGLE_SALE_LINKED&quot;;&quot;REQUIRE LINKED SALE ID AND NO ALLOCATION GROUP ID&quot;;IF([.M239]=&quot;MULTI_SALE_PENDING_ALLOCATION&quot;;&quot;REMOVE LINKED SALE ID OR CORRECT LINKAGE STATUS&quot;;IF([.M239]=&quot;ALLOCATED&quot;;&quot;REQUIRE ALLOCATION GROUP ID AND NO LINKED SALE ID&quot;;&quot;REVIEW LINKAGE EVIDENCE — NO AUTHORITY CREATED&quot;)))))))">
            <text:p>NO ACTION — linkage status is UNKNOWN / not asserted</text:p>
          </table:table-cell>
          <table:table-cell office:value-type="string" table:formula="of:=IF([.S239]=&quot;CONTRADICTION&quot;;&quot;BLOCKED&quot;;IF([.S239]=&quot;UNKNOWN&quot;;&quot;UNKNOWN&quot;;IF([.S239]=&quot;CLEAR&quot;;IF(OR([.O239]=&quot;&quot;;[.P239]=&quot;&quot;);&quot;UNKNOWN&quot;;&quot;READY FOR REVIEW&quot;);&quot;BLOCKED&quot;)))">
            <text:p>UNKNOWN</text:p>
          </table:table-cell>
          <table:table-cell office:value-type="string" table:formula="of:=IF([.U239]=&quot;UNKNOWN&quot;;&quot;COMPLETE OR ASSERT REQUIRED EVIDENCE BEFORE REVIEW&quot;;IF([.U239]=&quot;BLOCKED&quot;;&quot;RESOLVE CONTRADICTION BEFORE REVIEW — NO AUTHORITY CREATED&quot;;IF([.U23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39]=&quot;READY FOR REVIEW&quot;;&quot;REVIEW ELIGIBLE — NO AUTHORITY&quot;;IF(OR([.U239]=&quot;UNKNOWN&quot;;[.U239]=&quot;BLOCKED&quot;);&quot;NOT REVIEW ELIGIBLE&quot;;&quot;NOT REVIEW ELIGIBLE&quot;))">
            <text:p>NOT REVIEW ELIGIBLE</text:p>
          </table:table-cell>
          <table:table-cell office:value-type="string" table:formula="of:=IF([.W239]=&quot;NOT REVIEW ELIGIBLE&quot;;&quot;DO NOT BEGIN SETTLEMENT REVIEW — RESOLVE READINESS OR CONTRADICTION CONDITIONS&quot;;IF([.W23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39]=&quot;&quot;;&quot;UNKNOWN&quot;;IF([.W239]&lt;&gt;&quot;REVIEW ELIGIBLE — NO AUTHORITY&quot;;&quot;BLOCKED — OUTCOME ASSERTED WITHOUT REVIEW ELIGIBILITY&quot;;IF(OR([.Y239]=&quot;REVIEWED — NO AUTHORITY&quot;;[.Y239]=&quot;REVIEW DEFERRED&quot;;[.Y23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0]=&quot;&quot;;IF(AND([.L240]=&quot;&quot;;[.N240]=&quot;&quot;);&quot;UNKNOWN&quot;;&quot;CONTRADICTION&quot;);IF([.M240]=&quot;UNMATCHED&quot;;IF(AND([.L240]=&quot;&quot;;[.N240]=&quot;&quot;);&quot;CLEAR&quot;;&quot;CONTRADICTION&quot;);IF([.M240]=&quot;SINGLE_SALE_LINKED&quot;;IF(AND([.L240]&lt;&gt;&quot;&quot;;[.N240]=&quot;&quot;);&quot;CLEAR&quot;;&quot;CONTRADICTION&quot;);IF([.M240]=&quot;MULTI_SALE_PENDING_ALLOCATION&quot;;IF([.L240]=&quot;&quot;;&quot;CLEAR&quot;;&quot;CONTRADICTION&quot;);IF([.M240]=&quot;ALLOCATED&quot;;IF(AND([.L240]=&quot;&quot;;[.N240]&lt;&gt;&quot;&quot;);&quot;CLEAR&quot;;&quot;CONTRADICTION&quot;);&quot;CONTRADICTION&quot;)))))">
            <text:p>UNKNOWN</text:p>
          </table:table-cell>
          <table:table-cell office:value-type="string" table:formula="of:=IF([.S240]=&quot;UNKNOWN&quot;;&quot;NO ACTION — linkage status is UNKNOWN / not asserted&quot;;IF([.S240]=&quot;CLEAR&quot;;&quot;NO CONTRADICTION — preserve evidence as entered&quot;;IF([.M240]=&quot;&quot;;&quot;REVIEW LINKAGE STATUS — identifiers are present while status is UNKNOWN&quot;;IF([.M240]=&quot;UNMATCHED&quot;;&quot;REMOVE LINKAGE IDENTIFIERS OR CORRECT LINKAGE STATUS&quot;;IF([.M240]=&quot;SINGLE_SALE_LINKED&quot;;&quot;REQUIRE LINKED SALE ID AND NO ALLOCATION GROUP ID&quot;;IF([.M240]=&quot;MULTI_SALE_PENDING_ALLOCATION&quot;;&quot;REMOVE LINKED SALE ID OR CORRECT LINKAGE STATUS&quot;;IF([.M240]=&quot;ALLOCATED&quot;;&quot;REQUIRE ALLOCATION GROUP ID AND NO LINKED SALE ID&quot;;&quot;REVIEW LINKAGE EVIDENCE — NO AUTHORITY CREATED&quot;)))))))">
            <text:p>NO ACTION — linkage status is UNKNOWN / not asserted</text:p>
          </table:table-cell>
          <table:table-cell office:value-type="string" table:formula="of:=IF([.S240]=&quot;CONTRADICTION&quot;;&quot;BLOCKED&quot;;IF([.S240]=&quot;UNKNOWN&quot;;&quot;UNKNOWN&quot;;IF([.S240]=&quot;CLEAR&quot;;IF(OR([.O240]=&quot;&quot;;[.P240]=&quot;&quot;);&quot;UNKNOWN&quot;;&quot;READY FOR REVIEW&quot;);&quot;BLOCKED&quot;)))">
            <text:p>UNKNOWN</text:p>
          </table:table-cell>
          <table:table-cell office:value-type="string" table:formula="of:=IF([.U240]=&quot;UNKNOWN&quot;;&quot;COMPLETE OR ASSERT REQUIRED EVIDENCE BEFORE REVIEW&quot;;IF([.U240]=&quot;BLOCKED&quot;;&quot;RESOLVE CONTRADICTION BEFORE REVIEW — NO AUTHORITY CREATED&quot;;IF([.U24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0]=&quot;READY FOR REVIEW&quot;;&quot;REVIEW ELIGIBLE — NO AUTHORITY&quot;;IF(OR([.U240]=&quot;UNKNOWN&quot;;[.U240]=&quot;BLOCKED&quot;);&quot;NOT REVIEW ELIGIBLE&quot;;&quot;NOT REVIEW ELIGIBLE&quot;))">
            <text:p>NOT REVIEW ELIGIBLE</text:p>
          </table:table-cell>
          <table:table-cell office:value-type="string" table:formula="of:=IF([.W240]=&quot;NOT REVIEW ELIGIBLE&quot;;&quot;DO NOT BEGIN SETTLEMENT REVIEW — RESOLVE READINESS OR CONTRADICTION CONDITIONS&quot;;IF([.W24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0]=&quot;&quot;;&quot;UNKNOWN&quot;;IF([.W240]&lt;&gt;&quot;REVIEW ELIGIBLE — NO AUTHORITY&quot;;&quot;BLOCKED — OUTCOME ASSERTED WITHOUT REVIEW ELIGIBILITY&quot;;IF(OR([.Y240]=&quot;REVIEWED — NO AUTHORITY&quot;;[.Y240]=&quot;REVIEW DEFERRED&quot;;[.Y24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1]=&quot;&quot;;IF(AND([.L241]=&quot;&quot;;[.N241]=&quot;&quot;);&quot;UNKNOWN&quot;;&quot;CONTRADICTION&quot;);IF([.M241]=&quot;UNMATCHED&quot;;IF(AND([.L241]=&quot;&quot;;[.N241]=&quot;&quot;);&quot;CLEAR&quot;;&quot;CONTRADICTION&quot;);IF([.M241]=&quot;SINGLE_SALE_LINKED&quot;;IF(AND([.L241]&lt;&gt;&quot;&quot;;[.N241]=&quot;&quot;);&quot;CLEAR&quot;;&quot;CONTRADICTION&quot;);IF([.M241]=&quot;MULTI_SALE_PENDING_ALLOCATION&quot;;IF([.L241]=&quot;&quot;;&quot;CLEAR&quot;;&quot;CONTRADICTION&quot;);IF([.M241]=&quot;ALLOCATED&quot;;IF(AND([.L241]=&quot;&quot;;[.N241]&lt;&gt;&quot;&quot;);&quot;CLEAR&quot;;&quot;CONTRADICTION&quot;);&quot;CONTRADICTION&quot;)))))">
            <text:p>UNKNOWN</text:p>
          </table:table-cell>
          <table:table-cell office:value-type="string" table:formula="of:=IF([.S241]=&quot;UNKNOWN&quot;;&quot;NO ACTION — linkage status is UNKNOWN / not asserted&quot;;IF([.S241]=&quot;CLEAR&quot;;&quot;NO CONTRADICTION — preserve evidence as entered&quot;;IF([.M241]=&quot;&quot;;&quot;REVIEW LINKAGE STATUS — identifiers are present while status is UNKNOWN&quot;;IF([.M241]=&quot;UNMATCHED&quot;;&quot;REMOVE LINKAGE IDENTIFIERS OR CORRECT LINKAGE STATUS&quot;;IF([.M241]=&quot;SINGLE_SALE_LINKED&quot;;&quot;REQUIRE LINKED SALE ID AND NO ALLOCATION GROUP ID&quot;;IF([.M241]=&quot;MULTI_SALE_PENDING_ALLOCATION&quot;;&quot;REMOVE LINKED SALE ID OR CORRECT LINKAGE STATUS&quot;;IF([.M241]=&quot;ALLOCATED&quot;;&quot;REQUIRE ALLOCATION GROUP ID AND NO LINKED SALE ID&quot;;&quot;REVIEW LINKAGE EVIDENCE — NO AUTHORITY CREATED&quot;)))))))">
            <text:p>NO ACTION — linkage status is UNKNOWN / not asserted</text:p>
          </table:table-cell>
          <table:table-cell office:value-type="string" table:formula="of:=IF([.S241]=&quot;CONTRADICTION&quot;;&quot;BLOCKED&quot;;IF([.S241]=&quot;UNKNOWN&quot;;&quot;UNKNOWN&quot;;IF([.S241]=&quot;CLEAR&quot;;IF(OR([.O241]=&quot;&quot;;[.P241]=&quot;&quot;);&quot;UNKNOWN&quot;;&quot;READY FOR REVIEW&quot;);&quot;BLOCKED&quot;)))">
            <text:p>UNKNOWN</text:p>
          </table:table-cell>
          <table:table-cell office:value-type="string" table:formula="of:=IF([.U241]=&quot;UNKNOWN&quot;;&quot;COMPLETE OR ASSERT REQUIRED EVIDENCE BEFORE REVIEW&quot;;IF([.U241]=&quot;BLOCKED&quot;;&quot;RESOLVE CONTRADICTION BEFORE REVIEW — NO AUTHORITY CREATED&quot;;IF([.U24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1]=&quot;READY FOR REVIEW&quot;;&quot;REVIEW ELIGIBLE — NO AUTHORITY&quot;;IF(OR([.U241]=&quot;UNKNOWN&quot;;[.U241]=&quot;BLOCKED&quot;);&quot;NOT REVIEW ELIGIBLE&quot;;&quot;NOT REVIEW ELIGIBLE&quot;))">
            <text:p>NOT REVIEW ELIGIBLE</text:p>
          </table:table-cell>
          <table:table-cell office:value-type="string" table:formula="of:=IF([.W241]=&quot;NOT REVIEW ELIGIBLE&quot;;&quot;DO NOT BEGIN SETTLEMENT REVIEW — RESOLVE READINESS OR CONTRADICTION CONDITIONS&quot;;IF([.W24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1]=&quot;&quot;;&quot;UNKNOWN&quot;;IF([.W241]&lt;&gt;&quot;REVIEW ELIGIBLE — NO AUTHORITY&quot;;&quot;BLOCKED — OUTCOME ASSERTED WITHOUT REVIEW ELIGIBILITY&quot;;IF(OR([.Y241]=&quot;REVIEWED — NO AUTHORITY&quot;;[.Y241]=&quot;REVIEW DEFERRED&quot;;[.Y241]=&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2]=&quot;&quot;;IF(AND([.L242]=&quot;&quot;;[.N242]=&quot;&quot;);&quot;UNKNOWN&quot;;&quot;CONTRADICTION&quot;);IF([.M242]=&quot;UNMATCHED&quot;;IF(AND([.L242]=&quot;&quot;;[.N242]=&quot;&quot;);&quot;CLEAR&quot;;&quot;CONTRADICTION&quot;);IF([.M242]=&quot;SINGLE_SALE_LINKED&quot;;IF(AND([.L242]&lt;&gt;&quot;&quot;;[.N242]=&quot;&quot;);&quot;CLEAR&quot;;&quot;CONTRADICTION&quot;);IF([.M242]=&quot;MULTI_SALE_PENDING_ALLOCATION&quot;;IF([.L242]=&quot;&quot;;&quot;CLEAR&quot;;&quot;CONTRADICTION&quot;);IF([.M242]=&quot;ALLOCATED&quot;;IF(AND([.L242]=&quot;&quot;;[.N242]&lt;&gt;&quot;&quot;);&quot;CLEAR&quot;;&quot;CONTRADICTION&quot;);&quot;CONTRADICTION&quot;)))))">
            <text:p>UNKNOWN</text:p>
          </table:table-cell>
          <table:table-cell office:value-type="string" table:formula="of:=IF([.S242]=&quot;UNKNOWN&quot;;&quot;NO ACTION — linkage status is UNKNOWN / not asserted&quot;;IF([.S242]=&quot;CLEAR&quot;;&quot;NO CONTRADICTION — preserve evidence as entered&quot;;IF([.M242]=&quot;&quot;;&quot;REVIEW LINKAGE STATUS — identifiers are present while status is UNKNOWN&quot;;IF([.M242]=&quot;UNMATCHED&quot;;&quot;REMOVE LINKAGE IDENTIFIERS OR CORRECT LINKAGE STATUS&quot;;IF([.M242]=&quot;SINGLE_SALE_LINKED&quot;;&quot;REQUIRE LINKED SALE ID AND NO ALLOCATION GROUP ID&quot;;IF([.M242]=&quot;MULTI_SALE_PENDING_ALLOCATION&quot;;&quot;REMOVE LINKED SALE ID OR CORRECT LINKAGE STATUS&quot;;IF([.M242]=&quot;ALLOCATED&quot;;&quot;REQUIRE ALLOCATION GROUP ID AND NO LINKED SALE ID&quot;;&quot;REVIEW LINKAGE EVIDENCE — NO AUTHORITY CREATED&quot;)))))))">
            <text:p>NO ACTION — linkage status is UNKNOWN / not asserted</text:p>
          </table:table-cell>
          <table:table-cell office:value-type="string" table:formula="of:=IF([.S242]=&quot;CONTRADICTION&quot;;&quot;BLOCKED&quot;;IF([.S242]=&quot;UNKNOWN&quot;;&quot;UNKNOWN&quot;;IF([.S242]=&quot;CLEAR&quot;;IF(OR([.O242]=&quot;&quot;;[.P242]=&quot;&quot;);&quot;UNKNOWN&quot;;&quot;READY FOR REVIEW&quot;);&quot;BLOCKED&quot;)))">
            <text:p>UNKNOWN</text:p>
          </table:table-cell>
          <table:table-cell office:value-type="string" table:formula="of:=IF([.U242]=&quot;UNKNOWN&quot;;&quot;COMPLETE OR ASSERT REQUIRED EVIDENCE BEFORE REVIEW&quot;;IF([.U242]=&quot;BLOCKED&quot;;&quot;RESOLVE CONTRADICTION BEFORE REVIEW — NO AUTHORITY CREATED&quot;;IF([.U242]=&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2]=&quot;READY FOR REVIEW&quot;;&quot;REVIEW ELIGIBLE — NO AUTHORITY&quot;;IF(OR([.U242]=&quot;UNKNOWN&quot;;[.U242]=&quot;BLOCKED&quot;);&quot;NOT REVIEW ELIGIBLE&quot;;&quot;NOT REVIEW ELIGIBLE&quot;))">
            <text:p>NOT REVIEW ELIGIBLE</text:p>
          </table:table-cell>
          <table:table-cell office:value-type="string" table:formula="of:=IF([.W242]=&quot;NOT REVIEW ELIGIBLE&quot;;&quot;DO NOT BEGIN SETTLEMENT REVIEW — RESOLVE READINESS OR CONTRADICTION CONDITIONS&quot;;IF([.W242]=&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2]=&quot;&quot;;&quot;UNKNOWN&quot;;IF([.W242]&lt;&gt;&quot;REVIEW ELIGIBLE — NO AUTHORITY&quot;;&quot;BLOCKED — OUTCOME ASSERTED WITHOUT REVIEW ELIGIBILITY&quot;;IF(OR([.Y242]=&quot;REVIEWED — NO AUTHORITY&quot;;[.Y242]=&quot;REVIEW DEFERRED&quot;;[.Y242]=&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3]=&quot;&quot;;IF(AND([.L243]=&quot;&quot;;[.N243]=&quot;&quot;);&quot;UNKNOWN&quot;;&quot;CONTRADICTION&quot;);IF([.M243]=&quot;UNMATCHED&quot;;IF(AND([.L243]=&quot;&quot;;[.N243]=&quot;&quot;);&quot;CLEAR&quot;;&quot;CONTRADICTION&quot;);IF([.M243]=&quot;SINGLE_SALE_LINKED&quot;;IF(AND([.L243]&lt;&gt;&quot;&quot;;[.N243]=&quot;&quot;);&quot;CLEAR&quot;;&quot;CONTRADICTION&quot;);IF([.M243]=&quot;MULTI_SALE_PENDING_ALLOCATION&quot;;IF([.L243]=&quot;&quot;;&quot;CLEAR&quot;;&quot;CONTRADICTION&quot;);IF([.M243]=&quot;ALLOCATED&quot;;IF(AND([.L243]=&quot;&quot;;[.N243]&lt;&gt;&quot;&quot;);&quot;CLEAR&quot;;&quot;CONTRADICTION&quot;);&quot;CONTRADICTION&quot;)))))">
            <text:p>UNKNOWN</text:p>
          </table:table-cell>
          <table:table-cell office:value-type="string" table:formula="of:=IF([.S243]=&quot;UNKNOWN&quot;;&quot;NO ACTION — linkage status is UNKNOWN / not asserted&quot;;IF([.S243]=&quot;CLEAR&quot;;&quot;NO CONTRADICTION — preserve evidence as entered&quot;;IF([.M243]=&quot;&quot;;&quot;REVIEW LINKAGE STATUS — identifiers are present while status is UNKNOWN&quot;;IF([.M243]=&quot;UNMATCHED&quot;;&quot;REMOVE LINKAGE IDENTIFIERS OR CORRECT LINKAGE STATUS&quot;;IF([.M243]=&quot;SINGLE_SALE_LINKED&quot;;&quot;REQUIRE LINKED SALE ID AND NO ALLOCATION GROUP ID&quot;;IF([.M243]=&quot;MULTI_SALE_PENDING_ALLOCATION&quot;;&quot;REMOVE LINKED SALE ID OR CORRECT LINKAGE STATUS&quot;;IF([.M243]=&quot;ALLOCATED&quot;;&quot;REQUIRE ALLOCATION GROUP ID AND NO LINKED SALE ID&quot;;&quot;REVIEW LINKAGE EVIDENCE — NO AUTHORITY CREATED&quot;)))))))">
            <text:p>NO ACTION — linkage status is UNKNOWN / not asserted</text:p>
          </table:table-cell>
          <table:table-cell office:value-type="string" table:formula="of:=IF([.S243]=&quot;CONTRADICTION&quot;;&quot;BLOCKED&quot;;IF([.S243]=&quot;UNKNOWN&quot;;&quot;UNKNOWN&quot;;IF([.S243]=&quot;CLEAR&quot;;IF(OR([.O243]=&quot;&quot;;[.P243]=&quot;&quot;);&quot;UNKNOWN&quot;;&quot;READY FOR REVIEW&quot;);&quot;BLOCKED&quot;)))">
            <text:p>UNKNOWN</text:p>
          </table:table-cell>
          <table:table-cell office:value-type="string" table:formula="of:=IF([.U243]=&quot;UNKNOWN&quot;;&quot;COMPLETE OR ASSERT REQUIRED EVIDENCE BEFORE REVIEW&quot;;IF([.U243]=&quot;BLOCKED&quot;;&quot;RESOLVE CONTRADICTION BEFORE REVIEW — NO AUTHORITY CREATED&quot;;IF([.U243]=&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3]=&quot;READY FOR REVIEW&quot;;&quot;REVIEW ELIGIBLE — NO AUTHORITY&quot;;IF(OR([.U243]=&quot;UNKNOWN&quot;;[.U243]=&quot;BLOCKED&quot;);&quot;NOT REVIEW ELIGIBLE&quot;;&quot;NOT REVIEW ELIGIBLE&quot;))">
            <text:p>NOT REVIEW ELIGIBLE</text:p>
          </table:table-cell>
          <table:table-cell office:value-type="string" table:formula="of:=IF([.W243]=&quot;NOT REVIEW ELIGIBLE&quot;;&quot;DO NOT BEGIN SETTLEMENT REVIEW — RESOLVE READINESS OR CONTRADICTION CONDITIONS&quot;;IF([.W243]=&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3]=&quot;&quot;;&quot;UNKNOWN&quot;;IF([.W243]&lt;&gt;&quot;REVIEW ELIGIBLE — NO AUTHORITY&quot;;&quot;BLOCKED — OUTCOME ASSERTED WITHOUT REVIEW ELIGIBILITY&quot;;IF(OR([.Y243]=&quot;REVIEWED — NO AUTHORITY&quot;;[.Y243]=&quot;REVIEW DEFERRED&quot;;[.Y243]=&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4]=&quot;&quot;;IF(AND([.L244]=&quot;&quot;;[.N244]=&quot;&quot;);&quot;UNKNOWN&quot;;&quot;CONTRADICTION&quot;);IF([.M244]=&quot;UNMATCHED&quot;;IF(AND([.L244]=&quot;&quot;;[.N244]=&quot;&quot;);&quot;CLEAR&quot;;&quot;CONTRADICTION&quot;);IF([.M244]=&quot;SINGLE_SALE_LINKED&quot;;IF(AND([.L244]&lt;&gt;&quot;&quot;;[.N244]=&quot;&quot;);&quot;CLEAR&quot;;&quot;CONTRADICTION&quot;);IF([.M244]=&quot;MULTI_SALE_PENDING_ALLOCATION&quot;;IF([.L244]=&quot;&quot;;&quot;CLEAR&quot;;&quot;CONTRADICTION&quot;);IF([.M244]=&quot;ALLOCATED&quot;;IF(AND([.L244]=&quot;&quot;;[.N244]&lt;&gt;&quot;&quot;);&quot;CLEAR&quot;;&quot;CONTRADICTION&quot;);&quot;CONTRADICTION&quot;)))))">
            <text:p>UNKNOWN</text:p>
          </table:table-cell>
          <table:table-cell office:value-type="string" table:formula="of:=IF([.S244]=&quot;UNKNOWN&quot;;&quot;NO ACTION — linkage status is UNKNOWN / not asserted&quot;;IF([.S244]=&quot;CLEAR&quot;;&quot;NO CONTRADICTION — preserve evidence as entered&quot;;IF([.M244]=&quot;&quot;;&quot;REVIEW LINKAGE STATUS — identifiers are present while status is UNKNOWN&quot;;IF([.M244]=&quot;UNMATCHED&quot;;&quot;REMOVE LINKAGE IDENTIFIERS OR CORRECT LINKAGE STATUS&quot;;IF([.M244]=&quot;SINGLE_SALE_LINKED&quot;;&quot;REQUIRE LINKED SALE ID AND NO ALLOCATION GROUP ID&quot;;IF([.M244]=&quot;MULTI_SALE_PENDING_ALLOCATION&quot;;&quot;REMOVE LINKED SALE ID OR CORRECT LINKAGE STATUS&quot;;IF([.M244]=&quot;ALLOCATED&quot;;&quot;REQUIRE ALLOCATION GROUP ID AND NO LINKED SALE ID&quot;;&quot;REVIEW LINKAGE EVIDENCE — NO AUTHORITY CREATED&quot;)))))))">
            <text:p>NO ACTION — linkage status is UNKNOWN / not asserted</text:p>
          </table:table-cell>
          <table:table-cell office:value-type="string" table:formula="of:=IF([.S244]=&quot;CONTRADICTION&quot;;&quot;BLOCKED&quot;;IF([.S244]=&quot;UNKNOWN&quot;;&quot;UNKNOWN&quot;;IF([.S244]=&quot;CLEAR&quot;;IF(OR([.O244]=&quot;&quot;;[.P244]=&quot;&quot;);&quot;UNKNOWN&quot;;&quot;READY FOR REVIEW&quot;);&quot;BLOCKED&quot;)))">
            <text:p>UNKNOWN</text:p>
          </table:table-cell>
          <table:table-cell office:value-type="string" table:formula="of:=IF([.U244]=&quot;UNKNOWN&quot;;&quot;COMPLETE OR ASSERT REQUIRED EVIDENCE BEFORE REVIEW&quot;;IF([.U244]=&quot;BLOCKED&quot;;&quot;RESOLVE CONTRADICTION BEFORE REVIEW — NO AUTHORITY CREATED&quot;;IF([.U244]=&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4]=&quot;READY FOR REVIEW&quot;;&quot;REVIEW ELIGIBLE — NO AUTHORITY&quot;;IF(OR([.U244]=&quot;UNKNOWN&quot;;[.U244]=&quot;BLOCKED&quot;);&quot;NOT REVIEW ELIGIBLE&quot;;&quot;NOT REVIEW ELIGIBLE&quot;))">
            <text:p>NOT REVIEW ELIGIBLE</text:p>
          </table:table-cell>
          <table:table-cell office:value-type="string" table:formula="of:=IF([.W244]=&quot;NOT REVIEW ELIGIBLE&quot;;&quot;DO NOT BEGIN SETTLEMENT REVIEW — RESOLVE READINESS OR CONTRADICTION CONDITIONS&quot;;IF([.W244]=&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4]=&quot;&quot;;&quot;UNKNOWN&quot;;IF([.W244]&lt;&gt;&quot;REVIEW ELIGIBLE — NO AUTHORITY&quot;;&quot;BLOCKED — OUTCOME ASSERTED WITHOUT REVIEW ELIGIBILITY&quot;;IF(OR([.Y244]=&quot;REVIEWED — NO AUTHORITY&quot;;[.Y244]=&quot;REVIEW DEFERRED&quot;;[.Y244]=&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5]=&quot;&quot;;IF(AND([.L245]=&quot;&quot;;[.N245]=&quot;&quot;);&quot;UNKNOWN&quot;;&quot;CONTRADICTION&quot;);IF([.M245]=&quot;UNMATCHED&quot;;IF(AND([.L245]=&quot;&quot;;[.N245]=&quot;&quot;);&quot;CLEAR&quot;;&quot;CONTRADICTION&quot;);IF([.M245]=&quot;SINGLE_SALE_LINKED&quot;;IF(AND([.L245]&lt;&gt;&quot;&quot;;[.N245]=&quot;&quot;);&quot;CLEAR&quot;;&quot;CONTRADICTION&quot;);IF([.M245]=&quot;MULTI_SALE_PENDING_ALLOCATION&quot;;IF([.L245]=&quot;&quot;;&quot;CLEAR&quot;;&quot;CONTRADICTION&quot;);IF([.M245]=&quot;ALLOCATED&quot;;IF(AND([.L245]=&quot;&quot;;[.N245]&lt;&gt;&quot;&quot;);&quot;CLEAR&quot;;&quot;CONTRADICTION&quot;);&quot;CONTRADICTION&quot;)))))">
            <text:p>UNKNOWN</text:p>
          </table:table-cell>
          <table:table-cell office:value-type="string" table:formula="of:=IF([.S245]=&quot;UNKNOWN&quot;;&quot;NO ACTION — linkage status is UNKNOWN / not asserted&quot;;IF([.S245]=&quot;CLEAR&quot;;&quot;NO CONTRADICTION — preserve evidence as entered&quot;;IF([.M245]=&quot;&quot;;&quot;REVIEW LINKAGE STATUS — identifiers are present while status is UNKNOWN&quot;;IF([.M245]=&quot;UNMATCHED&quot;;&quot;REMOVE LINKAGE IDENTIFIERS OR CORRECT LINKAGE STATUS&quot;;IF([.M245]=&quot;SINGLE_SALE_LINKED&quot;;&quot;REQUIRE LINKED SALE ID AND NO ALLOCATION GROUP ID&quot;;IF([.M245]=&quot;MULTI_SALE_PENDING_ALLOCATION&quot;;&quot;REMOVE LINKED SALE ID OR CORRECT LINKAGE STATUS&quot;;IF([.M245]=&quot;ALLOCATED&quot;;&quot;REQUIRE ALLOCATION GROUP ID AND NO LINKED SALE ID&quot;;&quot;REVIEW LINKAGE EVIDENCE — NO AUTHORITY CREATED&quot;)))))))">
            <text:p>NO ACTION — linkage status is UNKNOWN / not asserted</text:p>
          </table:table-cell>
          <table:table-cell office:value-type="string" table:formula="of:=IF([.S245]=&quot;CONTRADICTION&quot;;&quot;BLOCKED&quot;;IF([.S245]=&quot;UNKNOWN&quot;;&quot;UNKNOWN&quot;;IF([.S245]=&quot;CLEAR&quot;;IF(OR([.O245]=&quot;&quot;;[.P245]=&quot;&quot;);&quot;UNKNOWN&quot;;&quot;READY FOR REVIEW&quot;);&quot;BLOCKED&quot;)))">
            <text:p>UNKNOWN</text:p>
          </table:table-cell>
          <table:table-cell office:value-type="string" table:formula="of:=IF([.U245]=&quot;UNKNOWN&quot;;&quot;COMPLETE OR ASSERT REQUIRED EVIDENCE BEFORE REVIEW&quot;;IF([.U245]=&quot;BLOCKED&quot;;&quot;RESOLVE CONTRADICTION BEFORE REVIEW — NO AUTHORITY CREATED&quot;;IF([.U245]=&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5]=&quot;READY FOR REVIEW&quot;;&quot;REVIEW ELIGIBLE — NO AUTHORITY&quot;;IF(OR([.U245]=&quot;UNKNOWN&quot;;[.U245]=&quot;BLOCKED&quot;);&quot;NOT REVIEW ELIGIBLE&quot;;&quot;NOT REVIEW ELIGIBLE&quot;))">
            <text:p>NOT REVIEW ELIGIBLE</text:p>
          </table:table-cell>
          <table:table-cell office:value-type="string" table:formula="of:=IF([.W245]=&quot;NOT REVIEW ELIGIBLE&quot;;&quot;DO NOT BEGIN SETTLEMENT REVIEW — RESOLVE READINESS OR CONTRADICTION CONDITIONS&quot;;IF([.W245]=&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5]=&quot;&quot;;&quot;UNKNOWN&quot;;IF([.W245]&lt;&gt;&quot;REVIEW ELIGIBLE — NO AUTHORITY&quot;;&quot;BLOCKED — OUTCOME ASSERTED WITHOUT REVIEW ELIGIBILITY&quot;;IF(OR([.Y245]=&quot;REVIEWED — NO AUTHORITY&quot;;[.Y245]=&quot;REVIEW DEFERRED&quot;;[.Y245]=&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6]=&quot;&quot;;IF(AND([.L246]=&quot;&quot;;[.N246]=&quot;&quot;);&quot;UNKNOWN&quot;;&quot;CONTRADICTION&quot;);IF([.M246]=&quot;UNMATCHED&quot;;IF(AND([.L246]=&quot;&quot;;[.N246]=&quot;&quot;);&quot;CLEAR&quot;;&quot;CONTRADICTION&quot;);IF([.M246]=&quot;SINGLE_SALE_LINKED&quot;;IF(AND([.L246]&lt;&gt;&quot;&quot;;[.N246]=&quot;&quot;);&quot;CLEAR&quot;;&quot;CONTRADICTION&quot;);IF([.M246]=&quot;MULTI_SALE_PENDING_ALLOCATION&quot;;IF([.L246]=&quot;&quot;;&quot;CLEAR&quot;;&quot;CONTRADICTION&quot;);IF([.M246]=&quot;ALLOCATED&quot;;IF(AND([.L246]=&quot;&quot;;[.N246]&lt;&gt;&quot;&quot;);&quot;CLEAR&quot;;&quot;CONTRADICTION&quot;);&quot;CONTRADICTION&quot;)))))">
            <text:p>UNKNOWN</text:p>
          </table:table-cell>
          <table:table-cell office:value-type="string" table:formula="of:=IF([.S246]=&quot;UNKNOWN&quot;;&quot;NO ACTION — linkage status is UNKNOWN / not asserted&quot;;IF([.S246]=&quot;CLEAR&quot;;&quot;NO CONTRADICTION — preserve evidence as entered&quot;;IF([.M246]=&quot;&quot;;&quot;REVIEW LINKAGE STATUS — identifiers are present while status is UNKNOWN&quot;;IF([.M246]=&quot;UNMATCHED&quot;;&quot;REMOVE LINKAGE IDENTIFIERS OR CORRECT LINKAGE STATUS&quot;;IF([.M246]=&quot;SINGLE_SALE_LINKED&quot;;&quot;REQUIRE LINKED SALE ID AND NO ALLOCATION GROUP ID&quot;;IF([.M246]=&quot;MULTI_SALE_PENDING_ALLOCATION&quot;;&quot;REMOVE LINKED SALE ID OR CORRECT LINKAGE STATUS&quot;;IF([.M246]=&quot;ALLOCATED&quot;;&quot;REQUIRE ALLOCATION GROUP ID AND NO LINKED SALE ID&quot;;&quot;REVIEW LINKAGE EVIDENCE — NO AUTHORITY CREATED&quot;)))))))">
            <text:p>NO ACTION — linkage status is UNKNOWN / not asserted</text:p>
          </table:table-cell>
          <table:table-cell office:value-type="string" table:formula="of:=IF([.S246]=&quot;CONTRADICTION&quot;;&quot;BLOCKED&quot;;IF([.S246]=&quot;UNKNOWN&quot;;&quot;UNKNOWN&quot;;IF([.S246]=&quot;CLEAR&quot;;IF(OR([.O246]=&quot;&quot;;[.P246]=&quot;&quot;);&quot;UNKNOWN&quot;;&quot;READY FOR REVIEW&quot;);&quot;BLOCKED&quot;)))">
            <text:p>UNKNOWN</text:p>
          </table:table-cell>
          <table:table-cell office:value-type="string" table:formula="of:=IF([.U246]=&quot;UNKNOWN&quot;;&quot;COMPLETE OR ASSERT REQUIRED EVIDENCE BEFORE REVIEW&quot;;IF([.U246]=&quot;BLOCKED&quot;;&quot;RESOLVE CONTRADICTION BEFORE REVIEW — NO AUTHORITY CREATED&quot;;IF([.U246]=&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6]=&quot;READY FOR REVIEW&quot;;&quot;REVIEW ELIGIBLE — NO AUTHORITY&quot;;IF(OR([.U246]=&quot;UNKNOWN&quot;;[.U246]=&quot;BLOCKED&quot;);&quot;NOT REVIEW ELIGIBLE&quot;;&quot;NOT REVIEW ELIGIBLE&quot;))">
            <text:p>NOT REVIEW ELIGIBLE</text:p>
          </table:table-cell>
          <table:table-cell office:value-type="string" table:formula="of:=IF([.W246]=&quot;NOT REVIEW ELIGIBLE&quot;;&quot;DO NOT BEGIN SETTLEMENT REVIEW — RESOLVE READINESS OR CONTRADICTION CONDITIONS&quot;;IF([.W246]=&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6]=&quot;&quot;;&quot;UNKNOWN&quot;;IF([.W246]&lt;&gt;&quot;REVIEW ELIGIBLE — NO AUTHORITY&quot;;&quot;BLOCKED — OUTCOME ASSERTED WITHOUT REVIEW ELIGIBILITY&quot;;IF(OR([.Y246]=&quot;REVIEWED — NO AUTHORITY&quot;;[.Y246]=&quot;REVIEW DEFERRED&quot;;[.Y246]=&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7]=&quot;&quot;;IF(AND([.L247]=&quot;&quot;;[.N247]=&quot;&quot;);&quot;UNKNOWN&quot;;&quot;CONTRADICTION&quot;);IF([.M247]=&quot;UNMATCHED&quot;;IF(AND([.L247]=&quot;&quot;;[.N247]=&quot;&quot;);&quot;CLEAR&quot;;&quot;CONTRADICTION&quot;);IF([.M247]=&quot;SINGLE_SALE_LINKED&quot;;IF(AND([.L247]&lt;&gt;&quot;&quot;;[.N247]=&quot;&quot;);&quot;CLEAR&quot;;&quot;CONTRADICTION&quot;);IF([.M247]=&quot;MULTI_SALE_PENDING_ALLOCATION&quot;;IF([.L247]=&quot;&quot;;&quot;CLEAR&quot;;&quot;CONTRADICTION&quot;);IF([.M247]=&quot;ALLOCATED&quot;;IF(AND([.L247]=&quot;&quot;;[.N247]&lt;&gt;&quot;&quot;);&quot;CLEAR&quot;;&quot;CONTRADICTION&quot;);&quot;CONTRADICTION&quot;)))))">
            <text:p>UNKNOWN</text:p>
          </table:table-cell>
          <table:table-cell office:value-type="string" table:formula="of:=IF([.S247]=&quot;UNKNOWN&quot;;&quot;NO ACTION — linkage status is UNKNOWN / not asserted&quot;;IF([.S247]=&quot;CLEAR&quot;;&quot;NO CONTRADICTION — preserve evidence as entered&quot;;IF([.M247]=&quot;&quot;;&quot;REVIEW LINKAGE STATUS — identifiers are present while status is UNKNOWN&quot;;IF([.M247]=&quot;UNMATCHED&quot;;&quot;REMOVE LINKAGE IDENTIFIERS OR CORRECT LINKAGE STATUS&quot;;IF([.M247]=&quot;SINGLE_SALE_LINKED&quot;;&quot;REQUIRE LINKED SALE ID AND NO ALLOCATION GROUP ID&quot;;IF([.M247]=&quot;MULTI_SALE_PENDING_ALLOCATION&quot;;&quot;REMOVE LINKED SALE ID OR CORRECT LINKAGE STATUS&quot;;IF([.M247]=&quot;ALLOCATED&quot;;&quot;REQUIRE ALLOCATION GROUP ID AND NO LINKED SALE ID&quot;;&quot;REVIEW LINKAGE EVIDENCE — NO AUTHORITY CREATED&quot;)))))))">
            <text:p>NO ACTION — linkage status is UNKNOWN / not asserted</text:p>
          </table:table-cell>
          <table:table-cell office:value-type="string" table:formula="of:=IF([.S247]=&quot;CONTRADICTION&quot;;&quot;BLOCKED&quot;;IF([.S247]=&quot;UNKNOWN&quot;;&quot;UNKNOWN&quot;;IF([.S247]=&quot;CLEAR&quot;;IF(OR([.O247]=&quot;&quot;;[.P247]=&quot;&quot;);&quot;UNKNOWN&quot;;&quot;READY FOR REVIEW&quot;);&quot;BLOCKED&quot;)))">
            <text:p>UNKNOWN</text:p>
          </table:table-cell>
          <table:table-cell office:value-type="string" table:formula="of:=IF([.U247]=&quot;UNKNOWN&quot;;&quot;COMPLETE OR ASSERT REQUIRED EVIDENCE BEFORE REVIEW&quot;;IF([.U247]=&quot;BLOCKED&quot;;&quot;RESOLVE CONTRADICTION BEFORE REVIEW — NO AUTHORITY CREATED&quot;;IF([.U247]=&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7]=&quot;READY FOR REVIEW&quot;;&quot;REVIEW ELIGIBLE — NO AUTHORITY&quot;;IF(OR([.U247]=&quot;UNKNOWN&quot;;[.U247]=&quot;BLOCKED&quot;);&quot;NOT REVIEW ELIGIBLE&quot;;&quot;NOT REVIEW ELIGIBLE&quot;))">
            <text:p>NOT REVIEW ELIGIBLE</text:p>
          </table:table-cell>
          <table:table-cell office:value-type="string" table:formula="of:=IF([.W247]=&quot;NOT REVIEW ELIGIBLE&quot;;&quot;DO NOT BEGIN SETTLEMENT REVIEW — RESOLVE READINESS OR CONTRADICTION CONDITIONS&quot;;IF([.W247]=&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7]=&quot;&quot;;&quot;UNKNOWN&quot;;IF([.W247]&lt;&gt;&quot;REVIEW ELIGIBLE — NO AUTHORITY&quot;;&quot;BLOCKED — OUTCOME ASSERTED WITHOUT REVIEW ELIGIBILITY&quot;;IF(OR([.Y247]=&quot;REVIEWED — NO AUTHORITY&quot;;[.Y247]=&quot;REVIEW DEFERRED&quot;;[.Y247]=&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8]=&quot;&quot;;IF(AND([.L248]=&quot;&quot;;[.N248]=&quot;&quot;);&quot;UNKNOWN&quot;;&quot;CONTRADICTION&quot;);IF([.M248]=&quot;UNMATCHED&quot;;IF(AND([.L248]=&quot;&quot;;[.N248]=&quot;&quot;);&quot;CLEAR&quot;;&quot;CONTRADICTION&quot;);IF([.M248]=&quot;SINGLE_SALE_LINKED&quot;;IF(AND([.L248]&lt;&gt;&quot;&quot;;[.N248]=&quot;&quot;);&quot;CLEAR&quot;;&quot;CONTRADICTION&quot;);IF([.M248]=&quot;MULTI_SALE_PENDING_ALLOCATION&quot;;IF([.L248]=&quot;&quot;;&quot;CLEAR&quot;;&quot;CONTRADICTION&quot;);IF([.M248]=&quot;ALLOCATED&quot;;IF(AND([.L248]=&quot;&quot;;[.N248]&lt;&gt;&quot;&quot;);&quot;CLEAR&quot;;&quot;CONTRADICTION&quot;);&quot;CONTRADICTION&quot;)))))">
            <text:p>UNKNOWN</text:p>
          </table:table-cell>
          <table:table-cell office:value-type="string" table:formula="of:=IF([.S248]=&quot;UNKNOWN&quot;;&quot;NO ACTION — linkage status is UNKNOWN / not asserted&quot;;IF([.S248]=&quot;CLEAR&quot;;&quot;NO CONTRADICTION — preserve evidence as entered&quot;;IF([.M248]=&quot;&quot;;&quot;REVIEW LINKAGE STATUS — identifiers are present while status is UNKNOWN&quot;;IF([.M248]=&quot;UNMATCHED&quot;;&quot;REMOVE LINKAGE IDENTIFIERS OR CORRECT LINKAGE STATUS&quot;;IF([.M248]=&quot;SINGLE_SALE_LINKED&quot;;&quot;REQUIRE LINKED SALE ID AND NO ALLOCATION GROUP ID&quot;;IF([.M248]=&quot;MULTI_SALE_PENDING_ALLOCATION&quot;;&quot;REMOVE LINKED SALE ID OR CORRECT LINKAGE STATUS&quot;;IF([.M248]=&quot;ALLOCATED&quot;;&quot;REQUIRE ALLOCATION GROUP ID AND NO LINKED SALE ID&quot;;&quot;REVIEW LINKAGE EVIDENCE — NO AUTHORITY CREATED&quot;)))))))">
            <text:p>NO ACTION — linkage status is UNKNOWN / not asserted</text:p>
          </table:table-cell>
          <table:table-cell office:value-type="string" table:formula="of:=IF([.S248]=&quot;CONTRADICTION&quot;;&quot;BLOCKED&quot;;IF([.S248]=&quot;UNKNOWN&quot;;&quot;UNKNOWN&quot;;IF([.S248]=&quot;CLEAR&quot;;IF(OR([.O248]=&quot;&quot;;[.P248]=&quot;&quot;);&quot;UNKNOWN&quot;;&quot;READY FOR REVIEW&quot;);&quot;BLOCKED&quot;)))">
            <text:p>UNKNOWN</text:p>
          </table:table-cell>
          <table:table-cell office:value-type="string" table:formula="of:=IF([.U248]=&quot;UNKNOWN&quot;;&quot;COMPLETE OR ASSERT REQUIRED EVIDENCE BEFORE REVIEW&quot;;IF([.U248]=&quot;BLOCKED&quot;;&quot;RESOLVE CONTRADICTION BEFORE REVIEW — NO AUTHORITY CREATED&quot;;IF([.U248]=&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8]=&quot;READY FOR REVIEW&quot;;&quot;REVIEW ELIGIBLE — NO AUTHORITY&quot;;IF(OR([.U248]=&quot;UNKNOWN&quot;;[.U248]=&quot;BLOCKED&quot;);&quot;NOT REVIEW ELIGIBLE&quot;;&quot;NOT REVIEW ELIGIBLE&quot;))">
            <text:p>NOT REVIEW ELIGIBLE</text:p>
          </table:table-cell>
          <table:table-cell office:value-type="string" table:formula="of:=IF([.W248]=&quot;NOT REVIEW ELIGIBLE&quot;;&quot;DO NOT BEGIN SETTLEMENT REVIEW — RESOLVE READINESS OR CONTRADICTION CONDITIONS&quot;;IF([.W248]=&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8]=&quot;&quot;;&quot;UNKNOWN&quot;;IF([.W248]&lt;&gt;&quot;REVIEW ELIGIBLE — NO AUTHORITY&quot;;&quot;BLOCKED — OUTCOME ASSERTED WITHOUT REVIEW ELIGIBILITY&quot;;IF(OR([.Y248]=&quot;REVIEWED — NO AUTHORITY&quot;;[.Y248]=&quot;REVIEW DEFERRED&quot;;[.Y248]=&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49]=&quot;&quot;;IF(AND([.L249]=&quot;&quot;;[.N249]=&quot;&quot;);&quot;UNKNOWN&quot;;&quot;CONTRADICTION&quot;);IF([.M249]=&quot;UNMATCHED&quot;;IF(AND([.L249]=&quot;&quot;;[.N249]=&quot;&quot;);&quot;CLEAR&quot;;&quot;CONTRADICTION&quot;);IF([.M249]=&quot;SINGLE_SALE_LINKED&quot;;IF(AND([.L249]&lt;&gt;&quot;&quot;;[.N249]=&quot;&quot;);&quot;CLEAR&quot;;&quot;CONTRADICTION&quot;);IF([.M249]=&quot;MULTI_SALE_PENDING_ALLOCATION&quot;;IF([.L249]=&quot;&quot;;&quot;CLEAR&quot;;&quot;CONTRADICTION&quot;);IF([.M249]=&quot;ALLOCATED&quot;;IF(AND([.L249]=&quot;&quot;;[.N249]&lt;&gt;&quot;&quot;);&quot;CLEAR&quot;;&quot;CONTRADICTION&quot;);&quot;CONTRADICTION&quot;)))))">
            <text:p>UNKNOWN</text:p>
          </table:table-cell>
          <table:table-cell office:value-type="string" table:formula="of:=IF([.S249]=&quot;UNKNOWN&quot;;&quot;NO ACTION — linkage status is UNKNOWN / not asserted&quot;;IF([.S249]=&quot;CLEAR&quot;;&quot;NO CONTRADICTION — preserve evidence as entered&quot;;IF([.M249]=&quot;&quot;;&quot;REVIEW LINKAGE STATUS — identifiers are present while status is UNKNOWN&quot;;IF([.M249]=&quot;UNMATCHED&quot;;&quot;REMOVE LINKAGE IDENTIFIERS OR CORRECT LINKAGE STATUS&quot;;IF([.M249]=&quot;SINGLE_SALE_LINKED&quot;;&quot;REQUIRE LINKED SALE ID AND NO ALLOCATION GROUP ID&quot;;IF([.M249]=&quot;MULTI_SALE_PENDING_ALLOCATION&quot;;&quot;REMOVE LINKED SALE ID OR CORRECT LINKAGE STATUS&quot;;IF([.M249]=&quot;ALLOCATED&quot;;&quot;REQUIRE ALLOCATION GROUP ID AND NO LINKED SALE ID&quot;;&quot;REVIEW LINKAGE EVIDENCE — NO AUTHORITY CREATED&quot;)))))))">
            <text:p>NO ACTION — linkage status is UNKNOWN / not asserted</text:p>
          </table:table-cell>
          <table:table-cell office:value-type="string" table:formula="of:=IF([.S249]=&quot;CONTRADICTION&quot;;&quot;BLOCKED&quot;;IF([.S249]=&quot;UNKNOWN&quot;;&quot;UNKNOWN&quot;;IF([.S249]=&quot;CLEAR&quot;;IF(OR([.O249]=&quot;&quot;;[.P249]=&quot;&quot;);&quot;UNKNOWN&quot;;&quot;READY FOR REVIEW&quot;);&quot;BLOCKED&quot;)))">
            <text:p>UNKNOWN</text:p>
          </table:table-cell>
          <table:table-cell office:value-type="string" table:formula="of:=IF([.U249]=&quot;UNKNOWN&quot;;&quot;COMPLETE OR ASSERT REQUIRED EVIDENCE BEFORE REVIEW&quot;;IF([.U249]=&quot;BLOCKED&quot;;&quot;RESOLVE CONTRADICTION BEFORE REVIEW — NO AUTHORITY CREATED&quot;;IF([.U249]=&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49]=&quot;READY FOR REVIEW&quot;;&quot;REVIEW ELIGIBLE — NO AUTHORITY&quot;;IF(OR([.U249]=&quot;UNKNOWN&quot;;[.U249]=&quot;BLOCKED&quot;);&quot;NOT REVIEW ELIGIBLE&quot;;&quot;NOT REVIEW ELIGIBLE&quot;))">
            <text:p>NOT REVIEW ELIGIBLE</text:p>
          </table:table-cell>
          <table:table-cell office:value-type="string" table:formula="of:=IF([.W249]=&quot;NOT REVIEW ELIGIBLE&quot;;&quot;DO NOT BEGIN SETTLEMENT REVIEW — RESOLVE READINESS OR CONTRADICTION CONDITIONS&quot;;IF([.W249]=&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49]=&quot;&quot;;&quot;UNKNOWN&quot;;IF([.W249]&lt;&gt;&quot;REVIEW ELIGIBLE — NO AUTHORITY&quot;;&quot;BLOCKED — OUTCOME ASSERTED WITHOUT REVIEW ELIGIBILITY&quot;;IF(OR([.Y249]=&quot;REVIEWED — NO AUTHORITY&quot;;[.Y249]=&quot;REVIEW DEFERRED&quot;;[.Y249]=&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0]=&quot;&quot;;IF(AND([.L250]=&quot;&quot;;[.N250]=&quot;&quot;);&quot;UNKNOWN&quot;;&quot;CONTRADICTION&quot;);IF([.M250]=&quot;UNMATCHED&quot;;IF(AND([.L250]=&quot;&quot;;[.N250]=&quot;&quot;);&quot;CLEAR&quot;;&quot;CONTRADICTION&quot;);IF([.M250]=&quot;SINGLE_SALE_LINKED&quot;;IF(AND([.L250]&lt;&gt;&quot;&quot;;[.N250]=&quot;&quot;);&quot;CLEAR&quot;;&quot;CONTRADICTION&quot;);IF([.M250]=&quot;MULTI_SALE_PENDING_ALLOCATION&quot;;IF([.L250]=&quot;&quot;;&quot;CLEAR&quot;;&quot;CONTRADICTION&quot;);IF([.M250]=&quot;ALLOCATED&quot;;IF(AND([.L250]=&quot;&quot;;[.N250]&lt;&gt;&quot;&quot;);&quot;CLEAR&quot;;&quot;CONTRADICTION&quot;);&quot;CONTRADICTION&quot;)))))">
            <text:p>UNKNOWN</text:p>
          </table:table-cell>
          <table:table-cell office:value-type="string" table:formula="of:=IF([.S250]=&quot;UNKNOWN&quot;;&quot;NO ACTION — linkage status is UNKNOWN / not asserted&quot;;IF([.S250]=&quot;CLEAR&quot;;&quot;NO CONTRADICTION — preserve evidence as entered&quot;;IF([.M250]=&quot;&quot;;&quot;REVIEW LINKAGE STATUS — identifiers are present while status is UNKNOWN&quot;;IF([.M250]=&quot;UNMATCHED&quot;;&quot;REMOVE LINKAGE IDENTIFIERS OR CORRECT LINKAGE STATUS&quot;;IF([.M250]=&quot;SINGLE_SALE_LINKED&quot;;&quot;REQUIRE LINKED SALE ID AND NO ALLOCATION GROUP ID&quot;;IF([.M250]=&quot;MULTI_SALE_PENDING_ALLOCATION&quot;;&quot;REMOVE LINKED SALE ID OR CORRECT LINKAGE STATUS&quot;;IF([.M250]=&quot;ALLOCATED&quot;;&quot;REQUIRE ALLOCATION GROUP ID AND NO LINKED SALE ID&quot;;&quot;REVIEW LINKAGE EVIDENCE — NO AUTHORITY CREATED&quot;)))))))">
            <text:p>NO ACTION — linkage status is UNKNOWN / not asserted</text:p>
          </table:table-cell>
          <table:table-cell office:value-type="string" table:formula="of:=IF([.S250]=&quot;CONTRADICTION&quot;;&quot;BLOCKED&quot;;IF([.S250]=&quot;UNKNOWN&quot;;&quot;UNKNOWN&quot;;IF([.S250]=&quot;CLEAR&quot;;IF(OR([.O250]=&quot;&quot;;[.P250]=&quot;&quot;);&quot;UNKNOWN&quot;;&quot;READY FOR REVIEW&quot;);&quot;BLOCKED&quot;)))">
            <text:p>UNKNOWN</text:p>
          </table:table-cell>
          <table:table-cell office:value-type="string" table:formula="of:=IF([.U250]=&quot;UNKNOWN&quot;;&quot;COMPLETE OR ASSERT REQUIRED EVIDENCE BEFORE REVIEW&quot;;IF([.U250]=&quot;BLOCKED&quot;;&quot;RESOLVE CONTRADICTION BEFORE REVIEW — NO AUTHORITY CREATED&quot;;IF([.U250]=&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50]=&quot;READY FOR REVIEW&quot;;&quot;REVIEW ELIGIBLE — NO AUTHORITY&quot;;IF(OR([.U250]=&quot;UNKNOWN&quot;;[.U250]=&quot;BLOCKED&quot;);&quot;NOT REVIEW ELIGIBLE&quot;;&quot;NOT REVIEW ELIGIBLE&quot;))">
            <text:p>NOT REVIEW ELIGIBLE</text:p>
          </table:table-cell>
          <table:table-cell office:value-type="string" table:formula="of:=IF([.W250]=&quot;NOT REVIEW ELIGIBLE&quot;;&quot;DO NOT BEGIN SETTLEMENT REVIEW — RESOLVE READINESS OR CONTRADICTION CONDITIONS&quot;;IF([.W250]=&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50]=&quot;&quot;;&quot;UNKNOWN&quot;;IF([.W250]&lt;&gt;&quot;REVIEW ELIGIBLE — NO AUTHORITY&quot;;&quot;BLOCKED — OUTCOME ASSERTED WITHOUT REVIEW ELIGIBILITY&quot;;IF(OR([.Y250]=&quot;REVIEWED — NO AUTHORITY&quot;;[.Y250]=&quot;REVIEW DEFERRED&quot;;[.Y250]=&quot;REVIEW BLOCKED&quot;);&quot;ACCEPTED INTAKE — NO AUTHORITY&quot;;&quot;BLOCKED — NONCANONICAL OUTCOME&quot;)))">
            <text:p>UNKNOWN</text:p>
          </table:table-cell>
        </table:table-row>
        <table:table-row>
          <table:table-cell/>
          <table:table-cell/>
          <table:table-cell/>
          <table:table-cell/>
          <table:table-cell/>
          <table:table-cell/>
          <table:table-cell/>
          <table:table-cell/>
          <table:table-cell/>
          <table:table-cell/>
          <table:table-cell/>
          <table:table-cell/>
          <table:table-cell table:content-validation-name="Build483CanonicalLinkageStatus"/>
          <table:table-cell/>
          <table:table-cell table:content-validation-name="Build482EvidenceStatus"/>
          <table:table-cell/>
          <table:table-cell table:content-validation-name="Build482VerificationResult"/>
          <table:table-cell/>
          <table:table-cell office:value-type="string" table:formula="of:=IF([.M251]=&quot;&quot;;IF(AND([.L251]=&quot;&quot;;[.N251]=&quot;&quot;);&quot;UNKNOWN&quot;;&quot;CONTRADICTION&quot;);IF([.M251]=&quot;UNMATCHED&quot;;IF(AND([.L251]=&quot;&quot;;[.N251]=&quot;&quot;);&quot;CLEAR&quot;;&quot;CONTRADICTION&quot;);IF([.M251]=&quot;SINGLE_SALE_LINKED&quot;;IF(AND([.L251]&lt;&gt;&quot;&quot;;[.N251]=&quot;&quot;);&quot;CLEAR&quot;;&quot;CONTRADICTION&quot;);IF([.M251]=&quot;MULTI_SALE_PENDING_ALLOCATION&quot;;IF([.L251]=&quot;&quot;;&quot;CLEAR&quot;;&quot;CONTRADICTION&quot;);IF([.M251]=&quot;ALLOCATED&quot;;IF(AND([.L251]=&quot;&quot;;[.N251]&lt;&gt;&quot;&quot;);&quot;CLEAR&quot;;&quot;CONTRADICTION&quot;);&quot;CONTRADICTION&quot;)))))">
            <text:p>UNKNOWN</text:p>
          </table:table-cell>
          <table:table-cell office:value-type="string" table:formula="of:=IF([.S251]=&quot;UNKNOWN&quot;;&quot;NO ACTION — linkage status is UNKNOWN / not asserted&quot;;IF([.S251]=&quot;CLEAR&quot;;&quot;NO CONTRADICTION — preserve evidence as entered&quot;;IF([.M251]=&quot;&quot;;&quot;REVIEW LINKAGE STATUS — identifiers are present while status is UNKNOWN&quot;;IF([.M251]=&quot;UNMATCHED&quot;;&quot;REMOVE LINKAGE IDENTIFIERS OR CORRECT LINKAGE STATUS&quot;;IF([.M251]=&quot;SINGLE_SALE_LINKED&quot;;&quot;REQUIRE LINKED SALE ID AND NO ALLOCATION GROUP ID&quot;;IF([.M251]=&quot;MULTI_SALE_PENDING_ALLOCATION&quot;;&quot;REMOVE LINKED SALE ID OR CORRECT LINKAGE STATUS&quot;;IF([.M251]=&quot;ALLOCATED&quot;;&quot;REQUIRE ALLOCATION GROUP ID AND NO LINKED SALE ID&quot;;&quot;REVIEW LINKAGE EVIDENCE — NO AUTHORITY CREATED&quot;)))))))">
            <text:p>NO ACTION — linkage status is UNKNOWN / not asserted</text:p>
          </table:table-cell>
          <table:table-cell office:value-type="string" table:formula="of:=IF([.S251]=&quot;CONTRADICTION&quot;;&quot;BLOCKED&quot;;IF([.S251]=&quot;UNKNOWN&quot;;&quot;UNKNOWN&quot;;IF([.S251]=&quot;CLEAR&quot;;IF(OR([.O251]=&quot;&quot;;[.P251]=&quot;&quot;);&quot;UNKNOWN&quot;;&quot;READY FOR REVIEW&quot;);&quot;BLOCKED&quot;)))">
            <text:p>UNKNOWN</text:p>
          </table:table-cell>
          <table:table-cell office:value-type="string" table:formula="of:=IF([.U251]=&quot;UNKNOWN&quot;;&quot;COMPLETE OR ASSERT REQUIRED EVIDENCE BEFORE REVIEW&quot;;IF([.U251]=&quot;BLOCKED&quot;;&quot;RESOLVE CONTRADICTION BEFORE REVIEW — NO AUTHORITY CREATED&quot;;IF([.U251]=&quot;READY FOR REVIEW&quot;;&quot;OPERATOR REVIEW ELIGIBLE ONLY — NOT VERIFIED, RECONCILED, SETTLED, OR AUTHORITATIVE&quot;;&quot;REVIEW READINESS CLASSIFICATION — FAIL CLOSED&quot;)))">
            <text:p>REVIEW READINESS CLASSIFICATION — FAIL CLOSED</text:p>
          </table:table-cell>
          <table:table-cell office:value-type="string" table:formula="of:=IF([.U251]=&quot;READY FOR REVIEW&quot;;&quot;REVIEW ELIGIBLE — NO AUTHORITY&quot;;IF(OR([.U251]=&quot;UNKNOWN&quot;;[.U251]=&quot;BLOCKED&quot;);&quot;NOT REVIEW ELIGIBLE&quot;;&quot;NOT REVIEW ELIGIBLE&quot;))">
            <text:p>NOT REVIEW ELIGIBLE</text:p>
          </table:table-cell>
          <table:table-cell office:value-type="string" table:formula="of:=IF([.W251]=&quot;NOT REVIEW ELIGIBLE&quot;;&quot;DO NOT BEGIN SETTLEMENT REVIEW — RESOLVE READINESS OR CONTRADICTION CONDITIONS&quot;;IF([.W251]=&quot;REVIEW ELIGIBLE — NO AUTHORITY&quot;;&quot;OPERATOR MAY REVIEW EVIDENCE — REVIEW DOES NOT VERIFY, RECONCILE, SETTLE, OR CREATE AUTHORITY&quot;;&quot;BOUNDARY STATUS UNKNOWN — FAIL CLOSED AND DO NOT BEGIN REVIEW&quot;))">
            <text:p>BOUNDARY STATUS UNKNOWN — FAIL CLOSED AND DO NOT BEGIN REVIEW</text:p>
          </table:table-cell>
          <table:table-cell office:value-type="string" table:content-validation-name="Build491ReviewOutcomeValidation">
            <text:p/>
          </table:table-cell>
          <table:table-cell office:value-type="string" table:formula="of:=IF([.Y251]=&quot;&quot;;&quot;UNKNOWN&quot;;IF([.W251]&lt;&gt;&quot;REVIEW ELIGIBLE — NO AUTHORITY&quot;;&quot;BLOCKED — OUTCOME ASSERTED WITHOUT REVIEW ELIGIBILITY&quot;;IF(OR([.Y251]=&quot;REVIEWED — NO AUTHORITY&quot;;[.Y251]=&quot;REVIEW DEFERRED&quot;;[.Y251]=&quot;REVIEW BLOCKED&quot;);&quot;ACCEPTED INTAKE — NO AUTHORITY&quot;;&quot;BLOCKED — NONCANONICAL OUTCOME&quot;)))">
            <text:p>UNKNOWN</text:p>
          </table:table-cell>
        </table:table-row>
      </table:table>
      <table:table table:name="Settlement Linkage Rules">
        <table:table-row>
          <table:table-cell office:value-type="string">
            <text:p>Build 484 — Unmatched Settlement Handling</text:p>
          </table:table-cell>
        </table:table-row>
        <table:table-row>
          <table:table-cell office:value-type="string">
            <text:p>Authority boundary</text:p>
          </table:table-cell>
          <table:table-cell office:value-type="string">
            <text:p>No automatic sale matching. No allocation engine. No settlement verification authority.</text:p>
          </table:table-cell>
        </table:table-row>
        <table:table-row>
          <table:table-cell office:value-type="string">
            <text:p>UNMATCHED</text:p>
          </table:table-cell>
          <table:table-cell office:value-type="string">
            <text:p>Linked Sale ID must remain blank. Allocation Group ID must remain blank. Preserve settlement evidence for later resolution.</text:p>
          </table:table-cell>
        </table:table-row>
        <table:table-row>
          <table:table-cell office:value-type="string">
            <text:p>SINGLE_SALE_LINKED</text:p>
          </table:table-cell>
          <table:table-cell office:value-type="string">
            <text:p>Linked Sale ID is required and must identify one authoritative SALE-###### record. Allocation Group ID remains blank.</text:p>
          </table:table-cell>
        </table:table-row>
        <table:table-row>
          <table:table-cell office:value-type="string">
            <text:p>MULTI_SALE_PENDING_ALLOCATION</text:p>
          </table:table-cell>
          <table:table-cell office:value-type="string">
            <text:p>Linked Sale ID remains blank. Allocation Group ID may remain blank until a controlled allocation group is established. No sale-level settlement authority.</text:p>
          </table:table-cell>
        </table:table-row>
        <table:table-row>
          <table:table-cell office:value-type="string">
            <text:p>ALLOCATED</text:p>
          </table:table-cell>
          <table:table-cell office:value-type="string">
            <text:p>Linked Sale ID remains blank for a multi-sale settlement record. Allocation Group ID is required and must identify the controlled ALG-###### allocation group.</text:p>
          </table:table-cell>
        </table:table-row>
        <table:table-row>
          <table:table-cell office:value-type="string">
            <text:p>Blank Linkage Status</text:p>
          </table:table-cell>
          <table:table-cell office:value-type="string">
            <text:p>UNKNOWN / not asserted. Never infer UNMATCHED, linked, or allocated.</text:p>
          </table:table-cell>
        </table:table-row>
        <table:table-row>
          <table:table-cell office:value-type="string">
            <text:p>Fail-closed rule</text:p>
          </table:table-cell>
          <table:table-cell office:value-type="string">
            <text:p>Unsupported or contradictory linkage combinations do not create settlement authority.</text:p>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style:font-name="Arial" fo:font-family="Arial" style:font-family-generic="swiss" style:font-name-complex="Arial" style:font-family-complex="Arial" style:font-family-generic-complex="swiss"/>
    </style:style>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Build481Header" style:family="table-cell" style:display-name="Build481Header">
      <style:table-cell-properties fo:background-color="#D9EAF7" fo:padding="0.06in"/>
      <style:text-properties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22:14:49.9376859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3722" meta:object-count="1"/>
    <meta:user-defined meta:name="AppVersion">15.0000</meta:user-defined>
    <meta:generator>ODFPY/1.4.1</meta:generator>
  </office:meta>
</office:document-meta>
</file>