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41B00000493C56D3AD7.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Thumbnails/"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office:version="1.2">
  <office:font-face-decls>
    <style:font-face style:name="Arial" svg:font-family="Arial" style:font-family-generic="swiss"/>
    <style:font-face style:name="Arial1" svg:font-family="Arial"/>
    <style:font-face style:name="Arial2"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5508in"/>
    </style:style>
    <style:style style:name="co2" style:family="table-column">
      <style:table-column-properties fo:break-before="auto" style:column-width="1.0398in"/>
    </style:style>
    <style:style style:name="co3" style:family="table-column">
      <style:table-column-properties fo:break-before="auto" style:column-width="0.7in"/>
    </style:style>
    <style:style style:name="co5" style:family="table-column">
      <style:table-column-properties fo:break-before="auto" style:column-width="0.5902in"/>
    </style:style>
    <style:style style:name="co6" style:family="table-column">
      <style:table-column-properties fo:break-before="auto" style:column-width="0.6689in"/>
    </style:style>
    <style:style style:name="co7" style:family="table-column">
      <style:table-column-properties fo:break-before="auto" style:column-width="0.5717in"/>
    </style:style>
    <style:style style:name="co8" style:family="table-column">
      <style:table-column-properties fo:break-before="auto" style:column-width="0.6102in"/>
    </style:style>
    <style:style style:name="ro1" style:family="table-row">
      <style:table-row-properties style:row-height="0.7799in" fo:break-before="auto" style:use-optimal-row-height="false"/>
    </style:style>
    <style:style style:name="ro2" style:family="table-row">
      <style:table-row-properties style:row-height="0.3098in" fo:break-before="auto" style:use-optimal-row-height="false"/>
    </style:style>
    <style:style style:name="ro3" style:family="table-row">
      <style:table-row-properties style:row-height="0.4201in" fo:break-before="auto" style:use-optimal-row-height="false"/>
    </style:style>
    <style:style style:name="ro4" style:family="table-row">
      <style:table-row-properties style:row-height="0.7in" fo:break-before="auto" style:use-optimal-row-height="false"/>
    </style:style>
    <style:style style:name="ro5" style:family="table-row">
      <style:table-row-properties style:row-height="0.178in" fo:break-before="auto" style:use-optimal-row-height="false"/>
    </style:style>
    <style:style style:name="ro6" style:family="table-row">
      <style:table-row-properties style:row-height="0.4925in" fo:break-before="auto" style:use-optimal-row-height="false"/>
    </style:style>
    <style:style style:name="ro7" style:family="table-row">
      <style:table-row-properties style:row-height="0.2047in" fo:break-before="auto" style:use-optimal-row-height="false"/>
    </style:style>
    <style:style style:name="ro8" style:family="table-row">
      <style:table-row-properties style:row-height="0.2437in" fo:break-before="auto" style:use-optimal-row-height="false"/>
    </style:style>
    <style:style style:name="ro9" style:family="table-row">
      <style:table-row-properties style:row-height="0.1965in" fo:break-before="auto" style:use-optimal-row-height="false"/>
    </style:style>
    <style:style style:name="ro10" style:family="table-row">
      <style:table-row-properties style:row-height="0.2992in" fo:break-before="auto" style:use-optimal-row-height="false"/>
    </style:style>
    <style:style style:name="ro11" style:family="table-row">
      <style:table-row-properties style:row-height="0.2835in" fo:break-before="auto" style:use-optimal-row-height="false"/>
    </style:style>
    <style:style style:name="ro12" style:family="table-row">
      <style:table-row-properties style:row-height="0.2756in" fo:break-before="auto" style:use-optimal-row-height="false"/>
    </style:style>
    <style:style style:name="ro13" style:family="table-row">
      <style:table-row-properties style:row-height="0.2563in" fo:break-before="auto" style:use-optimal-row-height="false"/>
    </style:style>
    <style:style style:name="ro14" style:family="table-row">
      <style:table-row-properties style:row-height="0.2681in" fo:break-before="auto" style:use-optimal-row-height="false"/>
    </style:style>
    <style:style style:name="ro15" style:family="table-row">
      <style:table-row-properties style:row-height="0.3228in" fo:break-before="auto" style:use-optimal-row-height="false"/>
    </style:style>
    <style:style style:name="ro16" style:family="table-row">
      <style:table-row-properties style:row-height="0.3543in" fo:break-before="auto" style:use-optimal-row-height="false"/>
    </style:style>
    <style:style style:name="ro17" style:family="table-row">
      <style:table-row-properties style:row-height="0.3154in" fo:break-before="auto" style:use-optimal-row-height="false"/>
    </style:style>
    <style:style style:name="ro18" style:family="table-row">
      <style:table-row-properties style:row-height="0.3346in" fo:break-before="auto" style:use-optimal-row-height="false"/>
    </style:style>
    <style:style style:name="ro19" style:family="table-row">
      <style:table-row-properties style:row-height="0.2693in" fo:break-before="auto" style:use-optimal-row-height="false"/>
    </style:style>
    <style:style style:name="ro20" style:family="table-row">
      <style:table-row-properties style:row-height="0.2673in" fo:break-before="auto" style:use-optimal-row-height="false"/>
    </style:style>
    <style:style style:name="ro21" style:family="table-row">
      <style:table-row-properties style:row-height="0.178in" fo:break-before="auto" style:use-optimal-row-height="true"/>
    </style:style>
    <style:style style:name="ta1" style:family="table" style:master-page-name="PageStyle_5f__d83c__dfe0__20_Mission_20_Control">
      <style:table-properties table:display="true" style:writing-mode="lr-tb"/>
    </style:style>
    <style:style style:name="ta2" style:family="table" style:master-page-name="PageStyle_5f__d83d__dce6__20_Inventory">
      <style:table-properties table:display="true" style:writing-mode="lr-tb"/>
    </style:style>
    <style:style style:name="ta3" style:family="table" style:master-page-name="PageStyle_5f__2764__fe0f__20_Collection">
      <style:table-properties table:display="true" style:writing-mode="lr-tb"/>
    </style:style>
    <style:style style:name="ta4" style:family="table" style:master-page-name="PageStyle_5f__d83d__dc40__20_Attention_20_Queue">
      <style:table-properties table:display="true" style:writing-mode="lr-tb"/>
    </style:style>
    <style:style style:name="ta5" style:family="table" style:master-page-name="PageStyle_5f__d83d__de80__20_Capital_20_Deployment">
      <style:table-properties table:display="true" style:writing-mode="lr-tb"/>
    </style:style>
    <style:style style:name="ta6" style:family="table" style:master-page-name="PageStyle_5f__d83c__dfc6__20_Population_20_Intelligence">
      <style:table-properties table:display="true" style:writing-mode="lr-tb"/>
    </style:style>
    <style:style style:name="ta7" style:family="table" style:master-page-name="PageStyle_5f__d83d__dd28__20_Product_20_Contents">
      <style:table-properties table:display="true" style:writing-mode="lr-tb"/>
    </style:style>
    <style:style style:name="ta8" style:family="table" style:master-page-name="PageStyle_5f__d83c__dfea__20_Platforms">
      <style:table-properties table:display="true" style:writing-mode="lr-tb"/>
    </style:style>
    <style:style style:name="ta9" style:family="table" style:master-page-name="PageStyle_5f__d83d__dcc5__20_Market_20_Calendar">
      <style:table-properties table:display="true" style:writing-mode="lr-tb"/>
    </style:style>
    <style:style style:name="ta10" style:family="table" style:master-page-name="PageStyle_5f__d83d__dcda__20_Product_20_Registry">
      <style:table-properties table:display="true" style:writing-mode="lr-tb"/>
    </style:style>
    <style:style style:name="ta11" style:family="table" style:master-page-name="PageStyle_5f__d83c__dfc6__20_Grading">
      <style:table-properties table:display="true" style:writing-mode="lr-tb"/>
    </style:style>
    <style:style style:name="ta12" style:family="table" style:master-page-name="PageStyle_5f__d83e__dde0__20_Decisions">
      <style:table-properties table:display="true" style:writing-mode="lr-tb"/>
    </style:style>
    <style:style style:name="ta13" style:family="table" style:master-page-name="PageStyle_5f__d83e__ddf9__20_Data_20_Quality">
      <style:table-properties table:display="true" style:writing-mode="lr-tb"/>
    </style:style>
    <number:text-style style:name="N100">
      <number:text-content/>
    </number:text-style>
    <style:style style:name="ce1" style:family="table-cell" style:parent-style-name="Title" style:data-style-name="N0">
      <style:table-cell-properties fo:background-color="#071632" style:cell-protect="protected" style:print-content="true" style:text-align-source="value-type" style:repeat-content="false" fo:wrap-option="no-wrap" fo:border="2.49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21pt" fo:font-style="normal" fo:text-shadow="none" style:text-underline-style="none" fo:font-weight="bold" style:font-size-asian="21pt" style:font-style-asian="normal" style:font-weight-asian="bold" style:font-name-complex="Arial1" style:font-size-complex="21pt" style:font-style-complex="normal" style:font-weight-complex="bold"/>
    </style:style>
    <style:style style:name="ce2" style:family="table-cell" style:parent-style-name="Red" style:data-style-name="N0">
      <style:table-cell-properties fo:background-color="#e71924"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WhiteB" style:data-style-name="N0">
      <style:table-cell-properties fo:background-color="#ffffff"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bold" style:font-size-asian="8.5pt" style:font-style-asian="normal" style:font-weight-asian="bold" style:font-name-complex="Arial1" style:font-size-complex="8.5pt" style:font-style-complex="normal" style:font-weight-complex="bold"/>
    </style:style>
    <style:style style:name="ce4" style:family="table-cell" style:parent-style-name="Red" style:data-style-name="N0">
      <style:table-cell-properties fo:background-color="#e71924"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Orange" style:data-style-name="N0">
      <style:table-cell-properties fo:background-color="#f57c00"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6" style:family="table-cell" style:parent-style-name="Green" style:data-style-name="N0">
      <style:table-cell-properties fo:background-color="#138a36"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3" style:family="table-cell" style:parent-style-name="Yellow" style:data-style-name="N0">
      <style:table-cell-properties fo:background-color="#ffd21c"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8" style:family="table-cell" style:parent-style-name="Navy" style:data-style-name="N0">
      <style:table-cell-properties fo:background-color="#071632"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Pale" style:data-style-name="N0">
      <style:table-cell-properties fo:background-color="#f7f9fe" style:cell-protect="protected" style:print-content="true" style:text-align-source="value-type" style:repeat-content="false" fo:wrap-option="wrap" fo:border="0.74pt solid #c8d8f5"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 style:family="table-cell" style:parent-style-name="Navy2" style:data-style-name="N0">
      <style:table-cell-properties fo:background-color="#0a2459"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1"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2" style:family="table-cell" style:parent-style-name="Title" style:data-style-name="N0">
      <style:table-cell-properties fo:background-color="#071632"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21pt" fo:font-style="normal" fo:text-shadow="none" style:text-underline-style="none" fo:font-weight="bold" style:font-size-asian="21pt" style:font-style-asian="normal" style:font-weight-asian="bold" style:font-name-complex="Arial1" style:font-size-complex="21pt" style:font-style-complex="normal" style:font-weight-complex="bold"/>
    </style:style>
    <style:style style:name="ce30" style:family="table-cell" style:parent-style-name="WhiteB" style:data-style-name="N0">
      <style:table-cell-properties fo:background-color="#ffffff"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bold" style:font-size-asian="8.5pt" style:font-style-asian="normal" style:font-weight-asian="bold" style:font-name-complex="Arial1" style:font-size-complex="8.5pt" style:font-style-complex="normal" style:font-weight-complex="bold"/>
    </style:style>
    <style:style style:name="ce14" style:family="table-cell" style:parent-style-name="White" style:data-style-name="N0">
      <style:table-cell-properties fo:background-color="#ffffff"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normal" style:font-size-asian="8.5pt" style:font-style-asian="normal" style:font-weight-asian="normal" style:font-name-complex="Arial1" style:font-size-complex="8.5pt" style:font-style-complex="normal" style:font-weight-complex="normal"/>
    </style:style>
    <style:style style:name="ce15" style:family="table-cell" style:parent-style-name="Yellow" style:data-style-name="N0">
      <style:table-cell-properties fo:background-color="#ffd21c"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6" style:family="table-cell" style:parent-style-name="Navy" style:data-style-name="N0">
      <style:table-cell-properties fo:background-color="#071632"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Pale" style:data-style-name="N0">
      <style:table-cell-properties fo:background-color="#f7f9fe"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 style:family="table-cell" style:parent-style-name="Navy2" style:data-style-name="N0">
      <style:table-cell-properties fo:background-color="#0a2459"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9" style:family="table-cell" style:parent-style-name="White" style:data-style-name="N0">
      <style:table-cell-properties fo:background-color="#ffffff"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normal" style:font-size-asian="8.5pt" style:font-style-asian="normal" style:font-weight-asian="normal" style:font-name-complex="Arial1" style:font-size-complex="8.5pt" style:font-style-complex="normal" style:font-weight-complex="normal"/>
    </style:style>
    <style:style style:name="ce20" style:family="table-cell" style:parent-style-name="Navy" style:data-style-name="N0">
      <style:table-cell-properties fo:background-color="#071632"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style>
    <style:style style:name="ce21" style:family="table-cell" style:parent-style-name="Tag" style:data-style-name="N0">
      <style:table-cell-properties fo:background-color="#071632"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2" style:family="table-cell" style:parent-style-name="Tag" style:data-style-name="N0">
      <style:table-cell-properties fo:background-color="#071632"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0" style:family="table-cell" style:parent-style-name="Blue" style:data-style-name="N0">
      <style:table-cell-properties fo:background-color="#0d55c7"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Blue" style:data-style-name="N0">
      <style:table-cell-properties fo:background-color="#0d55c7"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2" style:family="table-cell" style:parent-style-name="Default" style:data-style-name="N0">
      <style:table-cell-properties fo:background-color="#071632"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20pt" fo:font-style="normal" fo:text-shadow="none" style:text-underline-style="none" fo:font-weight="bold" style:font-size-asian="20pt" style:font-style-asian="normal" style:font-weight-asian="bold" style:font-name-complex="Arial" style:font-size-complex="20pt" style:font-style-complex="normal" style:font-weight-complex="bold"/>
    </style:style>
    <style:style style:name="ce43" style:family="table-cell" style:parent-style-name="Default" style:data-style-name="N0">
      <style:table-cell-properties fo:background-color="#0a2459"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4"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5"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6"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7"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8" style:family="table-cell" style:parent-style-name="Default" style:data-style-name="N0">
      <style:table-cell-properties fo:background-color="#e71924"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9"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0"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1"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3"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4"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6" style:family="table-cell" style:parent-style-name="Default" style:data-style-name="N0">
      <style:table-cell-properties fo:background-color="#0a2459"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7" style:family="table-cell" style:parent-style-name="Default" style:data-style-name="N0">
      <style:table-cell-properties fo:background-color="#0a2459"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8"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0"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1"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2" style:family="table-cell" style:parent-style-name="Default" style:data-style-name="N0">
      <style:table-cell-properties fo:background-color="#e71924"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3"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4"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5"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8"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9" style:family="table-cell" style:parent-style-name="Default" style:data-style-name="N10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0" style:family="table-cell" style:parent-style-name="Default" style:data-style-name="N0">
      <style:table-cell-properties fo:background-color="#ffd21c"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1" style:family="table-cell" style:parent-style-name="Default" style:data-style-name="N0">
      <style:table-cell-properties fo:background-color="#0d55c7"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2"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3" style:family="table-cell" style:parent-style-name="Default" style:data-style-name="N0">
      <style:table-cell-properties fo:background-color="#0d55c7"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4" style:family="table-cell" style:parent-style-name="Default" style:data-style-name="N0">
      <style:table-cell-properties fo:background-color="#071632"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7pt" fo:font-style="normal" fo:text-shadow="none" style:text-underline-style="none" fo:font-weight="bold" style:font-size-asian="17pt" style:font-style-asian="normal" style:font-weight-asian="bold" style:font-name-complex="Arial" style:font-size-complex="17pt" style:font-style-complex="normal" style:font-weight-complex="bold"/>
    </style:style>
    <style:style style:name="ce75"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5"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7"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e71924"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8"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18b66a"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9"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e71924"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0"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1" style:family="table-cell" style:parent-style-name="Default" style:data-style-name="N0">
      <style:table-cell-properties fo:background-color="#e71924"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2" style:family="table-cell" style:parent-style-name="Default" style:data-style-name="N10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59"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4" style:family="table-cell" style:parent-style-name="Default" style:data-style-name="N10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5" style:family="table-cell" style:parent-style-name="Default" style:data-style-name="N0">
      <style:table-cell-properties fo:background-color="#e71924"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6"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87" style:family="table-cell" style:parent-style-name="Default" style:data-style-name="N0">
      <style:table-cell-properties fo:background-color="#ffd21c"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6"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67"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d55c7"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 style:family="table-cell" style:parent-style-name="Yellow" style:data-style-name="N0">
      <style:table-cell-properties fo:background-color="#ffd21c"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3" style:family="table-cell" style:parent-style-name="Blue" style:data-style-name="N0">
      <style:table-cell-properties fo:background-color="#0d55c7"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gr1" style:family="graphic" style:parent-style-name="Default">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loext:decorative="false"/>
      <style:paragraph-properties fo:text-align="start"/>
      <style:text-properties fo:font-size="18pt"/>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table table:name="🏠 Mission Control" table:style-name="ta1">
        <office:forms form:automatic-focus="false" form:apply-design-mode="false"/>
        <table:shapes>
          <draw:frame draw:z-index="0" draw:style-name="gr1" draw:text-style-name="P1" svg:width="0.8059in" svg:height="0.8992in" svg:x="2.3622in" svg:y="0in">
            <draw:image xlink:href="Pictures/100000010000041B00000493C56D3AD7.png" xlink:type="simple" xlink:show="embed" xlink:actuate="onLoad" draw:mime-type="image/png">
              <text:p/>
            </draw:image>
          </draw:frame>
        </table:shapes>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5" table:number-rows-spanned="1">
            <text:p>MISSION CONTROL</text:p>
          </table:table-cell>
          <table:covered-table-cell table:number-columns-repeated="4" table:style-name="ce12"/>
          <table:table-cell table:style-name="ce40" office:value-type="string" ns42:value-type="string" table:number-columns-spanned="3" table:number-rows-spanned="1">
            <text:p>PERIOD</text:p>
            <text:p>90 Days (Default)</text:p>
          </table:table-cell>
          <table:covered-table-cell table:number-columns-repeated="2" table:style-name="ce24"/>
          <table:table-cell table:style-name="ce2" office:value-type="string" ns42:value-type="string" table:number-columns-spanned="2" table:number-rows-spanned="1">
            <text:p>DATE</text:p>
            <text:p>Workbook Local</text:p>
          </table:table-cell>
          <table:covered-table-cell table:style-name="ce4"/>
          <table:table-cell table:style-name="ce13" office:value-type="string" ns42:value-type="string" table:number-columns-spanned="2" table:number-rows-spanned="1">
            <text:p>DATA FRESHNESS</text:p>
            <text:p>Awaiting Data</text:p>
          </table:table-cell>
          <table:covered-table-cell table:style-name="ce15"/>
          <table:table-cell table:style-name="ce40" office:value-type="string" ns42:value-type="string" table:number-columns-spanned="2" table:number-rows-spanned="1">
            <text:p>WORKBOOK HEALTH</text:p>
            <text:p>Not Evaluated</text:p>
          </table:table-cell>
          <table:covered-table-cell table:style-name="ce24"/>
        </table:table-row>
        <table:table-row table:style-name="ro2">
          <table:table-cell table:style-name="ce2" office:value-type="string" ns42:value-type="string" table:number-columns-spanned="3" table:number-rows-spanned="1">
            <text:p>🏠 MISSION CONTROL</text:p>
          </table:table-cell>
          <table:covered-table-cell table:number-columns-repeated="2" table:style-name="ce4"/>
          <table:table-cell table:style-name="ce21" office:value-type="string" ns42:value-type="string" table:number-columns-spanned="15" table:number-rows-spanned="1">
            <text:p>YOUR POKÉMON TCG BUSINESS AT A GLANCE</text:p>
          </table:table-cell>
          <table:covered-table-cell table:number-columns-repeated="14" table:style-name="ce22"/>
        </table:table-row>
        <table:table-row table:style-name="ro2">
          <table:table-cell table:style-name="ce3" office:value-type="string" ns42:value-type="string" table:number-columns-spanned="5" table:number-rows-spanned="1">
            <text:p>🎯 TODAY'S TOP 3 <text:s/>· <text:s/>3 ACTIONS</text:p>
          </table:table-cell>
          <table:covered-table-cell table:number-columns-repeated="4" table:style-name="ce30"/>
          <table:table-cell table:style-name="ce2" office:value-type="string" ns42:value-type="string" table:number-columns-spanned="6" table:number-rows-spanned="1">
            <text:p>💰 CAPITAL HEALTH</text:p>
          </table:table-cell>
          <table:covered-table-cell table:number-columns-repeated="5" table:style-name="ce4"/>
          <table:table-cell table:style-name="ce13" office:value-type="string" ns42:value-type="string" table:number-columns-spanned="4" table:number-rows-spanned="1">
            <text:p>⚠️ OPPORTUNITY + RISK</text:p>
          </table:table-cell>
          <table:covered-table-cell table:number-columns-repeated="3" table:style-name="ce15"/>
          <table:table-cell table:style-name="ce40" office:value-type="string" ns42:value-type="string" table:number-columns-spanned="3" table:number-rows-spanned="1">
            <text:p>🏆 BUSINESS SCOREBOARD</text:p>
          </table:table-cell>
          <table:covered-table-cell table:number-columns-repeated="2" table:style-name="ce24"/>
        </table:table-row>
        <table:table-row table:style-name="ro3">
          <table:table-cell table:style-name="ce4" office:value-type="string" ns42:value-type="string">
            <text:p>1</text:p>
          </table:table-cell>
          <table:table-cell table:style-name="ce14" office:value-type="string" ns42:value-type="string" table:number-columns-spanned="4" table:number-rows-spanned="1">
            <text:p>Awaiting evidence-supported action</text:p>
          </table:table-cell>
          <table:covered-table-cell table:number-columns-repeated="3" table:style-name="ce19"/>
          <table:table-cell table:style-name="ce3" office:value-type="string" ns42:value-type="string" table:number-columns-spanned="2" table:number-rows-spanned="1">
            <text:p>AVAILABLE CASH</text:p>
          </table:table-cell>
          <table:covered-table-cell table:style-name="ce30"/>
          <table:table-cell table:style-name="ce3" office:value-type="string" ns42:value-type="string" table:number-columns-spanned="2" table:number-rows-spanned="1">
            <text:p>REDEPLOYMENT</text:p>
          </table:table-cell>
          <table:covered-table-cell table:style-name="ce30"/>
          <table:table-cell table:style-name="ce3" office:value-type="string" ns42:value-type="string" table:number-columns-spanned="2" table:number-rows-spanned="1">
            <text:p>RECYCLING RATE</text:p>
          </table:table-cell>
          <table:covered-table-cell table:style-name="ce30"/>
          <table:table-cell table:style-name="ce3" office:value-type="string" ns42:value-type="string" table:number-columns-spanned="2" table:number-rows-spanned="1">
            <text:p>🟢 OPPORTUNITY</text:p>
          </table:table-cell>
          <table:covered-table-cell table:style-name="ce30"/>
          <table:table-cell table:style-name="ce3" office:value-type="string" ns42:value-type="string" table:number-columns-spanned="2" table:number-rows-spanned="1">
            <text:p>🔴 RISK</text:p>
          </table:table-cell>
          <table:covered-table-cell table:style-name="ce30"/>
          <table:table-cell table:style-name="ce30" office:value-type="string" ns42:value-type="string">
            <text:p>SALES</text:p>
          </table:table-cell>
          <table:table-cell table:style-name="ce30" office:value-type="string" ns42:value-type="string">
            <text:p>GAIN</text:p>
          </table:table-cell>
          <table:table-cell table:style-name="ce30" office:value-type="string" ns42:value-type="string">
            <text:p>RECYCLED</text:p>
          </table:table-cell>
        </table:table-row>
        <table:table-row table:style-name="ro3">
          <table:table-cell table:style-name="ce5" office:value-type="string" ns42:value-type="string">
            <text:p>2</text:p>
          </table:table-cell>
          <table:table-cell table:style-name="ce14" office:value-type="string" ns42:value-type="string" table:number-columns-spanned="4" table:number-rows-spanned="1">
            <text:p>Awaiting evidence-supported action</text:p>
          </table:table-cell>
          <table:covered-table-cell table:number-columns-repeated="3" table:style-name="ce19"/>
          <table:table-cell table:style-name="ce13" office:value-type="string" ns42:value-type="string" table:number-columns-spanned="2" table:number-rows-spanned="1">
            <text:p>—</text:p>
          </table:table-cell>
          <table:covered-table-cell table:style-name="ce15"/>
          <table:table-cell table:style-name="ce13" office:value-type="string" ns42:value-type="string" table:number-columns-spanned="2" table:number-rows-spanned="1">
            <text:p>—</text:p>
          </table:table-cell>
          <table:covered-table-cell table:style-name="ce15"/>
          <table:table-cell table:style-name="ce13" office:value-type="string" ns42:value-type="string" table:number-columns-spanned="2" table:number-rows-spanned="1">
            <text:p>— · 90D</text:p>
          </table:table-cell>
          <table:covered-table-cell table:style-name="ce15"/>
          <table:table-cell table:style-name="ce26" office:value-type="string" ns42:value-type="string" table:number-columns-spanned="2" table:number-rows-spanned="1">
            <text:p>Awaiting evidence</text:p>
          </table:table-cell>
          <table:covered-table-cell table:style-name="ce17"/>
          <table:table-cell table:style-name="ce26" office:value-type="string" ns42:value-type="string" table:number-columns-spanned="2" table:number-rows-spanned="1">
            <text:p>Awaiting evidence</text:p>
          </table:table-cell>
          <table:covered-table-cell table:style-name="ce17"/>
          <table:table-cell table:number-columns-repeated="3" table:style-name="ce15" office:value-type="string" ns42:value-type="string">
            <text:p>—</text:p>
          </table:table-cell>
        </table:table-row>
        <table:table-row table:style-name="ro3">
          <table:table-cell table:style-name="ce6" office:value-type="string" ns42:value-type="string">
            <text:p>3</text:p>
          </table:table-cell>
          <table:table-cell table:style-name="ce14" office:value-type="string" ns42:value-type="string" table:number-columns-spanned="4" table:number-rows-spanned="1">
            <text:p>Awaiting evidence-supported action</text:p>
          </table:table-cell>
          <table:covered-table-cell table:number-columns-repeated="3" table:style-name="ce19"/>
          <table:table-cell table:style-name="ce27" office:value-type="string" ns42:value-type="string" table:number-columns-spanned="3" table:number-rows-spanned="1">
            <text:p>📊 CAPITAL LOCATION</text:p>
          </table:table-cell>
          <table:covered-table-cell table:number-columns-repeated="2" table:style-name="ce18"/>
          <table:table-cell table:style-name="ce27" office:value-type="string" ns42:value-type="string" table:number-columns-spanned="3" table:number-rows-spanned="1">
            <text:p>📈 REUSABLE CAPITAL TREND</text:p>
          </table:table-cell>
          <table:covered-table-cell table:number-columns-repeated="2" table:style-name="ce18"/>
          <table:table-cell table:style-name="ce26" office:value-type="string" ns42:value-type="string" table:number-columns-spanned="4" table:number-rows-spanned="1">
            <text:p>No promoted signal without identifiable support.</text:p>
          </table:table-cell>
          <table:covered-table-cell table:number-columns-repeated="3" table:style-name="ce17"/>
          <table:table-cell table:style-name="ce30" office:value-type="string" ns42:value-type="string">
            <text:p>ORDERS</text:p>
          </table:table-cell>
          <table:table-cell table:style-name="ce30" office:value-type="string" ns42:value-type="string">
            <text:p>ITEMS</text:p>
          </table:table-cell>
          <table:table-cell table:style-name="ce30" office:value-type="string" ns42:value-type="string">
            <text:p>DAYS</text:p>
          </table:table-cell>
        </table:table-row>
        <table:table-row table:style-name="ro4">
          <table:table-cell table:style-name="ce13" office:value-type="string" ns42:value-type="string" table:number-columns-spanned="5" table:number-rows-spanned="1">
            <text:p>⭐ Ranked only when Force Rank evidence exists</text:p>
          </table:table-cell>
          <table:covered-table-cell table:number-columns-repeated="4" table:style-name="ce15"/>
          <table:table-cell table:style-name="ce26" office:value-type="string" ns42:value-type="string" table:number-columns-spanned="3" table:number-rows-spanned="1">
            <text:p>Visual reserved</text:p>
            <text:p>Event-derived capital state</text:p>
          </table:table-cell>
          <table:covered-table-cell table:number-columns-repeated="2" table:style-name="ce17"/>
          <table:table-cell table:style-name="ce26" office:value-type="string" ns42:value-type="string" table:number-columns-spanned="3" table:number-rows-spanned="1">
            <text:p>Trend reserved</text:p>
            <text:p>Historical evidence required</text:p>
          </table:table-cell>
          <table:covered-table-cell table:number-columns-repeated="2" table:style-name="ce17"/>
          <table:table-cell table:style-name="ce13" office:value-type="string" ns42:value-type="string" table:number-columns-spanned="4" table:number-rows-spanned="1">
            <text:p>WATCH CLOSELY · AUTHORITATIVE DATA ONLY</text:p>
          </table:table-cell>
          <table:covered-table-cell table:number-columns-repeated="3" table:style-name="ce15"/>
          <table:table-cell table:number-columns-repeated="3" table:style-name="ce15" office:value-type="string" ns42:value-type="string">
            <text:p>—</text:p>
          </table:table-cell>
        </table:table-row>
        <table:table-row table:style-name="ro2">
          <table:table-cell table:style-name="ce8" office:value-type="string" ns42:value-type="string" table:number-columns-spanned="18" table:number-rows-spanned="1">
            <text:p>👀 VISUAL INTELLIGENCE <text:s/>· <text:s/>SEE THE BUSINESS MORE CLEARLY</text:p>
          </table:table-cell>
          <table:covered-table-cell table:number-columns-repeated="17" table:style-name="ce16"/>
        </table:table-row>
        <table:table-row table:style-name="ro3">
          <table:table-cell table:style-name="ce3" office:value-type="string" ns42:value-type="string" table:number-columns-spanned="4" table:number-rows-spanned="1">
            <text:p>🏪 PLATFORM PERFORMANCE</text:p>
          </table:table-cell>
          <table:covered-table-cell table:number-columns-repeated="3" table:style-name="ce30"/>
          <table:table-cell table:style-name="ce3" office:value-type="string" ns42:value-type="string" table:number-columns-spanned="4" table:number-rows-spanned="1">
            <text:p>📈 MARKET ATTENTION TREND</text:p>
          </table:table-cell>
          <table:covered-table-cell table:number-columns-repeated="3" table:style-name="ce30"/>
          <table:table-cell table:style-name="ce3" office:value-type="string" ns42:value-type="string" table:number-columns-spanned="3" table:number-rows-spanned="1">
            <text:p>🔥 ATTENTION HEAT MAP</text:p>
          </table:table-cell>
          <table:covered-table-cell table:number-columns-repeated="2" table:style-name="ce30"/>
          <table:table-cell table:style-name="ce3" office:value-type="string" ns42:value-type="string" table:number-columns-spanned="3" table:number-rows-spanned="1">
            <text:p>📦 INVENTORY MOVEMENT</text:p>
          </table:table-cell>
          <table:covered-table-cell table:number-columns-repeated="2" table:style-name="ce30"/>
          <table:table-cell table:style-name="ce3" office:value-type="string" ns42:value-type="string" table:number-columns-spanned="4" table:number-rows-spanned="1">
            <text:p>🎯 TOP INVENTORY CONCENTRATIONS</text:p>
          </table:table-cell>
          <table:covered-table-cell table:number-columns-repeated="3" table:style-name="ce30"/>
        </table:table-row>
        <table:table-row table:style-name="ro4">
          <table:table-cell table:style-name="ce26" office:value-type="string" ns42:value-type="string" table:number-columns-spanned="4" table:number-rows-spanned="1">
            <text:p>VISUAL RESERVED</text:p>
            <text:p>Authoritative platform evidence only</text:p>
          </table:table-cell>
          <table:covered-table-cell table:number-columns-repeated="3" table:style-name="ce17"/>
          <table:table-cell table:style-name="ce26" office:value-type="string" ns42:value-type="string" table:number-columns-spanned="4" table:number-rows-spanned="1">
            <text:p>VISUAL RESERVED</text:p>
            <text:p>Authoritative attention history only</text:p>
          </table:table-cell>
          <table:covered-table-cell table:number-columns-repeated="3" table:style-name="ce17"/>
          <table:table-cell table:style-name="ce26" office:value-type="string" ns42:value-type="string" table:number-columns-spanned="3" table:number-rows-spanned="1">
            <text:p>VISUAL RESERVED</text:p>
            <text:p>Evidence-backed category attention</text:p>
          </table:table-cell>
          <table:covered-table-cell table:number-columns-repeated="2" table:style-name="ce17"/>
          <table:table-cell table:style-name="ce26" office:value-type="string" ns42:value-type="string" table:number-columns-spanned="3" table:number-rows-spanned="1">
            <text:p>VISUAL RESERVED</text:p>
            <text:p>Inventory event movement</text:p>
          </table:table-cell>
          <table:covered-table-cell table:number-columns-repeated="2" table:style-name="ce17"/>
          <table:table-cell table:style-name="ce26" office:value-type="string" ns42:value-type="string" table:number-columns-spanned="4" table:number-rows-spanned="1">
            <text:p>VISUAL RESERVED</text:p>
            <text:p>Concentration evidence only</text:p>
          </table:table-cell>
          <table:covered-table-cell table:number-columns-repeated="3" table:style-name="ce17"/>
        </table:table-row>
        <table:table-row table:style-name="ro2">
          <table:table-cell table:style-name="ce27" office:value-type="string" ns42:value-type="string" table:number-columns-spanned="4" table:number-rows-spanned="1">
            <text:p>⚡ FORCE RANK: AWAITING DATA</text:p>
          </table:table-cell>
          <table:covered-table-cell table:number-columns-repeated="3" table:style-name="ce18"/>
          <table:table-cell table:style-name="ce27" office:value-type="string" ns42:value-type="string" table:number-columns-spanned="4" table:number-rows-spanned="1">
            <text:p>📊 DATA COVERAGE: NOT EVALUATED</text:p>
          </table:table-cell>
          <table:covered-table-cell table:number-columns-repeated="3" table:style-name="ce18"/>
          <table:table-cell table:style-name="ce27" office:value-type="string" ns42:value-type="string" table:number-columns-spanned="3" table:number-rows-spanned="1">
            <text:p>✅ DATA QUALITY: NOT EVALUATED</text:p>
          </table:table-cell>
          <table:covered-table-cell table:number-columns-repeated="2" table:style-name="ce18"/>
          <table:table-cell table:style-name="ce27" office:value-type="string" ns42:value-type="string" table:number-columns-spanned="3" table:number-rows-spanned="1">
            <text:p>☁ BACKUP: NOT EVALUATED</text:p>
          </table:table-cell>
          <table:covered-table-cell table:number-columns-repeated="2" table:style-name="ce18"/>
          <table:table-cell table:style-name="ce27" office:value-type="string" ns42:value-type="string" table:number-columns-spanned="4" table:number-rows-spanned="1">
            <text:p>🐕 OFFICIAL MASCOT ACTIVE</text:p>
          </table:table-cell>
          <table:covered-table-cell table:number-columns-repeated="3" table:style-name="ce18"/>
        </table:table-row>
        <table:table-row table:style-name="ro5" table:number-rows-repeated="1048564">
          <table:table-cell table:number-columns-repeated="18"/>
        </table:table-row>
        <table:table-row table:style-name="ro5">
          <table:table-cell table:number-columns-repeated="18"/>
        </table:table-row>
      </table:table>
      <table:table table:name="📦 Inventory" table:style-name="ta2">
        <table:table-column table:style-name="co5" table:number-columns-repeated="3" table:default-cell-style-name="ce11"/>
        <table:table-column table:style-name="co6" table:number-columns-repeated="3" table:default-cell-style-name="ce11"/>
        <table:table-column table:style-name="co5" table:number-columns-repeated="2" table:default-cell-style-name="ce11"/>
        <table:table-column table:style-name="co7" table:number-columns-repeated="2" table:default-cell-style-name="ce11"/>
        <table:table-column table:style-name="co8" table:number-columns-repeated="6" table:default-cell-style-name="ce11"/>
        <table:table-column table:style-name="co7" table:number-columns-repeated="2" table:default-cell-style-name="ce11"/>
        <table:table-row table:style-name="ro6">
          <table:table-cell table:style-name="ce42" office:value-type="string" ns42:value-type="string" table:number-columns-spanned="3" table:number-rows-spanned="1">
            <text:p>MarketDEX</text:p>
          </table:table-cell>
          <table:covered-table-cell table:number-columns-repeated="2" table:style-name="ce42"/>
          <table:table-cell table:style-name="ce74" office:value-type="string" ns42:value-type="string" table:number-columns-spanned="6" table:number-rows-spanned="1">
            <text:p>📦 INVENTORY COMMAND CENTER</text:p>
          </table:table-cell>
          <table:covered-table-cell table:number-columns-repeated="5" table:style-name="ce74"/>
          <table:table-cell table:style-name="ce64" office:value-type="string" ns42:value-type="string" table:number-columns-spanned="3" table:number-rows-spanned="1">
            <text:p>OWNED INVENTORY</text:p>
            <text:p>Authoritative Summary</text:p>
          </table:table-cell>
          <table:covered-table-cell table:number-columns-repeated="2" table:style-name="ce64"/>
          <table:table-cell table:style-name="ce85" office:value-type="string" ns42:value-type="string" table:number-columns-spanned="3" table:number-rows-spanned="1">
            <text:p>LISTING READINESS</text:p>
            <text:p>Derived</text:p>
          </table:table-cell>
          <table:covered-table-cell table:number-columns-repeated="2" table:style-name="ce85"/>
          <table:table-cell table:style-name="ce87" office:value-type="string" ns42:value-type="string" table:number-columns-spanned="3" table:number-rows-spanned="1">
            <text:p>DATA TRUST</text:p>
            <text:p>Not Evaluated</text:p>
          </table:table-cell>
          <table:covered-table-cell table:number-columns-repeated="2" table:style-name="ce87"/>
        </table:table-row>
        <table:table-row table:style-name="ro7">
          <table:table-cell table:style-name="ce43" office:value-type="string" ns42:value-type="string" table:number-columns-spanned="18" table:number-rows-spanned="1">
            <text:p>WHAT DO I OWN FOR BUSINESS PURPOSES, WHAT IS IT WORTH, WHERE IS IT, AND WHAT NEEDS ACTION?</text:p>
          </table:table-cell>
          <table:covered-table-cell table:number-columns-repeated="17" table:style-name="ce43"/>
        </table:table-row>
        <table:table-row table:style-name="ro8">
          <table:table-cell table:style-name="ce44" office:value-type="string" ns42:value-type="string" table:number-columns-spanned="18" table:number-rows-spanned="1">
            <text:p>📊 INVENTORY AT A GLANCE</text:p>
          </table:table-cell>
          <table:covered-table-cell table:number-columns-repeated="17" table:style-name="ce44"/>
        </table:table-row>
        <table:table-row table:style-name="ro8">
          <table:table-cell table:style-name="ce45" office:value-type="string" ns42:value-type="string" table:number-columns-spanned="3" table:number-rows-spanned="1">
            <text:p>OWNED POSITIONS</text:p>
          </table:table-cell>
          <table:covered-table-cell table:number-columns-repeated="2" table:style-name="ce45"/>
          <table:table-cell table:style-name="ce45" office:value-type="string" ns42:value-type="string" table:number-columns-spanned="3" table:number-rows-spanned="1">
            <text:p>CURRENT UNITS</text:p>
          </table:table-cell>
          <table:covered-table-cell table:number-columns-repeated="2" table:style-name="ce45"/>
          <table:table-cell table:style-name="ce45" office:value-type="string" ns42:value-type="string" table:number-columns-spanned="3" table:number-rows-spanned="1">
            <text:p>LANDED COST</text:p>
          </table:table-cell>
          <table:covered-table-cell table:number-columns-repeated="2" table:style-name="ce45"/>
          <table:table-cell table:style-name="ce45" office:value-type="string" ns42:value-type="string" table:number-columns-spanned="3" table:number-rows-spanned="1">
            <text:p>READY TO LIST</text:p>
          </table:table-cell>
          <table:covered-table-cell table:number-columns-repeated="2" table:style-name="ce45"/>
          <table:table-cell table:style-name="ce45" office:value-type="string" ns42:value-type="string" table:number-columns-spanned="3" table:number-rows-spanned="1">
            <text:p>INVENTORY AGE</text:p>
          </table:table-cell>
          <table:covered-table-cell table:number-columns-repeated="2" table:style-name="ce45"/>
          <table:table-cell table:style-name="ce45" office:value-type="string" ns42:value-type="string" table:number-columns-spanned="3" table:number-rows-spanned="1">
            <text:p>REVIEW REQUIRED</text:p>
          </table:table-cell>
          <table:covered-table-cell table:number-columns-repeated="2" table:style-name="ce45"/>
        </table:table-row>
        <table:table-row table:style-name="ro8">
          <table:table-cell table:style-name="ce46" office:value-type="string" ns42:value-type="string" table:number-columns-spanned="3" table:number-rows-spanned="1">
            <text:p>—</text:p>
          </table:table-cell>
          <table:covered-table-cell table:number-columns-repeated="2" table:style-name="ce46"/>
          <table:table-cell table:style-name="ce46" office:value-type="string" ns42:value-type="string" table:number-columns-spanned="3" table:number-rows-spanned="1">
            <text:p>—</text:p>
          </table:table-cell>
          <table:covered-table-cell table:number-columns-repeated="2" table:style-name="ce46"/>
          <table:table-cell table:style-name="ce46" office:value-type="string" ns42:value-type="string" table:number-columns-spanned="3" table:number-rows-spanned="1">
            <text:p>—</text:p>
          </table:table-cell>
          <table:covered-table-cell table:number-columns-repeated="2" table:style-name="ce46"/>
          <table:table-cell table:style-name="ce82" office:value-type="string" ns42:value-type="string" table:number-columns-spanned="3" table:number-rows-spanned="1">
            <text:p>0</text:p>
          </table:table-cell>
          <table:covered-table-cell table:number-columns-repeated="2" table:style-name="ce82"/>
          <table:table-cell table:style-name="ce49" office:value-type="string" ns42:value-type="string" table:number-columns-spanned="3" table:number-rows-spanned="1">
            <text:p>1 HOLD</text:p>
            <text:p>REVIEW PLANNED</text:p>
          </table:table-cell>
          <table:covered-table-cell table:number-columns-repeated="2" table:style-name="ce49"/>
          <table:table-cell table:style-name="ce46" office:value-type="string" ns42:value-type="string" table:number-columns-spanned="3" table:number-rows-spanned="1">
            <text:p>—</text:p>
          </table:table-cell>
          <table:covered-table-cell table:number-columns-repeated="2" table:style-name="ce46"/>
        </table:table-row>
        <table:table-row table:style-name="ro9">
          <table:table-cell table:style-name="ce47" office:value-type="string" ns42:value-type="string" table:number-columns-spanned="18" table:number-rows-spanned="1">
            <text:p>Summary remains blank until reviewed authoritative inventory and event evidence exists.</text:p>
          </table:table-cell>
          <table:covered-table-cell table:number-columns-repeated="17" table:style-name="ce47"/>
        </table:table-row>
        <table:table-row table:style-name="ro8">
          <table:table-cell table:style-name="ce48" office:value-type="string" ns42:value-type="string" table:number-columns-spanned="18" table:number-rows-spanned="1">
            <text:p>⚡ QUICK CAPTURE · PURCHASE INTAKE</text:p>
          </table:table-cell>
          <table:covered-table-cell table:number-columns-repeated="17" table:style-name="ce48"/>
        </table:table-row>
        <table:table-row table:style-name="ro10">
          <table:table-cell table:style-name="ce49" office:value-type="string" ns42:value-type="string" table:number-columns-spanned="3" table:number-rows-spanned="1">
            <text:p>DATE</text:p>
          </table:table-cell>
          <table:covered-table-cell table:number-columns-repeated="2" table:style-name="ce49"/>
          <table:table-cell table:style-name="ce49" office:value-type="string" ns42:value-type="string" table:number-columns-spanned="5" table:number-rows-spanned="1">
            <text:p>PRODUCT</text:p>
          </table:table-cell>
          <table:covered-table-cell table:number-columns-repeated="4" table:style-name="ce49"/>
          <table:table-cell table:style-name="ce49" office:value-type="string" ns42:value-type="string" table:number-columns-spanned="2" table:number-rows-spanned="1">
            <text:p>QUANTITY</text:p>
          </table:table-cell>
          <table:covered-table-cell table:style-name="ce49"/>
          <table:table-cell table:style-name="ce49" office:value-type="string" ns42:value-type="string" table:number-columns-spanned="3" table:number-rows-spanned="1">
            <text:p>TOTAL PAID</text:p>
          </table:table-cell>
          <table:covered-table-cell table:number-columns-repeated="2" table:style-name="ce49"/>
          <table:table-cell table:style-name="ce49" office:value-type="string" ns42:value-type="string" table:number-columns-spanned="3" table:number-rows-spanned="1">
            <text:p>SOURCE</text:p>
          </table:table-cell>
          <table:covered-table-cell table:number-columns-repeated="2" table:style-name="ce49"/>
          <table:table-cell table:style-name="ce53" office:value-type="string" ns42:value-type="string" table:number-columns-spanned="2" table:number-rows-spanned="1">
            <text:p>CAPTURE</text:p>
            <text:p>STATUS</text:p>
          </table:table-cell>
          <table:covered-table-cell table:style-name="ce53"/>
        </table:table-row>
        <table:table-row table:style-name="ro8">
          <table:table-cell table:style-name="ce50" office:value-type="string" ns42:value-type="string" table:number-columns-spanned="3" table:number-rows-spanned="1">
            <text:p>06-25-2026</text:p>
          </table:table-cell>
          <table:covered-table-cell table:number-columns-repeated="2" table:style-name="ce50"/>
          <table:table-cell table:style-name="ce50" office:value-type="string" ns42:value-type="string" table:number-columns-spanned="5" table:number-rows-spanned="1">
            <text:p>Mega Greninja ex Premium Collection</text:p>
          </table:table-cell>
          <table:covered-table-cell table:number-columns-repeated="4" table:style-name="ce50"/>
          <table:table-cell table:style-name="ce80" office:value-type="float" office:value="2" ns42:value-type="float" table:number-columns-spanned="2" table:number-rows-spanned="1">
            <text:p>2</text:p>
          </table:table-cell>
          <table:covered-table-cell table:style-name="ce59"/>
          <table:table-cell table:style-name="ce80" office:value-type="float" office:value="97.97" ns42:value-type="float" table:number-columns-spanned="3" table:number-rows-spanned="1">
            <text:p>97.97</text:p>
          </table:table-cell>
          <table:covered-table-cell table:number-columns-repeated="2" table:style-name="ce59"/>
          <table:table-cell table:style-name="ce50" office:value-type="string" ns42:value-type="string" table:number-columns-spanned="3" table:number-rows-spanned="1">
            <text:p>Target</text:p>
          </table:table-cell>
          <table:covered-table-cell table:number-columns-repeated="2" table:style-name="ce50"/>
          <table:table-cell table:style-name="ce75" table:formula="of:=IF(AND([.A9]&lt;&gt;&quot;&quot;;[.D9]&lt;&gt;&quot;&quot;;[.I9]&gt;0;[.K9]&gt;=0;[.N9]&lt;&gt;&quot;&quot;);&quot;READY FOR REVIEW&quot;;&quot;INCOMPLETE&quot;)" office:value-type="string" office:string-value="READY FOR REVIEW" ns42:value-type="string" table:number-columns-spanned="2" table:number-rows-spanned="1">
            <text:p>READY FOR REVIEW</text:p>
          </table:table-cell>
          <table:covered-table-cell table:style-name="ce75"/>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0]=&quot;&quot;;[.D10]=&quot;&quot;;[.I10]=&quot;&quot;;[.K10]=&quot;&quot;;[.N10]=&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1]=&quot;&quot;;[.D11]=&quot;&quot;;[.I11]=&quot;&quot;;[.K11]=&quot;&quot;;[.N11]=&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2]=&quot;&quot;;[.D12]=&quot;&quot;;[.I12]=&quot;&quot;;[.K12]=&quot;&quot;;[.N12]=&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3]=&quot;&quot;;[.D13]=&quot;&quot;;[.I13]=&quot;&quot;;[.K13]=&quot;&quot;;[.N13]=&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2" office:value-type="string" ns42:value-type="string" table:number-columns-spanned="18" table:number-rows-spanned="1">
            <text:p>Complete Date, Product, Quantity, Amount Paid, and Source. Capture status changes automatically. Completed rows are review candidates—not authoritative inventory.</text:p>
          </table:table-cell>
          <table:covered-table-cell table:number-columns-repeated="17" table:style-name="ce52"/>
        </table:table-row>
        <table:table-row table:style-name="ro8">
          <table:table-cell table:style-name="ce44" office:value-type="string" ns42:value-type="string" table:number-columns-spanned="18" table:number-rows-spanned="1">
            <text:p>🔥 INVENTORY ACTION VIEW · REVIEWED EVIDENCE ONLY</text:p>
          </table:table-cell>
          <table:covered-table-cell table:number-columns-repeated="17" table:style-name="ce44"/>
        </table:table-row>
        <table:table-row table:style-name="ro10">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2" table:number-rows-spanned="1">
            <text:p>FORM</text:p>
          </table:table-cell>
          <table:covered-table-cell table:style-name="ce53"/>
          <table:table-cell table:style-name="ce53" office:value-type="string" ns42:value-type="string" table:number-columns-spanned="2" table:number-rows-spanned="1">
            <text:p>QTY</text:p>
          </table:table-cell>
          <table:covered-table-cell table:style-name="ce53"/>
          <table:table-cell table:style-name="ce53" office:value-type="string" ns42:value-type="string" table:number-columns-spanned="2" table:number-rows-spanned="1">
            <text:p>BUSINESS STATE</text:p>
          </table:table-cell>
          <table:covered-table-cell table:style-name="ce53"/>
          <table:table-cell table:style-name="ce53" office:value-type="string" ns42:value-type="string" table:number-columns-spanned="2" table:number-rows-spanned="1">
            <text:p>LOCATION</text:p>
          </table:table-cell>
          <table:covered-table-cell table:style-name="ce53"/>
          <table:table-cell table:style-name="ce86" office:value-type="string" ns42:value-type="string" table:number-columns-spanned="2" table:number-rows-spanned="1">
            <text:p>AVG UNIT COST</text:p>
          </table:table-cell>
          <table:covered-table-cell table:style-name="ce86"/>
          <table:table-cell table:style-name="ce53" office:value-type="string" ns42:value-type="string" table:number-columns-spanned="2" table:number-rows-spanned="1">
            <text:p>DAYS HELD</text:p>
          </table:table-cell>
          <table:covered-table-cell table:style-name="ce53"/>
          <table:table-cell table:style-name="ce86" office:value-type="string" ns42:value-type="string">
            <text:p>LISTING</text:p>
            <text:p>READY</text:p>
          </table:table-cell>
          <table:table-cell table:style-name="ce53" office:value-type="string" ns42:value-type="string">
            <text:p>ACTION</text:p>
          </table:table-cell>
        </table:table-row>
        <table:table-row table:style-name="ro11">
          <table:table-cell table:style-name="ce54" table:formula="of:=IF([.$P$24]=&quot;APPROVED FOR PROMOTION&quot;;[.$D$9];&quot;Awaiting reviewed inventory evidence&quot;)" office:value-type="string" office:string-value="Mega Greninja ex Premium Collection" ns42:value-type="string" table:number-columns-spanned="4" table:number-rows-spanned="1">
            <text:p>Mega Greninja ex Premium Collection</text:p>
          </table:table-cell>
          <table:covered-table-cell table:number-columns-repeated="3" table:style-name="ce54"/>
          <table:table-cell table:style-name="ce63" table:formula="of:=IF([.$P$24]=&quot;APPROVED FOR PROMOTION&quot;;&quot;SEALED PRODUCT&quot;;&quot;—&quot;)" office:value-type="string" office:string-value="SEALED PRODUCT" ns42:value-type="string" table:number-columns-spanned="2" table:number-rows-spanned="1">
            <text:p>SEALED PRODUCT</text:p>
          </table:table-cell>
          <table:covered-table-cell table:style-name="ce63"/>
          <table:table-cell table:style-name="ce55" table:formula="of:=IF([.$P$24]=&quot;APPROVED FOR PROMOTION&quot;;[.$I$9];&quot;—&quot;)" office:value-type="float" office:value="2" ns42:value-type="float" table:number-columns-spanned="2" table:number-rows-spanned="1">
            <text:p>2</text:p>
          </table:table-cell>
          <table:covered-table-cell table:style-name="ce55"/>
          <table:table-cell table:style-name="ce65" table:formula="of:=IF([.$P$24]=&quot;APPROVED FOR PROMOTION&quot;;&quot;OWNED&quot;;&quot;—&quot;)" office:value-type="string" office:string-value="OWNED" ns42:value-type="string" table:number-columns-spanned="2" table:number-rows-spanned="1">
            <text:p>OWNED</text:p>
          </table:table-cell>
          <table:covered-table-cell table:style-name="ce65"/>
          <table:table-cell table:style-name="ce65" table:formula="of:=IF([.H29]=&quot;&quot;;&quot;STORAGE - UNASSIGNED&quot;;&quot;STORAGE - &quot;&amp;[.H29])" office:value-type="string" office:string-value="STORAGE - Aquarium Stand" ns42:value-type="string" table:number-columns-spanned="2" table:number-rows-spanned="1">
            <text:p>STORAGE - Aquarium Stand</text:p>
          </table:table-cell>
          <table:covered-table-cell table:style-name="ce65"/>
          <table:table-cell table:style-name="ce55" table:formula="of:=IF([.$P$24]=&quot;APPROVED FOR PROMOTION&quot;;[.$K$9]/[.$I$9];&quot;—&quot;)" office:value-type="float" office:value="48.985" ns42:value-type="float" table:number-columns-spanned="2" table:number-rows-spanned="1">
            <text:p>48.985</text:p>
          </table:table-cell>
          <table:covered-table-cell table:style-name="ce55"/>
          <table:table-cell table:style-name="ce55" table:formula="of:=IF([.$P$24]=&quot;APPROVED FOR PROMOTION&quot;;TODAY()-DATEVALUE(SUBSTITUTE([.$A$9];&quot;-&quot;;&quot;/&quot;));&quot;—&quot;)" office:value-type="float" office:value="11" ns42:value-type="float" table:number-columns-spanned="2" table:number-rows-spanned="1">
            <text:p>11</text:p>
          </table:table-cell>
          <table:covered-table-cell table:style-name="ce55"/>
          <table:table-cell table:style-name="ce66" office:value-type="string" ns42:value-type="string">
            <text:p>SHORT-TERM</text:p>
            <text:p>HOLD</text:p>
          </table:table-cell>
          <table:table-cell table:style-name="ce67" office:value-type="string" ns42:value-type="string">
            <text:p>REVIEW</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6" office:value-type="string" ns42:value-type="string" table:number-columns-spanned="9" table:number-rows-spanned="1">
            <text:p>📦 INVENTORY COMPOSITION</text:p>
          </table:table-cell>
          <table:covered-table-cell table:number-columns-repeated="8" table:style-name="ce56"/>
          <table:table-cell table:style-name="ce62" office:value-type="string" ns42:value-type="string" table:number-columns-spanned="9" table:number-rows-spanned="1">
            <text:p>⚠ INVENTORY REVIEW GATE</text:p>
          </table:table-cell>
          <table:covered-table-cell table:number-columns-repeated="8" table:style-name="ce62"/>
        </table:table-row>
        <table:table-row table:style-name="ro8">
          <table:table-cell table:style-name="ce47" office:value-type="string" ns42:value-type="string" table:number-columns-spanned="9" table:number-rows-spanned="3">
            <text:p>VISUAL RESERVED</text:p>
            <text:p>Composition activates only from reviewed authoritative inventory evidence.</text:p>
          </table:table-cell>
          <table:covered-table-cell table:number-columns-repeated="8" table:style-name="ce47"/>
          <table:table-cell table:style-name="ce53" office:value-type="string" ns42:value-type="string" table:number-columns-spanned="3" table:number-rows-spanned="1">
            <text:p>CAPTURE ROW</text:p>
          </table:table-cell>
          <table:covered-table-cell table:number-columns-repeated="2" table:style-name="ce53"/>
          <table:table-cell table:style-name="ce53" office:value-type="string" ns42:value-type="string" table:number-columns-spanned="3" table:number-rows-spanned="1">
            <text:p>REVIEW DECISION</text:p>
          </table:table-cell>
          <table:covered-table-cell table:number-columns-repeated="2" table:style-name="ce53"/>
          <table:table-cell table:style-name="ce53" office:value-type="string" ns42:value-type="string" table:number-columns-spanned="3" table:number-rows-spanned="1">
            <text:p>PROMOTION STATE</text:p>
          </table:table-cell>
          <table:covered-table-cell table:number-columns-repeated="2" table:style-name="ce53"/>
        </table:table-row>
        <table:table-row table:style-name="ro12">
          <table:covered-table-cell table:number-columns-repeated="9" table:style-name="ce47"/>
          <table:table-cell table:style-name="ce84" office:value-type="string" ns42:value-type="string" table:number-columns-spanned="3" table:number-rows-spanned="1">
            <text:p>9</text:p>
          </table:table-cell>
          <table:covered-table-cell table:number-columns-repeated="2" table:style-name="ce84"/>
          <table:table-cell table:style-name="ce45" office:value-type="string" ns42:value-type="string" table:number-columns-spanned="3" table:number-rows-spanned="1">
            <text:p>APPROVE</text:p>
          </table:table-cell>
          <table:covered-table-cell table:number-columns-repeated="2" table:style-name="ce45"/>
          <table:table-cell table:style-name="ce75" table:formula="of:=IF([.Q9]&lt;&gt;&quot;READY FOR REVIEW&quot;;&quot;NOT ELIGIBLE&quot;;IF(UPPER(TRIM([.M24]))=&quot;APPROVE&quot;;&quot;APPROVED FOR PROMOTION&quot;;IF(UPPER(TRIM([.M24]))=&quot;REJECT&quot;;&quot;REJECTED&quot;;&quot;AWAITING DECISION&quot;)))" office:value-type="string" office:string-value="APPROVED FOR PROMOTION" ns42:value-type="string" table:number-columns-spanned="3" table:number-rows-spanned="1">
            <text:p>APPROVED FOR PROMOTION</text:p>
          </table:table-cell>
          <table:covered-table-cell table:number-columns-repeated="2" table:style-name="ce75"/>
        </table:table-row>
        <table:table-row table:style-name="ro12">
          <table:covered-table-cell table:number-columns-repeated="9" table:style-name="ce47"/>
          <table:table-cell table:style-name="ce70" office:value-type="string" ns42:value-type="string" table:number-columns-spanned="9" table:number-rows-spanned="1">
            <text:p>PROMOTION EXECUTION: APPROVE creates the authoritative owned position below. Quick Capture row 9 remains unchanged as intake history.</text:p>
          </table:table-cell>
          <table:covered-table-cell table:number-columns-repeated="8" table:style-name="ce70"/>
        </table:table-row>
        <table:table-row table:style-name="ro13">
          <table:table-cell table:style-name="ce57" table:formula="of:=IF([.$P$24]=&quot;APPROVED FOR PROMOTION&quot;;&quot;✓ PROMOTED POSITION ACTIVE · SOURCE CAPTURE ROW 9 · CAPTURE HISTORY PRESERVED&quot;;&quot;AUTHORITATIVE POSITION AWAITS APPROVAL&quot;)" office:value-type="string" office:string-value="✓ PROMOTED POSITION ACTIVE · SOURCE CAPTURE ROW 9 · CAPTURE HISTORY PRESERVED" ns42:value-type="string" table:number-columns-spanned="18" table:number-rows-spanned="1">
            <text:p>✓ PROMOTED POSITION ACTIVE · SOURCE CAPTURE ROW 9 · CAPTURE HISTORY PRESERVED</text:p>
          </table:table-cell>
          <table:covered-table-cell table:number-columns-repeated="3" table:style-name="ce57"/>
          <table:covered-table-cell table:style-name="ce57" office:value-type="string" ns42:value-type="string">
            <text:p>💰 COST LAYERS · PROTECTED</text:p>
          </table:covered-table-cell>
          <table:covered-table-cell table:number-columns-repeated="3" table:style-name="ce57"/>
          <table:covered-table-cell table:style-name="ce57" office:value-type="string" ns42:value-type="string">
            <text:p>📍 LOCATION HISTORY · PROTECTED</text:p>
          </table:covered-table-cell>
          <table:covered-table-cell table:number-columns-repeated="3" table:style-name="ce57"/>
          <table:covered-table-cell table:style-name="ce57" office:value-type="string" ns42:value-type="string">
            <text:p>🔨 TRANSFORMATIONS</text:p>
            <text:p>SEPARATE HISTORY</text:p>
          </table:covered-table-cell>
          <table:covered-table-cell table:number-columns-repeated="2" table:style-name="ce57"/>
          <table:covered-table-cell table:style-name="ce57" office:value-type="string" ns42:value-type="string">
            <text:p>🔍 RECONCILIATION</text:p>
            <text:p>EVENT-BASED</text:p>
          </table:covered-table-cell>
          <table:covered-table-cell table:number-columns-repeated="2" table:style-name="ce57"/>
        </table:table-row>
        <table:table-row table:style-name="ro8">
          <table:table-cell table:style-name="ce58" office:value-type="string" ns42:value-type="string" table:number-columns-spanned="18" table:number-rows-spanned="1">
            <text:p>📍 STORAGE POSITION ASSIGNMENT · CURRENT INVENTORY POSITION</text:p>
          </table:table-cell>
          <table:covered-table-cell table:number-columns-repeated="17" table:style-name="ce58"/>
        </table:table-row>
        <table:table-row table:style-name="ro8">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LOCATION TYPE</text:p>
          </table:table-cell>
          <table:covered-table-cell table:number-columns-repeated="2" table:style-name="ce53"/>
          <table:table-cell table:style-name="ce53" office:value-type="string" ns42:value-type="string" table:number-columns-spanned="6" table:number-rows-spanned="1">
            <text:p>PHYSICAL STORAGE POSITION</text:p>
          </table:table-cell>
          <table:covered-table-cell table:number-columns-repeated="5" table:style-name="ce53"/>
          <table:table-cell table:style-name="ce53" office:value-type="string" ns42:value-type="string" table:number-columns-spanned="5" table:number-rows-spanned="1">
            <text:p>ASSIGNMENT STATUS</text:p>
          </table:table-cell>
          <table:covered-table-cell table:number-columns-repeated="4" table:style-name="ce53"/>
        </table:table-row>
        <table:table-row table:style-name="ro12">
          <table:table-cell table:style-name="ce60" office:value-type="string" ns42:value-type="string" table:number-columns-spanned="4" table:number-rows-spanned="1">
            <text:p>Mega Greninja ex Premium Collection</text:p>
          </table:table-cell>
          <table:covered-table-cell table:number-columns-repeated="3" table:style-name="ce60"/>
          <table:table-cell table:style-name="ce65" office:value-type="string" ns42:value-type="string" table:number-columns-spanned="3" table:number-rows-spanned="1">
            <text:p>STORAGE</text:p>
          </table:table-cell>
          <table:covered-table-cell table:number-columns-repeated="2" table:style-name="ce65"/>
          <table:table-cell table:style-name="ce50" office:value-type="string" ns42:value-type="string" table:number-columns-spanned="6" table:number-rows-spanned="1">
            <text:p>Aquarium Stand</text:p>
          </table:table-cell>
          <table:covered-table-cell table:number-columns-repeated="5" table:style-name="ce50"/>
          <table:table-cell table:style-name="ce75" table:formula="of:=IF([.H29]=&quot;&quot;;&quot;POSITION REQUIRED&quot;;&quot;LOCATION ASSIGNED&quot;)" office:value-type="string" office:string-value="LOCATION ASSIGNED" ns42:value-type="string" table:number-columns-spanned="5" table:number-rows-spanned="1">
            <text:p>LOCATION ASSIGNED</text:p>
          </table:table-cell>
          <table:covered-table-cell table:number-columns-repeated="4" table:style-name="ce75"/>
        </table:table-row>
        <table:table-row table:style-name="ro11">
          <table:table-cell table:style-name="ce61" office:value-type="string" ns42:value-type="string" table:number-columns-spanned="18" table:number-rows-spanned="1">
            <text:p>TYPE THE REAL STORAGE POSITION IN THE WHITE FIELD ABOVE. Examples of structure only: Shelf A, Bin 3, Closet Rack 2. MarketDEX will use your exact wording and should later preserve moves as location history.</text:p>
          </table:table-cell>
          <table:covered-table-cell table:number-columns-repeated="17" table:style-name="ce61"/>
        </table:table-row>
        <table:table-row table:style-name="ro5">
          <table:table-cell table:number-columns-repeated="18"/>
        </table:table-row>
        <table:table-row table:style-name="ro13">
          <table:table-cell table:style-name="ce62" office:value-type="string" ns42:value-type="string" table:number-columns-spanned="18" table:number-rows-spanned="1">
            <text:p>🚚 INVENTORY LOCATION MOVE · CONTROLLED MOVEMENT</text:p>
          </table:table-cell>
          <table:covered-table-cell table:number-columns-repeated="17" table:style-name="ce62"/>
        </table:table-row>
        <table:table-row table:style-name="ro13">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CURRENT POSITION</text:p>
          </table:table-cell>
          <table:covered-table-cell table:number-columns-repeated="2" table:style-name="ce53"/>
          <table:table-cell table:style-name="ce53" office:value-type="string" ns42:value-type="string" table:number-columns-spanned="6" table:number-rows-spanned="1">
            <text:p>MOVE TO POSITION</text:p>
          </table:table-cell>
          <table:covered-table-cell table:number-columns-repeated="5" table:style-name="ce53"/>
          <table:table-cell table:style-name="ce53" office:value-type="string" ns42:value-type="string" table:number-columns-spanned="5" table:number-rows-spanned="1">
            <text:p>MOVE STATUS</text:p>
          </table:table-cell>
          <table:covered-table-cell table:number-columns-repeated="4" table:style-name="ce53"/>
        </table:table-row>
        <table:table-row table:style-name="ro13">
          <table:table-cell table:style-name="ce60" office:value-type="string" ns42:value-type="string" table:number-columns-spanned="4" table:number-rows-spanned="1">
            <text:p>Mega Greninja ex Premium Collection</text:p>
          </table:table-cell>
          <table:covered-table-cell table:number-columns-repeated="3" table:style-name="ce60"/>
          <table:table-cell table:style-name="ce65" office:value-type="string" ns42:value-type="string" table:number-columns-spanned="3" table:number-rows-spanned="1">
            <text:p>Light Box Storage</text:p>
          </table:table-cell>
          <table:covered-table-cell table:number-columns-repeated="2" table:style-name="ce65"/>
          <table:table-cell table:style-name="ce50" office:value-type="string" ns42:value-type="string" table:number-columns-spanned="6" table:number-rows-spanned="1">
            <text:p>Aquarium Stand</text:p>
          </table:table-cell>
          <table:covered-table-cell table:number-columns-repeated="5" table:style-name="ce50"/>
          <table:table-cell table:style-name="ce75" office:value-type="string" ns42:value-type="string" table:number-columns-spanned="5" table:number-rows-spanned="1">
            <text:p>MOVE EXECUTED · QTY 2</text:p>
          </table:table-cell>
          <table:covered-table-cell table:number-columns-repeated="4" table:style-name="ce75"/>
        </table:table-row>
        <table:table-row table:style-name="ro12">
          <table:table-cell table:style-name="ce61" office:value-type="string" ns42:value-type="string" table:number-columns-spanned="18" table:number-rows-spanned="1">
            <text:p>MOVEMENT RULE: enter a new real physical position in MOVE TO POSITION. MarketDEX validates the move candidate. This build does not overwrite the current position or fabricate movement history.</text:p>
          </table:table-cell>
          <table:covered-table-cell table:number-columns-repeated="17" table:style-name="ce61"/>
        </table:table-row>
        <table:table-row table:style-name="ro13">
          <table:table-cell table:number-columns-repeated="18"/>
        </table:table-row>
        <table:table-row table:style-name="ro13">
          <table:table-cell table:style-name="ce58" office:value-type="string" ns42:value-type="string" table:number-columns-spanned="18" table:number-rows-spanned="1">
            <text:p>📍 LOCATION HISTORY · RECORDED MOVE EVENT</text:p>
          </table:table-cell>
          <table:covered-table-cell table:number-columns-repeated="17" table:style-name="ce58"/>
        </table:table-row>
        <table:table-row table:style-name="ro13">
          <table:table-cell table:style-name="ce53" office:value-type="string" ns42:value-type="string" table:number-columns-spanned="3" table:number-rows-spanned="1">
            <text:p>MOVE DATE</text:p>
          </table:table-cell>
          <table:covered-table-cell table:number-columns-repeated="2" table:style-name="ce53"/>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FROM</text:p>
          </table:table-cell>
          <table:covered-table-cell table:number-columns-repeated="2" table:style-name="ce53"/>
          <table:table-cell table:style-name="ce53" office:value-type="string" ns42:value-type="string" table:number-columns-spanned="3" table:number-rows-spanned="1">
            <text:p>TO</text:p>
          </table:table-cell>
          <table:covered-table-cell table:number-columns-repeated="2" table:style-name="ce53"/>
          <table:table-cell table:style-name="ce53" office:value-type="string" ns42:value-type="string" table:number-columns-spanned="5" table:number-rows-spanned="1">
            <text:p>EVENT STATE</text:p>
          </table:table-cell>
          <table:covered-table-cell table:number-columns-repeated="4" table:style-name="ce53"/>
        </table:table-row>
        <table:table-row table:style-name="ro13">
          <table:table-cell table:style-name="ce63" office:value-type="string" ns42:value-type="string" table:number-columns-spanned="3" table:number-rows-spanned="1">
            <text:p>07-05-2026</text:p>
          </table:table-cell>
          <table:covered-table-cell table:number-columns-repeated="2" table:style-name="ce63"/>
          <table:table-cell table:style-name="ce60" office:value-type="string" ns42:value-type="string" table:number-columns-spanned="4" table:number-rows-spanned="1">
            <text:p>Mega Greninja ex Premium Collection</text:p>
          </table:table-cell>
          <table:covered-table-cell table:number-columns-repeated="3" table:style-name="ce60"/>
          <table:table-cell table:style-name="ce65" office:value-type="string" ns42:value-type="string" table:number-columns-spanned="3" table:number-rows-spanned="1">
            <text:p>Light Box Storage</text:p>
          </table:table-cell>
          <table:covered-table-cell table:number-columns-repeated="2" table:style-name="ce65"/>
          <table:table-cell table:style-name="ce65" office:value-type="string" ns42:value-type="string" table:number-columns-spanned="3" table:number-rows-spanned="1">
            <text:p>Aquarium Stand</text:p>
          </table:table-cell>
          <table:covered-table-cell table:number-columns-repeated="2" table:style-name="ce65"/>
          <table:table-cell table:style-name="ce65" office:value-type="string" ns42:value-type="string" table:number-columns-spanned="5" table:number-rows-spanned="1">
            <text:p>COMPLETED · QTY 2</text:p>
          </table:table-cell>
          <table:covered-table-cell table:number-columns-repeated="4" table:style-name="ce65"/>
        </table:table-row>
        <table:table-row table:style-name="ro12">
          <table:table-cell table:style-name="ce61" office:value-type="string" ns42:value-type="string" table:number-columns-spanned="18" table:number-rows-spanned="1">
            <text:p>RECORDED REAL MOVE: 2 units moved from Light Box Storage to Aquarium Stand on 07-05-2026. Current location now derives from the executed movement state.</text:p>
          </table:table-cell>
          <table:covered-table-cell table:number-columns-repeated="17" table:style-name="ce61"/>
        </table:table-row>
        <table:table-row table:style-name="ro5">
          <table:table-cell table:number-columns-repeated="18"/>
        </table:table-row>
        <table:table-row table:style-name="ro14">
          <table:table-cell table:style-name="ce58" office:value-type="string" ns42:value-type="string" table:number-columns-spanned="18" table:number-rows-spanned="1">
            <text:p>💰 HOLD REVIEW · PROFIT POTENTIAL</text:p>
          </table:table-cell>
          <table:covered-table-cell table:number-columns-repeated="17" table:style-name="ce58"/>
        </table:table-row>
        <table:table-row table:style-name="ro14">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HOLD PLAN</text:p>
          </table:table-cell>
          <table:covered-table-cell table:number-columns-repeated="2" table:style-name="ce53"/>
          <table:table-cell table:style-name="ce53" office:value-type="string" ns42:value-type="string" table:number-columns-spanned="3" table:number-rows-spanned="1">
            <text:p>REVIEW WINDOW</text:p>
          </table:table-cell>
          <table:covered-table-cell table:number-columns-repeated="2" table:style-name="ce53"/>
          <table:table-cell table:style-name="ce53" office:value-type="string" ns42:value-type="string" table:number-columns-spanned="3" table:number-rows-spanned="1">
            <text:p>PRIMARY DECISION DRIVER</text:p>
          </table:table-cell>
          <table:covered-table-cell table:number-columns-repeated="2" table:style-name="ce53"/>
          <table:table-cell table:style-name="ce53" office:value-type="string" ns42:value-type="string" table:number-columns-spanned="5" table:number-rows-spanned="1">
            <text:p>REVIEW STATE</text:p>
          </table:table-cell>
          <table:covered-table-cell table:number-columns-repeated="4" table:style-name="ce53"/>
        </table:table-row>
        <table:table-row table:style-name="ro14">
          <table:table-cell table:style-name="ce60" office:value-type="string" ns42:value-type="string" table:number-columns-spanned="4" table:number-rows-spanned="1">
            <text:p>Mega Greninja ex Premium Collection</text:p>
          </table:table-cell>
          <table:covered-table-cell table:number-columns-repeated="3" table:style-name="ce60"/>
          <table:table-cell table:style-name="ce65" office:value-type="string" ns42:value-type="string" table:number-columns-spanned="3" table:number-rows-spanned="1">
            <text:p>SHORT-TERM HOLD</text:p>
          </table:table-cell>
          <table:covered-table-cell table:number-columns-repeated="2" table:style-name="ce65"/>
          <table:table-cell table:style-name="ce65" office:value-type="string" ns42:value-type="string" table:number-columns-spanned="3" table:number-rows-spanned="1">
            <text:p>EARLY DEC 2026</text:p>
          </table:table-cell>
          <table:covered-table-cell table:number-columns-repeated="2" table:style-name="ce65"/>
          <table:table-cell table:style-name="ce65" office:value-type="string" ns42:value-type="string" table:number-columns-spanned="3" table:number-rows-spanned="1">
            <text:p>PROFIT POTENTIAL</text:p>
          </table:table-cell>
          <table:covered-table-cell table:number-columns-repeated="2" table:style-name="ce65"/>
          <table:table-cell table:style-name="ce75" office:value-type="string" ns42:value-type="string" table:number-columns-spanned="5" table:number-rows-spanned="1">
            <text:p>PLANNED REVIEW</text:p>
          </table:table-cell>
          <table:covered-table-cell table:number-columns-repeated="4" table:style-name="ce75"/>
        </table:table-row>
        <table:table-row table:style-name="ro10">
          <table:table-cell table:style-name="ce61" office:value-type="string" ns42:value-type="string" table:number-columns-spanned="18" table:number-rows-spanned="1">
            <text:p>DECISION INTENT: hold both units for a short period, then review in early December 2026 with profit potential as the primary decision driver. No automatic sell decision is authorized.</text:p>
          </table:table-cell>
          <table:covered-table-cell table:number-columns-repeated="17" table:style-name="ce61"/>
        </table:table-row>
        <table:table-row table:style-name="ro5">
          <table:table-cell table:number-columns-repeated="18"/>
        </table:table-row>
        <table:table-row table:style-name="ro12">
          <table:table-cell table:style-name="ce62" office:value-type="string" ns42:value-type="string" table:number-columns-spanned="18" table:number-rows-spanned="1">
            <text:p>💵 eBAY PROFIT TARGET · DECEMBER SELL REVIEW</text:p>
          </table:table-cell>
          <table:covered-table-cell table:number-columns-repeated="17" table:style-name="ce62"/>
        </table:table-row>
        <table:table-row table:style-name="ro12">
          <table:table-cell table:style-name="ce53" office:value-type="string" ns42:value-type="string" table:number-columns-spanned="3" table:number-rows-spanned="1">
            <text:p>MARKETPLACE</text:p>
          </table:table-cell>
          <table:covered-table-cell table:number-columns-repeated="2" table:style-name="ce53"/>
          <table:table-cell table:style-name="ce53" office:value-type="string" ns42:value-type="string" table:number-columns-spanned="3" table:number-rows-spanned="1">
            <text:p>PROFIT TARGET / BOX</text:p>
          </table:table-cell>
          <table:covered-table-cell table:number-columns-repeated="2" table:style-name="ce53"/>
          <table:table-cell table:style-name="ce53" office:value-type="string" ns42:value-type="string" table:number-columns-spanned="3" table:number-rows-spanned="1">
            <text:p>QUANTITY</text:p>
          </table:table-cell>
          <table:covered-table-cell table:number-columns-repeated="2" table:style-name="ce53"/>
          <table:table-cell table:style-name="ce53" office:value-type="string" ns42:value-type="string" table:number-columns-spanned="3" table:number-rows-spanned="1">
            <text:p>TOTAL PROFIT TARGET</text:p>
          </table:table-cell>
          <table:covered-table-cell table:number-columns-repeated="2" table:style-name="ce53"/>
          <table:table-cell table:style-name="ce53" office:value-type="string" ns42:value-type="string" table:number-columns-spanned="3" table:number-rows-spanned="1">
            <text:p>FEE ASSUMPTION</text:p>
          </table:table-cell>
          <table:covered-table-cell table:number-columns-repeated="2" table:style-name="ce53"/>
          <table:table-cell table:style-name="ce53" office:value-type="string" ns42:value-type="string" table:number-columns-spanned="3" table:number-rows-spanned="1">
            <text:p>TARGET STATE</text:p>
          </table:table-cell>
          <table:covered-table-cell table:number-columns-repeated="2" table:style-name="ce53"/>
        </table:table-row>
        <table:table-row table:style-name="ro12">
          <table:table-cell table:style-name="ce45" office:value-type="string" ns42:value-type="string" table:number-columns-spanned="3" table:number-rows-spanned="1">
            <text:p>eBay</text:p>
          </table:table-cell>
          <table:covered-table-cell table:number-columns-repeated="2" table:style-name="ce45"/>
          <table:table-cell table:style-name="ce69" office:value-type="string" ns42:value-type="string" table:number-columns-spanned="3" table:number-rows-spanned="1">
            <text:p>$100.00</text:p>
          </table:table-cell>
          <table:covered-table-cell table:number-columns-repeated="2" table:style-name="ce69"/>
          <table:table-cell table:style-name="ce69" office:value-type="string" ns42:value-type="string" table:number-columns-spanned="3" table:number-rows-spanned="1">
            <text:p>2</text:p>
          </table:table-cell>
          <table:covered-table-cell table:number-columns-repeated="2" table:style-name="ce69"/>
          <table:table-cell table:style-name="ce69" office:value-type="string" ns42:value-type="string" table:number-columns-spanned="3" table:number-rows-spanned="1">
            <text:p>$200.00</text:p>
          </table:table-cell>
          <table:covered-table-cell table:number-columns-repeated="2" table:style-name="ce69"/>
          <table:table-cell table:style-name="ce79" office:value-type="string" ns42:value-type="string" table:number-columns-spanned="3" table:number-rows-spanned="1">
            <text:p>REVIEW REQUIRED</text:p>
          </table:table-cell>
          <table:covered-table-cell table:number-columns-repeated="2" table:style-name="ce79"/>
          <table:table-cell table:style-name="ce75" office:value-type="string" ns42:value-type="string" table:number-columns-spanned="3" table:number-rows-spanned="1">
            <text:p>PRICE TARGET PENDING</text:p>
          </table:table-cell>
          <table:covered-table-cell table:number-columns-repeated="2" table:style-name="ce75"/>
        </table:table-row>
        <table:table-row table:style-name="ro12">
          <table:table-cell table:style-name="ce64" office:value-type="string" ns42:value-type="string" table:number-columns-spanned="6" table:number-rows-spanned="1">
            <text:p>SELLER PROFILE</text:p>
          </table:table-cell>
          <table:covered-table-cell table:number-columns-repeated="5" table:style-name="ce64"/>
          <table:table-cell table:style-name="ce64" office:value-type="string" ns42:value-type="string" table:number-columns-spanned="6" table:number-rows-spanned="1">
            <text:p>TARGET DEFINITION</text:p>
          </table:table-cell>
          <table:covered-table-cell table:number-columns-repeated="5" table:style-name="ce64"/>
          <table:table-cell table:style-name="ce64" office:value-type="string" ns42:value-type="string" table:number-columns-spanned="6" table:number-rows-spanned="1">
            <text:p>FEE CONTROL</text:p>
          </table:table-cell>
          <table:covered-table-cell table:number-columns-repeated="5" table:style-name="ce64"/>
        </table:table-row>
        <table:table-row table:style-name="ro15">
          <table:table-cell table:style-name="ce61" office:value-type="string" ns42:value-type="string" table:number-columns-spanned="6" table:number-rows-spanned="1">
            <text:p>NO STORE SUBSCRIPTION · NO PROMOTED LISTINGS</text:p>
          </table:table-cell>
          <table:covered-table-cell table:number-columns-repeated="5" table:style-name="ce61"/>
          <table:table-cell table:style-name="ce61" office:value-type="string" ns42:value-type="string" table:number-columns-spanned="6" table:number-rows-spanned="1">
            <text:p>$100 PROFIT PER BOX AFTER eBAY MARKETPLACE FEES · SHIPPING AND PACKAGING EXCLUDED</text:p>
          </table:table-cell>
          <table:covered-table-cell table:number-columns-repeated="5" table:style-name="ce61"/>
          <table:table-cell table:style-name="ce70" office:value-type="string" ns42:value-type="string" table:number-columns-spanned="6" table:number-rows-spanned="1">
            <text:p>FEE RATE IS NOT HARD-CODED UNTIL THE APPLICABLE eBAY CATEGORY FEE ASSUMPTION IS VERIFIED AND IDENTIFIED.</text:p>
          </table:table-cell>
          <table:covered-table-cell table:number-columns-repeated="5" table:style-name="ce70"/>
        </table:table-row>
        <table:table-row table:style-name="ro10">
          <table:table-cell table:style-name="ce61" office:value-type="string" ns42:value-type="string" table:number-columns-spanned="18" table:number-rows-spanned="1">
            <text:p>DECISION CONTROL: required sale-price target remains pending until a reviewable eBay fee assumption is established. MarketDEX must show the fee basis used; it may not hide or invent the rate.</text:p>
          </table:table-cell>
          <table:covered-table-cell table:number-columns-repeated="17" table:style-name="ce61"/>
        </table:table-row>
        <table:table-row table:style-name="ro5">
          <table:table-cell table:number-columns-repeated="18"/>
        </table:table-row>
        <table:table-row table:style-name="ro12">
          <table:table-cell table:style-name="ce62" office:value-type="string" ns42:value-type="string" table:number-columns-spanned="18" table:number-rows-spanned="1">
            <text:p>🧪 DECEMBER SELL DECISION SIMULATOR · DEMO ASSUMPTIONS</text:p>
          </table:table-cell>
          <table:covered-table-cell table:number-columns-repeated="17" table:style-name="ce62"/>
        </table:table-row>
        <table:table-row table:style-name="ro12">
          <table:table-cell table:style-name="ce53" office:value-type="string" ns42:value-type="string" table:number-columns-spanned="3" table:number-rows-spanned="1">
            <text:p>SALE FORMAT</text:p>
          </table:table-cell>
          <table:covered-table-cell table:number-columns-repeated="2" table:style-name="ce53"/>
          <table:table-cell table:style-name="ce53" office:value-type="string" ns42:value-type="string" table:number-columns-spanned="3" table:number-rows-spanned="1">
            <text:p>MARKET PRICE / BOX</text:p>
          </table:table-cell>
          <table:covered-table-cell table:number-columns-repeated="2" table:style-name="ce53"/>
          <table:table-cell table:style-name="ce53" office:value-type="string" ns42:value-type="string" table:number-columns-spanned="3" table:number-rows-spanned="1">
            <text:p>LISTING PRICE / BOX</text:p>
          </table:table-cell>
          <table:covered-table-cell table:number-columns-repeated="2" table:style-name="ce53"/>
          <table:table-cell table:style-name="ce53" office:value-type="string" ns42:value-type="string" table:number-columns-spanned="3" table:number-rows-spanned="1">
            <text:p>DEMO FEE RATE</text:p>
          </table:table-cell>
          <table:covered-table-cell table:number-columns-repeated="2" table:style-name="ce53"/>
          <table:table-cell table:style-name="ce53" office:value-type="string" ns42:value-type="string" table:number-columns-spanned="3" table:number-rows-spanned="1">
            <text:p>SHIPPING ASSUMPTION</text:p>
          </table:table-cell>
          <table:covered-table-cell table:number-columns-repeated="2" table:style-name="ce53"/>
          <table:table-cell table:style-name="ce53" office:value-type="string" ns42:value-type="string" table:number-columns-spanned="3" table:number-rows-spanned="1">
            <text:p>DECISION</text:p>
          </table:table-cell>
          <table:covered-table-cell table:number-columns-repeated="2" table:style-name="ce53"/>
        </table:table-row>
        <table:table-row table:style-name="ro12">
          <table:table-cell table:style-name="ce65" office:value-type="string" ns42:value-type="string" table:number-columns-spanned="3" table:number-rows-spanned="1">
            <text:p>INDIVIDUALLY</text:p>
          </table:table-cell>
          <table:covered-table-cell table:number-columns-repeated="2" table:style-name="ce65"/>
          <table:table-cell table:style-name="ce75" office:value-type="string" ns42:value-type="string" table:number-columns-spanned="3" table:number-rows-spanned="1">
            <text:p>$175.00 · DEMO</text:p>
          </table:table-cell>
          <table:covered-table-cell table:number-columns-repeated="2" table:style-name="ce75"/>
          <table:table-cell table:style-name="ce75" office:value-type="string" ns42:value-type="string" table:number-columns-spanned="3" table:number-rows-spanned="1">
            <text:p>$185.00 · DEMO</text:p>
          </table:table-cell>
          <table:covered-table-cell table:number-columns-repeated="2" table:style-name="ce75"/>
          <table:table-cell table:style-name="ce79" office:value-type="string" ns42:value-type="string" table:number-columns-spanned="3" table:number-rows-spanned="1">
            <text:p>13.25% · DEMO</text:p>
          </table:table-cell>
          <table:covered-table-cell table:number-columns-repeated="2" table:style-name="ce79"/>
          <table:table-cell table:style-name="ce79" office:value-type="string" ns42:value-type="string" table:number-columns-spanned="3" table:number-rows-spanned="1">
            <text:p>BUYER PAYS · DEMO</text:p>
          </table:table-cell>
          <table:covered-table-cell table:number-columns-repeated="2" table:style-name="ce79"/>
          <table:table-cell table:style-name="ce75" office:value-type="string" ns42:value-type="string" table:number-columns-spanned="3" table:number-rows-spanned="1">
            <text:p>TESTING</text:p>
          </table:table-cell>
          <table:covered-table-cell table:number-columns-repeated="2" table:style-name="ce75"/>
        </table:table-row>
        <table:table-row table:style-name="ro12">
          <table:table-cell table:style-name="ce68" office:value-type="string" ns42:value-type="string" table:number-columns-spanned="3" table:number-rows-spanned="1">
            <text:p>AVG UNIT COST</text:p>
          </table:table-cell>
          <table:covered-table-cell table:number-columns-repeated="2" table:style-name="ce68"/>
          <table:table-cell table:style-name="ce68" office:value-type="string" ns42:value-type="string" table:number-columns-spanned="3" table:number-rows-spanned="1">
            <text:p>TARGET PROFIT / BOX</text:p>
          </table:table-cell>
          <table:covered-table-cell table:number-columns-repeated="2" table:style-name="ce68"/>
          <table:table-cell table:style-name="ce68" office:value-type="string" ns42:value-type="string" table:number-columns-spanned="3" table:number-rows-spanned="1">
            <text:p>REQUIRED NET / BOX</text:p>
          </table:table-cell>
          <table:covered-table-cell table:number-columns-repeated="2" table:style-name="ce68"/>
          <table:table-cell table:style-name="ce68" office:value-type="string" ns42:value-type="string" table:number-columns-spanned="3" table:number-rows-spanned="1">
            <text:p>DEMO NET @ LIST PRICE</text:p>
          </table:table-cell>
          <table:covered-table-cell table:number-columns-repeated="2" table:style-name="ce68"/>
          <table:table-cell table:style-name="ce68" office:value-type="string" ns42:value-type="string" table:number-columns-spanned="3" table:number-rows-spanned="1">
            <text:p>DEMO PROFIT / BOX</text:p>
          </table:table-cell>
          <table:covered-table-cell table:number-columns-repeated="2" table:style-name="ce68"/>
          <table:table-cell table:style-name="ce68" office:value-type="string" ns42:value-type="string" table:number-columns-spanned="3" table:number-rows-spanned="1">
            <text:p>TARGET RESULT</text:p>
          </table:table-cell>
          <table:covered-table-cell table:number-columns-repeated="2" table:style-name="ce68"/>
        </table:table-row>
        <table:table-row table:style-name="ro12">
          <table:table-cell table:style-name="ce69" office:value-type="string" ns42:value-type="string" table:number-columns-spanned="3" table:number-rows-spanned="1">
            <text:p>$48.985</text:p>
          </table:table-cell>
          <table:covered-table-cell table:number-columns-repeated="2" table:style-name="ce69"/>
          <table:table-cell table:style-name="ce69" office:value-type="string" ns42:value-type="string" table:number-columns-spanned="3" table:number-rows-spanned="1">
            <text:p>$100.00</text:p>
          </table:table-cell>
          <table:covered-table-cell table:number-columns-repeated="2" table:style-name="ce69"/>
          <table:table-cell table:style-name="ce69" office:value-type="string" ns42:value-type="string" table:number-columns-spanned="3" table:number-rows-spanned="1">
            <text:p>$148.985</text:p>
          </table:table-cell>
          <table:covered-table-cell table:number-columns-repeated="2" table:style-name="ce69"/>
          <table:table-cell table:style-name="ce69" office:value-type="string" ns42:value-type="string" table:number-columns-spanned="3" table:number-rows-spanned="1">
            <text:p>$160.49</text:p>
          </table:table-cell>
          <table:covered-table-cell table:number-columns-repeated="2" table:style-name="ce69"/>
          <table:table-cell table:style-name="ce69" office:value-type="string" ns42:value-type="string" table:number-columns-spanned="3" table:number-rows-spanned="1">
            <text:p>$111.50</text:p>
          </table:table-cell>
          <table:covered-table-cell table:number-columns-repeated="2" table:style-name="ce69"/>
          <table:table-cell table:style-name="ce53" office:value-type="string" ns42:value-type="string" table:number-columns-spanned="3" table:number-rows-spanned="1">
            <text:p>READY TO SELL · DEMO</text:p>
          </table:table-cell>
          <table:covered-table-cell table:number-columns-repeated="2" table:style-name="ce53"/>
        </table:table-row>
        <table:table-row table:style-name="ro15">
          <table:table-cell table:style-name="ce61" office:value-type="string" ns42:value-type="string" table:number-columns-spanned="18" table:number-rows-spanned="1">
            <text:p>DEMO LOGIC ONLY: fictional market price, listing price, fee rate, and buyer-paid shipping assumption are clearly marked DEMO. The simulator compares both market and listing context. Sales tax is not subtracted in this test rule. No demo value is authoritative business evidence.</text:p>
          </table:table-cell>
          <table:covered-table-cell table:number-columns-repeated="17" table:style-name="ce61"/>
        </table:table-row>
        <table:table-row table:style-name="ro12">
          <table:table-cell table:style-name="ce70" office:value-type="string" ns42:value-type="string" table:number-columns-spanned="18" table:number-rows-spanned="1">
            <text:p>CROSS-CHECK MODE: approve the workflow if the decision presentation makes sense. Corrections can be promoted in the next build without making you fill the form manually.</text:p>
          </table:table-cell>
          <table:covered-table-cell table:number-columns-repeated="17" table:style-name="ce70"/>
        </table:table-row>
        <table:table-row table:style-name="ro5">
          <table:table-cell table:number-columns-repeated="18"/>
        </table:table-row>
        <table:table-row table:style-name="ro12">
          <table:table-cell table:style-name="ce62" office:value-type="string" ns42:value-type="string" table:number-columns-spanned="18" table:number-rows-spanned="1">
            <text:p>🎯 SELL THRESHOLD COMPARISON · DEMO DECISION TEST</text:p>
          </table:table-cell>
          <table:covered-table-cell table:number-columns-repeated="17" table:style-name="ce62"/>
        </table:table-row>
        <table:table-row table:style-name="ro12">
          <table:table-cell table:style-name="ce53" office:value-type="string" ns42:value-type="string" table:number-columns-spanned="3" table:number-rows-spanned="1">
            <text:p>COST / BOX</text:p>
          </table:table-cell>
          <table:covered-table-cell table:number-columns-repeated="2" table:style-name="ce53"/>
          <table:table-cell table:style-name="ce53" office:value-type="string" ns42:value-type="string" table:number-columns-spanned="3" table:number-rows-spanned="1">
            <text:p>PROFIT TARGET / BOX</text:p>
          </table:table-cell>
          <table:covered-table-cell table:number-columns-repeated="2" table:style-name="ce53"/>
          <table:table-cell table:style-name="ce53" office:value-type="string" ns42:value-type="string" table:number-columns-spanned="3" table:number-rows-spanned="1">
            <text:p>DEMO FEE BASIS</text:p>
          </table:table-cell>
          <table:covered-table-cell table:number-columns-repeated="2" table:style-name="ce53"/>
          <table:table-cell table:style-name="ce53" office:value-type="string" ns42:value-type="string" table:number-columns-spanned="3" table:number-rows-spanned="1">
            <text:p>MINIMUM SALE PRICE</text:p>
          </table:table-cell>
          <table:covered-table-cell table:number-columns-repeated="2" table:style-name="ce53"/>
          <table:table-cell table:style-name="ce53" office:value-type="string" ns42:value-type="string" table:number-columns-spanned="3" table:number-rows-spanned="1">
            <text:p>DEMO MARKET PRICE</text:p>
          </table:table-cell>
          <table:covered-table-cell table:number-columns-repeated="2" table:style-name="ce53"/>
          <table:table-cell table:style-name="ce53" office:value-type="string" ns42:value-type="string" table:number-columns-spanned="3" table:number-rows-spanned="1">
            <text:p>MARKET TEST</text:p>
          </table:table-cell>
          <table:covered-table-cell table:number-columns-repeated="2" table:style-name="ce53"/>
        </table:table-row>
        <table:table-row table:style-name="ro12">
          <table:table-cell table:style-name="ce69" office:value-type="string" ns42:value-type="string" table:number-columns-spanned="3" table:number-rows-spanned="1">
            <text:p>$48.985</text:p>
          </table:table-cell>
          <table:covered-table-cell table:number-columns-repeated="2" table:style-name="ce69"/>
          <table:table-cell table:style-name="ce69" office:value-type="string" ns42:value-type="string" table:number-columns-spanned="3" table:number-rows-spanned="1">
            <text:p>$100.00</text:p>
          </table:table-cell>
          <table:covered-table-cell table:number-columns-repeated="2" table:style-name="ce69"/>
          <table:table-cell table:style-name="ce79" office:value-type="string" ns42:value-type="string" table:number-columns-spanned="3" table:number-rows-spanned="1">
            <text:p>13.25% · DEMO</text:p>
          </table:table-cell>
          <table:covered-table-cell table:number-columns-repeated="2" table:style-name="ce79"/>
          <table:table-cell table:style-name="ce45" office:value-type="string" ns42:value-type="string" table:number-columns-spanned="3" table:number-rows-spanned="1">
            <text:p>$171.74 · DEMO</text:p>
          </table:table-cell>
          <table:covered-table-cell table:number-columns-repeated="2" table:style-name="ce45"/>
          <table:table-cell table:style-name="ce45" office:value-type="string" ns42:value-type="string" table:number-columns-spanned="3" table:number-rows-spanned="1">
            <text:p>$175.00 · DEMO</text:p>
          </table:table-cell>
          <table:covered-table-cell table:number-columns-repeated="2" table:style-name="ce45"/>
          <table:table-cell table:style-name="ce53" office:value-type="string" ns42:value-type="string" table:number-columns-spanned="3" table:number-rows-spanned="1">
            <text:p>CLEARS TARGET · DEMO</text:p>
          </table:table-cell>
          <table:covered-table-cell table:number-columns-repeated="2" table:style-name="ce53"/>
        </table:table-row>
        <table:table-row table:style-name="ro12">
          <table:table-cell table:style-name="ce71" office:value-type="string" ns42:value-type="string" table:number-columns-spanned="3" table:number-rows-spanned="1">
            <text:p>DEMO LISTING PRICE</text:p>
          </table:table-cell>
          <table:covered-table-cell table:number-columns-repeated="2" table:style-name="ce71"/>
          <table:table-cell table:style-name="ce71" office:value-type="string" ns42:value-type="string" table:number-columns-spanned="3" table:number-rows-spanned="1">
            <text:p>NET AFTER DEMO FEE</text:p>
          </table:table-cell>
          <table:covered-table-cell table:number-columns-repeated="2" table:style-name="ce71"/>
          <table:table-cell table:style-name="ce71" office:value-type="string" ns42:value-type="string" table:number-columns-spanned="3" table:number-rows-spanned="1">
            <text:p>PROFIT / BOX</text:p>
          </table:table-cell>
          <table:covered-table-cell table:number-columns-repeated="2" table:style-name="ce71"/>
          <table:table-cell table:style-name="ce71" office:value-type="string" ns42:value-type="string" table:number-columns-spanned="3" table:number-rows-spanned="1">
            <text:p>ABOVE MINIMUM</text:p>
          </table:table-cell>
          <table:covered-table-cell table:number-columns-repeated="2" table:style-name="ce71"/>
          <table:table-cell table:style-name="ce71" office:value-type="string" ns42:value-type="string" table:number-columns-spanned="3" table:number-rows-spanned="1">
            <text:p>QUANTITY</text:p>
          </table:table-cell>
          <table:covered-table-cell table:number-columns-repeated="2" table:style-name="ce71"/>
          <table:table-cell table:style-name="ce71" office:value-type="string" ns42:value-type="string" table:number-columns-spanned="3" table:number-rows-spanned="1">
            <text:p>DECISION STATE</text:p>
          </table:table-cell>
          <table:covered-table-cell table:number-columns-repeated="2" table:style-name="ce71"/>
        </table:table-row>
        <table:table-row table:style-name="ro12">
          <table:table-cell table:style-name="ce72" office:value-type="string" ns42:value-type="string" table:number-columns-spanned="3" table:number-rows-spanned="1">
            <text:p>$185.00 · DEMO</text:p>
          </table:table-cell>
          <table:covered-table-cell table:number-columns-repeated="2" table:style-name="ce72"/>
          <table:table-cell table:style-name="ce72" office:value-type="string" ns42:value-type="string" table:number-columns-spanned="3" table:number-rows-spanned="1">
            <text:p>$160.49 · DEMO</text:p>
          </table:table-cell>
          <table:covered-table-cell table:number-columns-repeated="2" table:style-name="ce72"/>
          <table:table-cell table:style-name="ce72" office:value-type="string" ns42:value-type="string" table:number-columns-spanned="3" table:number-rows-spanned="1">
            <text:p>$111.50 · DEMO</text:p>
          </table:table-cell>
          <table:covered-table-cell table:number-columns-repeated="2" table:style-name="ce72"/>
          <table:table-cell table:style-name="ce72" office:value-type="string" ns42:value-type="string" table:number-columns-spanned="3" table:number-rows-spanned="1">
            <text:p>+$13.26 · DEMO</text:p>
          </table:table-cell>
          <table:covered-table-cell table:number-columns-repeated="2" table:style-name="ce72"/>
          <table:table-cell table:style-name="ce69" office:value-type="string" ns42:value-type="string" table:number-columns-spanned="3" table:number-rows-spanned="1">
            <text:p>2</text:p>
          </table:table-cell>
          <table:covered-table-cell table:number-columns-repeated="2" table:style-name="ce69"/>
          <table:table-cell table:style-name="ce53" office:value-type="string" ns42:value-type="string" table:number-columns-spanned="3" table:number-rows-spanned="1">
            <text:p>READY TO SELL · DEMO</text:p>
          </table:table-cell>
          <table:covered-table-cell table:number-columns-repeated="2" table:style-name="ce53"/>
        </table:table-row>
        <table:table-row table:style-name="ro16">
          <table:table-cell table:style-name="ce61" office:value-type="string" ns42:value-type="string" table:number-columns-spanned="18" table:number-rows-spanned="1">
            <text:p>DEMO THRESHOLD LOGIC: minimum sale price = (average unit cost + $100 profit target) ÷ (1 − demo fee rate). At the fictional 13.25% fee basis, the test threshold is $171.74 per box. The fictional $175 market context clears that threshold; the fictional $185 listing price produces about $111.50 profit per box.</text:p>
          </table:table-cell>
          <table:covered-table-cell table:number-columns-repeated="17" table:style-name="ce61"/>
        </table:table-row>
        <table:table-row table:style-name="ro17">
          <table:table-cell table:style-name="ce70" office:value-type="string" ns42:value-type="string" table:number-columns-spanned="18" table:number-rows-spanned="1">
            <text:p>CROSS-CHECK MODE: this section tests whether MarketDEX should show the exact price needed to hit your profit goal before comparing market price and listing price. All fee and price context remains DEMO until promoted from authoritative evidence.</text:p>
          </table:table-cell>
          <table:covered-table-cell table:number-columns-repeated="17" table:style-name="ce70"/>
        </table:table-row>
        <table:table-row table:style-name="ro5">
          <table:table-cell table:number-columns-repeated="18"/>
        </table:table-row>
        <table:table-row table:style-name="ro12">
          <table:table-cell table:style-name="ce62" office:value-type="string" ns42:value-type="string" table:number-columns-spanned="18" table:number-rows-spanned="1">
            <text:p>🚦 SELL ACTION BANDS · DEMO DECISION TRANSLATION</text:p>
          </table:table-cell>
          <table:covered-table-cell table:number-columns-repeated="17" table:style-name="ce62"/>
        </table:table-row>
        <table:table-row table:style-name="ro12">
          <table:table-cell table:style-name="ce53" office:value-type="string" ns42:value-type="string" table:number-columns-spanned="4" table:number-rows-spanned="1">
            <text:p>PRICE CONDITION</text:p>
          </table:table-cell>
          <table:covered-table-cell table:number-columns-repeated="3" table:style-name="ce53"/>
          <table:table-cell table:style-name="ce53" office:value-type="string" ns42:value-type="string" table:number-columns-spanned="4" table:number-rows-spanned="1">
            <text:p>PROFIT SIGNAL</text:p>
          </table:table-cell>
          <table:covered-table-cell table:number-columns-repeated="3" table:style-name="ce53"/>
          <table:table-cell table:style-name="ce53" office:value-type="string" ns42:value-type="string" table:number-columns-spanned="4" table:number-rows-spanned="1">
            <text:p>MARKETDEX ACTION</text:p>
          </table:table-cell>
          <table:covered-table-cell table:number-columns-repeated="3" table:style-name="ce53"/>
          <table:table-cell table:style-name="ce53" office:value-type="string" ns42:value-type="string" table:number-columns-spanned="6" table:number-rows-spanned="1">
            <text:p>BUSINESS MEANING</text:p>
          </table:table-cell>
          <table:covered-table-cell table:number-columns-repeated="5" table:style-name="ce53"/>
        </table:table-row>
        <table:table-row table:style-name="ro12">
          <table:table-cell table:style-name="ce65" office:value-type="string" ns42:value-type="string" table:number-columns-spanned="4" table:number-rows-spanned="1">
            <text:p>BELOW $171.74 · DEMO</text:p>
          </table:table-cell>
          <table:covered-table-cell table:number-columns-repeated="3" table:style-name="ce65"/>
          <table:table-cell table:style-name="ce77" office:value-type="string" ns42:value-type="string" table:number-columns-spanned="4" table:number-rows-spanned="1">
            <text:p>TARGET NOT MET</text:p>
          </table:table-cell>
          <table:covered-table-cell table:number-columns-repeated="3" table:style-name="ce77"/>
          <table:table-cell table:style-name="ce72" office:value-type="string" ns42:value-type="string" table:number-columns-spanned="4" table:number-rows-spanned="1">
            <text:p>HOLD</text:p>
          </table:table-cell>
          <table:covered-table-cell table:number-columns-repeated="3" table:style-name="ce72"/>
          <table:table-cell table:style-name="ce54" office:value-type="string" ns42:value-type="string" table:number-columns-spanned="6" table:number-rows-spanned="1">
            <text:p>Do not promote a sell signal from this test.</text:p>
          </table:table-cell>
          <table:covered-table-cell table:number-columns-repeated="5" table:style-name="ce54"/>
        </table:table-row>
        <table:table-row table:style-name="ro12">
          <table:table-cell table:style-name="ce65" office:value-type="string" ns42:value-type="string" table:number-columns-spanned="4" table:number-rows-spanned="1">
            <text:p>$171.74–$184.99 · DEMO</text:p>
          </table:table-cell>
          <table:covered-table-cell table:number-columns-repeated="3" table:style-name="ce65"/>
          <table:table-cell table:style-name="ce65" office:value-type="string" ns42:value-type="string" table:number-columns-spanned="4" table:number-rows-spanned="1">
            <text:p>TARGET MET</text:p>
          </table:table-cell>
          <table:covered-table-cell table:number-columns-repeated="3" table:style-name="ce65"/>
          <table:table-cell table:style-name="ce49" office:value-type="string" ns42:value-type="string" table:number-columns-spanned="4" table:number-rows-spanned="1">
            <text:p>READY TO SELL</text:p>
          </table:table-cell>
          <table:covered-table-cell table:number-columns-repeated="3" table:style-name="ce49"/>
          <table:table-cell table:style-name="ce54" office:value-type="string" ns42:value-type="string" table:number-columns-spanned="6" table:number-rows-spanned="1">
            <text:p>Profit target is met. Selling becomes an authorized decision option.</text:p>
          </table:table-cell>
          <table:covered-table-cell table:number-columns-repeated="5" table:style-name="ce54"/>
        </table:table-row>
        <table:table-row table:style-name="ro12">
          <table:table-cell table:style-name="ce65" office:value-type="string" ns42:value-type="string" table:number-columns-spanned="4" table:number-rows-spanned="1">
            <text:p>$185.00+ · DEMO</text:p>
          </table:table-cell>
          <table:covered-table-cell table:number-columns-repeated="3" table:style-name="ce65"/>
          <table:table-cell table:style-name="ce78" office:value-type="string" ns42:value-type="string" table:number-columns-spanned="4" table:number-rows-spanned="1">
            <text:p>TARGET EXCEEDED</text:p>
          </table:table-cell>
          <table:covered-table-cell table:number-columns-repeated="3" table:style-name="ce78"/>
          <table:table-cell table:style-name="ce49" office:value-type="string" ns42:value-type="string" table:number-columns-spanned="4" table:number-rows-spanned="1">
            <text:p>SELL OPPORTUNITY</text:p>
          </table:table-cell>
          <table:covered-table-cell table:number-columns-repeated="3" table:style-name="ce49"/>
          <table:table-cell table:style-name="ce54" office:value-type="string" ns42:value-type="string" table:number-columns-spanned="6" table:number-rows-spanned="1">
            <text:p>Test price exceeds the target threshold and deserves attention.</text:p>
          </table:table-cell>
          <table:covered-table-cell table:number-columns-repeated="5" table:style-name="ce54"/>
        </table:table-row>
        <table:table-row table:style-name="ro12">
          <table:table-cell table:style-name="ce68" office:value-type="string" ns42:value-type="string" table:number-columns-spanned="6" table:number-rows-spanned="1">
            <text:p>CURRENT DEMO MARKET CONTEXT</text:p>
          </table:table-cell>
          <table:covered-table-cell table:number-columns-repeated="5" table:style-name="ce68"/>
          <table:table-cell table:style-name="ce68" office:value-type="string" ns42:value-type="string" table:number-columns-spanned="6" table:number-rows-spanned="1">
            <text:p>CURRENT DEMO LISTING CONTEXT</text:p>
          </table:table-cell>
          <table:covered-table-cell table:number-columns-repeated="5" table:style-name="ce68"/>
          <table:table-cell table:style-name="ce68" office:value-type="string" ns42:value-type="string" table:number-columns-spanned="6" table:number-rows-spanned="1">
            <text:p>CURRENT TEST INTERPRETATION</text:p>
          </table:table-cell>
          <table:covered-table-cell table:number-columns-repeated="5" table:style-name="ce68"/>
        </table:table-row>
        <table:table-row table:style-name="ro12">
          <table:table-cell table:style-name="ce72" office:value-type="string" ns42:value-type="string" table:number-columns-spanned="6" table:number-rows-spanned="1">
            <text:p>$175.00 · READY TO SELL</text:p>
          </table:table-cell>
          <table:covered-table-cell table:number-columns-repeated="5" table:style-name="ce72"/>
          <table:table-cell table:style-name="ce72" office:value-type="string" ns42:value-type="string" table:number-columns-spanned="6" table:number-rows-spanned="1">
            <text:p>$185.00 · SELL OPPORTUNITY</text:p>
          </table:table-cell>
          <table:covered-table-cell table:number-columns-repeated="5" table:style-name="ce72"/>
          <table:table-cell table:style-name="ce53" office:value-type="string" ns42:value-type="string" table:number-columns-spanned="6" table:number-rows-spanned="1">
            <text:p>TARGET CLEARED · ACTION VISIBLE</text:p>
          </table:table-cell>
          <table:covered-table-cell table:number-columns-repeated="5" table:style-name="ce53"/>
        </table:table-row>
        <table:table-row table:style-name="ro16">
          <table:table-cell table:style-name="ce61" office:value-type="string" ns42:value-type="string" table:number-columns-spanned="18" table:number-rows-spanned="1">
            <text:p>DEMO DECISION RULE: MarketDEX translates the threshold comparison into plain-language action bands. HOLD means the $100 profit target is not met. READY TO SELL means the target is met. SELL OPPORTUNITY means the test price exceeds the target threshold enough to deserve attention. These are decision signals, not automatic sale instructions.</text:p>
          </table:table-cell>
          <table:covered-table-cell table:number-columns-repeated="17" table:style-name="ce61"/>
        </table:table-row>
        <table:table-row table:style-name="ro12">
          <table:table-cell table:style-name="ce70" office:value-type="string" ns42:value-type="string" table:number-columns-spanned="18" table:number-rows-spanned="1">
            <text:p>CROSS-CHECK MODE: fictional prices and fee basis remain DEMO. Approve the action language if it is easier to recognize than raw price math alone.</text:p>
          </table:table-cell>
          <table:covered-table-cell table:number-columns-repeated="17" table:style-name="ce70"/>
        </table:table-row>
        <table:table-row table:style-name="ro5">
          <table:table-cell table:number-columns-repeated="18"/>
        </table:table-row>
        <table:table-row table:style-name="ro12">
          <table:table-cell table:style-name="ce62" office:value-type="string" ns42:value-type="string" table:number-columns-spanned="18" table:number-rows-spanned="1">
            <text:p>🏁 SELL PRIORITY SIGNAL · DEMO ATTENTION TEST</text:p>
          </table:table-cell>
          <table:covered-table-cell table:number-columns-repeated="17" table:style-name="ce62"/>
        </table:table-row>
        <table:table-row table:style-name="ro12">
          <table:table-cell table:style-name="ce53" office:value-type="string" ns42:value-type="string" table:number-columns-spanned="3" table:number-rows-spanned="1">
            <text:p>PROFIT SIGNAL</text:p>
          </table:table-cell>
          <table:covered-table-cell table:number-columns-repeated="2" table:style-name="ce53"/>
          <table:table-cell table:style-name="ce53" office:value-type="string" ns42:value-type="string" table:number-columns-spanned="3" table:number-rows-spanned="1">
            <text:p>DAYS HELD</text:p>
          </table:table-cell>
          <table:covered-table-cell table:number-columns-repeated="2" table:style-name="ce53"/>
          <table:table-cell table:style-name="ce53" office:value-type="string" ns42:value-type="string" table:number-columns-spanned="3" table:number-rows-spanned="1">
            <text:p>LISTING READINESS</text:p>
          </table:table-cell>
          <table:covered-table-cell table:number-columns-repeated="2" table:style-name="ce53"/>
          <table:table-cell table:style-name="ce53" office:value-type="string" ns42:value-type="string" table:number-columns-spanned="3" table:number-rows-spanned="1">
            <text:p>REVIEW TIMING</text:p>
          </table:table-cell>
          <table:covered-table-cell table:number-columns-repeated="2" table:style-name="ce53"/>
          <table:table-cell table:style-name="ce53" office:value-type="string" ns42:value-type="string" table:number-columns-spanned="3" table:number-rows-spanned="1">
            <text:p>PRIORITY</text:p>
          </table:table-cell>
          <table:covered-table-cell table:number-columns-repeated="2" table:style-name="ce53"/>
          <table:table-cell table:style-name="ce53" office:value-type="string" ns42:value-type="string" table:number-columns-spanned="3" table:number-rows-spanned="1">
            <text:p>ACTION FOCUS</text:p>
          </table:table-cell>
          <table:covered-table-cell table:number-columns-repeated="2" table:style-name="ce53"/>
        </table:table-row>
        <table:table-row table:style-name="ro12">
          <table:table-cell table:style-name="ce65" office:value-type="string" ns42:value-type="string" table:number-columns-spanned="3" table:number-rows-spanned="1">
            <text:p>SELL OPPORTUNITY · DEMO</text:p>
          </table:table-cell>
          <table:covered-table-cell table:number-columns-repeated="2" table:style-name="ce65"/>
          <table:table-cell table:style-name="ce72" office:value-type="string" ns42:value-type="string" table:number-columns-spanned="3" table:number-rows-spanned="1">
            <text:p>10 DAYS</text:p>
          </table:table-cell>
          <table:covered-table-cell table:number-columns-repeated="2" table:style-name="ce72"/>
          <table:table-cell table:style-name="ce77" office:value-type="string" ns42:value-type="string" table:number-columns-spanned="3" table:number-rows-spanned="1">
            <text:p>PREPARATION NEEDED</text:p>
          </table:table-cell>
          <table:covered-table-cell table:number-columns-repeated="2" table:style-name="ce77"/>
          <table:table-cell table:style-name="ce65" office:value-type="string" ns42:value-type="string" table:number-columns-spanned="3" table:number-rows-spanned="1">
            <text:p>EARLY DEC 2026</text:p>
          </table:table-cell>
          <table:covered-table-cell table:number-columns-repeated="2" table:style-name="ce65"/>
          <table:table-cell table:style-name="ce49" office:value-type="string" ns42:value-type="string" table:number-columns-spanned="3" table:number-rows-spanned="1">
            <text:p>NORMAL · DEMO</text:p>
          </table:table-cell>
          <table:covered-table-cell table:number-columns-repeated="2" table:style-name="ce49"/>
          <table:table-cell table:style-name="ce65" office:value-type="string" ns42:value-type="string" table:number-columns-spanned="3" table:number-rows-spanned="1">
            <text:p>PREPARE, DO NOT RUSH</text:p>
          </table:table-cell>
          <table:covered-table-cell table:number-columns-repeated="2" table:style-name="ce65"/>
        </table:table-row>
        <table:table-row table:style-name="ro12">
          <table:table-cell table:style-name="ce68" office:value-type="string" ns42:value-type="string" table:number-columns-spanned="6" table:number-rows-spanned="1">
            <text:p>PRIORITY RULE</text:p>
          </table:table-cell>
          <table:covered-table-cell table:number-columns-repeated="5" table:style-name="ce68"/>
          <table:table-cell table:style-name="ce68" office:value-type="string" ns42:value-type="string" table:number-columns-spanned="6" table:number-rows-spanned="1">
            <text:p>WHY NORMAL?</text:p>
          </table:table-cell>
          <table:covered-table-cell table:number-columns-repeated="5" table:style-name="ce68"/>
          <table:table-cell table:style-name="ce68" office:value-type="string" ns42:value-type="string" table:number-columns-spanned="6" table:number-rows-spanned="1">
            <text:p>WHAT WOULD MAKE IT HIGH?</text:p>
          </table:table-cell>
          <table:covered-table-cell table:number-columns-repeated="5" table:style-name="ce68"/>
        </table:table-row>
        <table:table-row table:style-name="ro16">
          <table:table-cell table:style-name="ce61" office:value-type="string" ns42:value-type="string" table:number-columns-spanned="6" table:number-rows-spanned="1">
            <text:p>Profit signal + inventory age + listing readiness + planned review timing</text:p>
          </table:table-cell>
          <table:covered-table-cell table:number-columns-repeated="5" table:style-name="ce61"/>
          <table:table-cell table:style-name="ce54" office:value-type="string" ns42:value-type="string" table:number-columns-spanned="6" table:number-rows-spanned="1">
            <text:p>Strong demo profit signal exists, but inventory is only 10 days old, the hold plan is intentional, and listing readiness is not complete.</text:p>
          </table:table-cell>
          <table:covered-table-cell table:number-columns-repeated="5" table:style-name="ce54"/>
          <table:table-cell table:style-name="ce54" office:value-type="string" ns42:value-type="string" table:number-columns-spanned="6" table:number-rows-spanned="1">
            <text:p>A review window arriving, older inventory, listing readiness completed, or a stronger verified opportunity signal could increase priority.</text:p>
          </table:table-cell>
          <table:covered-table-cell table:number-columns-repeated="5" table:style-name="ce54"/>
        </table:table-row>
        <table:table-row table:style-name="ro12">
          <table:table-cell table:style-name="ce73" office:value-type="string" ns42:value-type="string" table:number-columns-spanned="4" table:number-rows-spanned="1">
            <text:p>LOW</text:p>
          </table:table-cell>
          <table:covered-table-cell table:number-columns-repeated="3" table:style-name="ce73"/>
          <table:table-cell table:style-name="ce49" office:value-type="string" ns42:value-type="string" table:number-columns-spanned="4" table:number-rows-spanned="1">
            <text:p>NORMAL</text:p>
          </table:table-cell>
          <table:covered-table-cell table:number-columns-repeated="3" table:style-name="ce49"/>
          <table:table-cell table:style-name="ce81" office:value-type="string" ns42:value-type="string" table:number-columns-spanned="4" table:number-rows-spanned="1">
            <text:p>HIGH</text:p>
          </table:table-cell>
          <table:covered-table-cell table:number-columns-repeated="3" table:style-name="ce81"/>
          <table:table-cell table:style-name="ce49" office:value-type="string" ns42:value-type="string" table:number-columns-spanned="6" table:number-rows-spanned="1">
            <text:p>CURRENT DEMO STATE: NORMAL</text:p>
          </table:table-cell>
          <table:covered-table-cell table:number-columns-repeated="5" table:style-name="ce49"/>
        </table:table-row>
        <table:table-row table:style-name="ro12">
          <table:table-cell table:style-name="ce54" office:value-type="string" ns42:value-type="string" table:number-columns-spanned="4" table:number-rows-spanned="1">
            <text:p>No meaningful sell attention needed.</text:p>
          </table:table-cell>
          <table:covered-table-cell table:number-columns-repeated="3" table:style-name="ce54"/>
          <table:table-cell table:style-name="ce54" office:value-type="string" ns42:value-type="string" table:number-columns-spanned="4" table:number-rows-spanned="1">
            <text:p>Keep visible and prepare around the planned review.</text:p>
          </table:table-cell>
          <table:covered-table-cell table:number-columns-repeated="3" table:style-name="ce54"/>
          <table:table-cell table:style-name="ce54" office:value-type="string" ns42:value-type="string" table:number-columns-spanned="4" table:number-rows-spanned="1">
            <text:p>Needs near-term seller attention.</text:p>
          </table:table-cell>
          <table:covered-table-cell table:number-columns-repeated="3" table:style-name="ce54"/>
          <table:table-cell table:style-name="ce54" office:value-type="string" ns42:value-type="string" table:number-columns-spanned="6" table:number-rows-spanned="1">
            <text:p>The signal is visible, but MarketDEX respects your short-term hold plan.</text:p>
          </table:table-cell>
          <table:covered-table-cell table:number-columns-repeated="5" table:style-name="ce54"/>
        </table:table-row>
        <table:table-row table:style-name="ro18">
          <table:table-cell table:style-name="ce61" office:value-type="string" ns42:value-type="string" table:number-columns-spanned="18" table:number-rows-spanned="1">
            <text:p>DEMO PRIORITY LOGIC: Sell Priority is an attention signal, not a command to sell. MarketDEX should not mark inventory HIGH merely because fictional profit math looks attractive. Your hold intent, days held, readiness, and review timing remain part of the decision context.</text:p>
          </table:table-cell>
          <table:covered-table-cell table:number-columns-repeated="17" table:style-name="ce61"/>
        </table:table-row>
        <table:table-row table:style-name="ro12">
          <table:table-cell table:style-name="ce70" office:value-type="string" ns42:value-type="string" table:number-columns-spanned="18" table:number-rows-spanned="1">
            <text:p>CROSS-CHECK MODE: approve if NORMAL feels right for this fictional test state. All invented decision inputs remain DEMO unless supported by authoritative evidence.</text:p>
          </table:table-cell>
          <table:covered-table-cell table:number-columns-repeated="17" table:style-name="ce70"/>
        </table:table-row>
        <table:table-row table:style-name="ro5">
          <table:table-cell table:style-name="ce62" office:value-type="string" ns42:value-type="string" table:number-columns-spanned="18" table:number-rows-spanned="1">
            <text:p>🏷 LISTING READINESS PREPARATION GATE · DEMO EVIDENCE TEST</text:p>
          </table:table-cell>
          <table:covered-table-cell table:number-columns-repeated="17" table:style-name="ce62"/>
        </table:table-row>
        <table:table-row table:style-name="ro5">
          <table:table-cell table:style-name="ce73" office:value-type="string" ns42:value-type="string" table:number-columns-spanned="4" table:number-rows-spanned="1">
            <text:p>READINESS FACTOR</text:p>
          </table:table-cell>
          <table:covered-table-cell table:number-columns-repeated="3" table:style-name="ce73"/>
          <table:table-cell table:style-name="ce49" office:value-type="string" ns42:value-type="string" table:number-columns-spanned="4" table:number-rows-spanned="1">
            <text:p>FACTOR STATUS</text:p>
          </table:table-cell>
          <table:covered-table-cell table:number-columns-repeated="3" table:style-name="ce49"/>
          <table:table-cell table:style-name="ce81" office:value-type="string" ns42:value-type="string" table:number-columns-spanned="4" table:number-rows-spanned="1">
            <text:p>CURRENT EVIDENCE</text:p>
          </table:table-cell>
          <table:covered-table-cell table:number-columns-repeated="3" table:style-name="ce81"/>
          <table:table-cell table:style-name="ce49" office:value-type="string" ns42:value-type="string" table:number-columns-spanned="6" table:number-rows-spanned="1">
            <text:p>BLOCKER / MEANING</text:p>
          </table:table-cell>
          <table:covered-table-cell table:number-columns-repeated="5" table:style-name="ce49"/>
        </table:table-row>
        <table:table-row table:style-name="ro5">
          <table:table-cell table:style-name="ce54" office:value-type="string" ns42:value-type="string" table:number-columns-spanned="4" table:number-rows-spanned="1">
            <text:p>PRODUCT MATCH</text:p>
          </table:table-cell>
          <table:covered-table-cell table:number-columns-repeated="3" table:style-name="ce54"/>
          <table:table-cell table:style-name="ce54" office:value-type="string" ns42:value-type="string" table:number-columns-spanned="4" table:number-rows-spanned="1">
            <text:p>COMPLETE</text:p>
          </table:table-cell>
          <table:covered-table-cell table:number-columns-repeated="3" table:style-name="ce54"/>
          <table:table-cell table:style-name="ce54" office:value-type="string" ns42:value-type="string" table:number-columns-spanned="4" table:number-rows-spanned="1">
            <text:p>Promoted position identified</text:p>
          </table:table-cell>
          <table:covered-table-cell table:number-columns-repeated="3" table:style-name="ce54"/>
          <table:table-cell table:style-name="ce54" office:value-type="string" ns42:value-type="string" table:number-columns-spanned="6" table:number-rows-spanned="1">
            <text:p>No blocker in this demo state.</text:p>
          </table:table-cell>
          <table:covered-table-cell table:number-columns-repeated="5" table:style-name="ce54"/>
        </table:table-row>
        <table:table-row table:style-name="ro5">
          <table:table-cell table:style-name="ce54" office:value-type="string" ns42:value-type="string" table:number-columns-spanned="4" table:number-rows-spanned="1">
            <text:p>QUANTITY VERIFICATION</text:p>
          </table:table-cell>
          <table:covered-table-cell table:number-columns-repeated="3" table:style-name="ce54"/>
          <table:table-cell table:style-name="ce54" office:value-type="string" ns42:value-type="string" table:number-columns-spanned="4" table:number-rows-spanned="1">
            <text:p>COMPLETE</text:p>
          </table:table-cell>
          <table:covered-table-cell table:number-columns-repeated="3" table:style-name="ce54"/>
          <table:table-cell table:style-name="ce54" office:value-type="string" ns42:value-type="string" table:number-columns-spanned="4" table:number-rows-spanned="1">
            <text:p>Promoted quantity: 2</text:p>
          </table:table-cell>
          <table:covered-table-cell table:number-columns-repeated="3" table:style-name="ce54"/>
          <table:table-cell table:style-name="ce54" office:value-type="string" ns42:value-type="string" table:number-columns-spanned="6" table:number-rows-spanned="1">
            <text:p>No blocker in this demo state.</text:p>
          </table:table-cell>
          <table:covered-table-cell table:number-columns-repeated="5" table:style-name="ce54"/>
        </table:table-row>
        <table:table-row table:style-name="ro5">
          <table:table-cell table:style-name="ce54" office:value-type="string" ns42:value-type="string" table:number-columns-spanned="4" table:number-rows-spanned="1">
            <text:p>CONDITION</text:p>
          </table:table-cell>
          <table:covered-table-cell table:number-columns-repeated="3" table:style-name="ce54"/>
          <table:table-cell table:style-name="ce54" office:value-type="string" ns42:value-type="string" table:number-columns-spanned="4" table:number-rows-spanned="1">
            <text:p>NOT EVALUATED · DEMO</text:p>
          </table:table-cell>
          <table:covered-table-cell table:number-columns-repeated="3" table:style-name="ce54"/>
          <table:table-cell table:style-name="ce54" office:value-type="string" ns42:value-type="string" table:number-columns-spanned="4" table:number-rows-spanned="1">
            <text:p>No condition evidence</text:p>
          </table:table-cell>
          <table:covered-table-cell table:number-columns-repeated="3" table:style-name="ce54"/>
          <table:table-cell table:style-name="ce54" office:value-type="string" ns42:value-type="string" table:number-columns-spanned="6" table:number-rows-spanned="1">
            <text:p>Condition review is still required.</text:p>
          </table:table-cell>
          <table:covered-table-cell table:number-columns-repeated="5" table:style-name="ce54"/>
        </table:table-row>
        <table:table-row table:style-name="ro5">
          <table:table-cell table:style-name="ce54" office:value-type="string" ns42:value-type="string" table:number-columns-spanned="4" table:number-rows-spanned="1">
            <text:p>PHOTOS</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No photo-ready evidence</text:p>
          </table:table-cell>
          <table:covered-table-cell table:number-columns-repeated="3" table:style-name="ce54"/>
          <table:table-cell table:style-name="ce54" office:value-type="string" ns42:value-type="string" table:number-columns-spanned="6" table:number-rows-spanned="1">
            <text:p>Product photos must be prepared.</text:p>
          </table:table-cell>
          <table:covered-table-cell table:number-columns-repeated="5" table:style-name="ce54"/>
        </table:table-row>
        <table:table-row table:style-name="ro5">
          <table:table-cell table:style-name="ce54" office:value-type="string" ns42:value-type="string" table:number-columns-spanned="4" table:number-rows-spanned="1">
            <text:p>LISTING CONTENT</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No listing draft evidence</text:p>
          </table:table-cell>
          <table:covered-table-cell table:number-columns-repeated="3" table:style-name="ce54"/>
          <table:table-cell table:style-name="ce54" office:value-type="string" ns42:value-type="string" table:number-columns-spanned="6" table:number-rows-spanned="1">
            <text:p>Title and listing content must be prepared.</text:p>
          </table:table-cell>
          <table:covered-table-cell table:number-columns-repeated="5" table:style-name="ce54"/>
        </table:table-row>
        <table:table-row table:style-name="ro5">
          <table:table-cell table:style-name="ce54" office:value-type="string" ns42:value-type="string" table:number-columns-spanned="4" table:number-rows-spanned="1">
            <text:p>PRICE DECISION</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Only fictional price tests exist</text:p>
          </table:table-cell>
          <table:covered-table-cell table:number-columns-repeated="3" table:style-name="ce54"/>
          <table:table-cell table:style-name="ce54" office:value-type="string" ns42:value-type="string" table:number-columns-spanned="6" table:number-rows-spanned="1">
            <text:p>Replace demo pricing with a reviewed price decision.</text:p>
          </table:table-cell>
          <table:covered-table-cell table:number-columns-repeated="5" table:style-name="ce54"/>
        </table:table-row>
        <table:table-row table:style-name="ro5">
          <table:table-cell table:style-name="ce54" office:value-type="string" ns42:value-type="string" table:number-columns-spanned="4" table:number-rows-spanned="1">
            <text:p>PLATFORM</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eBay is test context only</text:p>
          </table:table-cell>
          <table:covered-table-cell table:number-columns-repeated="3" table:style-name="ce54"/>
          <table:table-cell table:style-name="ce54" office:value-type="string" ns42:value-type="string" table:number-columns-spanned="6" table:number-rows-spanned="1">
            <text:p>Confirm the actual listing platform.</text:p>
          </table:table-cell>
          <table:covered-table-cell table:number-columns-repeated="5" table:style-name="ce54"/>
        </table:table-row>
        <table:table-row table:style-name="ro5">
          <table:table-cell table:style-name="ce54" office:value-type="string" ns42:value-type="string" table:number-columns-spanned="4" table:number-rows-spanned="1">
            <text:p>SHIPPING REVIEW</text:p>
          </table:table-cell>
          <table:covered-table-cell table:number-columns-repeated="3" table:style-name="ce54"/>
          <table:table-cell table:style-name="ce54" office:value-type="string" ns42:value-type="string" table:number-columns-spanned="4" table:number-rows-spanned="1">
            <text:p>NOT EVALUATED · DEMO</text:p>
          </table:table-cell>
          <table:covered-table-cell table:number-columns-repeated="3" table:style-name="ce54"/>
          <table:table-cell table:style-name="ce54" office:value-type="string" ns42:value-type="string" table:number-columns-spanned="4" table:number-rows-spanned="1">
            <text:p>No reviewed shipping path</text:p>
          </table:table-cell>
          <table:covered-table-cell table:number-columns-repeated="3" table:style-name="ce54"/>
          <table:table-cell table:style-name="ce54" office:value-type="string" ns42:value-type="string" table:number-columns-spanned="6" table:number-rows-spanned="1">
            <text:p>Review packaging and shipping path.</text:p>
          </table:table-cell>
          <table:covered-table-cell table:number-columns-repeated="5" table:style-name="ce54"/>
        </table:table-row>
        <table:table-row table:style-name="ro5">
          <table:table-cell table:style-name="ce54" office:value-type="string" ns42:value-type="string" table:number-columns-spanned="4" table:number-rows-spanned="1">
            <text:p>DATA-QUALITY CLEARANCE</text:p>
          </table:table-cell>
          <table:covered-table-cell table:number-columns-repeated="3" table:style-name="ce54"/>
          <table:table-cell table:style-name="ce54" office:value-type="string" ns42:value-type="string" table:number-columns-spanned="4" table:number-rows-spanned="1">
            <text:p>NOT EVALUATED · DEMO</text:p>
          </table:table-cell>
          <table:covered-table-cell table:number-columns-repeated="3" table:style-name="ce54"/>
          <table:table-cell table:style-name="ce54" office:value-type="string" ns42:value-type="string" table:number-columns-spanned="4" table:number-rows-spanned="1">
            <text:p>Clearance not performed</text:p>
          </table:table-cell>
          <table:covered-table-cell table:number-columns-repeated="3" table:style-name="ce54"/>
          <table:table-cell table:style-name="ce54" office:value-type="string" ns42:value-type="string" table:number-columns-spanned="6" table:number-rows-spanned="1">
            <text:p>Resolve or clear blocking data-quality review.</text:p>
          </table:table-cell>
          <table:covered-table-cell table:number-columns-repeated="5" table:style-name="ce54"/>
        </table:table-row>
        <table:table-row table:style-name="ro5">
          <table:table-cell table:style-name="ce68" office:value-type="string" ns42:value-type="string" table:number-columns-spanned="6" table:number-rows-spanned="1">
            <text:p>OVERALL LISTING READINESS</text:p>
          </table:table-cell>
          <table:covered-table-cell table:number-columns-repeated="5" table:style-name="ce68"/>
          <table:table-cell table:style-name="ce68" office:value-type="string" ns42:value-type="string" table:number-columns-spanned="6" table:number-rows-spanned="1">
            <text:p>VISIBLE BLOCKING REASONS</text:p>
          </table:table-cell>
          <table:covered-table-cell table:number-columns-repeated="5" table:style-name="ce68"/>
          <table:table-cell table:style-name="ce68" office:value-type="string" ns42:value-type="string" table:number-columns-spanned="6" table:number-rows-spanned="1">
            <text:p>NEXT PREPARATION ACTION</text:p>
          </table:table-cell>
          <table:covered-table-cell table:number-columns-repeated="5" table:style-name="ce68"/>
        </table:table-row>
        <table:table-row table:style-name="ro19">
          <table:table-cell table:style-name="ce61" table:formula="of:=IF(COUNTA([.E91:.E99])=0;&quot;NOT EVALUATED&quot;;IF(COUNTIF([.E91:.E99];&quot;.*BLOCKED.*&quot;)&gt;0;&quot;BLOCKED&quot;;IF(COUNTIF([.E91:.E99];&quot;.*PREPARATION NEEDED.*&quot;)+COUNTIF([.E91:.E99];&quot;.*NOT EVALUATED.*&quot;)&gt;0;&quot;PREPARATION NEEDED&quot;;&quot;READY TO LIST&quot;)))" office:value-type="string" office:string-value="READY TO LIST" ns42:value-type="string" table:number-columns-spanned="6" table:number-rows-spanned="1">
            <text:p>READY TO LIST</text:p>
          </table:table-cell>
          <table:covered-table-cell table:number-columns-repeated="5" table:style-name="ce61"/>
          <table:table-cell table:style-name="ce54" office:value-type="string" ns42:value-type="string" table:number-columns-spanned="6" table:number-rows-spanned="1">
            <text:p>Condition, photos, listing content, reviewed price, platform confirmation, shipping review, and data-quality clearance.</text:p>
          </table:table-cell>
          <table:covered-table-cell table:number-columns-repeated="5" table:style-name="ce54"/>
          <table:table-cell table:style-name="ce54" office:value-type="string" ns42:value-type="string" table:number-columns-spanned="6" table:number-rows-spanned="1">
            <text:p>PREPARE PRODUCT PHOTOS · DEMO NEXT ACTION</text:p>
          </table:table-cell>
          <table:covered-table-cell table:number-columns-repeated="5" table:style-name="ce54"/>
        </table:table-row>
        <table:table-row table:style-name="ro19">
          <table:table-cell table:style-name="ce61" office:value-type="string" ns42:value-type="string" table:number-columns-spanned="18" table:number-rows-spanned="1">
            <text:p>DEMO READINESS LOGIC: Product and quantity are supported by the promoted position. Missing preparation evidence keeps the item at PREPARATION NEEDED; no authoritative listing is created.</text:p>
          </table:table-cell>
          <table:covered-table-cell table:number-columns-repeated="17" table:style-name="ce61"/>
        </table:table-row>
        <table:table-row table:style-name="ro19">
          <table:table-cell table:style-name="ce61" office:value-type="string" ns42:value-type="string" table:number-columns-spanned="18" table:number-rows-spanned="1">
            <text:p>NEXT ACTION: prepare product photos, then continue condition, listing-content, reviewed-price, platform, shipping, and data-quality preparation. This does not change the approved short-term hold intent.</text:p>
          </table:table-cell>
          <table:covered-table-cell table:number-columns-repeated="17" table:style-name="ce61"/>
        </table:table-row>
        <table:table-row table:style-name="ro5">
          <table:table-cell table:style-name="ce73" office:value-type="string" ns42:value-type="string" table:number-columns-spanned="4" table:number-rows-spanned="1">
            <text:p>READY TO LIST</text:p>
          </table:table-cell>
          <table:covered-table-cell table:number-columns-repeated="3" table:style-name="ce73"/>
          <table:table-cell table:style-name="ce49" office:value-type="string" ns42:value-type="string" table:number-columns-spanned="4" table:number-rows-spanned="1">
            <text:p>PREPARATION NEEDED</text:p>
          </table:table-cell>
          <table:covered-table-cell table:number-columns-repeated="3" table:style-name="ce49"/>
          <table:table-cell table:style-name="ce81" office:value-type="string" ns42:value-type="string" table:number-columns-spanned="4" table:number-rows-spanned="1">
            <text:p>BLOCKED</text:p>
          </table:table-cell>
          <table:covered-table-cell table:number-columns-repeated="3" table:style-name="ce81"/>
          <table:table-cell table:style-name="ce49" office:value-type="string" ns42:value-type="string" table:number-columns-spanned="6" table:number-rows-spanned="1">
            <text:p>NOT EVALUATED</text:p>
          </table:table-cell>
          <table:covered-table-cell table:number-columns-repeated="5" table:style-name="ce49"/>
        </table:table-row>
        <table:table-row table:style-name="ro20">
          <table:table-cell table:style-name="ce70" office:value-type="string" ns42:value-type="string" table:number-columns-spanned="18" table:number-rows-spanned="1">
            <text:p>VOCABULARY CONTRACT: READY TO LIST requires every applicable factor to be supported. PREPARATION NEEDED exposes incomplete work. BLOCKED identifies a preventing issue. NOT EVALUATED means readiness evidence has not been assessed.</text:p>
          </table:table-cell>
          <table:covered-table-cell table:number-columns-repeated="17" table:style-name="ce70"/>
        </table:table-row>
        <table:table-row table:style-name="ro5">
          <table:table-cell table:style-name="ce62" office:value-type="string" ns42:value-type="string" table:number-columns-spanned="18" table:number-rows-spanned="1">
            <text:p>📸 LISTING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BLOCKER AFFECTED</text:p>
          </table:table-cell>
          <table:covered-table-cell table:number-columns-repeated="3" table:style-name="ce81"/>
          <table:table-cell table:style-name="ce49" office:value-type="string" ns42:value-type="string" table:number-columns-spanned="6" table:number-rows-spanned="1">
            <text:p>RESULT AFTER COMPLETION</text:p>
          </table:table-cell>
          <table:covered-table-cell table:number-columns-repeated="5" table:style-name="ce49"/>
        </table:table-row>
        <table:table-row table:style-name="ro5">
          <table:table-cell table:style-name="ce54" office:value-type="string" ns42:value-type="string" table:number-columns-spanned="4" table:number-rows-spanned="1">
            <text:p>PREPARE PRODUCT PHOTOS</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HOTOS</text:p>
          </table:table-cell>
          <table:covered-table-cell table:number-columns-repeated="3" table:style-name="ce54"/>
          <table:table-cell table:style-name="ce54" office:value-type="string" ns42:value-type="string" table:number-columns-spanned="6" table:number-rows-spanned="1">
            <text:p>PHOTOS CLEARED · DEMO</text:p>
          </table:table-cell>
          <table:covered-table-cell table:number-columns-repeated="5" table:style-name="ce54"/>
        </table:table-row>
        <table:table-row table:style-name="ro5">
          <table:table-cell table:style-name="ce68" office:value-type="string" ns42:value-type="string" table:number-columns-spanned="6" table:number-rows-spanned="1">
            <text:p>READINESS AFTER ACTION</text:p>
          </table:table-cell>
          <table:covered-table-cell table:number-columns-repeated="5" table:style-name="ce68"/>
          <table:table-cell table:style-name="ce68" office:value-type="string" ns42:value-type="string" table:number-columns-spanned="6" table:number-rows-spanned="1">
            <text:p>NEXT REMAINING BLOCKER</text:p>
          </table:table-cell>
          <table:covered-table-cell table:number-columns-repeated="5" table:style-name="ce68"/>
          <table:table-cell table:style-name="ce68" office:value-type="string" ns42:value-type="string" table:number-columns-spanned="6" table:number-rows-spanned="1">
            <text:p>PROTECTED BLOCKERS</text:p>
          </table:table-cell>
          <table:covered-table-cell table:number-columns-repeated="5" table:style-name="ce68"/>
        </table:table-row>
        <table:table-row table:style-name="ro20">
          <table:table-cell table:style-name="ce61" office:value-type="string" ns42:value-type="string" table:number-columns-spanned="6" table:number-rows-spanned="1">
            <text:p>PREPARATION NEEDED</text:p>
          </table:table-cell>
          <table:covered-table-cell table:number-columns-repeated="5" table:style-name="ce61"/>
          <table:table-cell table:style-name="ce54" office:value-type="string" ns42:value-type="string" table:number-columns-spanned="6" table:number-rows-spanned="1">
            <text:p>CONDITION</text:p>
          </table:table-cell>
          <table:covered-table-cell table:number-columns-repeated="5" table:style-name="ce54"/>
          <table:table-cell table:style-name="ce54" office:value-type="string" ns42:value-type="string" table:number-columns-spanned="6" table:number-rows-spanned="1">
            <text:p>Condition, listing content, reviewed price, platform confirmation, shipping review, and data-quality clearance remain unresolved.</text:p>
          </table:table-cell>
          <table:covered-table-cell table:number-columns-repeated="5" table:style-name="ce54"/>
        </table:table-row>
        <table:table-row table:style-name="ro5">
          <table:table-cell table:style-name="ce61" office:value-type="string" ns42:value-type="string" table:number-columns-spanned="18" table:number-rows-spanned="1">
            <text:p>DEMO ACTION RESULT: Completing PREPARE PRODUCT PHOTOS clears Photos only. Listing Readiness remains PREPARATION NEEDED because other required blockers remain.</text:p>
          </table:table-cell>
          <table:covered-table-cell table:number-columns-repeated="17" table:style-name="ce61"/>
        </table:table-row>
        <table:table-row table:style-name="ro5">
          <table:table-cell table:style-name="ce61" office:value-type="string" ns42:value-type="string" table:number-columns-spanned="18" table:number-rows-spanned="1">
            <text:p>NEXT BLOCKER: CONDITION · DEMO. Preparation actions resolve one supported blocker at a time and cannot silently make inventory READY TO LIST.</text:p>
          </table:table-cell>
          <table:covered-table-cell table:number-columns-repeated="17" table:style-name="ce61"/>
        </table:table-row>
        <table:table-row table:style-name="ro5">
          <table:table-cell table:style-name="ce62" office:value-type="string" ns42:value-type="string" table:number-columns-spanned="18" table:number-rows-spanned="1">
            <text:p>🔎 CONDITION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CONDITION RESULT</text:p>
          </table:table-cell>
          <table:covered-table-cell table:number-columns-repeated="3" table:style-name="ce81"/>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PRODUCT CONDI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EALED · ACCEPTABLE FOR LISTING · DEMO</text:p>
          </table:table-cell>
          <table:covered-table-cell table:number-columns-repeated="3" table:style-name="ce54"/>
          <table:table-cell table:style-name="ce54" office:value-type="string" ns42:value-type="string" table:number-columns-spanned="6" table:number-rows-spanned="1">
            <text:p>CONDITION</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READINESS AFTER ACTION</text:p>
          </table:table-cell>
          <table:covered-table-cell table:number-columns-repeated="5" table:style-name="ce68"/>
          <table:table-cell table:style-name="ce68" office:value-type="string" ns42:value-type="string" table:number-columns-spanned="6" table:number-rows-spanned="1">
            <text:p>NEXT REMAINING BLOCKER</text:p>
          </table:table-cell>
          <table:covered-table-cell table:number-columns-repeated="5" table:style-name="ce68"/>
        </table:table-row>
        <table:table-row table:style-name="ro5">
          <table:table-cell table:style-name="ce61" office:value-type="string" ns42:value-type="string" table:number-columns-spanned="6" table:number-rows-spanned="1">
            <text:p>CONDITION REVIEWED · DEMO</text:p>
          </table:table-cell>
          <table:covered-table-cell table:number-columns-repeated="5" table:style-name="ce61"/>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LISTING CONTENT</text:p>
          </table:table-cell>
          <table:covered-table-cell table:number-columns-repeated="5" table:style-name="ce54"/>
        </table:table-row>
        <table:table-row table:style-name="ro5">
          <table:table-cell table:style-name="ce61" office:value-type="string" ns42:value-type="string" table:number-columns-spanned="18" table:number-rows-spanned="1">
            <text:p>DEMO ACTION RESULT: Completing REVIEW PRODUCT CONDITION clears Condition only. Listing Readiness remains PREPARATION NEEDED because other required blockers remain.</text:p>
          </table:table-cell>
          <table:covered-table-cell table:number-columns-repeated="17" table:style-name="ce61"/>
        </table:table-row>
        <table:table-row table:style-name="ro5">
          <table:table-cell table:style-name="ce61" office:value-type="string" ns42:value-type="string" table:number-columns-spanned="18" table:number-rows-spanned="1">
            <text:p>NEXT BLOCKER: LISTING CONTENT · DEMO. Condition review evidence cannot silently clear listing content, price decision, platform, shipping review, or data-quality clearance.</text:p>
          </table:table-cell>
          <table:covered-table-cell table:number-columns-repeated="17" table:style-name="ce61"/>
        </table:table-row>
        <table:table-row table:style-name="ro5">
          <table:table-cell table:style-name="ce62" office:value-type="string" ns42:value-type="string" table:number-columns-spanned="18" table:number-rows-spanned="1">
            <text:p>📝 LISTING CONTENT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CONTENT RESULT</text:p>
          </table:table-cell>
          <table:covered-table-cell table:number-columns-repeated="3" table:style-name="ce81"/>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PREPARE LISTING CONTEN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TITLE + BASIC DESCRIPTION PREPARED · DEMO</text:p>
          </table:table-cell>
          <table:covered-table-cell table:number-columns-repeated="3" table:style-name="ce54"/>
          <table:table-cell table:style-name="ce54" office:value-type="string" ns42:value-type="string" table:number-columns-spanned="6" table:number-rows-spanned="1">
            <text:p>LISTING CONTENT</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READINESS AFTER ACTION</text:p>
          </table:table-cell>
          <table:covered-table-cell table:number-columns-repeated="5" table:style-name="ce68"/>
          <table:table-cell table:style-name="ce68" office:value-type="string" ns42:value-type="string" table:number-columns-spanned="6" table:number-rows-spanned="1">
            <text:p>NEXT REMAINING BLOCKER</text:p>
          </table:table-cell>
          <table:covered-table-cell table:number-columns-repeated="5" table:style-name="ce68"/>
        </table:table-row>
        <table:table-row table:style-name="ro5">
          <table:table-cell table:style-name="ce61" office:value-type="string" ns42:value-type="string" table:number-columns-spanned="6" table:number-rows-spanned="1">
            <text:p>LISTING CONTENT PREPARED · DEMO</text:p>
          </table:table-cell>
          <table:covered-table-cell table:number-columns-repeated="5" table:style-name="ce61"/>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PRICE DECISION</text:p>
          </table:table-cell>
          <table:covered-table-cell table:number-columns-repeated="5" table:style-name="ce54"/>
        </table:table-row>
        <table:table-row table:style-name="ro5">
          <table:table-cell table:style-name="ce61" office:value-type="string" ns42:value-type="string" table:number-columns-spanned="18" table:number-rows-spanned="1">
            <text:p>DEMO ACTION RESULT: Completing PREPARE LISTING CONTENT clears Listing Content only. Listing Readiness remains PREPARATION NEEDED because other required blockers remain.</text:p>
          </table:table-cell>
          <table:covered-table-cell table:number-columns-repeated="17" table:style-name="ce61"/>
        </table:table-row>
        <table:table-row table:style-name="ro5">
          <table:table-cell table:style-name="ce61" office:value-type="string" ns42:value-type="string" table:number-columns-spanned="18" table:number-rows-spanned="1">
            <text:p>NEXT BLOCKER: PRICE DECISION · DEMO. Listing-content evidence cannot silently clear price decision, platform, shipping review, or data-quality clearance.</text:p>
          </table:table-cell>
          <table:covered-table-cell table:number-columns-repeated="17" table:style-name="ce61"/>
        </table:table-row>
        <table:table-row table:style-name="ro5">
          <table:table-cell table:style-name="ce62" office:value-type="string" ns42:value-type="string" table:number-columns-spanned="18" table:number-rows-spanned="1">
            <text:p>💰 PRICE DECISION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REVIEWED PRICE RESULT</text:p>
          </table:table-cell>
          <table:covered-table-cell table:number-columns-repeated="3" table:style-name="ce81"/>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LISTING PRI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102.00 · REVIEWED FOR LISTING · DEMO</text:p>
          </table:table-cell>
          <table:covered-table-cell table:number-columns-repeated="3" table:style-name="ce54"/>
          <table:table-cell table:style-name="ce54" office:value-type="string" ns42:value-type="string" table:number-columns-spanned="6" table:number-rows-spanned="1">
            <text:p>PRICE DECISION</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READINESS AFTER ACTION</text:p>
          </table:table-cell>
          <table:covered-table-cell table:number-columns-repeated="5" table:style-name="ce68"/>
          <table:table-cell table:style-name="ce68" office:value-type="string" ns42:value-type="string" table:number-columns-spanned="6" table:number-rows-spanned="1">
            <text:p>NEXT REMAINING BLOCKER</text:p>
          </table:table-cell>
          <table:covered-table-cell table:number-columns-repeated="5" table:style-name="ce68"/>
        </table:table-row>
        <table:table-row table:style-name="ro5">
          <table:table-cell table:style-name="ce61" office:value-type="string" ns42:value-type="string" table:number-columns-spanned="6" table:number-rows-spanned="1">
            <text:p>REVIEWED LISTING PRICE RECORDED · DEMO</text:p>
          </table:table-cell>
          <table:covered-table-cell table:number-columns-repeated="5" table:style-name="ce61"/>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PLATFORM</text:p>
          </table:table-cell>
          <table:covered-table-cell table:number-columns-repeated="5" table:style-name="ce54"/>
        </table:table-row>
        <table:table-row table:style-name="ro5">
          <table:table-cell table:style-name="ce61" office:value-type="string" ns42:value-type="string" table:number-columns-spanned="18" table:number-rows-spanned="1">
            <text:p>DEMO ACTION RESULT: Completing REVIEW LISTING PRICE clears Price Decision only. Listing Readiness remains PREPARATION NEEDED because other required blockers remain.</text:p>
          </table:table-cell>
          <table:covered-table-cell table:number-columns-repeated="17" table:style-name="ce61"/>
        </table:table-row>
        <table:table-row table:style-name="ro19">
          <table:table-cell table:style-name="ce61" office:value-type="string" ns42:value-type="string" table:number-columns-spanned="18" table:number-rows-spanned="1">
            <text:p>NEXT BLOCKER: PLATFORM · DEMO. Reviewed-price evidence cannot silently clear platform, shipping review, or data-quality clearance. Demo price is fictional and is not a live market recommendation.</text:p>
          </table:table-cell>
          <table:covered-table-cell table:number-columns-repeated="17" table:style-name="ce61"/>
        </table:table-row>
        <table:table-row table:style-name="ro5">
          <table:table-cell table:style-name="ce62" office:value-type="string" ns42:value-type="string" table:number-columns-spanned="18" table:number-rows-spanned="1">
            <text:p>🏪 PLATFORM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PLATFORM SELECTION RESULT</text:p>
          </table:table-cell>
          <table:covered-table-cell table:number-columns-repeated="3" table:style-name="ce81"/>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5">
          <table:table-cell table:style-name="ce54" office:value-type="string" ns42:value-type="string" table:number-columns-spanned="4" table:number-rows-spanned="1">
            <text:p>SELECT LISTING PLATFORM</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EBAY · SELECTED FOR LISTING · DEMO</text:p>
          </table:table-cell>
          <table:covered-table-cell table:number-columns-repeated="3" table:style-name="ce54"/>
          <table:table-cell table:style-name="ce54" office:value-type="string" ns42:value-type="string" table:number-columns-spanned="6" table:number-rows-spanned="1">
            <text:p>PLATFORM</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READINESS AFTER ACTION</text:p>
          </table:table-cell>
          <table:covered-table-cell table:number-columns-repeated="5" table:style-name="ce68"/>
          <table:table-cell table:style-name="ce68" office:value-type="string" ns42:value-type="string" table:number-columns-spanned="6" table:number-rows-spanned="1">
            <text:p>NEXT REMAINING BLOCKER</text:p>
          </table:table-cell>
          <table:covered-table-cell table:number-columns-repeated="5" table:style-name="ce68"/>
        </table:table-row>
        <table:table-row table:style-name="ro5">
          <table:table-cell table:style-name="ce61" office:value-type="string" ns42:value-type="string" table:number-columns-spanned="6" table:number-rows-spanned="1">
            <text:p>LISTING PLATFORM SELECTED · DEMO</text:p>
          </table:table-cell>
          <table:covered-table-cell table:number-columns-repeated="5" table:style-name="ce61"/>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SHIPPING REVIEW</text:p>
          </table:table-cell>
          <table:covered-table-cell table:number-columns-repeated="5" table:style-name="ce54"/>
        </table:table-row>
        <table:table-row table:style-name="ro5">
          <table:table-cell table:style-name="ce61" office:value-type="string" ns42:value-type="string" table:number-columns-spanned="18" table:number-rows-spanned="1">
            <text:p>DEMO ACTION RESULT: Completing SELECT LISTING PLATFORM clears Platform only. Listing Readiness remains PREPARATION NEEDED because other required blockers remain.</text:p>
          </table:table-cell>
          <table:covered-table-cell table:number-columns-repeated="17" table:style-name="ce61"/>
        </table:table-row>
        <table:table-row table:style-name="ro5">
          <table:table-cell table:style-name="ce61" office:value-type="string" ns42:value-type="string" table:number-columns-spanned="18" table:number-rows-spanned="1">
            <text:p>NEXT BLOCKER: SHIPPING REVIEW · DEMO. Platform-selection evidence cannot create a live listing, activate Platform Exposure, or silently clear shipping review or data-quality clearance.</text:p>
          </table:table-cell>
          <table:covered-table-cell table:number-columns-repeated="17" table:style-name="ce61"/>
        </table:table-row>
        <table:table-row table:style-name="ro5">
          <table:table-cell table:style-name="ce62" office:value-type="string" ns42:value-type="string" table:number-columns-spanned="18" table:number-rows-spanned="1">
            <text:p>📦 SHIPPING REVIEW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SHIPPING REVIEW RESULT</text:p>
          </table:table-cell>
          <table:covered-table-cell table:number-columns-repeated="3" table:style-name="ce81"/>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SHIPPING PATH</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ACKAGING + SHIPPING PATH REVIEWED · DEMO</text:p>
          </table:table-cell>
          <table:covered-table-cell table:number-columns-repeated="3" table:style-name="ce54"/>
          <table:table-cell table:style-name="ce54" office:value-type="string" ns42:value-type="string" table:number-columns-spanned="6" table:number-rows-spanned="1">
            <text:p>SHIPPING REVIEW</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READINESS AFTER ACTION</text:p>
          </table:table-cell>
          <table:covered-table-cell table:number-columns-repeated="5" table:style-name="ce68"/>
          <table:table-cell table:style-name="ce68" office:value-type="string" ns42:value-type="string" table:number-columns-spanned="6" table:number-rows-spanned="1">
            <text:p>NEXT REMAINING BLOCKER</text:p>
          </table:table-cell>
          <table:covered-table-cell table:number-columns-repeated="5" table:style-name="ce68"/>
        </table:table-row>
        <table:table-row table:style-name="ro5">
          <table:table-cell table:style-name="ce61" office:value-type="string" ns42:value-type="string" table:number-columns-spanned="6" table:number-rows-spanned="1">
            <text:p>SHIPPING PATH REVIEWED · DEMO</text:p>
          </table:table-cell>
          <table:covered-table-cell table:number-columns-repeated="5" table:style-name="ce61"/>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DATA-QUALITY CLEARANCE</text:p>
          </table:table-cell>
          <table:covered-table-cell table:number-columns-repeated="5" table:style-name="ce54"/>
        </table:table-row>
        <table:table-row table:style-name="ro19">
          <table:table-cell table:style-name="ce61" office:value-type="string" ns42:value-type="string" table:number-columns-spanned="18" table:number-rows-spanned="1">
            <text:p>DEMO ACTION RESULT: Completing REVIEW SHIPPING PATH clears Shipping Review only. Listing Readiness remains PREPARATION NEEDED because Data-Quality Clearance remains unresolved.</text:p>
          </table:table-cell>
          <table:covered-table-cell table:number-columns-repeated="17" table:style-name="ce61"/>
        </table:table-row>
        <table:table-row table:style-name="ro19">
          <table:table-cell table:style-name="ce61" office:value-type="string" ns42:value-type="string" table:number-columns-spanned="18" table:number-rows-spanned="1">
            <text:p>NEXT BLOCKER: DATA-QUALITY CLEARANCE · DEMO. Shipping-review evidence cannot buy postage, create a label or order, mark inventory sold or shipped, activate Platform Exposure, or silently clear data-quality clearance.</text:p>
          </table:table-cell>
          <table:covered-table-cell table:number-columns-repeated="17" table:style-name="ce61"/>
        </table:table-row>
        <table:table-row table:style-name="ro5">
          <table:table-cell table:style-name="ce62" office:value-type="string" ns42:value-type="string" table:number-columns-spanned="18" table:number-rows-spanned="1">
            <text:p>🧾 DATA-QUALITY CLEARANCE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DATA-QUALITY RESULT</text:p>
          </table:table-cell>
          <table:covered-table-cell table:number-columns-repeated="3" table:style-name="ce81"/>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DATA QUALITY</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NO KNOWN UNRESOLVED DATA-QUALITY ISSUE · DEMO</text:p>
          </table:table-cell>
          <table:covered-table-cell table:number-columns-repeated="3" table:style-name="ce54"/>
          <table:table-cell table:style-name="ce54" office:value-type="string" ns42:value-type="string" table:number-columns-spanned="6" table:number-rows-spanned="1">
            <text:p>DATA-QUALITY CLEARANCE</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FULL READINESS CROSS-CHECK</text:p>
          </table:table-cell>
          <table:covered-table-cell table:number-columns-repeated="5" table:style-name="ce68"/>
          <table:table-cell table:style-name="ce68" office:value-type="string" ns42:value-type="string" table:number-columns-spanned="6" table:number-rows-spanned="1">
            <text:p>READINESS AFTER CROSS-CHECK</text:p>
          </table:table-cell>
          <table:covered-table-cell table:number-columns-repeated="5" table:style-name="ce68"/>
        </table:table-row>
        <table:table-row table:style-name="ro5">
          <table:table-cell table:style-name="ce61" office:value-type="string" ns42:value-type="string" table:number-columns-spanned="6" table:number-rows-spanned="1">
            <text:p>DATA-QUALITY CLEARED · DEMO</text:p>
          </table:table-cell>
          <table:covered-table-cell table:number-columns-repeated="5" table:style-name="ce61"/>
          <table:table-cell table:style-name="ce54" office:value-type="string" ns42:value-type="string" table:number-columns-spanned="6" table:number-rows-spanned="1">
            <text:p>7 OF 7 LISTING READINESS FACTORS SUPPORTED · DEMO</text:p>
          </table:table-cell>
          <table:covered-table-cell table:number-columns-repeated="5" table:style-name="ce54"/>
          <table:table-cell table:style-name="ce54" office:value-type="string" ns42:value-type="string" table:number-columns-spanned="6" table:number-rows-spanned="1">
            <text:p>READY TO LIST · DEMO</text:p>
          </table:table-cell>
          <table:covered-table-cell table:number-columns-repeated="5" table:style-name="ce54"/>
        </table:table-row>
        <table:table-row table:style-name="ro19">
          <table:table-cell table:style-name="ce61" office:value-type="string" ns42:value-type="string" table:number-columns-spanned="18" table:number-rows-spanned="1">
            <text:p>FULL LISTING READINESS CROSS-CHECK · DEMO: CONDITION + PHOTOS + LISTING CONTENT + PRICE DECISION + PLATFORM + SHIPPING REVIEW + DATA-QUALITY CLEARANCE = SUPPORTED.</text:p>
          </table:table-cell>
          <table:covered-table-cell table:number-columns-repeated="17" table:style-name="ce61"/>
        </table:table-row>
        <table:table-row table:style-name="ro19">
          <table:table-cell table:style-name="ce61" office:value-type="string" ns42:value-type="string" table:number-columns-spanned="18" table:number-rows-spanned="1">
            <text:p>DEMO ACTION RESULT: REVIEW DATA QUALITY clears Data-Quality Clearance only. READY TO LIST is shown only after the explicit full seven-factor readiness cross-check supports every applicable factor.</text:p>
          </table:table-cell>
          <table:covered-table-cell table:number-columns-repeated="17" table:style-name="ce61"/>
        </table:table-row>
        <table:table-row table:style-name="ro19">
          <table:table-cell table:style-name="ce61" office:value-type="string" ns42:value-type="string" table:number-columns-spanned="18" table:number-rows-spanned="1">
            <text:p>BOUNDARY: No listing is created, published, or exposed. No missing fact is invented. If any readiness factor is unsupported, MarketDEX remains PREPARATION NEEDED and returns the next remaining blocker.</text:p>
          </table:table-cell>
          <table:covered-table-cell table:number-columns-repeated="17" table:style-name="ce61"/>
        </table:table-row>
        <table:table-row table:style-name="ro5">
          <table:table-cell table:style-name="ce62" office:value-type="string" ns42:value-type="string" table:number-columns-spanned="18" table:number-rows-spanned="1">
            <text:p>🎯 LISTING INTENT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INTENT RESUL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CONFIRM LISTING INTEN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REPARE LISTING · DEMO</text:p>
          </table:table-cell>
          <table:covered-table-cell table:number-columns-repeated="3" table:style-name="ce54"/>
          <table:table-cell table:style-name="ce54" office:value-type="string" ns42:value-type="string" table:number-columns-spanned="6" table:number-rows-spanned="1">
            <text:p>NO PUBLICATION</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BUSINESS STATE AFTER ACTION</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5">
          <table:table-cell table:style-name="ce61" office:value-type="string" ns42:value-type="string" table:number-columns-spanned="6" table:number-rows-spanned="1">
            <text:p>LISTING INTENT CONFIRMED · DEMO</text:p>
          </table:table-cell>
          <table:covered-table-cell table:number-columns-repeated="5" table:style-name="ce61"/>
          <table:table-cell table:style-name="ce54" office:value-type="string" ns42:value-type="string" table:number-columns-spanned="6" table:number-rows-spanned="1">
            <text:p>READY TO LIST · DEMO</text:p>
          </table:table-cell>
          <table:covered-table-cell table:number-columns-repeated="5" table:style-name="ce54"/>
          <table:table-cell table:style-name="ce54" office:value-type="string" ns42:value-type="string" table:number-columns-spanned="6" table:number-rows-spanned="1">
            <text:p>LISTING RECORD PREPARATION</text:p>
          </table:table-cell>
          <table:covered-table-cell table:number-columns-repeated="5" table:style-name="ce54"/>
        </table:table-row>
        <table:table-row table:style-name="ro5">
          <table:table-cell table:style-name="ce61" office:value-type="string" ns42:value-type="string" table:number-columns-spanned="18" table:number-rows-spanned="1">
            <text:p>DEMO ACTION RESULT: Confirming listing intent records seller intent only. READY TO LIST remains the readiness state.</text:p>
          </table:table-cell>
          <table:covered-table-cell table:number-columns-repeated="17" table:style-name="ce61"/>
        </table:table-row>
        <table:table-row table:style-name="ro5">
          <table:table-cell table:style-name="ce61" office:value-type="string" ns42:value-type="string" table:number-columns-spanned="18" table:number-rows-spanned="1">
            <text:p>BOUNDARY: Listing intent does not create, publish, or expose a marketplace listing.</text:p>
          </table:table-cell>
          <table:covered-table-cell table:number-columns-repeated="17" table:style-name="ce61"/>
        </table:table-row>
        <table:table-row table:style-name="ro5">
          <table:table-cell table:style-name="ce62" office:value-type="string" ns42:value-type="string" table:number-columns-spanned="18" table:number-rows-spanned="1">
            <text:p>📝 LISTING RECORD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DRAFT RESULT</text:p>
          </table:table-cell>
          <table:covered-table-cell table:number-columns-repeated="3" table:style-name="ce81"/>
          <table:table-cell table:style-name="ce49" office:value-type="string" ns42:value-type="string" table:number-columns-spanned="6" table:number-rows-spanned="1">
            <text:p>RECORD RELATIONSHIP</text:p>
          </table:table-cell>
          <table:covered-table-cell table:number-columns-repeated="5" table:style-name="ce49"/>
        </table:table-row>
        <table:table-row table:style-name="ro19">
          <table:table-cell table:style-name="ce54" office:value-type="string" ns42:value-type="string" table:number-columns-spanned="4" table:number-rows-spanned="1">
            <text:p>PREPARE LISTING RECORD</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LISTING RECORD DRAFT PREPARED · DEMO</text:p>
          </table:table-cell>
          <table:covered-table-cell table:number-columns-repeated="3" table:style-name="ce54"/>
          <table:table-cell table:style-name="ce54" office:value-type="string" ns42:value-type="string" table:number-columns-spanned="6" table:number-rows-spanned="1">
            <text:p>INVENTORY RECORD → LISTING RECORD DRAFT</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LISTING RECORD STATE</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5">
          <table:table-cell table:style-name="ce61" office:value-type="string" ns42:value-type="string" table:number-columns-spanned="6" table:number-rows-spanned="1">
            <text:p>LISTING DRAFT PREPARED · DEMO</text:p>
          </table:table-cell>
          <table:covered-table-cell table:number-columns-repeated="5" table:style-name="ce61"/>
          <table:table-cell table:style-name="ce54" office:value-type="string" ns42:value-type="string" table:number-columns-spanned="6" table:number-rows-spanned="1">
            <text:p>DRAFT · DEMO</text:p>
          </table:table-cell>
          <table:covered-table-cell table:number-columns-repeated="5" table:style-name="ce54"/>
          <table:table-cell table:style-name="ce54" office:value-type="string" ns42:value-type="string" table:number-columns-spanned="6" table:number-rows-spanned="1">
            <text:p>PUBLICATION READINESS GATE</text:p>
          </table:table-cell>
          <table:covered-table-cell table:number-columns-repeated="5" table:style-name="ce54"/>
        </table:table-row>
        <table:table-row table:style-name="ro19">
          <table:table-cell table:style-name="ce61" office:value-type="string" ns42:value-type="string" table:number-columns-spanned="18" table:number-rows-spanned="1">
            <text:p>DEMO DRAFT EVIDENCE: Prepared condition, photos readiness, listing content, reviewed price, selected platform, shipping review, and data-quality clearance remain referenced as supported preparation evidence.</text:p>
          </table:table-cell>
          <table:covered-table-cell table:number-columns-repeated="17" table:style-name="ce61"/>
        </table:table-row>
        <table:table-row table:style-name="ro5">
          <table:table-cell table:style-name="ce61" office:value-type="string" ns42:value-type="string" table:number-columns-spanned="18" table:number-rows-spanned="1">
            <text:p>BOUNDARY: A LISTING RECORD DRAFT is not LISTED, PUBLISHED, EXPOSED, SOLD, or SHIPPED.</text:p>
          </table:table-cell>
          <table:covered-table-cell table:number-columns-repeated="17" table:style-name="ce61"/>
        </table:table-row>
        <table:table-row table:style-name="ro5">
          <table:table-cell table:style-name="ce62" office:value-type="string" ns42:value-type="string" table:number-columns-spanned="18" table:number-rows-spanned="1">
            <text:p>🚦 PUBLICATION READINESS GATE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GATE RESULT</text:p>
          </table:table-cell>
          <table:covered-table-cell table:number-columns-repeated="3" table:style-name="ce81"/>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5">
          <table:table-cell table:style-name="ce54" office:value-type="string" ns42:value-type="string" table:number-columns-spanned="4" table:number-rows-spanned="1">
            <text:p>REVIEW PUBLICATION READINESS</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PUBLICATION · DEMO</text:p>
          </table:table-cell>
          <table:covered-table-cell table:number-columns-repeated="3" table:style-name="ce54"/>
          <table:table-cell table:style-name="ce54" office:value-type="string" ns42:value-type="string" table:number-columns-spanned="6" table:number-rows-spanned="1">
            <text:p>PUBLICATION READINESS</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PUBLICATION STATE</text:p>
          </table:table-cell>
          <table:covered-table-cell table:number-columns-repeated="5" table:style-name="ce68"/>
          <table:table-cell table:style-name="ce68" office:value-type="string" ns42:value-type="string" table:number-columns-spanned="6" table:number-rows-spanned="1">
            <text:p>NEXT BUSINESS BOUNDARY</text:p>
          </table:table-cell>
          <table:covered-table-cell table:number-columns-repeated="5" table:style-name="ce68"/>
        </table:table-row>
        <table:table-row table:style-name="ro5">
          <table:table-cell table:style-name="ce61" office:value-type="string" ns42:value-type="string" table:number-columns-spanned="6" table:number-rows-spanned="1">
            <text:p>READY FOR PUBLICATION · DEMO</text:p>
          </table:table-cell>
          <table:covered-table-cell table:number-columns-repeated="5" table:style-name="ce61"/>
          <table:table-cell table:style-name="ce54" office:value-type="string" ns42:value-type="string" table:number-columns-spanned="6" table:number-rows-spanned="1">
            <text:p>NOT PUBLISHED · DEMO</text:p>
          </table:table-cell>
          <table:covered-table-cell table:number-columns-repeated="5" table:style-name="ce54"/>
          <table:table-cell table:style-name="ce54" office:value-type="string" ns42:value-type="string" table:number-columns-spanned="6" table:number-rows-spanned="1">
            <text:p>PUBLICATION / MARKETPLACE EXPOSURE</text:p>
          </table:table-cell>
          <table:covered-table-cell table:number-columns-repeated="5" table:style-name="ce54"/>
        </table:table-row>
        <table:table-row table:style-name="ro5">
          <table:table-cell table:style-name="ce61" office:value-type="string" ns42:value-type="string" table:number-columns-spanned="18" table:number-rows-spanned="1">
            <text:p>PUBLICATION READINESS CROSS-CHECK · DEMO: Listing Record Draft + supported preparation evidence + selected platform context = SUPPORTED FOR PUBLICATION.</text:p>
          </table:table-cell>
          <table:covered-table-cell table:number-columns-repeated="17" table:style-name="ce61"/>
        </table:table-row>
        <table:table-row table:style-name="ro5">
          <table:table-cell table:style-name="ce61" office:value-type="string" ns42:value-type="string" table:number-columns-spanned="18" table:number-rows-spanned="1">
            <text:p>VOCABULARY CONTRACT: READY TO LIST ≠ LISTED · LISTING DRAFT ≠ PUBLISHED · READY FOR PUBLICATION ≠ PUBLISHED · PUBLISHED ≠ SOLD.</text:p>
          </table:table-cell>
          <table:covered-table-cell table:number-columns-repeated="17" table:style-name="ce61"/>
        </table:table-row>
        <table:table-row table:style-name="ro5">
          <table:table-cell table:style-name="ce61" office:value-type="string" ns42:value-type="string" table:number-columns-spanned="18" table:number-rows-spanned="1">
            <text:p>BOUNDARY: READY FOR PUBLICATION is permission-state evidence only. MarketDEX does not submit, publish, expose, create an order, buy postage, or mark inventory sold or shipped.</text:p>
          </table:table-cell>
          <table:covered-table-cell table:number-columns-repeated="17" table:style-name="ce61"/>
        </table:table-row>
        <table:table-row table:style-name="ro5">
          <table:table-cell table:style-name="ce62" office:value-type="string" ns42:value-type="string" table:number-columns-spanned="18" table:number-rows-spanned="1">
            <text:p>🔐 PUBLICATION AUTHORIZ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AUTHORIZATION RESUL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19">
          <table:table-cell table:style-name="ce54" office:value-type="string" ns42:value-type="string" table:number-columns-spanned="4" table:number-rows-spanned="1">
            <text:p>AUTHORIZE PUBLICA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ELLER AUTHORIZED PUBLICATION · DEMO</text:p>
          </table:table-cell>
          <table:covered-table-cell table:number-columns-repeated="3" table:style-name="ce54"/>
          <table:table-cell table:style-name="ce54" office:value-type="string" ns42:value-type="string" table:number-columns-spanned="6" table:number-rows-spanned="1">
            <text:p>NOT YET PUBLISHED</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PUBLICATION AUTHORITY STATE</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5">
          <table:table-cell table:style-name="ce61" office:value-type="string" ns42:value-type="string" table:number-columns-spanned="6" table:number-rows-spanned="1">
            <text:p>PUBLICATION AUTHORIZED · DEMO</text:p>
          </table:table-cell>
          <table:covered-table-cell table:number-columns-repeated="5" table:style-name="ce61"/>
          <table:table-cell table:style-name="ce54" office:value-type="string" ns42:value-type="string" table:number-columns-spanned="6" table:number-rows-spanned="1">
            <text:p>AUTHORIZED · DEMO</text:p>
          </table:table-cell>
          <table:covered-table-cell table:number-columns-repeated="5" table:style-name="ce54"/>
          <table:table-cell table:style-name="ce54" office:value-type="string" ns42:value-type="string" table:number-columns-spanned="6" table:number-rows-spanned="1">
            <text:p>PUBLICATION RESULT EVIDENCE</text:p>
          </table:table-cell>
          <table:covered-table-cell table:number-columns-repeated="5" table:style-name="ce54"/>
        </table:table-row>
        <table:table-row table:style-name="ro5">
          <table:table-cell table:style-name="ce61" office:value-type="string" ns42:value-type="string" table:number-columns-spanned="18" table:number-rows-spanned="1">
            <text:p>DEMO ACTION RESULT: Explicit seller authorization permits the publication step to be attempted. Authorization does not prove marketplace acceptance or publicatio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READY FOR PUBLICATION does not automatically authorize publication. AUTHORIZED does not mean PUBLISHED or EXPOSED.</text:p>
          </table:table-cell>
          <table:covered-table-cell table:number-columns-repeated="17" table:style-name="ce61"/>
        </table:table-row>
        <table:table-row table:style-name="ro5">
          <table:table-cell table:style-name="ce62" office:value-type="string" ns42:value-type="string" table:number-columns-spanned="18" table:number-rows-spanned="1">
            <text:p>📡 PUBLICATION EVENT RECORD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PUBLICATION RESULT</text:p>
          </table:table-cell>
          <table:covered-table-cell table:number-columns-repeated="3" table:style-name="ce81"/>
          <table:table-cell table:style-name="ce49" office:value-type="string" ns42:value-type="string" table:number-columns-spanned="6" table:number-rows-spanned="1">
            <text:p>PLATFORM CONTEXT</text:p>
          </table:table-cell>
          <table:covered-table-cell table:number-columns-repeated="5" table:style-name="ce49"/>
        </table:table-row>
        <table:table-row table:style-name="ro5">
          <table:table-cell table:style-name="ce54" office:value-type="string" ns42:value-type="string" table:number-columns-spanned="4" table:number-rows-spanned="1">
            <text:p>RECORD PUBLICATION RESUL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UBLISHED · DEMO</text:p>
          </table:table-cell>
          <table:covered-table-cell table:number-columns-repeated="3" table:style-name="ce54"/>
          <table:table-cell table:style-name="ce54" office:value-type="string" ns42:value-type="string" table:number-columns-spanned="6" table:number-rows-spanned="1">
            <text:p>EBAY · DEMO</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EVENT EVIDENCE STATE</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5">
          <table:table-cell table:style-name="ce61" office:value-type="string" ns42:value-type="string" table:number-columns-spanned="6" table:number-rows-spanned="1">
            <text:p>PUBLICATION EVENT RECORDED · DEMO</text:p>
          </table:table-cell>
          <table:covered-table-cell table:number-columns-repeated="5" table:style-name="ce61"/>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PLATFORM EXPOSURE REVIEW</text:p>
          </table:table-cell>
          <table:covered-table-cell table:number-columns-repeated="5" table:style-name="ce54"/>
        </table:table-row>
        <table:table-row table:style-name="ro5">
          <table:table-cell table:style-name="ce61" office:value-type="string" ns42:value-type="string" table:number-columns-spanned="18" table:number-rows-spanned="1">
            <text:p>DEMO EVENT EVIDENCE: Publication outcome and platform context are recorded. A listing reference is recorded only when factually known.</text:p>
          </table:table-cell>
          <table:covered-table-cell table:number-columns-repeated="17" table:style-name="ce61"/>
        </table:table-row>
        <table:table-row table:style-name="ro5">
          <table:table-cell table:style-name="ce61" office:value-type="string" ns42:value-type="string" table:number-columns-spanned="18" table:number-rows-spanned="1">
            <text:p>CONTROLLED PUBLICATION OUTCOMES: PUBLISHED · FAILED · PENDING REVIEW · UNKNOWN REVIEW.</text:p>
          </table:table-cell>
          <table:covered-table-cell table:number-columns-repeated="17" table:style-name="ce61"/>
        </table:table-row>
        <table:table-row table:style-name="ro5">
          <table:table-cell table:style-name="ce61" office:value-type="string" ns42:value-type="string" table:number-columns-spanned="18" table:number-rows-spanned="1">
            <text:p>BOUNDARY: MarketDEX does not invent a listing ID, URL, marketplace response, or publication fact.</text:p>
          </table:table-cell>
          <table:covered-table-cell table:number-columns-repeated="17" table:style-name="ce61"/>
        </table:table-row>
        <table:table-row table:style-name="ro5">
          <table:table-cell table:style-name="ce62" office:value-type="string" ns42:value-type="string" table:number-columns-spanned="18" table:number-rows-spanned="1">
            <text:p>📣 PLATFORM EXPOSURE ACTIV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EXPOSURE RESULT</text:p>
          </table:table-cell>
          <table:covered-table-cell table:number-columns-repeated="3" table:style-name="ce81"/>
          <table:table-cell table:style-name="ce49" office:value-type="string" ns42:value-type="string" table:number-columns-spanned="6" table:number-rows-spanned="1">
            <text:p>EVIDENCE REQUIRED</text:p>
          </table:table-cell>
          <table:covered-table-cell table:number-columns-repeated="5" table:style-name="ce49"/>
        </table:table-row>
        <table:table-row table:style-name="ro5">
          <table:table-cell table:style-name="ce54" office:value-type="string" ns42:value-type="string" table:number-columns-spanned="4" table:number-rows-spanned="1">
            <text:p>REVIEW PLATFORM EXPOSUR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ACTIVE · DEMO</text:p>
          </table:table-cell>
          <table:covered-table-cell table:number-columns-repeated="3" table:style-name="ce54"/>
          <table:table-cell table:style-name="ce54" office:value-type="string" ns42:value-type="string" table:number-columns-spanned="6" table:number-rows-spanned="1">
            <text:p>PUBLISHED EVIDENCE</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PLATFORM EXPOSURE STATE</text:p>
          </table:table-cell>
          <table:covered-table-cell table:number-columns-repeated="5" table:style-name="ce68"/>
          <table:table-cell table:style-name="ce68" office:value-type="string" ns42:value-type="string" table:number-columns-spanned="6" table:number-rows-spanned="1">
            <text:p>NEXT BUSINESS BOUNDARY</text:p>
          </table:table-cell>
          <table:covered-table-cell table:number-columns-repeated="5" table:style-name="ce68"/>
        </table:table-row>
        <table:table-row table:style-name="ro5">
          <table:table-cell table:style-name="ce61" office:value-type="string" ns42:value-type="string" table:number-columns-spanned="6" table:number-rows-spanned="1">
            <text:p>PLATFORM EXPOSURE ACTIVATED · DEMO</text:p>
          </table:table-cell>
          <table:covered-table-cell table:number-columns-repeated="5" table:style-name="ce61"/>
          <table:table-cell table:style-name="ce54" office:value-type="string" ns42:value-type="string" table:number-columns-spanned="6" table:number-rows-spanned="1">
            <text:p>ACTIVE · DEMO</text:p>
          </table:table-cell>
          <table:covered-table-cell table:number-columns-repeated="5" table:style-name="ce54"/>
          <table:table-cell table:style-name="ce54" office:value-type="string" ns42:value-type="string" table:number-columns-spanned="6" table:number-rows-spanned="1">
            <text:p>POST-PUBLICATION / SALE BOUNDARY</text:p>
          </table:table-cell>
          <table:covered-table-cell table:number-columns-repeated="5" table:style-name="ce54"/>
        </table:table-row>
        <table:table-row table:style-name="ro5">
          <table:table-cell table:style-name="ce61" office:value-type="string" ns42:value-type="string" table:number-columns-spanned="18" table:number-rows-spanned="1">
            <text:p>EXPOSURE ACTIVATION RULE · DEMO: Only factual PUBLISHED publication evidence may activate Platform Exposure.</text:p>
          </table:table-cell>
          <table:covered-table-cell table:number-columns-repeated="17" table:style-name="ce61"/>
        </table:table-row>
        <table:table-row table:style-name="ro5">
          <table:table-cell table:style-name="ce61" office:value-type="string" ns42:value-type="string" table:number-columns-spanned="18" table:number-rows-spanned="1">
            <text:p>FAILED, PENDING REVIEW, or UNKNOWN REVIEW publication results cannot silently activate Platform Exposure.</text:p>
          </table:table-cell>
          <table:covered-table-cell table:number-columns-repeated="17" table:style-name="ce61"/>
        </table:table-row>
        <table:table-row table:style-name="ro5">
          <table:table-cell table:style-name="ce61" office:value-type="string" ns42:value-type="string" table:number-columns-spanned="18" table:number-rows-spanned="1">
            <text:p>VOCABULARY CONTRACT: AUTHORIZED ≠ PUBLISHED · PUBLISHED ≠ SOLD · ACTIVE PLATFORM EXPOSURE ≠ SOLD.</text:p>
          </table:table-cell>
          <table:covered-table-cell table:number-columns-repeated="17" table:style-name="ce61"/>
        </table:table-row>
        <table:table-row table:style-name="ro19">
          <table:table-cell table:style-name="ce61" office:value-type="string" ns42:value-type="string" table:number-columns-spanned="18" table:number-rows-spanned="1">
            <text:p>BOUNDARY: ACTIVE exposure means the item is factually represented as published on a platform. MarketDEX does not create an order, record a sale, buy postage, or mark inventory sold or shipped.</text:p>
          </table:table-cell>
          <table:covered-table-cell table:number-columns-repeated="17" table:style-name="ce61"/>
        </table:table-row>
        <table:table-row table:style-name="ro5">
          <table:table-cell table:style-name="ce62" office:value-type="string" ns42:value-type="string" table:number-columns-spanned="18" table:number-rows-spanned="1">
            <text:p>👀 SALE OBSERV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SALE OBSERVATION RESUL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VIEW SALE EVIDEN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ALE OBSERVED · DEMO</text:p>
          </table:table-cell>
          <table:covered-table-cell table:number-columns-repeated="3" table:style-name="ce54"/>
          <table:table-cell table:style-name="ce54" office:value-type="string" ns42:value-type="string" table:number-columns-spanned="6" table:number-rows-spanned="1">
            <text:p>ACTIVE EXPOSURE IS NOT A SALE</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SALE EVIDENCE STATE</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6" table:number-rows-spanned="1">
            <text:p>SALE EVIDENCE OBSERVED · DEMO</text:p>
          </table:table-cell>
          <table:covered-table-cell table:number-columns-repeated="5" table:style-name="ce61"/>
          <table:table-cell table:style-name="ce54" office:value-type="string" ns42:value-type="string" table:number-columns-spanned="6" table:number-rows-spanned="1">
            <text:p>FACTUAL OBSERVATION · DEMO</text:p>
          </table:table-cell>
          <table:covered-table-cell table:number-columns-repeated="5" table:style-name="ce54"/>
          <table:table-cell table:style-name="ce54" office:value-type="string" ns42:value-type="string" table:number-columns-spanned="6" table:number-rows-spanned="1">
            <text:p>SALE RELATIONSHIP RECORD</text:p>
          </table:table-cell>
          <table:covered-table-cell table:number-columns-repeated="5" table:style-name="ce54"/>
        </table:table-row>
        <table:table-row table:style-name="ro5">
          <table:table-cell table:style-name="ce61" office:value-type="string" ns42:value-type="string" table:number-columns-spanned="18" table:number-rows-spanned="1">
            <text:p>CONTROLLED SALE OBSERVATION OUTCOMES: SALE OBSERVED · NO SALE OBSERVED · PENDING REVIEW · UNKNOWN REVIEW.</text:p>
          </table:table-cell>
          <table:covered-table-cell table:number-columns-repeated="17" table:style-name="ce61"/>
        </table:table-row>
        <table:table-row table:style-name="ro5">
          <table:table-cell table:style-name="ce61" office:value-type="string" ns42:value-type="string" table:number-columns-spanned="18" table:number-rows-spanned="1">
            <text:p>DEMO OBSERVATION RESULT: A factual sale or order result has been observed. Active Platform Exposure alone cannot create sale evidence.</text:p>
          </table:table-cell>
          <table:covered-table-cell table:number-columns-repeated="17" table:style-name="ce61"/>
        </table:table-row>
        <table:table-row table:style-name="ro5">
          <table:table-cell table:style-name="ce61" office:value-type="string" ns42:value-type="string" table:number-columns-spanned="18" table:number-rows-spanned="1">
            <text:p>BOUNDARY: ACTIVE PLATFORM EXPOSURE ≠ SALE OBSERVED. MarketDEX does not infer a sale from listing visibility, age, or seller intent.</text:p>
          </table:table-cell>
          <table:covered-table-cell table:number-columns-repeated="17" table:style-name="ce61"/>
        </table:table-row>
        <table:table-row table:style-name="ro5">
          <table:table-cell table:style-name="ce62" office:value-type="string" ns42:value-type="string" table:number-columns-spanned="18" table:number-rows-spanned="1">
            <text:p>🧾 SALE RELATIONSHIP RECORD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RELATIONSHIP RESULT</text:p>
          </table:table-cell>
          <table:covered-table-cell table:number-columns-repeated="3" table:style-name="ce81"/>
          <table:table-cell table:style-name="ce49" office:value-type="string" ns42:value-type="string" table:number-columns-spanned="6" table:number-rows-spanned="1">
            <text:p>OBSERVED QUANTITY</text:p>
          </table:table-cell>
          <table:covered-table-cell table:number-columns-repeated="5" table:style-name="ce49"/>
        </table:table-row>
        <table:table-row table:style-name="ro5">
          <table:table-cell table:style-name="ce54" office:value-type="string" ns42:value-type="string" table:number-columns-spanned="4" table:number-rows-spanned="1">
            <text:p>RECORD SALE RELATIONSHIP</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ALE RELATIONSHIP RECORDED · DEMO</text:p>
          </table:table-cell>
          <table:covered-table-cell table:number-columns-repeated="3" table:style-name="ce54"/>
          <table:table-cell table:style-name="ce54" office:value-type="string" ns42:value-type="string" table:number-columns-spanned="6" table:number-rows-spanned="1">
            <text:p>1 UNIT · DEMO</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SALE RELATIONSHIP STATE</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6" table:number-rows-spanned="1">
            <text:p>INVENTORY ↔ SALE RELATIONSHIP RECORDED · DEMO</text:p>
          </table:table-cell>
          <table:covered-table-cell table:number-columns-repeated="5" table:style-name="ce61"/>
          <table:table-cell table:style-name="ce54" office:value-type="string" ns42:value-type="string" table:number-columns-spanned="6" table:number-rows-spanned="1">
            <text:p>RECORDED · DEMO</text:p>
          </table:table-cell>
          <table:covered-table-cell table:number-columns-repeated="5" table:style-name="ce54"/>
          <table:table-cell table:style-name="ce54" office:value-type="string" ns42:value-type="string" table:number-columns-spanned="6" table:number-rows-spanned="1">
            <text:p>SOLD INVENTORY TRANSITION GATE</text:p>
          </table:table-cell>
          <table:covered-table-cell table:number-columns-repeated="5" table:style-name="ce54"/>
        </table:table-row>
        <table:table-row table:style-name="ro5">
          <table:table-cell table:style-name="ce61" office:value-type="string" ns42:value-type="string" table:number-columns-spanned="18" table:number-rows-spanned="1">
            <text:p>DEMO RELATIONSHIP EVIDENCE: Inventory relationship, platform context, and observed sold quantity are recorded from supported sale evidence.</text:p>
          </table:table-cell>
          <table:covered-table-cell table:number-columns-repeated="17" table:style-name="ce61"/>
        </table:table-row>
        <table:table-row table:style-name="ro5">
          <table:table-cell table:style-name="ce61" office:value-type="string" ns42:value-type="string" table:number-columns-spanned="18" table:number-rows-spanned="1">
            <text:p>ORDER OR LISTING REFERENCE: Record only when factually known. MarketDEX does not invent a buyer, order ID, fees, taxes, payout, or marketplace detail.</text:p>
          </table:table-cell>
          <table:covered-table-cell table:number-columns-repeated="17" table:style-name="ce61"/>
        </table:table-row>
        <table:table-row table:style-name="ro5">
          <table:table-cell table:style-name="ce61" office:value-type="string" ns42:value-type="string" table:number-columns-spanned="18" table:number-rows-spanned="1">
            <text:p>BOUNDARY: SALE OBSERVED ≠ SALE RELATIONSHIP RECORDED ≠ SOLD. Relationship evidence alone does not change inventory quantity or state.</text:p>
          </table:table-cell>
          <table:covered-table-cell table:number-columns-repeated="17" table:style-name="ce61"/>
        </table:table-row>
        <table:table-row table:style-name="ro5">
          <table:table-cell table:style-name="ce62" office:value-type="string" ns42:value-type="string" table:number-columns-spanned="18" table:number-rows-spanned="1">
            <text:p>🚧 SOLD INVENTORY TRANSITION GATE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GATE RESULT</text:p>
          </table:table-cell>
          <table:covered-table-cell table:number-columns-repeated="3" table:style-name="ce81"/>
          <table:table-cell table:style-name="ce49" office:value-type="string" ns42:value-type="string" table:number-columns-spanned="6" table:number-rows-spanned="1">
            <text:p>QUANTITY RESULT</text:p>
          </table:table-cell>
          <table:covered-table-cell table:number-columns-repeated="5" table:style-name="ce49"/>
        </table:table-row>
        <table:table-row table:style-name="ro5">
          <table:table-cell table:style-name="ce54" office:value-type="string" ns42:value-type="string" table:number-columns-spanned="4" table:number-rows-spanned="1">
            <text:p>REVIEW SOLD TRANSI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SOLD TRANSITION · DEMO</text:p>
          </table:table-cell>
          <table:covered-table-cell table:number-columns-repeated="3" table:style-name="ce54"/>
          <table:table-cell table:style-name="ce54" office:value-type="string" ns42:value-type="string" table:number-columns-spanned="6" table:number-rows-spanned="1">
            <text:p>1 UNIT SOLD · DEMO</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SOLD INVENTORY STATE</text:p>
          </table:table-cell>
          <table:covered-table-cell table:number-columns-repeated="5" table:style-name="ce68"/>
          <table:table-cell table:style-name="ce68" office:value-type="string" ns42:value-type="string" table:number-columns-spanned="6" table:number-rows-spanned="1">
            <text:p>REMAINING INVENTORY RULE</text:p>
          </table:table-cell>
          <table:covered-table-cell table:number-columns-repeated="5" table:style-name="ce68"/>
        </table:table-row>
        <table:table-row table:style-name="ro20">
          <table:table-cell table:style-name="ce61" office:value-type="string" ns42:value-type="string" table:number-columns-spanned="6" table:number-rows-spanned="1">
            <text:p>SOLD TRANSITION SUPPORTED · DEMO</text:p>
          </table:table-cell>
          <table:covered-table-cell table:number-columns-repeated="5" table:style-name="ce61"/>
          <table:table-cell table:style-name="ce54" office:value-type="string" ns42:value-type="string" table:number-columns-spanned="6" table:number-rows-spanned="1">
            <text:p>SOLD · DEMO</text:p>
          </table:table-cell>
          <table:covered-table-cell table:number-columns-repeated="5" table:style-name="ce54"/>
          <table:table-cell table:style-name="ce54" office:value-type="string" ns42:value-type="string" table:number-columns-spanned="6" table:number-rows-spanned="1">
            <text:p>UNSOLD QUANTITY RETAINS CORRECT STATE</text:p>
          </table:table-cell>
          <table:covered-table-cell table:number-columns-repeated="5" table:style-name="ce54"/>
        </table:table-row>
        <table:table-row table:style-name="ro5">
          <table:table-cell table:style-name="ce61" office:value-type="string" ns42:value-type="string" table:number-columns-spanned="18" table:number-rows-spanned="1">
            <text:p>SOLD TRANSITION CROSS-CHECK · DEMO: SALE OBSERVED evidence + Inventory ↔ Sale relationship + observed sold quantity = SUPPORTED.</text:p>
          </table:table-cell>
          <table:covered-table-cell table:number-columns-repeated="17" table:style-name="ce61"/>
        </table:table-row>
        <table:table-row table:style-name="ro5">
          <table:table-cell table:style-name="ce61" office:value-type="string" ns42:value-type="string" table:number-columns-spanned="18" table:number-rows-spanned="1">
            <text:p>QUANTITY CONTROL: Only the supported observed sold quantity may transition toward SOLD. Any remaining quantity stays in its correct inventory state.</text:p>
          </table:table-cell>
          <table:covered-table-cell table:number-columns-repeated="17" table:style-name="ce61"/>
        </table:table-row>
        <table:table-row table:style-name="ro5">
          <table:table-cell table:style-name="ce61" office:value-type="string" ns42:value-type="string" table:number-columns-spanned="18" table:number-rows-spanned="1">
            <text:p>HISTORY CONTROL: Historical Platform Exposure evidence remains preserved after the supported sold transition.</text:p>
          </table:table-cell>
          <table:covered-table-cell table:number-columns-repeated="17" table:style-name="ce61"/>
        </table:table-row>
        <table:table-row table:style-name="ro5">
          <table:table-cell table:style-name="ce61" office:value-type="string" ns42:value-type="string" table:number-columns-spanned="18" table:number-rows-spanned="1">
            <text:p>VOCABULARY CONTRACT: ACTIVE PLATFORM EXPOSURE ≠ SALE OBSERVED ≠ SALE RELATIONSHIP RECORDED ≠ SOLD.</text:p>
          </table:table-cell>
          <table:covered-table-cell table:number-columns-repeated="17" table:style-name="ce61"/>
        </table:table-row>
        <table:table-row table:style-name="ro5">
          <table:table-cell table:style-name="ce61" office:value-type="string" ns42:value-type="string" table:number-columns-spanned="18" table:number-rows-spanned="1">
            <text:p>BOUNDARY: SOLD does not mean SHIPPED, DELIVERED, PAID OUT, or COMPLETE. MarketDEX does not invent fulfillment or settlement evidence.</text:p>
          </table:table-cell>
          <table:covered-table-cell table:number-columns-repeated="17" table:style-name="ce61"/>
        </table:table-row>
        <table:table-row table:style-name="ro5">
          <table:table-cell table:style-name="ce62" office:value-type="string" ns42:value-type="string" table:number-columns-spanned="18" table:number-rows-spanned="1">
            <text:p>📦 FULFILLMENT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FULFILLMENT RESUL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VIEW FULFILLMENT PREPARA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ACKAGING + SHIPMENT PATH REVIEWED · DEMO</text:p>
          </table:table-cell>
          <table:covered-table-cell table:number-columns-repeated="3" table:style-name="ce54"/>
          <table:table-cell table:style-name="ce54" office:value-type="string" ns42:value-type="string" table:number-columns-spanned="6" table:number-rows-spanned="1">
            <text:p>NOT YET SHIPPED</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FULFILLMENT PREPARATION STATE</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6" table:number-rows-spanned="1">
            <text:p>READY FOR SHIPMENT · DEMO</text:p>
          </table:table-cell>
          <table:covered-table-cell table:number-columns-repeated="5" table:style-name="ce61"/>
          <table:table-cell table:style-name="ce54" office:value-type="string" ns42:value-type="string" table:number-columns-spanned="6" table:number-rows-spanned="1">
            <text:p>SUPPORTED · DEMO</text:p>
          </table:table-cell>
          <table:covered-table-cell table:number-columns-repeated="5" table:style-name="ce54"/>
          <table:table-cell table:style-name="ce54" office:value-type="string" ns42:value-type="string" table:number-columns-spanned="6" table:number-rows-spanned="1">
            <text:p>SHIPMENT EVENT EVIDENCE</text:p>
          </table:table-cell>
          <table:covered-table-cell table:number-columns-repeated="5" table:style-name="ce54"/>
        </table:table-row>
        <table:table-row table:style-name="ro5">
          <table:table-cell table:style-name="ce61" office:value-type="string" ns42:value-type="string" table:number-columns-spanned="18" table:number-rows-spanned="1">
            <text:p>DEMO PREPARATION RESULT: The supported sold quantity has a reviewed packaging and shipment path before shipment evidence is recorded.</text:p>
          </table:table-cell>
          <table:covered-table-cell table:number-columns-repeated="17" table:style-name="ce61"/>
        </table:table-row>
        <table:table-row table:style-name="ro5">
          <table:table-cell table:style-name="ce61" office:value-type="string" ns42:value-type="string" table:number-columns-spanned="18" table:number-rows-spanned="1">
            <text:p>BOUNDARY: SOLD ≠ READY FOR SHIPMENT. Fulfillment preparation does not buy postage, create a label, invent tracking, or prove shipment.</text:p>
          </table:table-cell>
          <table:covered-table-cell table:number-columns-repeated="17" table:style-name="ce61"/>
        </table:table-row>
        <table:table-row table:style-name="ro5">
          <table:table-cell table:style-name="ce62" office:value-type="string" ns42:value-type="string" table:number-columns-spanned="18" table:number-rows-spanned="1">
            <text:p>🚚 SHIPMENT EVENT EVIDENCE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SHIPMENT RESULT</text:p>
          </table:table-cell>
          <table:covered-table-cell table:number-columns-repeated="3" table:style-name="ce81"/>
          <table:table-cell table:style-name="ce49" office:value-type="string" ns42:value-type="string" table:number-columns-spanned="6" table:number-rows-spanned="1">
            <text:p>EVIDENCE RULE</text:p>
          </table:table-cell>
          <table:covered-table-cell table:number-columns-repeated="5" table:style-name="ce49"/>
        </table:table-row>
        <table:table-row table:style-name="ro5">
          <table:table-cell table:style-name="ce54" office:value-type="string" ns42:value-type="string" table:number-columns-spanned="4" table:number-rows-spanned="1">
            <text:p>RECORD SHIPMENT RESUL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6" table:number-rows-spanned="1">
            <text:p>FACTUAL SHIPMENT EVIDENCE</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SHIPMENT EVIDENCE STATE</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6" table:number-rows-spanned="1">
            <text:p>SHIPMENT EVENT RECORDED · DEMO</text:p>
          </table:table-cell>
          <table:covered-table-cell table:number-columns-repeated="5" table:style-name="ce61"/>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SHIPPED INVENTORY TRANSITION GATE</text:p>
          </table:table-cell>
          <table:covered-table-cell table:number-columns-repeated="5" table:style-name="ce54"/>
        </table:table-row>
        <table:table-row table:style-name="ro5">
          <table:table-cell table:style-name="ce61" office:value-type="string" ns42:value-type="string" table:number-columns-spanned="18" table:number-rows-spanned="1">
            <text:p>CONTROLLED SHIPMENT OUTCOMES: SHIPPED · NOT SHIPPED · PENDING REVIEW · UNKNOWN REVIEW.</text:p>
          </table:table-cell>
          <table:covered-table-cell table:number-columns-repeated="17" table:style-name="ce61"/>
        </table:table-row>
        <table:table-row table:style-name="ro5">
          <table:table-cell table:style-name="ce61" office:value-type="string" ns42:value-type="string" table:number-columns-spanned="18" table:number-rows-spanned="1">
            <text:p>DEMO SHIPMENT EVIDENCE: A factual shipment result is recorded for the supported sold quantity.</text:p>
          </table:table-cell>
          <table:covered-table-cell table:number-columns-repeated="17" table:style-name="ce61"/>
        </table:table-row>
        <table:table-row table:style-name="ro5">
          <table:table-cell table:style-name="ce61" office:value-type="string" ns42:value-type="string" table:number-columns-spanned="18" table:number-rows-spanned="1">
            <text:p>CARRIER, SERVICE, TRACKING, WEIGHT, POSTAGE, AND SHIPMENT REFERENCES: Record only when factually know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MarketDEX does not invent carrier, tracking, postage, label, or shipment facts. READY FOR SHIPMENT ≠ SHIPPED.</text:p>
          </table:table-cell>
          <table:covered-table-cell table:number-columns-repeated="17" table:style-name="ce61"/>
        </table:table-row>
        <table:table-row table:style-name="ro5">
          <table:table-cell table:style-name="ce62" office:value-type="string" ns42:value-type="string" table:number-columns-spanned="18" table:number-rows-spanned="1">
            <text:p>🚧 SHIPPED INVENTORY TRANSITION GATE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GATE RESULT</text:p>
          </table:table-cell>
          <table:covered-table-cell table:number-columns-repeated="3" table:style-name="ce81"/>
          <table:table-cell table:style-name="ce49" office:value-type="string" ns42:value-type="string" table:number-columns-spanned="6" table:number-rows-spanned="1">
            <text:p>QUANTITY RESULT</text:p>
          </table:table-cell>
          <table:covered-table-cell table:number-columns-repeated="5" table:style-name="ce49"/>
        </table:table-row>
        <table:table-row table:style-name="ro5">
          <table:table-cell table:style-name="ce54" office:value-type="string" ns42:value-type="string" table:number-columns-spanned="4" table:number-rows-spanned="1">
            <text:p>REVIEW SHIPPED TRANSI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SHIPPED TRANSITION · DEMO</text:p>
          </table:table-cell>
          <table:covered-table-cell table:number-columns-repeated="3" table:style-name="ce54"/>
          <table:table-cell table:style-name="ce54" office:value-type="string" ns42:value-type="string" table:number-columns-spanned="6" table:number-rows-spanned="1">
            <text:p>1 SOLD UNIT SHIPPED · DEMO</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SHIPPED INVENTORY STATE</text:p>
          </table:table-cell>
          <table:covered-table-cell table:number-columns-repeated="5" table:style-name="ce68"/>
          <table:table-cell table:style-name="ce68" office:value-type="string" ns42:value-type="string" table:number-columns-spanned="6" table:number-rows-spanned="1">
            <text:p>HISTORY PRESERVATION</text:p>
          </table:table-cell>
          <table:covered-table-cell table:number-columns-repeated="5" table:style-name="ce68"/>
        </table:table-row>
        <table:table-row table:style-name="ro20">
          <table:table-cell table:style-name="ce61" office:value-type="string" ns42:value-type="string" table:number-columns-spanned="6" table:number-rows-spanned="1">
            <text:p>SHIPPED TRANSITION SUPPORTED · DEMO</text:p>
          </table:table-cell>
          <table:covered-table-cell table:number-columns-repeated="5" table:style-name="ce61"/>
          <table:table-cell table:style-name="ce54" office:value-type="string" ns42:value-type="string" table:number-columns-spanned="6" table:number-rows-spanned="1">
            <text:p>SHIPPED · DEMO</text:p>
          </table:table-cell>
          <table:covered-table-cell table:number-columns-repeated="5" table:style-name="ce54"/>
          <table:table-cell table:style-name="ce54" office:value-type="string" ns42:value-type="string" table:number-columns-spanned="6" table:number-rows-spanned="1">
            <text:p>SALE + PLATFORM EXPOSURE PRESERVED</text:p>
          </table:table-cell>
          <table:covered-table-cell table:number-columns-repeated="5" table:style-name="ce54"/>
        </table:table-row>
        <table:table-row table:style-name="ro5">
          <table:table-cell table:style-name="ce61" office:value-type="string" ns42:value-type="string" table:number-columns-spanned="18" table:number-rows-spanned="1">
            <text:p>SHIPPED TRANSITION CROSS-CHECK · DEMO: factual SHIPPED evidence + supported sold quantity relationship = SUPPORTED.</text:p>
          </table:table-cell>
          <table:covered-table-cell table:number-columns-repeated="17" table:style-name="ce61"/>
        </table:table-row>
        <table:table-row table:style-name="ro5">
          <table:table-cell table:style-name="ce61" office:value-type="string" ns42:value-type="string" table:number-columns-spanned="18" table:number-rows-spanned="1">
            <text:p>QUANTITY CONTROL: Only the supported sold quantity tied to factual SHIPPED evidence may transition to SHIPPED.</text:p>
          </table:table-cell>
          <table:covered-table-cell table:number-columns-repeated="17" table:style-name="ce61"/>
        </table:table-row>
        <table:table-row table:style-name="ro5">
          <table:table-cell table:style-name="ce61" office:value-type="string" ns42:value-type="string" table:number-columns-spanned="18" table:number-rows-spanned="1">
            <text:p>HISTORY CONTROL: Sale relationship and historical Platform Exposure evidence remain preserved after shipment transition.</text:p>
          </table:table-cell>
          <table:covered-table-cell table:number-columns-repeated="17" table:style-name="ce61"/>
        </table:table-row>
        <table:table-row table:style-name="ro5">
          <table:table-cell table:style-name="ce61" office:value-type="string" ns42:value-type="string" table:number-columns-spanned="18" table:number-rows-spanned="1">
            <text:p>VOCABULARY CONTRACT: SOLD ≠ READY FOR SHIPMENT ≠ SHIPPED.</text:p>
          </table:table-cell>
          <table:covered-table-cell table:number-columns-repeated="17" table:style-name="ce61"/>
        </table:table-row>
        <table:table-row table:style-name="ro5">
          <table:table-cell table:style-name="ce61" office:value-type="string" ns42:value-type="string" table:number-columns-spanned="18" table:number-rows-spanned="1">
            <text:p>BOUNDARY: SHIPPED does not mean DELIVERED, PAID OUT, or COMPLETE. MarketDEX does not invent delivery or settlement evidence.</text:p>
          </table:table-cell>
          <table:covered-table-cell table:number-columns-repeated="17" table:style-name="ce61"/>
        </table:table-row>
        <table:table-row table:style-name="ro5">
          <table:table-cell table:style-name="ce62" office:value-type="string" ns42:value-type="string" table:number-columns-spanned="18" table:number-rows-spanned="1">
            <text:p>📬 DELIVERY OBSERV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DELIVERY RESULT</text:p>
          </table:table-cell>
          <table:covered-table-cell table:number-columns-repeated="3" table:style-name="ce81"/>
          <table:table-cell table:style-name="ce49" office:value-type="string" ns42:value-type="string" table:number-columns-spanned="6" table:number-rows-spanned="1">
            <text:p>EVIDENCE RULE</text:p>
          </table:table-cell>
          <table:covered-table-cell table:number-columns-repeated="5" table:style-name="ce49"/>
        </table:table-row>
        <table:table-row table:style-name="ro5">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DELIVERED · DEMO</text:p>
          </table:table-cell>
          <table:covered-table-cell table:number-columns-repeated="3" table:style-name="ce54"/>
          <table:table-cell table:style-name="ce54" office:value-type="string" ns42:value-type="string" table:number-columns-spanned="6" table:number-rows-spanned="1">
            <text:p>FACTUAL DELIVERY EVIDENCE</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DELIVERY EVIDENCE STATE</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6" table:number-rows-spanned="1">
            <text:p>DELIVERY EVENT OBSERVED · DEMO</text:p>
          </table:table-cell>
          <table:covered-table-cell table:number-columns-repeated="5" table:style-name="ce61"/>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SETTLEMENT / PAYOUT EVIDENCE</text:p>
          </table:table-cell>
          <table:covered-table-cell table:number-columns-repeated="5" table:style-name="ce54"/>
        </table:table-row>
        <table:table-row table:style-name="ro5">
          <table:table-cell table:style-name="ce61" office:value-type="string" ns42:value-type="string" table:number-columns-spanned="18" table:number-rows-spanned="1">
            <text:p>CONTROLLED DELIVERY OUTCOMES: DELIVERED · NOT DELIVERED · PENDING REVIEW · UNKNOWN REVIEW.</text:p>
          </table:table-cell>
          <table:covered-table-cell table:number-columns-repeated="17" table:style-name="ce61"/>
        </table:table-row>
        <table:table-row table:style-name="ro5">
          <table:table-cell table:style-name="ce61" office:value-type="string" ns42:value-type="string" table:number-columns-spanned="18" table:number-rows-spanned="1">
            <text:p>DEMO DELIVERY RESULT: Factual delivery evidence is observed for the supported shipped quantity.</text:p>
          </table:table-cell>
          <table:covered-table-cell table:number-columns-repeated="17" table:style-name="ce61"/>
        </table:table-row>
        <table:table-row table:style-name="ro5">
          <table:table-cell table:style-name="ce61" office:value-type="string" ns42:value-type="string" table:number-columns-spanned="18" table:number-rows-spanned="1">
            <text:p>BOUNDARY: Tracking visibility alone cannot silently prove delivery. SHIPPED ≠ DELIVERED.</text:p>
          </table:table-cell>
          <table:covered-table-cell table:number-columns-repeated="17" table:style-name="ce61"/>
        </table:table-row>
        <table:table-row table:style-name="ro5">
          <table:table-cell table:style-name="ce62" office:value-type="string" ns42:value-type="string" table:number-columns-spanned="18" table:number-rows-spanned="1">
            <text:p>💵 SETTLEMENT / PAYOUT EVIDENCE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SETTLEMENT RESULT</text:p>
          </table:table-cell>
          <table:covered-table-cell table:number-columns-repeated="3" table:style-name="ce81"/>
          <table:table-cell table:style-name="ce49" office:value-type="string" ns42:value-type="string" table:number-columns-spanned="6" table:number-rows-spanned="1">
            <text:p>FINANCIAL EVIDENCE RULE</text:p>
          </table:table-cell>
          <table:covered-table-cell table:number-columns-repeated="5" table:style-name="ce49"/>
        </table:table-row>
        <table:table-row table:style-name="ro5">
          <table:table-cell table:style-name="ce54" office:value-type="string" ns42:value-type="string" table:number-columns-spanned="4" table:number-rows-spanned="1">
            <text:p>REVIEW SETTLEMENT EVIDEN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AID OUT · DEMO</text:p>
          </table:table-cell>
          <table:covered-table-cell table:number-columns-repeated="3" table:style-name="ce54"/>
          <table:table-cell table:style-name="ce54" office:value-type="string" ns42:value-type="string" table:number-columns-spanned="6" table:number-rows-spanned="1">
            <text:p>FACTUAL SETTLEMENT EVIDENCE</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SETTLEMENT EVIDENCE STATE</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6" table:number-rows-spanned="1">
            <text:p>PAYOUT EVIDENCE RECORDED · DEMO</text:p>
          </table:table-cell>
          <table:covered-table-cell table:number-columns-repeated="5" table:style-name="ce61"/>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LIFECYCLE COMPLETION GATE</text:p>
          </table:table-cell>
          <table:covered-table-cell table:number-columns-repeated="5" table:style-name="ce54"/>
        </table:table-row>
        <table:table-row table:style-name="ro5">
          <table:table-cell table:style-name="ce61" office:value-type="string" ns42:value-type="string" table:number-columns-spanned="18" table:number-rows-spanned="1">
            <text:p>CONTROLLED SETTLEMENT OUTCOMES: PAID OUT · PENDING PAYOUT · HELD · UNKNOWN REVIEW.</text:p>
          </table:table-cell>
          <table:covered-table-cell table:number-columns-repeated="17" table:style-name="ce61"/>
        </table:table-row>
        <table:table-row table:style-name="ro5">
          <table:table-cell table:style-name="ce61" office:value-type="string" ns42:value-type="string" table:number-columns-spanned="18" table:number-rows-spanned="1">
            <text:p>FEES, TAXES, MARKETPLACE ADJUSTMENTS, AND PAYOUT AMOUNTS: Record only when factually know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MarketDEX does not invent financial settlement facts. DELIVERED ≠ PAID OUT.</text:p>
          </table:table-cell>
          <table:covered-table-cell table:number-columns-repeated="17" table:style-name="ce61"/>
        </table:table-row>
        <table:table-row table:style-name="ro5">
          <table:table-cell table:style-name="ce62" office:value-type="string" ns42:value-type="string" table:number-columns-spanned="18" table:number-rows-spanned="1">
            <text:p>🚧 LIFECYCLE COMPLETION GATE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GATE RESULT</text:p>
          </table:table-cell>
          <table:covered-table-cell table:number-columns-repeated="3" table:style-name="ce81"/>
          <table:table-cell table:style-name="ce49" office:value-type="string" ns42:value-type="string" table:number-columns-spanned="6" table:number-rows-spanned="1">
            <text:p>LIFECYCLE RESULT</text:p>
          </table:table-cell>
          <table:covered-table-cell table:number-columns-repeated="5" table:style-name="ce49"/>
        </table:table-row>
        <table:table-row table:style-name="ro5">
          <table:table-cell table:style-name="ce54" office:value-type="string" ns42:value-type="string" table:number-columns-spanned="4" table:number-rows-spanned="1">
            <text:p>REVIEW LIFECYCLE COMPLE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COMPLETION · DEMO</text:p>
          </table:table-cell>
          <table:covered-table-cell table:number-columns-repeated="3" table:style-name="ce54"/>
          <table:table-cell table:style-name="ce54" office:value-type="string" ns42:value-type="string" table:number-columns-spanned="6" table:number-rows-spanned="1">
            <text:p>COMPLETE · DEMO</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LIFECYCLE STATE</text:p>
          </table:table-cell>
          <table:covered-table-cell table:number-columns-repeated="5" table:style-name="ce68"/>
          <table:table-cell table:style-name="ce68" office:value-type="string" ns42:value-type="string" table:number-columns-spanned="6" table:number-rows-spanned="1">
            <text:p>HISTORY PRESERVATION</text:p>
          </table:table-cell>
          <table:covered-table-cell table:number-columns-repeated="5" table:style-name="ce68"/>
        </table:table-row>
        <table:table-row table:style-name="ro20">
          <table:table-cell table:style-name="ce61" office:value-type="string" ns42:value-type="string" table:number-columns-spanned="6" table:number-rows-spanned="1">
            <text:p>LIFECYCLE COMPLETION SUPPORTED · DEMO</text:p>
          </table:table-cell>
          <table:covered-table-cell table:number-columns-repeated="5" table:style-name="ce61"/>
          <table:table-cell table:style-name="ce54" office:value-type="string" ns42:value-type="string" table:number-columns-spanned="6" table:number-rows-spanned="1">
            <text:p>COMPLETE · DEMO</text:p>
          </table:table-cell>
          <table:covered-table-cell table:number-columns-repeated="5" table:style-name="ce54"/>
          <table:table-cell table:style-name="ce54" office:value-type="string" ns42:value-type="string" table:number-columns-spanned="6" table:number-rows-spanned="1">
            <text:p>INVENTORY + SALE + EXPOSURE + SHIPMENT + FINANCIAL HISTORY PRESERVED</text:p>
          </table:table-cell>
          <table:covered-table-cell table:number-columns-repeated="5" table:style-name="ce54"/>
        </table:table-row>
        <table:table-row table:style-name="ro5">
          <table:table-cell table:style-name="ce61" office:value-type="string" ns42:value-type="string" table:number-columns-spanned="18" table:number-rows-spanned="1">
            <text:p>COMPLETION CROSS-CHECK · DEMO: supported delivery evidence + supported sale relationship + shipment history + supported settlement state = SUPPORTED.</text:p>
          </table:table-cell>
          <table:covered-table-cell table:number-columns-repeated="17" table:style-name="ce61"/>
        </table:table-row>
        <table:table-row table:style-name="ro5">
          <table:table-cell table:style-name="ce61" office:value-type="string" ns42:value-type="string" table:number-columns-spanned="18" table:number-rows-spanned="1">
            <text:p>HISTORY CONTROL: Inventory, Sale, Platform Exposure, Shipment, Delivery, and financial evidence remain preserved after lifecycle completion.</text:p>
          </table:table-cell>
          <table:covered-table-cell table:number-columns-repeated="17" table:style-name="ce61"/>
        </table:table-row>
        <table:table-row table:style-name="ro5">
          <table:table-cell table:style-name="ce61" office:value-type="string" ns42:value-type="string" table:number-columns-spanned="18" table:number-rows-spanned="1">
            <text:p>VOCABULARY CONTRACT: SHIPPED ≠ DELIVERED · DELIVERED ≠ PAID OUT · PAID OUT ≠ COMPLETE.</text:p>
          </table:table-cell>
          <table:covered-table-cell table:number-columns-repeated="17" table:style-name="ce61"/>
        </table:table-row>
        <table:table-row table:style-name="ro5">
          <table:table-cell table:style-name="ce61" office:value-type="string" ns42:value-type="string" table:number-columns-spanned="18" table:number-rows-spanned="1">
            <text:p>BOUNDARY: COMPLETE requires the explicit lifecycle cross-check. No missing delivery or settlement fact is invented.</text:p>
          </table:table-cell>
          <table:covered-table-cell table:number-columns-repeated="17" table:style-name="ce61"/>
        </table:table-row>
        <table:table-row table:style-name="ro5">
          <table:table-cell table:style-name="ce62" office:value-type="string" ns42:value-type="string" table:number-columns-spanned="18" table:number-rows-spanned="1">
            <text:p>🎯 OPERATOR RECORD SELECTION · DEMO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OPERATOR RESPONSIBILITY</text:p>
          </table:table-cell>
          <table:covered-table-cell table:number-columns-repeated="3" table:style-name="ce73"/>
          <table:table-cell table:style-name="ce49" office:value-type="string" ns42:value-type="string" table:number-columns-spanned="4" table:number-rows-spanned="1">
            <text:p>SELECTION STATE</text:p>
          </table:table-cell>
          <table:covered-table-cell table:number-columns-repeated="3" table:style-name="ce49"/>
          <table:table-cell table:style-name="ce81" office:value-type="string" ns42:value-type="string" table:number-columns-spanned="4" table:number-rows-spanned="1">
            <text:p>SELECTED RECORD</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ELECT INVENTORY RECORD</text:p>
          </table:table-cell>
          <table:covered-table-cell table:number-columns-repeated="3" table:style-name="ce54"/>
          <table:table-cell table:style-name="ce54" office:value-type="string" ns42:value-type="string" table:number-columns-spanned="4" table:number-rows-spanned="1">
            <text:p>SELECTED · DEMO</text:p>
          </table:table-cell>
          <table:covered-table-cell table:number-columns-repeated="3" table:style-name="ce54"/>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6" table:number-rows-spanned="1">
            <text:p>ONE WORKING RECORD CONTEXT</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SELECTION</text:p>
          </table:table-cell>
          <table:covered-table-cell table:number-columns-repeated="5" table:style-name="ce68"/>
          <table:table-cell table:style-name="ce68" office:value-type="string" ns42:value-type="string" table:number-columns-spanned="6" table:number-rows-spanned="1">
            <text:p>WORKING CONTEXT</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6" table:number-rows-spanned="1">
            <text:p>RECORD CONTEXT ESTABLISHED · DEMO</text:p>
          </table:table-cell>
          <table:covered-table-cell table:number-columns-repeated="5" table:style-name="ce61"/>
          <table:table-cell table:style-name="ce54" office:value-type="string" ns42:value-type="string" table:number-columns-spanned="6" table:number-rows-spanned="1">
            <text:p>ACTIVE · DEMO</text:p>
          </table:table-cell>
          <table:covered-table-cell table:number-columns-repeated="5" table:style-name="ce54"/>
          <table:table-cell table:style-name="ce54" office:value-type="string" ns42:value-type="string" table:number-columns-spanned="6" table:number-rows-spanned="1">
            <text:p>CURRENT LIFECYCLE STATE</text:p>
          </table:table-cell>
          <table:covered-table-cell table:number-columns-repeated="5" table:style-name="ce54"/>
        </table:table-row>
        <table:table-row table:style-name="ro5">
          <table:table-cell table:style-name="ce61" office:value-type="string" ns42:value-type="string" table:number-columns-spanned="18" table:number-rows-spanned="1">
            <text:p>OPERATOR CONTRACT: MarketDEX establishes which Inventory record is being reviewed before presenting lifecycle guidance.</text:p>
          </table:table-cell>
          <table:covered-table-cell table:number-columns-repeated="17" table:style-name="ce61"/>
        </table:table-row>
        <table:table-row table:style-name="ro5">
          <table:table-cell table:style-name="ce61" office:value-type="string" ns42:value-type="string" table:number-columns-spanned="18" table:number-rows-spanned="1">
            <text:p>BOUNDARY: Record selection does not alter quantity, cost, state, exposure, sale, shipment, settlement, or history.</text:p>
          </table:table-cell>
          <table:covered-table-cell table:number-columns-repeated="17" table:style-name="ce61"/>
        </table:table-row>
        <table:table-row table:style-name="ro5">
          <table:table-cell table:style-name="ce62" office:value-type="string" ns42:value-type="string" table:number-columns-spanned="18" table:number-rows-spanned="1">
            <text:p>📍 CURRENT LIFECYCLE STATE SURFACE · DEMO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CURRENT RECORD</text:p>
          </table:table-cell>
          <table:covered-table-cell table:number-columns-repeated="3" table:style-name="ce73"/>
          <table:table-cell table:style-name="ce49" office:value-type="string" ns42:value-type="string" table:number-columns-spanned="4" table:number-rows-spanned="1">
            <text:p>SUPPORTED STATE</text:p>
          </table:table-cell>
          <table:covered-table-cell table:number-columns-repeated="3" table:style-name="ce49"/>
          <table:table-cell table:style-name="ce81" office:value-type="string" ns42:value-type="string" table:number-columns-spanned="4" table:number-rows-spanned="1">
            <text:p>STATE SOURCE</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SUPPORTED LIFECYCLE EVIDENCE</text:p>
          </table:table-cell>
          <table:covered-table-cell table:number-columns-repeated="3" table:style-name="ce54"/>
          <table:table-cell table:style-name="ce54" office:value-type="string" ns42:value-type="string" table:number-columns-spanned="6" table:number-rows-spanned="1">
            <text:p>READ-ORIENTED STATE</text:p>
          </table:table-cell>
          <table:covered-table-cell table:number-columns-repeated="5" table:style-name="ce54"/>
        </table:table-row>
        <table:table-row table:style-name="ro5">
          <table:table-cell table:style-name="ce68" office:value-type="string" ns42:value-type="string" table:number-columns-spanned="6" table:number-rows-spanned="1">
            <text:p>STATE SURFACE RESULT</text:p>
          </table:table-cell>
          <table:covered-table-cell table:number-columns-repeated="5" table:style-name="ce68"/>
          <table:table-cell table:style-name="ce68" office:value-type="string" ns42:value-type="string" table:number-columns-spanned="6" table:number-rows-spanned="1">
            <text:p>CURRENT BUSINESS STATE</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6" table:number-rows-spanned="1">
            <text:p>CURRENT STATE SHOWN · DEMO</text:p>
          </table:table-cell>
          <table:covered-table-cell table:number-columns-repeated="5" table:style-name="ce61"/>
          <table:table-cell table:style-name="ce54" office:value-type="string" ns42:value-type="string" table:number-columns-spanned="6" table:number-rows-spanned="1">
            <text:p>SHIPPED · DEMO</text:p>
          </table:table-cell>
          <table:covered-table-cell table:number-columns-repeated="5" table:style-name="ce54"/>
          <table:table-cell table:style-name="ce54" office:value-type="string" ns42:value-type="string" table:number-columns-spanned="6" table:number-rows-spanned="1">
            <text:p>NEXT REQUIRED ACTION</text:p>
          </table:table-cell>
          <table:covered-table-cell table:number-columns-repeated="5" table:style-name="ce54"/>
        </table:table-row>
        <table:table-row table:style-name="ro5">
          <table:table-cell table:style-name="ce61" office:value-type="string" ns42:value-type="string" table:number-columns-spanned="18" table:number-rows-spanned="1">
            <text:p>STATE CONTRACT: The operator sees the current supported business state for the selected record.</text:p>
          </table:table-cell>
          <table:covered-table-cell table:number-columns-repeated="17" table:style-name="ce61"/>
        </table:table-row>
        <table:table-row table:style-name="ro5">
          <table:table-cell table:style-name="ce61" office:value-type="string" ns42:value-type="string" table:number-columns-spanned="18" table:number-rows-spanned="1">
            <text:p>BOUNDARY: MarketDEX displays supported state evidence and does not ask the operator to infer state from the full demo chain.</text:p>
          </table:table-cell>
          <table:covered-table-cell table:number-columns-repeated="17" table:style-name="ce61"/>
        </table:table-row>
        <table:table-row table:style-name="ro5">
          <table:table-cell table:style-name="ce62" office:value-type="string" ns42:value-type="string" table:number-columns-spanned="18" table:number-rows-spanned="1">
            <text:p>👉 NEXT REQUIRED ACTION SURFACE · DEMO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CURRENT STATE</text:p>
          </table:table-cell>
          <table:covered-table-cell table:number-columns-repeated="3" table:style-name="ce73"/>
          <table:table-cell table:style-name="ce49" office:value-type="string" ns42:value-type="string" table:number-columns-spanned="4" table:number-rows-spanned="1">
            <text:p>DERIVED NEXT ACTION</text:p>
          </table:table-cell>
          <table:covered-table-cell table:number-columns-repeated="3" table:style-name="ce49"/>
          <table:table-cell table:style-name="ce81" office:value-type="string" ns42:value-type="string" table:number-columns-spanned="4" table:number-rows-spanned="1">
            <text:p>ACTION BASIS</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LOCKED LIFECYCLE CONTRACT</text:p>
          </table:table-cell>
          <table:covered-table-cell table:number-columns-repeated="3" table:style-name="ce54"/>
          <table:table-cell table:style-name="ce54" office:value-type="string" ns42:value-type="string" table:number-columns-spanned="6" table:number-rows-spanned="1">
            <text:p>GUIDANCE ONLY</text:p>
          </table:table-cell>
          <table:covered-table-cell table:number-columns-repeated="5" table:style-name="ce54"/>
        </table:table-row>
        <table:table-row table:style-name="ro5">
          <table:table-cell table:style-name="ce68" office:value-type="string" ns42:value-type="string" table:number-columns-spanned="6" table:number-rows-spanned="1">
            <text:p>ACTION SURFACE RESULT</text:p>
          </table:table-cell>
          <table:covered-table-cell table:number-columns-repeated="5" table:style-name="ce68"/>
          <table:table-cell table:style-name="ce68" office:value-type="string" ns42:value-type="string" table:number-columns-spanned="6" table:number-rows-spanned="1">
            <text:p>OPERATOR GUIDANCE</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6" table:number-rows-spanned="1">
            <text:p>NEXT ACTION SHOWN · DEMO</text:p>
          </table:table-cell>
          <table:covered-table-cell table:number-columns-repeated="5" table:style-name="ce61"/>
          <table:table-cell table:style-name="ce54" office:value-type="string" ns42:value-type="string" table:number-columns-spanned="6" table:number-rows-spanned="1">
            <text:p>REVIEW DELIVERY EVIDENCE</text:p>
          </table:table-cell>
          <table:covered-table-cell table:number-columns-repeated="5" table:style-name="ce54"/>
          <table:table-cell table:style-name="ce54" office:value-type="string" ns42:value-type="string" table:number-columns-spanned="6" table:number-rows-spanned="1">
            <text:p>ACTIVE BLOCKER</text:p>
          </table:table-cell>
          <table:covered-table-cell table:number-columns-repeated="5" table:style-name="ce54"/>
        </table:table-row>
        <table:table-row table:style-name="ro5">
          <table:table-cell table:style-name="ce61" office:value-type="string" ns42:value-type="string" table:number-columns-spanned="18" table:number-rows-spanned="1">
            <text:p>NEXT-ACTION CONTRACT: The next responsibility is derived from supported current state and the locked lifecycle sequence.</text:p>
          </table:table-cell>
          <table:covered-table-cell table:number-columns-repeated="17" table:style-name="ce61"/>
        </table:table-row>
        <table:table-row table:style-name="ro5">
          <table:table-cell table:style-name="ce61" office:value-type="string" ns42:value-type="string" table:number-columns-spanned="18" table:number-rows-spanned="1">
            <text:p>BOUNDARY: Guidance does not silently complete the action or change Inventory state.</text:p>
          </table:table-cell>
          <table:covered-table-cell table:number-columns-repeated="17" table:style-name="ce61"/>
        </table:table-row>
        <table:table-row table:style-name="ro5">
          <table:table-cell table:style-name="ce62" office:value-type="string" ns42:value-type="string" table:number-columns-spanned="18" table:number-rows-spanned="1">
            <text:p>🚧 ACTIVE BLOCKER SURFACE · DEMO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CURRENT ACTION</text:p>
          </table:table-cell>
          <table:covered-table-cell table:number-columns-repeated="3" table:style-name="ce73"/>
          <table:table-cell table:style-name="ce49" office:value-type="string" ns42:value-type="string" table:number-columns-spanned="4" table:number-rows-spanned="1">
            <text:p>ACTIVE BLOCKER</text:p>
          </table:table-cell>
          <table:covered-table-cell table:number-columns-repeated="3" table:style-name="ce49"/>
          <table:table-cell table:style-name="ce81" office:value-type="string" ns42:value-type="string" table:number-columns-spanned="4" table:number-rows-spanned="1">
            <text:p>BLOCKER STATE</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4" table:number-rows-spanned="1">
            <text:p>UNRESOLVED · DEMO</text:p>
          </table:table-cell>
          <table:covered-table-cell table:number-columns-repeated="3" table:style-name="ce54"/>
          <table:table-cell table:style-name="ce54" office:value-type="string" ns42:value-type="string" table:number-columns-spanned="6" table:number-rows-spanned="1">
            <text:p>ONE EXPLICIT BLOCKER</text:p>
          </table:table-cell>
          <table:covered-table-cell table:number-columns-repeated="5" table:style-name="ce54"/>
        </table:table-row>
        <table:table-row table:style-name="ro5">
          <table:table-cell table:style-name="ce68" office:value-type="string" ns42:value-type="string" table:number-columns-spanned="6" table:number-rows-spanned="1">
            <text:p>BLOCKER SURFACE RESULT</text:p>
          </table:table-cell>
          <table:covered-table-cell table:number-columns-repeated="5" table:style-name="ce68"/>
          <table:table-cell table:style-name="ce68" office:value-type="string" ns42:value-type="string" table:number-columns-spanned="6" table:number-rows-spanned="1">
            <text:p>ADVANCEMENT STATE</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6" table:number-rows-spanned="1">
            <text:p>BLOCKER EXPOSED · DEMO</text:p>
          </table:table-cell>
          <table:covered-table-cell table:number-columns-repeated="5" table:style-name="ce61"/>
          <table:table-cell table:style-name="ce54" office:value-type="string" ns42:value-type="string" table:number-columns-spanned="6" table:number-rows-spanned="1">
            <text:p>ADVANCEMENT BLOCKED · DEMO</text:p>
          </table:table-cell>
          <table:covered-table-cell table:number-columns-repeated="5" table:style-name="ce54"/>
          <table:table-cell table:style-name="ce54" office:value-type="string" ns42:value-type="string" table:number-columns-spanned="6" table:number-rows-spanned="1">
            <text:p>EVIDENCE NEEDED</text:p>
          </table:table-cell>
          <table:covered-table-cell table:number-columns-repeated="5" table:style-name="ce54"/>
        </table:table-row>
        <table:table-row table:style-name="ro5">
          <table:table-cell table:style-name="ce61" office:value-type="string" ns42:value-type="string" table:number-columns-spanned="18" table:number-rows-spanned="1">
            <text:p>BLOCKER CONTRACT: MarketDEX exposes the exact unresolved responsibility preventing the next supported lifecycle movement.</text:p>
          </table:table-cell>
          <table:covered-table-cell table:number-columns-repeated="17" table:style-name="ce61"/>
        </table:table-row>
        <table:table-row table:style-name="ro5">
          <table:table-cell table:style-name="ce61" office:value-type="string" ns42:value-type="string" table:number-columns-spanned="18" table:number-rows-spanned="1">
            <text:p>BOUNDARY: An unresolved blocker cannot be silently cleared by unrelated evidence.</text:p>
          </table:table-cell>
          <table:covered-table-cell table:number-columns-repeated="17" table:style-name="ce61"/>
        </table:table-row>
        <table:table-row table:style-name="ro5">
          <table:table-cell table:style-name="ce62" office:value-type="string" ns42:value-type="string" table:number-columns-spanned="18" table:number-rows-spanned="1">
            <text:p>🔎 EVIDENCE NEEDED SURFACE · DEMO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ACTIVE BLOCKER</text:p>
          </table:table-cell>
          <table:covered-table-cell table:number-columns-repeated="3" table:style-name="ce73"/>
          <table:table-cell table:style-name="ce49" office:value-type="string" ns42:value-type="string" table:number-columns-spanned="4" table:number-rows-spanned="1">
            <text:p>EVIDENCE NEEDED</text:p>
          </table:table-cell>
          <table:covered-table-cell table:number-columns-repeated="3" table:style-name="ce49"/>
          <table:table-cell table:style-name="ce81" office:value-type="string" ns42:value-type="string" table:number-columns-spanned="4" table:number-rows-spanned="1">
            <text:p>EVIDENCE STANDARD</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4" table:number-rows-spanned="1">
            <text:p>FACTUAL DELIVERY RESULT</text:p>
          </table:table-cell>
          <table:covered-table-cell table:number-columns-repeated="3" table:style-name="ce54"/>
          <table:table-cell table:style-name="ce54" office:value-type="string" ns42:value-type="string" table:number-columns-spanned="4" table:number-rows-spanned="1">
            <text:p>SUPPORTED FACT ONLY</text:p>
          </table:table-cell>
          <table:covered-table-cell table:number-columns-repeated="3" table:style-name="ce54"/>
          <table:table-cell table:style-name="ce54" office:value-type="string" ns42:value-type="string" table:number-columns-spanned="6" table:number-rows-spanned="1">
            <text:p>NO INVENTED FACTS</text:p>
          </table:table-cell>
          <table:covered-table-cell table:number-columns-repeated="5" table:style-name="ce54"/>
        </table:table-row>
        <table:table-row table:style-name="ro5">
          <table:table-cell table:style-name="ce68" office:value-type="string" ns42:value-type="string" table:number-columns-spanned="6" table:number-rows-spanned="1">
            <text:p>EVIDENCE SURFACE RESULT</text:p>
          </table:table-cell>
          <table:covered-table-cell table:number-columns-repeated="5" table:style-name="ce68"/>
          <table:table-cell table:style-name="ce68" office:value-type="string" ns42:value-type="string" table:number-columns-spanned="6" table:number-rows-spanned="1">
            <text:p>OPERATOR QUESTION</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6" table:number-rows-spanned="1">
            <text:p>REQUIRED EVIDENCE SHOWN · DEMO</text:p>
          </table:table-cell>
          <table:covered-table-cell table:number-columns-repeated="5" table:style-name="ce61"/>
          <table:table-cell table:style-name="ce54" office:value-type="string" ns42:value-type="string" table:number-columns-spanned="6" table:number-rows-spanned="1">
            <text:p>WHAT FACTUAL DELIVERY RESULT IS SUPPORTED?</text:p>
          </table:table-cell>
          <table:covered-table-cell table:number-columns-repeated="5" table:style-name="ce54"/>
          <table:table-cell table:style-name="ce54" office:value-type="string" ns42:value-type="string" table:number-columns-spanned="6" table:number-rows-spanned="1">
            <text:p>CONTROLLED OPERATOR INPUT</text:p>
          </table:table-cell>
          <table:covered-table-cell table:number-columns-repeated="5" table:style-name="ce54"/>
        </table:table-row>
        <table:table-row table:style-name="ro5">
          <table:table-cell table:style-name="ce61" office:value-type="string" ns42:value-type="string" table:number-columns-spanned="18" table:number-rows-spanned="1">
            <text:p>EVIDENCE CONTRACT: The operator is told what factual evidence is required next before entering a result.</text:p>
          </table:table-cell>
          <table:covered-table-cell table:number-columns-repeated="17" table:style-name="ce61"/>
        </table:table-row>
        <table:table-row table:style-name="ro5">
          <table:table-cell table:style-name="ce61" office:value-type="string" ns42:value-type="string" table:number-columns-spanned="18" table:number-rows-spanned="1">
            <text:p>BOUNDARY: Tracking visibility alone cannot silently prove delivery.</text:p>
          </table:table-cell>
          <table:covered-table-cell table:number-columns-repeated="17" table:style-name="ce61"/>
        </table:table-row>
        <table:table-row table:style-name="ro5">
          <table:table-cell table:style-name="ce62" office:value-type="string" ns42:value-type="string" table:number-columns-spanned="18" table:number-rows-spanned="1">
            <text:p>⌨️ CONTROLLED OPERATOR INPUT SURFACE · DEMO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INPUT RESPONSIBILITY</text:p>
          </table:table-cell>
          <table:covered-table-cell table:number-columns-repeated="3" table:style-name="ce73"/>
          <table:table-cell table:style-name="ce49" office:value-type="string" ns42:value-type="string" table:number-columns-spanned="4" table:number-rows-spanned="1">
            <text:p>CONTROLLED INPUT</text:p>
          </table:table-cell>
          <table:covered-table-cell table:number-columns-repeated="3" table:style-name="ce49"/>
          <table:table-cell table:style-name="ce81" office:value-type="string" ns42:value-type="string" table:number-columns-spanned="4" table:number-rows-spanned="1">
            <text:p>DEMO ENTRY</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CORD SUPPORTED EVIDENCE</text:p>
          </table:table-cell>
          <table:covered-table-cell table:number-columns-repeated="3" table:style-name="ce54"/>
          <table:table-cell table:style-name="ce54" office:value-type="string" ns42:value-type="string" table:number-columns-spanned="4" table:number-rows-spanned="1">
            <text:p>DELIVERED / NOT DELIVERED / PENDING REVIEW / UNKNOWN REVIEW</text:p>
          </table:table-cell>
          <table:covered-table-cell table:number-columns-repeated="3" table:style-name="ce54"/>
          <table:table-cell table:style-name="ce54" office:value-type="string" ns42:value-type="string" table:number-columns-spanned="4" table:number-rows-spanned="1">
            <text:p>DELIVERED · DEMO</text:p>
          </table:table-cell>
          <table:covered-table-cell table:number-columns-repeated="3" table:style-name="ce54"/>
          <table:table-cell table:style-name="ce54" office:value-type="string" ns42:value-type="string" table:number-columns-spanned="6" table:number-rows-spanned="1">
            <text:p>CONTROLLED VOCABULARY</text:p>
          </table:table-cell>
          <table:covered-table-cell table:number-columns-repeated="5" table:style-name="ce54"/>
        </table:table-row>
        <table:table-row table:style-name="ro5">
          <table:table-cell table:style-name="ce68" office:value-type="string" ns42:value-type="string" table:number-columns-spanned="6" table:number-rows-spanned="1">
            <text:p>INPUT SURFACE RESULT</text:p>
          </table:table-cell>
          <table:covered-table-cell table:number-columns-repeated="5" table:style-name="ce68"/>
          <table:table-cell table:style-name="ce68" office:value-type="string" ns42:value-type="string" table:number-columns-spanned="6" table:number-rows-spanned="1">
            <text:p>RECORDED EVIDENCE</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6" table:number-rows-spanned="1">
            <text:p>OPERATOR EVIDENCE RECORDED · DEMO</text:p>
          </table:table-cell>
          <table:covered-table-cell table:number-columns-repeated="5" table:style-name="ce61"/>
          <table:table-cell table:style-name="ce54" office:value-type="string" ns42:value-type="string" table:number-columns-spanned="6" table:number-rows-spanned="1">
            <text:p>DELIVERED · DEMO</text:p>
          </table:table-cell>
          <table:covered-table-cell table:number-columns-repeated="5" table:style-name="ce54"/>
          <table:table-cell table:style-name="ce54" office:value-type="string" ns42:value-type="string" table:number-columns-spanned="6" table:number-rows-spanned="1">
            <text:p>EVIDENCE REVIEW RESULT</text:p>
          </table:table-cell>
          <table:covered-table-cell table:number-columns-repeated="5" table:style-name="ce54"/>
        </table:table-row>
        <table:table-row table:style-name="ro5">
          <table:table-cell table:style-name="ce61" office:value-type="string" ns42:value-type="string" table:number-columns-spanned="18" table:number-rows-spanned="1">
            <text:p>INPUT CONTRACT: The first operator-facing evidence surface uses the controlled delivery-outcome vocabulary already proven by Build 052.</text:p>
          </table:table-cell>
          <table:covered-table-cell table:number-columns-repeated="17" table:style-name="ce61"/>
        </table:table-row>
        <table:table-row table:style-name="ro5">
          <table:table-cell table:style-name="ce61" office:value-type="string" ns42:value-type="string" table:number-columns-spanned="18" table:number-rows-spanned="1">
            <text:p>BOUNDARY: This demo surface proves the input responsibility only. No macro, button, connector, or automatic state write is created.</text:p>
          </table:table-cell>
          <table:covered-table-cell table:number-columns-repeated="17" table:style-name="ce61"/>
        </table:table-row>
        <table:table-row table:style-name="ro5">
          <table:table-cell table:style-name="ce62" office:value-type="string" ns42:value-type="string" table:number-columns-spanned="18" table:number-rows-spanned="1">
            <text:p>🧾 EVIDENCE REVIEW RESULT SURFACE · DEMO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RECORDED EVIDENCE</text:p>
          </table:table-cell>
          <table:covered-table-cell table:number-columns-repeated="3" table:style-name="ce73"/>
          <table:table-cell table:style-name="ce49" office:value-type="string" ns42:value-type="string" table:number-columns-spanned="4" table:number-rows-spanned="1">
            <text:p>REVIEW RESULT</text:p>
          </table:table-cell>
          <table:covered-table-cell table:number-columns-repeated="3" table:style-name="ce49"/>
          <table:table-cell table:style-name="ce81" office:value-type="string" ns42:value-type="string" table:number-columns-spanned="4" table:number-rows-spanned="1">
            <text:p>CONTROLLED REVIEW STATES</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DELIVERED · DEMO</text:p>
          </table:table-cell>
          <table:covered-table-cell table:number-columns-repeated="3" table:style-name="ce54"/>
          <table:table-cell table:style-name="ce54" office:value-type="string" ns42:value-type="string" table:number-columns-spanned="4" table:number-rows-spanned="1">
            <text:p>SUPPORTED · DEMO</text:p>
          </table:table-cell>
          <table:covered-table-cell table:number-columns-repeated="3" table:style-name="ce54"/>
          <table:table-cell table:style-name="ce54" office:value-type="string" ns42:value-type="string" table:number-columns-spanned="4" table:number-rows-spanned="1">
            <text:p>SUPPORTED / UNSUPPORTED / PENDING REVIEW / UNKNOWN</text:p>
          </table:table-cell>
          <table:covered-table-cell table:number-columns-repeated="3" table:style-name="ce54"/>
          <table:table-cell table:style-name="ce54" office:value-type="string" ns42:value-type="string" table:number-columns-spanned="6" table:number-rows-spanned="1">
            <text:p>REVIEW BEFORE TRANSITION</text:p>
          </table:table-cell>
          <table:covered-table-cell table:number-columns-repeated="5" table:style-name="ce54"/>
        </table:table-row>
        <table:table-row table:style-name="ro5">
          <table:table-cell table:style-name="ce68" office:value-type="string" ns42:value-type="string" table:number-columns-spanned="6" table:number-rows-spanned="1">
            <text:p>REVIEW SURFACE RESULT</text:p>
          </table:table-cell>
          <table:covered-table-cell table:number-columns-repeated="5" table:style-name="ce68"/>
          <table:table-cell table:style-name="ce68" office:value-type="string" ns42:value-type="string" table:number-columns-spanned="6" table:number-rows-spanned="1">
            <text:p>EVIDENCE STATE</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6" table:number-rows-spanned="1">
            <text:p>EVIDENCE REVIEWED · DEMO</text:p>
          </table:table-cell>
          <table:covered-table-cell table:number-columns-repeated="5" table:style-name="ce61"/>
          <table:table-cell table:style-name="ce54" office:value-type="string" ns42:value-type="string" table:number-columns-spanned="6" table:number-rows-spanned="1">
            <text:p>SUPPORTED · DEMO</text:p>
          </table:table-cell>
          <table:covered-table-cell table:number-columns-repeated="5" table:style-name="ce54"/>
          <table:table-cell table:style-name="ce54" office:value-type="string" ns42:value-type="string" table:number-columns-spanned="6" table:number-rows-spanned="1">
            <text:p>DERIVED TRANSITION PREVIEW</text:p>
          </table:table-cell>
          <table:covered-table-cell table:number-columns-repeated="5" table:style-name="ce54"/>
        </table:table-row>
        <table:table-row table:style-name="ro5">
          <table:table-cell table:style-name="ce61" office:value-type="string" ns42:value-type="string" table:number-columns-spanned="18" table:number-rows-spanned="1">
            <text:p>REVIEW CONTRACT: Recorded evidence is explicitly reviewed before MarketDEX may present a supported transitio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Unsupported, pending, or unknown evidence cannot produce a supported transition preview.</text:p>
          </table:table-cell>
          <table:covered-table-cell table:number-columns-repeated="17" table:style-name="ce61"/>
        </table:table-row>
        <table:table-row table:style-name="ro5">
          <table:table-cell table:style-name="ce62" office:value-type="string" ns42:value-type="string" table:number-columns-spanned="18" table:number-rows-spanned="1">
            <text:p>🔭 DERIVED TRANSITION PREVIEW · DEMO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CURRENT STATE</text:p>
          </table:table-cell>
          <table:covered-table-cell table:number-columns-repeated="3" table:style-name="ce73"/>
          <table:table-cell table:style-name="ce49" office:value-type="string" ns42:value-type="string" table:number-columns-spanned="4" table:number-rows-spanned="1">
            <text:p>SUPPORTED EVIDENCE</text:p>
          </table:table-cell>
          <table:covered-table-cell table:number-columns-repeated="3" table:style-name="ce49"/>
          <table:table-cell table:style-name="ce81" office:value-type="string" ns42:value-type="string" table:number-columns-spanned="4" table:number-rows-spanned="1">
            <text:p>TRANSITION PREVIEW</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DELIVERED · SUPPORTED · DEMO</text:p>
          </table:table-cell>
          <table:covered-table-cell table:number-columns-repeated="3" table:style-name="ce54"/>
          <table:table-cell table:style-name="ce54" office:value-type="string" ns42:value-type="string" table:number-columns-spanned="4" table:number-rows-spanned="1">
            <text:p>SHIPPED → DELIVERED · DEMO PREVIEW</text:p>
          </table:table-cell>
          <table:covered-table-cell table:number-columns-repeated="3" table:style-name="ce54"/>
          <table:table-cell table:style-name="ce54" office:value-type="string" ns42:value-type="string" table:number-columns-spanned="6" table:number-rows-spanned="1">
            <text:p>PREVIEW ONLY</text:p>
          </table:table-cell>
          <table:covered-table-cell table:number-columns-repeated="5" table:style-name="ce54"/>
        </table:table-row>
        <table:table-row table:style-name="ro5">
          <table:table-cell table:style-name="ce68" office:value-type="string" ns42:value-type="string" table:number-columns-spanned="6" table:number-rows-spanned="1">
            <text:p>PREVIEW SURFACE RESULT</text:p>
          </table:table-cell>
          <table:covered-table-cell table:number-columns-repeated="5" table:style-name="ce68"/>
          <table:table-cell table:style-name="ce68" office:value-type="string" ns42:value-type="string" table:number-columns-spanned="6" table:number-rows-spanned="1">
            <text:p>STATE CHANGE STATUS</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6" table:number-rows-spanned="1">
            <text:p>SUPPORTED TRANSITION SHOWN · DEMO</text:p>
          </table:table-cell>
          <table:covered-table-cell table:number-columns-repeated="5" table:style-name="ce61"/>
          <table:table-cell table:style-name="ce54" office:value-type="string" ns42:value-type="string" table:number-columns-spanned="6" table:number-rows-spanned="1">
            <text:p>NOT APPLIED · DEMO</text:p>
          </table:table-cell>
          <table:covered-table-cell table:number-columns-repeated="5" table:style-name="ce54"/>
          <table:table-cell table:style-name="ce54" office:value-type="string" ns42:value-type="string" table:number-columns-spanned="6" table:number-rows-spanned="1">
            <text:p>INVENTORY ACTION CENTER GATE</text:p>
          </table:table-cell>
          <table:covered-table-cell table:number-columns-repeated="5" table:style-name="ce54"/>
        </table:table-row>
        <table:table-row table:style-name="ro5">
          <table:table-cell table:style-name="ce61" office:value-type="string" ns42:value-type="string" table:number-columns-spanned="18" table:number-rows-spanned="1">
            <text:p>PREVIEW CONTRACT: MarketDEX shows which transition would become supported from the reviewed evidence.</text:p>
          </table:table-cell>
          <table:covered-table-cell table:number-columns-repeated="17" table:style-name="ce61"/>
        </table:table-row>
        <table:table-row table:style-name="ro5">
          <table:table-cell table:style-name="ce61" office:value-type="string" ns42:value-type="string" table:number-columns-spanned="18" table:number-rows-spanned="1">
            <text:p>BOUNDARY: Transition Preview is not a state mutation. Inventory remains unchanged until a separate supported transition responsibility exists.</text:p>
          </table:table-cell>
          <table:covered-table-cell table:number-columns-repeated="17" table:style-name="ce61"/>
        </table:table-row>
        <table:table-row table:style-name="ro5">
          <table:table-cell table:style-name="ce62" office:value-type="string" ns42:value-type="string" table:number-columns-spanned="18" table:number-rows-spanned="1">
            <text:p>🎛️ INVENTORY ACTION CENTER GATE · DEMO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ELECTED RECORD</text:p>
          </table:table-cell>
          <table:covered-table-cell table:number-columns-repeated="3" table:style-name="ce73"/>
          <table:table-cell table:style-name="ce49" office:value-type="string" ns42:value-type="string" table:number-columns-spanned="4" table:number-rows-spanned="1">
            <text:p>CURRENT STATE</text:p>
          </table:table-cell>
          <table:covered-table-cell table:number-columns-repeated="3" table:style-name="ce49"/>
          <table:table-cell table:style-name="ce81" office:value-type="string" ns42:value-type="string" table:number-columns-spanned="4" table:number-rows-spanned="1">
            <text:p>NEXT ACTION</text:p>
          </table:table-cell>
          <table:covered-table-cell table:number-columns-repeated="3" table:style-name="ce81"/>
          <table:table-cell table:style-name="ce49" office:value-type="string" ns42:value-type="string" table:number-columns-spanned="6" table:number-rows-spanned="1">
            <text:p>ACTIVE BLOCKER</text:p>
          </table:table-cell>
          <table:covered-table-cell table:number-columns-repeated="5" table:style-name="ce49"/>
        </table:table-row>
        <table:table-row table:style-name="ro5">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6" table:number-rows-spanned="1">
            <text:p>DELIVERY EVIDENCE</text:p>
          </table:table-cell>
          <table:covered-table-cell table:number-columns-repeated="5" table:style-name="ce54"/>
        </table:table-row>
        <table:table-row table:style-name="ro5">
          <table:table-cell table:style-name="ce68" office:value-type="string" ns42:value-type="string" table:number-columns-spanned="6" table:number-rows-spanned="1">
            <text:p>EVIDENCE → REVIEW → PREVIEW</text:p>
          </table:table-cell>
          <table:covered-table-cell table:number-columns-repeated="5" table:style-name="ce68"/>
          <table:table-cell table:style-name="ce68" office:value-type="string" ns42:value-type="string" table:number-columns-spanned="6" table:number-rows-spanned="1">
            <text:p>ACTION CENTER RESULT</text:p>
          </table:table-cell>
          <table:covered-table-cell table:number-columns-repeated="5" table:style-name="ce68"/>
          <table:table-cell table:style-name="ce68" office:value-type="string" ns42:value-type="string" table:number-columns-spanned="6" table:number-rows-spanned="1">
            <text:p>OPERATING BOUNDARY</text:p>
          </table:table-cell>
          <table:covered-table-cell table:number-columns-repeated="5" table:style-name="ce68"/>
        </table:table-row>
        <table:table-row table:style-name="ro20">
          <table:table-cell table:style-name="ce61" office:value-type="string" ns42:value-type="string" table:number-columns-spanned="6" table:number-rows-spanned="1">
            <text:p>DELIVERED · DEMO → SUPPORTED · DEMO → SHIPPED → DELIVERED PREVIEW</text:p>
          </table:table-cell>
          <table:covered-table-cell table:number-columns-repeated="5" table:style-name="ce61"/>
          <table:table-cell table:style-name="ce54" office:value-type="string" ns42:value-type="string" table:number-columns-spanned="6" table:number-rows-spanned="1">
            <text:p>OPERATOR PATH SUPPORTED · DEMO</text:p>
          </table:table-cell>
          <table:covered-table-cell table:number-columns-repeated="5" table:style-name="ce54"/>
          <table:table-cell table:style-name="ce54" office:value-type="string" ns42:value-type="string" table:number-columns-spanned="6" table:number-rows-spanned="1">
            <text:p>NO SILENT STATE CHANGE</text:p>
          </table:table-cell>
          <table:covered-table-cell table:number-columns-repeated="5" table:style-name="ce54"/>
        </table:table-row>
        <table:table-row table:style-name="ro5">
          <table:table-cell table:style-name="ce61" office:value-type="string" ns42:value-type="string" table:number-columns-spanned="18" table:number-rows-spanned="1">
            <text:p>ACTION CENTER CROSS-CHECK · DEMO: selected record + current supported state + derived next action + active blocker + required evidence + controlled input + evidence review + transition preview = SUPPORTED OPERATOR PATH.</text:p>
          </table:table-cell>
          <table:covered-table-cell table:number-columns-repeated="17" table:style-name="ce61"/>
        </table:table-row>
        <table:table-row table:style-name="ro5">
          <table:table-cell table:style-name="ce61" office:value-type="string" ns42:value-type="string" table:number-columns-spanned="18" table:number-rows-spanned="1">
            <text:p>OPERATOR FLOW: SELECT RECORD → UNDERSTAND CURRENT STATE → SEE NEXT ACTION → SEE BLOCKER → KNOW REQUIRED EVIDENCE → RECORD EVIDENCE → REVIEW RESULT → PREVIEW SUPPORTED TRANSITIO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The Action Center does not create automation, macros, buttons, marketplace connectors, or silent state changes.</text:p>
          </table:table-cell>
          <table:covered-table-cell table:number-columns-repeated="17" table:style-name="ce61"/>
        </table:table-row>
        <table:table-row table:style-name="ro5">
          <table:table-cell table:style-name="ce61" office:value-type="string" ns42:value-type="string" table:number-columns-spanned="18" table:number-rows-spanned="1">
            <text:p>OPERATING PRINCIPLE: The operator should not need to read the full linear demo chain to understand what to do next.</text:p>
          </table:table-cell>
          <table:covered-table-cell table:number-columns-repeated="17" table:style-name="ce61"/>
        </table:table-row>
        <table:table-row table:style-name="ro5">
          <table:table-cell table:style-name="ce62" office:value-type="string" ns42:value-type="string" table:number-columns-spanned="18" table:number-rows-spanned="1">
            <text:p>🗺️ CONTROLLED LIFECYCLE ROUTING MAP · DEMO ROU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ROUTING INPUT</text:p>
          </table:table-cell>
          <table:covered-table-cell table:number-columns-repeated="3" table:style-name="ce73"/>
          <table:table-cell table:style-name="ce49" office:value-type="string" ns42:value-type="string" table:number-columns-spanned="4" table:number-rows-spanned="1">
            <text:p>ROUTING BASIS</text:p>
          </table:table-cell>
          <table:covered-table-cell table:number-columns-repeated="3" table:style-name="ce49"/>
          <table:table-cell table:style-name="ce81" office:value-type="string" ns42:value-type="string" table:number-columns-spanned="4" table:number-rows-spanned="1">
            <text:p>ROUTING OUTPU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UPPORTED CURRENT STATE</text:p>
          </table:table-cell>
          <table:covered-table-cell table:number-columns-repeated="3" table:style-name="ce54"/>
          <table:table-cell table:style-name="ce54" office:value-type="string" ns42:value-type="string" table:number-columns-spanned="4" table:number-rows-spanned="1">
            <text:p>LOCKED LIFECYCLE CONTRACT</text:p>
          </table:table-cell>
          <table:covered-table-cell table:number-columns-repeated="3" table:style-name="ce54"/>
          <table:table-cell table:style-name="ce54" office:value-type="string" ns42:value-type="string" table:number-columns-spanned="4" table:number-rows-spanned="1">
            <text:p>NEXT ACTION + BLOCKER + EVIDENCE</text:p>
          </table:table-cell>
          <table:covered-table-cell table:number-columns-repeated="3" table:style-name="ce54"/>
          <table:table-cell table:style-name="ce54" office:value-type="string" ns42:value-type="string" table:number-columns-spanned="6" table:number-rows-spanned="1">
            <text:p>NO STATE MUTATION</text:p>
          </table:table-cell>
          <table:covered-table-cell table:number-columns-repeated="5" table:style-name="ce54"/>
        </table:table-row>
        <table:table-row table:style-name="ro5">
          <table:table-cell table:style-name="ce68" office:value-type="string" ns42:value-type="string" table:number-columns-spanned="6" table:number-rows-spanned="1">
            <text:p>MAP RESULT</text:p>
          </table:table-cell>
          <table:covered-table-cell table:number-columns-repeated="5" table:style-name="ce68"/>
          <table:table-cell table:style-name="ce68" office:value-type="string" ns42:value-type="string" table:number-columns-spanned="6" table:number-rows-spanned="1">
            <text:p>CONTROLLED ROUTING STATES</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6" table:number-rows-spanned="1">
            <text:p>ROUTING MAP ESTABLISHED · DEMO</text:p>
          </table:table-cell>
          <table:covered-table-cell table:number-columns-repeated="5" table:style-name="ce61"/>
          <table:table-cell table:style-name="ce54" office:value-type="string" ns42:value-type="string" table:number-columns-spanned="6" table:number-rows-spanned="1">
            <text:p>PREPARATION NEEDED → COMPLETE</text:p>
          </table:table-cell>
          <table:covered-table-cell table:number-columns-repeated="5" table:style-name="ce54"/>
          <table:table-cell table:style-name="ce54" office:value-type="string" ns42:value-type="string" table:number-columns-spanned="6" table:number-rows-spanned="1">
            <text:p>STATE-SPECIFIC ROUTING</text:p>
          </table:table-cell>
          <table:covered-table-cell table:number-columns-repeated="5" table:style-name="ce54"/>
        </table:table-row>
        <table:table-row table:style-name="ro5">
          <table:table-cell table:style-name="ce61" office:value-type="string" ns42:value-type="string" table:number-columns-spanned="18" table:number-rows-spanned="1">
            <text:p>ROUTING CONTRACT: One supported current state selects one controlled operator route.</text:p>
          </table:table-cell>
          <table:covered-table-cell table:number-columns-repeated="17" table:style-name="ce61"/>
        </table:table-row>
        <table:table-row table:style-name="ro5">
          <table:table-cell table:style-name="ce61" office:value-type="string" ns42:value-type="string" table:number-columns-spanned="18" table:number-rows-spanned="1">
            <text:p>ROUTE OUTPUT: next action + active blocker + required evidence vocabulary + review responsibility + transition preview.</text:p>
          </table:table-cell>
          <table:covered-table-cell table:number-columns-repeated="17" table:style-name="ce61"/>
        </table:table-row>
        <table:table-row table:style-name="ro5">
          <table:table-cell table:style-name="ce61" office:value-type="string" ns42:value-type="string" table:number-columns-spanned="18" table:number-rows-spanned="1">
            <text:p>BOUNDARY: Routing guidance cannot silently alter Inventory state.</text:p>
          </table:table-cell>
          <table:covered-table-cell table:number-columns-repeated="17" table:style-name="ce61"/>
        </table:table-row>
        <table:table-row table:style-name="ro5">
          <table:table-cell table:style-name="ce62" office:value-type="string" ns42:value-type="string" table:number-columns-spanned="18" table:number-rows-spanned="1">
            <text:p>🧰 PREPARATION NEEDED ROUTE · DEMO ROU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UPPORTED CURRENT STATE</text:p>
          </table:table-cell>
          <table:covered-table-cell table:number-columns-repeated="3" table:style-name="ce73"/>
          <table:table-cell table:style-name="ce49" office:value-type="string" ns42:value-type="string" table:number-columns-spanned="4" table:number-rows-spanned="1">
            <text:p>ROUTED NEXT ACTION</text:p>
          </table:table-cell>
          <table:covered-table-cell table:number-columns-repeated="3" table:style-name="ce49"/>
          <table:table-cell table:style-name="ce81" office:value-type="string" ns42:value-type="string" table:number-columns-spanned="4" table:number-rows-spanned="1">
            <text:p>ROUTED ACTIVE BLOCKER</text:p>
          </table:table-cell>
          <table:covered-table-cell table:number-columns-repeated="3" table:style-name="ce81"/>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COMPLETE NEXT PREPARATION RESPONSIBILITY</text:p>
          </table:table-cell>
          <table:covered-table-cell table:number-columns-repeated="3" table:style-name="ce54"/>
          <table:table-cell table:style-name="ce54" office:value-type="string" ns42:value-type="string" table:number-columns-spanned="4" table:number-rows-spanned="1">
            <text:p>NEXT READINESS BLOCKER</text:p>
          </table:table-cell>
          <table:covered-table-cell table:number-columns-repeated="3" table:style-name="ce54"/>
          <table:table-cell table:style-name="ce54" office:value-type="string" ns42:value-type="string" table:number-columns-spanned="6" table:number-rows-spanned="1">
            <text:p>SUPPORTED PREPARATION EVIDENCE</text:p>
          </table:table-cell>
          <table:covered-table-cell table:number-columns-repeated="5" table:style-name="ce54"/>
        </table:table-row>
        <table:table-row table:style-name="ro5">
          <table:table-cell table:style-name="ce68" office:value-type="string" ns42:value-type="string" table:number-columns-spanned="6" table:number-rows-spanned="1">
            <text:p>ROUTING RESULT</text:p>
          </table:table-cell>
          <table:covered-table-cell table:number-columns-repeated="5" table:style-name="ce68"/>
          <table:table-cell table:style-name="ce68" office:value-type="string" ns42:value-type="string" table:number-columns-spanned="6" table:number-rows-spanned="1">
            <text:p>CONTROLLED REVIEW RESPONSIBILITY</text:p>
          </table:table-cell>
          <table:covered-table-cell table:number-columns-repeated="5" table:style-name="ce68"/>
          <table:table-cell table:style-name="ce68" office:value-type="string" ns42:value-type="string" table:number-columns-spanned="6" table:number-rows-spanned="1">
            <text:p>TRANSITION PREVIEW</text:p>
          </table:table-cell>
          <table:covered-table-cell table:number-columns-repeated="5" table:style-name="ce68"/>
        </table:table-row>
        <table:table-row table:style-name="ro20">
          <table:table-cell table:style-name="ce61" office:value-type="string" ns42:value-type="string" table:number-columns-spanned="6" table:number-rows-spanned="1">
            <text:p>STATE ROUTE SUPPORTED · DEMO</text:p>
          </table:table-cell>
          <table:covered-table-cell table:number-columns-repeated="5" table:style-name="ce61"/>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PREPARATION ADVANCEMENT PREVIEW · DEMO</text:p>
          </table:table-cell>
          <table:covered-table-cell table:number-columns-repeated="5" table:style-name="ce54"/>
        </table:table-row>
        <table:table-row table:style-name="ro5">
          <table:table-cell table:style-name="ce61" office:value-type="string" ns42:value-type="string" table:number-columns-spanned="18" table:number-rows-spanned="1">
            <text:p>STATE ROUTE CONTRACT: PREPARATION NEEDED selects its proven lifecycle responsibility without reading the full linear demo chai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1"/>
        </table:table-row>
        <table:table-row table:style-name="ro5">
          <table:table-cell table:style-name="ce62" office:value-type="string" ns42:value-type="string" table:number-columns-spanned="18" table:number-rows-spanned="1">
            <text:p>📝 READY-STATE ROUTE · DEMO ROU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UPPORTED CURRENT STATE</text:p>
          </table:table-cell>
          <table:covered-table-cell table:number-columns-repeated="3" table:style-name="ce73"/>
          <table:table-cell table:style-name="ce49" office:value-type="string" ns42:value-type="string" table:number-columns-spanned="4" table:number-rows-spanned="1">
            <text:p>ROUTED NEXT ACTION</text:p>
          </table:table-cell>
          <table:covered-table-cell table:number-columns-repeated="3" table:style-name="ce49"/>
          <table:table-cell table:style-name="ce81" office:value-type="string" ns42:value-type="string" table:number-columns-spanned="4" table:number-rows-spanned="1">
            <text:p>ROUTED ACTIVE BLOCKER</text:p>
          </table:table-cell>
          <table:covered-table-cell table:number-columns-repeated="3" table:style-name="ce81"/>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READY TO LIST / READY FOR PUBLICATION · DEMO</text:p>
          </table:table-cell>
          <table:covered-table-cell table:number-columns-repeated="3" table:style-name="ce54"/>
          <table:table-cell table:style-name="ce54" office:value-type="string" ns42:value-type="string" table:number-columns-spanned="4" table:number-rows-spanned="1">
            <text:p>CONFIRM LISTING INTENT / AUTHORIZE PUBLICATION</text:p>
          </table:table-cell>
          <table:covered-table-cell table:number-columns-repeated="3" table:style-name="ce54"/>
          <table:table-cell table:style-name="ce54" office:value-type="string" ns42:value-type="string" table:number-columns-spanned="4" table:number-rows-spanned="1">
            <text:p>LISTING RECORD / PUBLICATION AUTHORITY</text:p>
          </table:table-cell>
          <table:covered-table-cell table:number-columns-repeated="3" table:style-name="ce54"/>
          <table:table-cell table:style-name="ce54" office:value-type="string" ns42:value-type="string" table:number-columns-spanned="6" table:number-rows-spanned="1">
            <text:p>SUPPORTED INTENT OR AUTHORIZATION EVIDENCE</text:p>
          </table:table-cell>
          <table:covered-table-cell table:number-columns-repeated="5" table:style-name="ce54"/>
        </table:table-row>
        <table:table-row table:style-name="ro5">
          <table:table-cell table:style-name="ce68" office:value-type="string" ns42:value-type="string" table:number-columns-spanned="6" table:number-rows-spanned="1">
            <text:p>ROUTING RESULT</text:p>
          </table:table-cell>
          <table:covered-table-cell table:number-columns-repeated="5" table:style-name="ce68"/>
          <table:table-cell table:style-name="ce68" office:value-type="string" ns42:value-type="string" table:number-columns-spanned="6" table:number-rows-spanned="1">
            <text:p>CONTROLLED REVIEW RESPONSIBILITY</text:p>
          </table:table-cell>
          <table:covered-table-cell table:number-columns-repeated="5" table:style-name="ce68"/>
          <table:table-cell table:style-name="ce68" office:value-type="string" ns42:value-type="string" table:number-columns-spanned="6" table:number-rows-spanned="1">
            <text:p>TRANSITION PREVIEW</text:p>
          </table:table-cell>
          <table:covered-table-cell table:number-columns-repeated="5" table:style-name="ce68"/>
        </table:table-row>
        <table:table-row table:style-name="ro20">
          <table:table-cell table:style-name="ce61" office:value-type="string" ns42:value-type="string" table:number-columns-spanned="6" table:number-rows-spanned="1">
            <text:p>STATE ROUTE SUPPORTED · DEMO</text:p>
          </table:table-cell>
          <table:covered-table-cell table:number-columns-repeated="5" table:style-name="ce61"/>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NEXT PUBLICATION RESPONSIBILITY PREVIEW · DEMO</text:p>
          </table:table-cell>
          <table:covered-table-cell table:number-columns-repeated="5" table:style-name="ce54"/>
        </table:table-row>
        <table:table-row table:style-name="ro5">
          <table:table-cell table:style-name="ce61" office:value-type="string" ns42:value-type="string" table:number-columns-spanned="18" table:number-rows-spanned="1">
            <text:p>STATE ROUTE CONTRACT: READY TO LIST / READY FOR PUBLICATION selects its proven lifecycle responsibility without reading the full linear demo chai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1"/>
        </table:table-row>
        <table:table-row table:style-name="ro5">
          <table:table-cell table:style-name="ce62" office:value-type="string" ns42:value-type="string" table:number-columns-spanned="18" table:number-rows-spanned="1">
            <text:p>📡 PUBLICATION + EXPOSURE ROUTE · DEMO ROU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UPPORTED CURRENT STATE</text:p>
          </table:table-cell>
          <table:covered-table-cell table:number-columns-repeated="3" table:style-name="ce73"/>
          <table:table-cell table:style-name="ce49" office:value-type="string" ns42:value-type="string" table:number-columns-spanned="4" table:number-rows-spanned="1">
            <text:p>ROUTED NEXT ACTION</text:p>
          </table:table-cell>
          <table:covered-table-cell table:number-columns-repeated="3" table:style-name="ce49"/>
          <table:table-cell table:style-name="ce81" office:value-type="string" ns42:value-type="string" table:number-columns-spanned="4" table:number-rows-spanned="1">
            <text:p>ROUTED ACTIVE BLOCKER</text:p>
          </table:table-cell>
          <table:covered-table-cell table:number-columns-repeated="3" table:style-name="ce81"/>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PUBLISHED / ACTIVE PLATFORM EXPOSURE · DEMO</text:p>
          </table:table-cell>
          <table:covered-table-cell table:number-columns-repeated="3" table:style-name="ce54"/>
          <table:table-cell table:style-name="ce54" office:value-type="string" ns42:value-type="string" table:number-columns-spanned="4" table:number-rows-spanned="1">
            <text:p>REVIEW PLATFORM EXPOSURE / OBSERVE SALE</text:p>
          </table:table-cell>
          <table:covered-table-cell table:number-columns-repeated="3" table:style-name="ce54"/>
          <table:table-cell table:style-name="ce54" office:value-type="string" ns42:value-type="string" table:number-columns-spanned="4" table:number-rows-spanned="1">
            <text:p>SALE EVIDENCE</text:p>
          </table:table-cell>
          <table:covered-table-cell table:number-columns-repeated="3" table:style-name="ce54"/>
          <table:table-cell table:style-name="ce54" office:value-type="string" ns42:value-type="string" table:number-columns-spanned="6" table:number-rows-spanned="1">
            <text:p>FACTUAL PUBLICATION, EXPOSURE, OR SALE RESULT</text:p>
          </table:table-cell>
          <table:covered-table-cell table:number-columns-repeated="5" table:style-name="ce54"/>
        </table:table-row>
        <table:table-row table:style-name="ro5">
          <table:table-cell table:style-name="ce68" office:value-type="string" ns42:value-type="string" table:number-columns-spanned="6" table:number-rows-spanned="1">
            <text:p>ROUTING RESULT</text:p>
          </table:table-cell>
          <table:covered-table-cell table:number-columns-repeated="5" table:style-name="ce68"/>
          <table:table-cell table:style-name="ce68" office:value-type="string" ns42:value-type="string" table:number-columns-spanned="6" table:number-rows-spanned="1">
            <text:p>CONTROLLED REVIEW RESPONSIBILITY</text:p>
          </table:table-cell>
          <table:covered-table-cell table:number-columns-repeated="5" table:style-name="ce68"/>
          <table:table-cell table:style-name="ce68" office:value-type="string" ns42:value-type="string" table:number-columns-spanned="6" table:number-rows-spanned="1">
            <text:p>TRANSITION PREVIEW</text:p>
          </table:table-cell>
          <table:covered-table-cell table:number-columns-repeated="5" table:style-name="ce68"/>
        </table:table-row>
        <table:table-row table:style-name="ro20">
          <table:table-cell table:style-name="ce61" office:value-type="string" ns42:value-type="string" table:number-columns-spanned="6" table:number-rows-spanned="1">
            <text:p>STATE ROUTE SUPPORTED · DEMO</text:p>
          </table:table-cell>
          <table:covered-table-cell table:number-columns-repeated="5" table:style-name="ce61"/>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SALE-RESPONSIBILITY PREVIEW · DEMO</text:p>
          </table:table-cell>
          <table:covered-table-cell table:number-columns-repeated="5" table:style-name="ce54"/>
        </table:table-row>
        <table:table-row table:style-name="ro5">
          <table:table-cell table:style-name="ce61" office:value-type="string" ns42:value-type="string" table:number-columns-spanned="18" table:number-rows-spanned="1">
            <text:p>STATE ROUTE CONTRACT: PUBLISHED / ACTIVE PLATFORM EXPOSURE selects its proven lifecycle responsibility without reading the full linear demo chai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1"/>
        </table:table-row>
        <table:table-row table:style-name="ro5">
          <table:table-cell table:style-name="ce62" office:value-type="string" ns42:value-type="string" table:number-columns-spanned="18" table:number-rows-spanned="1">
            <text:p>💰 SOLD ROUTE · DEMO ROU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UPPORTED CURRENT STATE</text:p>
          </table:table-cell>
          <table:covered-table-cell table:number-columns-repeated="3" table:style-name="ce73"/>
          <table:table-cell table:style-name="ce49" office:value-type="string" ns42:value-type="string" table:number-columns-spanned="4" table:number-rows-spanned="1">
            <text:p>ROUTED NEXT ACTION</text:p>
          </table:table-cell>
          <table:covered-table-cell table:number-columns-repeated="3" table:style-name="ce49"/>
          <table:table-cell table:style-name="ce81" office:value-type="string" ns42:value-type="string" table:number-columns-spanned="4" table:number-rows-spanned="1">
            <text:p>ROUTED ACTIVE BLOCKER</text:p>
          </table:table-cell>
          <table:covered-table-cell table:number-columns-repeated="3" table:style-name="ce81"/>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SOLD · DEMO</text:p>
          </table:table-cell>
          <table:covered-table-cell table:number-columns-repeated="3" table:style-name="ce54"/>
          <table:table-cell table:style-name="ce54" office:value-type="string" ns42:value-type="string" table:number-columns-spanned="4" table:number-rows-spanned="1">
            <text:p>REVIEW FULFILLMENT PREPARATION</text:p>
          </table:table-cell>
          <table:covered-table-cell table:number-columns-repeated="3" table:style-name="ce54"/>
          <table:table-cell table:style-name="ce54" office:value-type="string" ns42:value-type="string" table:number-columns-spanned="4" table:number-rows-spanned="1">
            <text:p>FULFILLMENT PREPARATION</text:p>
          </table:table-cell>
          <table:covered-table-cell table:number-columns-repeated="3" table:style-name="ce54"/>
          <table:table-cell table:style-name="ce54" office:value-type="string" ns42:value-type="string" table:number-columns-spanned="6" table:number-rows-spanned="1">
            <text:p>SUPPORTED PACKAGING + SHIPMENT PATH REVIEW</text:p>
          </table:table-cell>
          <table:covered-table-cell table:number-columns-repeated="5" table:style-name="ce54"/>
        </table:table-row>
        <table:table-row table:style-name="ro5">
          <table:table-cell table:style-name="ce68" office:value-type="string" ns42:value-type="string" table:number-columns-spanned="6" table:number-rows-spanned="1">
            <text:p>ROUTING RESULT</text:p>
          </table:table-cell>
          <table:covered-table-cell table:number-columns-repeated="5" table:style-name="ce68"/>
          <table:table-cell table:style-name="ce68" office:value-type="string" ns42:value-type="string" table:number-columns-spanned="6" table:number-rows-spanned="1">
            <text:p>CONTROLLED REVIEW RESPONSIBILITY</text:p>
          </table:table-cell>
          <table:covered-table-cell table:number-columns-repeated="5" table:style-name="ce68"/>
          <table:table-cell table:style-name="ce68" office:value-type="string" ns42:value-type="string" table:number-columns-spanned="6" table:number-rows-spanned="1">
            <text:p>TRANSITION PREVIEW</text:p>
          </table:table-cell>
          <table:covered-table-cell table:number-columns-repeated="5" table:style-name="ce68"/>
        </table:table-row>
        <table:table-row table:style-name="ro20">
          <table:table-cell table:style-name="ce61" office:value-type="string" ns42:value-type="string" table:number-columns-spanned="6" table:number-rows-spanned="1">
            <text:p>STATE ROUTE SUPPORTED · DEMO</text:p>
          </table:table-cell>
          <table:covered-table-cell table:number-columns-repeated="5" table:style-name="ce61"/>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READY FOR SHIPMENT PREVIEW · DEMO</text:p>
          </table:table-cell>
          <table:covered-table-cell table:number-columns-repeated="5" table:style-name="ce54"/>
        </table:table-row>
        <table:table-row table:style-name="ro5">
          <table:table-cell table:style-name="ce61" office:value-type="string" ns42:value-type="string" table:number-columns-spanned="18" table:number-rows-spanned="1">
            <text:p>STATE ROUTE CONTRACT: SOLD selects its proven lifecycle responsibility without reading the full linear demo chai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1"/>
        </table:table-row>
        <table:table-row table:style-name="ro5">
          <table:table-cell table:style-name="ce62" office:value-type="string" ns42:value-type="string" table:number-columns-spanned="18" table:number-rows-spanned="1">
            <text:p>📦 SHIPMENT ROUTE · DEMO ROU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UPPORTED CURRENT STATE</text:p>
          </table:table-cell>
          <table:covered-table-cell table:number-columns-repeated="3" table:style-name="ce73"/>
          <table:table-cell table:style-name="ce49" office:value-type="string" ns42:value-type="string" table:number-columns-spanned="4" table:number-rows-spanned="1">
            <text:p>ROUTED NEXT ACTION</text:p>
          </table:table-cell>
          <table:covered-table-cell table:number-columns-repeated="3" table:style-name="ce49"/>
          <table:table-cell table:style-name="ce81" office:value-type="string" ns42:value-type="string" table:number-columns-spanned="4" table:number-rows-spanned="1">
            <text:p>ROUTED ACTIVE BLOCKER</text:p>
          </table:table-cell>
          <table:covered-table-cell table:number-columns-repeated="3" table:style-name="ce81"/>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READY FOR SHIPMENT / SHIPPED · DEMO</text:p>
          </table:table-cell>
          <table:covered-table-cell table:number-columns-repeated="3" table:style-name="ce54"/>
          <table:table-cell table:style-name="ce54" office:value-type="string" ns42:value-type="string" table:number-columns-spanned="4" table:number-rows-spanned="1">
            <text:p>RECORD SHIPMENT RESULT / REVIEW DELIVERY EVIDENCE</text:p>
          </table:table-cell>
          <table:covered-table-cell table:number-columns-repeated="3" table:style-name="ce54"/>
          <table:table-cell table:style-name="ce54" office:value-type="string" ns42:value-type="string" table:number-columns-spanned="4" table:number-rows-spanned="1">
            <text:p>SHIPMENT OR DELIVERY EVIDENCE</text:p>
          </table:table-cell>
          <table:covered-table-cell table:number-columns-repeated="3" table:style-name="ce54"/>
          <table:table-cell table:style-name="ce54" office:value-type="string" ns42:value-type="string" table:number-columns-spanned="6" table:number-rows-spanned="1">
            <text:p>FACTUAL SHIPMENT OR DELIVERY RESULT</text:p>
          </table:table-cell>
          <table:covered-table-cell table:number-columns-repeated="5" table:style-name="ce54"/>
        </table:table-row>
        <table:table-row table:style-name="ro5">
          <table:table-cell table:style-name="ce68" office:value-type="string" ns42:value-type="string" table:number-columns-spanned="6" table:number-rows-spanned="1">
            <text:p>ROUTING RESULT</text:p>
          </table:table-cell>
          <table:covered-table-cell table:number-columns-repeated="5" table:style-name="ce68"/>
          <table:table-cell table:style-name="ce68" office:value-type="string" ns42:value-type="string" table:number-columns-spanned="6" table:number-rows-spanned="1">
            <text:p>CONTROLLED REVIEW RESPONSIBILITY</text:p>
          </table:table-cell>
          <table:covered-table-cell table:number-columns-repeated="5" table:style-name="ce68"/>
          <table:table-cell table:style-name="ce68" office:value-type="string" ns42:value-type="string" table:number-columns-spanned="6" table:number-rows-spanned="1">
            <text:p>TRANSITION PREVIEW</text:p>
          </table:table-cell>
          <table:covered-table-cell table:number-columns-repeated="5" table:style-name="ce68"/>
        </table:table-row>
        <table:table-row table:style-name="ro20">
          <table:table-cell table:style-name="ce61" office:value-type="string" ns42:value-type="string" table:number-columns-spanned="6" table:number-rows-spanned="1">
            <text:p>STATE ROUTE SUPPORTED · DEMO</text:p>
          </table:table-cell>
          <table:covered-table-cell table:number-columns-repeated="5" table:style-name="ce61"/>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SHIPPED OR DELIVERED PREVIEW · DEMO</text:p>
          </table:table-cell>
          <table:covered-table-cell table:number-columns-repeated="5" table:style-name="ce54"/>
        </table:table-row>
        <table:table-row table:style-name="ro5">
          <table:table-cell table:style-name="ce61" office:value-type="string" ns42:value-type="string" table:number-columns-spanned="18" table:number-rows-spanned="1">
            <text:p>STATE ROUTE CONTRACT: READY FOR SHIPMENT / SHIPPED selects its proven lifecycle responsibility without reading the full linear demo chai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1"/>
        </table:table-row>
        <table:table-row table:style-name="ro5">
          <table:table-cell table:style-name="ce62" office:value-type="string" ns42:value-type="string" table:number-columns-spanned="18" table:number-rows-spanned="1">
            <text:p>💵 DELIVERY + SETTLEMENT ROUTE · DEMO ROU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UPPORTED CURRENT STATE</text:p>
          </table:table-cell>
          <table:covered-table-cell table:number-columns-repeated="3" table:style-name="ce73"/>
          <table:table-cell table:style-name="ce49" office:value-type="string" ns42:value-type="string" table:number-columns-spanned="4" table:number-rows-spanned="1">
            <text:p>ROUTED NEXT ACTION</text:p>
          </table:table-cell>
          <table:covered-table-cell table:number-columns-repeated="3" table:style-name="ce49"/>
          <table:table-cell table:style-name="ce81" office:value-type="string" ns42:value-type="string" table:number-columns-spanned="4" table:number-rows-spanned="1">
            <text:p>ROUTED ACTIVE BLOCKER</text:p>
          </table:table-cell>
          <table:covered-table-cell table:number-columns-repeated="3" table:style-name="ce81"/>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DELIVERED / PAID OUT · DEMO</text:p>
          </table:table-cell>
          <table:covered-table-cell table:number-columns-repeated="3" table:style-name="ce54"/>
          <table:table-cell table:style-name="ce54" office:value-type="string" ns42:value-type="string" table:number-columns-spanned="4" table:number-rows-spanned="1">
            <text:p>REVIEW SETTLEMENT EVIDENCE / REVIEW LIFECYCLE COMPLETION</text:p>
          </table:table-cell>
          <table:covered-table-cell table:number-columns-repeated="3" table:style-name="ce54"/>
          <table:table-cell table:style-name="ce54" office:value-type="string" ns42:value-type="string" table:number-columns-spanned="4" table:number-rows-spanned="1">
            <text:p>SETTLEMENT OR COMPLETION CROSS-CHECK</text:p>
          </table:table-cell>
          <table:covered-table-cell table:number-columns-repeated="3" table:style-name="ce54"/>
          <table:table-cell table:style-name="ce54" office:value-type="string" ns42:value-type="string" table:number-columns-spanned="6" table:number-rows-spanned="1">
            <text:p>FACTUAL SETTLEMENT EVIDENCE / SUPPORTED COMPLETION FACTS</text:p>
          </table:table-cell>
          <table:covered-table-cell table:number-columns-repeated="5" table:style-name="ce54"/>
        </table:table-row>
        <table:table-row table:style-name="ro5">
          <table:table-cell table:style-name="ce68" office:value-type="string" ns42:value-type="string" table:number-columns-spanned="6" table:number-rows-spanned="1">
            <text:p>ROUTING RESULT</text:p>
          </table:table-cell>
          <table:covered-table-cell table:number-columns-repeated="5" table:style-name="ce68"/>
          <table:table-cell table:style-name="ce68" office:value-type="string" ns42:value-type="string" table:number-columns-spanned="6" table:number-rows-spanned="1">
            <text:p>CONTROLLED REVIEW RESPONSIBILITY</text:p>
          </table:table-cell>
          <table:covered-table-cell table:number-columns-repeated="5" table:style-name="ce68"/>
          <table:table-cell table:style-name="ce68" office:value-type="string" ns42:value-type="string" table:number-columns-spanned="6" table:number-rows-spanned="1">
            <text:p>TRANSITION PREVIEW</text:p>
          </table:table-cell>
          <table:covered-table-cell table:number-columns-repeated="5" table:style-name="ce68"/>
        </table:table-row>
        <table:table-row table:style-name="ro20">
          <table:table-cell table:style-name="ce61" office:value-type="string" ns42:value-type="string" table:number-columns-spanned="6" table:number-rows-spanned="1">
            <text:p>STATE ROUTE SUPPORTED · DEMO</text:p>
          </table:table-cell>
          <table:covered-table-cell table:number-columns-repeated="5" table:style-name="ce61"/>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PAID OUT OR COMPLETE PREVIEW · DEMO</text:p>
          </table:table-cell>
          <table:covered-table-cell table:number-columns-repeated="5" table:style-name="ce54"/>
        </table:table-row>
        <table:table-row table:style-name="ro5">
          <table:table-cell table:style-name="ce61" office:value-type="string" ns42:value-type="string" table:number-columns-spanned="18" table:number-rows-spanned="1">
            <text:p>STATE ROUTE CONTRACT: DELIVERED / PAID OUT selects its proven lifecycle responsibility without reading the full linear demo chai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1"/>
        </table:table-row>
        <table:table-row table:style-name="ro5">
          <table:table-cell table:style-name="ce62" office:value-type="string" ns42:value-type="string" table:number-columns-spanned="18" table:number-rows-spanned="1">
            <text:p>🏁 COMPLETE TERMINAL-STATE PROTECTION · DEMO ROU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UPPORTED CURRENT STATE</text:p>
          </table:table-cell>
          <table:covered-table-cell table:number-columns-repeated="3" table:style-name="ce73"/>
          <table:table-cell table:style-name="ce49" office:value-type="string" ns42:value-type="string" table:number-columns-spanned="4" table:number-rows-spanned="1">
            <text:p>ROUTED NEXT ACTION</text:p>
          </table:table-cell>
          <table:covered-table-cell table:number-columns-repeated="3" table:style-name="ce49"/>
          <table:table-cell table:style-name="ce81" office:value-type="string" ns42:value-type="string" table:number-columns-spanned="4" table:number-rows-spanned="1">
            <text:p>ACTIVE BLOCKER</text:p>
          </table:table-cell>
          <table:covered-table-cell table:number-columns-repeated="3" table:style-name="ce81"/>
          <table:table-cell table:style-name="ce49" office:value-type="string" ns42:value-type="string" table:number-columns-spanned="6" table:number-rows-spanned="1">
            <text:p>TRANSITION PREVIEW</text:p>
          </table:table-cell>
          <table:covered-table-cell table:number-columns-repeated="5" table:style-name="ce49"/>
        </table:table-row>
        <table:table-row table:style-name="ro5">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NO NEXT LIFECYCLE ACTION</text:p>
          </table:table-cell>
          <table:covered-table-cell table:number-columns-repeated="3" table:style-name="ce54"/>
          <table:table-cell table:style-name="ce54" office:value-type="string" ns42:value-type="string" table:number-columns-spanned="4" table:number-rows-spanned="1">
            <text:p>NONE · TERMINAL STATE</text:p>
          </table:table-cell>
          <table:covered-table-cell table:number-columns-repeated="3" table:style-name="ce54"/>
          <table:table-cell table:style-name="ce54" office:value-type="string" ns42:value-type="string" table:number-columns-spanned="6" table:number-rows-spanned="1">
            <text:p>NONE · TERMINAL STATE</text:p>
          </table:table-cell>
          <table:covered-table-cell table:number-columns-repeated="5" table:style-name="ce54"/>
        </table:table-row>
        <table:table-row table:style-name="ro5">
          <table:table-cell table:style-name="ce68" office:value-type="string" ns42:value-type="string" table:number-columns-spanned="6" table:number-rows-spanned="1">
            <text:p>TERMINAL ROUTE RESULT</text:p>
          </table:table-cell>
          <table:covered-table-cell table:number-columns-repeated="5" table:style-name="ce68"/>
          <table:table-cell table:style-name="ce68" office:value-type="string" ns42:value-type="string" table:number-columns-spanned="6" table:number-rows-spanned="1">
            <text:p>OPERATOR GUIDANCE</text:p>
          </table:table-cell>
          <table:covered-table-cell table:number-columns-repeated="5" table:style-name="ce68"/>
          <table:table-cell table:style-name="ce68" office:value-type="string" ns42:value-type="string" table:number-columns-spanned="6" table:number-rows-spanned="1">
            <text:p>HISTORY PRESERVATION</text:p>
          </table:table-cell>
          <table:covered-table-cell table:number-columns-repeated="5" table:style-name="ce68"/>
        </table:table-row>
        <table:table-row table:style-name="ro20">
          <table:table-cell table:style-name="ce61" office:value-type="string" ns42:value-type="string" table:number-columns-spanned="6" table:number-rows-spanned="1">
            <text:p>COMPLETE ROUTE PROTECTED · DEMO</text:p>
          </table:table-cell>
          <table:covered-table-cell table:number-columns-repeated="5" table:style-name="ce61"/>
          <table:table-cell table:style-name="ce54" office:value-type="string" ns42:value-type="string" table:number-columns-spanned="6" table:number-rows-spanned="1">
            <text:p>LIFECYCLE COMPLETE · NO INVENTED NEXT ACTION</text:p>
          </table:table-cell>
          <table:covered-table-cell table:number-columns-repeated="5" table:style-name="ce54"/>
          <table:table-cell table:style-name="ce54" office:value-type="string" ns42:value-type="string" table:number-columns-spanned="6" table:number-rows-spanned="1">
            <text:p>ALL SUPPORTED HISTORY PRESERVED</text:p>
          </table:table-cell>
          <table:covered-table-cell table:number-columns-repeated="5" table:style-name="ce54"/>
        </table:table-row>
        <table:table-row table:style-name="ro5">
          <table:table-cell table:style-name="ce61" office:value-type="string" ns42:value-type="string" table:number-columns-spanned="18" table:number-rows-spanned="1">
            <text:p>TERMINAL CONTRACT: COMPLETE is a terminal sale-lifecycle state for this proven contract.</text:p>
          </table:table-cell>
          <table:covered-table-cell table:number-columns-repeated="17" table:style-name="ce61"/>
        </table:table-row>
        <table:table-row table:style-name="ro5">
          <table:table-cell table:style-name="ce61" office:value-type="string" ns42:value-type="string" table:number-columns-spanned="18" table:number-rows-spanned="1">
            <text:p>BOUNDARY: MarketDEX does not invent another lifecycle step merely to keep the workflow moving.</text:p>
          </table:table-cell>
          <table:covered-table-cell table:number-columns-repeated="17" table:style-name="ce61"/>
        </table:table-row>
        <table:table-row table:style-name="ro5">
          <table:table-cell table:style-name="ce61" office:value-type="string" ns42:value-type="string" table:number-columns-spanned="18" table:number-rows-spanned="1">
            <text:p>REVIEW / UNKNOWN CONDITIONS: unresolved factual evidence remains routed to review and is not treated as COMPLETE.</text:p>
          </table:table-cell>
          <table:covered-table-cell table:number-columns-repeated="17" table:style-name="ce61"/>
        </table:table-row>
        <table:table-row table:style-name="ro5">
          <table:table-cell table:style-name="ce62" office:value-type="string" ns42:value-type="string" table:number-columns-spanned="18" table:number-rows-spanned="1">
            <text:p>🎛️ STATE-DRIVEN INVENTORY ACTION CENTER GATE · DEMO ROU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ELECTED RECORD</text:p>
          </table:table-cell>
          <table:covered-table-cell table:number-columns-repeated="3" table:style-name="ce73"/>
          <table:table-cell table:style-name="ce49" office:value-type="string" ns42:value-type="string" table:number-columns-spanned="4" table:number-rows-spanned="1">
            <text:p>SUPPORTED CURRENT STATE</text:p>
          </table:table-cell>
          <table:covered-table-cell table:number-columns-repeated="3" table:style-name="ce49"/>
          <table:table-cell table:style-name="ce81" office:value-type="string" ns42:value-type="string" table:number-columns-spanned="4" table:number-rows-spanned="1">
            <text:p>ROUTED OPERATOR PATH</text:p>
          </table:table-cell>
          <table:covered-table-cell table:number-columns-repeated="3" table:style-name="ce81"/>
          <table:table-cell table:style-name="ce49" office:value-type="string" ns42:value-type="string" table:number-columns-spanned="6" table:number-rows-spanned="1">
            <text:p>OPERATING BOUNDARY</text:p>
          </table:table-cell>
          <table:covered-table-cell table:number-columns-repeated="5" table:style-name="ce49"/>
        </table:table-row>
        <table:table-row table:style-name="ro5">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 → DELIVERY EVIDENCE → FACTUAL DELIVERY RESULT</text:p>
          </table:table-cell>
          <table:covered-table-cell table:number-columns-repeated="3" table:style-name="ce54"/>
          <table:table-cell table:style-name="ce54" office:value-type="string" ns42:value-type="string" table:number-columns-spanned="6" table:number-rows-spanned="1">
            <text:p>NO SILENT STATE CHANGE</text:p>
          </table:table-cell>
          <table:covered-table-cell table:number-columns-repeated="5" table:style-name="ce54"/>
        </table:table-row>
        <table:table-row table:style-name="ro5">
          <table:table-cell table:style-name="ce68" office:value-type="string" ns42:value-type="string" table:number-columns-spanned="6" table:number-rows-spanned="1">
            <text:p>STATE-DRIVEN CROSS-CHECK</text:p>
          </table:table-cell>
          <table:covered-table-cell table:number-columns-repeated="5" table:style-name="ce68"/>
          <table:table-cell table:style-name="ce68" office:value-type="string" ns42:value-type="string" table:number-columns-spanned="6" table:number-rows-spanned="1">
            <text:p>ACTION CENTER RESULT</text:p>
          </table:table-cell>
          <table:covered-table-cell table:number-columns-repeated="5" table:style-name="ce68"/>
          <table:table-cell table:style-name="ce68" office:value-type="string" ns42:value-type="string" table:number-columns-spanned="6" table:number-rows-spanned="1">
            <text:p>TERMINAL PROTECTION</text:p>
          </table:table-cell>
          <table:covered-table-cell table:number-columns-repeated="5" table:style-name="ce68"/>
        </table:table-row>
        <table:table-row table:style-name="ro20">
          <table:table-cell table:style-name="ce61" office:value-type="string" ns42:value-type="string" table:number-columns-spanned="6" table:number-rows-spanned="1">
            <text:p>STATE → ACTION → BLOCKER → EVIDENCE → REVIEW → PREVIEW · SUPPORTED</text:p>
          </table:table-cell>
          <table:covered-table-cell table:number-columns-repeated="5" table:style-name="ce61"/>
          <table:table-cell table:style-name="ce54" office:value-type="string" ns42:value-type="string" table:number-columns-spanned="6" table:number-rows-spanned="1">
            <text:p>STATE-DRIVEN OPERATOR ROUTING SUPPORTED · DEMO</text:p>
          </table:table-cell>
          <table:covered-table-cell table:number-columns-repeated="5" table:style-name="ce54"/>
          <table:table-cell table:style-name="ce54" office:value-type="string" ns42:value-type="string" table:number-columns-spanned="6" table:number-rows-spanned="1">
            <text:p>COMPLETE → NO INVENTED NEXT ACTION</text:p>
          </table:table-cell>
          <table:covered-table-cell table:number-columns-repeated="5" table:style-name="ce54"/>
        </table:table-row>
        <table:table-row table:style-name="ro5">
          <table:table-cell table:style-name="ce61" office:value-type="string" ns42:value-type="string" table:number-columns-spanned="18" table:number-rows-spanned="1">
            <text:p>ACTION CENTER ROUTING CROSS-CHECK · DEMO: selected record + supported current state + controlled routing map = one supported operator path.</text:p>
          </table:table-cell>
          <table:covered-table-cell table:number-columns-repeated="17" table:style-name="ce61"/>
        </table:table-row>
        <table:table-row table:style-name="ro5">
          <table:table-cell table:style-name="ce61" office:value-type="string" ns42:value-type="string" table:number-columns-spanned="18" table:number-rows-spanned="1">
            <text:p>OPERATING FLOW: SELECT RECORD → READ SUPPORTED STATE → ROUTE NEXT ACTION → ROUTE BLOCKER → ROUTE EVIDENCE VOCABULARY → REVIEW → PREVIEW.</text:p>
          </table:table-cell>
          <table:covered-table-cell table:number-columns-repeated="17" table:style-name="ce61"/>
        </table:table-row>
        <table:table-row table:style-name="ro5">
          <table:table-cell table:style-name="ce61" office:value-type="string" ns42:value-type="string" table:number-columns-spanned="18" table:number-rows-spanned="1">
            <text:p>BOUNDARY: No buttons, macros, connectors, automatic state writes, or silent state mutation are created.</text:p>
          </table:table-cell>
          <table:covered-table-cell table:number-columns-repeated="17" table:style-name="ce61"/>
        </table:table-row>
        <table:table-row table:style-name="ro5">
          <table:table-cell table:style-name="ce61" office:value-type="string" ns42:value-type="string" table:number-columns-spanned="18" table:number-rows-spanned="1">
            <text:p>OPERATING PRINCIPLE: One current supported state should tell the operator what responsibility comes next.</text:p>
          </table:table-cell>
          <table:covered-table-cell table:number-columns-repeated="17" table:style-name="ce61"/>
        </table:table-row>
        <table:table-row table:style-name="ro5">
          <table:table-cell table:style-name="ce62" office:value-type="string" ns42:value-type="string" table:number-columns-spanned="18" table:number-rows-spanned="1">
            <text:p>🎯 CONTROLLED SELECTED-STATE INPUT · FORMULA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INPUT RESPONSIBILITY</text:p>
          </table:table-cell>
          <table:covered-table-cell table:number-columns-repeated="3" table:style-name="ce73"/>
          <table:table-cell table:style-name="ce49" office:value-type="string" ns42:value-type="string" table:number-columns-spanned="4" table:number-rows-spanned="1">
            <text:p>CONTROLLED SELECTED STATE</text:p>
          </table:table-cell>
          <table:covered-table-cell table:number-columns-repeated="3" table:style-name="ce49"/>
          <table:table-cell table:style-name="ce81" office:value-type="string" ns42:value-type="string" table:number-columns-spanned="4" table:number-rows-spanned="1">
            <text:p>SOURCE ROLE</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ELECT CURRENT SUPPORTED STATE</text:p>
          </table:table-cell>
          <table:covered-table-cell table:number-columns-repeated="3" table:style-name="ce54"/>
          <table:table-cell table:style-name="ce54" office:value-type="string" ns42:value-type="string" table:number-columns-spanned="4" table:number-rows-spanned="1">
            <text:p>SHIPPED</text:p>
          </table:table-cell>
          <table:covered-table-cell table:number-columns-repeated="3" table:style-name="ce54"/>
          <table:table-cell table:style-name="ce54" office:value-type="string" ns42:value-type="string" table:number-columns-spanned="4" table:number-rows-spanned="1">
            <text:p>ACTION CENTER ROUTING SOURCE</text:p>
          </table:table-cell>
          <table:covered-table-cell table:number-columns-repeated="3" table:style-name="ce54"/>
          <table:table-cell table:style-name="ce54" office:value-type="string" ns42:value-type="string" table:number-columns-spanned="6" table:number-rows-spanned="1">
            <text:p>ONE CONTROLLED INPUT</text:p>
          </table:table-cell>
          <table:covered-table-cell table:number-columns-repeated="5" table:style-name="ce54"/>
        </table:table-row>
        <table:table-row table:style-name="ro5">
          <table:table-cell table:style-name="ce68" office:value-type="string" ns42:value-type="string" table:number-columns-spanned="6" table:number-rows-spanned="1">
            <text:p>INPUT RESULT</text:p>
          </table:table-cell>
          <table:covered-table-cell table:number-columns-repeated="5" table:style-name="ce68"/>
          <table:table-cell table:style-name="ce68" office:value-type="string" ns42:value-type="string" table:number-columns-spanned="6" table:number-rows-spanned="1">
            <text:p>SELECTED STATE SOURCE</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5">
          <table:table-cell table:style-name="ce61" office:value-type="string" ns42:value-type="string" table:number-columns-spanned="6" table:number-rows-spanned="1">
            <text:p>STATE INPUT RECORDED · DEMO</text:p>
          </table:table-cell>
          <table:covered-table-cell table:number-columns-repeated="5" table:style-name="ce61"/>
          <table:table-cell table:style-name="ce54" office:value-type="string" ns42:value-type="string" table:number-columns-spanned="6" table:number-rows-spanned="1">
            <text:p>SHIPPED · DEMO</text:p>
          </table:table-cell>
          <table:covered-table-cell table:number-columns-repeated="5" table:style-name="ce54"/>
          <table:table-cell table:style-name="ce54" office:value-type="string" ns42:value-type="string" table:number-columns-spanned="6" table:number-rows-spanned="1">
            <text:p>STATE NORMALIZATION</text:p>
          </table:table-cell>
          <table:covered-table-cell table:number-columns-repeated="5" table:style-name="ce54"/>
        </table:table-row>
        <table:table-row table:style-name="ro5">
          <table:table-cell table:style-name="ce54" office:value-type="string" ns42:value-type="string" table:number-columns-spanned="18" table:number-rows-spanned="1">
            <text:p>INPUT CONTRACT: One selected-state value becomes the formula-routing source for the Action Center.</text:p>
          </table:table-cell>
          <table:covered-table-cell table:number-columns-repeated="17" table:style-name="ce54"/>
        </table:table-row>
        <table:table-row table:style-name="ro5">
          <table:table-cell table:style-name="ce54" office:value-type="string" ns42:value-type="string" table:number-columns-spanned="18" table:number-rows-spanned="1">
            <text:p>BOUNDARY: Selected-state input is routing context only and does not mutate Inventory state.</text:p>
          </table:table-cell>
          <table:covered-table-cell table:number-columns-repeated="17" table:style-name="ce54"/>
        </table:table-row>
        <table:table-row table:style-name="ro5">
          <table:table-cell table:style-name="ce62" office:value-type="string" ns42:value-type="string" table:number-columns-spanned="18" table:number-rows-spanned="1">
            <text:p>🧹 STATE NORMALIZATION + FAIL-SAFE LAYER · FORMULA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OURCE INPUT</text:p>
          </table:table-cell>
          <table:covered-table-cell table:number-columns-repeated="3" table:style-name="ce73"/>
          <table:table-cell table:style-name="ce49" office:value-type="string" ns42:value-type="string" table:number-columns-spanned="4" table:number-rows-spanned="1">
            <text:p>NORMALIZATION RULE</text:p>
          </table:table-cell>
          <table:covered-table-cell table:number-columns-repeated="3" table:style-name="ce49"/>
          <table:table-cell table:style-name="ce81" office:value-type="string" ns42:value-type="string" table:number-columns-spanned="4" table:number-rows-spanned="1">
            <text:p>NORMALIZED STATE</text:p>
          </table:table-cell>
          <table:covered-table-cell table:number-columns-repeated="3" table:style-name="ce81"/>
          <table:table-cell table:style-name="ce49" office:value-type="string" ns42:value-type="string" table:number-columns-spanned="6" table:number-rows-spanned="1">
            <text:p>FAIL-SAFE</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TRIM + UPPERCASE + CONTROLLED MAP</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6" table:number-rows-spanned="1">
            <text:p>UNMAPPED → REVIEW REQUIRED</text:p>
          </table:table-cell>
          <table:covered-table-cell table:number-columns-repeated="5" table:style-name="ce54"/>
        </table:table-row>
        <table:table-row table:style-name="ro5">
          <table:table-cell table:style-name="ce68" office:value-type="string" ns42:value-type="string" table:number-columns-spanned="6" table:number-rows-spanned="1">
            <text:p>NORMALIZATION RESULT</text:p>
          </table:table-cell>
          <table:covered-table-cell table:number-columns-repeated="5" table:style-name="ce68"/>
          <table:table-cell table:style-name="ce68" office:value-type="string" ns42:value-type="string" table:number-columns-spanned="6" table:number-rows-spanned="1">
            <text:p>FORMULA ROLE</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9" table:number-rows-spanned="1">
            <text:p>NORMALIZED STATE · FORMULA</text:p>
          </table:table-cell>
          <table:covered-table-cell table:number-columns-repeated="8" table:style-name="ce61"/>
          <table:table-cell table:style-name="ce54" table:formula="of:=IF(LEN(TRIM([.E421]))=0;&quot;BLANK&quot;;UPPER(TRIM([.E421])))" office:value-type="string" office:string-value="BLANK" ns42:value-type="string" table:number-columns-spanned="9" table:number-rows-spanned="1">
            <text:p>BLANK</text:p>
          </table:table-cell>
          <table:covered-table-cell table:number-columns-repeated="8" table:style-name="ce54"/>
        </table:table-row>
        <table:table-row table:style-name="ro5">
          <table:table-cell table:style-name="ce54" office:value-type="string" ns42:value-type="string" table:number-columns-spanned="18" table:number-rows-spanned="1">
            <text:p>NORMALIZATION CONTRACT: Formula routing reads a normalized selected-state value before deriving operator guidan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Blank or unmapped values fail closed and cannot invent a lifecycle route.</text:p>
          </table:table-cell>
          <table:covered-table-cell table:number-columns-repeated="17" table:style-name="ce54"/>
        </table:table-row>
        <table:table-row table:style-name="ro5">
          <table:table-cell table:style-name="ce62" office:value-type="string" ns42:value-type="string" table:number-columns-spanned="18" table:number-rows-spanned="1">
            <text:p>👉 FORMULA-DERIVED NEXT ACTION · FORMULA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ELECTED STATE</text:p>
          </table:table-cell>
          <table:covered-table-cell table:number-columns-repeated="3" table:style-name="ce73"/>
          <table:table-cell table:style-name="ce49" office:value-type="string" ns42:value-type="string" table:number-columns-spanned="4" table:number-rows-spanned="1">
            <text:p>DERIVATION TARGET</text:p>
          </table:table-cell>
          <table:covered-table-cell table:number-columns-repeated="3" table:style-name="ce49"/>
          <table:table-cell table:style-name="ce81" office:value-type="string" ns42:value-type="string" table:number-columns-spanned="4" table:number-rows-spanned="1">
            <text:p>FORMULA RESUL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NEXT ACTION</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8" office:value-type="string" ns42:value-type="string" table:number-columns-spanned="6" table:number-rows-spanned="1">
            <text:p>FORMULA CROSS-CHECK</text:p>
          </table:table-cell>
          <table:covered-table-cell table:number-columns-repeated="5" table:style-name="ce68"/>
          <table:table-cell table:style-name="ce68" office:value-type="string" ns42:value-type="string" table:number-columns-spanned="6" table:number-rows-spanned="1">
            <text:p>DERIVED OUTPUT</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9" table:number-rows-spanned="1">
            <text:p>NEXT ACTION · FORMULA</text:p>
          </table:table-cell>
          <table:covered-table-cell table:number-columns-repeated="8" table:style-name="ce61"/>
          <table:table-cell table:style-name="ce54" table:formula="of:=IF(UPPER(TRIM([.E421]))=&quot;PREPARATION NEEDED&quot;;&quot;COMPLETE NEXT PREPARATION RESPONSIBILITY&quot;;IF(UPPER(TRIM([.E421]))=&quot;READY TO LIST&quot;;&quot;CONFIRM LISTING INTENT&quot;;IF(UPPER(TRIM([.E421]))=&quot;READY FOR PUBLICATION&quot;;&quot;AUTHORIZE PUBLICATION&quot;;IF(UPPER(TRIM([.E421]))=&quot;PUBLISHED&quot;;&quot;REVIEW PLATFORM EXPOSURE&quot;;IF(UPPER(TRIM([.E421]))=&quot;ACTIVE PLATFORM EXPOSURE&quot;;&quot;OBSERVE SALE EVIDENCE&quot;;IF(UPPER(TRIM([.E421]))=&quot;SOLD&quot;;&quot;REVIEW FULFILLMENT PREPARATION&quot;;IF(UPPER(TRIM([.E421]))=&quot;READY FOR SHIPMENT&quot;;&quot;RECORD SHIPMENT RESULT&quot;;IF(UPPER(TRIM([.E421]))=&quot;SHIPPED&quot;;&quot;REVIEW DELIVERY EVIDENCE&quot;;IF(UPPER(TRIM([.E421]))=&quot;DELIVERED&quot;;&quot;REVIEW SETTLEMENT EVIDENCE&quot;;IF(UPPER(TRIM([.E421]))=&quot;PAID OUT&quot;;&quot;REVIEW LIFECYCLE COMPLETION&quot;;IF(UPPER(TRIM([.E421]))=&quot;COMPLETE&quot;;&quot;NO NEXT LIFECYCLE ACTION&quot;;&quot;REVIEW REQUIRED&quot;)))))))))))" office:value-type="string" office:string-value="REVIEW REQUIRED" ns42:value-type="string" table:number-columns-spanned="9" table:number-rows-spanned="1">
            <text:p>REVIEW REQUIRED</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NEXT ACTION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2" office:value-type="string" ns42:value-type="string" table:number-columns-spanned="18" table:number-rows-spanned="1">
            <text:p>🚧 FORMULA-DERIVED ACTIVE BLOCKER · FORMULA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ELECTED STATE</text:p>
          </table:table-cell>
          <table:covered-table-cell table:number-columns-repeated="3" table:style-name="ce73"/>
          <table:table-cell table:style-name="ce49" office:value-type="string" ns42:value-type="string" table:number-columns-spanned="4" table:number-rows-spanned="1">
            <text:p>DERIVATION TARGET</text:p>
          </table:table-cell>
          <table:covered-table-cell table:number-columns-repeated="3" table:style-name="ce49"/>
          <table:table-cell table:style-name="ce81" office:value-type="string" ns42:value-type="string" table:number-columns-spanned="4" table:number-rows-spanned="1">
            <text:p>FORMULA RESUL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ACTIVE BLOCKER</text:p>
          </table:table-cell>
          <table:covered-table-cell table:number-columns-repeated="3" table:style-name="ce54"/>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8" office:value-type="string" ns42:value-type="string" table:number-columns-spanned="6" table:number-rows-spanned="1">
            <text:p>FORMULA CROSS-CHECK</text:p>
          </table:table-cell>
          <table:covered-table-cell table:number-columns-repeated="5" table:style-name="ce68"/>
          <table:table-cell table:style-name="ce68" office:value-type="string" ns42:value-type="string" table:number-columns-spanned="6" table:number-rows-spanned="1">
            <text:p>DERIVED OUTPUT</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9" table:number-rows-spanned="1">
            <text:p>ACTIVE BLOCKER · FORMULA</text:p>
          </table:table-cell>
          <table:covered-table-cell table:number-columns-repeated="8" table:style-name="ce61"/>
          <table:table-cell table:style-name="ce54" table:formula="of:=IF(UPPER(TRIM([.E421]))=&quot;PREPARATION NEEDED&quot;;&quot;NEXT READINESS BLOCKER&quot;;IF(UPPER(TRIM([.E421]))=&quot;READY TO LIST&quot;;&quot;LISTING RECORD&quot;;IF(UPPER(TRIM([.E421]))=&quot;READY FOR PUBLICATION&quot;;&quot;PUBLICATION AUTHORITY&quot;;IF(UPPER(TRIM([.E421]))=&quot;PUBLISHED&quot;;&quot;PLATFORM EXPOSURE EVIDENCE&quot;;IF(UPPER(TRIM([.E421]))=&quot;ACTIVE PLATFORM EXPOSURE&quot;;&quot;SALE EVIDENCE&quot;;IF(UPPER(TRIM([.E421]))=&quot;SOLD&quot;;&quot;FULFILLMENT PREPARATION&quot;;IF(UPPER(TRIM([.E421]))=&quot;READY FOR SHIPMENT&quot;;&quot;SHIPMENT EVIDENCE&quot;;IF(UPPER(TRIM([.E421]))=&quot;SHIPPED&quot;;&quot;DELIVERY EVIDENCE&quot;;IF(UPPER(TRIM([.E421]))=&quot;DELIVERED&quot;;&quot;SETTLEMENT EVIDENCE&quot;;IF(UPPER(TRIM([.E421]))=&quot;PAID OUT&quot;;&quot;COMPLETION CROSS-CHECK&quot;;IF(UPPER(TRIM([.E421]))=&quot;COMPLETE&quot;;&quot;NONE · TERMINAL STATE&quot;;&quot;UNMAPPED STATE&quot;)))))))))))" office:value-type="string" office:string-value="UNMAPPED STATE" ns42:value-type="string" table:number-columns-spanned="9" table:number-rows-spanned="1">
            <text:p>UNMAPPED STATE</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ACTIVE BLOCKER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2" office:value-type="string" ns42:value-type="string" table:number-columns-spanned="18" table:number-rows-spanned="1">
            <text:p>🔎 FORMULA-DERIVED EVIDENCE NEEDED · FORMULA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ELECTED STATE</text:p>
          </table:table-cell>
          <table:covered-table-cell table:number-columns-repeated="3" table:style-name="ce73"/>
          <table:table-cell table:style-name="ce49" office:value-type="string" ns42:value-type="string" table:number-columns-spanned="4" table:number-rows-spanned="1">
            <text:p>DERIVATION TARGET</text:p>
          </table:table-cell>
          <table:covered-table-cell table:number-columns-repeated="3" table:style-name="ce49"/>
          <table:table-cell table:style-name="ce81" office:value-type="string" ns42:value-type="string" table:number-columns-spanned="4" table:number-rows-spanned="1">
            <text:p>FORMULA RESUL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EVIDENCE NEEDED</text:p>
          </table:table-cell>
          <table:covered-table-cell table:number-columns-repeated="3" table:style-name="ce54"/>
          <table:table-cell table:style-name="ce54" office:value-type="string" ns42:value-type="string" table:number-columns-spanned="4" table:number-rows-spanned="1">
            <text:p>FACTUAL DELIVERY RESULT</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8" office:value-type="string" ns42:value-type="string" table:number-columns-spanned="6" table:number-rows-spanned="1">
            <text:p>FORMULA CROSS-CHECK</text:p>
          </table:table-cell>
          <table:covered-table-cell table:number-columns-repeated="5" table:style-name="ce68"/>
          <table:table-cell table:style-name="ce68" office:value-type="string" ns42:value-type="string" table:number-columns-spanned="6" table:number-rows-spanned="1">
            <text:p>DERIVED OUTPUT</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9" table:number-rows-spanned="1">
            <text:p>EVIDENCE NEEDED · FORMULA</text:p>
          </table:table-cell>
          <table:covered-table-cell table:number-columns-repeated="8" table:style-name="ce61"/>
          <table:table-cell table:style-name="ce54" table:formula="of:=IF(UPPER(TRIM([.E421]))=&quot;PREPARATION NEEDED&quot;;&quot;SUPPORTED PREPARATION EVIDENCE&quot;;IF(UPPER(TRIM([.E421]))=&quot;READY TO LIST&quot;;&quot;SUPPORTED LISTING INTENT EVIDENCE&quot;;IF(UPPER(TRIM([.E421]))=&quot;READY FOR PUBLICATION&quot;;&quot;SUPPORTED PUBLICATION AUTHORIZATION EVIDENCE&quot;;IF(UPPER(TRIM([.E421]))=&quot;PUBLISHED&quot;;&quot;FACTUAL PUBLICATION OR EXPOSURE RESULT&quot;;IF(UPPER(TRIM([.E421]))=&quot;ACTIVE PLATFORM EXPOSURE&quot;;&quot;FACTUAL SALE RESULT&quot;;IF(UPPER(TRIM([.E421]))=&quot;SOLD&quot;;&quot;SUPPORTED PACKAGING + SHIPMENT PATH REVIEW&quot;;IF(UPPER(TRIM([.E421]))=&quot;READY FOR SHIPMENT&quot;;&quot;FACTUAL SHIPMENT RESULT&quot;;IF(UPPER(TRIM([.E421]))=&quot;SHIPPED&quot;;&quot;FACTUAL DELIVERY RESULT&quot;;IF(UPPER(TRIM([.E421]))=&quot;DELIVERED&quot;;&quot;FACTUAL SETTLEMENT EVIDENCE&quot;;IF(UPPER(TRIM([.E421]))=&quot;PAID OUT&quot;;&quot;SUPPORTED COMPLETION FACTS&quot;;IF(UPPER(TRIM([.E421]))=&quot;COMPLETE&quot;;&quot;NONE · TERMINAL STATE&quot;;&quot;SUPPORTED STATE REVIEW&quot;)))))))))))" office:value-type="string" office:string-value="SUPPORTED STATE REVIEW" ns42:value-type="string" table:number-columns-spanned="9" table:number-rows-spanned="1">
            <text:p>SUPPORTED STATE REVIEW</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EVIDENCE NEEDED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2" office:value-type="string" ns42:value-type="string" table:number-columns-spanned="18" table:number-rows-spanned="1">
            <text:p>🧾 FORMULA-DERIVED REVIEW RESPONSIBILITY · FORMULA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ELECTED STATE</text:p>
          </table:table-cell>
          <table:covered-table-cell table:number-columns-repeated="3" table:style-name="ce73"/>
          <table:table-cell table:style-name="ce49" office:value-type="string" ns42:value-type="string" table:number-columns-spanned="4" table:number-rows-spanned="1">
            <text:p>DERIVATION TARGET</text:p>
          </table:table-cell>
          <table:covered-table-cell table:number-columns-repeated="3" table:style-name="ce49"/>
          <table:table-cell table:style-name="ce81" office:value-type="string" ns42:value-type="string" table:number-columns-spanned="4" table:number-rows-spanned="1">
            <text:p>FORMULA RESUL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RESPONSIBILITY</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8" office:value-type="string" ns42:value-type="string" table:number-columns-spanned="6" table:number-rows-spanned="1">
            <text:p>FORMULA CROSS-CHECK</text:p>
          </table:table-cell>
          <table:covered-table-cell table:number-columns-repeated="5" table:style-name="ce68"/>
          <table:table-cell table:style-name="ce68" office:value-type="string" ns42:value-type="string" table:number-columns-spanned="6" table:number-rows-spanned="1">
            <text:p>DERIVED OUTPUT</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9" table:number-rows-spanned="1">
            <text:p>REVIEW RESPONSIBILITY · FORMULA</text:p>
          </table:table-cell>
          <table:covered-table-cell table:number-columns-repeated="8" table:style-name="ce61"/>
          <table:table-cell table:style-name="ce54" table:formula="of:=IF(UPPER(TRIM([.E421]))=&quot;PREPARATION NEEDED&quot;;&quot;REVIEW ROUTED EVIDENCE&quot;;IF(UPPER(TRIM([.E421]))=&quot;READY TO LIST&quot;;&quot;REVIEW LISTING INTENT EVIDENCE&quot;;IF(UPPER(TRIM([.E421]))=&quot;READY FOR PUBLICATION&quot;;&quot;REVIEW PUBLICATION AUTHORITY&quot;;IF(UPPER(TRIM([.E421]))=&quot;PUBLISHED&quot;;&quot;REVIEW PLATFORM EXPOSURE EVIDENCE&quot;;IF(UPPER(TRIM([.E421]))=&quot;ACTIVE PLATFORM EXPOSURE&quot;;&quot;REVIEW SALE EVIDENCE&quot;;IF(UPPER(TRIM([.E421]))=&quot;SOLD&quot;;&quot;REVIEW FULFILLMENT EVIDENCE&quot;;IF(UPPER(TRIM([.E421]))=&quot;READY FOR SHIPMENT&quot;;&quot;REVIEW SHIPMENT EVIDENCE&quot;;IF(UPPER(TRIM([.E421]))=&quot;SHIPPED&quot;;&quot;REVIEW DELIVERY EVIDENCE&quot;;IF(UPPER(TRIM([.E421]))=&quot;DELIVERED&quot;;&quot;REVIEW SETTLEMENT EVIDENCE&quot;;IF(UPPER(TRIM([.E421]))=&quot;PAID OUT&quot;;&quot;REVIEW COMPLETION EVIDENCE&quot;;IF(UPPER(TRIM([.E421]))=&quot;COMPLETE&quot;;&quot;HISTORY REVIEW ONLY&quot;;&quot;REVIEW SELECTED STATE&quot;)))))))))))" office:value-type="string" office:string-value="REVIEW SELECTED STATE" ns42:value-type="string" table:number-columns-spanned="9" table:number-rows-spanned="1">
            <text:p>REVIEW SELECTED STATE</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REVIEW RESPONSIBILITY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2" office:value-type="string" ns42:value-type="string" table:number-columns-spanned="18" table:number-rows-spanned="1">
            <text:p>🔭 FORMULA-DERIVED TRANSITION PREVIEW · FORMULA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ELECTED STATE</text:p>
          </table:table-cell>
          <table:covered-table-cell table:number-columns-repeated="3" table:style-name="ce73"/>
          <table:table-cell table:style-name="ce49" office:value-type="string" ns42:value-type="string" table:number-columns-spanned="4" table:number-rows-spanned="1">
            <text:p>DERIVATION TARGET</text:p>
          </table:table-cell>
          <table:covered-table-cell table:number-columns-repeated="3" table:style-name="ce49"/>
          <table:table-cell table:style-name="ce81" office:value-type="string" ns42:value-type="string" table:number-columns-spanned="4" table:number-rows-spanned="1">
            <text:p>FORMULA RESUL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TRANSITION PREVIEW</text:p>
          </table:table-cell>
          <table:covered-table-cell table:number-columns-repeated="3" table:style-name="ce54"/>
          <table:table-cell table:style-name="ce54" office:value-type="string" ns42:value-type="string" table:number-columns-spanned="4" table:number-rows-spanned="1">
            <text:p>SHIPPED → DELIVERED · PREVIEW</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8" office:value-type="string" ns42:value-type="string" table:number-columns-spanned="6" table:number-rows-spanned="1">
            <text:p>FORMULA CROSS-CHECK</text:p>
          </table:table-cell>
          <table:covered-table-cell table:number-columns-repeated="5" table:style-name="ce68"/>
          <table:table-cell table:style-name="ce68" office:value-type="string" ns42:value-type="string" table:number-columns-spanned="6" table:number-rows-spanned="1">
            <text:p>DERIVED OUTPUT</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9" table:number-rows-spanned="1">
            <text:p>TRANSITION PREVIEW · FORMULA</text:p>
          </table:table-cell>
          <table:covered-table-cell table:number-columns-repeated="8" table:style-name="ce61"/>
          <table:table-cell table:style-name="ce54" table:formula="of:=IF(UPPER(TRIM([.E421]))=&quot;PREPARATION NEEDED&quot;;&quot;PREPARATION ADVANCEMENT · PREVIEW&quot;;IF(UPPER(TRIM([.E421]))=&quot;READY TO LIST&quot;;&quot;READY TO LIST → READY FOR PUBLICATION · PREVIEW&quot;;IF(UPPER(TRIM([.E421]))=&quot;READY FOR PUBLICATION&quot;;&quot;READY FOR PUBLICATION → PUBLISHED · PREVIEW&quot;;IF(UPPER(TRIM([.E421]))=&quot;PUBLISHED&quot;;&quot;PUBLISHED → ACTIVE PLATFORM EXPOSURE · PREVIEW&quot;;IF(UPPER(TRIM([.E421]))=&quot;ACTIVE PLATFORM EXPOSURE&quot;;&quot;ACTIVE PLATFORM EXPOSURE → SOLD · PREVIEW&quot;;IF(UPPER(TRIM([.E421]))=&quot;SOLD&quot;;&quot;SOLD → READY FOR SHIPMENT · PREVIEW&quot;;IF(UPPER(TRIM([.E421]))=&quot;READY FOR SHIPMENT&quot;;&quot;READY FOR SHIPMENT → SHIPPED · PREVIEW&quot;;IF(UPPER(TRIM([.E421]))=&quot;SHIPPED&quot;;&quot;SHIPPED → DELIVERED · PREVIEW&quot;;IF(UPPER(TRIM([.E421]))=&quot;DELIVERED&quot;;&quot;DELIVERED → PAID OUT · PREVIEW&quot;;IF(UPPER(TRIM([.E421]))=&quot;PAID OUT&quot;;&quot;PAID OUT → COMPLETE · PREVIEW&quot;;IF(UPPER(TRIM([.E421]))=&quot;COMPLETE&quot;;&quot;NONE · TERMINAL STATE&quot;;&quot;NO TRANSITION PREVIEW&quot;)))))))))))" office:value-type="string" office:string-value="NO TRANSITION PREVIEW" ns42:value-type="string" table:number-columns-spanned="9" table:number-rows-spanned="1">
            <text:p>NO TRANSITION PREVIEW</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TRANSITION PREVIEW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2" office:value-type="string" ns42:value-type="string" table:number-columns-spanned="18" table:number-rows-spanned="1">
            <text:p>🛑 BLANK + UNKNOWN + UNMAPPED FAIL-CLOSED PROTECTION · FORMULA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INPUT CONDITION</text:p>
          </table:table-cell>
          <table:covered-table-cell table:number-columns-repeated="3" table:style-name="ce73"/>
          <table:table-cell table:style-name="ce49" office:value-type="string" ns42:value-type="string" table:number-columns-spanned="4" table:number-rows-spanned="1">
            <text:p>ROUTING RESULT</text:p>
          </table:table-cell>
          <table:covered-table-cell table:number-columns-repeated="3" table:style-name="ce49"/>
          <table:table-cell table:style-name="ce81" office:value-type="string" ns42:value-type="string" table:number-columns-spanned="4" table:number-rows-spanned="1">
            <text:p>OPERATOR GUIDANCE</text:p>
          </table:table-cell>
          <table:covered-table-cell table:number-columns-repeated="3" table:style-name="ce81"/>
          <table:table-cell table:style-name="ce49" office:value-type="string" ns42:value-type="string" table:number-columns-spanned="6" table:number-rows-spanned="1">
            <text:p>TRANSITION PREVIEW</text:p>
          </table:table-cell>
          <table:covered-table-cell table:number-columns-repeated="5" table:style-name="ce49"/>
        </table:table-row>
        <table:table-row table:style-name="ro5">
          <table:table-cell table:style-name="ce54" office:value-type="string" ns42:value-type="string" table:number-columns-spanned="4" table:number-rows-spanned="1">
            <text:p>BLANK / UNKNOWN / UNSUPPORTED / UNMAPPED</text:p>
          </table:table-cell>
          <table:covered-table-cell table:number-columns-repeated="3" table:style-name="ce54"/>
          <table:table-cell table:style-name="ce54" office:value-type="string" ns42:value-type="string" table:number-columns-spanned="4" table:number-rows-spanned="1">
            <text:p>REVIEW REQUIRED</text:p>
          </table:table-cell>
          <table:covered-table-cell table:number-columns-repeated="3" table:style-name="ce54"/>
          <table:table-cell table:style-name="ce54" office:value-type="string" ns42:value-type="string" table:number-columns-spanned="4" table:number-rows-spanned="1">
            <text:p>REVIEW SELECTED STATE</text:p>
          </table:table-cell>
          <table:covered-table-cell table:number-columns-repeated="3" table:style-name="ce54"/>
          <table:table-cell table:style-name="ce54" office:value-type="string" ns42:value-type="string" table:number-columns-spanned="6" table:number-rows-spanned="1">
            <text:p>NO TRANSITION PREVIEW</text:p>
          </table:table-cell>
          <table:covered-table-cell table:number-columns-repeated="5" table:style-name="ce54"/>
        </table:table-row>
        <table:table-row table:style-name="ro5">
          <table:table-cell table:style-name="ce68" office:value-type="string" ns42:value-type="string" table:number-columns-spanned="6" table:number-rows-spanned="1">
            <text:p>FAIL-CLOSED RESULT</text:p>
          </table:table-cell>
          <table:covered-table-cell table:number-columns-repeated="5" table:style-name="ce68"/>
          <table:table-cell table:style-name="ce68" office:value-type="string" ns42:value-type="string" table:number-columns-spanned="6" table:number-rows-spanned="1">
            <text:p>INVENTED ROUTE</text:p>
          </table:table-cell>
          <table:covered-table-cell table:number-columns-repeated="5" table:style-name="ce68"/>
          <table:table-cell table:style-name="ce68" office:value-type="string" ns42:value-type="string" table:number-columns-spanned="6" table:number-rows-spanned="1">
            <text:p>STATE MUTATION</text:p>
          </table:table-cell>
          <table:covered-table-cell table:number-columns-repeated="5" table:style-name="ce68"/>
        </table:table-row>
        <table:table-row table:style-name="ro5">
          <table:table-cell table:style-name="ce61" office:value-type="string" ns42:value-type="string" table:number-columns-spanned="6" table:number-rows-spanned="1">
            <text:p>SAFE REVIEW BOUNDARY · DEMO</text:p>
          </table:table-cell>
          <table:covered-table-cell table:number-columns-repeated="5" table:style-name="ce61"/>
          <table:table-cell table:style-name="ce54" office:value-type="string" ns42:value-type="string" table:number-columns-spanned="6" table:number-rows-spanned="1">
            <text:p>PROHIBITED</text:p>
          </table:table-cell>
          <table:covered-table-cell table:number-columns-repeated="5" table:style-name="ce54"/>
          <table:table-cell table:style-name="ce54" office:value-type="string" ns42:value-type="string" table:number-columns-spanned="6" table:number-rows-spanned="1">
            <text:p>PROHIBITED</text:p>
          </table:table-cell>
          <table:covered-table-cell table:number-columns-repeated="5" table:style-name="ce54"/>
        </table:table-row>
        <table:table-row table:style-name="ro5">
          <table:table-cell table:style-name="ce54" office:value-type="string" ns42:value-type="string" table:number-columns-spanned="18" table:number-rows-spanned="1">
            <text:p>FAIL-CLOSED CONTRACT: Any blank, unknown, unsupported, or unmapped selected-state value returns review guidance instead of a lifecycle rout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Missing or unrecognized state evidence cannot produce a supported transition preview.</text:p>
          </table:table-cell>
          <table:covered-table-cell table:number-columns-repeated="17" table:style-name="ce54"/>
        </table:table-row>
        <table:table-row table:style-name="ro5">
          <table:table-cell table:style-name="ce62" office:value-type="string" ns42:value-type="string" table:number-columns-spanned="18" table:number-rows-spanned="1">
            <text:p>🎛️ FORMULA-DRIVEN INVENTORY ACTION CENTER GATE · FORMULA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ELECTED STATE</text:p>
          </table:table-cell>
          <table:covered-table-cell table:number-columns-repeated="3" table:style-name="ce73"/>
          <table:table-cell table:style-name="ce49" office:value-type="string" ns42:value-type="string" table:number-columns-spanned="4" table:number-rows-spanned="1">
            <text:p>DERIVED NEXT ACTION</text:p>
          </table:table-cell>
          <table:covered-table-cell table:number-columns-repeated="3" table:style-name="ce49"/>
          <table:table-cell table:style-name="ce81" office:value-type="string" ns42:value-type="string" table:number-columns-spanned="4" table:number-rows-spanned="1">
            <text:p>DERIVED ACTIVE BLOCKER</text:p>
          </table:table-cell>
          <table:covered-table-cell table:number-columns-repeated="3" table:style-name="ce81"/>
          <table:table-cell table:style-name="ce49" office:value-type="string" ns42:value-type="string" table:number-columns-spanned="6" table:number-rows-spanned="1">
            <text:p>OPERATING 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6" table:number-rows-spanned="1">
            <text:p>NO SILENT STATE CHANGE</text:p>
          </table:table-cell>
          <table:covered-table-cell table:number-columns-repeated="5" table:style-name="ce54"/>
        </table:table-row>
        <table:table-row table:style-name="ro5">
          <table:table-cell table:style-name="ce68" office:value-type="string" ns42:value-type="string" table:number-columns-spanned="6" table:number-rows-spanned="1">
            <text:p>DERIVED EVIDENCE + REVIEW + PREVIEW</text:p>
          </table:table-cell>
          <table:covered-table-cell table:number-columns-repeated="5" table:style-name="ce68"/>
          <table:table-cell table:style-name="ce68" office:value-type="string" ns42:value-type="string" table:number-columns-spanned="6" table:number-rows-spanned="1">
            <text:p>ACTION CENTER RESULT</text:p>
          </table:table-cell>
          <table:covered-table-cell table:number-columns-repeated="5" table:style-name="ce68"/>
          <table:table-cell table:style-name="ce68" office:value-type="string" ns42:value-type="string" table:number-columns-spanned="6" table:number-rows-spanned="1">
            <text:p>FAIL-CLOSED PROTECTION</text:p>
          </table:table-cell>
          <table:covered-table-cell table:number-columns-repeated="5" table:style-name="ce68"/>
        </table:table-row>
        <table:table-row table:style-name="ro5">
          <table:table-cell table:style-name="ce61" office:value-type="string" ns42:value-type="string" table:number-columns-spanned="6" table:number-rows-spanned="1">
            <text:p>FACTUAL DELIVERY RESULT → REVIEW DELIVERY EVIDENCE → SHIPPED → DELIVERED PREVIEW</text:p>
          </table:table-cell>
          <table:covered-table-cell table:number-columns-repeated="5" table:style-name="ce61"/>
          <table:table-cell table:style-name="ce54" office:value-type="string" ns42:value-type="string" table:number-columns-spanned="6" table:number-rows-spanned="1">
            <text:p>FORMULA-DRIVEN ROUTING SUPPORTED · DEMO</text:p>
          </table:table-cell>
          <table:covered-table-cell table:number-columns-repeated="5" table:style-name="ce54"/>
          <table:table-cell table:style-name="ce54" office:value-type="string" ns42:value-type="string" table:number-columns-spanned="6" table:number-rows-spanned="1">
            <text:p>UNMAPPED → REVIEW REQUIRED</text:p>
          </table:table-cell>
          <table:covered-table-cell table:number-columns-repeated="5" table:style-name="ce54"/>
        </table:table-row>
        <table:table-row table:style-name="ro5">
          <table:table-cell table:style-name="ce54" office:value-type="string" ns42:value-type="string" table:number-columns-spanned="18" table:number-rows-spanned="1">
            <text:p>FORMULA ACTION CENTER CROSS-CHECK · DEMO: one controlled selected-state input drives formula-derived next action + blocker + evidence needed + review responsibility + transition preview.</text:p>
          </table:table-cell>
          <table:covered-table-cell table:number-columns-repeated="17" table:style-name="ce54"/>
        </table:table-row>
        <table:table-row table:style-name="ro5">
          <table:table-cell table:style-name="ce54" office:value-type="string" ns42:value-type="string" table:number-columns-spanned="18" table:number-rows-spanned="1">
            <text:p>OPERATING FLOW: SELECT STATE ONCE → FORMULAS DERIVE ACTION + BLOCKER + EVIDENCE + REVIEW + PREVIEW.</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derived routing does not create macros, connectors, marketplace automation, buttons, or automatic Inventory state writes.</text:p>
          </table:table-cell>
          <table:covered-table-cell table:number-columns-repeated="17" table:style-name="ce54"/>
        </table:table-row>
        <table:table-row table:style-name="ro5">
          <table:table-cell table:style-name="ce54" office:value-type="string" ns42:value-type="string" table:number-columns-spanned="18" table:number-rows-spanned="1">
            <text:p>OPERATING PRINCIPLE: Enter one supported routing state once. Understand the controlled operator path everywhere in the Action Center.</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ACTION CENTER MULTI-STATE FORMULA VALIDATION · BUILDS 082–088</text:p>
          </table:table-cell>
          <table:covered-table-cell table:number-columns-repeated="17" table:style-name="ce52"/>
        </table:table-row>
        <table:table-row table:style-name="ro5">
          <table:table-cell table:style-name="ce53" office:value-type="string" ns42:value-type="string" table:number-columns-spanned="3" table:number-rows-spanned="1">
            <text:p>TEST INPUT</text:p>
          </table:table-cell>
          <table:covered-table-cell table:number-columns-repeated="2" table:style-name="ce53"/>
          <table:table-cell table:style-name="ce53" office:value-type="string" ns42:value-type="string" table:number-columns-spanned="3" table:number-rows-spanned="1">
            <text:p>DERIVED NEXT ACTION</text:p>
          </table:table-cell>
          <table:covered-table-cell table:number-columns-repeated="2" table:style-name="ce53"/>
          <table:table-cell table:style-name="ce53" office:value-type="string" ns42:value-type="string" table:number-columns-spanned="3" table:number-rows-spanned="1">
            <text:p>DERIVED BLOCKER</text:p>
          </table:table-cell>
          <table:covered-table-cell table:number-columns-repeated="2" table:style-name="ce53"/>
          <table:table-cell table:style-name="ce53" office:value-type="string" ns42:value-type="string" table:number-columns-spanned="3" table:number-rows-spanned="1">
            <text:p>DERIVED EVIDENCE</text:p>
          </table:table-cell>
          <table:covered-table-cell table:number-columns-repeated="2" table:style-name="ce53"/>
          <table:table-cell table:style-name="ce53" office:value-type="string" ns42:value-type="string" table:number-columns-spanned="3" table:number-rows-spanned="1">
            <text:p>DERIVED REVIEW</text:p>
          </table:table-cell>
          <table:covered-table-cell table:number-columns-repeated="2" table:style-name="ce53"/>
          <table:table-cell table:style-name="ce53" office:value-type="string" ns42:value-type="string" table:number-columns-spanned="3" table:number-rows-spanned="1">
            <text:p>DERIVED PREVIEW</text:p>
          </table:table-cell>
          <table:covered-table-cell table:number-columns-repeated="2" table:style-name="ce53"/>
        </table:table-row>
        <table:table-row table:style-name="ro5">
          <table:table-cell table:style-name="ce54" office:value-type="string" ns42:value-type="string" table:number-columns-spanned="3" table:number-rows-spanned="1">
            <text:p>PREPARATION NEEDED</text:p>
          </table:table-cell>
          <table:covered-table-cell table:number-columns-repeated="2" table:style-name="ce54"/>
          <table:table-cell table:style-name="ce54" table:formula="of:=IF(UPPER(TRIM(&quot;PREPARATION NEEDED&quot;))=&quot;PREPARATION NEEDED&quot;;&quot;COMPLETE NEXT PREPARATION RESPONSIBILITY&quot;;IF(UPPER(TRIM(&quot;PREPARATION NEEDED&quot;))=&quot;READY TO LIST&quot;;&quot;CONFIRM LISTING INTENT&quot;;IF(UPPER(TRIM(&quot;PREPARATION NEEDED&quot;))=&quot;READY FOR PUBLICATION&quot;;&quot;AUTHORIZE PUBLICATION&quot;;IF(UPPER(TRIM(&quot;PREPARATION NEEDED&quot;))=&quot;PUBLISHED&quot;;&quot;REVIEW PLATFORM EXPOSURE&quot;;IF(UPPER(TRIM(&quot;PREPARATION NEEDED&quot;))=&quot;ACTIVE PLATFORM EXPOSURE&quot;;&quot;OBSERVE SALE EVIDENCE&quot;;IF(UPPER(TRIM(&quot;PREPARATION NEEDED&quot;))=&quot;SOLD&quot;;&quot;REVIEW FULFILLMENT PREPARATION&quot;;IF(UPPER(TRIM(&quot;PREPARATION NEEDED&quot;))=&quot;READY FOR SHIPMENT&quot;;&quot;RECORD SHIPMENT RESULT&quot;;IF(UPPER(TRIM(&quot;PREPARATION NEEDED&quot;))=&quot;SHIPPED&quot;;&quot;REVIEW DELIVERY EVIDENCE&quot;;IF(UPPER(TRIM(&quot;PREPARATION NEEDED&quot;))=&quot;DELIVERED&quot;;&quot;REVIEW SETTLEMENT EVIDENCE&quot;;IF(UPPER(TRIM(&quot;PREPARATION NEEDED&quot;))=&quot;PAID OUT&quot;;&quot;REVIEW LIFECYCLE COMPLETION&quot;;IF(UPPER(TRIM(&quot;PREPARATION NEEDED&quot;))=&quot;COMPLETE&quot;;&quot;NO NEXT LIFECYCLE ACTION&quot;;&quot;REVIEW REQUIRED&quot;)))))))))))" office:value-type="string" office:string-value="COMPLETE NEXT PREPARATION RESPONSIBILITY" ns42:value-type="string" table:number-columns-spanned="3" table:number-rows-spanned="1">
            <text:p>COMPLETE NEXT PREPARATION RESPONSIBILITY</text:p>
          </table:table-cell>
          <table:covered-table-cell table:number-columns-repeated="2" table:style-name="ce54"/>
          <table:table-cell table:style-name="ce54" table:formula="of:=IF(UPPER(TRIM(&quot;PREPARATION NEEDED&quot;))=&quot;PREPARATION NEEDED&quot;;&quot;NEXT READINESS BLOCKER&quot;;IF(UPPER(TRIM(&quot;PREPARATION NEEDED&quot;))=&quot;READY TO LIST&quot;;&quot;LISTING RECORD&quot;;IF(UPPER(TRIM(&quot;PREPARATION NEEDED&quot;))=&quot;READY FOR PUBLICATION&quot;;&quot;PUBLICATION AUTHORITY&quot;;IF(UPPER(TRIM(&quot;PREPARATION NEEDED&quot;))=&quot;PUBLISHED&quot;;&quot;PLATFORM EXPOSURE EVIDENCE&quot;;IF(UPPER(TRIM(&quot;PREPARATION NEEDED&quot;))=&quot;ACTIVE PLATFORM EXPOSURE&quot;;&quot;SALE EVIDENCE&quot;;IF(UPPER(TRIM(&quot;PREPARATION NEEDED&quot;))=&quot;SOLD&quot;;&quot;FULFILLMENT PREPARATION&quot;;IF(UPPER(TRIM(&quot;PREPARATION NEEDED&quot;))=&quot;READY FOR SHIPMENT&quot;;&quot;SHIPMENT EVIDENCE&quot;;IF(UPPER(TRIM(&quot;PREPARATION NEEDED&quot;))=&quot;SHIPPED&quot;;&quot;DELIVERY EVIDENCE&quot;;IF(UPPER(TRIM(&quot;PREPARATION NEEDED&quot;))=&quot;DELIVERED&quot;;&quot;SETTLEMENT EVIDENCE&quot;;IF(UPPER(TRIM(&quot;PREPARATION NEEDED&quot;))=&quot;PAID OUT&quot;;&quot;COMPLETION CROSS-CHECK&quot;;IF(UPPER(TRIM(&quot;PREPARATION NEEDED&quot;))=&quot;COMPLETE&quot;;&quot;NONE · TERMINAL STATE&quot;;&quot;UNMAPPED STATE&quot;)))))))))))" office:value-type="string" office:string-value="NEXT READINESS BLOCKER" ns42:value-type="string" table:number-columns-spanned="3" table:number-rows-spanned="1">
            <text:p>NEXT READINESS BLOCKER</text:p>
          </table:table-cell>
          <table:covered-table-cell table:number-columns-repeated="2" table:style-name="ce54"/>
          <table:table-cell table:style-name="ce54" table:formula="of:=IF(UPPER(TRIM(&quot;PREPARATION NEEDED&quot;))=&quot;PREPARATION NEEDED&quot;;&quot;SUPPORTED PREPARATION EVIDENCE&quot;;IF(UPPER(TRIM(&quot;PREPARATION NEEDED&quot;))=&quot;READY TO LIST&quot;;&quot;SUPPORTED LISTING INTENT EVIDENCE&quot;;IF(UPPER(TRIM(&quot;PREPARATION NEEDED&quot;))=&quot;READY FOR PUBLICATION&quot;;&quot;SUPPORTED PUBLICATION AUTHORIZATION EVIDENCE&quot;;IF(UPPER(TRIM(&quot;PREPARATION NEEDED&quot;))=&quot;PUBLISHED&quot;;&quot;FACTUAL PUBLICATION OR EXPOSURE RESULT&quot;;IF(UPPER(TRIM(&quot;PREPARATION NEEDED&quot;))=&quot;ACTIVE PLATFORM EXPOSURE&quot;;&quot;FACTUAL SALE RESULT&quot;;IF(UPPER(TRIM(&quot;PREPARATION NEEDED&quot;))=&quot;SOLD&quot;;&quot;SUPPORTED PACKAGING + SHIPMENT PATH REVIEW&quot;;IF(UPPER(TRIM(&quot;PREPARATION NEEDED&quot;))=&quot;READY FOR SHIPMENT&quot;;&quot;FACTUAL SHIPMENT RESULT&quot;;IF(UPPER(TRIM(&quot;PREPARATION NEEDED&quot;))=&quot;SHIPPED&quot;;&quot;FACTUAL DELIVERY RESULT&quot;;IF(UPPER(TRIM(&quot;PREPARATION NEEDED&quot;))=&quot;DELIVERED&quot;;&quot;FACTUAL SETTLEMENT EVIDENCE&quot;;IF(UPPER(TRIM(&quot;PREPARATION NEEDED&quot;))=&quot;PAID OUT&quot;;&quot;SUPPORTED COMPLETION FACTS&quot;;IF(UPPER(TRIM(&quot;PREPARATION NEEDED&quot;))=&quot;COMPLETE&quot;;&quot;NONE · TERMINAL STATE&quot;;&quot;SUPPORTED STATE REVIEW&quot;)))))))))))" office:value-type="string" office:string-value="SUPPORTED PREPARATION EVIDENCE" ns42:value-type="string" table:number-columns-spanned="3" table:number-rows-spanned="1">
            <text:p>SUPPORTED PREPARATION EVIDENCE</text:p>
          </table:table-cell>
          <table:covered-table-cell table:number-columns-repeated="2" table:style-name="ce54"/>
          <table:table-cell table:style-name="ce54" table:formula="of:=IF(UPPER(TRIM(&quot;PREPARATION NEEDED&quot;))=&quot;PREPARATION NEEDED&quot;;&quot;REVIEW ROUTED EVIDENCE&quot;;IF(UPPER(TRIM(&quot;PREPARATION NEEDED&quot;))=&quot;READY TO LIST&quot;;&quot;REVIEW LISTING INTENT EVIDENCE&quot;;IF(UPPER(TRIM(&quot;PREPARATION NEEDED&quot;))=&quot;READY FOR PUBLICATION&quot;;&quot;REVIEW PUBLICATION AUTHORITY&quot;;IF(UPPER(TRIM(&quot;PREPARATION NEEDED&quot;))=&quot;PUBLISHED&quot;;&quot;REVIEW PLATFORM EXPOSURE EVIDENCE&quot;;IF(UPPER(TRIM(&quot;PREPARATION NEEDED&quot;))=&quot;ACTIVE PLATFORM EXPOSURE&quot;;&quot;REVIEW SALE EVIDENCE&quot;;IF(UPPER(TRIM(&quot;PREPARATION NEEDED&quot;))=&quot;SOLD&quot;;&quot;REVIEW FULFILLMENT EVIDENCE&quot;;IF(UPPER(TRIM(&quot;PREPARATION NEEDED&quot;))=&quot;READY FOR SHIPMENT&quot;;&quot;REVIEW SHIPMENT EVIDENCE&quot;;IF(UPPER(TRIM(&quot;PREPARATION NEEDED&quot;))=&quot;SHIPPED&quot;;&quot;REVIEW DELIVERY EVIDENCE&quot;;IF(UPPER(TRIM(&quot;PREPARATION NEEDED&quot;))=&quot;DELIVERED&quot;;&quot;REVIEW SETTLEMENT EVIDENCE&quot;;IF(UPPER(TRIM(&quot;PREPARATION NEEDED&quot;))=&quot;PAID OUT&quot;;&quot;REVIEW COMPLETION EVIDENCE&quot;;IF(UPPER(TRIM(&quot;PREPARATION NEEDED&quot;))=&quot;COMPLETE&quot;;&quot;HISTORY REVIEW ONLY&quot;;&quot;REVIEW SELECTED STATE&quot;)))))))))))" office:value-type="string" office:string-value="REVIEW ROUTED EVIDENCE" ns42:value-type="string" table:number-columns-spanned="3" table:number-rows-spanned="1">
            <text:p>REVIEW ROUTED EVIDENCE</text:p>
          </table:table-cell>
          <table:covered-table-cell table:number-columns-repeated="2" table:style-name="ce54"/>
          <table:table-cell table:style-name="ce54" table:formula="of:=IF(UPPER(TRIM(&quot;PREPARATION NEEDED&quot;))=&quot;PREPARATION NEEDED&quot;;&quot;PREPARATION ADVANCEMENT · PREVIEW&quot;;IF(UPPER(TRIM(&quot;PREPARATION NEEDED&quot;))=&quot;READY TO LIST&quot;;&quot;READY TO LIST → READY FOR PUBLICATION · PREVIEW&quot;;IF(UPPER(TRIM(&quot;PREPARATION NEEDED&quot;))=&quot;READY FOR PUBLICATION&quot;;&quot;READY FOR PUBLICATION → PUBLISHED · PREVIEW&quot;;IF(UPPER(TRIM(&quot;PREPARATION NEEDED&quot;))=&quot;PUBLISHED&quot;;&quot;PUBLISHED → ACTIVE PLATFORM EXPOSURE · PREVIEW&quot;;IF(UPPER(TRIM(&quot;PREPARATION NEEDED&quot;))=&quot;ACTIVE PLATFORM EXPOSURE&quot;;&quot;ACTIVE PLATFORM EXPOSURE → SOLD · PREVIEW&quot;;IF(UPPER(TRIM(&quot;PREPARATION NEEDED&quot;))=&quot;SOLD&quot;;&quot;SOLD → READY FOR SHIPMENT · PREVIEW&quot;;IF(UPPER(TRIM(&quot;PREPARATION NEEDED&quot;))=&quot;READY FOR SHIPMENT&quot;;&quot;READY FOR SHIPMENT → SHIPPED · PREVIEW&quot;;IF(UPPER(TRIM(&quot;PREPARATION NEEDED&quot;))=&quot;SHIPPED&quot;;&quot;SHIPPED → DELIVERED · PREVIEW&quot;;IF(UPPER(TRIM(&quot;PREPARATION NEEDED&quot;))=&quot;DELIVERED&quot;;&quot;DELIVERED → PAID OUT · PREVIEW&quot;;IF(UPPER(TRIM(&quot;PREPARATION NEEDED&quot;))=&quot;PAID OUT&quot;;&quot;PAID OUT → COMPLETE · PREVIEW&quot;;IF(UPPER(TRIM(&quot;PREPARATION NEEDED&quot;))=&quot;COMPLETE&quot;;&quot;NONE · TERMINAL STATE&quot;;&quot;NO TRANSITION PREVIEW&quot;)))))))))))" office:value-type="string" office:string-value="PREPARATION ADVANCEMENT · PREVIEW" ns42:value-type="string" table:number-columns-spanned="3" table:number-rows-spanned="1">
            <text:p>PREPARATION ADVANCEMENT · PREVIEW</text:p>
          </table:table-cell>
          <table:covered-table-cell table:number-columns-repeated="2" table:style-name="ce54"/>
        </table:table-row>
        <table:table-row table:style-name="ro5">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IF(UPPER(TRIM(&quot;READY TO LIST&quot;))=&quot;PREPARATION NEEDED&quot;;&quot;COMPLETE NEXT PREPARATION RESPONSIBILITY&quot;;IF(UPPER(TRIM(&quot;READY TO LIST&quot;))=&quot;READY TO LIST&quot;;&quot;CONFIRM LISTING INTENT&quot;;IF(UPPER(TRIM(&quot;READY TO LIST&quot;))=&quot;READY FOR PUBLICATION&quot;;&quot;AUTHORIZE PUBLICATION&quot;;IF(UPPER(TRIM(&quot;READY TO LIST&quot;))=&quot;PUBLISHED&quot;;&quot;REVIEW PLATFORM EXPOSURE&quot;;IF(UPPER(TRIM(&quot;READY TO LIST&quot;))=&quot;ACTIVE PLATFORM EXPOSURE&quot;;&quot;OBSERVE SALE EVIDENCE&quot;;IF(UPPER(TRIM(&quot;READY TO LIST&quot;))=&quot;SOLD&quot;;&quot;REVIEW FULFILLMENT PREPARATION&quot;;IF(UPPER(TRIM(&quot;READY TO LIST&quot;))=&quot;READY FOR SHIPMENT&quot;;&quot;RECORD SHIPMENT RESULT&quot;;IF(UPPER(TRIM(&quot;READY TO LIST&quot;))=&quot;SHIPPED&quot;;&quot;REVIEW DELIVERY EVIDENCE&quot;;IF(UPPER(TRIM(&quot;READY TO LIST&quot;))=&quot;DELIVERED&quot;;&quot;REVIEW SETTLEMENT EVIDENCE&quot;;IF(UPPER(TRIM(&quot;READY TO LIST&quot;))=&quot;PAID OUT&quot;;&quot;REVIEW LIFECYCLE COMPLETION&quot;;IF(UPPER(TRIM(&quot;READY TO LIST&quot;))=&quot;COMPLETE&quot;;&quot;NO NEXT LIFECYCLE ACTION&quot;;&quot;REVIEW REQUIRED&quot;)))))))))))" office:value-type="string" office:string-value="CONFIRM LISTING INTENT" ns42:value-type="string" table:number-columns-spanned="3" table:number-rows-spanned="1">
            <text:p>CONFIRM LISTING INTENT</text:p>
          </table:table-cell>
          <table:covered-table-cell table:number-columns-repeated="2" table:style-name="ce54"/>
          <table:table-cell table:style-name="ce54" table:formula="of:=IF(UPPER(TRIM(&quot;READY TO LIST&quot;))=&quot;PREPARATION NEEDED&quot;;&quot;NEXT READINESS BLOCKER&quot;;IF(UPPER(TRIM(&quot;READY TO LIST&quot;))=&quot;READY TO LIST&quot;;&quot;LISTING RECORD&quot;;IF(UPPER(TRIM(&quot;READY TO LIST&quot;))=&quot;READY FOR PUBLICATION&quot;;&quot;PUBLICATION AUTHORITY&quot;;IF(UPPER(TRIM(&quot;READY TO LIST&quot;))=&quot;PUBLISHED&quot;;&quot;PLATFORM EXPOSURE EVIDENCE&quot;;IF(UPPER(TRIM(&quot;READY TO LIST&quot;))=&quot;ACTIVE PLATFORM EXPOSURE&quot;;&quot;SALE EVIDENCE&quot;;IF(UPPER(TRIM(&quot;READY TO LIST&quot;))=&quot;SOLD&quot;;&quot;FULFILLMENT PREPARATION&quot;;IF(UPPER(TRIM(&quot;READY TO LIST&quot;))=&quot;READY FOR SHIPMENT&quot;;&quot;SHIPMENT EVIDENCE&quot;;IF(UPPER(TRIM(&quot;READY TO LIST&quot;))=&quot;SHIPPED&quot;;&quot;DELIVERY EVIDENCE&quot;;IF(UPPER(TRIM(&quot;READY TO LIST&quot;))=&quot;DELIVERED&quot;;&quot;SETTLEMENT EVIDENCE&quot;;IF(UPPER(TRIM(&quot;READY TO LIST&quot;))=&quot;PAID OUT&quot;;&quot;COMPLETION CROSS-CHECK&quot;;IF(UPPER(TRIM(&quot;READY TO LIST&quot;))=&quot;COMPLETE&quot;;&quot;NONE · TERMINAL STATE&quot;;&quot;UNMAPPED STATE&quot;)))))))))))" office:value-type="string" office:string-value="LISTING RECORD" ns42:value-type="string" table:number-columns-spanned="3" table:number-rows-spanned="1">
            <text:p>LISTING RECORD</text:p>
          </table:table-cell>
          <table:covered-table-cell table:number-columns-repeated="2" table:style-name="ce54"/>
          <table:table-cell table:style-name="ce54" table:formula="of:=IF(UPPER(TRIM(&quot;READY TO LIST&quot;))=&quot;PREPARATION NEEDED&quot;;&quot;SUPPORTED PREPARATION EVIDENCE&quot;;IF(UPPER(TRIM(&quot;READY TO LIST&quot;))=&quot;READY TO LIST&quot;;&quot;SUPPORTED LISTING INTENT EVIDENCE&quot;;IF(UPPER(TRIM(&quot;READY TO LIST&quot;))=&quot;READY FOR PUBLICATION&quot;;&quot;SUPPORTED PUBLICATION AUTHORIZATION EVIDENCE&quot;;IF(UPPER(TRIM(&quot;READY TO LIST&quot;))=&quot;PUBLISHED&quot;;&quot;FACTUAL PUBLICATION OR EXPOSURE RESULT&quot;;IF(UPPER(TRIM(&quot;READY TO LIST&quot;))=&quot;ACTIVE PLATFORM EXPOSURE&quot;;&quot;FACTUAL SALE RESULT&quot;;IF(UPPER(TRIM(&quot;READY TO LIST&quot;))=&quot;SOLD&quot;;&quot;SUPPORTED PACKAGING + SHIPMENT PATH REVIEW&quot;;IF(UPPER(TRIM(&quot;READY TO LIST&quot;))=&quot;READY FOR SHIPMENT&quot;;&quot;FACTUAL SHIPMENT RESULT&quot;;IF(UPPER(TRIM(&quot;READY TO LIST&quot;))=&quot;SHIPPED&quot;;&quot;FACTUAL DELIVERY RESULT&quot;;IF(UPPER(TRIM(&quot;READY TO LIST&quot;))=&quot;DELIVERED&quot;;&quot;FACTUAL SETTLEMENT EVIDENCE&quot;;IF(UPPER(TRIM(&quot;READY TO LIST&quot;))=&quot;PAID OUT&quot;;&quot;SUPPORTED COMPLETION FACTS&quot;;IF(UPPER(TRIM(&quot;READY TO LIST&quot;))=&quot;COMPLETE&quot;;&quot;NONE · TERMINAL STATE&quot;;&quot;SUPPORTED STATE REVIEW&quot;)))))))))))" office:value-type="string" office:string-value="SUPPORTED LISTING INTENT EVIDENCE" ns42:value-type="string" table:number-columns-spanned="3" table:number-rows-spanned="1">
            <text:p>SUPPORTED LISTING INTENT EVIDENCE</text:p>
          </table:table-cell>
          <table:covered-table-cell table:number-columns-repeated="2" table:style-name="ce54"/>
          <table:table-cell table:style-name="ce54" table:formula="of:=IF(UPPER(TRIM(&quot;READY TO LIST&quot;))=&quot;PREPARATION NEEDED&quot;;&quot;REVIEW ROUTED EVIDENCE&quot;;IF(UPPER(TRIM(&quot;READY TO LIST&quot;))=&quot;READY TO LIST&quot;;&quot;REVIEW LISTING INTENT EVIDENCE&quot;;IF(UPPER(TRIM(&quot;READY TO LIST&quot;))=&quot;READY FOR PUBLICATION&quot;;&quot;REVIEW PUBLICATION AUTHORITY&quot;;IF(UPPER(TRIM(&quot;READY TO LIST&quot;))=&quot;PUBLISHED&quot;;&quot;REVIEW PLATFORM EXPOSURE EVIDENCE&quot;;IF(UPPER(TRIM(&quot;READY TO LIST&quot;))=&quot;ACTIVE PLATFORM EXPOSURE&quot;;&quot;REVIEW SALE EVIDENCE&quot;;IF(UPPER(TRIM(&quot;READY TO LIST&quot;))=&quot;SOLD&quot;;&quot;REVIEW FULFILLMENT EVIDENCE&quot;;IF(UPPER(TRIM(&quot;READY TO LIST&quot;))=&quot;READY FOR SHIPMENT&quot;;&quot;REVIEW SHIPMENT EVIDENCE&quot;;IF(UPPER(TRIM(&quot;READY TO LIST&quot;))=&quot;SHIPPED&quot;;&quot;REVIEW DELIVERY EVIDENCE&quot;;IF(UPPER(TRIM(&quot;READY TO LIST&quot;))=&quot;DELIVERED&quot;;&quot;REVIEW SETTLEMENT EVIDENCE&quot;;IF(UPPER(TRIM(&quot;READY TO LIST&quot;))=&quot;PAID OUT&quot;;&quot;REVIEW COMPLETION EVIDENCE&quot;;IF(UPPER(TRIM(&quot;READY TO LIST&quot;))=&quot;COMPLETE&quot;;&quot;HISTORY REVIEW ONLY&quot;;&quot;REVIEW SELECTED STATE&quot;)))))))))))" office:value-type="string" office:string-value="REVIEW LISTING INTENT EVIDENCE" ns42:value-type="string" table:number-columns-spanned="3" table:number-rows-spanned="1">
            <text:p>REVIEW LISTING INTENT EVIDENCE</text:p>
          </table:table-cell>
          <table:covered-table-cell table:number-columns-repeated="2" table:style-name="ce54"/>
          <table:table-cell table:style-name="ce54" table:formula="of:=IF(UPPER(TRIM(&quot;READY TO LIST&quot;))=&quot;PREPARATION NEEDED&quot;;&quot;PREPARATION ADVANCEMENT · PREVIEW&quot;;IF(UPPER(TRIM(&quot;READY TO LIST&quot;))=&quot;READY TO LIST&quot;;&quot;READY TO LIST → READY FOR PUBLICATION · PREVIEW&quot;;IF(UPPER(TRIM(&quot;READY TO LIST&quot;))=&quot;READY FOR PUBLICATION&quot;;&quot;READY FOR PUBLICATION → PUBLISHED · PREVIEW&quot;;IF(UPPER(TRIM(&quot;READY TO LIST&quot;))=&quot;PUBLISHED&quot;;&quot;PUBLISHED → ACTIVE PLATFORM EXPOSURE · PREVIEW&quot;;IF(UPPER(TRIM(&quot;READY TO LIST&quot;))=&quot;ACTIVE PLATFORM EXPOSURE&quot;;&quot;ACTIVE PLATFORM EXPOSURE → SOLD · PREVIEW&quot;;IF(UPPER(TRIM(&quot;READY TO LIST&quot;))=&quot;SOLD&quot;;&quot;SOLD → READY FOR SHIPMENT · PREVIEW&quot;;IF(UPPER(TRIM(&quot;READY TO LIST&quot;))=&quot;READY FOR SHIPMENT&quot;;&quot;READY FOR SHIPMENT → SHIPPED · PREVIEW&quot;;IF(UPPER(TRIM(&quot;READY TO LIST&quot;))=&quot;SHIPPED&quot;;&quot;SHIPPED → DELIVERED · PREVIEW&quot;;IF(UPPER(TRIM(&quot;READY TO LIST&quot;))=&quot;DELIVERED&quot;;&quot;DELIVERED → PAID OUT · PREVIEW&quot;;IF(UPPER(TRIM(&quot;READY TO LIST&quot;))=&quot;PAID OUT&quot;;&quot;PAID OUT → COMPLETE · PREVIEW&quot;;IF(UPPER(TRIM(&quot;READY TO LIST&quot;))=&quot;COMPLETE&quot;;&quot;NONE · TERMINAL STATE&quot;;&quot;NO TRANSITION PREVIEW&quot;)))))))))))" office:value-type="string" office:string-value="READY TO LIST → READY FOR PUBLICATION · PREVIEW" ns42:value-type="string" table:number-columns-spanned="3" table:number-rows-spanned="1">
            <text:p>READY TO LIST → READY FOR PUBLICATION · PREVIEW</text:p>
          </table:table-cell>
          <table:covered-table-cell table:number-columns-repeated="2" table:style-name="ce54"/>
        </table:table-row>
        <table:table-row table:style-name="ro5">
          <table:table-cell table:style-name="ce54" office:value-type="string" ns42:value-type="string" table:number-columns-spanned="3" table:number-rows-spanned="1">
            <text:p>SOLD</text:p>
          </table:table-cell>
          <table:covered-table-cell table:number-columns-repeated="2" table:style-name="ce54"/>
          <table:table-cell table:style-name="ce54" table:formula="of:=IF(UPPER(TRIM(&quot;SOLD&quot;))=&quot;PREPARATION NEEDED&quot;;&quot;COMPLETE NEXT PREPARATION RESPONSIBILITY&quot;;IF(UPPER(TRIM(&quot;SOLD&quot;))=&quot;READY TO LIST&quot;;&quot;CONFIRM LISTING INTENT&quot;;IF(UPPER(TRIM(&quot;SOLD&quot;))=&quot;READY FOR PUBLICATION&quot;;&quot;AUTHORIZE PUBLICATION&quot;;IF(UPPER(TRIM(&quot;SOLD&quot;))=&quot;PUBLISHED&quot;;&quot;REVIEW PLATFORM EXPOSURE&quot;;IF(UPPER(TRIM(&quot;SOLD&quot;))=&quot;ACTIVE PLATFORM EXPOSURE&quot;;&quot;OBSERVE SALE EVIDENCE&quot;;IF(UPPER(TRIM(&quot;SOLD&quot;))=&quot;SOLD&quot;;&quot;REVIEW FULFILLMENT PREPARATION&quot;;IF(UPPER(TRIM(&quot;SOLD&quot;))=&quot;READY FOR SHIPMENT&quot;;&quot;RECORD SHIPMENT RESULT&quot;;IF(UPPER(TRIM(&quot;SOLD&quot;))=&quot;SHIPPED&quot;;&quot;REVIEW DELIVERY EVIDENCE&quot;;IF(UPPER(TRIM(&quot;SOLD&quot;))=&quot;DELIVERED&quot;;&quot;REVIEW SETTLEMENT EVIDENCE&quot;;IF(UPPER(TRIM(&quot;SOLD&quot;))=&quot;PAID OUT&quot;;&quot;REVIEW LIFECYCLE COMPLETION&quot;;IF(UPPER(TRIM(&quot;SOLD&quot;))=&quot;COMPLETE&quot;;&quot;NO NEXT LIFECYCLE ACTION&quot;;&quot;REVIEW REQUIRED&quot;)))))))))))" office:value-type="string" office:string-value="REVIEW FULFILLMENT PREPARATION" ns42:value-type="string" table:number-columns-spanned="3" table:number-rows-spanned="1">
            <text:p>REVIEW FULFILLMENT PREPARATION</text:p>
          </table:table-cell>
          <table:covered-table-cell table:number-columns-repeated="2" table:style-name="ce54"/>
          <table:table-cell table:style-name="ce54" table:formula="of:=IF(UPPER(TRIM(&quot;SOLD&quot;))=&quot;PREPARATION NEEDED&quot;;&quot;NEXT READINESS BLOCKER&quot;;IF(UPPER(TRIM(&quot;SOLD&quot;))=&quot;READY TO LIST&quot;;&quot;LISTING RECORD&quot;;IF(UPPER(TRIM(&quot;SOLD&quot;))=&quot;READY FOR PUBLICATION&quot;;&quot;PUBLICATION AUTHORITY&quot;;IF(UPPER(TRIM(&quot;SOLD&quot;))=&quot;PUBLISHED&quot;;&quot;PLATFORM EXPOSURE EVIDENCE&quot;;IF(UPPER(TRIM(&quot;SOLD&quot;))=&quot;ACTIVE PLATFORM EXPOSURE&quot;;&quot;SALE EVIDENCE&quot;;IF(UPPER(TRIM(&quot;SOLD&quot;))=&quot;SOLD&quot;;&quot;FULFILLMENT PREPARATION&quot;;IF(UPPER(TRIM(&quot;SOLD&quot;))=&quot;READY FOR SHIPMENT&quot;;&quot;SHIPMENT EVIDENCE&quot;;IF(UPPER(TRIM(&quot;SOLD&quot;))=&quot;SHIPPED&quot;;&quot;DELIVERY EVIDENCE&quot;;IF(UPPER(TRIM(&quot;SOLD&quot;))=&quot;DELIVERED&quot;;&quot;SETTLEMENT EVIDENCE&quot;;IF(UPPER(TRIM(&quot;SOLD&quot;))=&quot;PAID OUT&quot;;&quot;COMPLETION CROSS-CHECK&quot;;IF(UPPER(TRIM(&quot;SOLD&quot;))=&quot;COMPLETE&quot;;&quot;NONE · TERMINAL STATE&quot;;&quot;UNMAPPED STATE&quot;)))))))))))" office:value-type="string" office:string-value="FULFILLMENT PREPARATION" ns42:value-type="string" table:number-columns-spanned="3" table:number-rows-spanned="1">
            <text:p>FULFILLMENT PREPARATION</text:p>
          </table:table-cell>
          <table:covered-table-cell table:number-columns-repeated="2" table:style-name="ce54"/>
          <table:table-cell table:style-name="ce54" table:formula="of:=IF(UPPER(TRIM(&quot;SOLD&quot;))=&quot;PREPARATION NEEDED&quot;;&quot;SUPPORTED PREPARATION EVIDENCE&quot;;IF(UPPER(TRIM(&quot;SOLD&quot;))=&quot;READY TO LIST&quot;;&quot;SUPPORTED LISTING INTENT EVIDENCE&quot;;IF(UPPER(TRIM(&quot;SOLD&quot;))=&quot;READY FOR PUBLICATION&quot;;&quot;SUPPORTED PUBLICATION AUTHORIZATION EVIDENCE&quot;;IF(UPPER(TRIM(&quot;SOLD&quot;))=&quot;PUBLISHED&quot;;&quot;FACTUAL PUBLICATION OR EXPOSURE RESULT&quot;;IF(UPPER(TRIM(&quot;SOLD&quot;))=&quot;ACTIVE PLATFORM EXPOSURE&quot;;&quot;FACTUAL SALE RESULT&quot;;IF(UPPER(TRIM(&quot;SOLD&quot;))=&quot;SOLD&quot;;&quot;SUPPORTED PACKAGING + SHIPMENT PATH REVIEW&quot;;IF(UPPER(TRIM(&quot;SOLD&quot;))=&quot;READY FOR SHIPMENT&quot;;&quot;FACTUAL SHIPMENT RESULT&quot;;IF(UPPER(TRIM(&quot;SOLD&quot;))=&quot;SHIPPED&quot;;&quot;FACTUAL DELIVERY RESULT&quot;;IF(UPPER(TRIM(&quot;SOLD&quot;))=&quot;DELIVERED&quot;;&quot;FACTUAL SETTLEMENT EVIDENCE&quot;;IF(UPPER(TRIM(&quot;SOLD&quot;))=&quot;PAID OUT&quot;;&quot;SUPPORTED COMPLETION FACTS&quot;;IF(UPPER(TRIM(&quot;SOLD&quot;))=&quot;COMPLETE&quot;;&quot;NONE · TERMINAL STATE&quot;;&quot;SUPPORTED STATE REVIEW&quot;)))))))))))" office:value-type="string" office:string-value="SUPPORTED PACKAGING + SHIPMENT PATH REVIEW" ns42:value-type="string" table:number-columns-spanned="3" table:number-rows-spanned="1">
            <text:p>SUPPORTED PACKAGING + SHIPMENT PATH REVIEW</text:p>
          </table:table-cell>
          <table:covered-table-cell table:number-columns-repeated="2" table:style-name="ce54"/>
          <table:table-cell table:style-name="ce54" table:formula="of:=IF(UPPER(TRIM(&quot;SOLD&quot;))=&quot;PREPARATION NEEDED&quot;;&quot;REVIEW ROUTED EVIDENCE&quot;;IF(UPPER(TRIM(&quot;SOLD&quot;))=&quot;READY TO LIST&quot;;&quot;REVIEW LISTING INTENT EVIDENCE&quot;;IF(UPPER(TRIM(&quot;SOLD&quot;))=&quot;READY FOR PUBLICATION&quot;;&quot;REVIEW PUBLICATION AUTHORITY&quot;;IF(UPPER(TRIM(&quot;SOLD&quot;))=&quot;PUBLISHED&quot;;&quot;REVIEW PLATFORM EXPOSURE EVIDENCE&quot;;IF(UPPER(TRIM(&quot;SOLD&quot;))=&quot;ACTIVE PLATFORM EXPOSURE&quot;;&quot;REVIEW SALE EVIDENCE&quot;;IF(UPPER(TRIM(&quot;SOLD&quot;))=&quot;SOLD&quot;;&quot;REVIEW FULFILLMENT EVIDENCE&quot;;IF(UPPER(TRIM(&quot;SOLD&quot;))=&quot;READY FOR SHIPMENT&quot;;&quot;REVIEW SHIPMENT EVIDENCE&quot;;IF(UPPER(TRIM(&quot;SOLD&quot;))=&quot;SHIPPED&quot;;&quot;REVIEW DELIVERY EVIDENCE&quot;;IF(UPPER(TRIM(&quot;SOLD&quot;))=&quot;DELIVERED&quot;;&quot;REVIEW SETTLEMENT EVIDENCE&quot;;IF(UPPER(TRIM(&quot;SOLD&quot;))=&quot;PAID OUT&quot;;&quot;REVIEW COMPLETION EVIDENCE&quot;;IF(UPPER(TRIM(&quot;SOLD&quot;))=&quot;COMPLETE&quot;;&quot;HISTORY REVIEW ONLY&quot;;&quot;REVIEW SELECTED STATE&quot;)))))))))))" office:value-type="string" office:string-value="REVIEW FULFILLMENT EVIDENCE" ns42:value-type="string" table:number-columns-spanned="3" table:number-rows-spanned="1">
            <text:p>REVIEW FULFILLMENT EVIDENCE</text:p>
          </table:table-cell>
          <table:covered-table-cell table:number-columns-repeated="2" table:style-name="ce54"/>
          <table:table-cell table:style-name="ce54" table:formula="of:=IF(UPPER(TRIM(&quot;SOLD&quot;))=&quot;PREPARATION NEEDED&quot;;&quot;PREPARATION ADVANCEMENT · PREVIEW&quot;;IF(UPPER(TRIM(&quot;SOLD&quot;))=&quot;READY TO LIST&quot;;&quot;READY TO LIST → READY FOR PUBLICATION · PREVIEW&quot;;IF(UPPER(TRIM(&quot;SOLD&quot;))=&quot;READY FOR PUBLICATION&quot;;&quot;READY FOR PUBLICATION → PUBLISHED · PREVIEW&quot;;IF(UPPER(TRIM(&quot;SOLD&quot;))=&quot;PUBLISHED&quot;;&quot;PUBLISHED → ACTIVE PLATFORM EXPOSURE · PREVIEW&quot;;IF(UPPER(TRIM(&quot;SOLD&quot;))=&quot;ACTIVE PLATFORM EXPOSURE&quot;;&quot;ACTIVE PLATFORM EXPOSURE → SOLD · PREVIEW&quot;;IF(UPPER(TRIM(&quot;SOLD&quot;))=&quot;SOLD&quot;;&quot;SOLD → READY FOR SHIPMENT · PREVIEW&quot;;IF(UPPER(TRIM(&quot;SOLD&quot;))=&quot;READY FOR SHIPMENT&quot;;&quot;READY FOR SHIPMENT → SHIPPED · PREVIEW&quot;;IF(UPPER(TRIM(&quot;SOLD&quot;))=&quot;SHIPPED&quot;;&quot;SHIPPED → DELIVERED · PREVIEW&quot;;IF(UPPER(TRIM(&quot;SOLD&quot;))=&quot;DELIVERED&quot;;&quot;DELIVERED → PAID OUT · PREVIEW&quot;;IF(UPPER(TRIM(&quot;SOLD&quot;))=&quot;PAID OUT&quot;;&quot;PAID OUT → COMPLETE · PREVIEW&quot;;IF(UPPER(TRIM(&quot;SOLD&quot;))=&quot;COMPLETE&quot;;&quot;NONE · TERMINAL STATE&quot;;&quot;NO TRANSITION PREVIEW&quot;)))))))))))" office:value-type="string" office:string-value="SOLD → READY FOR SHIPMENT · PREVIEW" ns42:value-type="string" table:number-columns-spanned="3" table:number-rows-spanned="1">
            <text:p>SOLD → READY FOR SHIPMENT · PREVIEW</text:p>
          </table:table-cell>
          <table:covered-table-cell table:number-columns-repeated="2" table:style-name="ce54"/>
        </table:table-row>
        <table:table-row table:style-name="ro5">
          <table:table-cell table:style-name="ce54" office:value-type="string" ns42:value-type="string" table:number-columns-spanned="3" table:number-rows-spanned="1">
            <text:p>SHIPPED</text:p>
          </table:table-cell>
          <table:covered-table-cell table:number-columns-repeated="2" table:style-name="ce54"/>
          <table:table-cell table:style-name="ce54" table:formula="of:=IF(UPPER(TRIM(&quot;SHIPPED&quot;))=&quot;PREPARATION NEEDED&quot;;&quot;COMPLETE NEXT PREPARATION RESPONSIBILITY&quot;;IF(UPPER(TRIM(&quot;SHIPPED&quot;))=&quot;READY TO LIST&quot;;&quot;CONFIRM LISTING INTENT&quot;;IF(UPPER(TRIM(&quot;SHIPPED&quot;))=&quot;READY FOR PUBLICATION&quot;;&quot;AUTHORIZE PUBLICATION&quot;;IF(UPPER(TRIM(&quot;SHIPPED&quot;))=&quot;PUBLISHED&quot;;&quot;REVIEW PLATFORM EXPOSURE&quot;;IF(UPPER(TRIM(&quot;SHIPPED&quot;))=&quot;ACTIVE PLATFORM EXPOSURE&quot;;&quot;OBSERVE SALE EVIDENCE&quot;;IF(UPPER(TRIM(&quot;SHIPPED&quot;))=&quot;SOLD&quot;;&quot;REVIEW FULFILLMENT PREPARATION&quot;;IF(UPPER(TRIM(&quot;SHIPPED&quot;))=&quot;READY FOR SHIPMENT&quot;;&quot;RECORD SHIPMENT RESULT&quot;;IF(UPPER(TRIM(&quot;SHIPPED&quot;))=&quot;SHIPPED&quot;;&quot;REVIEW DELIVERY EVIDENCE&quot;;IF(UPPER(TRIM(&quot;SHIPPED&quot;))=&quot;DELIVERED&quot;;&quot;REVIEW SETTLEMENT EVIDENCE&quot;;IF(UPPER(TRIM(&quot;SHIPPED&quot;))=&quot;PAID OUT&quot;;&quot;REVIEW LIFECYCLE COMPLETION&quot;;IF(UPPER(TRIM(&quot;SHIPPED&quot;))=&quot;COMPLETE&quot;;&quot;NO NEXT LIFECYCLE ACTION&quot;;&quot;REVIEW REQUIRED&quot;)))))))))))" office:value-type="string" office:string-value="REVIEW DELIVERY EVIDENCE" ns42:value-type="string" table:number-columns-spanned="3" table:number-rows-spanned="1">
            <text:p>REVIEW DELIVERY EVIDENCE</text:p>
          </table:table-cell>
          <table:covered-table-cell table:number-columns-repeated="2" table:style-name="ce54"/>
          <table:table-cell table:style-name="ce54" table:formula="of:=IF(UPPER(TRIM(&quot;SHIPPED&quot;))=&quot;PREPARATION NEEDED&quot;;&quot;NEXT READINESS BLOCKER&quot;;IF(UPPER(TRIM(&quot;SHIPPED&quot;))=&quot;READY TO LIST&quot;;&quot;LISTING RECORD&quot;;IF(UPPER(TRIM(&quot;SHIPPED&quot;))=&quot;READY FOR PUBLICATION&quot;;&quot;PUBLICATION AUTHORITY&quot;;IF(UPPER(TRIM(&quot;SHIPPED&quot;))=&quot;PUBLISHED&quot;;&quot;PLATFORM EXPOSURE EVIDENCE&quot;;IF(UPPER(TRIM(&quot;SHIPPED&quot;))=&quot;ACTIVE PLATFORM EXPOSURE&quot;;&quot;SALE EVIDENCE&quot;;IF(UPPER(TRIM(&quot;SHIPPED&quot;))=&quot;SOLD&quot;;&quot;FULFILLMENT PREPARATION&quot;;IF(UPPER(TRIM(&quot;SHIPPED&quot;))=&quot;READY FOR SHIPMENT&quot;;&quot;SHIPMENT EVIDENCE&quot;;IF(UPPER(TRIM(&quot;SHIPPED&quot;))=&quot;SHIPPED&quot;;&quot;DELIVERY EVIDENCE&quot;;IF(UPPER(TRIM(&quot;SHIPPED&quot;))=&quot;DELIVERED&quot;;&quot;SETTLEMENT EVIDENCE&quot;;IF(UPPER(TRIM(&quot;SHIPPED&quot;))=&quot;PAID OUT&quot;;&quot;COMPLETION CROSS-CHECK&quot;;IF(UPPER(TRIM(&quot;SHIPPED&quot;))=&quot;COMPLETE&quot;;&quot;NONE · TERMINAL STATE&quot;;&quot;UNMAPPED STATE&quot;)))))))))))" office:value-type="string" office:string-value="DELIVERY EVIDENCE" ns42:value-type="string" table:number-columns-spanned="3" table:number-rows-spanned="1">
            <text:p>DELIVERY EVIDENCE</text:p>
          </table:table-cell>
          <table:covered-table-cell table:number-columns-repeated="2" table:style-name="ce54"/>
          <table:table-cell table:style-name="ce54" table:formula="of:=IF(UPPER(TRIM(&quot;SHIPPED&quot;))=&quot;PREPARATION NEEDED&quot;;&quot;SUPPORTED PREPARATION EVIDENCE&quot;;IF(UPPER(TRIM(&quot;SHIPPED&quot;))=&quot;READY TO LIST&quot;;&quot;SUPPORTED LISTING INTENT EVIDENCE&quot;;IF(UPPER(TRIM(&quot;SHIPPED&quot;))=&quot;READY FOR PUBLICATION&quot;;&quot;SUPPORTED PUBLICATION AUTHORIZATION EVIDENCE&quot;;IF(UPPER(TRIM(&quot;SHIPPED&quot;))=&quot;PUBLISHED&quot;;&quot;FACTUAL PUBLICATION OR EXPOSURE RESULT&quot;;IF(UPPER(TRIM(&quot;SHIPPED&quot;))=&quot;ACTIVE PLATFORM EXPOSURE&quot;;&quot;FACTUAL SALE RESULT&quot;;IF(UPPER(TRIM(&quot;SHIPPED&quot;))=&quot;SOLD&quot;;&quot;SUPPORTED PACKAGING + SHIPMENT PATH REVIEW&quot;;IF(UPPER(TRIM(&quot;SHIPPED&quot;))=&quot;READY FOR SHIPMENT&quot;;&quot;FACTUAL SHIPMENT RESULT&quot;;IF(UPPER(TRIM(&quot;SHIPPED&quot;))=&quot;SHIPPED&quot;;&quot;FACTUAL DELIVERY RESULT&quot;;IF(UPPER(TRIM(&quot;SHIPPED&quot;))=&quot;DELIVERED&quot;;&quot;FACTUAL SETTLEMENT EVIDENCE&quot;;IF(UPPER(TRIM(&quot;SHIPPED&quot;))=&quot;PAID OUT&quot;;&quot;SUPPORTED COMPLETION FACTS&quot;;IF(UPPER(TRIM(&quot;SHIPPED&quot;))=&quot;COMPLETE&quot;;&quot;NONE · TERMINAL STATE&quot;;&quot;SUPPORTED STATE REVIEW&quot;)))))))))))" office:value-type="string" office:string-value="FACTUAL DELIVERY RESULT" ns42:value-type="string" table:number-columns-spanned="3" table:number-rows-spanned="1">
            <text:p>FACTUAL DELIVERY RESULT</text:p>
          </table:table-cell>
          <table:covered-table-cell table:number-columns-repeated="2" table:style-name="ce54"/>
          <table:table-cell table:style-name="ce54" table:formula="of:=IF(UPPER(TRIM(&quot;SHIPPED&quot;))=&quot;PREPARATION NEEDED&quot;;&quot;REVIEW ROUTED EVIDENCE&quot;;IF(UPPER(TRIM(&quot;SHIPPED&quot;))=&quot;READY TO LIST&quot;;&quot;REVIEW LISTING INTENT EVIDENCE&quot;;IF(UPPER(TRIM(&quot;SHIPPED&quot;))=&quot;READY FOR PUBLICATION&quot;;&quot;REVIEW PUBLICATION AUTHORITY&quot;;IF(UPPER(TRIM(&quot;SHIPPED&quot;))=&quot;PUBLISHED&quot;;&quot;REVIEW PLATFORM EXPOSURE EVIDENCE&quot;;IF(UPPER(TRIM(&quot;SHIPPED&quot;))=&quot;ACTIVE PLATFORM EXPOSURE&quot;;&quot;REVIEW SALE EVIDENCE&quot;;IF(UPPER(TRIM(&quot;SHIPPED&quot;))=&quot;SOLD&quot;;&quot;REVIEW FULFILLMENT EVIDENCE&quot;;IF(UPPER(TRIM(&quot;SHIPPED&quot;))=&quot;READY FOR SHIPMENT&quot;;&quot;REVIEW SHIPMENT EVIDENCE&quot;;IF(UPPER(TRIM(&quot;SHIPPED&quot;))=&quot;SHIPPED&quot;;&quot;REVIEW DELIVERY EVIDENCE&quot;;IF(UPPER(TRIM(&quot;SHIPPED&quot;))=&quot;DELIVERED&quot;;&quot;REVIEW SETTLEMENT EVIDENCE&quot;;IF(UPPER(TRIM(&quot;SHIPPED&quot;))=&quot;PAID OUT&quot;;&quot;REVIEW COMPLETION EVIDENCE&quot;;IF(UPPER(TRIM(&quot;SHIPPED&quot;))=&quot;COMPLETE&quot;;&quot;HISTORY REVIEW ONLY&quot;;&quot;REVIEW SELECTED STATE&quot;)))))))))))" office:value-type="string" office:string-value="REVIEW DELIVERY EVIDENCE" ns42:value-type="string" table:number-columns-spanned="3" table:number-rows-spanned="1">
            <text:p>REVIEW DELIVERY EVIDENCE</text:p>
          </table:table-cell>
          <table:covered-table-cell table:number-columns-repeated="2" table:style-name="ce54"/>
          <table:table-cell table:style-name="ce54" table:formula="of:=IF(UPPER(TRIM(&quot;SHIPPED&quot;))=&quot;PREPARATION NEEDED&quot;;&quot;PREPARATION ADVANCEMENT · PREVIEW&quot;;IF(UPPER(TRIM(&quot;SHIPPED&quot;))=&quot;READY TO LIST&quot;;&quot;READY TO LIST → READY FOR PUBLICATION · PREVIEW&quot;;IF(UPPER(TRIM(&quot;SHIPPED&quot;))=&quot;READY FOR PUBLICATION&quot;;&quot;READY FOR PUBLICATION → PUBLISHED · PREVIEW&quot;;IF(UPPER(TRIM(&quot;SHIPPED&quot;))=&quot;PUBLISHED&quot;;&quot;PUBLISHED → ACTIVE PLATFORM EXPOSURE · PREVIEW&quot;;IF(UPPER(TRIM(&quot;SHIPPED&quot;))=&quot;ACTIVE PLATFORM EXPOSURE&quot;;&quot;ACTIVE PLATFORM EXPOSURE → SOLD · PREVIEW&quot;;IF(UPPER(TRIM(&quot;SHIPPED&quot;))=&quot;SOLD&quot;;&quot;SOLD → READY FOR SHIPMENT · PREVIEW&quot;;IF(UPPER(TRIM(&quot;SHIPPED&quot;))=&quot;READY FOR SHIPMENT&quot;;&quot;READY FOR SHIPMENT → SHIPPED · PREVIEW&quot;;IF(UPPER(TRIM(&quot;SHIPPED&quot;))=&quot;SHIPPED&quot;;&quot;SHIPPED → DELIVERED · PREVIEW&quot;;IF(UPPER(TRIM(&quot;SHIPPED&quot;))=&quot;DELIVERED&quot;;&quot;DELIVERED → PAID OUT · PREVIEW&quot;;IF(UPPER(TRIM(&quot;SHIPPED&quot;))=&quot;PAID OUT&quot;;&quot;PAID OUT → COMPLETE · PREVIEW&quot;;IF(UPPER(TRIM(&quot;SHIPPED&quot;))=&quot;COMPLETE&quot;;&quot;NONE · TERMINAL STATE&quot;;&quot;NO TRANSITION PREVIEW&quot;)))))))))))" office:value-type="string" office:string-value="SHIPPED → DELIVERED · PREVIEW" ns42:value-type="string" table:number-columns-spanned="3" table:number-rows-spanned="1">
            <text:p>SHIPPED → DELIVERED · PREVIEW</text:p>
          </table:table-cell>
          <table:covered-table-cell table:number-columns-repeated="2" table:style-name="ce54"/>
        </table:table-row>
        <table:table-row table:style-name="ro5">
          <table:table-cell table:style-name="ce54" office:value-type="string" ns42:value-type="string" table:number-columns-spanned="3" table:number-rows-spanned="1">
            <text:p>DELIVERED</text:p>
          </table:table-cell>
          <table:covered-table-cell table:number-columns-repeated="2" table:style-name="ce54"/>
          <table:table-cell table:style-name="ce54" table:formula="of:=IF(UPPER(TRIM(&quot;DELIVERED&quot;))=&quot;PREPARATION NEEDED&quot;;&quot;COMPLETE NEXT PREPARATION RESPONSIBILITY&quot;;IF(UPPER(TRIM(&quot;DELIVERED&quot;))=&quot;READY TO LIST&quot;;&quot;CONFIRM LISTING INTENT&quot;;IF(UPPER(TRIM(&quot;DELIVERED&quot;))=&quot;READY FOR PUBLICATION&quot;;&quot;AUTHORIZE PUBLICATION&quot;;IF(UPPER(TRIM(&quot;DELIVERED&quot;))=&quot;PUBLISHED&quot;;&quot;REVIEW PLATFORM EXPOSURE&quot;;IF(UPPER(TRIM(&quot;DELIVERED&quot;))=&quot;ACTIVE PLATFORM EXPOSURE&quot;;&quot;OBSERVE SALE EVIDENCE&quot;;IF(UPPER(TRIM(&quot;DELIVERED&quot;))=&quot;SOLD&quot;;&quot;REVIEW FULFILLMENT PREPARATION&quot;;IF(UPPER(TRIM(&quot;DELIVERED&quot;))=&quot;READY FOR SHIPMENT&quot;;&quot;RECORD SHIPMENT RESULT&quot;;IF(UPPER(TRIM(&quot;DELIVERED&quot;))=&quot;SHIPPED&quot;;&quot;REVIEW DELIVERY EVIDENCE&quot;;IF(UPPER(TRIM(&quot;DELIVERED&quot;))=&quot;DELIVERED&quot;;&quot;REVIEW SETTLEMENT EVIDENCE&quot;;IF(UPPER(TRIM(&quot;DELIVERED&quot;))=&quot;PAID OUT&quot;;&quot;REVIEW LIFECYCLE COMPLETION&quot;;IF(UPPER(TRIM(&quot;DELIVERED&quot;))=&quot;COMPLETE&quot;;&quot;NO NEXT LIFECYCLE ACTION&quot;;&quot;REVIEW REQUIRED&quot;)))))))))))" office:value-type="string" office:string-value="REVIEW SETTLEMENT EVIDENCE" ns42:value-type="string" table:number-columns-spanned="3" table:number-rows-spanned="1">
            <text:p>REVIEW SETTLEMENT EVIDENCE</text:p>
          </table:table-cell>
          <table:covered-table-cell table:number-columns-repeated="2" table:style-name="ce54"/>
          <table:table-cell table:style-name="ce54" table:formula="of:=IF(UPPER(TRIM(&quot;DELIVERED&quot;))=&quot;PREPARATION NEEDED&quot;;&quot;NEXT READINESS BLOCKER&quot;;IF(UPPER(TRIM(&quot;DELIVERED&quot;))=&quot;READY TO LIST&quot;;&quot;LISTING RECORD&quot;;IF(UPPER(TRIM(&quot;DELIVERED&quot;))=&quot;READY FOR PUBLICATION&quot;;&quot;PUBLICATION AUTHORITY&quot;;IF(UPPER(TRIM(&quot;DELIVERED&quot;))=&quot;PUBLISHED&quot;;&quot;PLATFORM EXPOSURE EVIDENCE&quot;;IF(UPPER(TRIM(&quot;DELIVERED&quot;))=&quot;ACTIVE PLATFORM EXPOSURE&quot;;&quot;SALE EVIDENCE&quot;;IF(UPPER(TRIM(&quot;DELIVERED&quot;))=&quot;SOLD&quot;;&quot;FULFILLMENT PREPARATION&quot;;IF(UPPER(TRIM(&quot;DELIVERED&quot;))=&quot;READY FOR SHIPMENT&quot;;&quot;SHIPMENT EVIDENCE&quot;;IF(UPPER(TRIM(&quot;DELIVERED&quot;))=&quot;SHIPPED&quot;;&quot;DELIVERY EVIDENCE&quot;;IF(UPPER(TRIM(&quot;DELIVERED&quot;))=&quot;DELIVERED&quot;;&quot;SETTLEMENT EVIDENCE&quot;;IF(UPPER(TRIM(&quot;DELIVERED&quot;))=&quot;PAID OUT&quot;;&quot;COMPLETION CROSS-CHECK&quot;;IF(UPPER(TRIM(&quot;DELIVERED&quot;))=&quot;COMPLETE&quot;;&quot;NONE · TERMINAL STATE&quot;;&quot;UNMAPPED STATE&quot;)))))))))))" office:value-type="string" office:string-value="SETTLEMENT EVIDENCE" ns42:value-type="string" table:number-columns-spanned="3" table:number-rows-spanned="1">
            <text:p>SETTLEMENT EVIDENCE</text:p>
          </table:table-cell>
          <table:covered-table-cell table:number-columns-repeated="2" table:style-name="ce54"/>
          <table:table-cell table:style-name="ce54" table:formula="of:=IF(UPPER(TRIM(&quot;DELIVERED&quot;))=&quot;PREPARATION NEEDED&quot;;&quot;SUPPORTED PREPARATION EVIDENCE&quot;;IF(UPPER(TRIM(&quot;DELIVERED&quot;))=&quot;READY TO LIST&quot;;&quot;SUPPORTED LISTING INTENT EVIDENCE&quot;;IF(UPPER(TRIM(&quot;DELIVERED&quot;))=&quot;READY FOR PUBLICATION&quot;;&quot;SUPPORTED PUBLICATION AUTHORIZATION EVIDENCE&quot;;IF(UPPER(TRIM(&quot;DELIVERED&quot;))=&quot;PUBLISHED&quot;;&quot;FACTUAL PUBLICATION OR EXPOSURE RESULT&quot;;IF(UPPER(TRIM(&quot;DELIVERED&quot;))=&quot;ACTIVE PLATFORM EXPOSURE&quot;;&quot;FACTUAL SALE RESULT&quot;;IF(UPPER(TRIM(&quot;DELIVERED&quot;))=&quot;SOLD&quot;;&quot;SUPPORTED PACKAGING + SHIPMENT PATH REVIEW&quot;;IF(UPPER(TRIM(&quot;DELIVERED&quot;))=&quot;READY FOR SHIPMENT&quot;;&quot;FACTUAL SHIPMENT RESULT&quot;;IF(UPPER(TRIM(&quot;DELIVERED&quot;))=&quot;SHIPPED&quot;;&quot;FACTUAL DELIVERY RESULT&quot;;IF(UPPER(TRIM(&quot;DELIVERED&quot;))=&quot;DELIVERED&quot;;&quot;FACTUAL SETTLEMENT EVIDENCE&quot;;IF(UPPER(TRIM(&quot;DELIVERED&quot;))=&quot;PAID OUT&quot;;&quot;SUPPORTED COMPLETION FACTS&quot;;IF(UPPER(TRIM(&quot;DELIVERED&quot;))=&quot;COMPLETE&quot;;&quot;NONE · TERMINAL STATE&quot;;&quot;SUPPORTED STATE REVIEW&quot;)))))))))))" office:value-type="string" office:string-value="FACTUAL SETTLEMENT EVIDENCE" ns42:value-type="string" table:number-columns-spanned="3" table:number-rows-spanned="1">
            <text:p>FACTUAL SETTLEMENT EVIDENCE</text:p>
          </table:table-cell>
          <table:covered-table-cell table:number-columns-repeated="2" table:style-name="ce54"/>
          <table:table-cell table:style-name="ce54" table:formula="of:=IF(UPPER(TRIM(&quot;DELIVERED&quot;))=&quot;PREPARATION NEEDED&quot;;&quot;REVIEW ROUTED EVIDENCE&quot;;IF(UPPER(TRIM(&quot;DELIVERED&quot;))=&quot;READY TO LIST&quot;;&quot;REVIEW LISTING INTENT EVIDENCE&quot;;IF(UPPER(TRIM(&quot;DELIVERED&quot;))=&quot;READY FOR PUBLICATION&quot;;&quot;REVIEW PUBLICATION AUTHORITY&quot;;IF(UPPER(TRIM(&quot;DELIVERED&quot;))=&quot;PUBLISHED&quot;;&quot;REVIEW PLATFORM EXPOSURE EVIDENCE&quot;;IF(UPPER(TRIM(&quot;DELIVERED&quot;))=&quot;ACTIVE PLATFORM EXPOSURE&quot;;&quot;REVIEW SALE EVIDENCE&quot;;IF(UPPER(TRIM(&quot;DELIVERED&quot;))=&quot;SOLD&quot;;&quot;REVIEW FULFILLMENT EVIDENCE&quot;;IF(UPPER(TRIM(&quot;DELIVERED&quot;))=&quot;READY FOR SHIPMENT&quot;;&quot;REVIEW SHIPMENT EVIDENCE&quot;;IF(UPPER(TRIM(&quot;DELIVERED&quot;))=&quot;SHIPPED&quot;;&quot;REVIEW DELIVERY EVIDENCE&quot;;IF(UPPER(TRIM(&quot;DELIVERED&quot;))=&quot;DELIVERED&quot;;&quot;REVIEW SETTLEMENT EVIDENCE&quot;;IF(UPPER(TRIM(&quot;DELIVERED&quot;))=&quot;PAID OUT&quot;;&quot;REVIEW COMPLETION EVIDENCE&quot;;IF(UPPER(TRIM(&quot;DELIVERED&quot;))=&quot;COMPLETE&quot;;&quot;HISTORY REVIEW ONLY&quot;;&quot;REVIEW SELECTED STATE&quot;)))))))))))" office:value-type="string" office:string-value="REVIEW SETTLEMENT EVIDENCE" ns42:value-type="string" table:number-columns-spanned="3" table:number-rows-spanned="1">
            <text:p>REVIEW SETTLEMENT EVIDENCE</text:p>
          </table:table-cell>
          <table:covered-table-cell table:number-columns-repeated="2" table:style-name="ce54"/>
          <table:table-cell table:style-name="ce54" table:formula="of:=IF(UPPER(TRIM(&quot;DELIVERED&quot;))=&quot;PREPARATION NEEDED&quot;;&quot;PREPARATION ADVANCEMENT · PREVIEW&quot;;IF(UPPER(TRIM(&quot;DELIVERED&quot;))=&quot;READY TO LIST&quot;;&quot;READY TO LIST → READY FOR PUBLICATION · PREVIEW&quot;;IF(UPPER(TRIM(&quot;DELIVERED&quot;))=&quot;READY FOR PUBLICATION&quot;;&quot;READY FOR PUBLICATION → PUBLISHED · PREVIEW&quot;;IF(UPPER(TRIM(&quot;DELIVERED&quot;))=&quot;PUBLISHED&quot;;&quot;PUBLISHED → ACTIVE PLATFORM EXPOSURE · PREVIEW&quot;;IF(UPPER(TRIM(&quot;DELIVERED&quot;))=&quot;ACTIVE PLATFORM EXPOSURE&quot;;&quot;ACTIVE PLATFORM EXPOSURE → SOLD · PREVIEW&quot;;IF(UPPER(TRIM(&quot;DELIVERED&quot;))=&quot;SOLD&quot;;&quot;SOLD → READY FOR SHIPMENT · PREVIEW&quot;;IF(UPPER(TRIM(&quot;DELIVERED&quot;))=&quot;READY FOR SHIPMENT&quot;;&quot;READY FOR SHIPMENT → SHIPPED · PREVIEW&quot;;IF(UPPER(TRIM(&quot;DELIVERED&quot;))=&quot;SHIPPED&quot;;&quot;SHIPPED → DELIVERED · PREVIEW&quot;;IF(UPPER(TRIM(&quot;DELIVERED&quot;))=&quot;DELIVERED&quot;;&quot;DELIVERED → PAID OUT · PREVIEW&quot;;IF(UPPER(TRIM(&quot;DELIVERED&quot;))=&quot;PAID OUT&quot;;&quot;PAID OUT → COMPLETE · PREVIEW&quot;;IF(UPPER(TRIM(&quot;DELIVERED&quot;))=&quot;COMPLETE&quot;;&quot;NONE · TERMINAL STATE&quot;;&quot;NO TRANSITION PREVIEW&quot;)))))))))))" office:value-type="string" office:string-value="DELIVERED → PAID OUT · PREVIEW" ns42:value-type="string" table:number-columns-spanned="3" table:number-rows-spanned="1">
            <text:p>DELIVERED → PAID OUT · PREVIEW</text:p>
          </table:table-cell>
          <table:covered-table-cell table:number-columns-repeated="2" table:style-name="ce54"/>
        </table:table-row>
        <table:table-row table:style-name="ro5">
          <table:table-cell table:style-name="ce54" office:value-type="string" ns42:value-type="string" table:number-columns-spanned="3" table:number-rows-spanned="1">
            <text:p>PAID OUT</text:p>
          </table:table-cell>
          <table:covered-table-cell table:number-columns-repeated="2" table:style-name="ce54"/>
          <table:table-cell table:style-name="ce54" table:formula="of:=IF(UPPER(TRIM(&quot;PAID OUT&quot;))=&quot;PREPARATION NEEDED&quot;;&quot;COMPLETE NEXT PREPARATION RESPONSIBILITY&quot;;IF(UPPER(TRIM(&quot;PAID OUT&quot;))=&quot;READY TO LIST&quot;;&quot;CONFIRM LISTING INTENT&quot;;IF(UPPER(TRIM(&quot;PAID OUT&quot;))=&quot;READY FOR PUBLICATION&quot;;&quot;AUTHORIZE PUBLICATION&quot;;IF(UPPER(TRIM(&quot;PAID OUT&quot;))=&quot;PUBLISHED&quot;;&quot;REVIEW PLATFORM EXPOSURE&quot;;IF(UPPER(TRIM(&quot;PAID OUT&quot;))=&quot;ACTIVE PLATFORM EXPOSURE&quot;;&quot;OBSERVE SALE EVIDENCE&quot;;IF(UPPER(TRIM(&quot;PAID OUT&quot;))=&quot;SOLD&quot;;&quot;REVIEW FULFILLMENT PREPARATION&quot;;IF(UPPER(TRIM(&quot;PAID OUT&quot;))=&quot;READY FOR SHIPMENT&quot;;&quot;RECORD SHIPMENT RESULT&quot;;IF(UPPER(TRIM(&quot;PAID OUT&quot;))=&quot;SHIPPED&quot;;&quot;REVIEW DELIVERY EVIDENCE&quot;;IF(UPPER(TRIM(&quot;PAID OUT&quot;))=&quot;DELIVERED&quot;;&quot;REVIEW SETTLEMENT EVIDENCE&quot;;IF(UPPER(TRIM(&quot;PAID OUT&quot;))=&quot;PAID OUT&quot;;&quot;REVIEW LIFECYCLE COMPLETION&quot;;IF(UPPER(TRIM(&quot;PAID OUT&quot;))=&quot;COMPLETE&quot;;&quot;NO NEXT LIFECYCLE ACTION&quot;;&quot;REVIEW REQUIRED&quot;)))))))))))" office:value-type="string" office:string-value="REVIEW LIFECYCLE COMPLETION" ns42:value-type="string" table:number-columns-spanned="3" table:number-rows-spanned="1">
            <text:p>REVIEW LIFECYCLE COMPLETION</text:p>
          </table:table-cell>
          <table:covered-table-cell table:number-columns-repeated="2" table:style-name="ce54"/>
          <table:table-cell table:style-name="ce54" table:formula="of:=IF(UPPER(TRIM(&quot;PAID OUT&quot;))=&quot;PREPARATION NEEDED&quot;;&quot;NEXT READINESS BLOCKER&quot;;IF(UPPER(TRIM(&quot;PAID OUT&quot;))=&quot;READY TO LIST&quot;;&quot;LISTING RECORD&quot;;IF(UPPER(TRIM(&quot;PAID OUT&quot;))=&quot;READY FOR PUBLICATION&quot;;&quot;PUBLICATION AUTHORITY&quot;;IF(UPPER(TRIM(&quot;PAID OUT&quot;))=&quot;PUBLISHED&quot;;&quot;PLATFORM EXPOSURE EVIDENCE&quot;;IF(UPPER(TRIM(&quot;PAID OUT&quot;))=&quot;ACTIVE PLATFORM EXPOSURE&quot;;&quot;SALE EVIDENCE&quot;;IF(UPPER(TRIM(&quot;PAID OUT&quot;))=&quot;SOLD&quot;;&quot;FULFILLMENT PREPARATION&quot;;IF(UPPER(TRIM(&quot;PAID OUT&quot;))=&quot;READY FOR SHIPMENT&quot;;&quot;SHIPMENT EVIDENCE&quot;;IF(UPPER(TRIM(&quot;PAID OUT&quot;))=&quot;SHIPPED&quot;;&quot;DELIVERY EVIDENCE&quot;;IF(UPPER(TRIM(&quot;PAID OUT&quot;))=&quot;DELIVERED&quot;;&quot;SETTLEMENT EVIDENCE&quot;;IF(UPPER(TRIM(&quot;PAID OUT&quot;))=&quot;PAID OUT&quot;;&quot;COMPLETION CROSS-CHECK&quot;;IF(UPPER(TRIM(&quot;PAID OUT&quot;))=&quot;COMPLETE&quot;;&quot;NONE · TERMINAL STATE&quot;;&quot;UNMAPPED STATE&quot;)))))))))))" office:value-type="string" office:string-value="COMPLETION CROSS-CHECK" ns42:value-type="string" table:number-columns-spanned="3" table:number-rows-spanned="1">
            <text:p>COMPLETION CROSS-CHECK</text:p>
          </table:table-cell>
          <table:covered-table-cell table:number-columns-repeated="2" table:style-name="ce54"/>
          <table:table-cell table:style-name="ce54" table:formula="of:=IF(UPPER(TRIM(&quot;PAID OUT&quot;))=&quot;PREPARATION NEEDED&quot;;&quot;SUPPORTED PREPARATION EVIDENCE&quot;;IF(UPPER(TRIM(&quot;PAID OUT&quot;))=&quot;READY TO LIST&quot;;&quot;SUPPORTED LISTING INTENT EVIDENCE&quot;;IF(UPPER(TRIM(&quot;PAID OUT&quot;))=&quot;READY FOR PUBLICATION&quot;;&quot;SUPPORTED PUBLICATION AUTHORIZATION EVIDENCE&quot;;IF(UPPER(TRIM(&quot;PAID OUT&quot;))=&quot;PUBLISHED&quot;;&quot;FACTUAL PUBLICATION OR EXPOSURE RESULT&quot;;IF(UPPER(TRIM(&quot;PAID OUT&quot;))=&quot;ACTIVE PLATFORM EXPOSURE&quot;;&quot;FACTUAL SALE RESULT&quot;;IF(UPPER(TRIM(&quot;PAID OUT&quot;))=&quot;SOLD&quot;;&quot;SUPPORTED PACKAGING + SHIPMENT PATH REVIEW&quot;;IF(UPPER(TRIM(&quot;PAID OUT&quot;))=&quot;READY FOR SHIPMENT&quot;;&quot;FACTUAL SHIPMENT RESULT&quot;;IF(UPPER(TRIM(&quot;PAID OUT&quot;))=&quot;SHIPPED&quot;;&quot;FACTUAL DELIVERY RESULT&quot;;IF(UPPER(TRIM(&quot;PAID OUT&quot;))=&quot;DELIVERED&quot;;&quot;FACTUAL SETTLEMENT EVIDENCE&quot;;IF(UPPER(TRIM(&quot;PAID OUT&quot;))=&quot;PAID OUT&quot;;&quot;SUPPORTED COMPLETION FACTS&quot;;IF(UPPER(TRIM(&quot;PAID OUT&quot;))=&quot;COMPLETE&quot;;&quot;NONE · TERMINAL STATE&quot;;&quot;SUPPORTED STATE REVIEW&quot;)))))))))))" office:value-type="string" office:string-value="SUPPORTED COMPLETION FACTS" ns42:value-type="string" table:number-columns-spanned="3" table:number-rows-spanned="1">
            <text:p>SUPPORTED COMPLETION FACTS</text:p>
          </table:table-cell>
          <table:covered-table-cell table:number-columns-repeated="2" table:style-name="ce54"/>
          <table:table-cell table:style-name="ce54" table:formula="of:=IF(UPPER(TRIM(&quot;PAID OUT&quot;))=&quot;PREPARATION NEEDED&quot;;&quot;REVIEW ROUTED EVIDENCE&quot;;IF(UPPER(TRIM(&quot;PAID OUT&quot;))=&quot;READY TO LIST&quot;;&quot;REVIEW LISTING INTENT EVIDENCE&quot;;IF(UPPER(TRIM(&quot;PAID OUT&quot;))=&quot;READY FOR PUBLICATION&quot;;&quot;REVIEW PUBLICATION AUTHORITY&quot;;IF(UPPER(TRIM(&quot;PAID OUT&quot;))=&quot;PUBLISHED&quot;;&quot;REVIEW PLATFORM EXPOSURE EVIDENCE&quot;;IF(UPPER(TRIM(&quot;PAID OUT&quot;))=&quot;ACTIVE PLATFORM EXPOSURE&quot;;&quot;REVIEW SALE EVIDENCE&quot;;IF(UPPER(TRIM(&quot;PAID OUT&quot;))=&quot;SOLD&quot;;&quot;REVIEW FULFILLMENT EVIDENCE&quot;;IF(UPPER(TRIM(&quot;PAID OUT&quot;))=&quot;READY FOR SHIPMENT&quot;;&quot;REVIEW SHIPMENT EVIDENCE&quot;;IF(UPPER(TRIM(&quot;PAID OUT&quot;))=&quot;SHIPPED&quot;;&quot;REVIEW DELIVERY EVIDENCE&quot;;IF(UPPER(TRIM(&quot;PAID OUT&quot;))=&quot;DELIVERED&quot;;&quot;REVIEW SETTLEMENT EVIDENCE&quot;;IF(UPPER(TRIM(&quot;PAID OUT&quot;))=&quot;PAID OUT&quot;;&quot;REVIEW COMPLETION EVIDENCE&quot;;IF(UPPER(TRIM(&quot;PAID OUT&quot;))=&quot;COMPLETE&quot;;&quot;HISTORY REVIEW ONLY&quot;;&quot;REVIEW SELECTED STATE&quot;)))))))))))" office:value-type="string" office:string-value="REVIEW COMPLETION EVIDENCE" ns42:value-type="string" table:number-columns-spanned="3" table:number-rows-spanned="1">
            <text:p>REVIEW COMPLETION EVIDENCE</text:p>
          </table:table-cell>
          <table:covered-table-cell table:number-columns-repeated="2" table:style-name="ce54"/>
          <table:table-cell table:style-name="ce54" table:formula="of:=IF(UPPER(TRIM(&quot;PAID OUT&quot;))=&quot;PREPARATION NEEDED&quot;;&quot;PREPARATION ADVANCEMENT · PREVIEW&quot;;IF(UPPER(TRIM(&quot;PAID OUT&quot;))=&quot;READY TO LIST&quot;;&quot;READY TO LIST → READY FOR PUBLICATION · PREVIEW&quot;;IF(UPPER(TRIM(&quot;PAID OUT&quot;))=&quot;READY FOR PUBLICATION&quot;;&quot;READY FOR PUBLICATION → PUBLISHED · PREVIEW&quot;;IF(UPPER(TRIM(&quot;PAID OUT&quot;))=&quot;PUBLISHED&quot;;&quot;PUBLISHED → ACTIVE PLATFORM EXPOSURE · PREVIEW&quot;;IF(UPPER(TRIM(&quot;PAID OUT&quot;))=&quot;ACTIVE PLATFORM EXPOSURE&quot;;&quot;ACTIVE PLATFORM EXPOSURE → SOLD · PREVIEW&quot;;IF(UPPER(TRIM(&quot;PAID OUT&quot;))=&quot;SOLD&quot;;&quot;SOLD → READY FOR SHIPMENT · PREVIEW&quot;;IF(UPPER(TRIM(&quot;PAID OUT&quot;))=&quot;READY FOR SHIPMENT&quot;;&quot;READY FOR SHIPMENT → SHIPPED · PREVIEW&quot;;IF(UPPER(TRIM(&quot;PAID OUT&quot;))=&quot;SHIPPED&quot;;&quot;SHIPPED → DELIVERED · PREVIEW&quot;;IF(UPPER(TRIM(&quot;PAID OUT&quot;))=&quot;DELIVERED&quot;;&quot;DELIVERED → PAID OUT · PREVIEW&quot;;IF(UPPER(TRIM(&quot;PAID OUT&quot;))=&quot;PAID OUT&quot;;&quot;PAID OUT → COMPLETE · PREVIEW&quot;;IF(UPPER(TRIM(&quot;PAID OUT&quot;))=&quot;COMPLETE&quot;;&quot;NONE · TERMINAL STATE&quot;;&quot;NO TRANSITION PREVIEW&quot;)))))))))))" office:value-type="string" office:string-value="PAID OUT → COMPLETE · PREVIEW" ns42:value-type="string" table:number-columns-spanned="3" table:number-rows-spanned="1">
            <text:p>PAID OUT → COMPLETE · PREVIEW</text:p>
          </table:table-cell>
          <table:covered-table-cell table:number-columns-repeated="2" table:style-name="ce54"/>
        </table:table-row>
        <table:table-row table:style-name="ro5">
          <table:table-cell table:style-name="ce54" office:value-type="string" ns42:value-type="string" table:number-columns-spanned="3" table:number-rows-spanned="1">
            <text:p>COMPLETE</text:p>
          </table:table-cell>
          <table:covered-table-cell table:number-columns-repeated="2" table:style-name="ce54"/>
          <table:table-cell table:style-name="ce54" table:formula="of:=IF(UPPER(TRIM(&quot;COMPLETE&quot;))=&quot;PREPARATION NEEDED&quot;;&quot;COMPLETE NEXT PREPARATION RESPONSIBILITY&quot;;IF(UPPER(TRIM(&quot;COMPLETE&quot;))=&quot;READY TO LIST&quot;;&quot;CONFIRM LISTING INTENT&quot;;IF(UPPER(TRIM(&quot;COMPLETE&quot;))=&quot;READY FOR PUBLICATION&quot;;&quot;AUTHORIZE PUBLICATION&quot;;IF(UPPER(TRIM(&quot;COMPLETE&quot;))=&quot;PUBLISHED&quot;;&quot;REVIEW PLATFORM EXPOSURE&quot;;IF(UPPER(TRIM(&quot;COMPLETE&quot;))=&quot;ACTIVE PLATFORM EXPOSURE&quot;;&quot;OBSERVE SALE EVIDENCE&quot;;IF(UPPER(TRIM(&quot;COMPLETE&quot;))=&quot;SOLD&quot;;&quot;REVIEW FULFILLMENT PREPARATION&quot;;IF(UPPER(TRIM(&quot;COMPLETE&quot;))=&quot;READY FOR SHIPMENT&quot;;&quot;RECORD SHIPMENT RESULT&quot;;IF(UPPER(TRIM(&quot;COMPLETE&quot;))=&quot;SHIPPED&quot;;&quot;REVIEW DELIVERY EVIDENCE&quot;;IF(UPPER(TRIM(&quot;COMPLETE&quot;))=&quot;DELIVERED&quot;;&quot;REVIEW SETTLEMENT EVIDENCE&quot;;IF(UPPER(TRIM(&quot;COMPLETE&quot;))=&quot;PAID OUT&quot;;&quot;REVIEW LIFECYCLE COMPLETION&quot;;IF(UPPER(TRIM(&quot;COMPLETE&quot;))=&quot;COMPLETE&quot;;&quot;NO NEXT LIFECYCLE ACTION&quot;;&quot;REVIEW REQUIRED&quot;)))))))))))" office:value-type="string" office:string-value="NO NEXT LIFECYCLE ACTION" ns42:value-type="string" table:number-columns-spanned="3" table:number-rows-spanned="1">
            <text:p>NO NEXT LIFECYCLE ACTION</text:p>
          </table:table-cell>
          <table:covered-table-cell table:number-columns-repeated="2" table:style-name="ce54"/>
          <table:table-cell table:style-name="ce54" table:formula="of:=IF(UPPER(TRIM(&quot;COMPLETE&quot;))=&quot;PREPARATION NEEDED&quot;;&quot;NEXT READINESS BLOCKER&quot;;IF(UPPER(TRIM(&quot;COMPLETE&quot;))=&quot;READY TO LIST&quot;;&quot;LISTING RECORD&quot;;IF(UPPER(TRIM(&quot;COMPLETE&quot;))=&quot;READY FOR PUBLICATION&quot;;&quot;PUBLICATION AUTHORITY&quot;;IF(UPPER(TRIM(&quot;COMPLETE&quot;))=&quot;PUBLISHED&quot;;&quot;PLATFORM EXPOSURE EVIDENCE&quot;;IF(UPPER(TRIM(&quot;COMPLETE&quot;))=&quot;ACTIVE PLATFORM EXPOSURE&quot;;&quot;SALE EVIDENCE&quot;;IF(UPPER(TRIM(&quot;COMPLETE&quot;))=&quot;SOLD&quot;;&quot;FULFILLMENT PREPARATION&quot;;IF(UPPER(TRIM(&quot;COMPLETE&quot;))=&quot;READY FOR SHIPMENT&quot;;&quot;SHIPMENT EVIDENCE&quot;;IF(UPPER(TRIM(&quot;COMPLETE&quot;))=&quot;SHIPPED&quot;;&quot;DELIVERY EVIDENCE&quot;;IF(UPPER(TRIM(&quot;COMPLETE&quot;))=&quot;DELIVERED&quot;;&quot;SETTLEMENT EVIDENCE&quot;;IF(UPPER(TRIM(&quot;COMPLETE&quot;))=&quot;PAID OUT&quot;;&quot;COMPLETION CROSS-CHECK&quot;;IF(UPPER(TRIM(&quot;COMPLETE&quot;))=&quot;COMPLETE&quot;;&quot;NONE · TERMINAL STATE&quot;;&quot;UNMAPPED STATE&quot;)))))))))))" office:value-type="string" office:string-value="NONE · TERMINAL STATE" ns42:value-type="string" table:number-columns-spanned="3" table:number-rows-spanned="1">
            <text:p>NONE · TERMINAL STATE</text:p>
          </table:table-cell>
          <table:covered-table-cell table:number-columns-repeated="2" table:style-name="ce54"/>
          <table:table-cell table:style-name="ce54" table:formula="of:=IF(UPPER(TRIM(&quot;COMPLETE&quot;))=&quot;PREPARATION NEEDED&quot;;&quot;SUPPORTED PREPARATION EVIDENCE&quot;;IF(UPPER(TRIM(&quot;COMPLETE&quot;))=&quot;READY TO LIST&quot;;&quot;SUPPORTED LISTING INTENT EVIDENCE&quot;;IF(UPPER(TRIM(&quot;COMPLETE&quot;))=&quot;READY FOR PUBLICATION&quot;;&quot;SUPPORTED PUBLICATION AUTHORIZATION EVIDENCE&quot;;IF(UPPER(TRIM(&quot;COMPLETE&quot;))=&quot;PUBLISHED&quot;;&quot;FACTUAL PUBLICATION OR EXPOSURE RESULT&quot;;IF(UPPER(TRIM(&quot;COMPLETE&quot;))=&quot;ACTIVE PLATFORM EXPOSURE&quot;;&quot;FACTUAL SALE RESULT&quot;;IF(UPPER(TRIM(&quot;COMPLETE&quot;))=&quot;SOLD&quot;;&quot;SUPPORTED PACKAGING + SHIPMENT PATH REVIEW&quot;;IF(UPPER(TRIM(&quot;COMPLETE&quot;))=&quot;READY FOR SHIPMENT&quot;;&quot;FACTUAL SHIPMENT RESULT&quot;;IF(UPPER(TRIM(&quot;COMPLETE&quot;))=&quot;SHIPPED&quot;;&quot;FACTUAL DELIVERY RESULT&quot;;IF(UPPER(TRIM(&quot;COMPLETE&quot;))=&quot;DELIVERED&quot;;&quot;FACTUAL SETTLEMENT EVIDENCE&quot;;IF(UPPER(TRIM(&quot;COMPLETE&quot;))=&quot;PAID OUT&quot;;&quot;SUPPORTED COMPLETION FACTS&quot;;IF(UPPER(TRIM(&quot;COMPLETE&quot;))=&quot;COMPLETE&quot;;&quot;NONE · TERMINAL STATE&quot;;&quot;SUPPORTED STATE REVIEW&quot;)))))))))))" office:value-type="string" office:string-value="NONE · TERMINAL STATE" ns42:value-type="string" table:number-columns-spanned="3" table:number-rows-spanned="1">
            <text:p>NONE · TERMINAL STATE</text:p>
          </table:table-cell>
          <table:covered-table-cell table:number-columns-repeated="2" table:style-name="ce54"/>
          <table:table-cell table:style-name="ce54" table:formula="of:=IF(UPPER(TRIM(&quot;COMPLETE&quot;))=&quot;PREPARATION NEEDED&quot;;&quot;REVIEW ROUTED EVIDENCE&quot;;IF(UPPER(TRIM(&quot;COMPLETE&quot;))=&quot;READY TO LIST&quot;;&quot;REVIEW LISTING INTENT EVIDENCE&quot;;IF(UPPER(TRIM(&quot;COMPLETE&quot;))=&quot;READY FOR PUBLICATION&quot;;&quot;REVIEW PUBLICATION AUTHORITY&quot;;IF(UPPER(TRIM(&quot;COMPLETE&quot;))=&quot;PUBLISHED&quot;;&quot;REVIEW PLATFORM EXPOSURE EVIDENCE&quot;;IF(UPPER(TRIM(&quot;COMPLETE&quot;))=&quot;ACTIVE PLATFORM EXPOSURE&quot;;&quot;REVIEW SALE EVIDENCE&quot;;IF(UPPER(TRIM(&quot;COMPLETE&quot;))=&quot;SOLD&quot;;&quot;REVIEW FULFILLMENT EVIDENCE&quot;;IF(UPPER(TRIM(&quot;COMPLETE&quot;))=&quot;READY FOR SHIPMENT&quot;;&quot;REVIEW SHIPMENT EVIDENCE&quot;;IF(UPPER(TRIM(&quot;COMPLETE&quot;))=&quot;SHIPPED&quot;;&quot;REVIEW DELIVERY EVIDENCE&quot;;IF(UPPER(TRIM(&quot;COMPLETE&quot;))=&quot;DELIVERED&quot;;&quot;REVIEW SETTLEMENT EVIDENCE&quot;;IF(UPPER(TRIM(&quot;COMPLETE&quot;))=&quot;PAID OUT&quot;;&quot;REVIEW COMPLETION EVIDENCE&quot;;IF(UPPER(TRIM(&quot;COMPLETE&quot;))=&quot;COMPLETE&quot;;&quot;HISTORY REVIEW ONLY&quot;;&quot;REVIEW SELECTED STATE&quot;)))))))))))" office:value-type="string" office:string-value="HISTORY REVIEW ONLY" ns42:value-type="string" table:number-columns-spanned="3" table:number-rows-spanned="1">
            <text:p>HISTORY REVIEW ONLY</text:p>
          </table:table-cell>
          <table:covered-table-cell table:number-columns-repeated="2" table:style-name="ce54"/>
          <table:table-cell table:style-name="ce54" table:formula="of:=IF(UPPER(TRIM(&quot;COMPLETE&quot;))=&quot;PREPARATION NEEDED&quot;;&quot;PREPARATION ADVANCEMENT · PREVIEW&quot;;IF(UPPER(TRIM(&quot;COMPLETE&quot;))=&quot;READY TO LIST&quot;;&quot;READY TO LIST → READY FOR PUBLICATION · PREVIEW&quot;;IF(UPPER(TRIM(&quot;COMPLETE&quot;))=&quot;READY FOR PUBLICATION&quot;;&quot;READY FOR PUBLICATION → PUBLISHED · PREVIEW&quot;;IF(UPPER(TRIM(&quot;COMPLETE&quot;))=&quot;PUBLISHED&quot;;&quot;PUBLISHED → ACTIVE PLATFORM EXPOSURE · PREVIEW&quot;;IF(UPPER(TRIM(&quot;COMPLETE&quot;))=&quot;ACTIVE PLATFORM EXPOSURE&quot;;&quot;ACTIVE PLATFORM EXPOSURE → SOLD · PREVIEW&quot;;IF(UPPER(TRIM(&quot;COMPLETE&quot;))=&quot;SOLD&quot;;&quot;SOLD → READY FOR SHIPMENT · PREVIEW&quot;;IF(UPPER(TRIM(&quot;COMPLETE&quot;))=&quot;READY FOR SHIPMENT&quot;;&quot;READY FOR SHIPMENT → SHIPPED · PREVIEW&quot;;IF(UPPER(TRIM(&quot;COMPLETE&quot;))=&quot;SHIPPED&quot;;&quot;SHIPPED → DELIVERED · PREVIEW&quot;;IF(UPPER(TRIM(&quot;COMPLETE&quot;))=&quot;DELIVERED&quot;;&quot;DELIVERED → PAID OUT · PREVIEW&quot;;IF(UPPER(TRIM(&quot;COMPLETE&quot;))=&quot;PAID OUT&quot;;&quot;PAID OUT → COMPLETE · PREVIEW&quot;;IF(UPPER(TRIM(&quot;COMPLETE&quot;))=&quot;COMPLETE&quot;;&quot;NONE · TERMINAL STATE&quot;;&quot;NO TRANSITION PREVIEW&quot;)))))))))))" office:value-type="string" office:string-value="NONE · TERMINAL STATE" ns42:value-type="string" table:number-columns-spanned="3" table:number-rows-spanned="1">
            <text:p>NONE · TERMINAL STATE</text:p>
          </table:table-cell>
          <table:covered-table-cell table:number-columns-repeated="2" table:style-name="ce54"/>
        </table:table-row>
        <table:table-row table:style-name="ro5">
          <table:table-cell table:style-name="ce54" office:value-type="string" ns42:value-type="string" table:number-columns-spanned="3" table:number-rows-spanned="1">
            <text:p>BLANK</text:p>
          </table:table-cell>
          <table:covered-table-cell table:number-columns-repeated="2" table:style-name="ce54"/>
          <table:table-cell table:style-name="ce54" table:formula="of:=IF(UPPER(TRIM(&quot;&quot;))=&quot;PREPARATION NEEDED&quot;;&quot;COMPLETE NEXT PREPARATION RESPONSIBILITY&quot;;IF(UPPER(TRIM(&quot;&quot;))=&quot;READY TO LIST&quot;;&quot;CONFIRM LISTING INTENT&quot;;IF(UPPER(TRIM(&quot;&quot;))=&quot;READY FOR PUBLICATION&quot;;&quot;AUTHORIZE PUBLICATION&quot;;IF(UPPER(TRIM(&quot;&quot;))=&quot;PUBLISHED&quot;;&quot;REVIEW PLATFORM EXPOSURE&quot;;IF(UPPER(TRIM(&quot;&quot;))=&quot;ACTIVE PLATFORM EXPOSURE&quot;;&quot;OBSERVE SALE EVIDENCE&quot;;IF(UPPER(TRIM(&quot;&quot;))=&quot;SOLD&quot;;&quot;REVIEW FULFILLMENT PREPARATION&quot;;IF(UPPER(TRIM(&quot;&quot;))=&quot;READY FOR SHIPMENT&quot;;&quot;RECORD SHIPMENT RESULT&quot;;IF(UPPER(TRIM(&quot;&quot;))=&quot;SHIPPED&quot;;&quot;REVIEW DELIVERY EVIDENCE&quot;;IF(UPPER(TRIM(&quot;&quot;))=&quot;DELIVERED&quot;;&quot;REVIEW SETTLEMENT EVIDENCE&quot;;IF(UPPER(TRIM(&quot;&quot;))=&quot;PAID OUT&quot;;&quot;REVIEW LIFECYCLE COMPLETION&quot;;IF(UPPER(TRIM(&quot;&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quot;))=&quot;PREPARATION NEEDED&quot;;&quot;NEXT READINESS BLOCKER&quot;;IF(UPPER(TRIM(&quot;&quot;))=&quot;READY TO LIST&quot;;&quot;LISTING RECORD&quot;;IF(UPPER(TRIM(&quot;&quot;))=&quot;READY FOR PUBLICATION&quot;;&quot;PUBLICATION AUTHORITY&quot;;IF(UPPER(TRIM(&quot;&quot;))=&quot;PUBLISHED&quot;;&quot;PLATFORM EXPOSURE EVIDENCE&quot;;IF(UPPER(TRIM(&quot;&quot;))=&quot;ACTIVE PLATFORM EXPOSURE&quot;;&quot;SALE EVIDENCE&quot;;IF(UPPER(TRIM(&quot;&quot;))=&quot;SOLD&quot;;&quot;FULFILLMENT PREPARATION&quot;;IF(UPPER(TRIM(&quot;&quot;))=&quot;READY FOR SHIPMENT&quot;;&quot;SHIPMENT EVIDENCE&quot;;IF(UPPER(TRIM(&quot;&quot;))=&quot;SHIPPED&quot;;&quot;DELIVERY EVIDENCE&quot;;IF(UPPER(TRIM(&quot;&quot;))=&quot;DELIVERED&quot;;&quot;SETTLEMENT EVIDENCE&quot;;IF(UPPER(TRIM(&quot;&quot;))=&quot;PAID OUT&quot;;&quot;COMPLETION CROSS-CHECK&quot;;IF(UPPER(TRIM(&quot;&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quot;))=&quot;PREPARATION NEEDED&quot;;&quot;SUPPORTED PREPARATION EVIDENCE&quot;;IF(UPPER(TRIM(&quot;&quot;))=&quot;READY TO LIST&quot;;&quot;SUPPORTED LISTING INTENT EVIDENCE&quot;;IF(UPPER(TRIM(&quot;&quot;))=&quot;READY FOR PUBLICATION&quot;;&quot;SUPPORTED PUBLICATION AUTHORIZATION EVIDENCE&quot;;IF(UPPER(TRIM(&quot;&quot;))=&quot;PUBLISHED&quot;;&quot;FACTUAL PUBLICATION OR EXPOSURE RESULT&quot;;IF(UPPER(TRIM(&quot;&quot;))=&quot;ACTIVE PLATFORM EXPOSURE&quot;;&quot;FACTUAL SALE RESULT&quot;;IF(UPPER(TRIM(&quot;&quot;))=&quot;SOLD&quot;;&quot;SUPPORTED PACKAGING + SHIPMENT PATH REVIEW&quot;;IF(UPPER(TRIM(&quot;&quot;))=&quot;READY FOR SHIPMENT&quot;;&quot;FACTUAL SHIPMENT RESULT&quot;;IF(UPPER(TRIM(&quot;&quot;))=&quot;SHIPPED&quot;;&quot;FACTUAL DELIVERY RESULT&quot;;IF(UPPER(TRIM(&quot;&quot;))=&quot;DELIVERED&quot;;&quot;FACTUAL SETTLEMENT EVIDENCE&quot;;IF(UPPER(TRIM(&quot;&quot;))=&quot;PAID OUT&quot;;&quot;SUPPORTED COMPLETION FACTS&quot;;IF(UPPER(TRIM(&quot;&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quot;))=&quot;PREPARATION NEEDED&quot;;&quot;REVIEW ROUTED EVIDENCE&quot;;IF(UPPER(TRIM(&quot;&quot;))=&quot;READY TO LIST&quot;;&quot;REVIEW LISTING INTENT EVIDENCE&quot;;IF(UPPER(TRIM(&quot;&quot;))=&quot;READY FOR PUBLICATION&quot;;&quot;REVIEW PUBLICATION AUTHORITY&quot;;IF(UPPER(TRIM(&quot;&quot;))=&quot;PUBLISHED&quot;;&quot;REVIEW PLATFORM EXPOSURE EVIDENCE&quot;;IF(UPPER(TRIM(&quot;&quot;))=&quot;ACTIVE PLATFORM EXPOSURE&quot;;&quot;REVIEW SALE EVIDENCE&quot;;IF(UPPER(TRIM(&quot;&quot;))=&quot;SOLD&quot;;&quot;REVIEW FULFILLMENT EVIDENCE&quot;;IF(UPPER(TRIM(&quot;&quot;))=&quot;READY FOR SHIPMENT&quot;;&quot;REVIEW SHIPMENT EVIDENCE&quot;;IF(UPPER(TRIM(&quot;&quot;))=&quot;SHIPPED&quot;;&quot;REVIEW DELIVERY EVIDENCE&quot;;IF(UPPER(TRIM(&quot;&quot;))=&quot;DELIVERED&quot;;&quot;REVIEW SETTLEMENT EVIDENCE&quot;;IF(UPPER(TRIM(&quot;&quot;))=&quot;PAID OUT&quot;;&quot;REVIEW COMPLETION EVIDENCE&quot;;IF(UPPER(TRIM(&quot;&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quot;))=&quot;PREPARATION NEEDED&quot;;&quot;PREPARATION ADVANCEMENT · PREVIEW&quot;;IF(UPPER(TRIM(&quot;&quot;))=&quot;READY TO LIST&quot;;&quot;READY TO LIST → READY FOR PUBLICATION · PREVIEW&quot;;IF(UPPER(TRIM(&quot;&quot;))=&quot;READY FOR PUBLICATION&quot;;&quot;READY FOR PUBLICATION → PUBLISHED · PREVIEW&quot;;IF(UPPER(TRIM(&quot;&quot;))=&quot;PUBLISHED&quot;;&quot;PUBLISHED → ACTIVE PLATFORM EXPOSURE · PREVIEW&quot;;IF(UPPER(TRIM(&quot;&quot;))=&quot;ACTIVE PLATFORM EXPOSURE&quot;;&quot;ACTIVE PLATFORM EXPOSURE → SOLD · PREVIEW&quot;;IF(UPPER(TRIM(&quot;&quot;))=&quot;SOLD&quot;;&quot;SOLD → READY FOR SHIPMENT · PREVIEW&quot;;IF(UPPER(TRIM(&quot;&quot;))=&quot;READY FOR SHIPMENT&quot;;&quot;READY FOR SHIPMENT → SHIPPED · PREVIEW&quot;;IF(UPPER(TRIM(&quot;&quot;))=&quot;SHIPPED&quot;;&quot;SHIPPED → DELIVERED · PREVIEW&quot;;IF(UPPER(TRIM(&quot;&quot;))=&quot;DELIVERED&quot;;&quot;DELIVERED → PAID OUT · PREVIEW&quot;;IF(UPPER(TRIM(&quot;&quot;))=&quot;PAID OUT&quot;;&quot;PAID OUT → COMPLETE · PREVIEW&quot;;IF(UPPER(TRIM(&quot;&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3" table:number-rows-spanned="1">
            <text:p>UNKNOWN</text:p>
          </table:table-cell>
          <table:covered-table-cell table:number-columns-repeated="2" table:style-name="ce54"/>
          <table:table-cell table:style-name="ce54" table:formula="of:=IF(UPPER(TRIM(&quot;UNKNOWN&quot;))=&quot;PREPARATION NEEDED&quot;;&quot;COMPLETE NEXT PREPARATION RESPONSIBILITY&quot;;IF(UPPER(TRIM(&quot;UNKNOWN&quot;))=&quot;READY TO LIST&quot;;&quot;CONFIRM LISTING INTENT&quot;;IF(UPPER(TRIM(&quot;UNKNOWN&quot;))=&quot;READY FOR PUBLICATION&quot;;&quot;AUTHORIZE PUBLICATION&quot;;IF(UPPER(TRIM(&quot;UNKNOWN&quot;))=&quot;PUBLISHED&quot;;&quot;REVIEW PLATFORM EXPOSURE&quot;;IF(UPPER(TRIM(&quot;UNKNOWN&quot;))=&quot;ACTIVE PLATFORM EXPOSURE&quot;;&quot;OBSERVE SALE EVIDENCE&quot;;IF(UPPER(TRIM(&quot;UNKNOWN&quot;))=&quot;SOLD&quot;;&quot;REVIEW FULFILLMENT PREPARATION&quot;;IF(UPPER(TRIM(&quot;UNKNOWN&quot;))=&quot;READY FOR SHIPMENT&quot;;&quot;RECORD SHIPMENT RESULT&quot;;IF(UPPER(TRIM(&quot;UNKNOWN&quot;))=&quot;SHIPPED&quot;;&quot;REVIEW DELIVERY EVIDENCE&quot;;IF(UPPER(TRIM(&quot;UNKNOWN&quot;))=&quot;DELIVERED&quot;;&quot;REVIEW SETTLEMENT EVIDENCE&quot;;IF(UPPER(TRIM(&quot;UNKNOWN&quot;))=&quot;PAID OUT&quot;;&quot;REVIEW LIFECYCLE COMPLETION&quot;;IF(UPPER(TRIM(&quot;UNKNOWN&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UNKNOWN&quot;))=&quot;PREPARATION NEEDED&quot;;&quot;NEXT READINESS BLOCKER&quot;;IF(UPPER(TRIM(&quot;UNKNOWN&quot;))=&quot;READY TO LIST&quot;;&quot;LISTING RECORD&quot;;IF(UPPER(TRIM(&quot;UNKNOWN&quot;))=&quot;READY FOR PUBLICATION&quot;;&quot;PUBLICATION AUTHORITY&quot;;IF(UPPER(TRIM(&quot;UNKNOWN&quot;))=&quot;PUBLISHED&quot;;&quot;PLATFORM EXPOSURE EVIDENCE&quot;;IF(UPPER(TRIM(&quot;UNKNOWN&quot;))=&quot;ACTIVE PLATFORM EXPOSURE&quot;;&quot;SALE EVIDENCE&quot;;IF(UPPER(TRIM(&quot;UNKNOWN&quot;))=&quot;SOLD&quot;;&quot;FULFILLMENT PREPARATION&quot;;IF(UPPER(TRIM(&quot;UNKNOWN&quot;))=&quot;READY FOR SHIPMENT&quot;;&quot;SHIPMENT EVIDENCE&quot;;IF(UPPER(TRIM(&quot;UNKNOWN&quot;))=&quot;SHIPPED&quot;;&quot;DELIVERY EVIDENCE&quot;;IF(UPPER(TRIM(&quot;UNKNOWN&quot;))=&quot;DELIVERED&quot;;&quot;SETTLEMENT EVIDENCE&quot;;IF(UPPER(TRIM(&quot;UNKNOWN&quot;))=&quot;PAID OUT&quot;;&quot;COMPLETION CROSS-CHECK&quot;;IF(UPPER(TRIM(&quot;UNKNOWN&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UNKNOWN&quot;))=&quot;PREPARATION NEEDED&quot;;&quot;SUPPORTED PREPARATION EVIDENCE&quot;;IF(UPPER(TRIM(&quot;UNKNOWN&quot;))=&quot;READY TO LIST&quot;;&quot;SUPPORTED LISTING INTENT EVIDENCE&quot;;IF(UPPER(TRIM(&quot;UNKNOWN&quot;))=&quot;READY FOR PUBLICATION&quot;;&quot;SUPPORTED PUBLICATION AUTHORIZATION EVIDENCE&quot;;IF(UPPER(TRIM(&quot;UNKNOWN&quot;))=&quot;PUBLISHED&quot;;&quot;FACTUAL PUBLICATION OR EXPOSURE RESULT&quot;;IF(UPPER(TRIM(&quot;UNKNOWN&quot;))=&quot;ACTIVE PLATFORM EXPOSURE&quot;;&quot;FACTUAL SALE RESULT&quot;;IF(UPPER(TRIM(&quot;UNKNOWN&quot;))=&quot;SOLD&quot;;&quot;SUPPORTED PACKAGING + SHIPMENT PATH REVIEW&quot;;IF(UPPER(TRIM(&quot;UNKNOWN&quot;))=&quot;READY FOR SHIPMENT&quot;;&quot;FACTUAL SHIPMENT RESULT&quot;;IF(UPPER(TRIM(&quot;UNKNOWN&quot;))=&quot;SHIPPED&quot;;&quot;FACTUAL DELIVERY RESULT&quot;;IF(UPPER(TRIM(&quot;UNKNOWN&quot;))=&quot;DELIVERED&quot;;&quot;FACTUAL SETTLEMENT EVIDENCE&quot;;IF(UPPER(TRIM(&quot;UNKNOWN&quot;))=&quot;PAID OUT&quot;;&quot;SUPPORTED COMPLETION FACTS&quot;;IF(UPPER(TRIM(&quot;UNKNOWN&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UNKNOWN&quot;))=&quot;PREPARATION NEEDED&quot;;&quot;REVIEW ROUTED EVIDENCE&quot;;IF(UPPER(TRIM(&quot;UNKNOWN&quot;))=&quot;READY TO LIST&quot;;&quot;REVIEW LISTING INTENT EVIDENCE&quot;;IF(UPPER(TRIM(&quot;UNKNOWN&quot;))=&quot;READY FOR PUBLICATION&quot;;&quot;REVIEW PUBLICATION AUTHORITY&quot;;IF(UPPER(TRIM(&quot;UNKNOWN&quot;))=&quot;PUBLISHED&quot;;&quot;REVIEW PLATFORM EXPOSURE EVIDENCE&quot;;IF(UPPER(TRIM(&quot;UNKNOWN&quot;))=&quot;ACTIVE PLATFORM EXPOSURE&quot;;&quot;REVIEW SALE EVIDENCE&quot;;IF(UPPER(TRIM(&quot;UNKNOWN&quot;))=&quot;SOLD&quot;;&quot;REVIEW FULFILLMENT EVIDENCE&quot;;IF(UPPER(TRIM(&quot;UNKNOWN&quot;))=&quot;READY FOR SHIPMENT&quot;;&quot;REVIEW SHIPMENT EVIDENCE&quot;;IF(UPPER(TRIM(&quot;UNKNOWN&quot;))=&quot;SHIPPED&quot;;&quot;REVIEW DELIVERY EVIDENCE&quot;;IF(UPPER(TRIM(&quot;UNKNOWN&quot;))=&quot;DELIVERED&quot;;&quot;REVIEW SETTLEMENT EVIDENCE&quot;;IF(UPPER(TRIM(&quot;UNKNOWN&quot;))=&quot;PAID OUT&quot;;&quot;REVIEW COMPLETION EVIDENCE&quot;;IF(UPPER(TRIM(&quot;UNKNOWN&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UNKNOWN&quot;))=&quot;PREPARATION NEEDED&quot;;&quot;PREPARATION ADVANCEMENT · PREVIEW&quot;;IF(UPPER(TRIM(&quot;UNKNOWN&quot;))=&quot;READY TO LIST&quot;;&quot;READY TO LIST → READY FOR PUBLICATION · PREVIEW&quot;;IF(UPPER(TRIM(&quot;UNKNOWN&quot;))=&quot;READY FOR PUBLICATION&quot;;&quot;READY FOR PUBLICATION → PUBLISHED · PREVIEW&quot;;IF(UPPER(TRIM(&quot;UNKNOWN&quot;))=&quot;PUBLISHED&quot;;&quot;PUBLISHED → ACTIVE PLATFORM EXPOSURE · PREVIEW&quot;;IF(UPPER(TRIM(&quot;UNKNOWN&quot;))=&quot;ACTIVE PLATFORM EXPOSURE&quot;;&quot;ACTIVE PLATFORM EXPOSURE → SOLD · PREVIEW&quot;;IF(UPPER(TRIM(&quot;UNKNOWN&quot;))=&quot;SOLD&quot;;&quot;SOLD → READY FOR SHIPMENT · PREVIEW&quot;;IF(UPPER(TRIM(&quot;UNKNOWN&quot;))=&quot;READY FOR SHIPMENT&quot;;&quot;READY FOR SHIPMENT → SHIPPED · PREVIEW&quot;;IF(UPPER(TRIM(&quot;UNKNOWN&quot;))=&quot;SHIPPED&quot;;&quot;SHIPPED → DELIVERED · PREVIEW&quot;;IF(UPPER(TRIM(&quot;UNKNOWN&quot;))=&quot;DELIVERED&quot;;&quot;DELIVERED → PAID OUT · PREVIEW&quot;;IF(UPPER(TRIM(&quot;UNKNOWN&quot;))=&quot;PAID OUT&quot;;&quot;PAID OUT → COMPLETE · PREVIEW&quot;;IF(UPPER(TRIM(&quot;UNKNOWN&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3" table:number-rows-spanned="1">
            <text:p>UNSUPPORTED</text:p>
          </table:table-cell>
          <table:covered-table-cell table:number-columns-repeated="2" table:style-name="ce54"/>
          <table:table-cell table:style-name="ce54" table:formula="of:=IF(UPPER(TRIM(&quot;UNSUPPORTED&quot;))=&quot;PREPARATION NEEDED&quot;;&quot;COMPLETE NEXT PREPARATION RESPONSIBILITY&quot;;IF(UPPER(TRIM(&quot;UNSUPPORTED&quot;))=&quot;READY TO LIST&quot;;&quot;CONFIRM LISTING INTENT&quot;;IF(UPPER(TRIM(&quot;UNSUPPORTED&quot;))=&quot;READY FOR PUBLICATION&quot;;&quot;AUTHORIZE PUBLICATION&quot;;IF(UPPER(TRIM(&quot;UNSUPPORTED&quot;))=&quot;PUBLISHED&quot;;&quot;REVIEW PLATFORM EXPOSURE&quot;;IF(UPPER(TRIM(&quot;UNSUPPORTED&quot;))=&quot;ACTIVE PLATFORM EXPOSURE&quot;;&quot;OBSERVE SALE EVIDENCE&quot;;IF(UPPER(TRIM(&quot;UNSUPPORTED&quot;))=&quot;SOLD&quot;;&quot;REVIEW FULFILLMENT PREPARATION&quot;;IF(UPPER(TRIM(&quot;UNSUPPORTED&quot;))=&quot;READY FOR SHIPMENT&quot;;&quot;RECORD SHIPMENT RESULT&quot;;IF(UPPER(TRIM(&quot;UNSUPPORTED&quot;))=&quot;SHIPPED&quot;;&quot;REVIEW DELIVERY EVIDENCE&quot;;IF(UPPER(TRIM(&quot;UNSUPPORTED&quot;))=&quot;DELIVERED&quot;;&quot;REVIEW SETTLEMENT EVIDENCE&quot;;IF(UPPER(TRIM(&quot;UNSUPPORTED&quot;))=&quot;PAID OUT&quot;;&quot;REVIEW LIFECYCLE COMPLETION&quot;;IF(UPPER(TRIM(&quot;UNSUPPORTED&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UNSUPPORTED&quot;))=&quot;PREPARATION NEEDED&quot;;&quot;NEXT READINESS BLOCKER&quot;;IF(UPPER(TRIM(&quot;UNSUPPORTED&quot;))=&quot;READY TO LIST&quot;;&quot;LISTING RECORD&quot;;IF(UPPER(TRIM(&quot;UNSUPPORTED&quot;))=&quot;READY FOR PUBLICATION&quot;;&quot;PUBLICATION AUTHORITY&quot;;IF(UPPER(TRIM(&quot;UNSUPPORTED&quot;))=&quot;PUBLISHED&quot;;&quot;PLATFORM EXPOSURE EVIDENCE&quot;;IF(UPPER(TRIM(&quot;UNSUPPORTED&quot;))=&quot;ACTIVE PLATFORM EXPOSURE&quot;;&quot;SALE EVIDENCE&quot;;IF(UPPER(TRIM(&quot;UNSUPPORTED&quot;))=&quot;SOLD&quot;;&quot;FULFILLMENT PREPARATION&quot;;IF(UPPER(TRIM(&quot;UNSUPPORTED&quot;))=&quot;READY FOR SHIPMENT&quot;;&quot;SHIPMENT EVIDENCE&quot;;IF(UPPER(TRIM(&quot;UNSUPPORTED&quot;))=&quot;SHIPPED&quot;;&quot;DELIVERY EVIDENCE&quot;;IF(UPPER(TRIM(&quot;UNSUPPORTED&quot;))=&quot;DELIVERED&quot;;&quot;SETTLEMENT EVIDENCE&quot;;IF(UPPER(TRIM(&quot;UNSUPPORTED&quot;))=&quot;PAID OUT&quot;;&quot;COMPLETION CROSS-CHECK&quot;;IF(UPPER(TRIM(&quot;UNSUPPORTED&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UNSUPPORTED&quot;))=&quot;PREPARATION NEEDED&quot;;&quot;SUPPORTED PREPARATION EVIDENCE&quot;;IF(UPPER(TRIM(&quot;UNSUPPORTED&quot;))=&quot;READY TO LIST&quot;;&quot;SUPPORTED LISTING INTENT EVIDENCE&quot;;IF(UPPER(TRIM(&quot;UNSUPPORTED&quot;))=&quot;READY FOR PUBLICATION&quot;;&quot;SUPPORTED PUBLICATION AUTHORIZATION EVIDENCE&quot;;IF(UPPER(TRIM(&quot;UNSUPPORTED&quot;))=&quot;PUBLISHED&quot;;&quot;FACTUAL PUBLICATION OR EXPOSURE RESULT&quot;;IF(UPPER(TRIM(&quot;UNSUPPORTED&quot;))=&quot;ACTIVE PLATFORM EXPOSURE&quot;;&quot;FACTUAL SALE RESULT&quot;;IF(UPPER(TRIM(&quot;UNSUPPORTED&quot;))=&quot;SOLD&quot;;&quot;SUPPORTED PACKAGING + SHIPMENT PATH REVIEW&quot;;IF(UPPER(TRIM(&quot;UNSUPPORTED&quot;))=&quot;READY FOR SHIPMENT&quot;;&quot;FACTUAL SHIPMENT RESULT&quot;;IF(UPPER(TRIM(&quot;UNSUPPORTED&quot;))=&quot;SHIPPED&quot;;&quot;FACTUAL DELIVERY RESULT&quot;;IF(UPPER(TRIM(&quot;UNSUPPORTED&quot;))=&quot;DELIVERED&quot;;&quot;FACTUAL SETTLEMENT EVIDENCE&quot;;IF(UPPER(TRIM(&quot;UNSUPPORTED&quot;))=&quot;PAID OUT&quot;;&quot;SUPPORTED COMPLETION FACTS&quot;;IF(UPPER(TRIM(&quot;UNSUPPORTED&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UNSUPPORTED&quot;))=&quot;PREPARATION NEEDED&quot;;&quot;REVIEW ROUTED EVIDENCE&quot;;IF(UPPER(TRIM(&quot;UNSUPPORTED&quot;))=&quot;READY TO LIST&quot;;&quot;REVIEW LISTING INTENT EVIDENCE&quot;;IF(UPPER(TRIM(&quot;UNSUPPORTED&quot;))=&quot;READY FOR PUBLICATION&quot;;&quot;REVIEW PUBLICATION AUTHORITY&quot;;IF(UPPER(TRIM(&quot;UNSUPPORTED&quot;))=&quot;PUBLISHED&quot;;&quot;REVIEW PLATFORM EXPOSURE EVIDENCE&quot;;IF(UPPER(TRIM(&quot;UNSUPPORTED&quot;))=&quot;ACTIVE PLATFORM EXPOSURE&quot;;&quot;REVIEW SALE EVIDENCE&quot;;IF(UPPER(TRIM(&quot;UNSUPPORTED&quot;))=&quot;SOLD&quot;;&quot;REVIEW FULFILLMENT EVIDENCE&quot;;IF(UPPER(TRIM(&quot;UNSUPPORTED&quot;))=&quot;READY FOR SHIPMENT&quot;;&quot;REVIEW SHIPMENT EVIDENCE&quot;;IF(UPPER(TRIM(&quot;UNSUPPORTED&quot;))=&quot;SHIPPED&quot;;&quot;REVIEW DELIVERY EVIDENCE&quot;;IF(UPPER(TRIM(&quot;UNSUPPORTED&quot;))=&quot;DELIVERED&quot;;&quot;REVIEW SETTLEMENT EVIDENCE&quot;;IF(UPPER(TRIM(&quot;UNSUPPORTED&quot;))=&quot;PAID OUT&quot;;&quot;REVIEW COMPLETION EVIDENCE&quot;;IF(UPPER(TRIM(&quot;UNSUPPORTED&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UNSUPPORTED&quot;))=&quot;PREPARATION NEEDED&quot;;&quot;PREPARATION ADVANCEMENT · PREVIEW&quot;;IF(UPPER(TRIM(&quot;UNSUPPORTED&quot;))=&quot;READY TO LIST&quot;;&quot;READY TO LIST → READY FOR PUBLICATION · PREVIEW&quot;;IF(UPPER(TRIM(&quot;UNSUPPORTED&quot;))=&quot;READY FOR PUBLICATION&quot;;&quot;READY FOR PUBLICATION → PUBLISHED · PREVIEW&quot;;IF(UPPER(TRIM(&quot;UNSUPPORTED&quot;))=&quot;PUBLISHED&quot;;&quot;PUBLISHED → ACTIVE PLATFORM EXPOSURE · PREVIEW&quot;;IF(UPPER(TRIM(&quot;UNSUPPORTED&quot;))=&quot;ACTIVE PLATFORM EXPOSURE&quot;;&quot;ACTIVE PLATFORM EXPOSURE → SOLD · PREVIEW&quot;;IF(UPPER(TRIM(&quot;UNSUPPORTED&quot;))=&quot;SOLD&quot;;&quot;SOLD → READY FOR SHIPMENT · PREVIEW&quot;;IF(UPPER(TRIM(&quot;UNSUPPORTED&quot;))=&quot;READY FOR SHIPMENT&quot;;&quot;READY FOR SHIPMENT → SHIPPED · PREVIEW&quot;;IF(UPPER(TRIM(&quot;UNSUPPORTED&quot;))=&quot;SHIPPED&quot;;&quot;SHIPPED → DELIVERED · PREVIEW&quot;;IF(UPPER(TRIM(&quot;UNSUPPORTED&quot;))=&quot;DELIVERED&quot;;&quot;DELIVERED → PAID OUT · PREVIEW&quot;;IF(UPPER(TRIM(&quot;UNSUPPORTED&quot;))=&quot;PAID OUT&quot;;&quot;PAID OUT → COMPLETE · PREVIEW&quot;;IF(UPPER(TRIM(&quot;UNSUPPORTED&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3" table:number-rows-spanned="1">
            <text:p>FUTURE STATE</text:p>
          </table:table-cell>
          <table:covered-table-cell table:number-columns-repeated="2" table:style-name="ce54"/>
          <table:table-cell table:style-name="ce54" table:formula="of:=IF(UPPER(TRIM(&quot;FUTURE STATE&quot;))=&quot;PREPARATION NEEDED&quot;;&quot;COMPLETE NEXT PREPARATION RESPONSIBILITY&quot;;IF(UPPER(TRIM(&quot;FUTURE STATE&quot;))=&quot;READY TO LIST&quot;;&quot;CONFIRM LISTING INTENT&quot;;IF(UPPER(TRIM(&quot;FUTURE STATE&quot;))=&quot;READY FOR PUBLICATION&quot;;&quot;AUTHORIZE PUBLICATION&quot;;IF(UPPER(TRIM(&quot;FUTURE STATE&quot;))=&quot;PUBLISHED&quot;;&quot;REVIEW PLATFORM EXPOSURE&quot;;IF(UPPER(TRIM(&quot;FUTURE STATE&quot;))=&quot;ACTIVE PLATFORM EXPOSURE&quot;;&quot;OBSERVE SALE EVIDENCE&quot;;IF(UPPER(TRIM(&quot;FUTURE STATE&quot;))=&quot;SOLD&quot;;&quot;REVIEW FULFILLMENT PREPARATION&quot;;IF(UPPER(TRIM(&quot;FUTURE STATE&quot;))=&quot;READY FOR SHIPMENT&quot;;&quot;RECORD SHIPMENT RESULT&quot;;IF(UPPER(TRIM(&quot;FUTURE STATE&quot;))=&quot;SHIPPED&quot;;&quot;REVIEW DELIVERY EVIDENCE&quot;;IF(UPPER(TRIM(&quot;FUTURE STATE&quot;))=&quot;DELIVERED&quot;;&quot;REVIEW SETTLEMENT EVIDENCE&quot;;IF(UPPER(TRIM(&quot;FUTURE STATE&quot;))=&quot;PAID OUT&quot;;&quot;REVIEW LIFECYCLE COMPLETION&quot;;IF(UPPER(TRIM(&quot;FUTURE STATE&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FUTURE STATE&quot;))=&quot;PREPARATION NEEDED&quot;;&quot;NEXT READINESS BLOCKER&quot;;IF(UPPER(TRIM(&quot;FUTURE STATE&quot;))=&quot;READY TO LIST&quot;;&quot;LISTING RECORD&quot;;IF(UPPER(TRIM(&quot;FUTURE STATE&quot;))=&quot;READY FOR PUBLICATION&quot;;&quot;PUBLICATION AUTHORITY&quot;;IF(UPPER(TRIM(&quot;FUTURE STATE&quot;))=&quot;PUBLISHED&quot;;&quot;PLATFORM EXPOSURE EVIDENCE&quot;;IF(UPPER(TRIM(&quot;FUTURE STATE&quot;))=&quot;ACTIVE PLATFORM EXPOSURE&quot;;&quot;SALE EVIDENCE&quot;;IF(UPPER(TRIM(&quot;FUTURE STATE&quot;))=&quot;SOLD&quot;;&quot;FULFILLMENT PREPARATION&quot;;IF(UPPER(TRIM(&quot;FUTURE STATE&quot;))=&quot;READY FOR SHIPMENT&quot;;&quot;SHIPMENT EVIDENCE&quot;;IF(UPPER(TRIM(&quot;FUTURE STATE&quot;))=&quot;SHIPPED&quot;;&quot;DELIVERY EVIDENCE&quot;;IF(UPPER(TRIM(&quot;FUTURE STATE&quot;))=&quot;DELIVERED&quot;;&quot;SETTLEMENT EVIDENCE&quot;;IF(UPPER(TRIM(&quot;FUTURE STATE&quot;))=&quot;PAID OUT&quot;;&quot;COMPLETION CROSS-CHECK&quot;;IF(UPPER(TRIM(&quot;FUTURE STATE&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FUTURE STATE&quot;))=&quot;PREPARATION NEEDED&quot;;&quot;SUPPORTED PREPARATION EVIDENCE&quot;;IF(UPPER(TRIM(&quot;FUTURE STATE&quot;))=&quot;READY TO LIST&quot;;&quot;SUPPORTED LISTING INTENT EVIDENCE&quot;;IF(UPPER(TRIM(&quot;FUTURE STATE&quot;))=&quot;READY FOR PUBLICATION&quot;;&quot;SUPPORTED PUBLICATION AUTHORIZATION EVIDENCE&quot;;IF(UPPER(TRIM(&quot;FUTURE STATE&quot;))=&quot;PUBLISHED&quot;;&quot;FACTUAL PUBLICATION OR EXPOSURE RESULT&quot;;IF(UPPER(TRIM(&quot;FUTURE STATE&quot;))=&quot;ACTIVE PLATFORM EXPOSURE&quot;;&quot;FACTUAL SALE RESULT&quot;;IF(UPPER(TRIM(&quot;FUTURE STATE&quot;))=&quot;SOLD&quot;;&quot;SUPPORTED PACKAGING + SHIPMENT PATH REVIEW&quot;;IF(UPPER(TRIM(&quot;FUTURE STATE&quot;))=&quot;READY FOR SHIPMENT&quot;;&quot;FACTUAL SHIPMENT RESULT&quot;;IF(UPPER(TRIM(&quot;FUTURE STATE&quot;))=&quot;SHIPPED&quot;;&quot;FACTUAL DELIVERY RESULT&quot;;IF(UPPER(TRIM(&quot;FUTURE STATE&quot;))=&quot;DELIVERED&quot;;&quot;FACTUAL SETTLEMENT EVIDENCE&quot;;IF(UPPER(TRIM(&quot;FUTURE STATE&quot;))=&quot;PAID OUT&quot;;&quot;SUPPORTED COMPLETION FACTS&quot;;IF(UPPER(TRIM(&quot;FUTURE STATE&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FUTURE STATE&quot;))=&quot;PREPARATION NEEDED&quot;;&quot;REVIEW ROUTED EVIDENCE&quot;;IF(UPPER(TRIM(&quot;FUTURE STATE&quot;))=&quot;READY TO LIST&quot;;&quot;REVIEW LISTING INTENT EVIDENCE&quot;;IF(UPPER(TRIM(&quot;FUTURE STATE&quot;))=&quot;READY FOR PUBLICATION&quot;;&quot;REVIEW PUBLICATION AUTHORITY&quot;;IF(UPPER(TRIM(&quot;FUTURE STATE&quot;))=&quot;PUBLISHED&quot;;&quot;REVIEW PLATFORM EXPOSURE EVIDENCE&quot;;IF(UPPER(TRIM(&quot;FUTURE STATE&quot;))=&quot;ACTIVE PLATFORM EXPOSURE&quot;;&quot;REVIEW SALE EVIDENCE&quot;;IF(UPPER(TRIM(&quot;FUTURE STATE&quot;))=&quot;SOLD&quot;;&quot;REVIEW FULFILLMENT EVIDENCE&quot;;IF(UPPER(TRIM(&quot;FUTURE STATE&quot;))=&quot;READY FOR SHIPMENT&quot;;&quot;REVIEW SHIPMENT EVIDENCE&quot;;IF(UPPER(TRIM(&quot;FUTURE STATE&quot;))=&quot;SHIPPED&quot;;&quot;REVIEW DELIVERY EVIDENCE&quot;;IF(UPPER(TRIM(&quot;FUTURE STATE&quot;))=&quot;DELIVERED&quot;;&quot;REVIEW SETTLEMENT EVIDENCE&quot;;IF(UPPER(TRIM(&quot;FUTURE STATE&quot;))=&quot;PAID OUT&quot;;&quot;REVIEW COMPLETION EVIDENCE&quot;;IF(UPPER(TRIM(&quot;FUTURE STATE&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FUTURE STATE&quot;))=&quot;PREPARATION NEEDED&quot;;&quot;PREPARATION ADVANCEMENT · PREVIEW&quot;;IF(UPPER(TRIM(&quot;FUTURE STATE&quot;))=&quot;READY TO LIST&quot;;&quot;READY TO LIST → READY FOR PUBLICATION · PREVIEW&quot;;IF(UPPER(TRIM(&quot;FUTURE STATE&quot;))=&quot;READY FOR PUBLICATION&quot;;&quot;READY FOR PUBLICATION → PUBLISHED · PREVIEW&quot;;IF(UPPER(TRIM(&quot;FUTURE STATE&quot;))=&quot;PUBLISHED&quot;;&quot;PUBLISHED → ACTIVE PLATFORM EXPOSURE · PREVIEW&quot;;IF(UPPER(TRIM(&quot;FUTURE STATE&quot;))=&quot;ACTIVE PLATFORM EXPOSURE&quot;;&quot;ACTIVE PLATFORM EXPOSURE → SOLD · PREVIEW&quot;;IF(UPPER(TRIM(&quot;FUTURE STATE&quot;))=&quot;SOLD&quot;;&quot;SOLD → READY FOR SHIPMENT · PREVIEW&quot;;IF(UPPER(TRIM(&quot;FUTURE STATE&quot;))=&quot;READY FOR SHIPMENT&quot;;&quot;READY FOR SHIPMENT → SHIPPED · PREVIEW&quot;;IF(UPPER(TRIM(&quot;FUTURE STATE&quot;))=&quot;SHIPPED&quot;;&quot;SHIPPED → DELIVERED · PREVIEW&quot;;IF(UPPER(TRIM(&quot;FUTURE STATE&quot;))=&quot;DELIVERED&quot;;&quot;DELIVERED → PAID OUT · PREVIEW&quot;;IF(UPPER(TRIM(&quot;FUTURE STATE&quot;))=&quot;PAID OUT&quot;;&quot;PAID OUT → COMPLETE · PREVIEW&quot;;IF(UPPER(TRIM(&quot;FUTURE STATE&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18" table:number-rows-spanned="1">
            <text:p>VALIDATION CONTRACT: One controlled operator selection changes all five Action Center guidance outputs. COMPLETE remains terminal. Blank, unknown, unsupported, and unmapped evidence fail closed.</text:p>
          </table:table-cell>
          <table:covered-table-cell table:number-columns-repeated="17" table:style-name="ce54"/>
        </table:table-row>
        <table:table-row table:style-name="ro5">
          <table:table-cell table:style-name="ce54" office:value-type="string" ns42:value-type="string" table:number-columns-spanned="18" table:number-rows-spanned="1">
            <text:p>🔒 INVALID / UNMAPPED → REVIEW REQUIRED · NO INVENTED ROUTE · NO TRANSITION PREVIEW · NO STATE MUTATION</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FORMULA-DRIVEN ACTION CENTER VALIDATION GATE · BUILD 089</text:p>
          </table:table-cell>
          <table:covered-table-cell table:number-columns-repeated="17" table:style-name="ce52"/>
        </table:table-row>
        <table:table-row table:style-name="ro5">
          <table:table-cell table:style-name="ce53" office:value-type="string" ns42:value-type="string" table:number-columns-spanned="4" table:number-rows-spanned="1">
            <text:p>ONE OPERATOR SELECTION</text:p>
          </table:table-cell>
          <table:covered-table-cell table:number-columns-repeated="3" table:style-name="ce53"/>
          <table:table-cell table:style-name="ce53" office:value-type="string" ns42:value-type="string" table:number-columns-spanned="5" table:number-rows-spanned="1">
            <text:p>ACTION + BLOCKER + EVIDENCE + REVIEW + PREVIEW</text:p>
          </table:table-cell>
          <table:covered-table-cell table:number-columns-repeated="4" table:style-name="ce53"/>
          <table:table-cell table:style-name="ce53" office:value-type="string" ns42:value-type="string" table:number-columns-spanned="4" table:number-rows-spanned="1">
            <text:p>TERMINAL PROTECTION</text:p>
          </table:table-cell>
          <table:covered-table-cell table:number-columns-repeated="3" table:style-name="ce53"/>
          <table:table-cell table:style-name="ce53" office:value-type="string" ns42:value-type="string" table:number-columns-spanned="5" table:number-rows-spanned="1">
            <text:p>FAIL-CLOSED PROTECTION</text:p>
          </table:table-cell>
          <table:covered-table-cell table:number-columns-repeated="4" table:style-name="ce53"/>
        </table:table-row>
        <table:table-row table:style-name="ro5">
          <table:table-cell table:style-name="ce54" office:value-type="string" ns42:value-type="string" table:number-columns-spanned="4" table:number-rows-spanned="1">
            <text:p>CONTROLLED STATE LIST</text:p>
          </table:table-cell>
          <table:covered-table-cell table:number-columns-repeated="3" table:style-name="ce54"/>
          <table:table-cell table:style-name="ce54" office:value-type="string" ns42:value-type="string" table:number-columns-spanned="5" table:number-rows-spanned="1">
            <text:p>FORMULA-DERIVED GUIDANCE EVERYWHERE</text:p>
          </table:table-cell>
          <table:covered-table-cell table:number-columns-repeated="4" table:style-name="ce54"/>
          <table:table-cell table:style-name="ce54" office:value-type="string" ns42:value-type="string" table:number-columns-spanned="4" table:number-rows-spanned="1">
            <text:p>COMPLETE → NO INVENTED NEXT ACTION</text:p>
          </table:table-cell>
          <table:covered-table-cell table:number-columns-repeated="3" table:style-name="ce54"/>
          <table:table-cell table:style-name="ce54" office:value-type="string" ns42:value-type="string" table:number-columns-spanned="5" table:number-rows-spanned="1">
            <text:p>INVALID / UNMAPPED → REVIEW REQUIRED</text:p>
          </table:table-cell>
          <table:covered-table-cell table:number-columns-repeated="4" table:style-name="ce54"/>
        </table:table-row>
        <table:table-row table:style-name="ro5">
          <table:table-cell table:style-name="ce54" office:value-type="string" ns42:value-type="string" table:number-columns-spanned="18" table:number-rows-spanned="1">
            <text:p>OPERATING PRINCIPLE: SELECT STATE ONCE → DERIVE GUIDANCE EVERYWHERE. Formula-derived guidance remains routing context only and never mutates Inventory state.</text:p>
          </table:table-cell>
          <table:covered-table-cell table:number-columns-repeated="17" table:style-name="ce54"/>
        </table:table-row>
        <table:table-row table:style-name="ro5">
          <table:table-cell table:style-name="ce52" office:value-type="string" ns42:value-type="string" table:number-columns-spanned="18" table:number-rows-spanned="1">
            <text:p>🔗 SELECTED INVENTORY RECORD → READ-ONLY ACTION CENTER ROUTING · BUILDS 090–097</text:p>
          </table:table-cell>
          <table:covered-table-cell table:number-columns-repeated="17" table:style-name="ce52"/>
        </table:table-row>
        <table:table-row table:style-name="ro5">
          <table:table-cell table:style-name="ce53" office:value-type="string" ns42:value-type="string" table:number-columns-spanned="6" table:number-rows-spanned="1">
            <text:p>SELECTED INVENTORY RECORD ID</text:p>
          </table:table-cell>
          <table:covered-table-cell table:number-columns-repeated="5" table:style-name="ce53"/>
          <table:table-cell table:style-name="ce53" office:value-type="string" ns42:value-type="string" table:number-columns-spanned="6" table:number-rows-spanned="1">
            <text:p>PRODUCT IDENTITY</text:p>
          </table:table-cell>
          <table:covered-table-cell table:number-columns-repeated="5" table:style-name="ce53"/>
          <table:table-cell table:style-name="ce53" office:value-type="string" ns42:value-type="string" table:number-columns-spanned="6" table:number-rows-spanned="1">
            <text:p>AUTHORITATIVE INVENTORY STATE</text:p>
          </table:table-cell>
          <table:covered-table-cell table:number-columns-repeated="5" table:style-name="ce53"/>
        </table:table-row>
        <table:table-row table:style-name="ro5">
          <table:table-cell table:style-name="ce54" office:value-type="string" ns42:value-type="string" table:number-columns-spanned="6" table:number-rows-spanned="1">
            <text:p>INV-000001</text:p>
          </table:table-cell>
          <table:covered-table-cell table:number-columns-repeated="5" table:style-name="ce54"/>
          <table:table-cell table:style-name="ce54" table:formula="of:=IF(TRIM([.A505])=&quot;&quot;;&quot;REVIEW REQUIRED&quot;;IF(COUNTIF([.$A$508:.$A$511];[.A505])=0;&quot;RECORD NOT FOUND&quot;;IF(COUNTIF([.$A$508:.$A$511];[.A505])&gt;1;&quot;IDENTITY CONFLICT · REVIEW REQUIRED&quot;;INDEX([.$G$508:.$G$511];MATCH([.A505];[.$A$508:.$A$511];0)))))" office:value-type="string" office:string-value="RECORD NOT FOUND" ns42:value-type="string" table:number-columns-spanned="6" table:number-rows-spanned="1">
            <text:p>RECORD NOT FOUND</text:p>
          </table:table-cell>
          <table:covered-table-cell table:number-columns-repeated="5" table:style-name="ce54"/>
          <table:table-cell table:style-name="ce54" table:formula="of:=IF(TRIM([.A505])=&quot;&quot;;&quot;REVIEW REQUIRED&quot;;IF(COUNTIF([.$A$508:.$A$511];[.A505])=0;&quot;RECORD NOT FOUND&quot;;IF(COUNTIF([.$A$508:.$A$511];[.A505])&gt;1;&quot;IDENTITY CONFLICT · REVIEW REQUIRED&quot;;IF(TRIM(INDEX([.$M$508:.$M$511];MATCH([.A505];[.$A$508:.$A$511];0)))=&quot;&quot;;&quot;STATE EVIDENCE MISSING · REVIEW REQUIRED&quot;;INDEX([.$M$508:.$M$511];MATCH([.A505];[.$A$508:.$A$511];0))))))" office:value-type="string" office:string-value="RECORD NOT FOUND" ns42:value-type="string" table:number-columns-spanned="6" table:number-rows-spanned="1">
            <text:p>RECORD NOT FOUND</text:p>
          </table:table-cell>
          <table:covered-table-cell table:number-columns-repeated="5" table:style-name="ce54"/>
        </table:table-row>
        <table:table-row table:style-name="ro5">
          <table:table-cell table:style-name="ce52" office:value-type="string" ns42:value-type="string" table:number-columns-spanned="18" table:number-rows-spanned="1">
            <text:p>🔒 AUTHORITATIVE INVENTORY RECORD REGISTER · ROUTING SOURCE</text:p>
          </table:table-cell>
          <table:covered-table-cell table:number-columns-repeated="17" table:style-name="ce52"/>
        </table:table-row>
        <table:table-row table:style-name="ro5">
          <table:table-cell table:style-name="ce53" office:value-type="string" ns42:value-type="string" table:number-columns-spanned="6" table:number-rows-spanned="1">
            <text:p>INVENTORY RECORD ID</text:p>
          </table:table-cell>
          <table:covered-table-cell table:number-columns-repeated="5" table:style-name="ce53"/>
          <table:table-cell table:style-name="ce53" office:value-type="string" ns42:value-type="string" table:number-columns-spanned="6" table:number-rows-spanned="1">
            <text:p>PRODUCT IDENTITY</text:p>
          </table:table-cell>
          <table:covered-table-cell table:number-columns-repeated="5" table:style-name="ce53"/>
          <table:table-cell table:style-name="ce53" office:value-type="string" ns42:value-type="string" table:number-columns-spanned="6" table:number-rows-spanned="1">
            <text:p>AUTHORITATIVE STATE</text:p>
          </table:table-cell>
          <table:covered-table-cell table:number-columns-repeated="5" table:style-name="ce53"/>
        </table:table-row>
        <table:table-row table:style-name="ro5">
          <table:table-cell table:style-name="ce54" office:value-type="string" ns42:value-type="string" table:number-columns-spanned="6" table:number-rows-spanned="1">
            <text:p>INV-000001</text:p>
          </table:table-cell>
          <table:covered-table-cell table:number-columns-repeated="5" table:style-name="ce54"/>
          <table:table-cell table:style-name="ce54" office:value-type="string" ns42:value-type="string" table:number-columns-spanned="6" table:number-rows-spanned="1">
            <text:p>Example Sealed Product</text:p>
          </table:table-cell>
          <table:covered-table-cell table:number-columns-repeated="5" table:style-name="ce54"/>
          <table:table-cell table:style-name="ce54" office:value-type="string" ns42:value-type="string" table:number-columns-spanned="6" table:number-rows-spanned="1">
            <text:p>SHIPPED</text:p>
          </table:table-cell>
          <table:covered-table-cell table:number-columns-repeated="5" table:style-name="ce54"/>
        </table:table-row>
        <table:table-row table:style-name="ro5">
          <table:table-cell table:style-name="ce54" office:value-type="string" ns42:value-type="string" table:number-columns-spanned="6" table:number-rows-spanned="1">
            <text:p>INV-000002</text:p>
          </table:table-cell>
          <table:covered-table-cell table:number-columns-repeated="5" table:style-name="ce54"/>
          <table:table-cell table:style-name="ce54" office:value-type="string" ns42:value-type="string" table:number-columns-spanned="6" table:number-rows-spanned="1">
            <text:p>Example Single Card</text:p>
          </table:table-cell>
          <table:covered-table-cell table:number-columns-repeated="5" table:style-name="ce54"/>
          <table:table-cell table:style-name="ce54" office:value-type="string" ns42:value-type="string" table:number-columns-spanned="6" table:number-rows-spanned="1">
            <text:p>READY TO LIST</text:p>
          </table:table-cell>
          <table:covered-table-cell table:number-columns-repeated="5" table:style-name="ce54"/>
        </table:table-row>
        <table:table-row table:style-name="ro5">
          <table:table-cell table:style-name="ce54" office:value-type="string" ns42:value-type="string" table:number-columns-spanned="6" table:number-rows-spanned="1">
            <text:p>INV-000003</text:p>
          </table:table-cell>
          <table:covered-table-cell table:number-columns-repeated="5" table:style-name="ce54"/>
          <table:table-cell table:style-name="ce54" office:value-type="string" ns42:value-type="string" table:number-columns-spanned="6" table:number-rows-spanned="1">
            <text:p>Example Sold Product</text:p>
          </table:table-cell>
          <table:covered-table-cell table:number-columns-repeated="5" table:style-name="ce54"/>
          <table:table-cell table:style-name="ce54" office:value-type="string" ns42:value-type="string" table:number-columns-spanned="6" table:number-rows-spanned="1">
            <text:p>SOLD</text:p>
          </table:table-cell>
          <table:covered-table-cell table:number-columns-repeated="5" table:style-name="ce54"/>
        </table:table-row>
        <table:table-row table:style-name="ro5">
          <table:table-cell table:style-name="ce54" office:value-type="string" ns42:value-type="string" table:number-columns-spanned="6" table:number-rows-spanned="1">
            <text:p>INV-000004</text:p>
          </table:table-cell>
          <table:covered-table-cell table:number-columns-repeated="5" table:style-name="ce54"/>
          <table:table-cell table:style-name="ce54" office:value-type="string" ns42:value-type="string" table:number-columns-spanned="6" table:number-rows-spanned="1">
            <text:p>Example Complete Record</text:p>
          </table:table-cell>
          <table:covered-table-cell table:number-columns-repeated="5" table:style-name="ce54"/>
          <table:table-cell table:style-name="ce54" office:value-type="string" ns42:value-type="string" table:number-columns-spanned="6" table:number-rows-spanned="1">
            <text:p>COMPLETE</text:p>
          </table:table-cell>
          <table:covered-table-cell table:number-columns-repeated="5" table:style-name="ce54"/>
        </table:table-row>
        <table:table-row table:style-name="ro5">
          <table:table-cell table:style-name="ce52" office:value-type="string" ns42:value-type="string" table:number-columns-spanned="18" table:number-rows-spanned="1">
            <text:p>🎯 READ-ONLY ACTION CENTER · SELECTED RECORD ROUTING RESULT</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21">
          <table:table-cell table:style-name="ce54" table:formula="of:=IF(UPPER(TRIM([.M505]))=&quot;PREPARATION NEEDED&quot;;&quot;COMPLETE NEXT PREPARATION RESPONSIBILITY&quot;;IF(UPPER(TRIM([.M505]))=&quot;READY TO LIST&quot;;&quot;CONFIRM LISTING INTENT&quot;;IF(UPPER(TRIM([.M505]))=&quot;READY FOR PUBLICATION&quot;;&quot;AUTHORIZE PUBLICATION&quot;;IF(UPPER(TRIM([.M505]))=&quot;PUBLISHED&quot;;&quot;REVIEW PLATFORM EXPOSURE&quot;;IF(UPPER(TRIM([.M505]))=&quot;ACTIVE PLATFORM EXPOSURE&quot;;&quot;OBSERVE SALE EVIDENCE&quot;;IF(UPPER(TRIM([.M505]))=&quot;SOLD&quot;;&quot;REVIEW FULFILLMENT PREPARATION&quot;;IF(UPPER(TRIM([.M505]))=&quot;READY FOR SHIPMENT&quot;;&quot;RECORD SHIPMENT RESULT&quot;;IF(UPPER(TRIM([.M505]))=&quot;SHIPPED&quot;;&quot;REVIEW DELIVERY EVIDENCE&quot;;IF(UPPER(TRIM([.M505]))=&quot;DELIVERED&quot;;&quot;REVIEW SETTLEMENT EVIDENCE&quot;;IF(UPPER(TRIM([.M505]))=&quot;PAID OUT&quot;;&quot;REVIEW LIFECYCLE COMPLETION&quot;;IF(UPPER(TRIM([.M505]))=&quot;COMPLETE&quot;;&quot;NO NEXT LIFECYCLE ACTION&quot;;&quot;REVIEW REQUIRED&quot;)))))))))))" office:value-type="string" office:string-value="REVIEW REQUIRED" ns42:value-type="string" table:number-columns-spanned="4" table:number-rows-spanned="1">
            <text:p>REVIEW REQUIRED</text:p>
          </table:table-cell>
          <table:covered-table-cell table:number-columns-repeated="3" table:style-name="ce54"/>
          <table:table-cell table:style-name="ce54" table:formula="of:=IF(UPPER(TRIM([.M505]))=&quot;PREPARATION NEEDED&quot;;&quot;NEXT READINESS BLOCKER&quot;;IF(UPPER(TRIM([.M505]))=&quot;READY TO LIST&quot;;&quot;LISTING RECORD&quot;;IF(UPPER(TRIM([.M505]))=&quot;READY FOR PUBLICATION&quot;;&quot;PUBLICATION AUTHORITY&quot;;IF(UPPER(TRIM([.M505]))=&quot;PUBLISHED&quot;;&quot;PLATFORM EXPOSURE EVIDENCE&quot;;IF(UPPER(TRIM([.M505]))=&quot;ACTIVE PLATFORM EXPOSURE&quot;;&quot;SALE EVIDENCE&quot;;IF(UPPER(TRIM([.M505]))=&quot;SOLD&quot;;&quot;FULFILLMENT PREPARATION&quot;;IF(UPPER(TRIM([.M505]))=&quot;READY FOR SHIPMENT&quot;;&quot;SHIPMENT EVIDENCE&quot;;IF(UPPER(TRIM([.M505]))=&quot;SHIPPED&quot;;&quot;DELIVERY EVIDENCE&quot;;IF(UPPER(TRIM([.M505]))=&quot;DELIVERED&quot;;&quot;SETTLEMENT EVIDENCE&quot;;IF(UPPER(TRIM([.M505]))=&quot;PAID OUT&quot;;&quot;COMPLETION CROSS-CHECK&quot;;IF(UPPER(TRIM([.M505]))=&quot;COMPLETE&quot;;&quot;NONE · TERMINAL STATE&quot;;&quot;UNMAPPED STATE&quot;)))))))))))" office:value-type="string" office:string-value="UNMAPPED STATE" ns42:value-type="string" table:number-columns-spanned="4" table:number-rows-spanned="1">
            <text:p>UNMAPPED STATE</text:p>
          </table:table-cell>
          <table:covered-table-cell table:number-columns-repeated="3" table:style-name="ce54"/>
          <table:table-cell table:style-name="ce54" table:formula="of:=IF(UPPER(TRIM([.M505]))=&quot;PREPARATION NEEDED&quot;;&quot;SUPPORTED PREPARATION EVIDENCE&quot;;IF(UPPER(TRIM([.M505]))=&quot;READY TO LIST&quot;;&quot;SUPPORTED LISTING INTENT EVIDENCE&quot;;IF(UPPER(TRIM([.M505]))=&quot;READY FOR PUBLICATION&quot;;&quot;SUPPORTED PUBLICATION AUTHORIZATION EVIDENCE&quot;;IF(UPPER(TRIM([.M505]))=&quot;PUBLISHED&quot;;&quot;FACTUAL PUBLICATION OR EXPOSURE RESULT&quot;;IF(UPPER(TRIM([.M505]))=&quot;ACTIVE PLATFORM EXPOSURE&quot;;&quot;FACTUAL SALE RESULT&quot;;IF(UPPER(TRIM([.M505]))=&quot;SOLD&quot;;&quot;SUPPORTED PACKAGING + SHIPMENT PATH REVIEW&quot;;IF(UPPER(TRIM([.M505]))=&quot;READY FOR SHIPMENT&quot;;&quot;FACTUAL SHIPMENT RESULT&quot;;IF(UPPER(TRIM([.M505]))=&quot;SHIPPED&quot;;&quot;FACTUAL DELIVERY RESULT&quot;;IF(UPPER(TRIM([.M505]))=&quot;DELIVERED&quot;;&quot;FACTUAL SETTLEMENT EVIDENCE&quot;;IF(UPPER(TRIM([.M505]))=&quot;PAID OUT&quot;;&quot;SUPPORTED COMPLETION FACTS&quot;;IF(UPPER(TRIM([.M505]))=&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M505]))=&quot;PREPARATION NEEDED&quot;;&quot;REVIEW ROUTED EVIDENCE&quot;;IF(UPPER(TRIM([.M505]))=&quot;READY TO LIST&quot;;&quot;REVIEW LISTING INTENT EVIDENCE&quot;;IF(UPPER(TRIM([.M505]))=&quot;READY FOR PUBLICATION&quot;;&quot;REVIEW PUBLICATION AUTHORITY&quot;;IF(UPPER(TRIM([.M505]))=&quot;PUBLISHED&quot;;&quot;REVIEW PLATFORM EXPOSURE EVIDENCE&quot;;IF(UPPER(TRIM([.M505]))=&quot;ACTIVE PLATFORM EXPOSURE&quot;;&quot;REVIEW SALE EVIDENCE&quot;;IF(UPPER(TRIM([.M505]))=&quot;SOLD&quot;;&quot;REVIEW FULFILLMENT EVIDENCE&quot;;IF(UPPER(TRIM([.M505]))=&quot;READY FOR SHIPMENT&quot;;&quot;REVIEW SHIPMENT EVIDENCE&quot;;IF(UPPER(TRIM([.M505]))=&quot;SHIPPED&quot;;&quot;REVIEW DELIVERY EVIDENCE&quot;;IF(UPPER(TRIM([.M505]))=&quot;DELIVERED&quot;;&quot;REVIEW SETTLEMENT EVIDENCE&quot;;IF(UPPER(TRIM([.M505]))=&quot;PAID OUT&quot;;&quot;REVIEW COMPLETION EVIDENCE&quot;;IF(UPPER(TRIM([.M505]))=&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M505]))=&quot;PREPARATION NEEDED&quot;;&quot;PREPARATION ADVANCEMENT · PREVIEW&quot;;IF(UPPER(TRIM([.M505]))=&quot;READY TO LIST&quot;;&quot;READY TO LIST → READY FOR PUBLICATION · PREVIEW&quot;;IF(UPPER(TRIM([.M505]))=&quot;READY FOR PUBLICATION&quot;;&quot;READY FOR PUBLICATION → PUBLISHED · PREVIEW&quot;;IF(UPPER(TRIM([.M505]))=&quot;PUBLISHED&quot;;&quot;PUBLISHED → ACTIVE PLATFORM EXPOSURE · PREVIEW&quot;;IF(UPPER(TRIM([.M505]))=&quot;ACTIVE PLATFORM EXPOSURE&quot;;&quot;ACTIVE PLATFORM EXPOSURE → SOLD · PREVIEW&quot;;IF(UPPER(TRIM([.M505]))=&quot;SOLD&quot;;&quot;SOLD → READY FOR SHIPMENT · PREVIEW&quot;;IF(UPPER(TRIM([.M505]))=&quot;READY FOR SHIPMENT&quot;;&quot;READY FOR SHIPMENT → SHIPPED · PREVIEW&quot;;IF(UPPER(TRIM([.M505]))=&quot;SHIPPED&quot;;&quot;SHIPPED → DELIVERED · PREVIEW&quot;;IF(UPPER(TRIM([.M505]))=&quot;DELIVERED&quot;;&quot;DELIVERED → PAID OUT · PREVIEW&quot;;IF(UPPER(TRIM([.M505]))=&quot;PAID OUT&quot;;&quot;PAID OUT → COMPLETE · PREVIEW&quot;;IF(UPPER(TRIM([.M505]))=&quot;COMPLETE&quot;;&quot;NONE · TERMINAL STATE&quot;;&quot;NO TRANSITION PREVIEW&quot;)))))))))))" office:value-type="string" office:string-value="NO TRANSITION PREVIEW" ns42:value-type="string" table:number-columns-spanned="4" table:number-rows-spanned="1">
            <text:p>NO TRANSITION PREVIEW</text:p>
          </table:table-cell>
          <table:covered-table-cell table:number-columns-repeated="3" table:style-name="ce54"/>
        </table:table-row>
        <table:table-row table:style-name="ro5">
          <table:table-cell table:style-name="ce52" office:value-type="string" ns42:value-type="string" table:number-columns-spanned="18" table:number-rows-spanned="1">
            <text:p>🛑 RECORD IDENTITY + STATE EVIDENCE FAIL-CLOSED GATE</text:p>
          </table:table-cell>
          <table:covered-table-cell table:number-columns-repeated="17" table:style-name="ce52"/>
        </table:table-row>
        <table:table-row table:style-name="ro5">
          <table:table-cell table:style-name="ce53" office:value-type="string" ns42:value-type="string" table:number-columns-spanned="3" table:number-rows-spanned="1">
            <text:p>BLANK ID</text:p>
          </table:table-cell>
          <table:covered-table-cell table:number-columns-repeated="2" table:style-name="ce53"/>
          <table:table-cell table:style-name="ce53" office:value-type="string" ns42:value-type="string" table:number-columns-spanned="4" table:number-rows-spanned="1">
            <text:p>UNKNOWN ID</text:p>
          </table:table-cell>
          <table:covered-table-cell table:number-columns-repeated="3" table:style-name="ce53"/>
          <table:table-cell table:style-name="ce53" office:value-type="string" ns42:value-type="string" table:number-columns-spanned="4" table:number-rows-spanned="1">
            <text:p>DUPLICATE ID</text:p>
          </table:table-cell>
          <table:covered-table-cell table:number-columns-repeated="3" table:style-name="ce53"/>
          <table:table-cell table:style-name="ce53" office:value-type="string" ns42:value-type="string" table:number-columns-spanned="3" table:number-rows-spanned="1">
            <text:p>MISSING STATE</text:p>
          </table:table-cell>
          <table:covered-table-cell table:number-columns-repeated="2" table:style-name="ce53"/>
          <table:table-cell table:style-name="ce53" office:value-type="string" ns42:value-type="string" table:number-columns-spanned="4" table:number-rows-spanned="1">
            <text:p>UNSUPPORTED / UNMAPPED STATE</text:p>
          </table:table-cell>
          <table:covered-table-cell table:number-columns-repeated="3" table:style-name="ce53"/>
        </table:table-row>
        <table:table-row table:style-name="ro5">
          <table:table-cell table:style-name="ce54" office:value-type="string" ns42:value-type="string" table:number-columns-spanned="3" table:number-rows-spanned="1">
            <text:p>REVIEW REQUIRED</text:p>
          </table:table-cell>
          <table:covered-table-cell table:number-columns-repeated="2" table:style-name="ce54"/>
          <table:table-cell table:style-name="ce54" office:value-type="string" ns42:value-type="string" table:number-columns-spanned="4" table:number-rows-spanned="1">
            <text:p>RECORD NOT FOUND</text:p>
          </table:table-cell>
          <table:covered-table-cell table:number-columns-repeated="3" table:style-name="ce54"/>
          <table:table-cell table:style-name="ce54" office:value-type="string" ns42:value-type="string" table:number-columns-spanned="4" table:number-rows-spanned="1">
            <text:p>IDENTITY CONFLICT · REVIEW REQUIRED</text:p>
          </table:table-cell>
          <table:covered-table-cell table:number-columns-repeated="3" table:style-name="ce54"/>
          <table:table-cell table:style-name="ce54" office:value-type="string" ns42:value-type="string" table:number-columns-spanned="3" table:number-rows-spanned="1">
            <text:p>STATE EVIDENCE MISSING · REVIEW REQUIRED</text:p>
          </table:table-cell>
          <table:covered-table-cell table:number-columns-repeated="2" table:style-name="ce54"/>
          <table:table-cell table:style-name="ce54" office:value-type="string" ns42:value-type="string" table:number-columns-spanned="4" table:number-rows-spanned="1">
            <text:p>UNMAPPED STATE · REVIEW REQUIRED</text:p>
          </table:table-cell>
          <table:covered-table-cell table:number-columns-repeated="3" table:style-name="ce54"/>
        </table:table-row>
        <table:table-row table:style-name="ro5">
          <table:table-cell table:style-name="ce54" office:value-type="string" ns42:value-type="string" table:number-columns-spanned="18" table:number-rows-spanned="1">
            <text:p>🔒 ACTION CENTER ≠ INVENTORY AUTHORITY · ROUTING GUIDANCE ≠ STATE MUTATION · DUPLICATE IDENTITY ≠ FIRST MATCH · MISSING EVIDENCE ≠ GUESSED TRUTH</text:p>
          </table:table-cell>
          <table:covered-table-cell table:number-columns-repeated="17" table:style-name="ce54"/>
        </table:table-row>
        <table:table-row table:style-name="ro5">
          <table:table-cell table:style-name="ce52" office:value-type="string" ns42:value-type="string" table:number-columns-spanned="18" table:number-rows-spanned="1">
            <text:p>🏁 READ-ONLY INVENTORY-CONNECTED ACTION CENTER GATE · BUILD 097</text:p>
          </table:table-cell>
          <table:covered-table-cell table:number-columns-repeated="17" table:style-name="ce52"/>
        </table:table-row>
        <table:table-row table:style-name="ro5">
          <table:table-cell table:style-name="ce54" office:value-type="string" ns42:value-type="string" table:number-columns-spanned="18" table:number-rows-spanned="1">
            <text:p>SELECT INVENTORY RECORD ONCE → READ AUTHORITATIVE INVENTORY TRUTH → DERIVE ACTION CENTER GUIDANCE EVERYWHERE</text:p>
          </table:table-cell>
          <table:covered-table-cell table:number-columns-repeated="17" table:style-name="ce54"/>
        </table:table-row>
        <table:table-row table:style-name="ro5">
          <table:table-cell table:style-name="ce52" office:value-type="string" ns42:value-type="string" table:number-columns-spanned="18" table:number-rows-spanned="1">
            <text:p>🔍 REAL INVENTORY IDENTITY GAP → AUTHORITATIVE RECORD SURFACE · BUILDS 098–106</text:p>
          </table:table-cell>
          <table:covered-table-cell table:number-columns-repeated="17" table:style-name="ce52"/>
        </table:table-row>
        <table:table-row table:style-name="ro5">
          <table:table-cell table:style-name="ce53" office:value-type="string" ns42:value-type="string" table:number-columns-spanned="6" table:number-rows-spanned="1">
            <text:p>DISCOVERED GAP</text:p>
          </table:table-cell>
          <table:covered-table-cell table:number-columns-repeated="5" table:style-name="ce53"/>
          <table:table-cell table:style-name="ce53" office:value-type="string" ns42:value-type="string" table:number-columns-spanned="6" table:number-rows-spanned="1">
            <text:p>REAL PROMOTED POSITION</text:p>
          </table:table-cell>
          <table:covered-table-cell table:number-columns-repeated="5" table:style-name="ce53"/>
          <table:table-cell table:style-name="ce53" office:value-type="string" ns42:value-type="string" table:number-columns-spanned="6" table:number-rows-spanned="1">
            <text:p>REQUIRED INVENTORY AUTHORITY</text:p>
          </table:table-cell>
          <table:covered-table-cell table:number-columns-repeated="5" table:style-name="ce53"/>
        </table:table-row>
        <table:table-row table:style-name="ro5">
          <table:table-cell table:style-name="ce54" office:value-type="string" ns42:value-type="string" table:number-columns-spanned="6" table:number-rows-spanned="1">
            <text:p>NO CANONICAL RECORD ID SURFACE</text:p>
          </table:table-cell>
          <table:covered-table-cell table:number-columns-repeated="5" table:style-name="ce54"/>
          <table:table-cell table:style-name="ce54" office:value-type="string" ns42:value-type="string" table:number-columns-spanned="6" table:number-rows-spanned="1">
            <text:p>Mega Greninja ex Premium Collection</text:p>
          </table:table-cell>
          <table:covered-table-cell table:number-columns-repeated="5" table:style-name="ce54"/>
          <table:table-cell table:style-name="ce54" office:value-type="string" ns42:value-type="string" table:number-columns-spanned="6" table:number-rows-spanned="1">
            <text:p>INVENTORY OWNS RECORD IDENTITY</text:p>
          </table:table-cell>
          <table:covered-table-cell table:number-columns-repeated="5" table:style-name="ce54"/>
        </table:table-row>
        <table:table-row table:style-name="ro5">
          <table:table-cell table:style-name="ce52" office:value-type="string" ns42:value-type="string" table:number-columns-spanned="18" table:number-rows-spanned="1">
            <text:p>🧬 AUTHORITATIVE INVENTORY RECORD SURFACE · INVENTORY-OWNED TRUTH</text:p>
          </table:table-cell>
          <table:covered-table-cell table:number-columns-repeated="17" table:style-name="ce52"/>
        </table:table-row>
        <table:table-row table:style-name="ro5">
          <table:table-cell table:style-name="ce53" office:value-type="string" ns42:value-type="string" table:number-columns-spanned="4" table:number-rows-spanned="1">
            <text:p>INVENTORY RECORD ID</text:p>
          </table:table-cell>
          <table:covered-table-cell table:number-columns-repeated="3" table:style-name="ce53"/>
          <table:table-cell table:style-name="ce53" office:value-type="string" ns42:value-type="string" table:number-columns-spanned="5" table:number-rows-spanned="1">
            <text:p>PRODUCT / POSITION</text:p>
          </table:table-cell>
          <table:covered-table-cell table:number-columns-repeated="4" table:style-name="ce53"/>
          <table:table-cell table:style-name="ce53" office:value-type="string" ns42:value-type="string" table:number-columns-spanned="2" table:number-rows-spanned="1">
            <text:p>QUANTITY</text:p>
          </table:table-cell>
          <table:covered-table-cell table:style-name="ce53"/>
          <table:table-cell table:style-name="ce53" office:value-type="string" ns42:value-type="string" table:number-columns-spanned="3" table:number-rows-spanned="1">
            <text:p>BUSINESS STATE</text:p>
          </table:table-cell>
          <table:covered-table-cell table:number-columns-repeated="2" table:style-name="ce53"/>
          <table:table-cell table:style-name="ce53" office:value-type="string" ns42:value-type="string" table:number-columns-spanned="4" table:number-rows-spanned="1">
            <text:p>CURRENT LOCATION</text:p>
          </table:table-cell>
          <table:covered-table-cell table:number-columns-repeated="3" table:style-name="ce53"/>
        </table:table-row>
        <table:table-row table:style-name="ro5">
          <table:table-cell table:style-name="ce54" office:value-type="string" ns42:value-type="string" table:number-columns-spanned="4" table:number-rows-spanned="1">
            <text:p>INV-000001</text:p>
          </table:table-cell>
          <table:covered-table-cell table:number-columns-repeated="3" table:style-name="ce54"/>
          <table:table-cell table:style-name="ce54" office:value-type="string" ns42:value-type="string" table:number-columns-spanned="5" table:number-rows-spanned="1">
            <text:p>Mega Greninja ex Premium Collection</text:p>
          </table:table-cell>
          <table:covered-table-cell table:number-columns-repeated="4" table:style-name="ce54"/>
          <table:table-cell table:style-name="ce54" office:value-type="string" ns42:value-type="string" table:number-columns-spanned="2" table:number-rows-spanned="1">
            <text:p>2</text:p>
          </table:table-cell>
          <table:covered-table-cell table:style-name="ce54"/>
          <table:table-cell table:style-name="ce54" office:value-type="string" ns42:value-type="string" table:number-columns-spanned="3" table:number-rows-spanned="1">
            <text:p>OWNED</text:p>
          </table:table-cell>
          <table:covered-table-cell table:number-columns-repeated="2" table:style-name="ce54"/>
          <table:table-cell table:style-name="ce54" office:value-type="string" ns42:value-type="string" table:number-columns-spanned="4" table:number-rows-spanned="1">
            <text:p>Aquarium Stand</text:p>
          </table:table-cell>
          <table:covered-table-cell table:number-columns-repeated="3" table:style-name="ce54"/>
        </table:table-row>
        <table:table-row table:style-name="ro5">
          <table:table-cell table:style-name="ce54" office:value-type="string" ns42:value-type="string" table:number-columns-spanned="18" table:number-rows-spanned="1">
            <text:p>🔒 ONE RECORD ID → ONE INVENTORY POSITION · PRODUCT IDENTITY + BUSINESS STATE REMAIN INVENTORY-OWNED</text:p>
          </table:table-cell>
          <table:covered-table-cell table:number-columns-repeated="17" table:style-name="ce54"/>
        </table:table-row>
        <table:table-row table:style-name="ro5">
          <table:table-cell table:style-name="ce52" office:value-type="string" ns42:value-type="string" table:number-columns-spanned="18" table:number-rows-spanned="1">
            <text:p>🎛️ SELECT AUTHORITATIVE INVENTORY RECORD</text:p>
          </table:table-cell>
          <table:covered-table-cell table:number-columns-repeated="17" table:style-name="ce52"/>
        </table:table-row>
        <table:table-row table:style-name="ro5">
          <table:table-cell table:style-name="ce53" office:value-type="string" ns42:value-type="string" table:number-columns-spanned="6" table:number-rows-spanned="1">
            <text:p>SELECTED INVENTORY RECORD ID</text:p>
          </table:table-cell>
          <table:covered-table-cell table:number-columns-repeated="5" table:style-name="ce53"/>
          <table:table-cell table:style-name="ce53" office:value-type="string" ns42:value-type="string" table:number-columns-spanned="6" table:number-rows-spanned="1">
            <text:p>EXISTING PRODUCT IDENTITY</text:p>
          </table:table-cell>
          <table:covered-table-cell table:number-columns-repeated="5" table:style-name="ce53"/>
          <table:table-cell table:style-name="ce53" office:value-type="string" ns42:value-type="string" table:number-columns-spanned="6" table:number-rows-spanned="1">
            <text:p>AUTHORITATIVE BUSINESS STATE</text:p>
          </table:table-cell>
          <table:covered-table-cell table:number-columns-repeated="5" table:style-name="ce53"/>
        </table:table-row>
        <table:table-row table:style-name="ro5">
          <table:table-cell table:style-name="ce54" office:value-type="string" ns42:value-type="string" table:number-columns-spanned="6" table:number-rows-spanned="1">
            <text:p>INV-000001</text:p>
          </table:table-cell>
          <table:covered-table-cell table:number-columns-repeated="5" table:style-name="ce54"/>
          <table:table-cell table:style-name="ce54" table:formula="of:=IF(TRIM([.A522])=&quot;&quot;;&quot;REVIEW REQUIRED&quot;;IF(COUNTIF([.$A$518];[.A522])=0;&quot;RECORD NOT FOUND&quot;;IF(COUNTIF([.$A$518];[.A522])&gt;1;&quot;IDENTITY CONFLICT · REVIEW REQUIRED&quot;;IF(TRIM(INDEX([.$E$518];MATCH([.A522];[.$A$518];0)))=&quot;&quot;;&quot;PRODUCT IDENTITY MISSING · REVIEW REQUIRED&quot;;INDEX([.$E$518];MATCH([.A522];[.$A$518];0))))))" office:value-type="string" office:string-value="Mega Greninja ex Premium Collection" ns42:value-type="string" table:number-columns-spanned="6" table:number-rows-spanned="1">
            <text:p>Mega Greninja ex Premium Collection</text:p>
          </table:table-cell>
          <table:covered-table-cell table:number-columns-repeated="5" table:style-name="ce54"/>
          <table:table-cell table:style-name="ce54" table:formula="of:=IF(TRIM([.A522])=&quot;&quot;;&quot;REVIEW REQUIRED&quot;;IF(COUNTIF([.$A$518];[.A522])=0;&quot;RECORD NOT FOUND&quot;;IF(COUNTIF([.$A$518];[.A522])&gt;1;&quot;IDENTITY CONFLICT · REVIEW REQUIRED&quot;;IF(TRIM(INDEX([.$L$518];MATCH([.A522];[.$A$518];0)))=&quot;&quot;;&quot;STATE EVIDENCE MISSING · REVIEW REQUIRED&quot;;INDEX([.$L$518];MATCH([.A522];[.$A$518];0))))))" office:value-type="string" office:string-value="OWNED" ns42:value-type="string" table:number-columns-spanned="6" table:number-rows-spanned="1">
            <text:p>OWNED</text:p>
          </table:table-cell>
          <table:covered-table-cell table:number-columns-repeated="5" table:style-name="ce54"/>
        </table:table-row>
        <table:table-row table:style-name="ro5">
          <table:table-cell table:style-name="ce52" office:value-type="string" ns42:value-type="string" table:number-columns-spanned="18" table:number-rows-spanned="1">
            <text:p>🎯 REAL INVENTORY → READ-ONLY ACTION CENTER ROUTING</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21">
          <table:table-cell table:style-name="ce54" table:formula="of:=IF(UPPER(TRIM([.M522]))=&quot;PREPARATION NEEDED&quot;;&quot;COMPLETE NEXT PREPARATION RESPONSIBILITY&quot;;IF(UPPER(TRIM([.M522]))=&quot;READY TO LIST&quot;;&quot;CONFIRM LISTING INTENT&quot;;IF(UPPER(TRIM([.M522]))=&quot;READY FOR PUBLICATION&quot;;&quot;AUTHORIZE PUBLICATION&quot;;IF(UPPER(TRIM([.M522]))=&quot;PUBLISHED&quot;;&quot;REVIEW PLATFORM EXPOSURE&quot;;IF(UPPER(TRIM([.M522]))=&quot;ACTIVE PLATFORM EXPOSURE&quot;;&quot;OBSERVE SALE EVIDENCE&quot;;IF(UPPER(TRIM([.M522]))=&quot;SOLD&quot;;&quot;REVIEW FULFILLMENT PREPARATION&quot;;IF(UPPER(TRIM([.M522]))=&quot;READY FOR SHIPMENT&quot;;&quot;RECORD SHIPMENT RESULT&quot;;IF(UPPER(TRIM([.M522]))=&quot;SHIPPED&quot;;&quot;REVIEW DELIVERY EVIDENCE&quot;;IF(UPPER(TRIM([.M522]))=&quot;DELIVERED&quot;;&quot;REVIEW SETTLEMENT EVIDENCE&quot;;IF(UPPER(TRIM([.M522]))=&quot;PAID OUT&quot;;&quot;REVIEW LIFECYCLE COMPLETION&quot;;IF(UPPER(TRIM([.M522]))=&quot;COMPLETE&quot;;&quot;NO NEXT LIFECYCLE ACTION&quot;;&quot;REVIEW REQUIRED&quot;)))))))))))" office:value-type="string" office:string-value="REVIEW REQUIRED" ns42:value-type="string" table:number-columns-spanned="4" table:number-rows-spanned="1">
            <text:p>REVIEW REQUIRED</text:p>
          </table:table-cell>
          <table:covered-table-cell table:number-columns-repeated="3" table:style-name="ce54"/>
          <table:table-cell table:style-name="ce54" table:formula="of:=IF(UPPER(TRIM([.M522]))=&quot;PREPARATION NEEDED&quot;;&quot;NEXT READINESS BLOCKER&quot;;IF(UPPER(TRIM([.M522]))=&quot;READY TO LIST&quot;;&quot;LISTING RECORD&quot;;IF(UPPER(TRIM([.M522]))=&quot;READY FOR PUBLICATION&quot;;&quot;PUBLICATION AUTHORITY&quot;;IF(UPPER(TRIM([.M522]))=&quot;PUBLISHED&quot;;&quot;PLATFORM EXPOSURE EVIDENCE&quot;;IF(UPPER(TRIM([.M522]))=&quot;ACTIVE PLATFORM EXPOSURE&quot;;&quot;SALE EVIDENCE&quot;;IF(UPPER(TRIM([.M522]))=&quot;SOLD&quot;;&quot;FULFILLMENT PREPARATION&quot;;IF(UPPER(TRIM([.M522]))=&quot;READY FOR SHIPMENT&quot;;&quot;SHIPMENT EVIDENCE&quot;;IF(UPPER(TRIM([.M522]))=&quot;SHIPPED&quot;;&quot;DELIVERY EVIDENCE&quot;;IF(UPPER(TRIM([.M522]))=&quot;DELIVERED&quot;;&quot;SETTLEMENT EVIDENCE&quot;;IF(UPPER(TRIM([.M522]))=&quot;PAID OUT&quot;;&quot;COMPLETION CROSS-CHECK&quot;;IF(UPPER(TRIM([.M522]))=&quot;COMPLETE&quot;;&quot;NONE · TERMINAL STATE&quot;;&quot;UNMAPPED STATE&quot;)))))))))))" office:value-type="string" office:string-value="UNMAPPED STATE" ns42:value-type="string" table:number-columns-spanned="4" table:number-rows-spanned="1">
            <text:p>UNMAPPED STATE</text:p>
          </table:table-cell>
          <table:covered-table-cell table:number-columns-repeated="3" table:style-name="ce54"/>
          <table:table-cell table:style-name="ce54" table:formula="of:=IF(UPPER(TRIM([.M522]))=&quot;PREPARATION NEEDED&quot;;&quot;SUPPORTED PREPARATION EVIDENCE&quot;;IF(UPPER(TRIM([.M522]))=&quot;READY TO LIST&quot;;&quot;SUPPORTED LISTING INTENT EVIDENCE&quot;;IF(UPPER(TRIM([.M522]))=&quot;READY FOR PUBLICATION&quot;;&quot;SUPPORTED PUBLICATION AUTHORIZATION EVIDENCE&quot;;IF(UPPER(TRIM([.M522]))=&quot;PUBLISHED&quot;;&quot;FACTUAL PUBLICATION OR EXPOSURE RESULT&quot;;IF(UPPER(TRIM([.M522]))=&quot;ACTIVE PLATFORM EXPOSURE&quot;;&quot;FACTUAL SALE RESULT&quot;;IF(UPPER(TRIM([.M522]))=&quot;SOLD&quot;;&quot;SUPPORTED PACKAGING + SHIPMENT PATH REVIEW&quot;;IF(UPPER(TRIM([.M522]))=&quot;READY FOR SHIPMENT&quot;;&quot;FACTUAL SHIPMENT RESULT&quot;;IF(UPPER(TRIM([.M522]))=&quot;SHIPPED&quot;;&quot;FACTUAL DELIVERY RESULT&quot;;IF(UPPER(TRIM([.M522]))=&quot;DELIVERED&quot;;&quot;FACTUAL SETTLEMENT EVIDENCE&quot;;IF(UPPER(TRIM([.M522]))=&quot;PAID OUT&quot;;&quot;SUPPORTED COMPLETION FACTS&quot;;IF(UPPER(TRIM([.M522]))=&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M522]))=&quot;PREPARATION NEEDED&quot;;&quot;REVIEW ROUTED EVIDENCE&quot;;IF(UPPER(TRIM([.M522]))=&quot;READY TO LIST&quot;;&quot;REVIEW LISTING INTENT EVIDENCE&quot;;IF(UPPER(TRIM([.M522]))=&quot;READY FOR PUBLICATION&quot;;&quot;REVIEW PUBLICATION AUTHORITY&quot;;IF(UPPER(TRIM([.M522]))=&quot;PUBLISHED&quot;;&quot;REVIEW PLATFORM EXPOSURE EVIDENCE&quot;;IF(UPPER(TRIM([.M522]))=&quot;ACTIVE PLATFORM EXPOSURE&quot;;&quot;REVIEW SALE EVIDENCE&quot;;IF(UPPER(TRIM([.M522]))=&quot;SOLD&quot;;&quot;REVIEW FULFILLMENT EVIDENCE&quot;;IF(UPPER(TRIM([.M522]))=&quot;READY FOR SHIPMENT&quot;;&quot;REVIEW SHIPMENT EVIDENCE&quot;;IF(UPPER(TRIM([.M522]))=&quot;SHIPPED&quot;;&quot;REVIEW DELIVERY EVIDENCE&quot;;IF(UPPER(TRIM([.M522]))=&quot;DELIVERED&quot;;&quot;REVIEW SETTLEMENT EVIDENCE&quot;;IF(UPPER(TRIM([.M522]))=&quot;PAID OUT&quot;;&quot;REVIEW COMPLETION EVIDENCE&quot;;IF(UPPER(TRIM([.M522]))=&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M522]))=&quot;PREPARATION NEEDED&quot;;&quot;PREPARATION ADVANCEMENT · PREVIEW&quot;;IF(UPPER(TRIM([.M522]))=&quot;READY TO LIST&quot;;&quot;READY TO LIST → READY FOR PUBLICATION · PREVIEW&quot;;IF(UPPER(TRIM([.M522]))=&quot;READY FOR PUBLICATION&quot;;&quot;READY FOR PUBLICATION → PUBLISHED · PREVIEW&quot;;IF(UPPER(TRIM([.M522]))=&quot;PUBLISHED&quot;;&quot;PUBLISHED → ACTIVE PLATFORM EXPOSURE · PREVIEW&quot;;IF(UPPER(TRIM([.M522]))=&quot;ACTIVE PLATFORM EXPOSURE&quot;;&quot;ACTIVE PLATFORM EXPOSURE → SOLD · PREVIEW&quot;;IF(UPPER(TRIM([.M522]))=&quot;SOLD&quot;;&quot;SOLD → READY FOR SHIPMENT · PREVIEW&quot;;IF(UPPER(TRIM([.M522]))=&quot;READY FOR SHIPMENT&quot;;&quot;READY FOR SHIPMENT → SHIPPED · PREVIEW&quot;;IF(UPPER(TRIM([.M522]))=&quot;SHIPPED&quot;;&quot;SHIPPED → DELIVERED · PREVIEW&quot;;IF(UPPER(TRIM([.M522]))=&quot;DELIVERED&quot;;&quot;DELIVERED → PAID OUT · PREVIEW&quot;;IF(UPPER(TRIM([.M522]))=&quot;PAID OUT&quot;;&quot;PAID OUT → COMPLETE · PREVIEW&quot;;IF(UPPER(TRIM([.M522]))=&quot;COMPLETE&quot;;&quot;NONE · TERMINAL STATE&quot;;&quot;NO TRANSITION PREVIEW&quot;)))))))))))" office:value-type="string" office:string-value="NO TRANSITION PREVIEW" ns42:value-type="string" table:number-columns-spanned="4" table:number-rows-spanned="1">
            <text:p>NO TRANSITION PREVIEW</text:p>
          </table:table-cell>
          <table:covered-table-cell table:number-columns-repeated="3" table:style-name="ce54"/>
        </table:table-row>
        <table:table-row table:style-name="ro5">
          <table:table-cell table:style-name="ce52" office:value-type="string" ns42:value-type="string" table:number-columns-spanned="18" table:number-rows-spanned="1">
            <text:p>🛑 AUTHORITATIVE INVENTORY IDENTITY + ROUTING FAIL-CLOSED GATE</text:p>
          </table:table-cell>
          <table:covered-table-cell table:number-columns-repeated="17" table:style-name="ce52"/>
        </table:table-row>
        <table:table-row table:style-name="ro5">
          <table:table-cell table:style-name="ce53" office:value-type="string" ns42:value-type="string" table:number-columns-spanned="3" table:number-rows-spanned="1">
            <text:p>BLANK ID</text:p>
          </table:table-cell>
          <table:covered-table-cell table:number-columns-repeated="2" table:style-name="ce53"/>
          <table:table-cell table:style-name="ce53" office:value-type="string" ns42:value-type="string" table:number-columns-spanned="3" table:number-rows-spanned="1">
            <text:p>ZERO MATCHES</text:p>
          </table:table-cell>
          <table:covered-table-cell table:number-columns-repeated="2" table:style-name="ce53"/>
          <table:table-cell table:style-name="ce53" office:value-type="string" ns42:value-type="string" table:number-columns-spanned="4" table:number-rows-spanned="1">
            <text:p>DUPLICATE ID</text:p>
          </table:table-cell>
          <table:covered-table-cell table:number-columns-repeated="3" table:style-name="ce53"/>
          <table:table-cell table:style-name="ce53" office:value-type="string" ns42:value-type="string" table:number-columns-spanned="4" table:number-rows-spanned="1">
            <text:p>MISSING PRODUCT / STATE</text:p>
          </table:table-cell>
          <table:covered-table-cell table:number-columns-repeated="3" table:style-name="ce53"/>
          <table:table-cell table:style-name="ce53" office:value-type="string" ns42:value-type="string" table:number-columns-spanned="4" table:number-rows-spanned="1">
            <text:p>UNSUPPORTED / UNMAPPED STATE</text:p>
          </table:table-cell>
          <table:covered-table-cell table:number-columns-repeated="3" table:style-name="ce53"/>
        </table:table-row>
        <table:table-row table:style-name="ro5">
          <table:table-cell table:style-name="ce54" office:value-type="string" ns42:value-type="string" table:number-columns-spanned="3" table:number-rows-spanned="1">
            <text:p>REVIEW REQUIRED</text:p>
          </table:table-cell>
          <table:covered-table-cell table:number-columns-repeated="2" table:style-name="ce54"/>
          <table:table-cell table:style-name="ce54" office:value-type="string" ns42:value-type="string" table:number-columns-spanned="3" table:number-rows-spanned="1">
            <text:p>RECORD NOT FOUND</text:p>
          </table:table-cell>
          <table:covered-table-cell table:number-columns-repeated="2" table:style-name="ce54"/>
          <table:table-cell table:style-name="ce54" office:value-type="string" ns42:value-type="string" table:number-columns-spanned="4" table:number-rows-spanned="1">
            <text:p>IDENTITY CONFLICT · REVIEW REQUIRED</text:p>
          </table:table-cell>
          <table:covered-table-cell table:number-columns-repeated="3" table:style-name="ce54"/>
          <table:table-cell table:style-name="ce54" office:value-type="string" ns42:value-type="string" table:number-columns-spanned="4" table:number-rows-spanned="1">
            <text:p>MISSING EVIDENCE · REVIEW REQUIRED</text:p>
          </table:table-cell>
          <table:covered-table-cell table:number-columns-repeated="3" table:style-name="ce54"/>
          <table:table-cell table:style-name="ce54" office:value-type="string" ns42:value-type="string" table:number-columns-spanned="4" table:number-rows-spanned="1">
            <text:p>UNMAPPED STATE · REVIEW REQUIRED</text:p>
          </table:table-cell>
          <table:covered-table-cell table:number-columns-repeated="3" table:style-name="ce54"/>
        </table:table-row>
        <table:table-row table:style-name="ro5">
          <table:table-cell table:style-name="ce54" office:value-type="string" ns42:value-type="string" table:number-columns-spanned="18" table:number-rows-spanned="1">
            <text:p>🔒 INVENTORY OWNS RECORD IDENTITY · ACTION CENTER READS INVENTORY TRUTH · ROUTING GUIDANCE ≠ STATE MUTATION</text:p>
          </table:table-cell>
          <table:covered-table-cell table:number-columns-repeated="17" table:style-name="ce54"/>
        </table:table-row>
        <table:table-row table:style-name="ro5">
          <table:table-cell table:style-name="ce52" office:value-type="string" ns42:value-type="string" table:number-columns-spanned="18" table:number-rows-spanned="1">
            <text:p>🏁 AUTHORITATIVE INVENTORY IDENTITY + READ-ONLY ACTION CENTER GATE · BUILD 106</text:p>
          </table:table-cell>
          <table:covered-table-cell table:number-columns-repeated="17" table:style-name="ce52"/>
        </table:table-row>
        <table:table-row table:style-name="ro5">
          <table:table-cell table:style-name="ce54" office:value-type="string" ns42:value-type="string" table:number-columns-spanned="18" table:number-rows-spanned="1">
            <text:p>INVENTORY OWNS RECORD IDENTITY → ACTION CENTER SELECTS IDENTITY → READS INVENTORY TRUTH → DERIVES GUIDANCE</text:p>
          </table:table-cell>
          <table:covered-table-cell table:number-columns-repeated="17" table:style-name="ce54"/>
        </table:table-row>
        <table:table-row table:style-name="ro5">
          <table:table-cell table:style-name="ce52" table:number-columns-spanned="18" table:number-rows-spanned="1"/>
          <table:covered-table-cell table:number-columns-repeated="17" table:style-name="ce52"/>
        </table:table-row>
        <table:table-row table:style-name="ro5">
          <table:table-cell table:style-name="ce52" office:value-type="string" ns42:value-type="string" table:number-columns-spanned="18" table:number-rows-spanned="1">
            <text:p>🧩 OWNED STATE SEMANTICS → TWO-DIMENSION INVENTORY STATE · BUILDS 107–114</text:p>
          </table:table-cell>
          <table:covered-table-cell table:number-columns-repeated="17" table:style-name="ce52"/>
        </table:table-row>
        <table:table-row table:style-name="ro5">
          <table:table-cell table:style-name="ce54" office:value-type="string" ns42:value-type="string" table:number-columns-spanned="18" table:number-rows-spanned="1">
            <text:p>OWNERSHIP CONDITION ≠ OPERATIONAL LIFECYCLE · ACTION CENTER ROUTES FROM LIFECYCLE EVIDENCE ONLY</text:p>
          </table:table-cell>
          <table:covered-table-cell table:number-columns-repeated="17" table:style-name="ce54"/>
        </table:table-row>
        <table:table-row table:style-name="ro5">
          <table:table-cell table:style-name="ce53" office:value-type="string" ns42:value-type="string" table:number-columns-spanned="6" table:number-rows-spanned="1">
            <text:p>BUSINESS DIMENSION</text:p>
          </table:table-cell>
          <table:covered-table-cell table:number-columns-repeated="5" table:style-name="ce53"/>
          <table:table-cell table:style-name="ce53" office:value-type="string" ns42:value-type="string" table:number-columns-spanned="6" table:number-rows-spanned="1">
            <text:p>CURRENT VALUE</text:p>
          </table:table-cell>
          <table:covered-table-cell table:number-columns-repeated="5" table:style-name="ce53"/>
          <table:table-cell table:style-name="ce53" office:value-type="string" ns42:value-type="string" table:number-columns-spanned="6" table:number-rows-spanned="1">
            <text:p>BUSINESS QUESTION</text:p>
          </table:table-cell>
          <table:covered-table-cell table:number-columns-repeated="5" table:style-name="ce53"/>
        </table:table-row>
        <table:table-row table:style-name="ro5">
          <table:table-cell table:style-name="ce54" office:value-type="string" ns42:value-type="string" table:number-columns-spanned="6" table:number-rows-spanned="1">
            <text:p>BUSINESS INVENTORY CONDITION</text:p>
          </table:table-cell>
          <table:covered-table-cell table:number-columns-repeated="5" table:style-name="ce54"/>
          <table:table-cell table:style-name="ce54" office:value-type="string" ns42:value-type="string" table:number-columns-spanned="6" table:number-rows-spanned="1">
            <text:p>OWNED</text:p>
          </table:table-cell>
          <table:covered-table-cell table:number-columns-repeated="5" table:style-name="ce54"/>
          <table:table-cell table:style-name="ce54" office:value-type="string" ns42:value-type="string" table:number-columns-spanned="6" table:number-rows-spanned="1">
            <text:p>DOES MARKETDEX CURRENTLY OWN THIS FOR BUSINESS PURPOSES?</text:p>
          </table:table-cell>
          <table:covered-table-cell table:number-columns-repeated="5" table:style-name="ce54"/>
        </table:table-row>
        <table:table-row table:style-name="ro5">
          <table:table-cell table:style-name="ce54" office:value-type="string" ns42:value-type="string" table:number-columns-spanned="6" table:number-rows-spanned="1">
            <text:p>OPERATIONAL LIFECYCLE STATE</text:p>
          </table:table-cell>
          <table:covered-table-cell table:number-columns-repeated="5" table:style-name="ce54"/>
          <table:table-cell table:style-name="ce54" office:value-type="string" ns42:value-type="string" table:number-columns-spanned="6" table:number-rows-spanned="1">
            <text:p>SEPARATE RESPONSIBILITY</text:p>
          </table:table-cell>
          <table:covered-table-cell table:number-columns-repeated="5" table:style-name="ce54"/>
          <table:table-cell table:style-name="ce54" office:value-type="string" ns42:value-type="string" table:number-columns-spanned="6" table:number-rows-spanned="1">
            <text:p>WHERE IS THIS RECORD IN ITS CURRENT OPERATIONAL WORKFLOW?</text:p>
          </table:table-cell>
          <table:covered-table-cell table:number-columns-repeated="5" table:style-name="ce54"/>
        </table:table-row>
        <table:table-row table:style-name="ro5">
          <table:table-cell table:style-name="ce54" office:value-type="string" ns42:value-type="string" table:number-columns-spanned="18" table:number-rows-spanned="1">
            <text:p>🔒 OWNED DOES NOT MEAN PREPARATION NEEDED · POSSESSION TRUTH CANNOT INVENT WORKFLOW TRUTH</text:p>
          </table:table-cell>
          <table:covered-table-cell table:number-columns-repeated="17" table:style-name="ce54"/>
        </table:table-row>
        <table:table-row table:style-name="ro5">
          <table:table-cell table:style-name="ce52" office:value-type="string" ns42:value-type="string" table:number-columns-spanned="18" table:number-rows-spanned="1">
            <text:p>🧬 TWO-DIMENSION AUTHORITATIVE STATE SURFACE</text:p>
          </table:table-cell>
          <table:covered-table-cell table:number-columns-repeated="17" table:style-name="ce52"/>
        </table:table-row>
        <table:table-row table:style-name="ro5">
          <table:table-cell table:style-name="ce53" office:value-type="string" ns42:value-type="string" table:number-columns-spanned="4" table:number-rows-spanned="1">
            <text:p>INVENTORY RECORD ID</text:p>
          </table:table-cell>
          <table:covered-table-cell table:number-columns-repeated="3" table:style-name="ce53"/>
          <table:table-cell table:style-name="ce53" office:value-type="string" ns42:value-type="string" table:number-columns-spanned="5" table:number-rows-spanned="1">
            <text:p>PRODUCT / POSITION</text:p>
          </table:table-cell>
          <table:covered-table-cell table:number-columns-repeated="4" table:style-name="ce53"/>
          <table:table-cell table:style-name="ce53" office:value-type="string" ns42:value-type="string" table:number-columns-spanned="4" table:number-rows-spanned="1">
            <text:p>INVENTORY CONDITION</text:p>
          </table:table-cell>
          <table:covered-table-cell table:number-columns-repeated="3" table:style-name="ce53"/>
          <table:table-cell table:style-name="ce53" office:value-type="string" ns42:value-type="string" table:number-columns-spanned="5" table:number-rows-spanned="1">
            <text:p>OPERATIONAL LIFECYCLE STATE</text:p>
          </table:table-cell>
          <table:covered-table-cell table:number-columns-repeated="4" table:style-name="ce53"/>
        </table:table-row>
        <table:table-row table:style-name="ro5">
          <table:table-cell table:style-name="ce54" office:value-type="string" ns42:value-type="string" table:number-columns-spanned="4" table:number-rows-spanned="1">
            <text:p>INV-000001</text:p>
          </table:table-cell>
          <table:covered-table-cell table:number-columns-repeated="3" table:style-name="ce54"/>
          <table:table-cell table:style-name="ce54" table:formula="of:=IF([.A522]=&quot;INV-000001&quot;;[.G522];&quot;REVIEW REQUIRED&quot;)" office:value-type="string" office:string-value="Mega Greninja ex Premium Collection" ns42:value-type="string" table:number-columns-spanned="5" table:number-rows-spanned="1">
            <text:p>Mega Greninja ex Premium Collection</text:p>
          </table:table-cell>
          <table:covered-table-cell table:number-columns-repeated="4" table:style-name="ce54"/>
          <table:table-cell table:style-name="ce54" table:formula="of:=IF([.A522]=&quot;INV-000001&quot;;[.M522];&quot;REVIEW REQUIRED&quot;)" office:value-type="string" office:string-value="OWNED" ns42:value-type="string" table:number-columns-spanned="4" table:number-rows-spanned="1">
            <text:p>OWNED</text:p>
          </table:table-cell>
          <table:covered-table-cell table:number-columns-repeated="3" table:style-name="ce54"/>
          <table:table-cell table:style-name="ce54" table:formula="of:=IF(UPPER(TRIM([.J541]))=&quot;OWNED&quot;;&quot;LIFECYCLE EVIDENCE REQUIRED&quot;;&quot;REVIEW REQUIRED&quot;)" office:value-type="string" office:string-value="LIFECYCLE EVIDENCE REQUIRED" ns42:value-type="string" table:number-columns-spanned="5" table:number-rows-spanned="1">
            <text:p>LIFECYCLE EVIDENCE REQUIRED</text:p>
          </table:table-cell>
          <table:covered-table-cell table:number-columns-repeated="4" table:style-name="ce54"/>
        </table:table-row>
        <table:table-row table:style-name="ro5">
          <table:table-cell table:style-name="ce52" office:value-type="string" ns42:value-type="string" table:number-columns-spanned="18" table:number-rows-spanned="1">
            <text:p>🧪 LIFECYCLE CLASSIFICATION EVIDENCE GATE</text:p>
          </table:table-cell>
          <table:covered-table-cell table:number-columns-repeated="17" table:style-name="ce52"/>
        </table:table-row>
        <table:table-row table:style-name="ro5">
          <table:table-cell table:style-name="ce53" office:value-type="string" ns42:value-type="string" table:number-columns-spanned="6" table:number-rows-spanned="1">
            <text:p>OWNERSHIP EVIDENCE</text:p>
          </table:table-cell>
          <table:covered-table-cell table:number-columns-repeated="5" table:style-name="ce53"/>
          <table:table-cell table:style-name="ce53" office:value-type="string" ns42:value-type="string" table:number-columns-spanned="6" table:number-rows-spanned="1">
            <text:p>LIFECYCLE EVIDENCE</text:p>
          </table:table-cell>
          <table:covered-table-cell table:number-columns-repeated="5" table:style-name="ce53"/>
          <table:table-cell table:style-name="ce53" office:value-type="string" ns42:value-type="string" table:number-columns-spanned="6" table:number-rows-spanned="1">
            <text:p>CLASSIFICATION RESULT</text:p>
          </table:table-cell>
          <table:covered-table-cell table:number-columns-repeated="5" table:style-name="ce53"/>
        </table:table-row>
        <table:table-row table:style-name="ro5">
          <table:table-cell table:style-name="ce54" office:value-type="string" ns42:value-type="string" table:number-columns-spanned="6" table:number-rows-spanned="1">
            <text:p>SUPPORTED · OWNED</text:p>
          </table:table-cell>
          <table:covered-table-cell table:number-columns-repeated="5" table:style-name="ce54"/>
          <table:table-cell table:style-name="ce54" office:value-type="string" ns42:value-type="string" table:number-columns-spanned="6" table:number-rows-spanned="1">
            <text:p>NOT AUTHORITATIVELY ESTABLISHED</text:p>
          </table:table-cell>
          <table:covered-table-cell table:number-columns-repeated="5" table:style-name="ce54"/>
          <table:table-cell table:style-name="ce54" office:value-type="string" ns42:value-type="string" table:number-columns-spanned="6" table:number-rows-spanned="1">
            <text:p>FAIL CLOSED · DO NOT INFER PREPARATION NEEDED</text:p>
          </table:table-cell>
          <table:covered-table-cell table:number-columns-repeated="5" table:style-name="ce54"/>
        </table:table-row>
        <table:table-row table:style-name="ro5">
          <table:table-cell table:style-name="ce54" office:value-type="string" ns42:value-type="string" table:number-columns-spanned="18" table:number-rows-spanned="1">
            <text:p>🛑 MISSING LIFECYCLE EVIDENCE REMAINS REVIEWABLE · MISSING EVIDENCE ≠ GUESSED STATE</text:p>
          </table:table-cell>
          <table:covered-table-cell table:number-columns-repeated="17" table:style-name="ce54"/>
        </table:table-row>
        <table:table-row table:style-name="ro5">
          <table:table-cell table:style-name="ce52" office:value-type="string" ns42:value-type="string" table:number-columns-spanned="18" table:number-rows-spanned="1">
            <text:p>🎯 ACTION CENTER LIFECYCLE-ONLY ROUTING PROOF</text:p>
          </table:table-cell>
          <table:covered-table-cell table:number-columns-repeated="17" table:style-name="ce52"/>
        </table:table-row>
        <table:table-row table:style-name="ro5">
          <table:table-cell table:style-name="ce53" office:value-type="string" ns42:value-type="string" table:number-columns-spanned="6" table:number-rows-spanned="1">
            <text:p>ACTION CENTER INPUT</text:p>
          </table:table-cell>
          <table:covered-table-cell table:number-columns-repeated="5" table:style-name="ce53"/>
          <table:table-cell table:style-name="ce53" office:value-type="string" ns42:value-type="string" table:number-columns-spanned="6" table:number-rows-spanned="1">
            <text:p>ROUTING RESULT</text:p>
          </table:table-cell>
          <table:covered-table-cell table:number-columns-repeated="5" table:style-name="ce53"/>
          <table:table-cell table:style-name="ce53" office:value-type="string" ns42:value-type="string" table:number-columns-spanned="6" table:number-rows-spanned="1">
            <text:p>MUTATION AUTHORITY</text:p>
          </table:table-cell>
          <table:covered-table-cell table:number-columns-repeated="5" table:style-name="ce53"/>
        </table:table-row>
        <table:table-row table:style-name="ro5">
          <table:table-cell table:style-name="ce54" table:formula="of:=[.N541]" office:value-type="string" office:string-value="LIFECYCLE EVIDENCE REQUIRED" ns42:value-type="string" table:number-columns-spanned="6" table:number-rows-spanned="1">
            <text:p>LIFECYCLE EVIDENCE REQUIRED</text:p>
          </table:table-cell>
          <table:covered-table-cell table:number-columns-repeated="5" table:style-name="ce54"/>
          <table:table-cell table:style-name="ce54" table:formula="of:=IF([.A548]=&quot;LIFECYCLE EVIDENCE REQUIRED&quot;;&quot;REVIEW REQUIRED · FAIL CLOSED&quot;;&quot;ROUTE SUPPORTED LIFECYCLE&quot;)" office:value-type="string" office:string-value="REVIEW REQUIRED · FAIL CLOSED" ns42:value-type="string" table:number-columns-spanned="6" table:number-rows-spanned="1">
            <text:p>REVIEW REQUIRED · FAIL CLOSED</text:p>
          </table:table-cell>
          <table:covered-table-cell table:number-columns-repeated="5" table:style-name="ce54"/>
          <table:table-cell table:style-name="ce54" office:value-type="string" ns42:value-type="string" table:number-columns-spanned="6" table:number-rows-spanned="1">
            <text:p>NONE · READ ONLY</text:p>
          </table:table-cell>
          <table:covered-table-cell table:number-columns-repeated="5" table:style-name="ce54"/>
        </table:table-row>
        <table:table-row table:style-name="ro5">
          <table:table-cell table:style-name="ce54" office:value-type="string" ns42:value-type="string" table:number-columns-spanned="18" table:number-rows-spanned="1">
            <text:p>🔒 ACTION CENTER READS OPERATIONAL LIFECYCLE STATE ONLY · INVENTORY CONDITION REMAINS SEPARATE · NO SILENT STATE MUTATION</text:p>
          </table:table-cell>
          <table:covered-table-cell table:number-columns-repeated="17" table:style-name="ce54"/>
        </table:table-row>
        <table:table-row table:style-name="ro5">
          <table:table-cell table:style-name="ce52" office:value-type="string" ns42:value-type="string" table:number-columns-spanned="18" table:number-rows-spanned="1">
            <text:p>🏁 TWO-DIMENSION INVENTORY STATE + ACTION CENTER GATE · BUILD 114</text:p>
          </table:table-cell>
          <table:covered-table-cell table:number-columns-repeated="17" table:style-name="ce52"/>
        </table:table-row>
        <table:table-row table:style-name="ro5">
          <table:table-cell table:style-name="ce54" office:value-type="string" ns42:value-type="string" table:number-columns-spanned="18" table:number-rows-spanned="1">
            <text:p>OWNED ≠ PREPARATION NEEDED → LIFECYCLE EVIDENCE REQUIRED → ACTION CENTER FAILS CLOSED UNTIL AUTHORITATIVE WORKFLOW STATE EXISTS</text:p>
          </table:table-cell>
          <table:covered-table-cell table:number-columns-repeated="17" table:style-name="ce54"/>
        </table:table-row>
        <table:table-row table:style-name="ro5">
          <table:table-cell table:style-name="ce52" office:value-type="string" ns42:value-type="string" table:number-columns-spanned="18" table:number-rows-spanned="1">
            <text:p>🧾 LIFECYCLE CLASSIFICATION EVIDENCE → FIRST AUTHORITATIVE OPERATIONAL STATE · BUILDS 115–122</text:p>
          </table:table-cell>
          <table:covered-table-cell table:number-columns-repeated="17" table:style-name="ce52"/>
        </table:table-row>
        <table:table-row table:style-name="ro5">
          <table:table-cell table:style-name="ce53" office:value-type="string" ns42:value-type="string" table:number-columns-spanned="6" table:number-rows-spanned="1">
            <text:p>CLASSIFICATION QUESTION</text:p>
          </table:table-cell>
          <table:covered-table-cell table:number-columns-repeated="5" table:style-name="ce53"/>
          <table:table-cell table:style-name="ce53" office:value-type="string" ns42:value-type="string" table:number-columns-spanned="6" table:number-rows-spanned="1">
            <text:p>EVIDENCE AUTHOR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WHAT CAN I LIST NOW, AND WHAT BLOCKS THE REST?</text:p>
          </table:table-cell>
          <table:covered-table-cell table:number-columns-repeated="5" table:style-name="ce54"/>
          <table:table-cell table:style-name="ce54" office:value-type="string" ns42:value-type="string" table:number-columns-spanned="6" table:number-rows-spanned="1">
            <text:p>LISTING READINESS FACTORS</text:p>
          </table:table-cell>
          <table:covered-table-cell table:number-columns-repeated="5" table:style-name="ce54"/>
          <table:table-cell table:style-name="ce54" office:value-type="string" ns42:value-type="string" table:number-columns-spanned="6" table:number-rows-spanned="1">
            <text:p>OWNERSHIP DOES NOT CREATE WORKFLOW STATE</text:p>
          </table:table-cell>
          <table:covered-table-cell table:number-columns-repeated="5" table:style-name="ce54"/>
        </table:table-row>
        <table:table-row table:style-name="ro5">
          <table:table-cell table:style-name="ce52" office:value-type="string" ns42:value-type="string" table:number-columns-spanned="18" table:number-rows-spanned="1">
            <text:p>📋 REAL RECORD READINESS EVIDENCE SURFACE</text:p>
          </table:table-cell>
          <table:covered-table-cell table:number-columns-repeated="17" table:style-name="ce52"/>
        </table:table-row>
        <table:table-row table:style-name="ro5">
          <table:table-cell table:style-name="ce53" office:value-type="string" ns42:value-type="string" table:number-columns-spanned="4" table:number-rows-spanned="1">
            <text:p>INVENTORY RECORD ID</text:p>
          </table:table-cell>
          <table:covered-table-cell table:number-columns-repeated="3" table:style-name="ce53"/>
          <table:table-cell table:style-name="ce53" office:value-type="string" ns42:value-type="string" table:number-columns-spanned="4" table:number-rows-spanned="1">
            <text:p>PRODUCT MATCHED</text:p>
          </table:table-cell>
          <table:covered-table-cell table:number-columns-repeated="3" table:style-name="ce53"/>
          <table:table-cell table:style-name="ce53" office:value-type="string" ns42:value-type="string" table:number-columns-spanned="3" table:number-rows-spanned="1">
            <text:p>QUANTITY VERIFIED</text:p>
          </table:table-cell>
          <table:covered-table-cell table:number-columns-repeated="2" table:style-name="ce53"/>
          <table:table-cell table:style-name="ce53" office:value-type="string" ns42:value-type="string" table:number-columns-spanned="4" table:number-rows-spanned="1">
            <text:p>CONDITION APPLICABLE</text:p>
          </table:table-cell>
          <table:covered-table-cell table:number-columns-repeated="3" table:style-name="ce53"/>
          <table:table-cell table:style-name="ce53" office:value-type="string" ns42:value-type="string" table:number-columns-spanned="3" table:number-rows-spanned="1">
            <text:p>CONDITION EVALUATED</text:p>
          </table:table-cell>
          <table:covered-table-cell table:number-columns-repeated="2" table:style-name="ce53"/>
        </table:table-row>
        <table:table-row table:style-name="ro5">
          <table:table-cell table:style-name="ce54" office:value-type="string" ns42:value-type="string" table:number-columns-spanned="4" table:number-rows-spanned="1">
            <text:p>INV-000001</text:p>
          </table:table-cell>
          <table:covered-table-cell table:number-columns-repeated="3" table:style-name="ce54"/>
          <table:table-cell table:style-name="ce54" office:value-type="string" ns42:value-type="string" table:number-columns-spanned="4" table:number-rows-spanned="1">
            <text:p>YES</text:p>
          </table:table-cell>
          <table:covered-table-cell table:number-columns-repeated="3"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3" table:number-rows-spanned="1">
            <text:p>NOT APPLICABLE</text:p>
          </table:table-cell>
          <table:covered-table-cell table:number-columns-repeated="2" table:style-name="ce54"/>
        </table:table-row>
        <table:table-row table:style-name="ro5">
          <table:table-cell table:style-name="ce53" office:value-type="string" ns42:value-type="string" table:number-columns-spanned="3" table:number-rows-spanned="1">
            <text:p>PHOTOS READY</text:p>
          </table:table-cell>
          <table:covered-table-cell table:number-columns-repeated="2" table:style-name="ce53"/>
          <table:table-cell table:style-name="ce53" office:value-type="string" ns42:value-type="string" table:number-columns-spanned="3" table:number-rows-spanned="1">
            <text:p>LISTING CONTENT READY</text:p>
          </table:table-cell>
          <table:covered-table-cell table:number-columns-repeated="2" table:style-name="ce53"/>
          <table:table-cell table:style-name="ce53" office:value-type="string" ns42:value-type="string" table:number-columns-spanned="3" table:number-rows-spanned="1">
            <text:p>PRICE DECISION READY</text:p>
          </table:table-cell>
          <table:covered-table-cell table:number-columns-repeated="2" table:style-name="ce53"/>
          <table:table-cell table:style-name="ce53" office:value-type="string" ns42:value-type="string" table:number-columns-spanned="3" table:number-rows-spanned="1">
            <text:p>PLATFORM SELECTED</text:p>
          </table:table-cell>
          <table:covered-table-cell table:number-columns-repeated="2" table:style-name="ce53"/>
          <table:table-cell table:style-name="ce53" office:value-type="string" ns42:value-type="string" table:number-columns-spanned="3" table:number-rows-spanned="1">
            <text:p>SHIPPING PATH REVIEWED</text:p>
          </table:table-cell>
          <table:covered-table-cell table:number-columns-repeated="2" table:style-name="ce53"/>
          <table:table-cell table:style-name="ce53" office:value-type="string" ns42:value-type="string" table:number-columns-spanned="3" table:number-rows-spanned="1">
            <text:p>BLOCKING DATA QUALITY ISSUE</text:p>
          </table:table-cell>
          <table:covered-table-cell table:number-columns-repeated="2" table:style-name="ce53"/>
        </table:table-row>
        <table:table-row table:style-name="ro5">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row>
        <table:table-row table:style-name="ro5">
          <table:table-cell table:style-name="ce52" office:value-type="string" ns42:value-type="string" table:number-columns-spanned="18" table:number-rows-spanned="1">
            <text:p>🧩 APPLICABLE-FACTOR + READINESS CLASSIFICATION GATE</text:p>
          </table:table-cell>
          <table:covered-table-cell table:number-columns-repeated="17" table:style-name="ce52"/>
        </table:table-row>
        <table:table-row table:style-name="ro5">
          <table:table-cell table:style-name="ce53" office:value-type="string" ns42:value-type="string" table:number-columns-spanned="4" table:number-rows-spanned="1">
            <text:p>EVIDENCE STATUS</text:p>
          </table:table-cell>
          <table:covered-table-cell table:number-columns-repeated="3" table:style-name="ce53"/>
          <table:table-cell table:style-name="ce53" office:value-type="string" ns42:value-type="string" table:number-columns-spanned="4" table:number-rows-spanned="1">
            <text:p>DATA QUALITY GATE</text:p>
          </table:table-cell>
          <table:covered-table-cell table:number-columns-repeated="3" table:style-name="ce53"/>
          <table:table-cell table:style-name="ce53" office:value-type="string" ns42:value-type="string" table:number-columns-spanned="5" table:number-rows-spanned="1">
            <text:p>PREPARATION FACTORS</text:p>
          </table:table-cell>
          <table:covered-table-cell table:number-columns-repeated="4" table:style-name="ce53"/>
          <table:table-cell table:style-name="ce53" office:value-type="string" ns42:value-type="string" table:number-columns-spanned="5" table:number-rows-spanned="1">
            <text:p>CLASSIFICATION RESULT</text:p>
          </table:table-cell>
          <table:covered-table-cell table:number-columns-repeated="4" table:style-name="ce53"/>
        </table:table-row>
        <table:table-row table:style-name="ro5">
          <table:table-cell table:style-name="ce54" office:value-type="string" ns42:value-type="string" table:number-columns-spanned="4" table:number-rows-spanned="1">
            <text:p>EVALUATED</text:p>
          </table:table-cell>
          <table:covered-table-cell table:number-columns-repeated="3" table:style-name="ce54"/>
          <table:table-cell table:style-name="ce54" office:value-type="string" ns42:value-type="string" table:number-columns-spanned="4" table:number-rows-spanned="1">
            <text:p>CLEAR</text:p>
          </table:table-cell>
          <table:covered-table-cell table:number-columns-repeated="3" table:style-name="ce54"/>
          <table:table-cell table:style-name="ce54" office:value-type="string" ns42:value-type="string" table:number-columns-spanned="5" table:number-rows-spanned="1">
            <text:p>PREPARATION FACTORS MISSING</text:p>
          </table:table-cell>
          <table:covered-table-cell table:number-columns-repeated="4" table:style-name="ce54"/>
          <table:table-cell table:style-name="ce54" table:formula="of:=IF(OR(TRIM([.E557])=&quot;&quot;;TRIM([.I557])=&quot;&quot;;TRIM([.L557])=&quot;&quot;;TRIM([.A559])=&quot;&quot;;TRIM([.D559])=&quot;&quot;;TRIM([.G559])=&quot;&quot;;TRIM([.J559])=&quot;&quot;;TRIM([.M559])=&quot;&quot;);&quot;NOT EVALUATED&quot;;IF(UPPER(TRIM([.E562]))&lt;&gt;&quot;CLEAR&quot;;&quot;BLOCKED&quot;;IF(OR(UPPER(TRIM([.E557]))&lt;&gt;&quot;YES&quot;;UPPER(TRIM([.I557]))&lt;&gt;&quot;YES&quot;;AND(UPPER(TRIM([.L557]))=&quot;YES&quot;;UPPER(TRIM([.P557]))&lt;&gt;&quot;YES&quot;);UPPER(TRIM([.A559]))&lt;&gt;&quot;YES&quot;;UPPER(TRIM([.D559]))&lt;&gt;&quot;YES&quot;;UPPER(TRIM([.G559]))&lt;&gt;&quot;YES&quot;;UPPER(TRIM([.J559]))&lt;&gt;&quot;YES&quot;;UPPER(TRIM([.M559]))&lt;&gt;&quot;YES&quot;);&quot;PREPARATION NEEDED&quot;;&quot;READY TO LIST&quot;)))" office:value-type="string" office:string-value="PREPARATION NEEDED" ns42:value-type="string" table:number-columns-spanned="5" table:number-rows-spanned="1">
            <text:p>PREPARATION NEEDED</text:p>
          </table:table-cell>
          <table:covered-table-cell table:number-columns-repeated="4" table:style-name="ce54"/>
        </table:table-row>
        <table:table-row table:style-name="ro5">
          <table:table-cell table:style-name="ce53" office:value-type="string" ns42:value-type="string" table:number-columns-spanned="4" table:number-rows-spanned="1">
            <text:p>⚪ NOT EVALUATED</text:p>
          </table:table-cell>
          <table:covered-table-cell table:number-columns-repeated="3" table:style-name="ce53"/>
          <table:table-cell table:style-name="ce53" office:value-type="string" ns42:value-type="string" table:number-columns-spanned="4" table:number-rows-spanned="1">
            <text:p>🛑 BLOCKED</text:p>
          </table:table-cell>
          <table:covered-table-cell table:number-columns-repeated="3" table:style-name="ce53"/>
          <table:table-cell table:style-name="ce53" office:value-type="string" ns42:value-type="string" table:number-columns-spanned="5" table:number-rows-spanned="1">
            <text:p>🚧 PREPARATION NEEDED</text:p>
          </table:table-cell>
          <table:covered-table-cell table:number-columns-repeated="4" table:style-name="ce53"/>
          <table:table-cell table:style-name="ce53" office:value-type="string" ns42:value-type="string" table:number-columns-spanned="5" table:number-rows-spanned="1">
            <text:p>🟢 READY TO LIST</text:p>
          </table:table-cell>
          <table:covered-table-cell table:number-columns-repeated="4" table:style-name="ce53"/>
        </table:table-row>
        <table:table-row table:style-name="ro5">
          <table:table-cell table:style-name="ce54" office:value-type="string" ns42:value-type="string" table:number-columns-spanned="4" table:number-rows-spanned="1">
            <text:p>EVIDENCE NOT EVALUATED</text:p>
          </table:table-cell>
          <table:covered-table-cell table:number-columns-repeated="3" table:style-name="ce54"/>
          <table:table-cell table:style-name="ce54" office:value-type="string" ns42:value-type="string" table:number-columns-spanned="4" table:number-rows-spanned="1">
            <text:p>BLOCKING DATA QUALITY ISSUE</text:p>
          </table:table-cell>
          <table:covered-table-cell table:number-columns-repeated="3" table:style-name="ce54"/>
          <table:table-cell table:style-name="ce54" office:value-type="string" ns42:value-type="string" table:number-columns-spanned="5" table:number-rows-spanned="1">
            <text:p>≥1 APPLICABLE FACTOR NOT READY</text:p>
          </table:table-cell>
          <table:covered-table-cell table:number-columns-repeated="4" table:style-name="ce54"/>
          <table:table-cell table:style-name="ce54" office:value-type="string" ns42:value-type="string" table:number-columns-spanned="5" table:number-rows-spanned="1">
            <text:p>ALL APPLICABLE FACTORS READY</text:p>
          </table:table-cell>
          <table:covered-table-cell table:number-columns-repeated="4" table:style-name="ce54"/>
        </table:table-row>
        <table:table-row table:style-name="ro5">
          <table:table-cell table:style-name="ce52" office:value-type="string" ns42:value-type="string" table:number-columns-spanned="18" table:number-rows-spanned="1">
            <text:p>🎯 FIRST AUTHORITATIVE OPERATIONAL LIFECYCLE STATE</text:p>
          </table:table-cell>
          <table:covered-table-cell table:number-columns-repeated="17" table:style-name="ce52"/>
        </table:table-row>
        <table:table-row table:style-name="ro5">
          <table:table-cell table:style-name="ce53" office:value-type="string" ns42:value-type="string" table:number-columns-spanned="5" table:number-rows-spanned="1">
            <text:p>INVENTORY RECORD ID</text:p>
          </table:table-cell>
          <table:covered-table-cell table:number-columns-repeated="4" table:style-name="ce53"/>
          <table:table-cell table:style-name="ce53" office:value-type="string" ns42:value-type="string" table:number-columns-spanned="6" table:number-rows-spanned="1">
            <text:p>BUSINESS INVENTORY CONDITION</text:p>
          </table:table-cell>
          <table:covered-table-cell table:number-columns-repeated="5" table:style-name="ce53"/>
          <table:table-cell table:style-name="ce53" office:value-type="string" ns42:value-type="string" table:number-columns-spanned="7" table:number-rows-spanned="1">
            <text:p>AUTHORITATIVE OPERATIONAL LIFECYCLE STATE</text:p>
          </table:table-cell>
          <table:covered-table-cell table:number-columns-repeated="6" table:style-name="ce53"/>
        </table:table-row>
        <table:table-row table:style-name="ro5">
          <table:table-cell table:style-name="ce54" office:value-type="string" ns42:value-type="string" table:number-columns-spanned="5" table:number-rows-spanned="1">
            <text:p>INV-000001</text:p>
          </table:table-cell>
          <table:covered-table-cell table:number-columns-repeated="4" table:style-name="ce54"/>
          <table:table-cell table:style-name="ce54" office:value-type="string" ns42:value-type="string" table:number-columns-spanned="6" table:number-rows-spanned="1">
            <text:p>OWNED</text:p>
          </table:table-cell>
          <table:covered-table-cell table:number-columns-repeated="5" table:style-name="ce54"/>
          <table:table-cell table:style-name="ce54" table:formula="of:=[.N562]" office:value-type="string" office:string-value="PREPARATION NEEDED" ns42:value-type="string" table:number-columns-spanned="7" table:number-rows-spanned="1">
            <text:p>PREPARATION NEEDED</text:p>
          </table:table-cell>
          <table:covered-table-cell table:number-columns-repeated="6" table:style-name="ce54"/>
        </table:table-row>
        <table:table-row table:style-name="ro5">
          <table:table-cell table:style-name="ce52" office:value-type="string" ns42:value-type="string" table:number-columns-spanned="18" table:number-rows-spanned="1">
            <text:p>⚡ ACTION CENTER READS AUTHORITATIVE OPERATIONAL STATE ONLY</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21">
          <table:table-cell table:style-name="ce54" table:formula="of:=IF(UPPER(TRIM([.L567]))=&quot;PREPARATION NEEDED&quot;;&quot;COMPLETE NEXT PREPARATION RESPONSIBILITY&quot;;IF(UPPER(TRIM([.L567]))=&quot;READY TO LIST&quot;;&quot;CONFIRM LISTING INTENT&quot;;IF(UPPER(TRIM([.L567]))=&quot;BLOCKED&quot;;&quot;REVIEW BLOCKING DATA QUALITY ISSUE&quot;;IF(UPPER(TRIM([.L567]))=&quot;NOT EVALUATED&quot;;&quot;EVALUATE LISTING READINESS EVIDENCE&quot;;&quot;REVIEW REQUIRED&quot;))))" office:value-type="string" office:string-value="COMPLETE NEXT PREPARATION RESPONSIBILITY" ns42:value-type="string" table:number-columns-spanned="4" table:number-rows-spanned="1">
            <text:p>COMPLETE NEXT PREPARATION RESPONSIBILITY</text:p>
          </table:table-cell>
          <table:covered-table-cell table:number-columns-repeated="3" table:style-name="ce54"/>
          <table:table-cell table:style-name="ce54" table:formula="of:=IF(UPPER(TRIM([.L567]))=&quot;PREPARATION NEEDED&quot;;&quot;NEXT READINESS BLOCKER&quot;;IF(UPPER(TRIM([.L567]))=&quot;READY TO LIST&quot;;&quot;LISTING RECORD&quot;;IF(UPPER(TRIM([.L567]))=&quot;BLOCKED&quot;;&quot;BLOCKING DATA QUALITY ISSUE&quot;;IF(UPPER(TRIM([.L567]))=&quot;NOT EVALUATED&quot;;&quot;LISTING READINESS EVIDENCE&quot;;&quot;UNMAPPED STATE&quot;))))" office:value-type="string" office:string-value="NEXT READINESS BLOCKER" ns42:value-type="string" table:number-columns-spanned="4" table:number-rows-spanned="1">
            <text:p>NEXT READINESS BLOCKER</text:p>
          </table:table-cell>
          <table:covered-table-cell table:number-columns-repeated="3" table:style-name="ce54"/>
          <table:table-cell table:style-name="ce54" table:formula="of:=IF(UPPER(TRIM([.L567]))=&quot;PREPARATION NEEDED&quot;;&quot;SUPPORTED PREPARATION EVIDENCE&quot;;IF(UPPER(TRIM([.L567]))=&quot;READY TO LIST&quot;;&quot;SUPPORTED LISTING INTENT EVIDENCE&quot;;IF(UPPER(TRIM([.L567]))=&quot;BLOCKED&quot;;&quot;SUPPORTED BLOCKER EVIDENCE&quot;;IF(UPPER(TRIM([.L567]))=&quot;NOT EVALUATED&quot;;&quot;SUPPORTED READINESS EVIDENCE&quot;;&quot;SUPPORTED STATE REVIEW&quot;))))" office:value-type="string" office:string-value="SUPPORTED PREPARATION EVIDENCE" ns42:value-type="string" table:number-columns-spanned="3" table:number-rows-spanned="1">
            <text:p>SUPPORTED PREPARATION EVIDENCE</text:p>
          </table:table-cell>
          <table:covered-table-cell table:number-columns-repeated="2" table:style-name="ce54"/>
          <table:table-cell table:style-name="ce54" table:formula="of:=IF(UPPER(TRIM([.L567]))=&quot;PREPARATION NEEDED&quot;;&quot;REVIEW ROUTED EVIDENCE&quot;;IF(UPPER(TRIM([.L567]))=&quot;READY TO LIST&quot;;&quot;REVIEW LISTING INTENT EVIDENCE&quot;;IF(UPPER(TRIM([.L567]))=&quot;BLOCKED&quot;;&quot;REVIEW BLOCKER EVIDENCE&quot;;IF(UPPER(TRIM([.L567]))=&quot;NOT EVALUATED&quot;;&quot;REVIEW READINESS EVIDENCE&quot;;&quot;REVIEW SELECTED STATE&quot;))))" office:value-type="string" office:string-value="REVIEW ROUTED EVIDENCE" ns42:value-type="string" table:number-columns-spanned="3" table:number-rows-spanned="1">
            <text:p>REVIEW ROUTED EVIDENCE</text:p>
          </table:table-cell>
          <table:covered-table-cell table:number-columns-repeated="2" table:style-name="ce54"/>
          <table:table-cell table:style-name="ce54" table:formula="of:=IF(UPPER(TRIM([.L567]))=&quot;PREPARATION NEEDED&quot;;&quot;PREPARATION ADVANCEMENT · PREVIEW&quot;;IF(UPPER(TRIM([.L567]))=&quot;READY TO LIST&quot;;&quot;READY TO LIST → READY FOR PUBLICATION · PREVIEW&quot;;IF(UPPER(TRIM([.L567]))=&quot;BLOCKED&quot;;&quot;NO TRANSITION PREVIEW&quot;;IF(UPPER(TRIM([.L567]))=&quot;NOT EVALUATED&quot;;&quot;NO TRANSITION PREVIEW&quot;;&quot;NO TRANSITION PREVIEW&quot;))))" office:value-type="string" office:string-value="PREPARATION ADVANCEMENT · PREVIEW" ns42:value-type="string" table:number-columns-spanned="4" table:number-rows-spanned="1">
            <text:p>PREPARATION ADVANCEMENT · PREVIEW</text:p>
          </table:table-cell>
          <table:covered-table-cell table:number-columns-repeated="3" table:style-name="ce54"/>
        </table:table-row>
        <table:table-row table:style-name="ro5">
          <table:table-cell table:style-name="ce52" office:value-type="string" ns42:value-type="string" table:number-columns-spanned="18" table:number-rows-spanned="1">
            <text:p>🔒 CLASSIFICATION PROTECTION</text:p>
          </table:table-cell>
          <table:covered-table-cell table:number-columns-repeated="17" table:style-name="ce52"/>
        </table:table-row>
        <table:table-row table:style-name="ro5">
          <table:table-cell table:style-name="ce53" office:value-type="string" ns42:value-type="string" table:number-columns-spanned="4" table:number-rows-spanned="1">
            <text:p>OWNED ALONE</text:p>
          </table:table-cell>
          <table:covered-table-cell table:number-columns-repeated="3" table:style-name="ce53"/>
          <table:table-cell table:style-name="ce53" office:value-type="string" ns42:value-type="string" table:number-columns-spanned="5" table:number-rows-spanned="1">
            <text:p>CONDITION WHEN NOT APPLICABLE</text:p>
          </table:table-cell>
          <table:covered-table-cell table:number-columns-repeated="4" table:style-name="ce53"/>
          <table:table-cell table:style-name="ce53" office:value-type="string" ns42:value-type="string" table:number-columns-spanned="4" table:number-rows-spanned="1">
            <text:p>BLOCKING DATA QUALITY ISSUE</text:p>
          </table:table-cell>
          <table:covered-table-cell table:number-columns-repeated="3" table:style-name="ce53"/>
          <table:table-cell table:style-name="ce53" office:value-type="string" ns42:value-type="string" table:number-columns-spanned="5" table:number-rows-spanned="1">
            <text:p>MISSING PREPARATION FACTOR</text:p>
          </table:table-cell>
          <table:covered-table-cell table:number-columns-repeated="4" table:style-name="ce53"/>
        </table:table-row>
        <table:table-row table:style-name="ro5">
          <table:table-cell table:style-name="ce54" office:value-type="string" ns42:value-type="string" table:number-columns-spanned="4" table:number-rows-spanned="1">
            <text:p>NO LIFECYCLE INFERENCE</text:p>
          </table:table-cell>
          <table:covered-table-cell table:number-columns-repeated="3" table:style-name="ce54"/>
          <table:table-cell table:style-name="ce54" office:value-type="string" ns42:value-type="string" table:number-columns-spanned="5" table:number-rows-spanned="1">
            <text:p>DO NOT FORCE CONDITION WORKFLOW</text:p>
          </table:table-cell>
          <table:covered-table-cell table:number-columns-repeated="4" table:style-name="ce54"/>
          <table:table-cell table:style-name="ce54" office:value-type="string" ns42:value-type="string" table:number-columns-spanned="4" table:number-rows-spanned="1">
            <text:p>BLOCKED</text:p>
          </table:table-cell>
          <table:covered-table-cell table:number-columns-repeated="3" table:style-name="ce54"/>
          <table:table-cell table:style-name="ce54" office:value-type="string" ns42:value-type="string" table:number-columns-spanned="5" table:number-rows-spanned="1">
            <text:p>PREPARATION NEEDED</text:p>
          </table:table-cell>
          <table:covered-table-cell table:number-columns-repeated="4" table:style-name="ce54"/>
        </table:table-row>
        <table:table-row table:style-name="ro5">
          <table:table-cell table:style-name="ce52" office:value-type="string" ns42:value-type="string" table:number-columns-spanned="18" table:number-rows-spanned="1">
            <text:p>🏁 FIRST AUTHORITATIVE OPERATIONAL LIFECYCLE STATE GATE · BUILD 122</text:p>
          </table:table-cell>
          <table:covered-table-cell table:number-columns-repeated="17" table:style-name="ce52"/>
        </table:table-row>
        <table:table-row table:style-name="ro5">
          <table:table-cell table:style-name="ce54" office:value-type="string" ns42:value-type="string" table:number-columns-spanned="18" table:number-rows-spanned="1">
            <text:p>OWNERSHIP DOES NOT CREATE WORKFLOW STATE → FACTUAL READINESS EVIDENCE → ONE AUTHORITATIVE OPERATIONAL STATE → ACTION CENTER READS THAT STATE</text:p>
          </table:table-cell>
          <table:covered-table-cell table:number-columns-repeated="17" table:style-name="ce54"/>
        </table:table-row>
        <table:table-row table:style-name="ro5">
          <table:table-cell table:style-name="ce52" office:value-type="string" ns42:value-type="string" table:number-columns-spanned="18" table:number-rows-spanned="1">
            <text:p>🧠 GENERALIZED SUPPORTED EVIDENCE → FACTOR-SCOPED RESOLUTION ENGINE · BUILDS 146–165</text:p>
          </table:table-cell>
          <table:covered-table-cell table:number-columns-repeated="17" table:style-name="ce52"/>
        </table:table-row>
        <table:table-row table:style-name="ro5">
          <table:table-cell table:style-name="ce53" office:value-type="string" ns42:value-type="string" table:number-columns-spanned="6" table:number-rows-spanned="1">
            <text:p>ENGINE QUESTION</text:p>
          </table:table-cell>
          <table:covered-table-cell table:number-columns-repeated="5" table:style-name="ce53"/>
          <table:table-cell table:style-name="ce53" office:value-type="string" ns42:value-type="string" table:number-columns-spanned="6" table:number-rows-spanned="1">
            <text:p>SCOPE AUTHOR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WHICH FACTOR MAY THIS EVIDENCE RESOLVE?</text:p>
          </table:table-cell>
          <table:covered-table-cell table:number-columns-repeated="5" table:style-name="ce54"/>
          <table:table-cell table:style-name="ce54" office:value-type="string" ns42:value-type="string" table:number-columns-spanned="6" table:number-rows-spanned="1">
            <text:p>EVIDENCE TYPE → EXACT FACTOR SCOPE</text:p>
          </table:table-cell>
          <table:covered-table-cell table:number-columns-repeated="5" table:style-name="ce54"/>
          <table:table-cell table:style-name="ce54" office:value-type="string" ns42:value-type="string" table:number-columns-spanned="6" table:number-rows-spanned="1">
            <text:p>ONE MATCHED ACTIVE FACTOR ONLY</text:p>
          </table:table-cell>
          <table:covered-table-cell table:number-columns-repeated="5" table:style-name="ce54"/>
        </table:table-row>
        <table:table-row table:style-name="ro5">
          <table:table-cell table:style-name="ce52" office:value-type="string" ns42:value-type="string" table:number-columns-spanned="18" table:number-rows-spanned="1">
            <text:p>🗺️ EVIDENCE TYPE → FACTOR SCOPE MAP</text:p>
          </table:table-cell>
          <table:covered-table-cell table:number-columns-repeated="17" table:style-name="ce52"/>
        </table:table-row>
        <table:table-row table:style-name="ro5">
          <table:table-cell table:style-name="ce53" office:value-type="string" ns42:value-type="string" table:number-columns-spanned="6" table:number-rows-spanned="1">
            <text:p>EVIDENCE TYPE</text:p>
          </table:table-cell>
          <table:covered-table-cell table:number-columns-repeated="5" table:style-name="ce53"/>
          <table:table-cell table:style-name="ce53" office:value-type="string" ns42:value-type="string" table:number-columns-spanned="6" table:number-rows-spanned="1">
            <text:p>EXACT FACTOR SCOPE</text:p>
          </table:table-cell>
          <table:covered-table-cell table:number-columns-repeated="5" table:style-name="ce53"/>
          <table:table-cell table:style-name="ce53" office:value-type="string" ns42:value-type="string" table:number-columns-spanned="6" table:number-rows-spanned="1">
            <text:p>SUPPORTED RESULT</text:p>
          </table:table-cell>
          <table:covered-table-cell table:number-columns-repeated="5" table:style-name="ce53"/>
        </table:table-row>
        <table:table-row table:style-name="ro5">
          <table:table-cell table:style-name="ce54" office:value-type="string" ns42:value-type="string" table:number-columns-spanned="6" table:number-rows-spanned="1">
            <text:p>PRODUCT PHOTO EVIDENCE</text:p>
          </table:table-cell>
          <table:covered-table-cell table:number-columns-repeated="5" table:style-name="ce54"/>
          <table:table-cell table:style-name="ce54" office:value-type="string" ns42:value-type="string" table:number-columns-spanned="6" table:number-rows-spanned="1">
            <text:p>PHOTOS</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LISTING CONTENT EVIDENCE</text:p>
          </table:table-cell>
          <table:covered-table-cell table:number-columns-repeated="5" table:style-name="ce54"/>
          <table:table-cell table:style-name="ce54" office:value-type="string" ns42:value-type="string" table:number-columns-spanned="6" table:number-rows-spanned="1">
            <text:p>LISTING CONTENT</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PRICE DECISION EVIDENCE</text:p>
          </table:table-cell>
          <table:covered-table-cell table:number-columns-repeated="5" table:style-name="ce54"/>
          <table:table-cell table:style-name="ce54" office:value-type="string" ns42:value-type="string" table:number-columns-spanned="6" table:number-rows-spanned="1">
            <text:p>PRICE DECISION</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PLATFORM SELECTION EVIDENCE</text:p>
          </table:table-cell>
          <table:covered-table-cell table:number-columns-repeated="5" table:style-name="ce54"/>
          <table:table-cell table:style-name="ce54" office:value-type="string" ns42:value-type="string" table:number-columns-spanned="6" table:number-rows-spanned="1">
            <text:p>PLATFORM</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SHIPPING REVIEW EVIDENCE</text:p>
          </table:table-cell>
          <table:covered-table-cell table:number-columns-repeated="5" table:style-name="ce54"/>
          <table:table-cell table:style-name="ce54" office:value-type="string" ns42:value-type="string" table:number-columns-spanned="6" table:number-rows-spanned="1">
            <text:p>SHIPPING REVIEW</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DATA QUALITY EVIDENCE</text:p>
          </table:table-cell>
          <table:covered-table-cell table:number-columns-repeated="5" table:style-name="ce54"/>
          <table:table-cell table:style-name="ce54" office:value-type="string" ns42:value-type="string" table:number-columns-spanned="6" table:number-rows-spanned="1">
            <text:p>DATA-QUALITY CLEARANCE</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2" office:value-type="string" ns42:value-type="string" table:number-columns-spanned="18" table:number-rows-spanned="1">
            <text:p>📥 GENERALIZED SUPPORTED EVIDENCE INPU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4" table:number-rows-spanned="1">
            <text:p>EVIDENCE TYPE</text:p>
          </table:table-cell>
          <table:covered-table-cell table:number-columns-repeated="3" table:style-name="ce53"/>
          <table:table-cell table:style-name="ce53" office:value-type="string" ns42:value-type="string" table:number-columns-spanned="3" table:number-rows-spanned="1">
            <text:p>REVIEW STATUS</text:p>
          </table:table-cell>
          <table:covered-table-cell table:number-columns-repeated="2" table:style-name="ce53"/>
          <table:table-cell table:style-name="ce53" office:value-type="string" ns42:value-type="string" table:number-columns-spanned="4" table:number-rows-spanned="1">
            <text:p>SUPPORTED?</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4" table:number-rows-spanned="1">
            <text:p>LISTING CONTENT</text:p>
          </table:table-cell>
          <table:covered-table-cell table:number-columns-repeated="3" table:style-name="ce54"/>
          <table:table-cell table:style-name="ce54" office:value-type="string" ns42:value-type="string" table:number-columns-spanned="4" table:number-rows-spanned="1">
            <text:p>LISTING CONTENT EVIDENCE</text:p>
          </table:table-cell>
          <table:covered-table-cell table:number-columns-repeated="3" table:style-name="ce54"/>
          <table:table-cell table:style-name="ce54" office:value-type="string" ns42:value-type="string" table:number-columns-spanned="3" table:number-rows-spanned="1">
            <text:p>REVIEWED</text:p>
          </table:table-cell>
          <table:covered-table-cell table:number-columns-repeated="2" table:style-name="ce54"/>
          <table:table-cell table:style-name="ce54" office:value-type="string" ns42:value-type="string" table:number-columns-spanned="4" table:number-rows-spanned="1">
            <text:p>YES</text:p>
          </table:table-cell>
          <table:covered-table-cell table:number-columns-repeated="3" table:style-name="ce54"/>
        </table:table-row>
        <table:table-row table:style-name="ro5">
          <table:table-cell table:style-name="ce52" office:value-type="string" ns42:value-type="string" table:number-columns-spanned="18" table:number-rows-spanned="1">
            <text:p>🔎 FACTOR SCOPE + ACTIVE BLOCKER MATCH VALIDATION</text:p>
          </table:table-cell>
          <table:covered-table-cell table:number-columns-repeated="17" table:style-name="ce52"/>
        </table:table-row>
        <table:table-row table:style-name="ro5">
          <table:table-cell table:style-name="ce53" office:value-type="string" ns42:value-type="string" table:number-columns-spanned="4" table:number-rows-spanned="1">
            <text:p>MAPPED FACTOR</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SCOPE MATCH</text:p>
          </table:table-cell>
          <table:covered-table-cell table:number-columns-repeated="2" table:style-name="ce53"/>
          <table:table-cell table:style-name="ce53" office:value-type="string" ns42:value-type="string" table:number-columns-spanned="3" table:number-rows-spanned="1">
            <text:p>SUPPORT CHECK</text:p>
          </table:table-cell>
          <table:covered-table-cell table:number-columns-repeated="2" table:style-name="ce53"/>
          <table:table-cell table:style-name="ce53" office:value-type="string" ns42:value-type="string" table:number-columns-spanned="4" table:number-rows-spanned="1">
            <text:p>RESOLUTION AUTHORITY</text:p>
          </table:table-cell>
          <table:covered-table-cell table:number-columns-repeated="3" table:style-name="ce53"/>
        </table:table-row>
        <table:table-row table:style-name="ro21">
          <table:table-cell table:style-name="ce54" table:formula="of:=IF(UPPER(TRIM([.H597]))=&quot;PRODUCT PHOTO EVIDENCE&quot;;&quot;PHOTOS&quot;;IF(UPPER(TRIM([.H597]))=&quot;LISTING CONTENT EVIDENCE&quot;;&quot;LISTING CONTENT&quot;;IF(UPPER(TRIM([.H597]))=&quot;PRICE DECISION EVIDENCE&quot;;&quot;PRICE DECISION&quot;;IF(UPPER(TRIM([.H597]))=&quot;PLATFORM SELECTION EVIDENCE&quot;;&quot;PLATFORM&quot;;IF(UPPER(TRIM([.H597]))=&quot;SHIPPING REVIEW EVIDENCE&quot;;&quot;SHIPPING REVIEW&quot;;IF(UPPER(TRIM([.H597]))=&quot;DATA QUALITY EVIDENCE&quot;;&quot;DATA-QUALITY CLEARANCE&quot;;&quot;UNMAPPED&quot;))))))" office:value-type="string" office:string-value="UNMAPPED" ns42:value-type="string" table:number-columns-spanned="4" table:number-rows-spanned="1">
            <text:p>UNMAPPED</text:p>
          </table:table-cell>
          <table:covered-table-cell table:number-columns-repeated="3" table:style-name="ce54"/>
          <table:table-cell table:style-name="ce54" table:formula="of:=[.D597]" office:value-type="float" office:value="0" ns42:value-type="float" table:number-columns-spanned="4" table:number-rows-spanned="1">
            <text:p>0</text:p>
          </table:table-cell>
          <table:covered-table-cell table:number-columns-repeated="3" table:style-name="ce54"/>
          <table:table-cell table:style-name="ce54" table:formula="of:=IF(UPPER(TRIM([.A600]))=UPPER(TRIM([.E600]));&quot;MATCH&quot;;&quot;MISMATCH&quot;)" office:value-type="string" office:string-value="MISMATCH" ns42:value-type="string" table:number-columns-spanned="3" table:number-rows-spanned="1">
            <text:p>MISMATCH</text:p>
          </table:table-cell>
          <table:covered-table-cell table:number-columns-repeated="2" table:style-name="ce54"/>
          <table:table-cell table:style-name="ce54" table:formula="of:=IF(AND(UPPER(TRIM([.L597]))=&quot;REVIEWED&quot;;UPPER(TRIM([.O597]))=&quot;YES&quot;);&quot;SUPPORTED&quot;;&quot;UNSUPPORTED&quot;)" office:value-type="string" office:string-value="UNSUPPORTED" ns42:value-type="string" table:number-columns-spanned="3" table:number-rows-spanned="1">
            <text:p>UNSUPPORTED</text:p>
          </table:table-cell>
          <table:covered-table-cell table:number-columns-repeated="2" table:style-name="ce54"/>
          <table:table-cell table:style-name="ce54" table:formula="of:=IF(AND(UPPER(TRIM([.I600]))=&quot;MATCH&quot;;UPPER(TRIM([.L600]))=&quot;SUPPORTED&quot;);&quot;RESOLVE MATCHED FACTOR ONLY&quot;;&quot;NO RESOLUTION&quot;)" office:value-type="string" office:string-value="NO RESOLUTION" ns42:value-type="string" table:number-columns-spanned="4" table:number-rows-spanned="1">
            <text:p>NO RESOLUTION</text:p>
          </table:table-cell>
          <table:covered-table-cell table:number-columns-repeated="3" table:style-name="ce54"/>
        </table:table-row>
        <table:table-row table:style-name="ro5">
          <table:table-cell table:style-name="ce52" office:value-type="string" ns42:value-type="string" table:number-columns-spanned="18" table:number-rows-spanned="1">
            <text:p>🔒 ONE-FACTOR RESOLUTION + CROSS-FACTOR PROTECTION</text:p>
          </table:table-cell>
          <table:covered-table-cell table:number-columns-repeated="17" table:style-name="ce52"/>
        </table:table-row>
        <table:table-row table:style-name="ro5">
          <table:table-cell table:style-name="ce53" office:value-type="string" ns42:value-type="string" table:number-columns-spanned="3" table:number-rows-spanned="1">
            <text:p>RESOLVED FACTOR</text:p>
          </table:table-cell>
          <table:covered-table-cell table:number-columns-repeated="2" table:style-name="ce53"/>
          <table:table-cell table:style-name="ce53" office:value-type="string" ns42:value-type="string" table:number-columns-spanned="4" table:number-rows-spanned="1">
            <text:p>FACTOR RESULT</text:p>
          </table:table-cell>
          <table:covered-table-cell table:number-columns-repeated="3" table:style-name="ce53"/>
          <table:table-cell table:style-name="ce53" office:value-type="string" ns42:value-type="string" table:number-columns-spanned="4" table:number-rows-spanned="1">
            <text:p>CROSS-FACTOR CLEARING</text:p>
          </table:table-cell>
          <table:covered-table-cell table:number-columns-repeated="3" table:style-name="ce53"/>
          <table:table-cell table:style-name="ce53" office:value-type="string" ns42:value-type="string" table:number-columns-spanned="3" table:number-rows-spanned="1">
            <text:p>REPEATED EVIDENCE</text:p>
          </table:table-cell>
          <table:covered-table-cell table:number-columns-repeated="2" table:style-name="ce53"/>
          <table:table-cell table:style-name="ce53" office:value-type="string" ns42:value-type="string" table:number-columns-spanned="4" table:number-rows-spanned="1">
            <text:p>UNRELATED FACTORS</text:p>
          </table:table-cell>
          <table:covered-table-cell table:number-columns-repeated="3" table:style-name="ce53"/>
        </table:table-row>
        <table:table-row table:style-name="ro5">
          <table:table-cell table:style-name="ce54" table:formula="of:=IF(UPPER(TRIM([.O600]))=&quot;RESOLVE MATCHED FACTOR ONLY&quot;;[.A600];&quot;NO FACTOR RESOLUTION&quot;)" office:value-type="string" office:string-value="NO FACTOR RESOLUTION" ns42:value-type="string" table:number-columns-spanned="3" table:number-rows-spanned="1">
            <text:p>NO FACTOR RESOLUTION</text:p>
          </table:table-cell>
          <table:covered-table-cell table:number-columns-repeated="2" table:style-name="ce54"/>
          <table:table-cell table:style-name="ce54" table:formula="of:=IF(UPPER(TRIM([.A603]))=&quot;LISTING CONTENT&quot;;&quot;LISTING CONTENT READY = YES&quot;;IF(UPPER(TRIM([.A603]))=&quot;PRICE DECISION&quot;;&quot;PRICE DECISION READY = YES&quot;;IF(UPPER(TRIM([.A603]))=&quot;PLATFORM&quot;;&quot;PLATFORM SELECTED = YES&quot;;IF(UPPER(TRIM([.A603]))=&quot;SHIPPING REVIEW&quot;;&quot;SHIPPING PATH REVIEWED = YES&quot;;&quot;NO RESOLUTION&quot;))))" office:value-type="string" office:string-value="NO RESOLUTION" ns42:value-type="string" table:number-columns-spanned="4" table:number-rows-spanned="1">
            <text:p>NO RESOLUTION</text:p>
          </table:table-cell>
          <table:covered-table-cell table:number-columns-repeated="3" table:style-name="ce54"/>
          <table:table-cell table:style-name="ce54" office:value-type="string" ns42:value-type="string" table:number-columns-spanned="4" table:number-rows-spanned="1">
            <text:p>PROHIBITED</text:p>
          </table:table-cell>
          <table:covered-table-cell table:number-columns-repeated="3" table:style-name="ce54"/>
          <table:table-cell table:style-name="ce54" office:value-type="string" ns42:value-type="string" table:number-columns-spanned="3" table:number-rows-spanned="1">
            <text:p>NO DUPLICATE CLEARING</text:p>
          </table:table-cell>
          <table:covered-table-cell table:number-columns-repeated="2" table:style-name="ce54"/>
          <table:table-cell table:style-name="ce54" office:value-type="string" ns42:value-type="string" table:number-columns-spanned="4" table:number-rows-spanned="1">
            <text:p>PRESERVED</text:p>
          </table:table-cell>
          <table:covered-table-cell table:number-columns-repeated="3" table:style-name="ce54"/>
        </table:table-row>
        <table:table-row table:style-name="ro5">
          <table:table-cell table:style-name="ce52" office:value-type="string" ns42:value-type="string" table:number-columns-spanned="18" table:number-rows-spanned="1">
            <text:p>🧩 GENERALIZED REMAINING PREPARATION CHAIN</text:p>
          </table:table-cell>
          <table:covered-table-cell table:number-columns-repeated="17" table:style-name="ce52"/>
        </table:table-row>
        <table:table-row table:style-name="ro5">
          <table:table-cell table:style-name="ce53" office:value-type="string" ns42:value-type="string" table:number-columns-spanned="6" table:number-rows-spanned="1">
            <text:p>RESOLVED FACTOR</text:p>
          </table:table-cell>
          <table:covered-table-cell table:number-columns-repeated="5" table:style-name="ce53"/>
          <table:table-cell table:style-name="ce53" office:value-type="string" ns42:value-type="string" table:number-columns-spanned="6" table:number-rows-spanned="1">
            <text:p>NEXT EXACT BLOCKER</text:p>
          </table:table-cell>
          <table:covered-table-cell table:number-columns-repeated="5" table:style-name="ce53"/>
          <table:table-cell table:style-name="ce53" office:value-type="string" ns42:value-type="string" table:number-columns-spanned="6" table:number-rows-spanned="1">
            <text:p>NEXT EXACT ACTION</text:p>
          </table:table-cell>
          <table:covered-table-cell table:number-columns-repeated="5" table:style-name="ce53"/>
        </table:table-row>
        <table:table-row table:style-name="ro5">
          <table:table-cell table:style-name="ce54" office:value-type="string" ns42:value-type="string" table:number-columns-spanned="6" table:number-rows-spanned="1">
            <text:p>LISTING CONTENT</text:p>
          </table:table-cell>
          <table:covered-table-cell table:number-columns-repeated="5" table:style-name="ce54"/>
          <table:table-cell table:style-name="ce54" office:value-type="string" ns42:value-type="string" table:number-columns-spanned="6" table:number-rows-spanned="1">
            <text:p>PRICE DECISION</text:p>
          </table:table-cell>
          <table:covered-table-cell table:number-columns-repeated="5" table:style-name="ce54"/>
          <table:table-cell table:style-name="ce54" office:value-type="string" ns42:value-type="string" table:number-columns-spanned="6" table:number-rows-spanned="1">
            <text:p>MAKE PRICE DECISION</text:p>
          </table:table-cell>
          <table:covered-table-cell table:number-columns-repeated="5" table:style-name="ce54"/>
        </table:table-row>
        <table:table-row table:style-name="ro5">
          <table:table-cell table:style-name="ce54" office:value-type="string" ns42:value-type="string" table:number-columns-spanned="6" table:number-rows-spanned="1">
            <text:p>PRICE DECISION</text:p>
          </table:table-cell>
          <table:covered-table-cell table:number-columns-repeated="5" table:style-name="ce54"/>
          <table:table-cell table:style-name="ce54" office:value-type="string" ns42:value-type="string" table:number-columns-spanned="6" table:number-rows-spanned="1">
            <text:p>PLATFORM</text:p>
          </table:table-cell>
          <table:covered-table-cell table:number-columns-repeated="5" table:style-name="ce54"/>
          <table:table-cell table:style-name="ce54" office:value-type="string" ns42:value-type="string" table:number-columns-spanned="6" table:number-rows-spanned="1">
            <text:p>SELECT PLATFORM</text:p>
          </table:table-cell>
          <table:covered-table-cell table:number-columns-repeated="5" table:style-name="ce54"/>
        </table:table-row>
        <table:table-row table:style-name="ro5">
          <table:table-cell table:style-name="ce54" office:value-type="string" ns42:value-type="string" table:number-columns-spanned="6" table:number-rows-spanned="1">
            <text:p>PLATFORM</text:p>
          </table:table-cell>
          <table:covered-table-cell table:number-columns-repeated="5" table:style-name="ce54"/>
          <table:table-cell table:style-name="ce54" office:value-type="string" ns42:value-type="string" table:number-columns-spanned="6" table:number-rows-spanned="1">
            <text:p>SHIPPING REVIEW</text:p>
          </table:table-cell>
          <table:covered-table-cell table:number-columns-repeated="5" table:style-name="ce54"/>
          <table:table-cell table:style-name="ce54" office:value-type="string" ns42:value-type="string" table:number-columns-spanned="6" table:number-rows-spanned="1">
            <text:p>REVIEW SHIPPING PATH</text:p>
          </table:table-cell>
          <table:covered-table-cell table:number-columns-repeated="5" table:style-name="ce54"/>
        </table:table-row>
        <table:table-row table:style-name="ro5">
          <table:table-cell table:style-name="ce54" office:value-type="string" ns42:value-type="string" table:number-columns-spanned="6" table:number-rows-spanned="1">
            <text:p>SHIPPING REVIEW</text:p>
          </table:table-cell>
          <table:covered-table-cell table:number-columns-repeated="5" table:style-name="ce54"/>
          <table:table-cell table:style-name="ce54" office:value-type="string" ns42:value-type="string" table:number-columns-spanned="6" table:number-rows-spanned="1">
            <text:p>DATA-QUALITY CLEARANCE</text:p>
          </table:table-cell>
          <table:covered-table-cell table:number-columns-repeated="5" table:style-name="ce54"/>
          <table:table-cell table:style-name="ce54" office:value-type="string" ns42:value-type="string" table:number-columns-spanned="6" table:number-rows-spanned="1">
            <text:p>REVIEW DATA QUALITY</text:p>
          </table:table-cell>
          <table:covered-table-cell table:number-columns-repeated="5" table:style-name="ce54"/>
        </table:table-row>
        <table:table-row table:style-name="ro5">
          <table:table-cell table:style-name="ce54" office:value-type="string" ns42:value-type="string" table:number-columns-spanned="6" table:number-rows-spanned="1">
            <text:p>DATA-QUALITY CLEARANCE</text:p>
          </table:table-cell>
          <table:covered-table-cell table:number-columns-repeated="5" table:style-name="ce54"/>
          <table:table-cell table:style-name="ce54" office:value-type="string" ns42:value-type="string" table:number-columns-spanned="6" table:number-rows-spanned="1">
            <text:p>FULL READINESS CROSS-CHECK</text:p>
          </table:table-cell>
          <table:covered-table-cell table:number-columns-repeated="5" table:style-name="ce54"/>
          <table:table-cell table:style-name="ce54" office:value-type="string" ns42:value-type="string" table:number-columns-spanned="6" table:number-rows-spanned="1">
            <text:p>NO AUTOMATIC READY TO LIST</text:p>
          </table:table-cell>
          <table:covered-table-cell table:number-columns-repeated="5" table:style-name="ce54"/>
        </table:table-row>
        <table:table-row table:style-name="ro5">
          <table:table-cell table:style-name="ce52" office:value-type="string" ns42:value-type="string" table:number-columns-spanned="18" table:number-rows-spanned="1">
            <text:p>🛡️ CONDITION APPLICABILITY + FAIL-CLOSED PROTECTION</text:p>
          </table:table-cell>
          <table:covered-table-cell table:number-columns-repeated="17" table:style-name="ce52"/>
        </table:table-row>
        <table:table-row table:style-name="ro5">
          <table:table-cell table:style-name="ce53" office:value-type="string" ns42:value-type="string" table:number-columns-spanned="4" table:number-rows-spanned="1">
            <text:p>CONDITION NOT APPLICABLE</text:p>
          </table:table-cell>
          <table:covered-table-cell table:number-columns-repeated="3" table:style-name="ce53"/>
          <table:table-cell table:style-name="ce53" office:value-type="string" ns42:value-type="string" table:number-columns-spanned="5" table:number-rows-spanned="1">
            <text:p>UNSUPPORTED EVIDENCE</text:p>
          </table:table-cell>
          <table:covered-table-cell table:number-columns-repeated="4" table:style-name="ce53"/>
          <table:table-cell table:style-name="ce53" office:value-type="string" ns42:value-type="string" table:number-columns-spanned="5" table:number-rows-spanned="1">
            <text:p>SCOPE MISMATCH</text:p>
          </table:table-cell>
          <table:covered-table-cell table:number-columns-repeated="4" table:style-name="ce53"/>
          <table:table-cell table:style-name="ce53" office:value-type="string" ns42:value-type="string" table:number-columns-spanned="4" table:number-rows-spanned="1">
            <text:p>INACTIVE FACTOR EVIDENCE</text:p>
          </table:table-cell>
          <table:covered-table-cell table:number-columns-repeated="3" table:style-name="ce53"/>
        </table:table-row>
        <table:table-row table:style-name="ro5">
          <table:table-cell table:style-name="ce54" office:value-type="string" ns42:value-type="string" table:number-columns-spanned="4" table:number-rows-spanned="1">
            <text:p>SKIP CONDITION</text:p>
          </table:table-cell>
          <table:covered-table-cell table:number-columns-repeated="3" table:style-name="ce54"/>
          <table:table-cell table:style-name="ce54" office:value-type="string" ns42:value-type="string" table:number-columns-spanned="5" table:number-rows-spanned="1">
            <text:p>NO RESOLUTION</text:p>
          </table:table-cell>
          <table:covered-table-cell table:number-columns-repeated="4" table:style-name="ce54"/>
          <table:table-cell table:style-name="ce54" office:value-type="string" ns42:value-type="string" table:number-columns-spanned="5" table:number-rows-spanned="1">
            <text:p>NO RESOLUTION</text:p>
          </table:table-cell>
          <table:covered-table-cell table:number-columns-repeated="4" table:style-name="ce54"/>
          <table:table-cell table:style-name="ce54" office:value-type="string" ns42:value-type="string" table:number-columns-spanned="4" table:number-rows-spanned="1">
            <text:p>NO RESOLUTION</text:p>
          </table:table-cell>
          <table:covered-table-cell table:number-columns-repeated="3" table:style-name="ce54"/>
        </table:table-row>
        <table:table-row table:style-name="ro5">
          <table:table-cell table:style-name="ce52" office:value-type="string" ns42:value-type="string" table:number-columns-spanned="18" table:number-rows-spanned="1">
            <text:p>🔄 FACTOR-SCOPED READINESS REEVALUATION</text:p>
          </table:table-cell>
          <table:covered-table-cell table:number-columns-repeated="17" table:style-name="ce52"/>
        </table:table-row>
        <table:table-row table:style-name="ro5">
          <table:table-cell table:style-name="ce53" office:value-type="string" ns42:value-type="string" table:number-columns-spanned="3" table:number-rows-spanned="1">
            <text:p>LIFECYCLE STATE</text:p>
          </table:table-cell>
          <table:covered-table-cell table:number-columns-repeated="2" table:style-name="ce53"/>
          <table:table-cell table:style-name="ce53" office:value-type="string" ns42:value-type="string" table:number-columns-spanned="4" table:number-rows-spanned="1">
            <text:p>RESOLVED FACTOR</text:p>
          </table:table-cell>
          <table:covered-table-cell table:number-columns-repeated="3" table:style-name="ce53"/>
          <table:table-cell table:style-name="ce53" office:value-type="string" ns42:value-type="string" table:number-columns-spanned="4" table:number-rows-spanned="1">
            <text:p>RESOLUTION RESULT</text:p>
          </table:table-cell>
          <table:covered-table-cell table:number-columns-repeated="3" table:style-name="ce53"/>
          <table:table-cell table:style-name="ce53" office:value-type="string" ns42:value-type="string" table:number-columns-spanned="3" table:number-rows-spanned="1">
            <text:p>NEXT BLOCKER</text:p>
          </table:table-cell>
          <table:covered-table-cell table:number-columns-repeated="2" table:style-name="ce53"/>
          <table:table-cell table:style-name="ce53" office:value-type="string" ns42:value-type="string" table:number-columns-spanned="4" table:number-rows-spanned="1">
            <text:p>NEXT ACTION</text:p>
          </table:table-cell>
          <table:covered-table-cell table:number-columns-repeated="3" table:style-name="ce53"/>
        </table:table-row>
        <table:table-row table:style-name="ro5">
          <table:table-cell table:style-name="ce54" office:value-type="string" ns42:value-type="string" table:number-columns-spanned="3" table:number-rows-spanned="1">
            <text:p>PREPARATION NEEDED</text:p>
          </table:table-cell>
          <table:covered-table-cell table:number-columns-repeated="2" table:style-name="ce54"/>
          <table:table-cell table:style-name="ce54" table:formula="of:=[.A603]" office:value-type="string" office:string-value="🛡️ CONDITION APPLICABILITY + FAIL-CLOSED PROTECTION" ns42:value-type="string" table:number-columns-spanned="4" table:number-rows-spanned="1">
            <text:p>🛡️ CONDITION APPLICABILITY + FAIL-CLOSED PROTECTION</text:p>
          </table:table-cell>
          <table:covered-table-cell table:number-columns-repeated="3" table:style-name="ce54"/>
          <table:table-cell table:style-name="ce54" table:formula="of:=[.D603]" office:value-type="float" office:value="0" ns42:value-type="float" table:number-columns-spanned="4" table:number-rows-spanned="1">
            <text:p>0</text:p>
          </table:table-cell>
          <table:covered-table-cell table:number-columns-repeated="3" table:style-name="ce54"/>
          <table:table-cell table:style-name="ce54" table:formula="of:=IF(UPPER(TRIM([.D616]))=&quot;LISTING CONTENT&quot;;&quot;PRICE DECISION&quot;;IF(UPPER(TRIM([.D616]))=&quot;PRICE DECISION&quot;;&quot;PLATFORM&quot;;IF(UPPER(TRIM([.D616]))=&quot;PLATFORM&quot;;&quot;SHIPPING REVIEW&quot;;IF(UPPER(TRIM([.D616]))=&quot;SHIPPING REVIEW&quot;;&quot;DATA-QUALITY CLEARANCE&quot;;&quot;REVIEW REQUIRED&quot;))))" office:value-type="string" office:string-value="SHIPPING REVIEW" ns42:value-type="string" table:number-columns-spanned="3" table:number-rows-spanned="1">
            <text:p>SHIPPING REVIEW</text:p>
          </table:table-cell>
          <table:covered-table-cell table:number-columns-repeated="2" table:style-name="ce54"/>
          <table:table-cell table:style-name="ce54" table:formula="of:=IF(UPPER(TRIM([.L616]))=&quot;PRICE DECISION&quot;;&quot;MAKE PRICE DECISION&quot;;IF(UPPER(TRIM([.L616]))=&quot;PLATFORM&quot;;&quot;SELECT PLATFORM&quot;;IF(UPPER(TRIM([.L616]))=&quot;SHIPPING REVIEW&quot;;&quot;REVIEW SHIPPING PATH&quot;;IF(UPPER(TRIM([.L616]))=&quot;DATA-QUALITY CLEARANCE&quot;;&quot;REVIEW DATA QUALITY&quot;;&quot;REVIEW REQUIRED&quot;))))" office:value-type="string" office:string-value="REVIEW REQUIRED" ns42:value-type="string" table:number-columns-spanned="4" table:number-rows-spanned="1">
            <text:p>REVIEW REQUIRED</text:p>
          </table:table-cell>
          <table:covered-table-cell table:number-columns-repeated="3" table:style-name="ce54"/>
        </table:table-row>
        <table:table-row table:style-name="ro5">
          <table:table-cell table:style-name="ce52" office:value-type="string" ns42:value-type="string" table:number-columns-spanned="18" table:number-rows-spanned="1">
            <text:p>⚡ READ-ONLY ACTION CENTER · GENERALIZED POST-RESOLUTION GUIDANCE</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5">
          <table:table-cell table:style-name="ce54" table:formula="of:=[.O616]" office:value-type="float" office:value="0" ns42:value-type="float" table:number-columns-spanned="4" table:number-rows-spanned="1">
            <text:p>0</text:p>
          </table:table-cell>
          <table:covered-table-cell table:number-columns-repeated="3" table:style-name="ce54"/>
          <table:table-cell table:style-name="ce54" table:formula="of:=[.L616]" office:value-type="float" office:value="0" ns42:value-type="float" table:number-columns-spanned="4" table:number-rows-spanned="1">
            <text:p>0</text:p>
          </table:table-cell>
          <table:covered-table-cell table:number-columns-repeated="3" table:style-name="ce54"/>
          <table:table-cell table:style-name="ce54" table:formula="of:=[.L616]&amp;&quot; EVIDENCE&quot;" office:value-type="string" office:string-value=" EVIDENCE" ns42:value-type="string" table:number-columns-spanned="3" table:number-rows-spanned="1">
            <text:p><text:s/>EVIDENCE</text:p>
          </table:table-cell>
          <table:covered-table-cell table:number-columns-repeated="2" table:style-name="ce54"/>
          <table:table-cell table:style-name="ce54" table:formula="of:=&quot;REVIEW &quot;&amp;[.L616]" office:value-type="string" office:string-value="REVIEW " ns42:value-type="string" table:number-columns-spanned="3" table:number-rows-spanned="1">
            <text:p>REVIEW </text:p>
          </table:table-cell>
          <table:covered-table-cell table:number-columns-repeated="2" table:style-name="ce54"/>
          <table:table-cell table:style-name="ce54" office:value-type="string" ns42:value-type="string" table:number-columns-spanned="4" table:number-rows-spanned="1">
            <text:p>PRICE DECISION → PLATFORM · PREVIEW</text:p>
          </table:table-cell>
          <table:covered-table-cell table:number-columns-repeated="3" table:style-name="ce54"/>
        </table:table-row>
        <table:table-row table:style-name="ro5">
          <table:table-cell table:style-name="ce52" office:value-type="string" ns42:value-type="string" table:number-columns-spanned="18" table:number-rows-spanned="1">
            <text:p>🔬 FULL FACTOR-SCOPED CHAIN CROSS-CHECK</text:p>
          </table:table-cell>
          <table:covered-table-cell table:number-columns-repeated="17" table:style-name="ce52"/>
        </table:table-row>
        <table:table-row table:style-name="ro5">
          <table:table-cell table:style-name="ce53" office:value-type="string" ns42:value-type="string" table:number-columns-spanned="3" table:number-rows-spanned="1">
            <text:p>INPUT</text:p>
          </table:table-cell>
          <table:covered-table-cell table:number-columns-repeated="2" table:style-name="ce53"/>
          <table:table-cell table:style-name="ce53" office:value-type="string" ns42:value-type="string" table:number-columns-spanned="3" table:number-rows-spanned="1">
            <text:p>MAPPED SCOPE</text:p>
          </table:table-cell>
          <table:covered-table-cell table:number-columns-repeated="2" table:style-name="ce53"/>
          <table:table-cell table:style-name="ce53" office:value-type="string" ns42:value-type="string" table:number-columns-spanned="3" table:number-rows-spanned="1">
            <text:p>MATCH</text:p>
          </table:table-cell>
          <table:covered-table-cell table:number-columns-repeated="2" table:style-name="ce53"/>
          <table:table-cell table:style-name="ce53" office:value-type="string" ns42:value-type="string" table:number-columns-spanned="3" table:number-rows-spanned="1">
            <text:p>RESOLUTION</text:p>
          </table:table-cell>
          <table:covered-table-cell table:number-columns-repeated="2" table:style-name="ce53"/>
          <table:table-cell table:style-name="ce53" office:value-type="string" ns42:value-type="string" table:number-columns-spanned="3" table:number-rows-spanned="1">
            <text:p>NEXT BLOCKER</text:p>
          </table:table-cell>
          <table:covered-table-cell table:number-columns-repeated="2" table:style-name="ce53"/>
          <table:table-cell table:style-name="ce53" office:value-type="string" ns42:value-type="string" table:number-columns-spanned="3" table:number-rows-spanned="1">
            <text:p>BOUNDARY</text:p>
          </table:table-cell>
          <table:covered-table-cell table:number-columns-repeated="2" table:style-name="ce53"/>
        </table:table-row>
        <table:table-row table:style-name="ro5">
          <table:table-cell table:style-name="ce54" office:value-type="string" ns42:value-type="string" table:number-columns-spanned="3" table:number-rows-spanned="1">
            <text:p>LISTING CONTENT EVIDENCE</text:p>
          </table:table-cell>
          <table:covered-table-cell table:number-columns-repeated="2" table:style-name="ce54"/>
          <table:table-cell table:style-name="ce54" office:value-type="string" ns42:value-type="string" table:number-columns-spanned="3" table:number-rows-spanned="1">
            <text:p>LISTING CONTENT</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LISTING CONTENT ONLY</text:p>
          </table:table-cell>
          <table:covered-table-cell table:number-columns-repeated="2" table:style-name="ce54"/>
          <table:table-cell table:style-name="ce54" office:value-type="string" ns42:value-type="string" table:number-columns-spanned="3" table:number-rows-spanned="1">
            <text:p>PRICE DECISION</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PRICE DECISION EVIDENCE</text:p>
          </table:table-cell>
          <table:covered-table-cell table:number-columns-repeated="2" table:style-name="ce54"/>
          <table:table-cell table:style-name="ce54" office:value-type="string" ns42:value-type="string" table:number-columns-spanned="3" table:number-rows-spanned="1">
            <text:p>PRICE DECISION</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PRICE DECISION ONLY</text:p>
          </table:table-cell>
          <table:covered-table-cell table:number-columns-repeated="2" table:style-name="ce54"/>
          <table:table-cell table:style-name="ce54" office:value-type="string" ns42:value-type="string" table:number-columns-spanned="3" table:number-rows-spanned="1">
            <text:p>PLATFORM</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PLATFORM SELECTION EVIDENCE</text:p>
          </table:table-cell>
          <table:covered-table-cell table:number-columns-repeated="2" table:style-name="ce54"/>
          <table:table-cell table:style-name="ce54" office:value-type="string" ns42:value-type="string" table:number-columns-spanned="3" table:number-rows-spanned="1">
            <text:p>PLATFORM</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PLATFORM ONLY</text:p>
          </table:table-cell>
          <table:covered-table-cell table:number-columns-repeated="2" table:style-name="ce54"/>
          <table:table-cell table:style-name="ce54" office:value-type="string" ns42:value-type="string" table:number-columns-spanned="3" table:number-rows-spanned="1">
            <text:p>SHIPPING REVIEW</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SHIPPING REVIEW EVIDENCE</text:p>
          </table:table-cell>
          <table:covered-table-cell table:number-columns-repeated="2" table:style-name="ce54"/>
          <table:table-cell table:style-name="ce54" office:value-type="string" ns42:value-type="string" table:number-columns-spanned="3" table:number-rows-spanned="1">
            <text:p>SHIPPING REVIEW</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SHIPPING REVIEW ONLY</text:p>
          </table:table-cell>
          <table:covered-table-cell table:number-columns-repeated="2" table:style-name="ce54"/>
          <table:table-cell table:style-name="ce54" office:value-type="string" ns42:value-type="string" table:number-columns-spanned="3" table:number-rows-spanned="1">
            <text:p>DATA-QUALITY CLEARANCE</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PRODUCT PHOTO EVIDENCE</text:p>
          </table:table-cell>
          <table:covered-table-cell table:number-columns-repeated="2" table:style-name="ce54"/>
          <table:table-cell table:style-name="ce54" office:value-type="string" ns42:value-type="string" table:number-columns-spanned="3" table:number-rows-spanned="1">
            <text:p>PHOTOS</text:p>
          </table:table-cell>
          <table:covered-table-cell table:number-columns-repeated="2" table:style-name="ce54"/>
          <table:table-cell table:style-name="ce54" office:value-type="string" ns42:value-type="string" table:number-columns-spanned="3" table:number-rows-spanned="1">
            <text:p>MISMATCH</text:p>
          </table:table-cell>
          <table:covered-table-cell table:number-columns-repeated="2" table:style-name="ce54"/>
          <table:table-cell table:style-name="ce54" office:value-type="string" ns42:value-type="string" table:number-columns-spanned="3" table:number-rows-spanned="1">
            <text:p>NO RESOLUTION</text:p>
          </table:table-cell>
          <table:covered-table-cell table:number-columns-repeated="2" table:style-name="ce54"/>
          <table:table-cell table:style-name="ce54" office:value-type="string" ns42:value-type="string" table:number-columns-spanned="3" table:number-rows-spanned="1">
            <text:p>LISTING CONTENT</text:p>
          </table:table-cell>
          <table:covered-table-cell table:number-columns-repeated="2" table:style-name="ce54"/>
          <table:table-cell table:style-name="ce54" office:value-type="string" ns42:value-type="string" table:number-columns-spanned="3" table:number-rows-spanned="1">
            <text:p>FAIL CLOSED</text:p>
          </table:table-cell>
          <table:covered-table-cell table:number-columns-repeated="2" table:style-name="ce54"/>
        </table:table-row>
        <table:table-row table:style-name="ro5">
          <table:table-cell table:style-name="ce52" office:value-type="string" ns42:value-type="string" table:number-columns-spanned="18" table:number-rows-spanned="1">
            <text:p>🏁 GENERALIZED FACTOR-SCOPED RESOLUTION ENGINE GATE · BUILD 165</text:p>
          </table:table-cell>
          <table:covered-table-cell table:number-columns-repeated="17" table:style-name="ce52"/>
        </table:table-row>
        <table:table-row table:style-name="ro5">
          <table:table-cell table:style-name="ce54" office:value-type="string" ns42:value-type="string" table:number-columns-spanned="18" table:number-rows-spanned="1">
            <text:p>SUPPORTED EVIDENCE → MAP EXACT FACTOR → MATCH ACTIVE BLOCKER → RESOLVE ONE FACTOR ONLY → PRESERVE OTHERS → REEVALUATE → ONE NEXT BLOCKER → STOP AT FULL READINESS CROSS-CHECK</text:p>
          </table:table-cell>
          <table:covered-table-cell table:number-columns-repeated="17" table:style-name="ce54"/>
        </table:table-row>
        <table:table-row table:style-name="ro5">
          <table:table-cell table:style-name="ce52" office:value-type="string" ns42:value-type="string" table:number-columns-spanned="18" table:number-rows-spanned="1">
            <text:p>📋 FULL READINESS CROSS-CHECK · BUILDS 174–180</text:p>
          </table:table-cell>
          <table:covered-table-cell table:number-columns-repeated="17" table:style-name="ce52"/>
        </table:table-row>
        <table:table-row table:style-name="ro5">
          <table:table-cell table:style-name="ce53" office:value-type="string" ns42:value-type="string" table:number-columns-spanned="6" table:number-rows-spanned="1">
            <text:p>READINESS QUESTION</text:p>
          </table:table-cell>
          <table:covered-table-cell table:number-columns-repeated="5" table:style-name="ce53"/>
          <table:table-cell table:style-name="ce53" office:value-type="string" ns42:value-type="string" table:number-columns-spanned="6" table:number-rows-spanned="1">
            <text:p>AUTHORITY</text:p>
          </table:table-cell>
          <table:covered-table-cell table:number-columns-repeated="5" table:style-name="ce53"/>
          <table:table-cell table:style-name="ce53" office:value-type="string" ns42:value-type="string" table:number-columns-spanned="6" table:number-rows-spanned="1">
            <text:p>PROMOTION BOUNDARY</text:p>
          </table:table-cell>
          <table:covered-table-cell table:number-columns-repeated="5" table:style-name="ce53"/>
        </table:table-row>
        <table:table-row table:style-name="ro5">
          <table:table-cell table:style-name="ce54" office:value-type="string" ns42:value-type="string" table:number-columns-spanned="6" table:number-rows-spanned="1">
            <text:p>ARE ALL APPLICABLE FACTORS FACTUALLY SUPPORTED?</text:p>
          </table:table-cell>
          <table:covered-table-cell table:number-columns-repeated="5" table:style-name="ce54"/>
          <table:table-cell table:style-name="ce54" office:value-type="string" ns42:value-type="string" table:number-columns-spanned="6" table:number-rows-spanned="1">
            <text:p>CURRENT READINESS FACTORS</text:p>
          </table:table-cell>
          <table:covered-table-cell table:number-columns-repeated="5" table:style-name="ce54"/>
          <table:table-cell table:style-name="ce54" office:value-type="string" ns42:value-type="string" table:number-columns-spanned="6" table:number-rows-spanned="1">
            <text:p>ELIGIBILITY ONLY · NO INVENTORY MUTATION</text:p>
          </table:table-cell>
          <table:covered-table-cell table:number-columns-repeated="5" table:style-name="ce54"/>
        </table:table-row>
        <table:table-row table:style-name="ro5">
          <table:table-cell table:style-name="ce52" office:value-type="string" ns42:value-type="string" table:number-columns-spanned="18" table:number-rows-spanned="1">
            <text:p>📊 APPLICABLE FACTOR CROSS-CHECK</text:p>
          </table:table-cell>
          <table:covered-table-cell table:number-columns-repeated="17" table:style-name="ce52"/>
        </table:table-row>
        <table:table-row table:style-name="ro5">
          <table:table-cell table:style-name="ce53" office:value-type="string" ns42:value-type="string" table:number-columns-spanned="3" table:number-rows-spanned="1">
            <text:p>PHOTOS READY</text:p>
          </table:table-cell>
          <table:covered-table-cell table:number-columns-repeated="2" table:style-name="ce53"/>
          <table:table-cell table:style-name="ce53" office:value-type="string" ns42:value-type="string" table:number-columns-spanned="3" table:number-rows-spanned="1">
            <text:p>CONDITION APPLICABILITY</text:p>
          </table:table-cell>
          <table:covered-table-cell table:number-columns-repeated="2" table:style-name="ce53"/>
          <table:table-cell table:style-name="ce53" office:value-type="string" ns42:value-type="string" table:number-columns-spanned="3" table:number-rows-spanned="1">
            <text:p>CONDITION EVALUATED</text:p>
          </table:table-cell>
          <table:covered-table-cell table:number-columns-repeated="2" table:style-name="ce53"/>
          <table:table-cell table:style-name="ce53" office:value-type="string" ns42:value-type="string" table:number-columns-spanned="3" table:number-rows-spanned="1">
            <text:p>LISTING CONTENT READY</text:p>
          </table:table-cell>
          <table:covered-table-cell table:number-columns-repeated="2" table:style-name="ce53"/>
          <table:table-cell table:style-name="ce53" office:value-type="string" ns42:value-type="string" table:number-columns-spanned="3" table:number-rows-spanned="1">
            <text:p>PRICE DECISION READY</text:p>
          </table:table-cell>
          <table:covered-table-cell table:number-columns-repeated="2" table:style-name="ce53"/>
          <table:table-cell table:style-name="ce53" office:value-type="string" ns42:value-type="string" table:number-columns-spanned="3" table:number-rows-spanned="1">
            <text:p>PLATFORM SELECTED</text:p>
          </table:table-cell>
          <table:covered-table-cell table:number-columns-repeated="2" table:style-name="ce53"/>
        </table:table-row>
        <table:table-row table:style-name="ro5">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NOT APPLICABLE</text:p>
          </table:table-cell>
          <table:covered-table-cell table:number-columns-repeated="2" table:style-name="ce54"/>
          <table:table-cell table:style-name="ce54" office:value-type="string" ns42:value-type="string" table:number-columns-spanned="3" table:number-rows-spanned="1">
            <text:p>NOT APPLICABLE</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row>
        <table:table-row table:style-name="ro5">
          <table:table-cell table:style-name="ce53" office:value-type="string" ns42:value-type="string" table:number-columns-spanned="6" table:number-rows-spanned="1">
            <text:p>SHIPPING PATH REVIEWED</text:p>
          </table:table-cell>
          <table:covered-table-cell table:number-columns-repeated="5" table:style-name="ce53"/>
          <table:table-cell table:style-name="ce53" office:value-type="string" ns42:value-type="string" table:number-columns-spanned="6" table:number-rows-spanned="1">
            <text:p>BLOCKING DATA-QUALITY ISSUE</text:p>
          </table:table-cell>
          <table:covered-table-cell table:number-columns-repeated="5" table:style-name="ce53"/>
          <table:table-cell table:style-name="ce53" office:value-type="string" ns42:value-type="string" table:number-columns-spanned="6" table:number-rows-spanned="1">
            <text:p>APPLICABLE FACTORS SUPPORTED?</text:p>
          </table:table-cell>
          <table:covered-table-cell table:number-columns-repeated="5" table:style-name="ce53"/>
        </table:table-row>
        <table:table-row table:style-name="ro5">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table:formula="of:=IF(AND(UPPER(TRIM([.A626]))=&quot;YES&quot;;OR(UPPER(TRIM([.D626]))=&quot;NOT APPLICABLE&quot;;UPPER(TRIM([.G626]))=&quot;YES&quot;);UPPER(TRIM([.J626]))=&quot;YES&quot;;UPPER(TRIM([.M626]))=&quot;YES&quot;;UPPER(TRIM([.P626]))=&quot;YES&quot;;UPPER(TRIM([.A628]))=&quot;YES&quot;;UPPER(TRIM([.G628]))=&quot;NO&quot;);&quot;YES&quot;;&quot;NO&quot;)" office:value-type="string" office:string-value="NO" ns42:value-type="string" table:number-columns-spanned="6" table:number-rows-spanned="1">
            <text:p>NO</text:p>
          </table:table-cell>
          <table:covered-table-cell table:number-columns-repeated="5" table:style-name="ce54"/>
        </table:table-row>
        <table:table-row table:style-name="ro5">
          <table:table-cell table:style-name="ce52" office:value-type="string" ns42:value-type="string" table:number-columns-spanned="18" table:number-rows-spanned="1">
            <text:p>🛡️ FULL READINESS FAIL-CLOSED EVALUATION</text:p>
          </table:table-cell>
          <table:covered-table-cell table:number-columns-repeated="17" table:style-name="ce52"/>
        </table:table-row>
        <table:table-row table:style-name="ro5">
          <table:table-cell table:style-name="ce53" office:value-type="string" ns42:value-type="string" table:number-columns-spanned="5" table:number-rows-spanned="1">
            <text:p>MISSING FACTOR</text:p>
          </table:table-cell>
          <table:covered-table-cell table:number-columns-repeated="4" table:style-name="ce53"/>
          <table:table-cell table:style-name="ce53" office:value-type="string" ns42:value-type="string" table:number-columns-spanned="5" table:number-rows-spanned="1">
            <text:p>CROSS-CHECK RESULT</text:p>
          </table:table-cell>
          <table:covered-table-cell table:number-columns-repeated="4" table:style-name="ce53"/>
          <table:table-cell table:style-name="ce53" office:value-type="string" ns42:value-type="string" table:number-columns-spanned="4" table:number-rows-spanned="1">
            <text:p>ELIGIBILITY RESULT</text:p>
          </table:table-cell>
          <table:covered-table-cell table:number-columns-repeated="3" table:style-name="ce53"/>
          <table:table-cell table:style-name="ce53" office:value-type="string" ns42:value-type="string" table:number-columns-spanned="4" table:number-rows-spanned="1">
            <text:p>INVENTORY MUTATION AUTHORITY</text:p>
          </table:table-cell>
          <table:covered-table-cell table:number-columns-repeated="3" table:style-name="ce53"/>
        </table:table-row>
        <table:table-row table:style-name="ro5">
          <table:table-cell table:style-name="ce54" table:formula="of:=IF(UPPER(TRIM([.A626]))&lt;&gt;&quot;YES&quot;;&quot;PHOTOS&quot;;IF(AND(UPPER(TRIM([.D626]))&lt;&gt;&quot;NOT APPLICABLE&quot;;UPPER(TRIM([.G626]))&lt;&gt;&quot;YES&quot;);&quot;CONDITION&quot;;IF(UPPER(TRIM([.J626]))&lt;&gt;&quot;YES&quot;;&quot;LISTING CONTENT&quot;;IF(UPPER(TRIM([.M626]))&lt;&gt;&quot;YES&quot;;&quot;PRICE DECISION&quot;;IF(UPPER(TRIM([.P626]))&lt;&gt;&quot;YES&quot;;&quot;PLATFORM&quot;;IF(UPPER(TRIM([.A628]))&lt;&gt;&quot;YES&quot;;&quot;SHIPPING REVIEW&quot;;IF(UPPER(TRIM([.G628]))&lt;&gt;&quot;NO&quot;;&quot;DATA-QUALITY CLEARANCE&quot;;&quot;NO MISSING FACTOR&quot;)))))))" office:value-type="string" office:string-value="PRICE DECISION" ns42:value-type="string" table:number-columns-spanned="5" table:number-rows-spanned="1">
            <text:p>PRICE DECISION</text:p>
          </table:table-cell>
          <table:covered-table-cell table:number-columns-repeated="4" table:style-name="ce54"/>
          <table:table-cell table:style-name="ce54" table:formula="of:=IF(UPPER(TRIM([.M628]))=&quot;YES&quot;;&quot;PASSED&quot;;&quot;FAILED · REMAIN IN PREPARATION&quot;)" office:value-type="string" office:string-value="FAILED · REMAIN IN PREPARATION" ns42:value-type="string" table:number-columns-spanned="5" table:number-rows-spanned="1">
            <text:p>FAILED · REMAIN IN PREPARATION</text:p>
          </table:table-cell>
          <table:covered-table-cell table:number-columns-repeated="4" table:style-name="ce54"/>
          <table:table-cell table:style-name="ce54" table:formula="of:=IF(UPPER(TRIM([.M628]))=&quot;YES&quot;;&quot;READY TO LIST ELIGIBLE&quot;;&quot;NOT READY TO LIST ELIGIBLE&quot;)" office:value-type="string" office:string-value="NOT READY TO LIST ELIGIBLE" ns42:value-type="string" table:number-columns-spanned="4" table:number-rows-spanned="1">
            <text:p>NOT READY TO LIST ELIGIBLE</text:p>
          </table:table-cell>
          <table:covered-table-cell table:number-columns-repeated="3" table:style-name="ce54"/>
          <table:table-cell table:style-name="ce54" office:value-type="string" ns42:value-type="string" table:number-columns-spanned="4" table:number-rows-spanned="1">
            <text:p>NONE · READ ONLY</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ELIGIBILITY CONTRACT</text:p>
          </table:table-cell>
          <table:covered-table-cell table:number-columns-repeated="17" table:style-name="ce52"/>
        </table:table-row>
        <table:table-row table:style-name="ro5">
          <table:table-cell table:style-name="ce53" office:value-type="string" ns42:value-type="string" table:number-columns-spanned="5" table:number-rows-spanned="1">
            <text:p>ALL APPLICABLE FACTORS SUPPORTED</text:p>
          </table:table-cell>
          <table:covered-table-cell table:number-columns-repeated="4" table:style-name="ce53"/>
          <table:table-cell table:style-name="ce53" office:value-type="string" ns42:value-type="string" table:number-columns-spanned="5" table:number-rows-spanned="1">
            <text:p>FULL CROSS-CHECK</text:p>
          </table:table-cell>
          <table:covered-table-cell table:number-columns-repeated="4" table:style-name="ce53"/>
          <table:table-cell table:style-name="ce53" office:value-type="string" ns42:value-type="string" table:number-columns-spanned="4" table:number-rows-spanned="1">
            <text:p>READ-ONLY RESULT</text:p>
          </table:table-cell>
          <table:covered-table-cell table:number-columns-repeated="3" table:style-name="ce53"/>
          <table:table-cell table:style-name="ce53" office:value-type="string" ns42:value-type="string" table:number-columns-spanned="4" table:number-rows-spanned="1">
            <text:p>AUTHORITATIVE STATE CHANGE</text:p>
          </table:table-cell>
          <table:covered-table-cell table:number-columns-repeated="3" table:style-name="ce53"/>
        </table:table-row>
        <table:table-row table:style-name="ro5">
          <table:table-cell table:style-name="ce54" office:value-type="string" ns42:value-type="string" table:number-columns-spanned="5" table:number-rows-spanned="1">
            <text:p>REQUIRED</text:p>
          </table:table-cell>
          <table:covered-table-cell table:number-columns-repeated="4" table:style-name="ce54"/>
          <table:table-cell table:style-name="ce54" office:value-type="string" ns42:value-type="string" table:number-columns-spanned="5" table:number-rows-spanned="1">
            <text:p>MUST PASS</text:p>
          </table:table-cell>
          <table:covered-table-cell table:number-columns-repeated="4" table:style-name="ce54"/>
          <table:table-cell table:style-name="ce54" office:value-type="string" ns42:value-type="string" table:number-columns-spanned="4" table:number-rows-spanned="1">
            <text:p>READY TO LIST ELIGIBLE</text:p>
          </table:table-cell>
          <table:covered-table-cell table:number-columns-repeated="3" table:style-name="ce54"/>
          <table:table-cell table:style-name="ce54" office:value-type="string" ns42:value-type="string" table:number-columns-spanned="4" table:number-rows-spanned="1">
            <text:p>NOT AUTHORIZED BY THIS GATE</text:p>
          </table:table-cell>
          <table:covered-table-cell table:number-columns-repeated="3" table:style-name="ce54"/>
        </table:table-row>
        <table:table-row table:style-name="ro5">
          <table:table-cell table:style-name="ce52" office:value-type="string" ns42:value-type="string" table:number-columns-spanned="18" table:number-rows-spanned="1">
            <text:p>🏁 COMPACTED INVENTORY + FULL READINESS CROSS-CHECK GATE · BUILD 180</text:p>
          </table:table-cell>
          <table:covered-table-cell table:number-columns-repeated="17" table:style-name="ce52"/>
        </table:table-row>
        <table:table-row table:style-name="ro5">
          <table:table-cell table:style-name="ce54" office:value-type="string" ns42:value-type="string" table:number-columns-spanned="18" table:number-rows-spanned="1">
            <text:p>COMPACT SUPERSEDED PROOF → PRESERVE AUTHORITY + CURRENT ENGINE → VERIFY REFERENCES → CROSS-CHECK EVERY APPLICABLE FACTOR → FAIL CLOSED WHEN ANY FACTOR IS MISSING → ELIGIBILITY ONLY · NO AUTOMATIC READY TO LIST</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READY TO LIST TRANSITION AUTHORITY · BUILDS 181–195</text:p>
          </table:table-cell>
          <table:covered-table-cell table:number-columns-repeated="17" table:style-name="ce52"/>
        </table:table-row>
        <table:table-row table:style-name="ro5">
          <table:table-cell table:style-name="ce53" office:value-type="string" ns42:value-type="string" table:number-columns-spanned="6" table:number-rows-spanned="1">
            <text:p>AUTHORITY QUESTION</text:p>
          </table:table-cell>
          <table:covered-table-cell table:number-columns-repeated="5" table:style-name="ce53"/>
          <table:table-cell table:style-name="ce53" office:value-type="string" ns42:value-type="string" table:number-columns-spanned="6" table:number-rows-spanned="1">
            <text:p>TRANSITION RESPONSIBIL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MAY THIS RECORD TRANSITION TO READY TO LIST?</text:p>
          </table:table-cell>
          <table:covered-table-cell table:number-columns-repeated="5" table:style-name="ce54"/>
          <table:table-cell table:style-name="ce54" office:value-type="string" ns42:value-type="string" table:number-columns-spanned="6" table:number-rows-spanned="1">
            <text:p>EXPLICIT VALIDATED TRANSITION AUTHORITY</text:p>
          </table:table-cell>
          <table:covered-table-cell table:number-columns-repeated="5" table:style-name="ce54"/>
          <table:table-cell table:style-name="ce54" office:value-type="string" ns42:value-type="string" table:number-columns-spanned="6" table:number-rows-spanned="1">
            <text:p>AUTHORIZATION ONLY · NO STATE WRITE</text:p>
          </table:table-cell>
          <table:covered-table-cell table:number-columns-repeated="5" table:style-name="ce54"/>
        </table:table-row>
        <table:table-row table:style-name="ro5">
          <table:table-cell table:style-name="ce52" office:value-type="string" ns42:value-type="string" table:number-columns-spanned="18" table:number-rows-spanned="1">
            <text:p>📨 EXPLICIT TRANSITION REQUES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5" table:number-rows-spanned="1">
            <text:p>REQUESTED TRANSITION</text:p>
          </table:table-cell>
          <table:covered-table-cell table:number-columns-repeated="4" table:style-name="ce53"/>
          <table:table-cell table:style-name="ce53" office:value-type="string" ns42:value-type="string" table:number-columns-spanned="3" table:number-rows-spanned="1">
            <text:p>REQUEST STATUS</text:p>
          </table:table-cell>
          <table:covered-table-cell table:number-columns-repeated="2" table:style-name="ce53"/>
          <table:table-cell table:style-name="ce53" office:value-type="string" ns42:value-type="string" table:number-columns-spanned="3" table:number-rows-spanned="1">
            <text:p>REQUESTED BY</text:p>
          </table:table-cell>
          <table:covered-table-cell table:number-columns-repeated="2" table:style-name="ce53"/>
          <table:table-cell table:style-name="ce53" office:value-type="string" ns42:value-type="string" table:number-columns-spanned="4" table:number-rows-spanned="1">
            <text:p>REQUEST EVIDENCE</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5" table:number-rows-spanned="1">
            <text:p>PREPARATION NEEDED → READY TO LIST</text:p>
          </table:table-cell>
          <table:covered-table-cell table:number-columns-repeated="4" table:style-name="ce54"/>
          <table:table-cell table:style-name="ce54" office:value-type="string" ns42:value-type="string" table:number-columns-spanned="3" table:number-rows-spanned="1">
            <text:p>REQUESTED</text:p>
          </table:table-cell>
          <table:covered-table-cell table:number-columns-repeated="2" table:style-name="ce54"/>
          <table:table-cell table:style-name="ce54" office:value-type="string" ns42:value-type="string" table:number-columns-spanned="3" table:number-rows-spanned="1">
            <text:p>MARK · OPERATOR</text:p>
          </table:table-cell>
          <table:covered-table-cell table:number-columns-repeated="2" table:style-name="ce54"/>
          <table:table-cell table:style-name="ce54" office:value-type="string" ns42:value-type="string" table:number-columns-spanned="4" table:number-rows-spanned="1">
            <text:p>FULL READINESS PASSED</text:p>
          </table:table-cell>
          <table:covered-table-cell table:number-columns-repeated="3" table:style-name="ce54"/>
        </table:table-row>
        <table:table-row table:style-name="ro5">
          <table:table-cell table:style-name="ce52" office:value-type="string" ns42:value-type="string" table:number-columns-spanned="18" table:number-rows-spanned="1">
            <text:p>🧭 CURRENT STATE + TARGET STATE VALIDATION</text:p>
          </table:table-cell>
          <table:covered-table-cell table:number-columns-repeated="17" table:style-name="ce52"/>
        </table:table-row>
        <table:table-row table:style-name="ro5">
          <table:table-cell table:style-name="ce53" office:value-type="string" ns42:value-type="string" table:number-columns-spanned="4" table:number-rows-spanned="1">
            <text:p>CURRENT AUTHORITATIVE STATE</text:p>
          </table:table-cell>
          <table:covered-table-cell table:number-columns-repeated="3" table:style-name="ce53"/>
          <table:table-cell table:style-name="ce53" office:value-type="string" ns42:value-type="string" table:number-columns-spanned="4" table:number-rows-spanned="1">
            <text:p>REQUEST CURRENT STATE</text:p>
          </table:table-cell>
          <table:covered-table-cell table:number-columns-repeated="3" table:style-name="ce53"/>
          <table:table-cell table:style-name="ce53" office:value-type="string" ns42:value-type="string" table:number-columns-spanned="3" table:number-rows-spanned="1">
            <text:p>TARGET STATE</text:p>
          </table:table-cell>
          <table:covered-table-cell table:number-columns-repeated="2" table:style-name="ce53"/>
          <table:table-cell table:style-name="ce53" office:value-type="string" ns42:value-type="string" table:number-columns-spanned="3" table:number-rows-spanned="1">
            <text:p>CURRENT STATE VALID?</text:p>
          </table:table-cell>
          <table:covered-table-cell table:number-columns-repeated="2" table:style-name="ce53"/>
          <table:table-cell table:style-name="ce53" office:value-type="string" ns42:value-type="string" table:number-columns-spanned="4" table:number-rows-spanned="1">
            <text:p>TARGET STATE VALID?</text:p>
          </table:table-cell>
          <table:covered-table-cell table:number-columns-repeated="3" table:style-name="ce53"/>
        </table:table-row>
        <table:table-row table:style-name="ro5">
          <table:table-cell table:style-name="ce54" office:value-type="string" ns42:value-type="string" table:number-columns-spanned="4" table:number-rows-spanned="1">
            <text:p>PREPARATION NEEDED</text:p>
          </table:table-cell>
          <table:covered-table-cell table:number-columns-repeated="3" table:style-name="ce54"/>
          <table:table-cell table:style-name="ce54" office:value-type="string" ns42:value-type="string" table:number-columns-spanned="4" table:number-rows-spanned="1">
            <text:p>PREPARATION NEEDED</text:p>
          </table:table-cell>
          <table:covered-table-cell table:number-columns-repeated="3" table:style-name="ce54"/>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IF([.A645]=[.E645];&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I645]=&quot;READY TO LIST&quot;;&quot;YES&quot;;&quot;NO&quot;)" office:value-type="string" office:string-value="YES" ns42:value-type="string" table:number-columns-spanned="4" table:number-rows-spanned="1">
            <text:p>YES</text:p>
          </table:table-cell>
          <table:covered-table-cell table:number-columns-repeated="3" table:style-name="ce54"/>
        </table:table-row>
        <table:table-row table:style-name="ro5">
          <table:table-cell table:style-name="ce52" office:value-type="string" ns42:value-type="string" table:number-columns-spanned="18" table:number-rows-spanned="1">
            <text:p>✅ CURRENT ELIGIBILITY REVALIDATION</text:p>
          </table:table-cell>
          <table:covered-table-cell table:number-columns-repeated="17" table:style-name="ce52"/>
        </table:table-row>
        <table:table-row table:style-name="ro5">
          <table:table-cell table:style-name="ce53" office:value-type="string" ns42:value-type="string" table:number-columns-spanned="5" table:number-rows-spanned="1">
            <text:p>FULL READINESS RESULT</text:p>
          </table:table-cell>
          <table:covered-table-cell table:number-columns-repeated="4" table:style-name="ce53"/>
          <table:table-cell table:style-name="ce53" office:value-type="string" ns42:value-type="string" table:number-columns-spanned="5" table:number-rows-spanned="1">
            <text:p>ELIGIBILITY RESULT</text:p>
          </table:table-cell>
          <table:covered-table-cell table:number-columns-repeated="4" table:style-name="ce53"/>
          <table:table-cell table:style-name="ce53" office:value-type="string" ns42:value-type="string" table:number-columns-spanned="4" table:number-rows-spanned="1">
            <text:p>ELIGIBILITY CURRENT?</text:p>
          </table:table-cell>
          <table:covered-table-cell table:number-columns-repeated="3" table:style-name="ce53"/>
          <table:table-cell table:style-name="ce53" office:value-type="string" ns42:value-type="string" table:number-columns-spanned="4" table:number-rows-spanned="1">
            <text:p>ELIGIBILITY VALIDATION</text:p>
          </table:table-cell>
          <table:covered-table-cell table:number-columns-repeated="3" table:style-name="ce53"/>
        </table:table-row>
        <table:table-row table:style-name="ro5">
          <table:table-cell table:style-name="ce54" office:value-type="string" ns42:value-type="string" table:number-columns-spanned="5" table:number-rows-spanned="1">
            <text:p>PASSED</text:p>
          </table:table-cell>
          <table:covered-table-cell table:number-columns-repeated="4" table:style-name="ce54"/>
          <table:table-cell table:style-name="ce54" office:value-type="string" ns42:value-type="string" table:number-columns-spanned="5" table:number-rows-spanned="1">
            <text:p>READY TO LIST ELIGIBLE</text:p>
          </table:table-cell>
          <table:covered-table-cell table:number-columns-repeated="4" table:style-name="ce54"/>
          <table:table-cell table:style-name="ce54" office:value-type="string" ns42:value-type="string" table:number-columns-spanned="4" table:number-rows-spanned="1">
            <text:p>YES</text:p>
          </table:table-cell>
          <table:covered-table-cell table:number-columns-repeated="3" table:style-name="ce54"/>
          <table:table-cell table:style-name="ce54" table:formula="of:=IF(AND([.A648]=&quot;PASSED&quot;;[.F648]=&quot;READY TO LIST ELIGIBLE&quot;;[.K648]=&quot;YES&quot;);&quot;VALID&quot;;&quot;INVALID&quot;)" office:value-type="string" office:string-value="VALID" ns42:value-type="string" table:number-columns-spanned="4" table:number-rows-spanned="1">
            <text:p>VALID</text:p>
          </table:table-cell>
          <table:covered-table-cell table:number-columns-repeated="3" table:style-name="ce54"/>
        </table:table-row>
        <table:table-row table:style-name="ro5">
          <table:table-cell table:style-name="ce52" office:value-type="string" ns42:value-type="string" table:number-columns-spanned="18" table:number-rows-spanned="1">
            <text:p>👤 AUTHORIZED ACTOR + REQUIRED TRANSITION EVIDENCE</text:p>
          </table:table-cell>
          <table:covered-table-cell table:number-columns-repeated="17" table:style-name="ce52"/>
        </table:table-row>
        <table:table-row table:style-name="ro5">
          <table:table-cell table:style-name="ce53" office:value-type="string" ns42:value-type="string" table:number-columns-spanned="4" table:number-rows-spanned="1">
            <text:p>REQUESTED BY</text:p>
          </table:table-cell>
          <table:covered-table-cell table:number-columns-repeated="3" table:style-name="ce53"/>
          <table:table-cell table:style-name="ce53" office:value-type="string" ns42:value-type="string" table:number-columns-spanned="3" table:number-rows-spanned="1">
            <text:p>ACTOR AUTHORIZED?</text:p>
          </table:table-cell>
          <table:covered-table-cell table:number-columns-repeated="2" table:style-name="ce53"/>
          <table:table-cell table:style-name="ce53" office:value-type="string" ns42:value-type="string" table:number-columns-spanned="4" table:number-rows-spanned="1">
            <text:p>REQUIRED EVIDENCE</text:p>
          </table:table-cell>
          <table:covered-table-cell table:number-columns-repeated="3" table:style-name="ce53"/>
          <table:table-cell table:style-name="ce53" office:value-type="string" ns42:value-type="string" table:number-columns-spanned="3" table:number-rows-spanned="1">
            <text:p>EVIDENCE PRESENT?</text:p>
          </table:table-cell>
          <table:covered-table-cell table:number-columns-repeated="2" table:style-name="ce53"/>
          <table:table-cell table:style-name="ce53" office:value-type="string" ns42:value-type="string" table:number-columns-spanned="4" table:number-rows-spanned="1">
            <text:p>EVIDENCE VALID?</text:p>
          </table:table-cell>
          <table:covered-table-cell table:number-columns-repeated="3" table:style-name="ce53"/>
        </table:table-row>
        <table:table-row table:style-name="ro5">
          <table:table-cell table:style-name="ce54" office:value-type="string" ns42:value-type="string" table:number-columns-spanned="4" table:number-rows-spanned="1">
            <text:p>MARK · OPERATOR</text:p>
          </table:table-cell>
          <table:covered-table-cell table:number-columns-repeated="3"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4" table:number-rows-spanned="1">
            <text:p>FULL READINESS PASSED</text:p>
          </table:table-cell>
          <table:covered-table-cell table:number-columns-repeated="3"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4" table:number-rows-spanned="1">
            <text:p>YES</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TRANSITION VALIDATION</text:p>
          </table:table-cell>
          <table:covered-table-cell table:number-columns-repeated="17" table:style-name="ce52"/>
        </table:table-row>
        <table:table-row table:style-name="ro5">
          <table:table-cell table:style-name="ce53" office:value-type="string" ns42:value-type="string" table:number-columns-spanned="3" table:number-rows-spanned="1">
            <text:p>REQUEST VALID</text:p>
          </table:table-cell>
          <table:covered-table-cell table:number-columns-repeated="2" table:style-name="ce53"/>
          <table:table-cell table:style-name="ce53" office:value-type="string" ns42:value-type="string" table:number-columns-spanned="3" table:number-rows-spanned="1">
            <text:p>CURRENT STATE VALID</text:p>
          </table:table-cell>
          <table:covered-table-cell table:number-columns-repeated="2" table:style-name="ce53"/>
          <table:table-cell table:style-name="ce53" office:value-type="string" ns42:value-type="string" table:number-columns-spanned="3" table:number-rows-spanned="1">
            <text:p>TARGET STATE VALID</text:p>
          </table:table-cell>
          <table:covered-table-cell table:number-columns-repeated="2" table:style-name="ce53"/>
          <table:table-cell table:style-name="ce53" office:value-type="string" ns42:value-type="string" table:number-columns-spanned="3" table:number-rows-spanned="1">
            <text:p>ELIGIBILITY VALID</text:p>
          </table:table-cell>
          <table:covered-table-cell table:number-columns-repeated="2" table:style-name="ce53"/>
          <table:table-cell table:style-name="ce53" office:value-type="string" ns42:value-type="string" table:number-columns-spanned="3" table:number-rows-spanned="1">
            <text:p>ACTOR VALID</text:p>
          </table:table-cell>
          <table:covered-table-cell table:number-columns-repeated="2" table:style-name="ce53"/>
          <table:table-cell table:style-name="ce53" office:value-type="string" ns42:value-type="string" table:number-columns-spanned="3" table:number-rows-spanned="1">
            <text:p>EVIDENCE VALID</text:p>
          </table:table-cell>
          <table:covered-table-cell table:number-columns-repeated="2" table:style-name="ce53"/>
        </table:table-row>
        <table:table-row table:style-name="ro21">
          <table:table-cell table:style-name="ce54" table:formula="of:=IF(AND([.D642]=&quot;PREPARATION NEEDED → READY TO LIST&quot;;[.I642]=&quot;REQUES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L645]" office:value-type="string" office:string-value="YES" ns42:value-type="string" table:number-columns-spanned="3" table:number-rows-spanned="1">
            <text:p>YES</text:p>
          </table:table-cell>
          <table:covered-table-cell table:number-columns-repeated="2" table:style-name="ce54"/>
          <table:table-cell table:style-name="ce54" table:formula="of:=[.O645]" office:value-type="string" office:string-value="YES" ns42:value-type="string" table:number-columns-spanned="3" table:number-rows-spanned="1">
            <text:p>YES</text:p>
          </table:table-cell>
          <table:covered-table-cell table:number-columns-repeated="2" table:style-name="ce54"/>
          <table:table-cell table:style-name="ce54" table:formula="of:=IF([.O648]=&quot;VALI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E651]" office:value-type="string" office:string-value="YES" ns42:value-type="string" table:number-columns-spanned="3" table:number-rows-spanned="1">
            <text:p>YES</text:p>
          </table:table-cell>
          <table:covered-table-cell table:number-columns-repeated="2" table:style-name="ce54"/>
          <table:table-cell table:style-name="ce54" table:formula="of:=[.O651]" office:value-type="string" office:string-value="YES" ns42:value-type="string" table:number-columns-spanned="3" table:number-rows-spanned="1">
            <text:p>YES</text:p>
          </table:table-cell>
          <table:covered-table-cell table:number-columns-repeated="2" table:style-name="ce54"/>
        </table:table-row>
        <table:table-row table:style-name="ro5">
          <table:table-cell table:style-name="ce52" office:value-type="string" ns42:value-type="string" table:number-columns-spanned="18" table:number-rows-spanned="1">
            <text:p>🕒 STALE REQUEST + DUPLICATE TRANSITION PROTECTION</text:p>
          </table:table-cell>
          <table:covered-table-cell table:number-columns-repeated="17" table:style-name="ce52"/>
        </table:table-row>
        <table:table-row table:style-name="ro5">
          <table:table-cell table:style-name="ce53" office:value-type="string" ns42:value-type="string" table:number-columns-spanned="5" table:number-rows-spanned="1">
            <text:p>CURRENT STATE CHANGED?</text:p>
          </table:table-cell>
          <table:covered-table-cell table:number-columns-repeated="4" table:style-name="ce53"/>
          <table:table-cell table:style-name="ce53" office:value-type="string" ns42:value-type="string" table:number-columns-spanned="4" table:number-rows-spanned="1">
            <text:p>REQUEST STALE?</text:p>
          </table:table-cell>
          <table:covered-table-cell table:number-columns-repeated="3" table:style-name="ce53"/>
          <table:table-cell table:style-name="ce53" office:value-type="string" ns42:value-type="string" table:number-columns-spanned="5" table:number-rows-spanned="1">
            <text:p>TRANSITION ALREADY COMPLETED?</text:p>
          </table:table-cell>
          <table:covered-table-cell table:number-columns-repeated="4" table:style-name="ce53"/>
          <table:table-cell table:style-name="ce53" office:value-type="string" ns42:value-type="string" table:number-columns-spanned="4" table:number-rows-spanned="1">
            <text:p>PROTECTION RESULT</text:p>
          </table:table-cell>
          <table:covered-table-cell table:number-columns-repeated="3" table:style-name="ce53"/>
        </table:table-row>
        <table:table-row table:style-name="ro5">
          <table:table-cell table:style-name="ce54" office:value-type="string" ns42:value-type="string" table:number-columns-spanned="5" table:number-rows-spanned="1">
            <text:p>NO</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5" table:number-rows-spanned="1">
            <text:p>NO</text:p>
          </table:table-cell>
          <table:covered-table-cell table:number-columns-repeated="4" table:style-name="ce54"/>
          <table:table-cell table:style-name="ce54" office:value-type="string" ns42:value-type="string" table:number-columns-spanned="4" table:number-rows-spanned="1">
            <text:p>CLEAR</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TRANSITION AUTHORIZATION RESULT</text:p>
          </table:table-cell>
          <table:covered-table-cell table:number-columns-repeated="17" table:style-name="ce52"/>
        </table:table-row>
        <table:table-row table:style-name="ro5">
          <table:table-cell table:style-name="ce53" office:value-type="string" ns42:value-type="string" table:number-columns-spanned="5" table:number-rows-spanned="1">
            <text:p>TRANSITION AUTHORITY</text:p>
          </table:table-cell>
          <table:covered-table-cell table:number-columns-repeated="4" table:style-name="ce53"/>
          <table:table-cell table:style-name="ce53" office:value-type="string" ns42:value-type="string" table:number-columns-spanned="5" table:number-rows-spanned="1">
            <text:p>STATE MUTATION AUTHORITY</text:p>
          </table:table-cell>
          <table:covered-table-cell table:number-columns-repeated="4" table:style-name="ce53"/>
          <table:table-cell table:style-name="ce53" office:value-type="string" ns42:value-type="string" table:number-columns-spanned="4" table:number-rows-spanned="1">
            <text:p>AUTHORIZED TRANSITION</text:p>
          </table:table-cell>
          <table:covered-table-cell table:number-columns-repeated="3" table:style-name="ce53"/>
          <table:table-cell table:style-name="ce53" office:value-type="string" ns42:value-type="string" table:number-columns-spanned="4" table:number-rows-spanned="1">
            <text:p>STATE WRITE PERFORMED?</text:p>
          </table:table-cell>
          <table:covered-table-cell table:number-columns-repeated="3" table:style-name="ce53"/>
        </table:table-row>
        <table:table-row table:style-name="ro5">
          <table:table-cell table:style-name="ce54" table:formula="of:=IF(AND([.A654]=&quot;YES&quot;;[.D654]=&quot;YES&quot;;[.G654]=&quot;YES&quot;;[.J654]=&quot;YES&quot;;[.M654]=&quot;YES&quot;;[.P654]=&quot;YES&quot;;[.A657]=&quot;NO&quot;;[.F657]=&quot;NO&quot;;[.J657]=&quot;NO&quot;);&quot;AUTHORIZED&quot;;&quot;DENIED&quot;)" office:value-type="string" office:string-value="AUTHORIZED" ns42:value-type="string" table:number-columns-spanned="5" table:number-rows-spanned="1">
            <text:p>AUTHORIZED</text:p>
          </table:table-cell>
          <table:covered-table-cell table:number-columns-repeated="4" table:style-name="ce54"/>
          <table:table-cell table:style-name="ce54" table:formula="of:=IF([.A660]=&quot;AUTHORIZED&quot;;&quot;GRANTED&quot;;&quot;NONE&quot;)" office:value-type="string" office:string-value="GRANTED" ns42:value-type="string" table:number-columns-spanned="5" table:number-rows-spanned="1">
            <text:p>GRANTED</text:p>
          </table:table-cell>
          <table:covered-table-cell table:number-columns-repeated="4" table:style-name="ce54"/>
          <table:table-cell table:style-name="ce54" table:formula="of:=IF([.A660]=&quot;AUTHORIZED&quot;;[.D642];&quot;NO AUTHORIZED TRANSITION&quot;)" office:value-type="string" office:string-value="PREPARATION NEEDED → READY TO LIST" ns42:value-type="string" table:number-columns-spanned="4" table:number-rows-spanned="1">
            <text:p>PREPARATION NEEDED → READY TO LIST</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TRANSITION AUDIT EVIDENCE SURFACE</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FROM STATE</text:p>
          </table:table-cell>
          <table:covered-table-cell table:number-columns-repeated="2" table:style-name="ce53"/>
          <table:table-cell table:style-name="ce53" office:value-type="string" ns42:value-type="string" table:number-columns-spanned="3" table:number-rows-spanned="1">
            <text:p>TO STATE</text:p>
          </table:table-cell>
          <table:covered-table-cell table:number-columns-repeated="2" table:style-name="ce53"/>
          <table:table-cell table:style-name="ce53" office:value-type="string" ns42:value-type="string" table:number-columns-spanned="3" table:number-rows-spanned="1">
            <text:p>AUTHORITY RESULT</text:p>
          </table:table-cell>
          <table:covered-table-cell table:number-columns-repeated="2" table:style-name="ce53"/>
          <table:table-cell table:style-name="ce53" office:value-type="string" ns42:value-type="string" table:number-columns-spanned="3" table:number-rows-spanned="1">
            <text:p>ACTOR</text:p>
          </table:table-cell>
          <table:covered-table-cell table:number-columns-repeated="2" table:style-name="ce53"/>
          <table:table-cell table:style-name="ce53" office:value-type="string" ns42:value-type="string" table:number-columns-spanned="3" table:number-rows-spanned="1">
            <text:p>AUDIT STATUS</text:p>
          </table:table-cell>
          <table:covered-table-cell table:number-columns-repeated="2"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PREPARATION NEEDED</text:p>
          </table:table-cell>
          <table:covered-table-cell table:number-columns-repeated="2" table:style-name="ce54"/>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A660]" office:value-type="string" office:string-value="AUTHORIZED" ns42:value-type="string" table:number-columns-spanned="3" table:number-rows-spanned="1">
            <text:p>AUTHORIZED</text:p>
          </table:table-cell>
          <table:covered-table-cell table:number-columns-repeated="2" table:style-name="ce54"/>
          <table:table-cell table:style-name="ce54" office:value-type="string" ns42:value-type="string" table:number-columns-spanned="3" table:number-rows-spanned="1">
            <text:p>MARK · OPERATOR</text:p>
          </table:table-cell>
          <table:covered-table-cell table:number-columns-repeated="2" table:style-name="ce54"/>
          <table:table-cell table:style-name="ce54" table:formula="of:=IF([.A660]=&quot;AUTHORIZED&quot;;&quot;AUTHORIZATION RECORDED&quot;;&quot;DENIAL RECORDED&quot;)" office:value-type="string" office:string-value="AUTHORIZATION RECORDED" ns42:value-type="string" table:number-columns-spanned="3" table:number-rows-spanned="1">
            <text:p>AUTHORIZATION RECORDED</text:p>
          </table:table-cell>
          <table:covered-table-cell table:number-columns-repeated="2" table:style-name="ce54"/>
        </table:table-row>
        <table:table-row table:style-name="ro5">
          <table:table-cell table:style-name="ce52" office:value-type="string" ns42:value-type="string" table:number-columns-spanned="18" table:number-rows-spanned="1">
            <text:p>🛡️ READ-ONLY BOUNDARY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FULL READINESS</text:p>
          </table:table-cell>
          <table:covered-table-cell table:number-columns-repeated="3" table:style-name="ce53"/>
          <table:table-cell table:style-name="ce53" office:value-type="string" ns42:value-type="string" table:number-columns-spanned="4" table:number-rows-spanned="1">
            <text:p>ELIGIBILITY</text:p>
          </table:table-cell>
          <table:covered-table-cell table:number-columns-repeated="3" table:style-name="ce53"/>
          <table:table-cell table:style-name="ce53" office:value-type="string" ns42:value-type="string" table:number-columns-spanned="3" table:number-rows-spanned="1">
            <text:p>ACTION CENTER</text:p>
          </table:table-cell>
          <table:covered-table-cell table:number-columns-repeated="2" table:style-name="ce53"/>
          <table:table-cell table:style-name="ce53" office:value-type="string" ns42:value-type="string" table:number-columns-spanned="3" table:number-rows-spanned="1">
            <text:p>TRANSITION AUTHORITY</text:p>
          </table:table-cell>
          <table:covered-table-cell table:number-columns-repeated="2" table:style-name="ce53"/>
          <table:table-cell table:style-name="ce53" office:value-type="string" ns42:value-type="string" table:number-columns-spanned="4" table:number-rows-spanned="1">
            <text:p>INVENTORY STATE WRITE</text:p>
          </table:table-cell>
          <table:covered-table-cell table:number-columns-repeated="3" table:style-name="ce53"/>
        </table:table-row>
        <table:table-row table:style-name="ro5">
          <table:table-cell table:style-name="ce54" office:value-type="string" ns42:value-type="string" table:number-columns-spanned="4" table:number-rows-spanned="1">
            <text:p>EVIDENCE CLASSIFICATION</text:p>
          </table:table-cell>
          <table:covered-table-cell table:number-columns-repeated="3" table:style-name="ce54"/>
          <table:table-cell table:style-name="ce54" office:value-type="string" ns42:value-type="string" table:number-columns-spanned="4" table:number-rows-spanned="1">
            <text:p>READ-ONLY RESULT</text:p>
          </table:table-cell>
          <table:covered-table-cell table:number-columns-repeated="3" table:style-name="ce54"/>
          <table:table-cell table:style-name="ce54" office:value-type="string" ns42:value-type="string" table:number-columns-spanned="3" table:number-rows-spanned="1">
            <text:p>READ-ONLY GUIDANCE</text:p>
          </table:table-cell>
          <table:covered-table-cell table:number-columns-repeated="2" table:style-name="ce54"/>
          <table:table-cell table:style-name="ce54" office:value-type="string" ns42:value-type="string" table:number-columns-spanned="3" table:number-rows-spanned="1">
            <text:p>EXPLICIT VALIDATION</text:p>
          </table:table-cell>
          <table:covered-table-cell table:number-columns-repeated="2" table:style-name="ce54"/>
          <table:table-cell table:style-name="ce54" office:value-type="string" ns42:value-type="string" table:number-columns-spanned="4" table:number-rows-spanned="1">
            <text:p>NOT PERFORMED BY THIS GATE</text:p>
          </table:table-cell>
          <table:covered-table-cell table:number-columns-repeated="3" table:style-name="ce54"/>
        </table:table-row>
        <table:table-row table:style-name="ro5">
          <table:table-cell table:style-name="ce52" office:value-type="string" ns42:value-type="string" table:number-columns-spanned="18" table:number-rows-spanned="1">
            <text:p>🚫 FAIL-CLOSED AUTHORITY CASES</text:p>
          </table:table-cell>
          <table:covered-table-cell table:number-columns-repeated="17" table:style-name="ce52"/>
        </table:table-row>
        <table:table-row table:style-name="ro5">
          <table:table-cell table:style-name="ce53" office:value-type="string" ns42:value-type="string" table:number-columns-spanned="6" table:number-rows-spanned="1">
            <text:p>FAILURE CONDITION</text:p>
          </table:table-cell>
          <table:covered-table-cell table:number-columns-repeated="5" table:style-name="ce53"/>
          <table:table-cell table:style-name="ce53" office:value-type="string" ns42:value-type="string" table:number-columns-spanned="6" table:number-rows-spanned="1">
            <text:p>AUTHORITY RESULT</text:p>
          </table:table-cell>
          <table:covered-table-cell table:number-columns-repeated="5" table:style-name="ce53"/>
          <table:table-cell table:style-name="ce53" office:value-type="string" ns42:value-type="string" table:number-columns-spanned="6" table:number-rows-spanned="1">
            <text:p>MUTATION AUTHORITY</text:p>
          </table:table-cell>
          <table:covered-table-cell table:number-columns-repeated="5" table:style-name="ce53"/>
        </table:table-row>
        <table:table-row table:style-name="ro5">
          <table:table-cell table:style-name="ce54" office:value-type="string" ns42:value-type="string" table:number-columns-spanned="6" table:number-rows-spanned="1">
            <text:p>MISSING TRANSITION REQUEST</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UNKNOWN CURRENT STAT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INVALID TARGET STAT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STALE ELIGIBILITY</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FULL READINESS FAIL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MISSING AUTHORIZED ACTOR</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UNAUTHORIZED ACTOR</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MISSING TRANSITION EVIDENC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CURRENT STATE CHANGED SINCE REQUEST</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DUPLICATE COMPLETED TRANSITION</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2" office:value-type="string" ns42:value-type="string" table:number-columns-spanned="18" table:number-rows-spanned="1">
            <text:p>🏁 CONTROLLED READY TO LIST TRANSITION AUTHORITY GATE · BUILD 195</text:p>
          </table:table-cell>
          <table:covered-table-cell table:number-columns-repeated="17" table:style-name="ce52"/>
        </table:table-row>
        <table:table-row table:style-name="ro5">
          <table:table-cell table:style-name="ce54" office:value-type="string" ns42:value-type="string" table:number-columns-spanned="18" table:number-rows-spanned="1">
            <text:p>ELIGIBILITY ≠ REQUEST ≠ AUTHORITY ≠ MUTATION · VALID REQUEST + CURRENT STATE + TARGET + ELIGIBILITY + ACTOR + EVIDENCE + STALE/DUPLICATE PROTECTION → AUTHORIZED → MUTATION AUTHORITY GRANTED · NO STATE WRITE BY THIS GATE</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READY TO LIST TRANSITION EXECUTION · BUILDS 196–210</text:p>
          </table:table-cell>
          <table:covered-table-cell table:number-columns-repeated="17" table:style-name="ce52"/>
        </table:table-row>
        <table:table-row table:style-name="ro5">
          <table:table-cell table:style-name="ce53" office:value-type="string" ns42:value-type="string" table:number-columns-spanned="6" table:number-rows-spanned="1">
            <text:p>EXECUTION QUESTION</text:p>
          </table:table-cell>
          <table:covered-table-cell table:number-columns-repeated="5" table:style-name="ce53"/>
          <table:table-cell table:style-name="ce53" office:value-type="string" ns42:value-type="string" table:number-columns-spanned="6" table:number-rows-spanned="1">
            <text:p>EXECUTION RESPONSIBILITY</text:p>
          </table:table-cell>
          <table:covered-table-cell table:number-columns-repeated="5" table:style-name="ce53"/>
          <table:table-cell table:style-name="ce53" office:value-type="string" ns42:value-type="string" table:number-columns-spanned="6" table:number-rows-spanned="1">
            <text:p>WRITE BOUNDARY</text:p>
          </table:table-cell>
          <table:covered-table-cell table:number-columns-repeated="5" table:style-name="ce53"/>
        </table:table-row>
        <table:table-row table:style-name="ro5">
          <table:table-cell table:style-name="ce54" office:value-type="string" ns42:value-type="string" table:number-columns-spanned="6" table:number-rows-spanned="1">
            <text:p>MAY THE GRANTED TRANSITION NOW EXECUTE?</text:p>
          </table:table-cell>
          <table:covered-table-cell table:number-columns-repeated="5" table:style-name="ce54"/>
          <table:table-cell table:style-name="ce54" office:value-type="string" ns42:value-type="string" table:number-columns-spanned="6" table:number-rows-spanned="1">
            <text:p>EXPLICIT COMMIT + PRE-WRITE REVALIDATION</text:p>
          </table:table-cell>
          <table:covered-table-cell table:number-columns-repeated="5" table:style-name="ce54"/>
          <table:table-cell table:style-name="ce54" office:value-type="string" ns42:value-type="string" table:number-columns-spanned="6" table:number-rows-spanned="1">
            <text:p>CONTROLLED WRITE RESULT + APPEND-ONLY HISTORY</text:p>
          </table:table-cell>
          <table:covered-table-cell table:number-columns-repeated="5" table:style-name="ce54"/>
        </table:table-row>
        <table:table-row table:style-name="ro5">
          <table:table-cell table:style-name="ce52" office:value-type="string" ns42:value-type="string" table:number-columns-spanned="18" table:number-rows-spanned="1">
            <text:p>🟢 EXPLICIT EXECUTION COMMI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EXECUTION ID</text:p>
          </table:table-cell>
          <table:covered-table-cell table:number-columns-repeated="2" table:style-name="ce53"/>
          <table:table-cell table:style-name="ce53" office:value-type="string" ns42:value-type="string" table:number-columns-spanned="3" table:number-rows-spanned="1">
            <text:p>EXECUTION COMMIT</text:p>
          </table:table-cell>
          <table:covered-table-cell table:number-columns-repeated="2" table:style-name="ce53"/>
          <table:table-cell table:style-name="ce53" office:value-type="string" ns42:value-type="string" table:number-columns-spanned="5" table:number-rows-spanned="1">
            <text:p>AUTHORIZED TRANSITION</text:p>
          </table:table-cell>
          <table:covered-table-cell table:number-columns-repeated="4" table:style-name="ce53"/>
          <table:table-cell table:style-name="ce53" office:value-type="string" ns42:value-type="string" table:number-columns-spanned="4" table:number-rows-spanned="1">
            <text:p>MUTATION AUTHORITY</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EXEC-000001</text:p>
          </table:table-cell>
          <table:covered-table-cell table:number-columns-repeated="2" table:style-name="ce54"/>
          <table:table-cell table:style-name="ce54" office:value-type="string" ns42:value-type="string" table:number-columns-spanned="3" table:number-rows-spanned="1">
            <text:p>EXECUTE</text:p>
          </table:table-cell>
          <table:covered-table-cell table:number-columns-repeated="2" table:style-name="ce54"/>
          <table:table-cell table:style-name="ce54" office:value-type="string" ns42:value-type="string" table:number-columns-spanned="5" table:number-rows-spanned="1">
            <text:p>PREPARATION NEEDED → READY TO LIST</text:p>
          </table:table-cell>
          <table:covered-table-cell table:number-columns-repeated="4" table:style-name="ce54"/>
          <table:table-cell table:style-name="ce54" office:value-type="string" ns42:value-type="string" table:number-columns-spanned="4" table:number-rows-spanned="1">
            <text:p>GRANTED</text:p>
          </table:table-cell>
          <table:covered-table-cell table:number-columns-repeated="3" table:style-name="ce54"/>
        </table:table-row>
        <table:table-row table:style-name="ro5">
          <table:table-cell table:style-name="ce52" office:value-type="string" ns42:value-type="string" table:number-columns-spanned="18" table:number-rows-spanned="1">
            <text:p>🔍 PRE-WRITE AUTHORITATIVE REVALIDATION</text:p>
          </table:table-cell>
          <table:covered-table-cell table:number-columns-repeated="17" table:style-name="ce52"/>
        </table:table-row>
        <table:table-row table:style-name="ro5">
          <table:table-cell table:style-name="ce53" office:value-type="string" ns42:value-type="string" table:number-columns-spanned="3" table:number-rows-spanned="1">
            <text:p>RECORD EXISTS?</text:p>
          </table:table-cell>
          <table:covered-table-cell table:number-columns-repeated="2" table:style-name="ce53"/>
          <table:table-cell table:style-name="ce53" office:value-type="string" ns42:value-type="string" table:number-columns-spanned="3" table:number-rows-spanned="1">
            <text:p>CURRENT AUTHORITATIVE STATE</text:p>
          </table:table-cell>
          <table:covered-table-cell table:number-columns-repeated="2" table:style-name="ce53"/>
          <table:table-cell table:style-name="ce53" office:value-type="string" ns42:value-type="string" table:number-columns-spanned="3" table:number-rows-spanned="1">
            <text:p>AUTHORIZED FROM STATE</text:p>
          </table:table-cell>
          <table:covered-table-cell table:number-columns-repeated="2" table:style-name="ce53"/>
          <table:table-cell table:style-name="ce53" office:value-type="string" ns42:value-type="string" table:number-columns-spanned="3" table:number-rows-spanned="1">
            <text:p>AUTHORIZED TO STATE</text:p>
          </table:table-cell>
          <table:covered-table-cell table:number-columns-repeated="2" table:style-name="ce53"/>
          <table:table-cell table:style-name="ce53" office:value-type="string" ns42:value-type="string" table:number-columns-spanned="3" table:number-rows-spanned="1">
            <text:p>FROM STATE MATCH?</text:p>
          </table:table-cell>
          <table:covered-table-cell table:number-columns-repeated="2" table:style-name="ce53"/>
          <table:table-cell table:style-name="ce53" office:value-type="string" ns42:value-type="string" table:number-columns-spanned="3" table:number-rows-spanned="1">
            <text:p>AUTHORITY STILL GRANTED?</text:p>
          </table:table-cell>
          <table:covered-table-cell table:number-columns-repeated="2" table:style-name="ce53"/>
        </table:table-row>
        <table:table-row table:style-name="ro5">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PREPARATION NEEDED</text:p>
          </table:table-cell>
          <table:covered-table-cell table:number-columns-repeated="2" table:style-name="ce54"/>
          <table:table-cell table:style-name="ce54" office:value-type="string" ns42:value-type="string" table:number-columns-spanned="3" table:number-rows-spanned="1">
            <text:p>PREPARATION NEEDED</text:p>
          </table:table-cell>
          <table:covered-table-cell table:number-columns-repeated="2" table:style-name="ce54"/>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IF(UPPER(TRIM([.D689]))=UPPER(TRIM([.G689]));&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O686]))=&quot;GRANTED&quot;;&quot;YES&quot;;&quot;NO&quot;)" office:value-type="string" office:string-value="YES" ns42:value-type="string" table:number-columns-spanned="3" table:number-rows-spanned="1">
            <text:p>YES</text:p>
          </table:table-cell>
          <table:covered-table-cell table:number-columns-repeated="2" table:style-name="ce54"/>
        </table:table-row>
        <table:table-row table:style-name="ro5">
          <table:table-cell table:style-name="ce52" office:value-type="string" ns42:value-type="string" table:number-columns-spanned="18" table:number-rows-spanned="1">
            <text:p>🛡️ EXECUTION ID + REPLAY PROTECTION</text:p>
          </table:table-cell>
          <table:covered-table-cell table:number-columns-repeated="17" table:style-name="ce52"/>
        </table:table-row>
        <table:table-row table:style-name="ro5">
          <table:table-cell table:style-name="ce53" office:value-type="string" ns42:value-type="string" table:number-columns-spanned="5" table:number-rows-spanned="1">
            <text:p>EXECUTION ID UNIQUE?</text:p>
          </table:table-cell>
          <table:covered-table-cell table:number-columns-repeated="4" table:style-name="ce53"/>
          <table:table-cell table:style-name="ce53" office:value-type="string" ns42:value-type="string" table:number-columns-spanned="4" table:number-rows-spanned="1">
            <text:p>EXECUTION ALREADY COMPLETED?</text:p>
          </table:table-cell>
          <table:covered-table-cell table:number-columns-repeated="3" table:style-name="ce53"/>
          <table:table-cell table:style-name="ce53" office:value-type="string" ns42:value-type="string" table:number-columns-spanned="5" table:number-rows-spanned="1">
            <text:p>TRANSITION ALREADY EXECUTED?</text:p>
          </table:table-cell>
          <table:covered-table-cell table:number-columns-repeated="4" table:style-name="ce53"/>
          <table:table-cell table:style-name="ce53" office:value-type="string" ns42:value-type="string" table:number-columns-spanned="4" table:number-rows-spanned="1">
            <text:p>PROTECTION RESULT</text:p>
          </table:table-cell>
          <table:covered-table-cell table:number-columns-repeated="3" table:style-name="ce53"/>
        </table:table-row>
        <table:table-row table:style-name="ro5">
          <table:table-cell table:style-name="ce54" office:value-type="string" ns42:value-type="string" table:number-columns-spanned="5" table:number-rows-spanned="1">
            <text:p>YES</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5" table:number-rows-spanned="1">
            <text:p>NO</text:p>
          </table:table-cell>
          <table:covered-table-cell table:number-columns-repeated="4" table:style-name="ce54"/>
          <table:table-cell table:style-name="ce54" office:value-type="string" ns42:value-type="string" table:number-columns-spanned="4" table:number-rows-spanned="1">
            <text:p>CLEAR</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EXECUTION VALIDATION</text:p>
          </table:table-cell>
          <table:covered-table-cell table:number-columns-repeated="17" table:style-name="ce52"/>
        </table:table-row>
        <table:table-row table:style-name="ro5">
          <table:table-cell table:style-name="ce53" office:value-type="string" ns42:value-type="string" table:number-columns-spanned="3" table:number-rows-spanned="1">
            <text:p>COMMIT VALID</text:p>
          </table:table-cell>
          <table:covered-table-cell table:number-columns-repeated="2" table:style-name="ce53"/>
          <table:table-cell table:style-name="ce53" office:value-type="string" ns42:value-type="string" table:number-columns-spanned="3" table:number-rows-spanned="1">
            <text:p>RECORD VALID</text:p>
          </table:table-cell>
          <table:covered-table-cell table:number-columns-repeated="2" table:style-name="ce53"/>
          <table:table-cell table:style-name="ce53" office:value-type="string" ns42:value-type="string" table:number-columns-spanned="3" table:number-rows-spanned="1">
            <text:p>FROM STATE VALID</text:p>
          </table:table-cell>
          <table:covered-table-cell table:number-columns-repeated="2" table:style-name="ce53"/>
          <table:table-cell table:style-name="ce53" office:value-type="string" ns42:value-type="string" table:number-columns-spanned="3" table:number-rows-spanned="1">
            <text:p>TRANSITION VALID</text:p>
          </table:table-cell>
          <table:covered-table-cell table:number-columns-repeated="2" table:style-name="ce53"/>
          <table:table-cell table:style-name="ce53" office:value-type="string" ns42:value-type="string" table:number-columns-spanned="3" table:number-rows-spanned="1">
            <text:p>AUTHORITY VALID</text:p>
          </table:table-cell>
          <table:covered-table-cell table:number-columns-repeated="2" table:style-name="ce53"/>
          <table:table-cell table:style-name="ce53" office:value-type="string" ns42:value-type="string" table:number-columns-spanned="3" table:number-rows-spanned="1">
            <text:p>REPLAY CLEAR</text:p>
          </table:table-cell>
          <table:covered-table-cell table:number-columns-repeated="2" table:style-name="ce53"/>
        </table:table-row>
        <table:table-row table:style-name="ro21">
          <table:table-cell table:style-name="ce54" table:formula="of:=IF(UPPER(TRIM([.G686]))=&quot;EXECUTE&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A689]" office:value-type="string" office:string-value="YES" ns42:value-type="string" table:number-columns-spanned="3" table:number-rows-spanned="1">
            <text:p>YES</text:p>
          </table:table-cell>
          <table:covered-table-cell table:number-columns-repeated="2" table:style-name="ce54"/>
          <table:table-cell table:style-name="ce54" table:formula="of:=[.M689]" office:value-type="string" office:string-value="YES" ns42:value-type="string" table:number-columns-spanned="3" table:number-rows-spanned="1">
            <text:p>YES</text:p>
          </table:table-cell>
          <table:covered-table-cell table:number-columns-repeated="2" table:style-name="ce54"/>
          <table:table-cell table:style-name="ce54" table:formula="of:=IF(UPPER(TRIM([.J686]))=UPPER(TRIM([.G689])&amp;&quot; → &quot;&amp;TRIM([.J689]));&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P689]" office:value-type="string" office:string-value="YES" ns42:value-type="string" table:number-columns-spanned="3" table:number-rows-spanned="1">
            <text:p>YES</text:p>
          </table:table-cell>
          <table:covered-table-cell table:number-columns-repeated="2" table:style-name="ce54"/>
          <table:table-cell table:style-name="ce54" table:formula="of:=IF(AND(UPPER(TRIM([.A692]))=&quot;YES&quot;;UPPER(TRIM([.F692]))=&quot;NO&quot;;UPPER(TRIM([.J692]))=&quot;NO&quot;);&quot;YES&quot;;&quot;NO&quot;)" office:value-type="string" office:string-value="YES" ns42:value-type="string" table:number-columns-spanned="3" table:number-rows-spanned="1">
            <text:p>YES</text:p>
          </table:table-cell>
          <table:covered-table-cell table:number-columns-repeated="2" table:style-name="ce54"/>
        </table:table-row>
        <table:table-row table:style-name="ro5">
          <table:table-cell table:style-name="ce52" office:value-type="string" ns42:value-type="string" table:number-columns-spanned="18" table:number-rows-spanned="1">
            <text:p>✍️ AUTHORITATIVE STATE WRITE RESULT</text:p>
          </table:table-cell>
          <table:covered-table-cell table:number-columns-repeated="17" table:style-name="ce52"/>
        </table:table-row>
        <table:table-row table:style-name="ro5">
          <table:table-cell table:style-name="ce53" office:value-type="string" ns42:value-type="string" table:number-columns-spanned="4" table:number-rows-spanned="1">
            <text:p>EXECUTION RESULT</text:p>
          </table:table-cell>
          <table:covered-table-cell table:number-columns-repeated="3" table:style-name="ce53"/>
          <table:table-cell table:style-name="ce53" office:value-type="string" ns42:value-type="string" table:number-columns-spanned="3" table:number-rows-spanned="1">
            <text:p>FROM STATE</text:p>
          </table:table-cell>
          <table:covered-table-cell table:number-columns-repeated="2" table:style-name="ce53"/>
          <table:table-cell table:style-name="ce53" office:value-type="string" ns42:value-type="string" table:number-columns-spanned="4" table:number-rows-spanned="1">
            <text:p>WRITTEN AUTHORITATIVE STATE</text:p>
          </table:table-cell>
          <table:covered-table-cell table:number-columns-repeated="3" table:style-name="ce53"/>
          <table:table-cell table:style-name="ce53" office:value-type="string" ns42:value-type="string" table:number-columns-spanned="3" table:number-rows-spanned="1">
            <text:p>WRITE PERFORMED?</text:p>
          </table:table-cell>
          <table:covered-table-cell table:number-columns-repeated="2" table:style-name="ce53"/>
          <table:table-cell table:style-name="ce53" office:value-type="string" ns42:value-type="string" table:number-columns-spanned="4" table:number-rows-spanned="1">
            <text:p>EXECUTION ID</text:p>
          </table:table-cell>
          <table:covered-table-cell table:number-columns-repeated="3" table:style-name="ce53"/>
        </table:table-row>
        <table:table-row table:style-name="ro21">
          <table:table-cell table:style-name="ce54" table:formula="of:=IF(AND(UPPER(TRIM([.A695]))=&quot;YES&quot;;UPPER(TRIM([.D695]))=&quot;YES&quot;;UPPER(TRIM([.G695]))=&quot;YES&quot;;UPPER(TRIM([.J695]))=&quot;YES&quot;;UPPER(TRIM([.M695]))=&quot;YES&quot;;UPPER(TRIM([.P695]))=&quot;YES&quot;);&quot;EXECUTED&quot;;&quot;DENIED&quot;)" office:value-type="string" office:string-value="EXECUTED" ns42:value-type="string" table:number-columns-spanned="4" table:number-rows-spanned="1">
            <text:p>EXECUTED</text:p>
          </table:table-cell>
          <table:covered-table-cell table:number-columns-repeated="3" table:style-name="ce54"/>
          <table:table-cell table:style-name="ce54" table:formula="of:=[.D689]" office:value-type="string" office:string-value="PREPARATION NEEDED" ns42:value-type="string" table:number-columns-spanned="3" table:number-rows-spanned="1">
            <text:p>PREPARATION NEEDED</text:p>
          </table:table-cell>
          <table:covered-table-cell table:number-columns-repeated="2" table:style-name="ce54"/>
          <table:table-cell table:style-name="ce54" table:formula="of:=IF(UPPER(TRIM([.A698]))=&quot;EXECUTED&quot;;[.J689];[.D689])" office:value-type="string" office:string-value="READY TO LIST" ns42:value-type="string" table:number-columns-spanned="4" table:number-rows-spanned="1">
            <text:p>READY TO LIST</text:p>
          </table:table-cell>
          <table:covered-table-cell table:number-columns-repeated="3" table:style-name="ce54"/>
          <table:table-cell table:style-name="ce54" table:formula="of:=IF(UPPER(TRIM([.A698]))=&quot;EXECU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D686]" office:value-type="string" office:string-value="EXEC-000001" ns42:value-type="string" table:number-columns-spanned="4" table:number-rows-spanned="1">
            <text:p>EXEC-000001</text:p>
          </table:table-cell>
          <table:covered-table-cell table:number-columns-repeated="3" table:style-name="ce54"/>
        </table:table-row>
        <table:table-row table:style-name="ro5">
          <table:table-cell table:style-name="ce52" office:value-type="string" ns42:value-type="string" table:number-columns-spanned="18" table:number-rows-spanned="1">
            <text:p>🧾 APPEND-ONLY TRANSITION HISTORY EVENT</text:p>
          </table:table-cell>
          <table:covered-table-cell table:number-columns-repeated="17" table:style-name="ce52"/>
        </table:table-row>
        <table:table-row table:style-name="ro5">
          <table:table-cell table:style-name="ce53" office:value-type="string" ns42:value-type="string" table:number-columns-spanned="3" table:number-rows-spanned="1">
            <text:p>EVENT ID</text:p>
          </table:table-cell>
          <table:covered-table-cell table:number-columns-repeated="2" table:style-name="ce53"/>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FROM STATE</text:p>
          </table:table-cell>
          <table:covered-table-cell table:number-columns-repeated="2" table:style-name="ce53"/>
          <table:table-cell table:style-name="ce53" office:value-type="string" ns42:value-type="string" table:number-columns-spanned="3" table:number-rows-spanned="1">
            <text:p>TO STATE</text:p>
          </table:table-cell>
          <table:covered-table-cell table:number-columns-repeated="2" table:style-name="ce53"/>
          <table:table-cell table:style-name="ce53" office:value-type="string" ns42:value-type="string" table:number-columns-spanned="3" table:number-rows-spanned="1">
            <text:p>EXECUTION ID</text:p>
          </table:table-cell>
          <table:covered-table-cell table:number-columns-repeated="2" table:style-name="ce53"/>
          <table:table-cell table:style-name="ce53" office:value-type="string" ns42:value-type="string" table:number-columns-spanned="3" table:number-rows-spanned="1">
            <text:p>HISTORY RESULT</text:p>
          </table:table-cell>
          <table:covered-table-cell table:number-columns-repeated="2" table:style-name="ce53"/>
        </table:table-row>
        <table:table-row table:style-name="ro5">
          <table:table-cell table:style-name="ce54" office:value-type="string" ns42:value-type="string" table:number-columns-spanned="3" table:number-rows-spanned="1">
            <text:p>TRN-000001</text:p>
          </table:table-cell>
          <table:covered-table-cell table:number-columns-repeated="2" table:style-name="ce54"/>
          <table:table-cell table:style-name="ce54" table:formula="of:=[.A686]" office:value-type="string" office:string-value="INV-000001" ns42:value-type="string" table:number-columns-spanned="3" table:number-rows-spanned="1">
            <text:p>INV-000001</text:p>
          </table:table-cell>
          <table:covered-table-cell table:number-columns-repeated="2" table:style-name="ce54"/>
          <table:table-cell table:style-name="ce54" table:formula="of:=[.E698]" office:value-type="string" office:string-value="PREPARATION NEEDED" ns42:value-type="string" table:number-columns-spanned="3" table:number-rows-spanned="1">
            <text:p>PREPARATION NEEDED</text:p>
          </table:table-cell>
          <table:covered-table-cell table:number-columns-repeated="2" table:style-name="ce54"/>
          <table:table-cell table:style-name="ce54" table:formula="of:=[.H698]" office:value-type="string" office:string-value="READY TO LIST" ns42:value-type="string" table:number-columns-spanned="3" table:number-rows-spanned="1">
            <text:p>READY TO LIST</text:p>
          </table:table-cell>
          <table:covered-table-cell table:number-columns-repeated="2" table:style-name="ce54"/>
          <table:table-cell table:style-name="ce54" table:formula="of:=[.O698]" office:value-type="string" office:string-value="EXEC-000001" ns42:value-type="string" table:number-columns-spanned="3" table:number-rows-spanned="1">
            <text:p>EXEC-000001</text:p>
          </table:table-cell>
          <table:covered-table-cell table:number-columns-repeated="2" table:style-name="ce54"/>
          <table:table-cell table:style-name="ce54" table:formula="of:=IF(UPPER(TRIM([.A698]))=&quot;EXECUTED&quot;;&quot;APPENDED&quot;;&quot;NOT APPENDED&quot;)" office:value-type="string" office:string-value="APPENDED" ns42:value-type="string" table:number-columns-spanned="3" table:number-rows-spanned="1">
            <text:p>APPENDED</text:p>
          </table:table-cell>
          <table:covered-table-cell table:number-columns-repeated="2" table:style-name="ce54"/>
        </table:table-row>
        <table:table-row table:style-name="ro5">
          <table:table-cell table:style-name="ce52" office:value-type="string" ns42:value-type="string" table:number-columns-spanned="18" table:number-rows-spanned="1">
            <text:p>✅ POST-WRITE AUTHORITATIVE STATE VERIFICATION</text:p>
          </table:table-cell>
          <table:covered-table-cell table:number-columns-repeated="17" table:style-name="ce52"/>
        </table:table-row>
        <table:table-row table:style-name="ro5">
          <table:table-cell table:style-name="ce53" office:value-type="string" ns42:value-type="string" table:number-columns-spanned="4" table:number-rows-spanned="1">
            <text:p>EXPECTED STATE</text:p>
          </table:table-cell>
          <table:covered-table-cell table:number-columns-repeated="3" table:style-name="ce53"/>
          <table:table-cell table:style-name="ce53" office:value-type="string" ns42:value-type="string" table:number-columns-spanned="4" table:number-rows-spanned="1">
            <text:p>CURRENT AUTHORITATIVE STATE</text:p>
          </table:table-cell>
          <table:covered-table-cell table:number-columns-repeated="3" table:style-name="ce53"/>
          <table:table-cell table:style-name="ce53" office:value-type="string" ns42:value-type="string" table:number-columns-spanned="3" table:number-rows-spanned="1">
            <text:p>STATE MATCH?</text:p>
          </table:table-cell>
          <table:covered-table-cell table:number-columns-repeated="2" table:style-name="ce53"/>
          <table:table-cell table:style-name="ce53" office:value-type="string" ns42:value-type="string" table:number-columns-spanned="3" table:number-rows-spanned="1">
            <text:p>HISTORY EVENT PRESENT?</text:p>
          </table:table-cell>
          <table:covered-table-cell table:number-columns-repeated="2" table:style-name="ce53"/>
          <table:table-cell table:style-name="ce53" office:value-type="string" ns42:value-type="string" table:number-columns-spanned="4" table:number-rows-spanned="1">
            <text:p>POST-WRITE RESULT</text:p>
          </table:table-cell>
          <table:covered-table-cell table:number-columns-repeated="3" table:style-name="ce53"/>
        </table:table-row>
        <table:table-row table:style-name="ro5">
          <table:table-cell table:style-name="ce54" office:value-type="string" ns42:value-type="string" table:number-columns-spanned="4" table:number-rows-spanned="1">
            <text:p>READY TO LIST</text:p>
          </table:table-cell>
          <table:covered-table-cell table:number-columns-repeated="3" table:style-name="ce54"/>
          <table:table-cell table:style-name="ce54" table:formula="of:=[.H698]" office:value-type="string" office:string-value="READY TO LIST" ns42:value-type="string" table:number-columns-spanned="4" table:number-rows-spanned="1">
            <text:p>READY TO LIST</text:p>
          </table:table-cell>
          <table:covered-table-cell table:number-columns-repeated="3" table:style-name="ce54"/>
          <table:table-cell table:style-name="ce54" table:formula="of:=IF(UPPER(TRIM([.A704]))=UPPER(TRIM([.E704]));&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P701]))=&quot;APPEND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I704]))=&quot;YES&quot;;UPPER(TRIM([.L704]))=&quot;YES&quot;);&quot;VERIFIED&quot;;&quot;FAILED&quot;)" office:value-type="string" office:string-value="VERIFIED" ns42:value-type="string" table:number-columns-spanned="4" table:number-rows-spanned="1">
            <text:p>VERIFIED</text:p>
          </table:table-cell>
          <table:covered-table-cell table:number-columns-repeated="3" table:style-name="ce54"/>
        </table:table-row>
        <table:table-row table:style-name="ro5">
          <table:table-cell table:style-name="ce52" office:value-type="string" ns42:value-type="string" table:number-columns-spanned="18" table:number-rows-spanned="1">
            <text:p>♻️ EXECUTION COMPLETION + IDEMPOTENT REPLAY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EXECUTION STATUS</text:p>
          </table:table-cell>
          <table:covered-table-cell table:number-columns-repeated="3" table:style-name="ce53"/>
          <table:table-cell table:style-name="ce53" office:value-type="string" ns42:value-type="string" table:number-columns-spanned="4" table:number-rows-spanned="1">
            <text:p>REPLAY ATTEMPT RESULT</text:p>
          </table:table-cell>
          <table:covered-table-cell table:number-columns-repeated="3" table:style-name="ce53"/>
          <table:table-cell table:style-name="ce53" office:value-type="string" ns42:value-type="string" table:number-columns-spanned="3" table:number-rows-spanned="1">
            <text:p>SECOND STATE WRITE</text:p>
          </table:table-cell>
          <table:covered-table-cell table:number-columns-repeated="2" table:style-name="ce53"/>
          <table:table-cell table:style-name="ce53" office:value-type="string" ns42:value-type="string" table:number-columns-spanned="3" table:number-rows-spanned="1">
            <text:p>DUPLICATE HISTORY EVENT</text:p>
          </table:table-cell>
          <table:covered-table-cell table:number-columns-repeated="2" table:style-name="ce53"/>
          <table:table-cell table:style-name="ce53" office:value-type="string" ns42:value-type="string" table:number-columns-spanned="4" table:number-rows-spanned="1">
            <text:p>REVIEW RESPONSIBILITY</text:p>
          </table:table-cell>
          <table:covered-table-cell table:number-columns-repeated="3" table:style-name="ce53"/>
        </table:table-row>
        <table:table-row table:style-name="ro21">
          <table:table-cell table:style-name="ce54" table:formula="of:=IF(UPPER(TRIM([.O704]))=&quot;VERIFIED&quot;;&quot;COMPLETED&quot;;&quot;INCOMPLETE&quot;)" office:value-type="string" office:string-value="COMPLETED" ns42:value-type="string" table:number-columns-spanned="4" table:number-rows-spanned="1">
            <text:p>COMPLETED</text:p>
          </table:table-cell>
          <table:covered-table-cell table:number-columns-repeated="3" table:style-name="ce54"/>
          <table:table-cell table:style-name="ce54" table:formula="of:=IF(UPPER(TRIM([.A707]))=&quot;COMPLETED&quot;;&quot;ALREADY EXECUTED&quot;;&quot;RETRY BLOCKED&quot;)" office:value-type="string" office:string-value="ALREADY EXECUTED" ns42:value-type="string" table:number-columns-spanned="4" table:number-rows-spanned="1">
            <text:p>ALREADY EXECUTED</text:p>
          </table:table-cell>
          <table:covered-table-cell table:number-columns-repeated="3" table:style-name="ce54"/>
          <table:table-cell table:style-name="ce54" table:formula="of:=IF(UPPER(TRIM([.E707]))=&quot;ALREADY EXECUTED&quot;;&quot;NO&quot;;&quot;REVIEW&quot;)" office:value-type="string" office:string-value="NO" ns42:value-type="string" table:number-columns-spanned="3" table:number-rows-spanned="1">
            <text:p>NO</text:p>
          </table:table-cell>
          <table:covered-table-cell table:number-columns-repeated="2" table:style-name="ce54"/>
          <table:table-cell table:style-name="ce54" table:formula="of:=IF(UPPER(TRIM([.E707]))=&quot;ALREADY EXECUTED&quot;;&quot;NO&quot;;&quot;REVIEW&quot;)" office:value-type="string" office:string-value="NO" ns42:value-type="string" table:number-columns-spanned="3" table:number-rows-spanned="1">
            <text:p>NO</text:p>
          </table:table-cell>
          <table:covered-table-cell table:number-columns-repeated="2" table:style-name="ce54"/>
          <table:table-cell table:style-name="ce54" table:formula="of:=IF(UPPER(TRIM([.E707]))=&quot;ALREADY EXECUTED&quot;;&quot;REVIEW EXISTING TRANSITION&quot;;&quot;REVIEW EXECUTION&quot;)" office:value-type="string" office:string-value="REVIEW EXISTING TRANSITION" ns42:value-type="string" table:number-columns-spanned="4" table:number-rows-spanned="1">
            <text:p>REVIEW EXISTING TRANSITION</text:p>
          </table:table-cell>
          <table:covered-table-cell table:number-columns-repeated="3" table:style-name="ce54"/>
        </table:table-row>
        <table:table-row table:style-name="ro5">
          <table:table-cell table:style-name="ce52" office:value-type="string" ns42:value-type="string" table:number-columns-spanned="18" table:number-rows-spanned="1">
            <text:p>🚫 FAIL-CLOSED EXECUTION CASES</text:p>
          </table:table-cell>
          <table:covered-table-cell table:number-columns-repeated="17" table:style-name="ce52"/>
        </table:table-row>
        <table:table-row table:style-name="ro5">
          <table:table-cell table:style-name="ce53" office:value-type="string" ns42:value-type="string" table:number-columns-spanned="5" table:number-rows-spanned="1">
            <text:p>FAILURE CONDITION</text:p>
          </table:table-cell>
          <table:covered-table-cell table:number-columns-repeated="4" table:style-name="ce53"/>
          <table:table-cell table:style-name="ce53" office:value-type="string" ns42:value-type="string" table:number-columns-spanned="5" table:number-rows-spanned="1">
            <text:p>EXECUTION RESULT</text:p>
          </table:table-cell>
          <table:covered-table-cell table:number-columns-repeated="4" table:style-name="ce53"/>
          <table:table-cell table:style-name="ce53" office:value-type="string" ns42:value-type="string" table:number-columns-spanned="4" table:number-rows-spanned="1">
            <text:p>STATE WRITE</text:p>
          </table:table-cell>
          <table:covered-table-cell table:number-columns-repeated="3" table:style-name="ce53"/>
          <table:table-cell table:style-name="ce53" office:value-type="string" ns42:value-type="string" table:number-columns-spanned="4" table:number-rows-spanned="1">
            <text:p>HISTORY APPEND</text:p>
          </table:table-cell>
          <table:covered-table-cell table:number-columns-repeated="3" table:style-name="ce53"/>
        </table:table-row>
        <table:table-row table:style-name="ro5">
          <table:table-cell table:style-name="ce54" office:value-type="string" ns42:value-type="string" table:number-columns-spanned="5" table:number-rows-spanned="1">
            <text:p>RECORD NOT FOUN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CURRENT STATE CHANG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AUTHORIZED FROM STATE MISMATCH</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AUTHORIZED TARGET MISMATCH</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MUTATION AUTHORITY NOT GRANT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EXECUTION COMMIT MISSING</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TRANSITION ALREADY EXECUT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DUPLICATE EXECUTION I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POST-WRITE STATE VERIFICATION FAIL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READY TO LIST TRANSITION EXECUTION GATE · BUILD 210</text:p>
          </table:table-cell>
          <table:covered-table-cell table:number-columns-repeated="17" table:style-name="ce52"/>
        </table:table-row>
        <table:table-row table:style-name="ro5">
          <table:table-cell table:style-name="ce54" office:value-type="string" ns42:value-type="string" table:number-columns-spanned="18" table:number-rows-spanned="1">
            <text:p>GRANTED AUTHORITY + EXPLICIT EXECUTE COMMIT + UNIQUE EXECUTION ID + PRE-WRITE STATE MATCH + AUTHORIZED TRANSITION MATCH + REPLAY CLEAR → EXECUTED → AUTHORITATIVE STATE = READY TO LIST → HISTORY APPENDED → POST-WRITE VERIFIED → COMPLETED · REPLAY = NO SECOND WRITE / NO DUPLICATE HISTORY</text:p>
          </table:table-cell>
          <table:covered-table-cell table:number-columns-repeated="17" table:style-name="ce54"/>
        </table:table-row>
        <table:table-row table:style-name="ro5">
          <table:table-cell table:style-name="ce52" office:value-type="string" ns42:value-type="string" table:number-columns-spanned="18" table:number-rows-spanned="1">
            <text:p>🛒 LISTING + PLATFORM PUBLICATION AUTHORITY · BUILDS 211–230</text:p>
          </table:table-cell>
          <table:covered-table-cell table:number-columns-repeated="17" table:style-name="ce52"/>
        </table:table-row>
        <table:table-row table:style-name="ro5">
          <table:table-cell table:style-name="ce53" office:value-type="string" ns42:value-type="string" table:number-columns-spanned="6" table:number-rows-spanned="1">
            <text:p>PUBLICATION QUESTION</text:p>
          </table:table-cell>
          <table:covered-table-cell table:number-columns-repeated="5" table:style-name="ce53"/>
          <table:table-cell table:style-name="ce53" office:value-type="string" ns42:value-type="string" table:number-columns-spanned="6" table:number-rows-spanned="1">
            <text:p>RESPONSIBIL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MAY THIS READY TO LIST RECORD BE AUTHORIZED FOR EBAY PUBLICATION?</text:p>
          </table:table-cell>
          <table:covered-table-cell table:number-columns-repeated="5" table:style-name="ce54"/>
          <table:table-cell table:style-name="ce54" office:value-type="string" ns42:value-type="string" table:number-columns-spanned="6" table:number-rows-spanned="1">
            <text:p>PLATFORM EVIDENCE + EXPLICIT PUBLICATION AUTHORITY</text:p>
          </table:table-cell>
          <table:covered-table-cell table:number-columns-repeated="5" table:style-name="ce54"/>
          <table:table-cell table:style-name="ce54" office:value-type="string" ns42:value-type="string" table:number-columns-spanned="6" table:number-rows-spanned="1">
            <text:p>AUTHORIZATION ONLY · NO MARKETPLACE PUBLICATION</text:p>
          </table:table-cell>
          <table:covered-table-cell table:number-columns-repeated="5" table:style-name="ce54"/>
        </table:table-row>
        <table:table-row table:style-name="ro5">
          <table:table-cell table:style-name="ce52" office:value-type="string" ns42:value-type="string" table:number-columns-spanned="18" table:number-rows-spanned="1">
            <text:p>📋 READY TO LIST INTAKE + LISTING RESPONSIBILITY</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5" table:number-rows-spanned="1">
            <text:p>AUTHORITATIVE INVENTORY STATE</text:p>
          </table:table-cell>
          <table:covered-table-cell table:number-columns-repeated="4" table:style-name="ce53"/>
          <table:table-cell table:style-name="ce53" office:value-type="string" ns42:value-type="string" table:number-columns-spanned="5" table:number-rows-spanned="1">
            <text:p>LISTING RESPONSIBILITY</text:p>
          </table:table-cell>
          <table:covered-table-cell table:number-columns-repeated="4" table:style-name="ce53"/>
          <table:table-cell table:style-name="ce53" office:value-type="string" ns42:value-type="string" table:number-columns-spanned="5" table:number-rows-spanned="1">
            <text:p>PLATFORM TARGET</text:p>
          </table:table-cell>
          <table:covered-table-cell table:number-columns-repeated="4"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5" table:number-rows-spanned="1">
            <text:p>READY TO LIST</text:p>
          </table:table-cell>
          <table:covered-table-cell table:number-columns-repeated="4" table:style-name="ce54"/>
          <table:table-cell table:style-name="ce54" office:value-type="string" ns42:value-type="string" table:number-columns-spanned="5" table:number-rows-spanned="1">
            <text:p>CREATE LISTING</text:p>
          </table:table-cell>
          <table:covered-table-cell table:number-columns-repeated="4" table:style-name="ce54"/>
          <table:table-cell table:style-name="ce54" office:value-type="string" ns42:value-type="string" table:number-columns-spanned="5" table:number-rows-spanned="1">
            <text:p>EBAY</text:p>
          </table:table-cell>
          <table:covered-table-cell table:number-columns-repeated="4" table:style-name="ce54"/>
        </table:table-row>
        <table:table-row table:style-name="ro5">
          <table:table-cell table:style-name="ce52" office:value-type="string" ns42:value-type="string" table:number-columns-spanned="18" table:number-rows-spanned="1">
            <text:p>🧩 PLATFORM EVIDENCE PROFILE MAP</text:p>
          </table:table-cell>
          <table:covered-table-cell table:number-columns-repeated="17" table:style-name="ce52"/>
        </table:table-row>
        <table:table-row table:style-name="ro5">
          <table:table-cell table:style-name="ce53" office:value-type="string" ns42:value-type="string" table:number-columns-spanned="6" table:number-rows-spanned="1">
            <text:p>PLATFORM</text:p>
          </table:table-cell>
          <table:covered-table-cell table:number-columns-repeated="5" table:style-name="ce53"/>
          <table:table-cell table:style-name="ce53" office:value-type="string" ns42:value-type="string" table:number-columns-spanned="6" table:number-rows-spanned="1">
            <text:p>PROFILE RESPONSIBILITY</text:p>
          </table:table-cell>
          <table:covered-table-cell table:number-columns-repeated="5" table:style-name="ce53"/>
          <table:table-cell table:style-name="ce53" office:value-type="string" ns42:value-type="string" table:number-columns-spanned="6" table:number-rows-spanned="1">
            <text:p>SUPPORTED PROFILE</text:p>
          </table:table-cell>
          <table:covered-table-cell table:number-columns-repeated="5" table:style-name="ce53"/>
        </table:table-row>
        <table:table-row table:style-name="ro5">
          <table:table-cell table:style-name="ce54" office:value-type="string" ns42:value-type="string" table:number-columns-spanned="6" table:number-rows-spanned="1">
            <text:p>EBAY</text:p>
          </table:table-cell>
          <table:covered-table-cell table:number-columns-repeated="5" table:style-name="ce54"/>
          <table:table-cell table:style-name="ce54" office:value-type="string" ns42:value-type="string" table:number-columns-spanned="6" table:number-rows-spanned="1">
            <text:p>EBAY LISTING EVIDENCE</text:p>
          </table:table-cell>
          <table:covered-table-cell table:number-columns-repeated="5" table:style-name="ce54"/>
          <table:table-cell table:style-name="ce54" office:value-type="string" ns42:value-type="string" table:number-columns-spanned="6" table:number-rows-spanned="1">
            <text:p>SUPPORTED</text:p>
          </table:table-cell>
          <table:covered-table-cell table:number-columns-repeated="5" table:style-name="ce54"/>
        </table:table-row>
        <table:table-row table:style-name="ro5">
          <table:table-cell table:style-name="ce54" office:value-type="string" ns42:value-type="string" table:number-columns-spanned="6" table:number-rows-spanned="1">
            <text:p>TCGPLAYER</text:p>
          </table:table-cell>
          <table:covered-table-cell table:number-columns-repeated="5" table:style-name="ce54"/>
          <table:table-cell table:style-name="ce54" office:value-type="string" ns42:value-type="string" table:number-columns-spanned="6" table:number-rows-spanned="1">
            <text:p>TCGPLAYER LISTING EVIDENCE</text:p>
          </table:table-cell>
          <table:covered-table-cell table:number-columns-repeated="5" table:style-name="ce54"/>
          <table:table-cell table:style-name="ce54" office:value-type="string" ns42:value-type="string" table:number-columns-spanned="6" table:number-rows-spanned="1">
            <text:p>FUTURE PROFILE</text:p>
          </table:table-cell>
          <table:covered-table-cell table:number-columns-repeated="5" table:style-name="ce54"/>
        </table:table-row>
        <table:table-row table:style-name="ro5">
          <table:table-cell table:style-name="ce52" office:value-type="string" ns42:value-type="string" table:number-columns-spanned="18" table:number-rows-spanned="1">
            <text:p>📦 EBAY LISTING EVIDENCE PROFILE</text:p>
          </table:table-cell>
          <table:covered-table-cell table:number-columns-repeated="17" table:style-name="ce52"/>
        </table:table-row>
        <table:table-row table:style-name="ro5">
          <table:table-cell table:style-name="ce53" office:value-type="string" ns42:value-type="string" table:number-columns-spanned="3" table:number-rows-spanned="1">
            <text:p>TITLE READY</text:p>
          </table:table-cell>
          <table:covered-table-cell table:number-columns-repeated="2" table:style-name="ce53"/>
          <table:table-cell table:style-name="ce53" office:value-type="string" ns42:value-type="string" table:number-columns-spanned="3" table:number-rows-spanned="1">
            <text:p>DESCRIPTION READY</text:p>
          </table:table-cell>
          <table:covered-table-cell table:number-columns-repeated="2" table:style-name="ce53"/>
          <table:table-cell table:style-name="ce53" office:value-type="string" ns42:value-type="string" table:number-columns-spanned="3" table:number-rows-spanned="1">
            <text:p>PRICE READY</text:p>
          </table:table-cell>
          <table:covered-table-cell table:number-columns-repeated="2" table:style-name="ce53"/>
          <table:table-cell table:style-name="ce53" office:value-type="string" ns42:value-type="string" table:number-columns-spanned="3" table:number-rows-spanned="1">
            <text:p>QUANTITY READY</text:p>
          </table:table-cell>
          <table:covered-table-cell table:number-columns-repeated="2" table:style-name="ce53"/>
          <table:table-cell table:style-name="ce53" office:value-type="string" ns42:value-type="string" table:number-columns-spanned="3" table:number-rows-spanned="1">
            <text:p>PHOTOS READY</text:p>
          </table:table-cell>
          <table:covered-table-cell table:number-columns-repeated="2" table:style-name="ce53"/>
          <table:table-cell table:style-name="ce53" office:value-type="string" ns42:value-type="string" table:number-columns-spanned="3" table:number-rows-spanned="1">
            <text:p>SHIPPING READY</text:p>
          </table:table-cell>
          <table:covered-table-cell table:number-columns-repeated="2" table:style-name="ce53"/>
        </table:table-row>
        <table:table-row table:style-name="ro5">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row>
        <table:table-row table:style-name="ro5">
          <table:table-cell table:style-name="ce53" office:value-type="string" ns42:value-type="string" table:number-columns-spanned="5" table:number-rows-spanned="1">
            <text:p>CATEGORY READY</text:p>
          </table:table-cell>
          <table:covered-table-cell table:number-columns-repeated="4" table:style-name="ce53"/>
          <table:table-cell table:style-name="ce53" office:value-type="string" ns42:value-type="string" table:number-columns-spanned="4" table:number-rows-spanned="1">
            <text:p>CONDITION APPLICABLE</text:p>
          </table:table-cell>
          <table:covered-table-cell table:number-columns-repeated="3" table:style-name="ce53"/>
          <table:table-cell table:style-name="ce53" office:value-type="string" ns42:value-type="string" table:number-columns-spanned="4" table:number-rows-spanned="1">
            <text:p>CONDITION EVALUATED</text:p>
          </table:table-cell>
          <table:covered-table-cell table:number-columns-repeated="3" table:style-name="ce53"/>
          <table:table-cell table:style-name="ce53" office:value-type="string" ns42:value-type="string" table:number-columns-spanned="5" table:number-rows-spanned="1">
            <text:p>BLOCKING DATA QUALITY ISSUE</text:p>
          </table:table-cell>
          <table:covered-table-cell table:number-columns-repeated="4" table:style-name="ce53"/>
        </table:table-row>
        <table:table-row table:style-name="ro5">
          <table:table-cell table:style-name="ce54" office:value-type="string" ns42:value-type="string" table:number-columns-spanned="5" table:number-rows-spanned="1">
            <text:p>YES</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 APPLICABLE</text:p>
          </table:table-cell>
          <table:covered-table-cell table:number-columns-repeated="3" table:style-name="ce54"/>
          <table:table-cell table:style-name="ce54" office:value-type="string" ns42:value-type="string" table:number-columns-spanned="5" table:number-rows-spanned="1">
            <text:p>NO</text:p>
          </table:table-cell>
          <table:covered-table-cell table:number-columns-repeated="4" table:style-name="ce54"/>
        </table:table-row>
        <table:table-row table:style-name="ro5">
          <table:table-cell table:style-name="ce52" office:value-type="string" ns42:value-type="string" table:number-columns-spanned="18" table:number-rows-spanned="1">
            <text:p>🔎 APPLICABLE PLATFORM FACTOR EVALUATION</text:p>
          </table:table-cell>
          <table:covered-table-cell table:number-columns-repeated="17" table:style-name="ce52"/>
        </table:table-row>
        <table:table-row table:style-name="ro5">
          <table:table-cell table:style-name="ce53" office:value-type="string" ns42:value-type="string" table:number-columns-spanned="6" table:number-rows-spanned="1">
            <text:p>APPLICABLE FACTORS SUPPORTED?</text:p>
          </table:table-cell>
          <table:covered-table-cell table:number-columns-repeated="5" table:style-name="ce53"/>
          <table:table-cell table:style-name="ce53" office:value-type="string" ns42:value-type="string" table:number-columns-spanned="6" table:number-rows-spanned="1">
            <text:p>FIRST MISSING PLATFORM FACTOR</text:p>
          </table:table-cell>
          <table:covered-table-cell table:number-columns-repeated="5" table:style-name="ce53"/>
          <table:table-cell table:style-name="ce53" office:value-type="string" ns42:value-type="string" table:number-columns-spanned="6" table:number-rows-spanned="1">
            <text:p>PLATFORM READINESS RESULT</text:p>
          </table:table-cell>
          <table:covered-table-cell table:number-columns-repeated="5" table:style-name="ce53"/>
        </table:table-row>
        <table:table-row table:style-name="ro21">
          <table:table-cell table:style-name="ce54" table:formula="of:=IF(AND(UPPER(TRIM([.A733]))=&quot;YES&quot;;UPPER(TRIM([.D733]))=&quot;YES&quot;;UPPER(TRIM([.G733]))=&quot;YES&quot;;UPPER(TRIM([.J733]))=&quot;YES&quot;;UPPER(TRIM([.M733]))=&quot;YES&quot;;UPPER(TRIM([.P733]))=&quot;YES&quot;;UPPER(TRIM([.A735]))=&quot;YES&quot;;OR(UPPER(TRIM([.F735]))=&quot;NO&quot;;UPPER(TRIM([.J735]))=&quot;YES&quot;);UPPER(TRIM([.N735]))=&quot;NO&quot;);&quot;YES&quot;;&quot;NO&quot;)" office:value-type="string" office:string-value="YES" ns42:value-type="string" table:number-columns-spanned="6" table:number-rows-spanned="1">
            <text:p>YES</text:p>
          </table:table-cell>
          <table:covered-table-cell table:number-columns-repeated="5" table:style-name="ce54"/>
          <table:table-cell table:style-name="ce54" table:formula="of:=IF(UPPER(TRIM([.A733]))&lt;&gt;&quot;YES&quot;;&quot;TITLE&quot;;IF(UPPER(TRIM([.D733]))&lt;&gt;&quot;YES&quot;;&quot;DESCRIPTION&quot;;IF(UPPER(TRIM([.G733]))&lt;&gt;&quot;YES&quot;;&quot;PRICE&quot;;IF(UPPER(TRIM([.J733]))&lt;&gt;&quot;YES&quot;;&quot;QUANTITY&quot;;IF(UPPER(TRIM([.M733]))&lt;&gt;&quot;YES&quot;;&quot;PHOTOS&quot;;IF(UPPER(TRIM([.P733]))&lt;&gt;&quot;YES&quot;;&quot;SHIPPING&quot;;IF(UPPER(TRIM([.A735]))&lt;&gt;&quot;YES&quot;;&quot;CATEGORY&quot;;IF(AND(UPPER(TRIM([.F735]))=&quot;YES&quot;;UPPER(TRIM([.J735]))&lt;&gt;&quot;YES&quot;);&quot;CONDITION&quot;;IF(UPPER(TRIM([.N735]))&lt;&gt;&quot;NO&quot;;&quot;DATA QUALITY&quot;;&quot;NONE&quot;)))))))))" office:value-type="string" office:string-value="NONE" ns42:value-type="string" table:number-columns-spanned="6" table:number-rows-spanned="1">
            <text:p>NONE</text:p>
          </table:table-cell>
          <table:covered-table-cell table:number-columns-repeated="5" table:style-name="ce54"/>
          <table:table-cell table:style-name="ce54" table:formula="of:=IF(UPPER(TRIM([.A738]))=&quot;YES&quot;;&quot;READY FOR PUBLICATION&quot;;&quot;NOT READY FOR PUBLICATION&quot;)" office:value-type="string" office:string-value="READY FOR PUBLICATION" ns42:value-type="string" table:number-columns-spanned="6" table:number-rows-spanned="1">
            <text:p>READY FOR PUBLICATION</text:p>
          </table:table-cell>
          <table:covered-table-cell table:number-columns-repeated="5" table:style-name="ce54"/>
        </table:table-row>
        <table:table-row table:style-name="ro5">
          <table:table-cell table:style-name="ce52" office:value-type="string" ns42:value-type="string" table:number-columns-spanned="18" table:number-rows-spanned="1">
            <text:p>📨 EXPLICIT PUBLICATION REQUES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5" table:number-rows-spanned="1">
            <text:p>PUBLICATION REQUEST</text:p>
          </table:table-cell>
          <table:covered-table-cell table:number-columns-repeated="4" table:style-name="ce53"/>
          <table:table-cell table:style-name="ce53" office:value-type="string" ns42:value-type="string" table:number-columns-spanned="3" table:number-rows-spanned="1">
            <text:p>PLATFORM TARGET</text:p>
          </table:table-cell>
          <table:covered-table-cell table:number-columns-repeated="2" table:style-name="ce53"/>
          <table:table-cell table:style-name="ce53" office:value-type="string" ns42:value-type="string" table:number-columns-spanned="3" table:number-rows-spanned="1">
            <text:p>REQUEST STATUS</text:p>
          </table:table-cell>
          <table:covered-table-cell table:number-columns-repeated="2" table:style-name="ce53"/>
          <table:table-cell table:style-name="ce53" office:value-type="string" ns42:value-type="string" table:number-columns-spanned="4" table:number-rows-spanned="1">
            <text:p>REQUESTED BY</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5" table:number-rows-spanned="1">
            <text:p>PUBLISH LISTING</text:p>
          </table:table-cell>
          <table:covered-table-cell table:number-columns-repeated="4" table:style-name="ce54"/>
          <table:table-cell table:style-name="ce54" office:value-type="string" ns42:value-type="string" table:number-columns-spanned="3" table:number-rows-spanned="1">
            <text:p>EBAY</text:p>
          </table:table-cell>
          <table:covered-table-cell table:number-columns-repeated="2" table:style-name="ce54"/>
          <table:table-cell table:style-name="ce54" office:value-type="string" ns42:value-type="string" table:number-columns-spanned="3" table:number-rows-spanned="1">
            <text:p>REQUESTED</text:p>
          </table:table-cell>
          <table:covered-table-cell table:number-columns-repeated="2" table:style-name="ce54"/>
          <table:table-cell table:style-name="ce54" office:value-type="string" ns42:value-type="string" table:number-columns-spanned="4" table:number-rows-spanned="1">
            <text:p>MARK · OPERATOR</text:p>
          </table:table-cell>
          <table:covered-table-cell table:number-columns-repeated="3" table:style-name="ce54"/>
        </table:table-row>
        <table:table-row table:style-name="ro5">
          <table:table-cell table:style-name="ce52" office:value-type="string" ns42:value-type="string" table:number-columns-spanned="18" table:number-rows-spanned="1">
            <text:p>🔐 PUBLICATION AUTHORITY REVALIDATION</text:p>
          </table:table-cell>
          <table:covered-table-cell table:number-columns-repeated="17" table:style-name="ce52"/>
        </table:table-row>
        <table:table-row table:style-name="ro5">
          <table:table-cell table:style-name="ce53" office:value-type="string" ns42:value-type="string" table:number-columns-spanned="3" table:number-rows-spanned="1">
            <text:p>STATE VALID</text:p>
          </table:table-cell>
          <table:covered-table-cell table:number-columns-repeated="2" table:style-name="ce53"/>
          <table:table-cell table:style-name="ce53" office:value-type="string" ns42:value-type="string" table:number-columns-spanned="3" table:number-rows-spanned="1">
            <text:p>PLATFORM VALID</text:p>
          </table:table-cell>
          <table:covered-table-cell table:number-columns-repeated="2" table:style-name="ce53"/>
          <table:table-cell table:style-name="ce53" office:value-type="string" ns42:value-type="string" table:number-columns-spanned="3" table:number-rows-spanned="1">
            <text:p>READINESS VALID</text:p>
          </table:table-cell>
          <table:covered-table-cell table:number-columns-repeated="2" table:style-name="ce53"/>
          <table:table-cell table:style-name="ce53" office:value-type="string" ns42:value-type="string" table:number-columns-spanned="3" table:number-rows-spanned="1">
            <text:p>ACTOR AUTHORIZED</text:p>
          </table:table-cell>
          <table:covered-table-cell table:number-columns-repeated="2" table:style-name="ce53"/>
          <table:table-cell table:style-name="ce53" office:value-type="string" ns42:value-type="string" table:number-columns-spanned="3" table:number-rows-spanned="1">
            <text:p>REQUEST VALID</text:p>
          </table:table-cell>
          <table:covered-table-cell table:number-columns-repeated="2" table:style-name="ce53"/>
          <table:table-cell table:style-name="ce53" office:value-type="string" ns42:value-type="string" table:number-columns-spanned="3" table:number-rows-spanned="1">
            <text:p>AUTHORITY RESULT</text:p>
          </table:table-cell>
          <table:covered-table-cell table:number-columns-repeated="2" table:style-name="ce53"/>
        </table:table-row>
        <table:table-row table:style-name="ro21">
          <table:table-cell table:style-name="ce54" table:formula="of:=IF(UPPER(TRIM([.D726]))=&quot;READY TO LIST&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N726]))=&quot;EBAY&quot;;UPPER(TRIM([.I741]))=&quot;EBAY&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M738]))=&quot;READY FOR PUBLICATION&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O741]))=&quot;MARK · OPERATOR&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D741]))=&quot;PUBLISH LISTING&quot;;UPPER(TRIM([.L741]))=&quot;REQUES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A744]))=&quot;YES&quot;;UPPER(TRIM([.D744]))=&quot;YES&quot;;UPPER(TRIM([.G744]))=&quot;YES&quot;;UPPER(TRIM([.J744]))=&quot;YES&quot;;UPPER(TRIM([.M744]))=&quot;YES&quot;);&quot;GRANTED&quot;;&quot;DENIED&quot;)" office:value-type="string" office:string-value="GRANTED" ns42:value-type="string" table:number-columns-spanned="3" table:number-rows-spanned="1">
            <text:p>GRANTED</text:p>
          </table:table-cell>
          <table:covered-table-cell table:number-columns-repeated="2" table:style-name="ce54"/>
        </table:table-row>
        <table:table-row table:style-name="ro5">
          <table:table-cell table:style-name="ce52" office:value-type="string" ns42:value-type="string" table:number-columns-spanned="18" table:number-rows-spanned="1">
            <text:p>🛡️ PUBLICATION BOUNDARY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READY TO LIST</text:p>
          </table:table-cell>
          <table:covered-table-cell table:number-columns-repeated="3" table:style-name="ce53"/>
          <table:table-cell table:style-name="ce53" office:value-type="string" ns42:value-type="string" table:number-columns-spanned="4" table:number-rows-spanned="1">
            <text:p>PLATFORM SELECTED</text:p>
          </table:table-cell>
          <table:covered-table-cell table:number-columns-repeated="3" table:style-name="ce53"/>
          <table:table-cell table:style-name="ce53" office:value-type="string" ns42:value-type="string" table:number-columns-spanned="4" table:number-rows-spanned="1">
            <text:p>READY FOR PUBLICATION</text:p>
          </table:table-cell>
          <table:covered-table-cell table:number-columns-repeated="3" table:style-name="ce53"/>
          <table:table-cell table:style-name="ce53" office:value-type="string" ns42:value-type="string" table:number-columns-spanned="3" table:number-rows-spanned="1">
            <text:p>PUBLICATION AUTHORITY</text:p>
          </table:table-cell>
          <table:covered-table-cell table:number-columns-repeated="2" table:style-name="ce53"/>
          <table:table-cell table:style-name="ce53" office:value-type="string" ns42:value-type="string" table:number-columns-spanned="3" table:number-rows-spanned="1">
            <text:p>ACTUAL PUBLICATION PERFORMED?</text:p>
          </table:table-cell>
          <table:covered-table-cell table:number-columns-repeated="2" table:style-name="ce53"/>
        </table:table-row>
        <table:table-row table:style-name="ro5">
          <table:table-cell table:style-name="ce54" office:value-type="string" ns42:value-type="string" table:number-columns-spanned="4" table:number-rows-spanned="1">
            <text:p>INVENTORY STATE</text:p>
          </table:table-cell>
          <table:covered-table-cell table:number-columns-repeated="3" table:style-name="ce54"/>
          <table:table-cell table:style-name="ce54" office:value-type="string" ns42:value-type="string" table:number-columns-spanned="4" table:number-rows-spanned="1">
            <text:p>TARGET ONLY</text:p>
          </table:table-cell>
          <table:covered-table-cell table:number-columns-repeated="3" table:style-name="ce54"/>
          <table:table-cell table:style-name="ce54" office:value-type="string" ns42:value-type="string" table:number-columns-spanned="4" table:number-rows-spanned="1">
            <text:p>READ-ONLY RESULT</text:p>
          </table:table-cell>
          <table:covered-table-cell table:number-columns-repeated="3" table:style-name="ce54"/>
          <table:table-cell table:style-name="ce54" table:formula="of:=[.P744]" office:value-type="string" office:string-value="GRANTED" ns42:value-type="string" table:number-columns-spanned="3" table:number-rows-spanned="1">
            <text:p>GRANTED</text:p>
          </table:table-cell>
          <table:covered-table-cell table:number-columns-repeated="2" table:style-name="ce54"/>
          <table:table-cell table:style-name="ce54" table:formula="of:=&quot;NO&quot;" office:value-type="string" office:string-value="NO" ns42:value-type="string" table:number-columns-spanned="3" table:number-rows-spanned="1">
            <text:p>NO</text:p>
          </table:table-cell>
          <table:covered-table-cell table:number-columns-repeated="2" table:style-name="ce54"/>
        </table:table-row>
        <table:table-row table:style-name="ro5">
          <table:table-cell table:style-name="ce52" office:value-type="string" ns42:value-type="string" table:number-columns-spanned="18" table:number-rows-spanned="1">
            <text:p>🚫 FAIL-CLOSED PUBLICATION AUTHORITY CASES</text:p>
          </table:table-cell>
          <table:covered-table-cell table:number-columns-repeated="17" table:style-name="ce52"/>
        </table:table-row>
        <table:table-row table:style-name="ro5">
          <table:table-cell table:style-name="ce53" office:value-type="string" ns42:value-type="string" table:number-columns-spanned="6" table:number-rows-spanned="1">
            <text:p>FAILURE CONDITION</text:p>
          </table:table-cell>
          <table:covered-table-cell table:number-columns-repeated="5" table:style-name="ce53"/>
          <table:table-cell table:style-name="ce53" office:value-type="string" ns42:value-type="string" table:number-columns-spanned="6" table:number-rows-spanned="1">
            <text:p>PUBLICATION AUTHORITY</text:p>
          </table:table-cell>
          <table:covered-table-cell table:number-columns-repeated="5" table:style-name="ce53"/>
          <table:table-cell table:style-name="ce53" office:value-type="string" ns42:value-type="string" table:number-columns-spanned="6" table:number-rows-spanned="1">
            <text:p>PUBLICATION PERFORMED</text:p>
          </table:table-cell>
          <table:covered-table-cell table:number-columns-repeated="5" table:style-name="ce53"/>
        </table:table-row>
        <table:table-row table:style-name="ro5">
          <table:table-cell table:style-name="ce54" office:value-type="string" ns42:value-type="string" table:number-columns-spanned="6" table:number-rows-spanned="1">
            <text:p>INVENTORY STATE NOT READY TO LIST</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LATFORM NOT SUPPORT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MISSING PLATFORM EVIDENC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BLOCKING DATA QUALITY ISSU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UBLICATION READINESS FAIL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UBLICATION REQUEST MISSING</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UNAUTHORIZED ACTOR</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LATFORM TARGET CHANG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STALE PUBLICATION READINESS</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2" office:value-type="string" ns42:value-type="string" table:number-columns-spanned="18" table:number-rows-spanned="1">
            <text:p>🏁 CONTROLLED EBAY PUBLICATION AUTHORITY GATE · BUILD 230</text:p>
          </table:table-cell>
          <table:covered-table-cell table:number-columns-repeated="17" table:style-name="ce52"/>
        </table:table-row>
        <table:table-row table:style-name="ro5">
          <table:table-cell table:style-name="ce54" office:value-type="string" ns42:value-type="string" table:number-columns-spanned="18" table:number-rows-spanned="1">
            <text:p>READY TO LIST ≠ LISTED · PLATFORM SELECTED ≠ PUBLICATION · READY FOR PUBLICATION ≠ PUBLICATION AUTHORITY · AUTHORITY GRANTED ≠ ACTUAL PUBLICATION · NO CONNECTOR CALL / NO MARKETPLACE WRITE BY THIS GATE</text:p>
          </table:table-cell>
          <table:covered-table-cell table:number-columns-repeated="17" table:style-name="ce54"/>
        </table:table-row>
        <table:table-row table:style-name="ro5">
          <table:table-cell table:style-name="ce52" office:value-type="string" ns42:value-type="string" table:number-columns-spanned="18" table:number-rows-spanned="1">
            <text:p>🌐 EXTERNAL PUBLICATION RESULT EVIDENCE · BUILDS 231–250</text:p>
          </table:table-cell>
          <table:covered-table-cell table:number-columns-repeated="17" table:style-name="ce52"/>
        </table:table-row>
        <table:table-row table:style-name="ro5">
          <table:table-cell table:style-name="ce53" office:value-type="string" ns42:value-type="string" table:number-columns-spanned="6" table:number-rows-spanned="1">
            <text:p>EVIDENCE QUESTION</text:p>
          </table:table-cell>
          <table:covered-table-cell table:number-columns-repeated="5" table:style-name="ce53"/>
          <table:table-cell table:style-name="ce53" office:value-type="string" ns42:value-type="string" table:number-columns-spanned="6" table:number-rows-spanned="1">
            <text:p>RESPONSIBIL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HAS MARKETPLACE PUBLICATION BEEN PROVEN BY VALID EXTERNAL EVIDENCE?</text:p>
          </table:table-cell>
          <table:covered-table-cell table:number-columns-repeated="5" table:style-name="ce54"/>
          <table:table-cell table:style-name="ce54" office:value-type="string" ns42:value-type="string" table:number-columns-spanned="6" table:number-rows-spanned="1">
            <text:p>VALIDATE EXTERNAL RESULT + IDENTITY CHAIN</text:p>
          </table:table-cell>
          <table:covered-table-cell table:number-columns-repeated="5" table:style-name="ce54"/>
          <table:table-cell table:style-name="ce54" office:value-type="string" ns42:value-type="string" table:number-columns-spanned="6" table:number-rows-spanned="1">
            <text:p>NO FABRICATED CONNECTOR CALL OR MARKETPLACE RESULT</text:p>
          </table:table-cell>
          <table:covered-table-cell table:number-columns-repeated="5" table:style-name="ce54"/>
        </table:table-row>
        <table:table-row table:style-name="ro5">
          <table:table-cell table:style-name="ce52" office:value-type="string" ns42:value-type="string" table:number-columns-spanned="18" table:number-rows-spanned="1">
            <text:p>🚀 PUBLICATION EXECUTION COMMIT + ATTEMPT ID</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PLATFORM</text:p>
          </table:table-cell>
          <table:covered-table-cell table:number-columns-repeated="2" table:style-name="ce53"/>
          <table:table-cell table:style-name="ce53" office:value-type="string" ns42:value-type="string" table:number-columns-spanned="4" table:number-rows-spanned="1">
            <text:p>PUBLICATION AUTHORITY</text:p>
          </table:table-cell>
          <table:covered-table-cell table:number-columns-repeated="3" table:style-name="ce53"/>
          <table:table-cell table:style-name="ce53" office:value-type="string" ns42:value-type="string" table:number-columns-spanned="4" table:number-rows-spanned="1">
            <text:p>EXECUTION COMMIT</text:p>
          </table:table-cell>
          <table:covered-table-cell table:number-columns-repeated="3" table:style-name="ce53"/>
          <table:table-cell table:style-name="ce53" office:value-type="string" ns42:value-type="string" table:number-columns-spanned="4" table:number-rows-spanned="1">
            <text:p>PUBLICATION ATTEMPT ID</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EBAY</text:p>
          </table:table-cell>
          <table:covered-table-cell table:number-columns-repeated="2" table:style-name="ce54"/>
          <table:table-cell table:style-name="ce54" office:value-type="string" ns42:value-type="string" table:number-columns-spanned="4" table:number-rows-spanned="1">
            <text:p>GRANTED</text:p>
          </table:table-cell>
          <table:covered-table-cell table:number-columns-repeated="3" table:style-name="ce54"/>
          <table:table-cell table:style-name="ce54" office:value-type="string" ns42:value-type="string" table:number-columns-spanned="4" table:number-rows-spanned="1">
            <text:p>EXECUTE PUBLICATION</text:p>
          </table:table-cell>
          <table:covered-table-cell table:number-columns-repeated="3" table:style-name="ce54"/>
          <table:table-cell table:style-name="ce54" office:value-type="string" ns42:value-type="string" table:number-columns-spanned="4" table:number-rows-spanned="1">
            <text:p>PUB-000001</text:p>
          </table:table-cell>
          <table:covered-table-cell table:number-columns-repeated="3" table:style-name="ce54"/>
        </table:table-row>
        <table:table-row table:style-name="ro5">
          <table:table-cell table:style-name="ce52" office:value-type="string" ns42:value-type="string" table:number-columns-spanned="18" table:number-rows-spanned="1">
            <text:p>🔌 FUTURE CONNECTOR RESPONSIBILITY BOUNDARY</text:p>
          </table:table-cell>
          <table:covered-table-cell table:number-columns-repeated="17" table:style-name="ce52"/>
        </table:table-row>
        <table:table-row table:style-name="ro5">
          <table:table-cell table:style-name="ce53" office:value-type="string" ns42:value-type="string" table:number-columns-spanned="6" table:number-rows-spanned="1">
            <text:p>CONNECTOR RESPONSIBILITY</text:p>
          </table:table-cell>
          <table:covered-table-cell table:number-columns-repeated="5" table:style-name="ce53"/>
          <table:table-cell table:style-name="ce53" office:value-type="string" ns42:value-type="string" table:number-columns-spanned="6" table:number-rows-spanned="1">
            <text:p>CONNECTOR CALL PERFORMED</text:p>
          </table:table-cell>
          <table:covered-table-cell table:number-columns-repeated="5" table:style-name="ce53"/>
          <table:table-cell table:style-name="ce53" office:value-type="string" ns42:value-type="string" table:number-columns-spanned="6" table:number-rows-spanned="1">
            <text:p>MARKETPLACE WRITE CLAIMED</text:p>
          </table:table-cell>
          <table:covered-table-cell table:number-columns-repeated="5" table:style-name="ce53"/>
        </table:table-row>
        <table:table-row table:style-name="ro5">
          <table:table-cell table:style-name="ce54" office:value-type="string" ns42:value-type="string" table:number-columns-spanned="6" table:number-rows-spanned="1">
            <text:p>FUTURE CONNECTOR</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2" office:value-type="string" ns42:value-type="string" table:number-columns-spanned="18" table:number-rows-spanned="1">
            <text:p>📥 EXTERNAL PUBLICATION RESULT INTAKE</text:p>
          </table:table-cell>
          <table:covered-table-cell table:number-columns-repeated="17" table:style-name="ce52"/>
        </table:table-row>
        <table:table-row table:style-name="ro5">
          <table:table-cell table:style-name="ce53" office:value-type="string" ns42:value-type="string" table:number-columns-spanned="3" table:number-rows-spanned="1">
            <text:p>ATTEMPT ID</text:p>
          </table:table-cell>
          <table:covered-table-cell table:number-columns-repeated="2" table:style-name="ce53"/>
          <table:table-cell table:style-name="ce53" office:value-type="string" ns42:value-type="string" table:number-columns-spanned="3" table:number-rows-spanned="1">
            <text:p>PLATFORM</text:p>
          </table:table-cell>
          <table:covered-table-cell table:number-columns-repeated="2" table:style-name="ce53"/>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EXTERNAL RESULT RECEIVED?</text:p>
          </table:table-cell>
          <table:covered-table-cell table:number-columns-repeated="2" table:style-name="ce53"/>
          <table:table-cell table:style-name="ce53" office:value-type="string" ns42:value-type="string" table:number-columns-spanned="3" table:number-rows-spanned="1">
            <text:p>EXTERNAL RESULT STATUS</text:p>
          </table:table-cell>
          <table:covered-table-cell table:number-columns-repeated="2" table:style-name="ce53"/>
          <table:table-cell table:style-name="ce53" office:value-type="string" ns42:value-type="string" table:number-columns-spanned="3" table:number-rows-spanned="1">
            <text:p>MARKETPLACE LISTING ID</text:p>
          </table:table-cell>
          <table:covered-table-cell table:number-columns-repeated="2" table:style-name="ce53"/>
        </table:table-row>
        <table:table-row table:style-name="ro5">
          <table:table-cell table:style-name="ce54" office:value-type="string" ns42:value-type="string" table:number-columns-spanned="3" table:number-rows-spanned="1">
            <text:p>PUB-000001</text:p>
          </table:table-cell>
          <table:covered-table-cell table:number-columns-repeated="2" table:style-name="ce54"/>
          <table:table-cell table:style-name="ce54" office:value-type="string" ns42:value-type="string" table:number-columns-spanned="3" table:number-rows-spanned="1">
            <text:p>EBAY</text:p>
          </table:table-cell>
          <table:covered-table-cell table:number-columns-repeated="2" table:style-name="ce54"/>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 RESULT</text:p>
          </table:table-cell>
          <table:covered-table-cell table:number-columns-repeated="2" table:style-name="ce54"/>
          <table:table-cell table:style-name="ce54" office:value-type="string" ns42:value-type="string" table:number-columns-spanned="3" table:number-rows-spanned="1">
            <text:p>NONE</text:p>
          </table:table-cell>
          <table:covered-table-cell table:number-columns-repeated="2" table:style-name="ce54"/>
        </table:table-row>
        <table:table-row table:style-name="ro5">
          <table:table-cell table:style-name="ce53" office:value-type="string" ns42:value-type="string" table:number-columns-spanned="9" table:number-rows-spanned="1">
            <text:p>EXTERNAL RESULT REFERENCE</text:p>
          </table:table-cell>
          <table:covered-table-cell table:number-columns-repeated="8" table:style-name="ce53"/>
          <table:table-cell table:style-name="ce53" office:value-type="string" ns42:value-type="string" table:number-columns-spanned="9" table:number-rows-spanned="1">
            <text:p>RESULT RECEIVED AT</text:p>
          </table:table-cell>
          <table:covered-table-cell table:number-columns-repeated="8" table:style-name="ce53"/>
        </table:table-row>
        <table:table-row table:style-name="ro5">
          <table:table-cell table:style-name="ce54" office:value-type="string" ns42:value-type="string" table:number-columns-spanned="9" table:number-rows-spanned="1">
            <text:p>NONE</text:p>
          </table:table-cell>
          <table:covered-table-cell table:number-columns-repeated="8" table:style-name="ce54"/>
          <table:table-cell table:style-name="ce54" office:value-type="string" ns42:value-type="string" table:number-columns-spanned="9" table:number-rows-spanned="1">
            <text:p>NONE</text:p>
          </table:table-cell>
          <table:covered-table-cell table:number-columns-repeated="8" table:style-name="ce54"/>
        </table:table-row>
        <table:table-row table:style-name="ro5">
          <table:table-cell table:style-name="ce52" office:value-type="string" ns42:value-type="string" table:number-columns-spanned="18" table:number-rows-spanned="1">
            <text:p>🔎 EXTERNAL RESULT + IDENTITY VALIDATION</text:p>
          </table:table-cell>
          <table:covered-table-cell table:number-columns-repeated="17" table:style-name="ce52"/>
        </table:table-row>
        <table:table-row table:style-name="ro5">
          <table:table-cell table:style-name="ce53" office:value-type="string" ns42:value-type="string" table:number-columns-spanned="3" table:number-rows-spanned="1">
            <text:p>AUTHORITY VALID</text:p>
          </table:table-cell>
          <table:covered-table-cell table:number-columns-repeated="2" table:style-name="ce53"/>
          <table:table-cell table:style-name="ce53" office:value-type="string" ns42:value-type="string" table:number-columns-spanned="3" table:number-rows-spanned="1">
            <text:p>COMMIT VALID</text:p>
          </table:table-cell>
          <table:covered-table-cell table:number-columns-repeated="2" table:style-name="ce53"/>
          <table:table-cell table:style-name="ce53" office:value-type="string" ns42:value-type="string" table:number-columns-spanned="3" table:number-rows-spanned="1">
            <text:p>ATTEMPT MATCH</text:p>
          </table:table-cell>
          <table:covered-table-cell table:number-columns-repeated="2" table:style-name="ce53"/>
          <table:table-cell table:style-name="ce53" office:value-type="string" ns42:value-type="string" table:number-columns-spanned="3" table:number-rows-spanned="1">
            <text:p>PLATFORM MATCH</text:p>
          </table:table-cell>
          <table:covered-table-cell table:number-columns-repeated="2" table:style-name="ce53"/>
          <table:table-cell table:style-name="ce53" office:value-type="string" ns42:value-type="string" table:number-columns-spanned="3" table:number-rows-spanned="1">
            <text:p>RECORD MATCH</text:p>
          </table:table-cell>
          <table:covered-table-cell table:number-columns-repeated="2" table:style-name="ce53"/>
          <table:table-cell table:style-name="ce53" office:value-type="string" ns42:value-type="string" table:number-columns-spanned="3" table:number-rows-spanned="1">
            <text:p>RESULT RECEIVED VALID</text:p>
          </table:table-cell>
          <table:covered-table-cell table:number-columns-repeated="2" table:style-name="ce53"/>
        </table:table-row>
        <table:table-row table:style-name="ro21">
          <table:table-cell table:style-name="ce54" table:formula="of:=IF(UPPER(TRIM([.G766]))=&quot;GRAN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K766]))=&quot;EXECUTE PUBLICATION&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A772]))=UPPER(TRIM([.O766]));&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D772]))=UPPER(TRIM([.D766]));&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G772]))=UPPER(TRIM([.A766]));&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J772]))=&quot;YES&quot;;&quot;YES&quot;;&quot;NO&quot;)" office:value-type="string" office:string-value="NO" ns42:value-type="string" table:number-columns-spanned="3" table:number-rows-spanned="1">
            <text:p>NO</text:p>
          </table:table-cell>
          <table:covered-table-cell table:number-columns-repeated="2" table:style-name="ce54"/>
        </table:table-row>
        <table:table-row table:style-name="ro5">
          <table:table-cell table:style-name="ce52" office:value-type="string" ns42:value-type="string" table:number-columns-spanned="18" table:number-rows-spanned="1">
            <text:p>🧭 PUBLICATION RESULT CLASSIFICATION</text:p>
          </table:table-cell>
          <table:covered-table-cell table:number-columns-repeated="17" table:style-name="ce52"/>
        </table:table-row>
        <table:table-row table:style-name="ro5">
          <table:table-cell table:style-name="ce53" office:value-type="string" ns42:value-type="string" table:number-columns-spanned="6" table:number-rows-spanned="1">
            <text:p>RAW EXTERNAL STATUS</text:p>
          </table:table-cell>
          <table:covered-table-cell table:number-columns-repeated="5" table:style-name="ce53"/>
          <table:table-cell table:style-name="ce53" office:value-type="string" ns42:value-type="string" table:number-columns-spanned="6" table:number-rows-spanned="1">
            <text:p>CLASSIFIED RESULT</text:p>
          </table:table-cell>
          <table:covered-table-cell table:number-columns-repeated="5" table:style-name="ce53"/>
          <table:table-cell table:style-name="ce53" office:value-type="string" ns42:value-type="string" table:number-columns-spanned="6" table:number-rows-spanned="1">
            <text:p>RESULT GUIDANCE</text:p>
          </table:table-cell>
          <table:covered-table-cell table:number-columns-repeated="5" table:style-name="ce53"/>
        </table:table-row>
        <table:table-row table:style-name="ro21">
          <table:table-cell table:style-name="ce54" table:formula="of:=[.M772]" office:value-type="string" office:string-value="NO RESULT" ns42:value-type="string" table:number-columns-spanned="6" table:number-rows-spanned="1">
            <text:p>NO RESULT</text:p>
          </table:table-cell>
          <table:covered-table-cell table:number-columns-repeated="5" table:style-name="ce54"/>
          <table:table-cell table:style-name="ce54" table:formula="of:=IF(UPPER(TRIM([.A780]))=&quot;NO RESULT&quot;;&quot;NO RESULT&quot;;IF(UPPER(TRIM([.A780]))=&quot;PENDING&quot;;&quot;PENDING&quot;;IF(UPPER(TRIM([.A780]))=&quot;SUCCESS&quot;;&quot;SUCCESS&quot;;IF(UPPER(TRIM([.A780]))=&quot;FAILED&quot;;&quot;FAILED&quot;;IF(UPPER(TRIM([.A780]))=&quot;REJECTED&quot;;&quot;REJECTED&quot;;&quot;UNKNOWN RESULT&quot;)))))" office:value-type="string" office:string-value="NO RESULT" ns42:value-type="string" table:number-columns-spanned="6" table:number-rows-spanned="1">
            <text:p>NO RESULT</text:p>
          </table:table-cell>
          <table:covered-table-cell table:number-columns-repeated="5" table:style-name="ce54"/>
          <table:table-cell table:style-name="ce54" table:formula="of:=IF(UPPER(TRIM([.G780]))=&quot;NO RESULT&quot;;&quot;AWAIT PUBLICATION RESULT&quot;;IF(UPPER(TRIM([.G780]))=&quot;PENDING&quot;;&quot;AWAIT MARKETPLACE RESULT&quot;;IF(UPPER(TRIM([.G780]))=&quot;FAILED&quot;;&quot;PUBLICATION FAILED&quot;;IF(UPPER(TRIM([.G780]))=&quot;REJECTED&quot;;&quot;PUBLICATION REJECTED&quot;;IF(UPPER(TRIM([.G780]))=&quot;SUCCESS&quot;;&quot;VALIDATE SUCCESS EVIDENCE&quot;;&quot;REVIEW REQUIRED&quot;)))))" office:value-type="string" office:string-value="AWAIT PUBLICATION RESULT" ns42:value-type="string" table:number-columns-spanned="6" table:number-rows-spanned="1">
            <text:p>AWAIT PUBLICATION RESULT</text:p>
          </table:table-cell>
          <table:covered-table-cell table:number-columns-repeated="5" table:style-name="ce54"/>
        </table:table-row>
        <table:table-row table:style-name="ro5">
          <table:table-cell table:style-name="ce52" office:value-type="string" ns42:value-type="string" table:number-columns-spanned="18" table:number-rows-spanned="1">
            <text:p>🪪 MARKETPLACE LISTING IDENTITY + SUCCESS COMPLETENESS</text:p>
          </table:table-cell>
          <table:covered-table-cell table:number-columns-repeated="17" table:style-name="ce52"/>
        </table:table-row>
        <table:table-row table:style-name="ro5">
          <table:table-cell table:style-name="ce53" office:value-type="string" ns42:value-type="string" table:number-columns-spanned="5" table:number-rows-spanned="1">
            <text:p>LISTING ID PRESENT</text:p>
          </table:table-cell>
          <table:covered-table-cell table:number-columns-repeated="4" table:style-name="ce53"/>
          <table:table-cell table:style-name="ce53" office:value-type="string" ns42:value-type="string" table:number-columns-spanned="5" table:number-rows-spanned="1">
            <text:p>RESULT REFERENCE PRESENT</text:p>
          </table:table-cell>
          <table:covered-table-cell table:number-columns-repeated="4" table:style-name="ce53"/>
          <table:table-cell table:style-name="ce53" office:value-type="string" ns42:value-type="string" table:number-columns-spanned="4" table:number-rows-spanned="1">
            <text:p>RESULT TIME PRESENT</text:p>
          </table:table-cell>
          <table:covered-table-cell table:number-columns-repeated="3" table:style-name="ce53"/>
          <table:table-cell table:style-name="ce53" office:value-type="string" ns42:value-type="string" table:number-columns-spanned="4" table:number-rows-spanned="1">
            <text:p>SUCCESS EVIDENCE COMPLETE</text:p>
          </table:table-cell>
          <table:covered-table-cell table:number-columns-repeated="3" table:style-name="ce53"/>
        </table:table-row>
        <table:table-row table:style-name="ro21">
          <table:table-cell table:style-name="ce54" table:formula="of:=IF(UPPER(TRIM([.P772]))&lt;&gt;&quot;NONE&quot;;&quot;YES&quot;;&quot;NO&quot;)" office:value-type="string" office:string-value="NO" ns42:value-type="string" table:number-columns-spanned="5" table:number-rows-spanned="1">
            <text:p>NO</text:p>
          </table:table-cell>
          <table:covered-table-cell table:number-columns-repeated="4" table:style-name="ce54"/>
          <table:table-cell table:style-name="ce54" table:formula="of:=IF(UPPER(TRIM([.A774]))&lt;&gt;&quot;NONE&quot;;&quot;YES&quot;;&quot;NO&quot;)" office:value-type="string" office:string-value="NO" ns42:value-type="string" table:number-columns-spanned="5" table:number-rows-spanned="1">
            <text:p>NO</text:p>
          </table:table-cell>
          <table:covered-table-cell table:number-columns-repeated="4" table:style-name="ce54"/>
          <table:table-cell table:style-name="ce54" table:formula="of:=IF(UPPER(TRIM([.J774]))&lt;&gt;&quot;NONE&quot;;&quot;YES&quot;;&quot;NO&quot;)" office:value-type="string" office:string-value="NO" ns42:value-type="string" table:number-columns-spanned="4" table:number-rows-spanned="1">
            <text:p>NO</text:p>
          </table:table-cell>
          <table:covered-table-cell table:number-columns-repeated="3" table:style-name="ce54"/>
          <table:table-cell table:style-name="ce54" table:formula="of:=IF(AND(UPPER(TRIM([.A783]))=&quot;YES&quot;;UPPER(TRIM([.F783]))=&quot;YES&quot;;UPPER(TRIM([.K783]))=&quot;YES&quot;);&quot;YES&quot;;&quot;NO&quot;)" office:value-type="string" office:string-value="NO"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VERIFIED PUBLICATION RESULT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CLASSIFIED RESULT</text:p>
          </table:table-cell>
          <table:covered-table-cell table:number-columns-repeated="3" table:style-name="ce53"/>
          <table:table-cell table:style-name="ce53" office:value-type="string" ns42:value-type="string" table:number-columns-spanned="4" table:number-rows-spanned="1">
            <text:p>IDENTITY CHAIN VALID</text:p>
          </table:table-cell>
          <table:covered-table-cell table:number-columns-repeated="3" table:style-name="ce53"/>
          <table:table-cell table:style-name="ce53" office:value-type="string" ns42:value-type="string" table:number-columns-spanned="4" table:number-rows-spanned="1">
            <text:p>SUCCESS EVIDENCE COMPLETE</text:p>
          </table:table-cell>
          <table:covered-table-cell table:number-columns-repeated="3" table:style-name="ce53"/>
          <table:table-cell table:style-name="ce53" office:value-type="string" ns42:value-type="string" table:number-columns-spanned="3" table:number-rows-spanned="1">
            <text:p>VERIFIED PUBLICATION</text:p>
          </table:table-cell>
          <table:covered-table-cell table:number-columns-repeated="2" table:style-name="ce53"/>
          <table:table-cell table:style-name="ce53" office:value-type="string" ns42:value-type="string" table:number-columns-spanned="3" table:number-rows-spanned="1">
            <text:p>VERIFICATION RESULT</text:p>
          </table:table-cell>
          <table:covered-table-cell table:number-columns-repeated="2" table:style-name="ce53"/>
        </table:table-row>
        <table:table-row table:style-name="ro21">
          <table:table-cell table:style-name="ce54" table:formula="of:=[.G780]" office:value-type="string" office:string-value="NO RESULT" ns42:value-type="string" table:number-columns-spanned="4" table:number-rows-spanned="1">
            <text:p>NO RESULT</text:p>
          </table:table-cell>
          <table:covered-table-cell table:number-columns-repeated="3" table:style-name="ce54"/>
          <table:table-cell table:style-name="ce54" table:formula="of:=IF(AND(UPPER(TRIM([.G777]))=&quot;YES&quot;;UPPER(TRIM([.J777]))=&quot;YES&quot;;UPPER(TRIM([.M777]))=&quot;YES&quot;;UPPER(TRIM([.P777]))=&quot;YES&quot;);&quot;YES&quot;;&quot;NO&quot;)" office:value-type="string" office:string-value="NO" ns42:value-type="string" table:number-columns-spanned="4" table:number-rows-spanned="1">
            <text:p>NO</text:p>
          </table:table-cell>
          <table:covered-table-cell table:number-columns-repeated="3" table:style-name="ce54"/>
          <table:table-cell table:style-name="ce54" table:formula="of:=[.O783]" office:value-type="string" office:string-value="NO" ns42:value-type="string" table:number-columns-spanned="4" table:number-rows-spanned="1">
            <text:p>NO</text:p>
          </table:table-cell>
          <table:covered-table-cell table:number-columns-repeated="3" table:style-name="ce54"/>
          <table:table-cell table:style-name="ce54" table:formula="of:=IF(AND(UPPER(TRIM([.A786]))=&quot;SUCCESS&quot;;UPPER(TRIM([.E786]))=&quot;YES&quot;;UPPER(TRIM([.I786]))=&quot;YES&quot;;UPPER(TRIM([.P777]))=&quot;YES&quot;);&quot;YES&quot;;&quot;NO&quot;)" office:value-type="string" office:string-value="NO" ns42:value-type="string" table:number-columns-spanned="3" table:number-rows-spanned="1">
            <text:p>NO</text:p>
          </table:table-cell>
          <table:covered-table-cell table:number-columns-repeated="2" table:style-name="ce54"/>
          <table:table-cell table:style-name="ce54" table:formula="of:=IF(UPPER(TRIM([.M786]))=&quot;YES&quot;;&quot;VERIFIED PUBLISHED&quot;;&quot;NOT VERIFIED&quot;)" office:value-type="string" office:string-value="NOT VERIFIED" ns42:value-type="string" table:number-columns-spanned="3" table:number-rows-spanned="1">
            <text:p>NOT VERIFIED</text:p>
          </table:table-cell>
          <table:covered-table-cell table:number-columns-repeated="2" table:style-name="ce54"/>
        </table:table-row>
        <table:table-row table:style-name="ro5">
          <table:table-cell table:style-name="ce52" office:value-type="string" ns42:value-type="string" table:number-columns-spanned="18" table:number-rows-spanned="1">
            <text:p>🔗 PUBLICATION CONSEQUENCE + LISTED TRANSITION ELIGIBILITY</text:p>
          </table:table-cell>
          <table:covered-table-cell table:number-columns-repeated="17" table:style-name="ce52"/>
        </table:table-row>
        <table:table-row table:style-name="ro5">
          <table:table-cell table:style-name="ce53" office:value-type="string" ns42:value-type="string" table:number-columns-spanned="4" table:number-rows-spanned="1">
            <text:p>VERIFIED PUBLICATION</text:p>
          </table:table-cell>
          <table:covered-table-cell table:number-columns-repeated="3" table:style-name="ce53"/>
          <table:table-cell table:style-name="ce53" office:value-type="string" ns42:value-type="string" table:number-columns-spanned="5" table:number-rows-spanned="1">
            <text:p>PUBLICATION CONSEQUENCE</text:p>
          </table:table-cell>
          <table:covered-table-cell table:number-columns-repeated="4" table:style-name="ce53"/>
          <table:table-cell table:style-name="ce53" office:value-type="string" ns42:value-type="string" table:number-columns-spanned="5" table:number-rows-spanned="1">
            <text:p>LISTED TRANSITION ELIGIBILITY</text:p>
          </table:table-cell>
          <table:covered-table-cell table:number-columns-repeated="4" table:style-name="ce53"/>
          <table:table-cell table:style-name="ce53" office:value-type="string" ns42:value-type="string" table:number-columns-spanned="4" table:number-rows-spanned="1">
            <text:p>AUTHORITATIVE INVENTORY STATE WRITE</text:p>
          </table:table-cell>
          <table:covered-table-cell table:number-columns-repeated="3" table:style-name="ce53"/>
        </table:table-row>
        <table:table-row table:style-name="ro21">
          <table:table-cell table:style-name="ce54" table:formula="of:=[.M786]" office:value-type="string" office:string-value="NO" ns42:value-type="string" table:number-columns-spanned="4" table:number-rows-spanned="1">
            <text:p>NO</text:p>
          </table:table-cell>
          <table:covered-table-cell table:number-columns-repeated="3" table:style-name="ce54"/>
          <table:table-cell table:style-name="ce54" table:formula="of:=IF(UPPER(TRIM([.A789]))=&quot;YES&quot;;&quot;PUBLICATION VERIFIED&quot;;&quot;NONE&quot;)" office:value-type="string" office:string-value="NONE" ns42:value-type="string" table:number-columns-spanned="5" table:number-rows-spanned="1">
            <text:p>NONE</text:p>
          </table:table-cell>
          <table:covered-table-cell table:number-columns-repeated="4" table:style-name="ce54"/>
          <table:table-cell table:style-name="ce54" table:formula="of:=IF(UPPER(TRIM([.A789]))=&quot;YES&quot;;&quot;ELIGIBLE&quot;;&quot;NOT ELIGIBLE&quot;)" office:value-type="string" office:string-value="NOT ELIGIBLE" ns42:value-type="string" table:number-columns-spanned="5" table:number-rows-spanned="1">
            <text:p>NOT ELIGIBLE</text:p>
          </table:table-cell>
          <table:covered-table-cell table:number-columns-repeated="4" table:style-name="ce54"/>
          <table:table-cell table:style-name="ce54" table:formula="of:=&quot;NO&quot;" office:value-type="string" office:string-value="NO"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FAIL-CLOSED EXTERNAL PUBLICATION EVIDENCE CASES</text:p>
          </table:table-cell>
          <table:covered-table-cell table:number-columns-repeated="17" table:style-name="ce52"/>
        </table:table-row>
        <table:table-row table:style-name="ro5">
          <table:table-cell table:style-name="ce53" office:value-type="string" ns42:value-type="string" table:number-columns-spanned="6" table:number-rows-spanned="1">
            <text:p>EVIDENCE CONDITION</text:p>
          </table:table-cell>
          <table:covered-table-cell table:number-columns-repeated="5" table:style-name="ce53"/>
          <table:table-cell table:style-name="ce53" office:value-type="string" ns42:value-type="string" table:number-columns-spanned="6" table:number-rows-spanned="1">
            <text:p>VERIFIED PUBLICATION</text:p>
          </table:table-cell>
          <table:covered-table-cell table:number-columns-repeated="5" table:style-name="ce53"/>
          <table:table-cell table:style-name="ce53" office:value-type="string" ns42:value-type="string" table:number-columns-spanned="6" table:number-rows-spanned="1">
            <text:p>LISTED ELIGIBILITY</text:p>
          </table:table-cell>
          <table:covered-table-cell table:number-columns-repeated="5" table:style-name="ce53"/>
        </table:table-row>
        <table:table-row table:style-name="ro5">
          <table:table-cell table:style-name="ce54" office:value-type="string" ns42:value-type="string" table:number-columns-spanned="6" table:number-rows-spanned="1">
            <text:p>NO EXTERNAL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PENDING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SUCCESS WITHOUT LISTING I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SUCCESS WITHOUT RESULT REFERENCE</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SUCCESS WITHOUT RESULT TIME</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ATTEMPT ID MISMATCH</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PLATFORM MISMATCH</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RECORD ID MISMATCH</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FAILED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REJECTED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UNKNOWN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2" office:value-type="string" ns42:value-type="string" table:number-columns-spanned="18" table:number-rows-spanned="1">
            <text:p>🏁 CONTROLLED EXTERNAL PUBLICATION RESULT EVIDENCE GATE · BUILD 250</text:p>
          </table:table-cell>
          <table:covered-table-cell table:number-columns-repeated="17" table:style-name="ce52"/>
        </table:table-row>
        <table:table-row table:style-name="ro5">
          <table:table-cell table:style-name="ce54" office:value-type="string" ns42:value-type="string" table:number-columns-spanned="18" table:number-rows-spanned="1">
            <text:p>PUBLICATION AUTHORITY ≠ PUBLICATION · CONNECTOR REQUEST ≠ MARKETPLACE ACCEPTANCE · LISTING ID ≠ VERIFIED PUBLICATION · VALID EXTERNAL SUCCESS EVIDENCE + IDENTITY CHAIN MAY DERIVE VERIFIED PUBLISHED · VERIFIED PUBLISHED → LISTED TRANSITION ELIGIBILITY ONLY · NO DIRECT INVENTORY STATE WRITE</text:p>
          </table:table-cell>
          <table:covered-table-cell table:number-columns-repeated="17" table:style-name="ce54"/>
        </table:table-row>
        <table:table-row table:style-name="ro5">
          <table:table-cell table:style-name="ce52" table:number-columns-spanned="18" office:value-type="string" office:string-value="✅ VERIFIED PUBLICATION SUCCESS EVIDENCE · BUILDS 251–260">
            <text:p>✅ VERIFIED PUBLICATION SUCCESS EVIDENCE · BUILDS 251–26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6" office:value-type="string" office:string-value="EVIDENCE QUESTION">
            <text:p>EVIDENCE QUESTION</text:p>
          </table:table-cell>
          <table:covered-table-cell/>
          <table:covered-table-cell/>
          <table:covered-table-cell/>
          <table:covered-table-cell/>
          <table:covered-table-cell/>
          <table:table-cell table:style-name="ce53" table:number-columns-spanned="6" office:value-type="string" office:string-value="RESPONSIBILITY">
            <text:p>RESPONSIBILITY</text:p>
          </table:table-cell>
          <table:covered-table-cell/>
          <table:covered-table-cell/>
          <table:covered-table-cell/>
          <table:covered-table-cell/>
          <table:covered-table-cell/>
          <table:table-cell table:style-name="ce53" table:number-columns-spanned="6" office:value-type="string" office:string-value="OPERATING BOUNDARY">
            <text:p>OPERATING BOUNDARY</text:p>
          </table:table-cell>
          <table:covered-table-cell/>
          <table:covered-table-cell/>
          <table:covered-table-cell/>
          <table:covered-table-cell/>
          <table:covered-table-cell/>
        </table:table-row>
        <table:table-row table:style-name="ro5">
          <table:table-cell table:style-name="ce54" table:number-columns-spanned="6" office:value-type="string" office:string-value="CAN A MARKETPLACE SUCCESS RESULT BECOME VERIFIED PUBLICATION?">
            <text:p>CAN A MARKETPLACE SUCCESS RESULT BECOME VERIFIED PUBLICATION?</text:p>
          </table:table-cell>
          <table:covered-table-cell/>
          <table:covered-table-cell/>
          <table:covered-table-cell/>
          <table:covered-table-cell/>
          <table:covered-table-cell/>
          <table:table-cell table:style-name="ce54" table:number-columns-spanned="6" office:value-type="string" office:string-value="REVALIDATE SUCCESS EVIDENCE + IDENTITY CHAIN">
            <text:p>REVALIDATE SUCCESS EVIDENCE + IDENTITY CHAIN</text:p>
          </table:table-cell>
          <table:covered-table-cell/>
          <table:covered-table-cell/>
          <table:covered-table-cell/>
          <table:covered-table-cell/>
          <table:covered-table-cell/>
          <table:table-cell table:style-name="ce54" table:number-columns-spanned="6" office:value-type="string" office:string-value="SUCCESS CLAIM ≠ VERIFIED PUBLICATION · VERIFIED PUBLICATION ≠ LISTED">
            <text:p>SUCCESS CLAIM ≠ VERIFIED PUBLICATION · VERIFIED PUBLICATION ≠ LISTED</text:p>
          </table:table-cell>
          <table:covered-table-cell/>
          <table:covered-table-cell/>
          <table:covered-table-cell/>
          <table:covered-table-cell/>
          <table:covered-table-cell/>
        </table:table-row>
        <table:table-row table:style-name="ro5">
          <table:table-cell table:style-name="ce52" table:number-columns-spanned="18" office:value-type="string" office:string-value="📥 SUCCESS RESULT FACTUAL INTAKE">
            <text:p>📥 SUCCESS RESULT FACTUAL INTAK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ATTEMPT ID">
            <text:p>ATTEMPT ID</text:p>
          </table:table-cell>
          <table:covered-table-cell/>
          <table:covered-table-cell/>
          <table:table-cell table:style-name="ce53" table:number-columns-spanned="3" office:value-type="string" office:string-value="PLATFORM">
            <text:p>PLATFORM</text:p>
          </table:table-cell>
          <table:covered-table-cell/>
          <table:covered-table-cell/>
          <table:table-cell table:style-name="ce53" table:number-columns-spanned="3" office:value-type="string" office:string-value="RECORD ID">
            <text:p>RECORD ID</text:p>
          </table:table-cell>
          <table:covered-table-cell/>
          <table:covered-table-cell/>
          <table:table-cell table:style-name="ce53" table:number-columns-spanned="3" office:value-type="string" office:string-value="EXTERNAL RESULT RECEIVED?">
            <text:p>EXTERNAL RESULT RECEIVED?</text:p>
          </table:table-cell>
          <table:covered-table-cell/>
          <table:covered-table-cell/>
          <table:table-cell table:style-name="ce53" table:number-columns-spanned="3" office:value-type="string" office:string-value="EXTERNAL RESULT STATUS">
            <text:p>EXTERNAL RESULT STATUS</text:p>
          </table:table-cell>
          <table:covered-table-cell/>
          <table:covered-table-cell/>
          <table:table-cell table:style-name="ce53" table:number-columns-spanned="3" office:value-type="string" office:string-value="MARKETPLACE LISTING ID">
            <text:p>MARKETPLACE LISTING ID</text:p>
          </table:table-cell>
          <table:covered-table-cell/>
          <table:covered-table-cell/>
        </table:table-row>
        <table:table-row table:style-name="ro5">
          <table:table-cell table:style-name="ce54" table:number-columns-spanned="3" office:value-type="string" office:string-value="PUB-000001">
            <text:p>PUB-000001</text:p>
          </table:table-cell>
          <table:covered-table-cell/>
          <table:covered-table-cell/>
          <table:table-cell table:style-name="ce54" table:number-columns-spanned="3" office:value-type="string" office:string-value="EBAY">
            <text:p>EBAY</text:p>
          </table:table-cell>
          <table:covered-table-cell/>
          <table:covered-table-cell/>
          <table:table-cell table:style-name="ce54" table:number-columns-spanned="3" office:value-type="string" office:string-value="INV-000001">
            <text:p>INV-000001</text:p>
          </table:table-cell>
          <table:covered-table-cell/>
          <table:covered-table-cell/>
          <table:table-cell table:style-name="ce54" table:number-columns-spanned="3" office:value-type="string" office:string-value="YES">
            <text:p>YES</text:p>
          </table:table-cell>
          <table:covered-table-cell/>
          <table:covered-table-cell/>
          <table:table-cell table:style-name="ce54" table:number-columns-spanned="3" office:value-type="string" office:string-value="SUCCESS">
            <text:p>SUCCESS</text:p>
          </table:table-cell>
          <table:covered-table-cell/>
          <table:covered-table-cell/>
          <table:table-cell table:style-name="ce54" table:number-columns-spanned="3" office:value-type="string" office:string-value="EBAY-1234567890">
            <text:p>EBAY-1234567890</text:p>
          </table:table-cell>
          <table:covered-table-cell/>
          <table:covered-table-cell/>
        </table:table-row>
        <table:table-row table:style-name="ro5">
          <table:table-cell table:style-name="ce53" table:number-columns-spanned="9" office:value-type="string" office:string-value="EXTERNAL RESULT REFERENCE">
            <text:p>EXTERNAL RESULT REFERENCE</text:p>
          </table:table-cell>
          <table:covered-table-cell/>
          <table:covered-table-cell/>
          <table:covered-table-cell/>
          <table:covered-table-cell/>
          <table:covered-table-cell/>
          <table:covered-table-cell/>
          <table:covered-table-cell/>
          <table:covered-table-cell/>
          <table:table-cell table:style-name="ce53" table:number-columns-spanned="9" office:value-type="string" office:string-value="RESULT RECEIVED AT">
            <text:p>RESULT RECEIVED AT</text:p>
          </table:table-cell>
          <table:covered-table-cell/>
          <table:covered-table-cell/>
          <table:covered-table-cell/>
          <table:covered-table-cell/>
          <table:covered-table-cell/>
          <table:covered-table-cell/>
          <table:covered-table-cell/>
          <table:covered-table-cell/>
        </table:table-row>
        <table:table-row table:style-name="ro5">
          <table:table-cell table:style-name="ce54" table:number-columns-spanned="9" office:value-type="string" office:string-value="EBAY-RESULT-REF-000001">
            <text:p>EBAY-RESULT-REF-000001</text:p>
          </table:table-cell>
          <table:covered-table-cell/>
          <table:covered-table-cell/>
          <table:covered-table-cell/>
          <table:covered-table-cell/>
          <table:covered-table-cell/>
          <table:covered-table-cell/>
          <table:covered-table-cell/>
          <table:covered-table-cell/>
          <table:table-cell table:style-name="ce54" table:number-columns-spanned="9" office:value-type="string" office:string-value="2026-07-06T19:55:00-04:00">
            <text:p>2026-07-06T19:55:00-04:00</text:p>
          </table:table-cell>
          <table:covered-table-cell/>
          <table:covered-table-cell/>
          <table:covered-table-cell/>
          <table:covered-table-cell/>
          <table:covered-table-cell/>
          <table:covered-table-cell/>
          <table:covered-table-cell/>
          <table:covered-table-cell/>
        </table:table-row>
        <table:table-row table:style-name="ro5">
          <table:table-cell table:style-name="ce52" table:number-columns-spanned="18" office:value-type="string" office:string-value="🔎 SUCCESS STATUS + REQUIRED EVIDENCE VALIDATION">
            <text:p>🔎 SUCCESS STATUS + REQUIRED EVIDENCE VALIDATIO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SUCCESS STATUS VALID">
            <text:p>SUCCESS STATUS VALID</text:p>
          </table:table-cell>
          <table:covered-table-cell/>
          <table:covered-table-cell/>
          <table:table-cell table:style-name="ce53" table:number-columns-spanned="3" office:value-type="string" office:string-value="LISTING ID PRESENT">
            <text:p>LISTING ID PRESENT</text:p>
          </table:table-cell>
          <table:covered-table-cell/>
          <table:covered-table-cell/>
          <table:table-cell table:style-name="ce53" table:number-columns-spanned="3" office:value-type="string" office:string-value="RESULT REFERENCE PRESENT">
            <text:p>RESULT REFERENCE PRESENT</text:p>
          </table:table-cell>
          <table:covered-table-cell/>
          <table:covered-table-cell/>
          <table:table-cell table:style-name="ce53" table:number-columns-spanned="3" office:value-type="string" office:string-value="RESULT TIME PRESENT">
            <text:p>RESULT TIME PRESENT</text:p>
          </table:table-cell>
          <table:covered-table-cell/>
          <table:covered-table-cell/>
          <table:table-cell table:style-name="ce53" table:number-columns-spanned="3" office:value-type="string" office:string-value="IDENTITY CHAIN VALID">
            <text:p>IDENTITY CHAIN VALID</text:p>
          </table:table-cell>
          <table:covered-table-cell/>
          <table:covered-table-cell/>
          <table:table-cell table:style-name="ce53" table:number-columns-spanned="3" office:value-type="string" office:string-value="SUCCESS EVIDENCE COMPLETE">
            <text:p>SUCCESS EVIDENCE COMPLETE</text:p>
          </table:table-cell>
          <table:covered-table-cell/>
          <table:covered-table-cell/>
        </table:table-row>
        <table:table-row table:style-name="ro21">
          <table:table-cell table:style-name="ce54" table:number-columns-spanned="3" office:value-type="string" office:string-value="YES" table:formula="of:=IF(AND(UPPER(TRIM([.J810]))=&quot;YES&quot;;UPPER(TRIM([.M810]))=&quot;SUCCESS&quot;);&quot;YES&quot;;&quot;NO&quot;)">
            <text:p>YES</text:p>
          </table:table-cell>
          <table:covered-table-cell/>
          <table:covered-table-cell/>
          <table:table-cell table:style-name="ce54" table:number-columns-spanned="3" office:value-type="string" office:string-value="YES" table:formula="of:=IF(UPPER(TRIM([.P810]))&lt;&gt;&quot;NONE&quot;;&quot;YES&quot;;&quot;NO&quot;)">
            <text:p>YES</text:p>
          </table:table-cell>
          <table:covered-table-cell/>
          <table:covered-table-cell/>
          <table:table-cell table:style-name="ce54" table:number-columns-spanned="3" office:value-type="string" office:string-value="YES" table:formula="of:=IF(UPPER(TRIM([.A812]))&lt;&gt;&quot;NONE&quot;;&quot;YES&quot;;&quot;NO&quot;)">
            <text:p>YES</text:p>
          </table:table-cell>
          <table:covered-table-cell/>
          <table:covered-table-cell/>
          <table:table-cell table:style-name="ce54" table:number-columns-spanned="3" office:value-type="string" office:string-value="YES" table:formula="of:=IF(UPPER(TRIM([.J812]))&lt;&gt;&quot;NONE&quot;;&quot;YES&quot;;&quot;NO&quot;)">
            <text:p>YES</text:p>
          </table:table-cell>
          <table:covered-table-cell/>
          <table:covered-table-cell/>
          <table:table-cell table:style-name="ce54" table:number-columns-spanned="3" office:value-type="string" office:string-value="YES" table:formula="of:=IF(AND(UPPER(TRIM([.A810]))=UPPER(TRIM([.O766]));UPPER(TRIM([.D810]))=UPPER(TRIM([.D766]));UPPER(TRIM([.G810]))=UPPER(TRIM([.A766])));&quot;YES&quot;;&quot;NO&quot;)">
            <text:p>YES</text:p>
          </table:table-cell>
          <table:covered-table-cell/>
          <table:covered-table-cell/>
          <table:table-cell table:style-name="ce54" table:number-columns-spanned="3" office:value-type="string" office:string-value="YES" table:formula="of:=IF(AND(UPPER(TRIM([.A815]))=&quot;YES&quot;;UPPER(TRIM([.D815]))=&quot;YES&quot;;UPPER(TRIM([.G815]))=&quot;YES&quot;;UPPER(TRIM([.J815]))=&quot;YES&quot;;UPPER(TRIM([.M815]))=&quot;YES&quot;);&quot;YES&quot;;&quot;NO&quot;)">
            <text:p>YES</text:p>
          </table:table-cell>
          <table:covered-table-cell/>
          <table:covered-table-cell/>
        </table:table-row>
        <table:table-row table:style-name="ro5">
          <table:table-cell table:style-name="ce52" table:number-columns-spanned="18" office:value-type="string" office:string-value="✅ VERIFIED PUBLICATION CROSS-CHECK">
            <text:p>✅ VERIFIED PUBLICATION CROSS-CHECK</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AUTHORITY VALID">
            <text:p>AUTHORITY VALID</text:p>
          </table:table-cell>
          <table:covered-table-cell/>
          <table:covered-table-cell/>
          <table:table-cell table:style-name="ce53" table:number-columns-spanned="3" office:value-type="string" office:string-value="COMMIT VALID">
            <text:p>COMMIT VALID</text:p>
          </table:table-cell>
          <table:covered-table-cell/>
          <table:covered-table-cell/>
          <table:table-cell table:style-name="ce53" table:number-columns-spanned="3" office:value-type="string" office:string-value="ATTEMPT MATCH">
            <text:p>ATTEMPT MATCH</text:p>
          </table:table-cell>
          <table:covered-table-cell/>
          <table:covered-table-cell/>
          <table:table-cell table:style-name="ce53" table:number-columns-spanned="3" office:value-type="string" office:string-value="SUCCESS EVIDENCE COMPLETE">
            <text:p>SUCCESS EVIDENCE COMPLETE</text:p>
          </table:table-cell>
          <table:covered-table-cell/>
          <table:covered-table-cell/>
          <table:table-cell table:style-name="ce53" table:number-columns-spanned="3" office:value-type="string" office:string-value="VERIFIED PUBLICATION">
            <text:p>VERIFIED PUBLICATION</text:p>
          </table:table-cell>
          <table:covered-table-cell/>
          <table:covered-table-cell/>
          <table:table-cell table:style-name="ce53" table:number-columns-spanned="3" office:value-type="string" office:string-value="VERIFICATION RESULT">
            <text:p>VERIFICATION RESULT</text:p>
          </table:table-cell>
          <table:covered-table-cell/>
          <table:covered-table-cell/>
        </table:table-row>
        <table:table-row table:style-name="ro21">
          <table:table-cell table:style-name="ce54" table:number-columns-spanned="3" office:value-type="string" office:string-value="YES" table:formula="of:=IF(UPPER(TRIM([.G766]))=&quot;GRANTED&quot;;&quot;YES&quot;;&quot;NO&quot;)">
            <text:p>YES</text:p>
          </table:table-cell>
          <table:covered-table-cell/>
          <table:covered-table-cell/>
          <table:table-cell table:style-name="ce54" table:number-columns-spanned="3" office:value-type="string" office:string-value="YES" table:formula="of:=IF(UPPER(TRIM([.K766]))=&quot;EXECUTE PUBLICATION&quot;;&quot;YES&quot;;&quot;NO&quot;)">
            <text:p>YES</text:p>
          </table:table-cell>
          <table:covered-table-cell/>
          <table:covered-table-cell/>
          <table:table-cell table:style-name="ce54" table:number-columns-spanned="3" office:value-type="string" office:string-value="YES" table:formula="of:=IF(UPPER(TRIM([.A810]))=UPPER(TRIM([.O766]));&quot;YES&quot;;&quot;NO&quot;)">
            <text:p>YES</text:p>
          </table:table-cell>
          <table:covered-table-cell/>
          <table:covered-table-cell/>
          <table:table-cell table:style-name="ce54" table:number-columns-spanned="3" office:value-type="string" office:string-value="YES" table:formula="of:=[.P815]">
            <text:p>YES</text:p>
          </table:table-cell>
          <table:covered-table-cell/>
          <table:covered-table-cell/>
          <table:table-cell table:style-name="ce54" table:number-columns-spanned="3" office:value-type="string" office:string-value="YES" table:formula="of:=IF(AND(UPPER(TRIM([.A818]))=&quot;YES&quot;;UPPER(TRIM([.D818]))=&quot;YES&quot;;UPPER(TRIM([.G818]))=&quot;YES&quot;;UPPER(TRIM([.J818]))=&quot;YES&quot;);&quot;YES&quot;;&quot;NO&quot;)">
            <text:p>YES</text:p>
          </table:table-cell>
          <table:covered-table-cell/>
          <table:covered-table-cell/>
          <table:table-cell table:style-name="ce54" table:number-columns-spanned="3" office:value-type="string" office:string-value="VERIFIED PUBLISHED" table:formula="of:=IF(UPPER(TRIM([.M818]))=&quot;YES&quot;;&quot;VERIFIED PUBLISHED&quot;;&quot;NOT VERIFIED&quot;)">
            <text:p>VERIFIED PUBLISHED</text:p>
          </table:table-cell>
          <table:covered-table-cell/>
          <table:covered-table-cell/>
        </table:table-row>
        <table:table-row table:style-name="ro5">
          <table:table-cell table:style-name="ce52" table:number-columns-spanned="18" office:value-type="string" office:string-value="🔗 LISTED ELIGIBILITY REVALIDATION">
            <text:p>🔗 LISTED ELIGIBILITY REVALIDATIO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VERIFIED PUBLICATION">
            <text:p>VERIFIED PUBLICATION</text:p>
          </table:table-cell>
          <table:covered-table-cell/>
          <table:covered-table-cell/>
          <table:covered-table-cell/>
          <table:table-cell table:style-name="ce53" table:number-columns-spanned="5" office:value-type="string" office:string-value="PUBLICATION CONSEQUENCE">
            <text:p>PUBLICATION CONSEQUENCE</text:p>
          </table:table-cell>
          <table:covered-table-cell/>
          <table:covered-table-cell/>
          <table:covered-table-cell/>
          <table:covered-table-cell/>
          <table:table-cell table:style-name="ce53" table:number-columns-spanned="5" office:value-type="string" office:string-value="LISTED TRANSITION ELIGIBILITY">
            <text:p>LISTED TRANSITION ELIGIBILITY</text:p>
          </table:table-cell>
          <table:covered-table-cell/>
          <table:covered-table-cell/>
          <table:covered-table-cell/>
          <table:covered-table-cell/>
          <table:table-cell table:style-name="ce53" table:number-columns-spanned="4" office:value-type="string" office:string-value="AUTHORITATIVE INVENTORY STATE WRITE">
            <text:p>AUTHORITATIVE INVENTORY STATE WRITE</text:p>
          </table:table-cell>
          <table:covered-table-cell/>
          <table:covered-table-cell/>
          <table:covered-table-cell/>
        </table:table-row>
        <table:table-row table:style-name="ro21">
          <table:table-cell table:style-name="ce54" table:number-columns-spanned="4" office:value-type="string" office:string-value="YES" table:formula="of:=[.M818]">
            <text:p>YES</text:p>
          </table:table-cell>
          <table:covered-table-cell/>
          <table:covered-table-cell/>
          <table:covered-table-cell/>
          <table:table-cell table:style-name="ce54" table:number-columns-spanned="5" office:value-type="string" office:string-value="PUBLICATION VERIFIED" table:formula="of:=IF(UPPER(TRIM([.A821]))=&quot;YES&quot;;&quot;PUBLICATION VERIFIED&quot;;&quot;NONE&quot;)">
            <text:p>PUBLICATION VERIFIED</text:p>
          </table:table-cell>
          <table:covered-table-cell/>
          <table:covered-table-cell/>
          <table:covered-table-cell/>
          <table:covered-table-cell/>
          <table:table-cell table:style-name="ce54" table:number-columns-spanned="5" office:value-type="string" office:string-value="ELIGIBLE" table:formula="of:=IF(AND(UPPER(TRIM([.A821]))=&quot;YES&quot;;UPPER(TRIM([.E821]))=&quot;PUBLICATION VERIFIED&quot;);&quot;ELIGIBLE&quot;;&quot;NOT ELIGIBLE&quot;)">
            <text:p>ELIGIBLE</text:p>
          </table:table-cell>
          <table:covered-table-cell/>
          <table:covered-table-cell/>
          <table:covered-table-cell/>
          <table:covered-table-cell/>
          <table:table-cell table:style-name="ce54" table:number-columns-spanned="4" office:value-type="string" office:string-value="NO" table:formula="of:=&quot;NO&quot;">
            <text:p>NO</text:p>
          </table:table-cell>
          <table:covered-table-cell/>
          <table:covered-table-cell/>
          <table:covered-table-cell/>
        </table:table-row>
        <table:table-row table:style-name="ro5">
          <table:table-cell table:style-name="ce52" table:number-columns-spanned="18" office:value-type="string" office:string-value="🚫 FAIL-CLOSED VERIFIED PUBLICATION CASES">
            <text:p>🚫 FAIL-CLOSED VERIFIED PUBLICATION CAS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8" office:value-type="string" office:string-value="EVIDENCE CONDITION">
            <text:p>EVIDENCE CONDITION</text:p>
          </table:table-cell>
          <table:covered-table-cell/>
          <table:covered-table-cell/>
          <table:covered-table-cell/>
          <table:covered-table-cell/>
          <table:covered-table-cell/>
          <table:covered-table-cell/>
          <table:covered-table-cell/>
          <table:table-cell table:style-name="ce53" table:number-columns-spanned="5" office:value-type="string" office:string-value="VERIFIED PUBLICATION">
            <text:p>VERIFIED PUBLICATION</text:p>
          </table:table-cell>
          <table:covered-table-cell/>
          <table:covered-table-cell/>
          <table:covered-table-cell/>
          <table:covered-table-cell/>
          <table:table-cell table:style-name="ce53" table:number-columns-spanned="5" office:value-type="string" office:string-value="LISTED ELIGIBILITY">
            <text:p>LISTED ELIGIBILITY</text:p>
          </table:table-cell>
          <table:covered-table-cell/>
          <table:covered-table-cell/>
          <table:covered-table-cell/>
          <table:covered-table-cell/>
        </table:table-row>
        <table:table-row table:style-name="ro5">
          <table:table-cell table:style-name="ce54" table:number-columns-spanned="8" office:value-type="string" office:string-value="SUCCESS WITHOUT LISTING ID">
            <text:p>SUCCESS WITHOUT LISTING ID</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4" table:number-columns-spanned="8" office:value-type="string" office:string-value="SUCCESS WITHOUT RESULT REFERENCE">
            <text:p>SUCCESS WITHOUT RESULT REFERENCE</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4" table:number-columns-spanned="8" office:value-type="string" office:string-value="SUCCESS WITHOUT RESULT TIME">
            <text:p>SUCCESS WITHOUT RESULT TIME</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4" table:number-columns-spanned="8" office:value-type="string" office:string-value="ATTEMPT ID MISMATCH">
            <text:p>ATTEMPT ID MISMATCH</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4" table:number-columns-spanned="8" office:value-type="string" office:string-value="PLATFORM MISMATCH">
            <text:p>PLATFORM MISMATCH</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4" table:number-columns-spanned="8" office:value-type="string" office:string-value="RECORD ID MISMATCH">
            <text:p>RECORD ID MISMATCH</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2" table:number-columns-spanned="18" office:value-type="string" office:string-value="🏁 CONTROLLED VERIFIED PUBLICATION GATE · BUILD 260">
            <text:p>🏁 CONTROLLED VERIFIED PUBLICATION GATE · BUILD 26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4" table:number-columns-spanned="18" office:value-type="string" office:string-value="SUCCESS CLAIM ≠ VERIFIED PUBLICATION · COMPLETE SUCCESS EVIDENCE + VALID IDENTITY CHAIN + VALID AUTHORITY/COMMIT MAY DERIVE VERIFIED PUBLISHED · VERIFIED PUBLICATION → LISTED TRANSITION ELIGIBILITY ONLY · NO DIRECT INVENTORY STATE WRITE">
            <text:p>SUCCESS CLAIM ≠ VERIFIED PUBLICATION · COMPLETE SUCCESS EVIDENCE + VALID IDENTITY CHAIN + VALID AUTHORITY/COMMIT MAY DERIVE VERIFIED PUBLISHED · VERIFIED PUBLICATION → LISTED TRANSITION ELIGIBILITY ONLY · NO DIRECT INVENTORY STATE WRI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2" table:number-columns-spanned="18" office:value-type="string" office:string-value="🔄 CONTROLLED LISTED TRANSITION EXECUTION · BUILDS 261–280">
            <text:p>🔄 CONTROLLED LISTED TRANSITION EXECUTION · BUILDS 261–28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6" office:value-type="string" office:string-value="TRANSITION QUESTION">
            <text:p>TRANSITION QUESTION</text:p>
          </table:table-cell>
          <table:covered-table-cell/>
          <table:covered-table-cell/>
          <table:covered-table-cell/>
          <table:covered-table-cell/>
          <table:covered-table-cell/>
          <table:table-cell table:style-name="ce53" table:number-columns-spanned="6" office:value-type="string" office:string-value="RESPONSIBILITY">
            <text:p>RESPONSIBILITY</text:p>
          </table:table-cell>
          <table:covered-table-cell/>
          <table:covered-table-cell/>
          <table:covered-table-cell/>
          <table:covered-table-cell/>
          <table:covered-table-cell/>
          <table:table-cell table:style-name="ce53" table:number-columns-spanned="6" office:value-type="string" office:string-value="BOUNDARY">
            <text:p>BOUNDARY</text:p>
          </table:table-cell>
          <table:covered-table-cell/>
          <table:covered-table-cell/>
          <table:covered-table-cell/>
          <table:covered-table-cell/>
          <table:covered-table-cell/>
        </table:table-row>
        <table:table-row table:style-name="ro5">
          <table:table-cell table:style-name="ce54" table:number-columns-spanned="6" office:value-type="string" office:string-value="MAY VERIFIED PUBLICATION BECOME AUTHORITATIVE LISTED STATE?">
            <text:p>MAY VERIFIED PUBLICATION BECOME AUTHORITATIVE LISTED STATE?</text:p>
          </table:table-cell>
          <table:covered-table-cell/>
          <table:covered-table-cell/>
          <table:covered-table-cell/>
          <table:covered-table-cell/>
          <table:covered-table-cell/>
          <table:table-cell table:style-name="ce54" table:number-columns-spanned="6" office:value-type="string" office:string-value="REQUEST + AUTHORIZE + COMMIT + EXECUTE + VERIFY">
            <text:p>REQUEST + AUTHORIZE + COMMIT + EXECUTE + VERIFY</text:p>
          </table:table-cell>
          <table:covered-table-cell/>
          <table:covered-table-cell/>
          <table:covered-table-cell/>
          <table:covered-table-cell/>
          <table:covered-table-cell/>
          <table:table-cell table:style-name="ce54" table:number-columns-spanned="6" office:value-type="string" office:string-value="VERIFIED PUBLICATION ≠ LISTED · AUTHORITY ≠ EXECUTION">
            <text:p>VERIFIED PUBLICATION ≠ LISTED · AUTHORITY ≠ EXECUTION</text:p>
          </table:table-cell>
          <table:covered-table-cell/>
          <table:covered-table-cell/>
          <table:covered-table-cell/>
          <table:covered-table-cell/>
          <table:covered-table-cell/>
        </table:table-row>
        <table:table-row table:style-name="ro5">
          <table:table-cell table:style-name="ce52" table:number-columns-spanned="18" office:value-type="string" office:string-value="📥 EXPLICIT LISTED TRANSITION REQUEST · BUILDS 261–265">
            <text:p>📥 EXPLICIT LISTED TRANSITION REQUEST · BUILDS 261–265</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RECORD ID">
            <text:p>RECORD ID</text:p>
          </table:table-cell>
          <table:covered-table-cell/>
          <table:covered-table-cell/>
          <table:covered-table-cell/>
          <table:table-cell table:style-name="ce53" table:number-columns-spanned="5" office:value-type="string" office:string-value="REQUESTED TRANSITION">
            <text:p>REQUESTED TRANSITION</text:p>
          </table:table-cell>
          <table:covered-table-cell/>
          <table:covered-table-cell/>
          <table:covered-table-cell/>
          <table:covered-table-cell/>
          <table:table-cell table:style-name="ce53" table:number-columns-spanned="4" office:value-type="string" office:string-value="REQUEST STATUS">
            <text:p>REQUEST STATUS</text:p>
          </table:table-cell>
          <table:covered-table-cell/>
          <table:covered-table-cell/>
          <table:covered-table-cell/>
          <table:table-cell table:style-name="ce53" table:number-columns-spanned="5" office:value-type="string" office:string-value="REQUESTED BY">
            <text:p>REQUESTED BY</text:p>
          </table:table-cell>
          <table:covered-table-cell/>
          <table:covered-table-cell/>
          <table:covered-table-cell/>
          <table:covered-table-cell/>
        </table:table-row>
        <table:table-row table:style-name="ro5">
          <table:table-cell table:style-name="ce54" table:number-columns-spanned="4" office:value-type="string" office:string-value="INV-000001">
            <text:p>INV-000001</text:p>
          </table:table-cell>
          <table:covered-table-cell/>
          <table:covered-table-cell/>
          <table:covered-table-cell/>
          <table:table-cell table:style-name="ce54" table:number-columns-spanned="5" office:value-type="string" office:string-value="READY TO LIST → LISTED">
            <text:p>READY TO LIST → LISTED</text:p>
          </table:table-cell>
          <table:covered-table-cell/>
          <table:covered-table-cell/>
          <table:covered-table-cell/>
          <table:covered-table-cell/>
          <table:table-cell table:style-name="ce54" table:number-columns-spanned="4" office:value-type="string" office:string-value="REQUESTED">
            <text:p>REQUESTED</text:p>
          </table:table-cell>
          <table:covered-table-cell/>
          <table:covered-table-cell/>
          <table:covered-table-cell/>
          <table:table-cell table:style-name="ce54" table:number-columns-spanned="5" office:value-type="string" office:string-value="MARK · OPERATOR">
            <text:p>MARK · OPERATOR</text:p>
          </table:table-cell>
          <table:covered-table-cell/>
          <table:covered-table-cell/>
          <table:covered-table-cell/>
          <table:covered-table-cell/>
        </table:table-row>
        <table:table-row table:style-name="ro5">
          <table:table-cell table:style-name="ce53" table:number-columns-spanned="4" office:value-type="string" office:string-value="ELIGIBILITY VALID">
            <text:p>ELIGIBILITY VALID</text:p>
          </table:table-cell>
          <table:covered-table-cell/>
          <table:covered-table-cell/>
          <table:covered-table-cell/>
          <table:table-cell table:style-name="ce53" table:number-columns-spanned="5" office:value-type="string" office:string-value="REQUEST VALID">
            <text:p>REQUEST VALID</text:p>
          </table:table-cell>
          <table:covered-table-cell/>
          <table:covered-table-cell/>
          <table:covered-table-cell/>
          <table:covered-table-cell/>
          <table:table-cell table:style-name="ce53" table:number-columns-spanned="4" office:value-type="string" office:string-value="ACTOR PRESENT">
            <text:p>ACTOR PRESENT</text:p>
          </table:table-cell>
          <table:covered-table-cell/>
          <table:covered-table-cell/>
          <table:covered-table-cell/>
          <table:table-cell table:style-name="ce53" table:number-columns-spanned="5" office:value-type="string" office:string-value="REQUEST RESULT">
            <text:p>REQUEST RESULT</text:p>
          </table:table-cell>
          <table:covered-table-cell/>
          <table:covered-table-cell/>
          <table:covered-table-cell/>
          <table:covered-table-cell/>
        </table:table-row>
        <table:table-row table:style-name="ro21">
          <table:table-cell table:style-name="ce54" table:number-columns-spanned="4" office:value-type="string" office:string-value="YES" table:formula="of:=IF(UPPER(TRIM([.J821]))=&quot;ELIGIBLE&quot;;&quot;YES&quot;;&quot;NO&quot;)">
            <text:p>YES</text:p>
          </table:table-cell>
          <table:covered-table-cell/>
          <table:covered-table-cell/>
          <table:covered-table-cell/>
          <table:table-cell table:style-name="ce54" table:number-columns-spanned="5" office:value-type="string" office:string-value="YES" table:formula="of:=IF(AND(UPPER(TRIM([.A839]))=&quot;INV-000001&quot;;UPPER(TRIM([.E839]))=&quot;READY TO LIST → LISTED&quot;;UPPER(TRIM([.J839]))=&quot;REQUESTED&quot;);&quot;YES&quot;;&quot;NO&quot;)">
            <text:p>YES</text:p>
          </table:table-cell>
          <table:covered-table-cell/>
          <table:covered-table-cell/>
          <table:covered-table-cell/>
          <table:covered-table-cell/>
          <table:table-cell table:style-name="ce54" table:number-columns-spanned="4" office:value-type="string" office:string-value="YES" table:formula="of:=IF(TRIM([.N839])&lt;&gt;&quot;&quot;;&quot;YES&quot;;&quot;NO&quot;)">
            <text:p>YES</text:p>
          </table:table-cell>
          <table:covered-table-cell/>
          <table:covered-table-cell/>
          <table:covered-table-cell/>
          <table:table-cell table:style-name="ce54" table:number-columns-spanned="5" office:value-type="string" office:string-value="VALID REQUEST" table:formula="of:=IF(AND(UPPER(TRIM([.A841]))=&quot;YES&quot;;UPPER(TRIM([.E841]))=&quot;YES&quot;;UPPER(TRIM([.J841]))=&quot;YES&quot;);&quot;VALID REQUEST&quot;;&quot;INVALID REQUEST&quot;)">
            <text:p>VALID REQUEST</text:p>
          </table:table-cell>
          <table:covered-table-cell/>
          <table:covered-table-cell/>
          <table:covered-table-cell/>
          <table:covered-table-cell/>
        </table:table-row>
        <table:table-row table:style-name="ro5">
          <table:table-cell table:style-name="ce52" table:number-columns-spanned="18" office:value-type="string" office:string-value="🛡️ LISTED TRANSITION AUTHORITY · BUILDS 266–270">
            <text:p>🛡️ LISTED TRANSITION AUTHORITY · BUILDS 266–27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CURRENT STATE VALID">
            <text:p>CURRENT STATE VALID</text:p>
          </table:table-cell>
          <table:covered-table-cell/>
          <table:covered-table-cell/>
          <table:table-cell table:style-name="ce53" table:number-columns-spanned="4" office:value-type="string" office:string-value="VERIFIED PUBLICATION VALID">
            <text:p>VERIFIED PUBLICATION VALID</text:p>
          </table:table-cell>
          <table:covered-table-cell/>
          <table:covered-table-cell/>
          <table:covered-table-cell/>
          <table:table-cell table:style-name="ce53" table:number-columns-spanned="4" office:value-type="string" office:string-value="REQUEST VALID">
            <text:p>REQUEST VALID</text:p>
          </table:table-cell>
          <table:covered-table-cell/>
          <table:covered-table-cell/>
          <table:covered-table-cell/>
          <table:table-cell table:style-name="ce53" table:number-columns-spanned="3" office:value-type="string" office:string-value="ACTOR AUTHORIZED">
            <text:p>ACTOR AUTHORIZED</text:p>
          </table:table-cell>
          <table:covered-table-cell/>
          <table:covered-table-cell/>
          <table:table-cell table:style-name="ce53" table:number-columns-spanned="4" office:value-type="string" office:string-value="AUTHORITY RESULT">
            <text:p>AUTHORITY RESULT</text:p>
          </table:table-cell>
          <table:covered-table-cell/>
          <table:covered-table-cell/>
          <table:covered-table-cell/>
        </table:table-row>
        <table:table-row table:style-name="ro21">
          <table:table-cell table:style-name="ce54" table:number-columns-spanned="3" office:value-type="string" office:string-value="YES" table:formula="of:=IF(UPPER(TRIM([.B726]))=&quot;READY TO LIST&quot;;&quot;YES&quot;;&quot;NO&quot;)">
            <text:p>YES</text:p>
          </table:table-cell>
          <table:covered-table-cell/>
          <table:covered-table-cell/>
          <table:table-cell table:style-name="ce54" table:number-columns-spanned="4" office:value-type="string" office:string-value="YES" table:formula="of:=IF(UPPER(TRIM([.M818]))=&quot;YES&quot;;&quot;YES&quot;;&quot;NO&quot;)">
            <text:p>YES</text:p>
          </table:table-cell>
          <table:covered-table-cell/>
          <table:covered-table-cell/>
          <table:covered-table-cell/>
          <table:table-cell table:style-name="ce54" table:number-columns-spanned="4" office:value-type="string" office:string-value="YES" table:formula="of:=IF(UPPER(TRIM([.N841]))=&quot;VALID REQUEST&quot;;&quot;YES&quot;;&quot;NO&quot;)">
            <text:p>YES</text:p>
          </table:table-cell>
          <table:covered-table-cell/>
          <table:covered-table-cell/>
          <table:covered-table-cell/>
          <table:table-cell table:style-name="ce54" table:number-columns-spanned="3" office:value-type="string" office:string-value="YES" table:formula="of:=IF(UPPER(TRIM([.N839]))=&quot;MARK · OPERATOR&quot;;&quot;YES&quot;;&quot;NO&quot;)">
            <text:p>YES</text:p>
          </table:table-cell>
          <table:covered-table-cell/>
          <table:covered-table-cell/>
          <table:table-cell table:style-name="ce54" table:number-columns-spanned="4" office:value-type="string" office:string-value="GRANTED" table:formula="of:=IF(AND(UPPER(TRIM([.A844]))=&quot;YES&quot;;UPPER(TRIM([.D844]))=&quot;YES&quot;;UPPER(TRIM([.H844]))=&quot;YES&quot;;UPPER(TRIM([.L844]))=&quot;YES&quot;);&quot;GRANTED&quot;;&quot;DENIED&quot;)">
            <text:p>GRANTED</text:p>
          </table:table-cell>
          <table:covered-table-cell/>
          <table:covered-table-cell/>
          <table:covered-table-cell/>
        </table:table-row>
        <table:table-row table:style-name="ro5">
          <table:table-cell table:style-name="ce52" table:number-columns-spanned="18" office:value-type="string" office:string-value="⚙️ EXECUTION COMMIT + CONTROLLED STATE WRITE · BUILDS 271–275">
            <text:p>⚙️ EXECUTION COMMIT + CONTROLLED STATE WRITE · BUILDS 271–275</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EXECUTION COMMIT">
            <text:p>EXECUTION COMMIT</text:p>
          </table:table-cell>
          <table:covered-table-cell/>
          <table:covered-table-cell/>
          <table:covered-table-cell/>
          <table:table-cell table:style-name="ce53" table:number-columns-spanned="4" office:value-type="string" office:string-value="AUTHORITY REVALIDATED">
            <text:p>AUTHORITY REVALIDATED</text:p>
          </table:table-cell>
          <table:covered-table-cell/>
          <table:covered-table-cell/>
          <table:covered-table-cell/>
          <table:table-cell table:style-name="ce53" table:number-columns-spanned="3" office:value-type="string" office:string-value="WRITE ELIGIBLE">
            <text:p>WRITE ELIGIBLE</text:p>
          </table:table-cell>
          <table:covered-table-cell/>
          <table:covered-table-cell/>
          <table:table-cell table:style-name="ce53" table:number-columns-spanned="4" office:value-type="string" office:string-value="CONTROLLED STATE WRITE">
            <text:p>CONTROLLED STATE WRITE</text:p>
          </table:table-cell>
          <table:covered-table-cell/>
          <table:covered-table-cell/>
          <table:covered-table-cell/>
          <table:table-cell table:style-name="ce53" table:number-columns-spanned="3" office:value-type="string" office:string-value="DERIVED NEW STATE">
            <text:p>DERIVED NEW STATE</text:p>
          </table:table-cell>
          <table:covered-table-cell/>
          <table:covered-table-cell/>
        </table:table-row>
        <table:table-row table:style-name="ro21">
          <table:table-cell table:style-name="ce54" table:number-columns-spanned="4" office:value-type="string" office:string-value="EXECUTE LISTED TRANSITION">
            <text:p>EXECUTE LISTED TRANSITION</text:p>
          </table:table-cell>
          <table:covered-table-cell/>
          <table:covered-table-cell/>
          <table:covered-table-cell/>
          <table:table-cell table:style-name="ce54" table:number-columns-spanned="4" office:value-type="string" office:string-value="YES" table:formula="of:=IF(UPPER(TRIM([.O844]))=&quot;GRANTED&quot;;&quot;YES&quot;;&quot;NO&quot;)">
            <text:p>YES</text:p>
          </table:table-cell>
          <table:covered-table-cell/>
          <table:covered-table-cell/>
          <table:covered-table-cell/>
          <table:table-cell table:style-name="ce54" table:number-columns-spanned="3" office:value-type="string" office:string-value="YES" table:formula="of:=IF(AND(UPPER(TRIM([.A847]))=&quot;EXECUTE LISTED TRANSITION&quot;;UPPER(TRIM([.E847]))=&quot;YES&quot;);&quot;YES&quot;;&quot;NO&quot;)">
            <text:p>YES</text:p>
          </table:table-cell>
          <table:covered-table-cell/>
          <table:covered-table-cell/>
          <table:table-cell table:style-name="ce54" table:number-columns-spanned="4" office:value-type="string" office:string-value="YES" table:formula="of:=IF(UPPER(TRIM([.I847]))=&quot;YES&quot;;&quot;YES&quot;;&quot;NO&quot;)">
            <text:p>YES</text:p>
          </table:table-cell>
          <table:covered-table-cell/>
          <table:covered-table-cell/>
          <table:covered-table-cell/>
          <table:table-cell table:style-name="ce54" table:number-columns-spanned="3" office:value-type="string" office:string-value="LISTED" table:formula="of:=IF(UPPER(TRIM([.L847]))=&quot;YES&quot;;&quot;LISTED&quot;;&quot;READY TO LIST&quot;)">
            <text:p>LISTED</text:p>
          </table:table-cell>
          <table:covered-table-cell/>
          <table:covered-table-cell/>
        </table:table-row>
        <table:table-row table:style-name="ro5">
          <table:table-cell table:style-name="ce52" table:number-columns-spanned="18" office:value-type="string" office:string-value="📜 APPEND-ONLY LISTED TRANSITION HISTORY · BUILDS 276–277">
            <text:p>📜 APPEND-ONLY LISTED TRANSITION HISTORY · BUILDS 276–277</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TRANSITION ID">
            <text:p>TRANSITION ID</text:p>
          </table:table-cell>
          <table:covered-table-cell/>
          <table:covered-table-cell/>
          <table:table-cell table:style-name="ce53" table:number-columns-spanned="3" office:value-type="string" office:string-value="RECORD ID">
            <text:p>RECORD ID</text:p>
          </table:table-cell>
          <table:covered-table-cell/>
          <table:covered-table-cell/>
          <table:table-cell table:style-name="ce53" table:number-columns-spanned="3" office:value-type="string" office:string-value="FROM STATE">
            <text:p>FROM STATE</text:p>
          </table:table-cell>
          <table:covered-table-cell/>
          <table:covered-table-cell/>
          <table:table-cell table:style-name="ce53" table:number-columns-spanned="3" office:value-type="string" office:string-value="TO STATE">
            <text:p>TO STATE</text:p>
          </table:table-cell>
          <table:covered-table-cell/>
          <table:covered-table-cell/>
          <table:table-cell table:style-name="ce53" table:number-columns-spanned="3" office:value-type="string" office:string-value="ACTOR">
            <text:p>ACTOR</text:p>
          </table:table-cell>
          <table:covered-table-cell/>
          <table:covered-table-cell/>
          <table:table-cell table:style-name="ce53" table:number-columns-spanned="3" office:value-type="string" office:string-value="RESULT">
            <text:p>RESULT</text:p>
          </table:table-cell>
          <table:covered-table-cell/>
          <table:covered-table-cell/>
        </table:table-row>
        <table:table-row table:style-name="ro5">
          <table:table-cell table:style-name="ce54" table:number-columns-spanned="3" office:value-type="string" office:string-value="TRN-000002">
            <text:p>TRN-000002</text:p>
          </table:table-cell>
          <table:covered-table-cell/>
          <table:covered-table-cell/>
          <table:table-cell table:style-name="ce54" table:number-columns-spanned="3" office:value-type="string" office:string-value="INV-000001">
            <text:p>INV-000001</text:p>
          </table:table-cell>
          <table:covered-table-cell/>
          <table:covered-table-cell/>
          <table:table-cell table:style-name="ce54" table:number-columns-spanned="3" office:value-type="string" office:string-value="READY TO LIST">
            <text:p>READY TO LIST</text:p>
          </table:table-cell>
          <table:covered-table-cell/>
          <table:covered-table-cell/>
          <table:table-cell table:style-name="ce54" table:number-columns-spanned="3" office:value-type="string" office:string-value="LISTED">
            <text:p>LISTED</text:p>
          </table:table-cell>
          <table:covered-table-cell/>
          <table:covered-table-cell/>
          <table:table-cell table:style-name="ce54" table:number-columns-spanned="3" office:value-type="string" office:string-value="MARK · OPERATOR">
            <text:p>MARK · OPERATOR</text:p>
          </table:table-cell>
          <table:covered-table-cell/>
          <table:covered-table-cell/>
          <table:table-cell table:style-name="ce54" table:number-columns-spanned="3" office:value-type="string" office:string-value="EXECUTED">
            <text:p>EXECUTED</text:p>
          </table:table-cell>
          <table:covered-table-cell/>
          <table:covered-table-cell/>
        </table:table-row>
        <table:table-row table:style-name="ro5">
          <table:table-cell table:style-name="ce52" table:number-columns-spanned="18" office:value-type="string" office:string-value="🔍 POST-WRITE VERIFICATION + REPLAY PROTECTION · BUILDS 278–279">
            <text:p>🔍 POST-WRITE VERIFICATION + REPLAY PROTECTION · BUILDS 278–279</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WRITE RESULT">
            <text:p>WRITE RESULT</text:p>
          </table:table-cell>
          <table:covered-table-cell/>
          <table:covered-table-cell/>
          <table:table-cell table:style-name="ce53" table:number-columns-spanned="3" office:value-type="string" office:string-value="HISTORY MATCH">
            <text:p>HISTORY MATCH</text:p>
          </table:table-cell>
          <table:covered-table-cell/>
          <table:covered-table-cell/>
          <table:table-cell table:style-name="ce53" table:number-columns-spanned="3" office:value-type="string" office:string-value="POST-WRITE STATE MATCH">
            <text:p>POST-WRITE STATE MATCH</text:p>
          </table:table-cell>
          <table:covered-table-cell/>
          <table:covered-table-cell/>
          <table:table-cell table:style-name="ce53" table:number-columns-spanned="3" office:value-type="string" office:string-value="COMPLETION">
            <text:p>COMPLETION</text:p>
          </table:table-cell>
          <table:covered-table-cell/>
          <table:covered-table-cell/>
          <table:table-cell table:style-name="ce53" table:number-columns-spanned="3" office:value-type="string" office:string-value="REPLAY RESULT">
            <text:p>REPLAY RESULT</text:p>
          </table:table-cell>
          <table:covered-table-cell/>
          <table:covered-table-cell/>
          <table:table-cell table:style-name="ce53" table:number-columns-spanned="3" office:value-type="string" office:string-value="SECOND WRITE">
            <text:p>SECOND WRITE</text:p>
          </table:table-cell>
          <table:covered-table-cell/>
          <table:covered-table-cell/>
        </table:table-row>
        <table:table-row table:style-name="ro21">
          <table:table-cell table:style-name="ce54" table:number-columns-spanned="3" office:value-type="string" office:string-value="YES" table:formula="of:=[.L847]">
            <text:p>YES</text:p>
          </table:table-cell>
          <table:covered-table-cell/>
          <table:covered-table-cell/>
          <table:table-cell table:style-name="ce54" table:number-columns-spanned="3" office:value-type="string" office:string-value="YES" table:formula="of:=IF(AND(UPPER(TRIM([.D850]))=&quot;INV-000001&quot;;UPPER(TRIM([.G850]))=&quot;READY TO LIST&quot;;UPPER(TRIM([.J850]))=&quot;LISTED&quot;;UPPER(TRIM([.P850]))=&quot;EXECUTED&quot;);&quot;YES&quot;;&quot;NO&quot;)">
            <text:p>YES</text:p>
          </table:table-cell>
          <table:covered-table-cell/>
          <table:covered-table-cell/>
          <table:table-cell table:style-name="ce54" table:number-columns-spanned="3" office:value-type="string" office:string-value="YES" table:formula="of:=IF(UPPER(TRIM([.P847]))=UPPER(TRIM([.J850]));&quot;YES&quot;;&quot;NO&quot;)">
            <text:p>YES</text:p>
          </table:table-cell>
          <table:covered-table-cell/>
          <table:covered-table-cell/>
          <table:table-cell table:style-name="ce54" table:number-columns-spanned="3" office:value-type="string" office:string-value="COMPLETED" table:formula="of:=IF(AND(UPPER(TRIM([.A853]))=&quot;YES&quot;;UPPER(TRIM([.D853]))=&quot;YES&quot;;UPPER(TRIM([.G853]))=&quot;YES&quot;);&quot;COMPLETED&quot;;&quot;INCOMPLETE&quot;)">
            <text:p>COMPLETED</text:p>
          </table:table-cell>
          <table:covered-table-cell/>
          <table:covered-table-cell/>
          <table:table-cell table:style-name="ce54" table:number-columns-spanned="3" office:value-type="string" office:string-value="ALREADY EXECUTED" table:formula="of:=IF(UPPER(TRIM([.J853]))=&quot;COMPLETED&quot;;&quot;ALREADY EXECUTED&quot;;&quot;EXECUTION AVAILABLE&quot;)">
            <text:p>ALREADY EXECUTED</text:p>
          </table:table-cell>
          <table:covered-table-cell/>
          <table:covered-table-cell/>
          <table:table-cell table:style-name="ce54" table:number-columns-spanned="3" office:value-type="string" office:string-value="NO" table:formula="of:=IF(UPPER(TRIM([.M853]))=&quot;ALREADY EXECUTED&quot;;&quot;NO&quot;;&quot;YES&quot;)">
            <text:p>NO</text:p>
          </table:table-cell>
          <table:covered-table-cell/>
          <table:covered-table-cell/>
        </table:table-row>
        <table:table-row table:style-name="ro5">
          <table:table-cell table:style-name="ce52" table:number-columns-spanned="18" office:value-type="string" office:string-value="🏁 CONTROLLED LISTED TRANSITION EXECUTION GATE · BUILD 280">
            <text:p>🏁 CONTROLLED LISTED TRANSITION EXECUTION GATE · BUILD 28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4" table:number-columns-spanned="18" office:value-type="string" office:string-value="VERIFIED PUBLICATION → ELIGIBILITY ONLY · EXPLICIT REQUEST + GRANTED AUTHORITY + EXECUTION COMMIT REQUIRED · CONTROLLED WRITE DERIVES LISTED · APPEND-ONLY HISTORY + POST-WRITE VERIFICATION REQUIRED · REPLAY MUST NOT CREATE SECOND WRITE">
            <text:p>VERIFIED PUBLICATION → ELIGIBILITY ONLY · EXPLICIT REQUEST + GRANTED AUTHORITY + EXECUTION COMMIT REQUIRED · CONTROLLED WRITE DERIVES LISTED · APPEND-ONLY HISTORY + POST-WRITE VERIFICATION REQUIRED · REPLAY MUST NOT CREATE SECOND WRI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2" table:number-columns-spanned="18" office:value-type="string" office:string-value="💰 CONTROLLED SALE EVIDENCE · BUILDS 281–320">
            <text:p>💰 CONTROLLED SALE EVIDENCE · BUILDS 281–32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6" office:value-type="string" office:string-value="SALE QUESTION">
            <text:p>SALE QUESTION</text:p>
          </table:table-cell>
          <table:covered-table-cell/>
          <table:covered-table-cell/>
          <table:covered-table-cell/>
          <table:covered-table-cell/>
          <table:covered-table-cell/>
          <table:table-cell table:style-name="ce53" table:number-columns-spanned="6" office:value-type="string" office:string-value="RESPONSIBILITY">
            <text:p>RESPONSIBILITY</text:p>
          </table:table-cell>
          <table:covered-table-cell/>
          <table:covered-table-cell/>
          <table:covered-table-cell/>
          <table:covered-table-cell/>
          <table:covered-table-cell/>
          <table:table-cell table:style-name="ce53" table:number-columns-spanned="6" office:value-type="string" office:string-value="BOUNDARY">
            <text:p>BOUNDARY</text:p>
          </table:table-cell>
          <table:covered-table-cell/>
          <table:covered-table-cell/>
          <table:covered-table-cell/>
          <table:covered-table-cell/>
          <table:covered-table-cell/>
        </table:table-row>
        <table:table-row table:style-name="ro5">
          <table:table-cell table:style-name="ce54" table:number-columns-spanned="6" office:value-type="string" office:string-value="MAY A LISTED ASSET BECOME VERIFIED SOLD?">
            <text:p>MAY A LISTED ASSET BECOME VERIFIED SOLD?</text:p>
          </table:table-cell>
          <table:covered-table-cell/>
          <table:covered-table-cell/>
          <table:covered-table-cell/>
          <table:covered-table-cell/>
          <table:covered-table-cell/>
          <table:table-cell table:style-name="ce54" table:number-columns-spanned="6" office:value-type="string" office:string-value="INTAKE + IDENTITY + VALUE + QUANTITY + CROSS-CHECK">
            <text:p>INTAKE + IDENTITY + VALUE + QUANTITY + CROSS-CHECK</text:p>
          </table:table-cell>
          <table:covered-table-cell/>
          <table:covered-table-cell/>
          <table:covered-table-cell/>
          <table:covered-table-cell/>
          <table:covered-table-cell/>
          <table:table-cell table:style-name="ce54" table:number-columns-spanned="6" office:value-type="string" office:string-value="LISTED ≠ SOLD · SALE CLAIM ≠ VERIFIED SALE">
            <text:p>LISTED ≠ SOLD · SALE CLAIM ≠ VERIFIED SALE</text:p>
          </table:table-cell>
          <table:covered-table-cell/>
          <table:covered-table-cell/>
          <table:covered-table-cell/>
          <table:covered-table-cell/>
          <table:covered-table-cell/>
        </table:table-row>
        <table:table-row table:style-name="ro5">
          <table:table-cell table:style-name="ce52" table:number-columns-spanned="18" office:value-type="string" office:string-value="📥 SALE EVIDENCE INTAKE · BUILDS 281–290">
            <text:p>📥 SALE EVIDENCE INTAKE · BUILDS 281–29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SALE ID">
            <text:p>SALE ID</text:p>
          </table:table-cell>
          <table:covered-table-cell/>
          <table:covered-table-cell/>
          <table:table-cell table:style-name="ce53" table:number-columns-spanned="3" office:value-type="string" office:string-value="RECORD ID">
            <text:p>RECORD ID</text:p>
          </table:table-cell>
          <table:covered-table-cell/>
          <table:covered-table-cell/>
          <table:table-cell table:style-name="ce53" table:number-columns-spanned="3" office:value-type="string" office:string-value="PLATFORM">
            <text:p>PLATFORM</text:p>
          </table:table-cell>
          <table:covered-table-cell/>
          <table:covered-table-cell/>
          <table:table-cell table:style-name="ce53" table:number-columns-spanned="3" office:value-type="string" office:string-value="MARKETPLACE LISTING ID">
            <text:p>MARKETPLACE LISTING ID</text:p>
          </table:table-cell>
          <table:covered-table-cell/>
          <table:covered-table-cell/>
          <table:table-cell table:style-name="ce53" table:number-columns-spanned="3" office:value-type="string" office:string-value="SALE RECEIVED?">
            <text:p>SALE RECEIVED?</text:p>
          </table:table-cell>
          <table:covered-table-cell/>
          <table:covered-table-cell/>
          <table:table-cell table:style-name="ce53" table:number-columns-spanned="3" office:value-type="string" office:string-value="SALE STATUS">
            <text:p>SALE STATUS</text:p>
          </table:table-cell>
          <table:covered-table-cell/>
          <table:covered-table-cell/>
        </table:table-row>
        <table:table-row table:style-name="ro5">
          <table:table-cell table:style-name="ce54" table:number-columns-spanned="3" office:value-type="string" office:string-value="SALE-000001">
            <text:p>SALE-000001</text:p>
          </table:table-cell>
          <table:covered-table-cell/>
          <table:covered-table-cell/>
          <table:table-cell table:style-name="ce54" table:number-columns-spanned="3" office:value-type="string" office:string-value="INV-000001">
            <text:p>INV-000001</text:p>
          </table:table-cell>
          <table:covered-table-cell/>
          <table:covered-table-cell/>
          <table:table-cell table:style-name="ce54" table:number-columns-spanned="3" office:value-type="string" office:string-value="EBAY">
            <text:p>EBAY</text:p>
          </table:table-cell>
          <table:covered-table-cell/>
          <table:covered-table-cell/>
          <table:table-cell table:style-name="ce54" table:number-columns-spanned="3" office:value-type="string" office:string-value="EBAY-1234567890">
            <text:p>EBAY-1234567890</text:p>
          </table:table-cell>
          <table:covered-table-cell/>
          <table:covered-table-cell/>
          <table:table-cell table:style-name="ce54" table:number-columns-spanned="3" office:value-type="string" office:string-value="YES">
            <text:p>YES</text:p>
          </table:table-cell>
          <table:covered-table-cell/>
          <table:covered-table-cell/>
          <table:table-cell table:style-name="ce54" table:number-columns-spanned="3" office:value-type="string" office:string-value="SOLD">
            <text:p>SOLD</text:p>
          </table:table-cell>
          <table:covered-table-cell/>
          <table:covered-table-cell/>
        </table:table-row>
        <table:table-row table:style-name="ro5">
          <table:table-cell table:style-name="ce53" table:number-columns-spanned="5" office:value-type="string" office:string-value="SALE REFERENCE">
            <text:p>SALE REFERENCE</text:p>
          </table:table-cell>
          <table:covered-table-cell/>
          <table:covered-table-cell/>
          <table:covered-table-cell/>
          <table:covered-table-cell/>
          <table:table-cell table:style-name="ce53" table:number-columns-spanned="5" office:value-type="string" office:string-value="SOLD AT">
            <text:p>SOLD AT</text:p>
          </table:table-cell>
          <table:covered-table-cell/>
          <table:covered-table-cell/>
          <table:covered-table-cell/>
          <table:covered-table-cell/>
          <table:table-cell table:style-name="ce53" table:number-columns-spanned="4" office:value-type="string" office:string-value="GROSS SALE AMOUNT">
            <text:p>GROSS SALE AMOUNT</text:p>
          </table:table-cell>
          <table:covered-table-cell/>
          <table:covered-table-cell/>
          <table:covered-table-cell/>
          <table:table-cell table:style-name="ce53" table:number-columns-spanned="4" office:value-type="string" office:string-value="QUANTITY SOLD">
            <text:p>QUANTITY SOLD</text:p>
          </table:table-cell>
          <table:covered-table-cell/>
          <table:covered-table-cell/>
          <table:covered-table-cell/>
        </table:table-row>
        <table:table-row table:style-name="ro5">
          <table:table-cell table:style-name="ce54" table:number-columns-spanned="5" office:value-type="string" office:string-value="EBAY-SALE-REF-000001">
            <text:p>EBAY-SALE-REF-000001</text:p>
          </table:table-cell>
          <table:covered-table-cell/>
          <table:covered-table-cell/>
          <table:covered-table-cell/>
          <table:covered-table-cell/>
          <table:table-cell table:style-name="ce54" table:number-columns-spanned="5" office:value-type="string" office:string-value="2026-07-06T20:30:00-04:00">
            <text:p>2026-07-06T20:30:00-04:00</text:p>
          </table:table-cell>
          <table:covered-table-cell/>
          <table:covered-table-cell/>
          <table:covered-table-cell/>
          <table:covered-table-cell/>
          <table:table-cell table:style-name="ce54" table:number-columns-spanned="4" office:value-type="string" office:string-value="102.00">
            <text:p>102.00</text:p>
          </table:table-cell>
          <table:covered-table-cell/>
          <table:covered-table-cell/>
          <table:covered-table-cell/>
          <table:table-cell table:style-name="ce54" table:number-columns-spanned="4" office:value-type="string" office:string-value="1">
            <text:p>1</text:p>
          </table:table-cell>
          <table:covered-table-cell/>
          <table:covered-table-cell/>
          <table:covered-table-cell/>
        </table:table-row>
        <table:table-row table:style-name="ro5">
          <table:table-cell table:style-name="ce52" table:number-columns-spanned="18" office:value-type="string" office:string-value="🔗 SALE IDENTITY + MARKETPLACE MATCH · BUILDS 291–300">
            <text:p>🔗 SALE IDENTITY + MARKETPLACE MATCH · BUILDS 291–30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AUTHORITATIVE STATE VALID">
            <text:p>AUTHORITATIVE STATE VALID</text:p>
          </table:table-cell>
          <table:covered-table-cell/>
          <table:covered-table-cell/>
          <table:table-cell table:style-name="ce53" table:number-columns-spanned="3" office:value-type="string" office:string-value="RECORD MATCH">
            <text:p>RECORD MATCH</text:p>
          </table:table-cell>
          <table:covered-table-cell/>
          <table:covered-table-cell/>
          <table:table-cell table:style-name="ce53" table:number-columns-spanned="3" office:value-type="string" office:string-value="PLATFORM MATCH">
            <text:p>PLATFORM MATCH</text:p>
          </table:table-cell>
          <table:covered-table-cell/>
          <table:covered-table-cell/>
          <table:table-cell table:style-name="ce53" table:number-columns-spanned="3" office:value-type="string" office:string-value="LISTING ID MATCH">
            <text:p>LISTING ID MATCH</text:p>
          </table:table-cell>
          <table:covered-table-cell/>
          <table:covered-table-cell/>
          <table:table-cell table:style-name="ce53" table:number-columns-spanned="3" office:value-type="string" office:string-value="SALE RECEIVED VALID">
            <text:p>SALE RECEIVED VALID</text:p>
          </table:table-cell>
          <table:covered-table-cell/>
          <table:covered-table-cell/>
          <table:table-cell table:style-name="ce53" table:number-columns-spanned="3" office:value-type="string" office:string-value="SALE STATUS VALID">
            <text:p>SALE STATUS VALID</text:p>
          </table:table-cell>
          <table:covered-table-cell/>
          <table:covered-table-cell/>
        </table:table-row>
        <table:table-row table:style-name="ro21">
          <table:table-cell table:style-name="ce54" table:number-columns-spanned="3" office:value-type="string" office:string-value="YES" table:formula="of:=IF(UPPER(TRIM([.P847]))=&quot;LISTED&quot;;&quot;YES&quot;;&quot;NO&quot;)">
            <text:p>YES</text:p>
          </table:table-cell>
          <table:covered-table-cell/>
          <table:covered-table-cell/>
          <table:table-cell table:style-name="ce54" table:number-columns-spanned="3" office:value-type="string" office:string-value="YES" table:formula="of:=IF(UPPER(TRIM([.D861]))=&quot;INV-000001&quot;;&quot;YES&quot;;&quot;NO&quot;)">
            <text:p>YES</text:p>
          </table:table-cell>
          <table:covered-table-cell/>
          <table:covered-table-cell/>
          <table:table-cell table:style-name="ce54" table:number-columns-spanned="3" office:value-type="string" office:string-value="YES" table:formula="of:=IF(UPPER(TRIM([.G861]))=&quot;EBAY&quot;;&quot;YES&quot;;&quot;NO&quot;)">
            <text:p>YES</text:p>
          </table:table-cell>
          <table:covered-table-cell/>
          <table:covered-table-cell/>
          <table:table-cell table:style-name="ce54" table:number-columns-spanned="3" office:value-type="string" office:string-value="YES" table:formula="of:=IF(UPPER(TRIM([.J861]))=&quot;EBAY-1234567890&quot;;&quot;YES&quot;;&quot;NO&quot;)">
            <text:p>YES</text:p>
          </table:table-cell>
          <table:covered-table-cell/>
          <table:covered-table-cell/>
          <table:table-cell table:style-name="ce54" table:number-columns-spanned="3" office:value-type="string" office:string-value="YES" table:formula="of:=IF(UPPER(TRIM([.M861]))=&quot;YES&quot;;&quot;YES&quot;;&quot;NO&quot;)">
            <text:p>YES</text:p>
          </table:table-cell>
          <table:covered-table-cell/>
          <table:covered-table-cell/>
          <table:table-cell table:style-name="ce54" table:number-columns-spanned="3" office:value-type="string" office:string-value="YES" table:formula="of:=IF(UPPER(TRIM([.P861]))=&quot;SOLD&quot;;&quot;YES&quot;;&quot;NO&quot;)">
            <text:p>YES</text:p>
          </table:table-cell>
          <table:covered-table-cell/>
          <table:covered-table-cell/>
        </table:table-row>
        <table:table-row table:style-name="ro5">
          <table:table-cell table:style-name="ce52" table:number-columns-spanned="18" office:value-type="string" office:string-value="💵 SALE AMOUNT + QUANTITY VALIDATION · BUILDS 301–310">
            <text:p>💵 SALE AMOUNT + QUANTITY VALIDATION · BUILDS 301–31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SALE REFERENCE PRESENT">
            <text:p>SALE REFERENCE PRESENT</text:p>
          </table:table-cell>
          <table:covered-table-cell/>
          <table:covered-table-cell/>
          <table:covered-table-cell/>
          <table:table-cell table:style-name="ce53" table:number-columns-spanned="4" office:value-type="string" office:string-value="SOLD TIME PRESENT">
            <text:p>SOLD TIME PRESENT</text:p>
          </table:table-cell>
          <table:covered-table-cell/>
          <table:covered-table-cell/>
          <table:covered-table-cell/>
          <table:table-cell table:style-name="ce53" table:number-columns-spanned="3" office:value-type="string" office:string-value="AMOUNT VALID">
            <text:p>AMOUNT VALID</text:p>
          </table:table-cell>
          <table:covered-table-cell/>
          <table:covered-table-cell/>
          <table:table-cell table:style-name="ce53" table:number-columns-spanned="3" office:value-type="string" office:string-value="QUANTITY VALID">
            <text:p>QUANTITY VALID</text:p>
          </table:table-cell>
          <table:covered-table-cell/>
          <table:covered-table-cell/>
          <table:table-cell table:style-name="ce53" table:number-columns-spanned="4" office:value-type="string" office:string-value="SALE EVIDENCE COMPLETE">
            <text:p>SALE EVIDENCE COMPLETE</text:p>
          </table:table-cell>
          <table:covered-table-cell/>
          <table:covered-table-cell/>
          <table:covered-table-cell/>
        </table:table-row>
        <table:table-row table:style-name="ro21">
          <table:table-cell table:style-name="ce54" table:number-columns-spanned="4" office:value-type="string" office:string-value="YES" table:formula="of:=IF(UPPER(TRIM([.A863]))&lt;&gt;&quot;NONE&quot;;&quot;YES&quot;;&quot;NO&quot;)">
            <text:p>YES</text:p>
          </table:table-cell>
          <table:covered-table-cell/>
          <table:covered-table-cell/>
          <table:covered-table-cell/>
          <table:table-cell table:style-name="ce54" table:number-columns-spanned="4" office:value-type="string" office:string-value="YES" table:formula="of:=IF(UPPER(TRIM([.F863]))&lt;&gt;&quot;NONE&quot;;&quot;YES&quot;;&quot;NO&quot;)">
            <text:p>YES</text:p>
          </table:table-cell>
          <table:covered-table-cell/>
          <table:covered-table-cell/>
          <table:covered-table-cell/>
          <table:table-cell table:style-name="ce54" table:number-columns-spanned="3" office:value-type="string" office:string-value="YES" table:formula="of:=IF(VALUE([.K863])&gt;0;&quot;YES&quot;;&quot;NO&quot;)">
            <text:p>YES</text:p>
          </table:table-cell>
          <table:covered-table-cell/>
          <table:covered-table-cell/>
          <table:table-cell table:style-name="ce54" table:number-columns-spanned="3" office:value-type="string" office:string-value="YES" table:formula="of:=IF(VALUE([.O863])&gt;0;&quot;YES&quot;;&quot;NO&quot;)">
            <text:p>YES</text:p>
          </table:table-cell>
          <table:covered-table-cell/>
          <table:covered-table-cell/>
          <table:table-cell table:style-name="ce54" table:number-columns-spanned="4" office:value-type="string" office:string-value="YES" table:formula="of:=IF(AND(UPPER(TRIM([.A866]))=&quot;YES&quot;;UPPER(TRIM([.D866]))=&quot;YES&quot;;UPPER(TRIM([.G866]))=&quot;YES&quot;;UPPER(TRIM([.J866]))=&quot;YES&quot;;UPPER(TRIM([.M866]))=&quot;YES&quot;;UPPER(TRIM([.P866]))=&quot;YES&quot;;UPPER(TRIM([.A869]))=&quot;YES&quot;;UPPER(TRIM([.E869]))=&quot;YES&quot;;UPPER(TRIM([.I869]))=&quot;YES&quot;;UPPER(TRIM([.L869]))=&quot;YES&quot;);&quot;YES&quot;;&quot;NO&quot;)">
            <text:p>YES</text:p>
          </table:table-cell>
          <table:covered-table-cell/>
          <table:covered-table-cell/>
          <table:covered-table-cell/>
        </table:table-row>
        <table:table-row table:style-name="ro5">
          <table:table-cell table:style-name="ce52" table:number-columns-spanned="18" office:value-type="string" office:string-value="✅ VERIFIED SALE CROSS-CHECK · BUILDS 311–320">
            <text:p>✅ VERIFIED SALE CROSS-CHECK · BUILDS 311–32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IDENTITY CHAIN VALID">
            <text:p>IDENTITY CHAIN VALID</text:p>
          </table:table-cell>
          <table:covered-table-cell/>
          <table:covered-table-cell/>
          <table:table-cell table:style-name="ce53" table:number-columns-spanned="3" office:value-type="string" office:string-value="SALE EVIDENCE COMPLETE">
            <text:p>SALE EVIDENCE COMPLETE</text:p>
          </table:table-cell>
          <table:covered-table-cell/>
          <table:covered-table-cell/>
          <table:table-cell table:style-name="ce53" table:number-columns-spanned="3" office:value-type="string" office:string-value="VERIFIED SALE">
            <text:p>VERIFIED SALE</text:p>
          </table:table-cell>
          <table:covered-table-cell/>
          <table:covered-table-cell/>
          <table:table-cell table:style-name="ce53" table:number-columns-spanned="3" office:value-type="string" office:string-value="SALE CONSEQUENCE">
            <text:p>SALE CONSEQUENCE</text:p>
          </table:table-cell>
          <table:covered-table-cell/>
          <table:covered-table-cell/>
          <table:table-cell table:style-name="ce53" table:number-columns-spanned="3" office:value-type="string" office:string-value="SOLD TRANSITION ELIGIBILITY">
            <text:p>SOLD TRANSITION ELIGIBILITY</text:p>
          </table:table-cell>
          <table:covered-table-cell/>
          <table:covered-table-cell/>
          <table:table-cell table:style-name="ce53" table:number-columns-spanned="3" office:value-type="string" office:string-value="STATE WRITE">
            <text:p>STATE WRITE</text:p>
          </table:table-cell>
          <table:covered-table-cell/>
          <table:covered-table-cell/>
        </table:table-row>
        <table:table-row table:style-name="ro21">
          <table:table-cell table:style-name="ce54" table:number-columns-spanned="3" office:value-type="string" office:string-value="YES" table:formula="of:=IF(AND(UPPER(TRIM([.A866]))=&quot;YES&quot;;UPPER(TRIM([.D866]))=&quot;YES&quot;;UPPER(TRIM([.G866]))=&quot;YES&quot;;UPPER(TRIM([.J866]))=&quot;YES&quot;);&quot;YES&quot;;&quot;NO&quot;)">
            <text:p>YES</text:p>
          </table:table-cell>
          <table:covered-table-cell/>
          <table:covered-table-cell/>
          <table:table-cell table:style-name="ce54" table:number-columns-spanned="3" office:value-type="string" office:string-value="YES" table:formula="of:=[.O869]">
            <text:p>YES</text:p>
          </table:table-cell>
          <table:covered-table-cell/>
          <table:covered-table-cell/>
          <table:table-cell table:style-name="ce54" table:number-columns-spanned="3" office:value-type="string" office:string-value="YES" table:formula="of:=IF(AND(UPPER(TRIM([.A872]))=&quot;YES&quot;;UPPER(TRIM([.D872]))=&quot;YES&quot;);&quot;YES&quot;;&quot;NO&quot;)">
            <text:p>YES</text:p>
          </table:table-cell>
          <table:covered-table-cell/>
          <table:covered-table-cell/>
          <table:table-cell table:style-name="ce54" table:number-columns-spanned="3" office:value-type="string" office:string-value="SALE VERIFIED" table:formula="of:=IF(UPPER(TRIM([.G872]))=&quot;YES&quot;;&quot;SALE VERIFIED&quot;;&quot;NONE&quot;)">
            <text:p>SALE VERIFIED</text:p>
          </table:table-cell>
          <table:covered-table-cell/>
          <table:covered-table-cell/>
          <table:table-cell table:style-name="ce54" table:number-columns-spanned="3" office:value-type="string" office:string-value="ELIGIBLE" table:formula="of:=IF(AND(UPPER(TRIM([.G872]))=&quot;YES&quot;;UPPER(TRIM([.J872]))=&quot;SALE VERIFIED&quot;);&quot;ELIGIBLE&quot;;&quot;NOT ELIGIBLE&quot;)">
            <text:p>ELIGIBLE</text:p>
          </table:table-cell>
          <table:covered-table-cell/>
          <table:covered-table-cell/>
          <table:table-cell table:style-name="ce54" table:number-columns-spanned="3" office:value-type="string" office:string-value="NO" table:formula="of:=&quot;NO&quot;">
            <text:p>NO</text:p>
          </table:table-cell>
          <table:covered-table-cell/>
          <table:covered-table-cell/>
        </table:table-row>
        <table:table-row table:style-name="ro5">
          <table:table-cell table:style-name="ce52" table:number-columns-spanned="18" office:value-type="string" office:string-value="🚫 FAIL-CLOSED SALE CASES">
            <text:p>🚫 FAIL-CLOSED SALE CAS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8" office:value-type="string" office:string-value="EVIDENCE CONDITION">
            <text:p>EVIDENCE CONDITION</text:p>
          </table:table-cell>
          <table:covered-table-cell/>
          <table:covered-table-cell/>
          <table:covered-table-cell/>
          <table:covered-table-cell/>
          <table:covered-table-cell/>
          <table:covered-table-cell/>
          <table:covered-table-cell/>
          <table:table-cell table:style-name="ce53" table:number-columns-spanned="5" office:value-type="string" office:string-value="VERIFIED SALE">
            <text:p>VERIFIED SALE</text:p>
          </table:table-cell>
          <table:covered-table-cell/>
          <table:covered-table-cell/>
          <table:covered-table-cell/>
          <table:covered-table-cell/>
          <table:table-cell table:style-name="ce53" table:number-columns-spanned="5" office:value-type="string" office:string-value="SOLD ELIGIBILITY">
            <text:p>SOLD ELIGIBILITY</text:p>
          </table:table-cell>
          <table:covered-table-cell/>
          <table:covered-table-cell/>
          <table:covered-table-cell/>
          <table:covered-table-cell/>
        </table:table-row>
        <table:table-row table:style-name="ro5">
          <table:table-cell table:style-name="ce54" table:number-columns-spanned="8" office:value-type="string" office:string-value="SALE WITHOUT LISTING ID MATCH">
            <text:p>SALE WITHOUT LISTING ID MATCH</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4" table:number-columns-spanned="8" office:value-type="string" office:string-value="SALE WITHOUT REFERENCE">
            <text:p>SALE WITHOUT REFERENCE</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4" table:number-columns-spanned="8" office:value-type="string" office:string-value="SALE WITHOUT SOLD TIME">
            <text:p>SALE WITHOUT SOLD TIME</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4" table:number-columns-spanned="8" office:value-type="string" office:string-value="ZERO OR INVALID AMOUNT">
            <text:p>ZERO OR INVALID AMOUNT</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4" table:number-columns-spanned="8" office:value-type="string" office:string-value="ZERO OR INVALID QUANTITY">
            <text:p>ZERO OR INVALID QUANTITY</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4" table:number-columns-spanned="8" office:value-type="string" office:string-value="RECORD OR PLATFORM MISMATCH">
            <text:p>RECORD OR PLATFORM MISMATCH</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2" table:number-columns-spanned="18" office:value-type="string" office:string-value="🏁 CONTROLLED VERIFIED SALE EVIDENCE GATE · BUILD 320">
            <text:p>🏁 CONTROLLED VERIFIED SALE EVIDENCE GATE · BUILD 32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4" table:number-columns-spanned="18" office:value-type="string" office:string-value="LISTED ≠ SOLD · SALE CLAIM ≠ VERIFIED SALE · VALID IDENTITY + LISTING MATCH + SALE REFERENCE + SOLD TIME + POSITIVE AMOUNT + POSITIVE QUANTITY REQUIRED · VERIFIED SALE → SOLD TRANSITION ELIGIBILITY ONLY · NO DIRECT INVENTORY STATE WRITE">
            <text:p>LISTED ≠ SOLD · SALE CLAIM ≠ VERIFIED SALE · VALID IDENTITY + LISTING MATCH + SALE REFERENCE + SOLD TIME + POSITIVE AMOUNT + POSITIVE QUANTITY REQUIRED · VERIFIED SALE → SOLD TRANSITION ELIGIBILITY ONLY · NO DIRECT INVENTORY STATE WRI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2" table:number-columns-spanned="18" office:value-type="string" office:string-value="💰 CONTROLLED SOLD TRANSITION EXECUTION · BUILDS 321–360">
            <text:p>💰 CONTROLLED SOLD TRANSITION EXECUTION · BUILDS 321–36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6" office:value-type="string" office:string-value="TRANSITION QUESTION">
            <text:p>TRANSITION QUESTION</text:p>
          </table:table-cell>
          <table:covered-table-cell/>
          <table:covered-table-cell/>
          <table:covered-table-cell/>
          <table:covered-table-cell/>
          <table:covered-table-cell/>
          <table:table-cell table:style-name="ce53" table:number-columns-spanned="6" office:value-type="string" office:string-value="RESPONSIBILITY">
            <text:p>RESPONSIBILITY</text:p>
          </table:table-cell>
          <table:covered-table-cell/>
          <table:covered-table-cell/>
          <table:covered-table-cell/>
          <table:covered-table-cell/>
          <table:covered-table-cell/>
          <table:table-cell table:style-name="ce53" table:number-columns-spanned="6" office:value-type="string" office:string-value="BOUNDARY">
            <text:p>BOUNDARY</text:p>
          </table:table-cell>
          <table:covered-table-cell/>
          <table:covered-table-cell/>
          <table:covered-table-cell/>
          <table:covered-table-cell/>
          <table:covered-table-cell/>
        </table:table-row>
        <table:table-row table:style-name="ro5">
          <table:table-cell table:style-name="ce54" table:number-columns-spanned="6" office:value-type="string" office:string-value="MAY VERIFIED SALE BECOME AUTHORITATIVE SOLD STATE?">
            <text:p>MAY VERIFIED SALE BECOME AUTHORITATIVE SOLD STATE?</text:p>
          </table:table-cell>
          <table:covered-table-cell/>
          <table:covered-table-cell/>
          <table:covered-table-cell/>
          <table:covered-table-cell/>
          <table:covered-table-cell/>
          <table:table-cell table:style-name="ce54" table:number-columns-spanned="6" office:value-type="string" office:string-value="REQUEST + AUTHORIZE + COMMIT + EXECUTE + VERIFY">
            <text:p>REQUEST + AUTHORIZE + COMMIT + EXECUTE + VERIFY</text:p>
          </table:table-cell>
          <table:covered-table-cell/>
          <table:covered-table-cell/>
          <table:covered-table-cell/>
          <table:covered-table-cell/>
          <table:covered-table-cell/>
          <table:table-cell table:style-name="ce54" table:number-columns-spanned="6" office:value-type="string" office:string-value="VERIFIED SALE ≠ SOLD · AUTHORITY ≠ EXECUTION">
            <text:p>VERIFIED SALE ≠ SOLD · AUTHORITY ≠ EXECUTION</text:p>
          </table:table-cell>
          <table:covered-table-cell/>
          <table:covered-table-cell/>
          <table:covered-table-cell/>
          <table:covered-table-cell/>
          <table:covered-table-cell/>
        </table:table-row>
        <table:table-row table:style-name="ro5">
          <table:table-cell table:style-name="ce52" table:number-columns-spanned="18" office:value-type="string" office:string-value="📥 EXPLICIT SOLD TRANSITION REQUEST · BUILDS 321–330">
            <text:p>📥 EXPLICIT SOLD TRANSITION REQUEST · BUILDS 321–33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RECORD ID">
            <text:p>RECORD ID</text:p>
          </table:table-cell>
          <table:covered-table-cell/>
          <table:covered-table-cell/>
          <table:covered-table-cell/>
          <table:table-cell table:style-name="ce53" table:number-columns-spanned="5" office:value-type="string" office:string-value="REQUESTED TRANSITION">
            <text:p>REQUESTED TRANSITION</text:p>
          </table:table-cell>
          <table:covered-table-cell/>
          <table:covered-table-cell/>
          <table:covered-table-cell/>
          <table:covered-table-cell/>
          <table:table-cell table:style-name="ce53" table:number-columns-spanned="4" office:value-type="string" office:string-value="REQUEST STATUS">
            <text:p>REQUEST STATUS</text:p>
          </table:table-cell>
          <table:covered-table-cell/>
          <table:covered-table-cell/>
          <table:covered-table-cell/>
          <table:table-cell table:style-name="ce53" table:number-columns-spanned="5" office:value-type="string" office:string-value="REQUESTED BY">
            <text:p>REQUESTED BY</text:p>
          </table:table-cell>
          <table:covered-table-cell/>
          <table:covered-table-cell/>
          <table:covered-table-cell/>
          <table:covered-table-cell/>
        </table:table-row>
        <table:table-row table:style-name="ro5">
          <table:table-cell table:style-name="ce54" table:number-columns-spanned="4" office:value-type="string" office:string-value="INV-000001">
            <text:p>INV-000001</text:p>
          </table:table-cell>
          <table:covered-table-cell/>
          <table:covered-table-cell/>
          <table:covered-table-cell/>
          <table:table-cell table:style-name="ce54" table:number-columns-spanned="5" office:value-type="string" office:string-value="LISTED → SOLD">
            <text:p>LISTED → SOLD</text:p>
          </table:table-cell>
          <table:covered-table-cell/>
          <table:covered-table-cell/>
          <table:covered-table-cell/>
          <table:covered-table-cell/>
          <table:table-cell table:style-name="ce54" table:number-columns-spanned="4" office:value-type="string" office:string-value="REQUESTED">
            <text:p>REQUESTED</text:p>
          </table:table-cell>
          <table:covered-table-cell/>
          <table:covered-table-cell/>
          <table:covered-table-cell/>
          <table:table-cell table:style-name="ce54" table:number-columns-spanned="5" office:value-type="string" office:string-value="MARK · OPERATOR">
            <text:p>MARK · OPERATOR</text:p>
          </table:table-cell>
          <table:covered-table-cell/>
          <table:covered-table-cell/>
          <table:covered-table-cell/>
          <table:covered-table-cell/>
        </table:table-row>
        <table:table-row table:style-name="ro5">
          <table:table-cell table:style-name="ce53" table:number-columns-spanned="4" office:value-type="string" office:string-value="ELIGIBILITY VALID">
            <text:p>ELIGIBILITY VALID</text:p>
          </table:table-cell>
          <table:covered-table-cell/>
          <table:covered-table-cell/>
          <table:covered-table-cell/>
          <table:table-cell table:style-name="ce53" table:number-columns-spanned="5" office:value-type="string" office:string-value="REQUEST VALID">
            <text:p>REQUEST VALID</text:p>
          </table:table-cell>
          <table:covered-table-cell/>
          <table:covered-table-cell/>
          <table:covered-table-cell/>
          <table:covered-table-cell/>
          <table:table-cell table:style-name="ce53" table:number-columns-spanned="4" office:value-type="string" office:string-value="ACTOR PRESENT">
            <text:p>ACTOR PRESENT</text:p>
          </table:table-cell>
          <table:covered-table-cell/>
          <table:covered-table-cell/>
          <table:covered-table-cell/>
          <table:table-cell table:style-name="ce53" table:number-columns-spanned="5" office:value-type="string" office:string-value="REQUEST RESULT">
            <text:p>REQUEST RESULT</text:p>
          </table:table-cell>
          <table:covered-table-cell/>
          <table:covered-table-cell/>
          <table:covered-table-cell/>
          <table:covered-table-cell/>
        </table:table-row>
        <table:table-row table:style-name="ro21">
          <table:table-cell table:style-name="ce54" table:number-columns-spanned="4" office:value-type="string" office:string-value="YES" table:formula="of:=IF(UPPER(TRIM([.M872]))=&quot;ELIGIBLE&quot;;&quot;YES&quot;;&quot;NO&quot;)">
            <text:p>YES</text:p>
          </table:table-cell>
          <table:covered-table-cell/>
          <table:covered-table-cell/>
          <table:covered-table-cell/>
          <table:table-cell table:style-name="ce54" table:number-columns-spanned="5" office:value-type="string" office:string-value="YES" table:formula="of:=IF(AND(UPPER(TRIM([.A889]))=&quot;INV-000001&quot;;UPPER(TRIM([.E889]))=&quot;LISTED → SOLD&quot;;UPPER(TRIM([.J889]))=&quot;REQUESTED&quot;);&quot;YES&quot;;&quot;NO&quot;)">
            <text:p>YES</text:p>
          </table:table-cell>
          <table:covered-table-cell/>
          <table:covered-table-cell/>
          <table:covered-table-cell/>
          <table:covered-table-cell/>
          <table:table-cell table:style-name="ce54" table:number-columns-spanned="4" office:value-type="string" office:string-value="YES" table:formula="of:=IF(TRIM([.N889])&lt;&gt;&quot;&quot;;&quot;YES&quot;;&quot;NO&quot;)">
            <text:p>YES</text:p>
          </table:table-cell>
          <table:covered-table-cell/>
          <table:covered-table-cell/>
          <table:covered-table-cell/>
          <table:table-cell table:style-name="ce54" table:number-columns-spanned="5" office:value-type="string" office:string-value="VALID REQUEST" table:formula="of:=IF(AND(UPPER(TRIM([.A891]))=&quot;YES&quot;;UPPER(TRIM([.E891]))=&quot;YES&quot;;UPPER(TRIM([.J891]))=&quot;YES&quot;);&quot;VALID REQUEST&quot;;&quot;INVALID REQUEST&quot;)">
            <text:p>VALID REQUEST</text:p>
          </table:table-cell>
          <table:covered-table-cell/>
          <table:covered-table-cell/>
          <table:covered-table-cell/>
          <table:covered-table-cell/>
        </table:table-row>
        <table:table-row table:style-name="ro5">
          <table:table-cell table:style-name="ce52" table:number-columns-spanned="18" office:value-type="string" office:string-value="🛡️ SOLD TRANSITION AUTHORITY · BUILDS 331–340">
            <text:p>🛡️ SOLD TRANSITION AUTHORITY · BUILDS 331–34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CURRENT STATE VALID">
            <text:p>CURRENT STATE VALID</text:p>
          </table:table-cell>
          <table:covered-table-cell/>
          <table:covered-table-cell/>
          <table:table-cell table:style-name="ce53" table:number-columns-spanned="4" office:value-type="string" office:string-value="VERIFIED SALE VALID">
            <text:p>VERIFIED SALE VALID</text:p>
          </table:table-cell>
          <table:covered-table-cell/>
          <table:covered-table-cell/>
          <table:covered-table-cell/>
          <table:table-cell table:style-name="ce53" table:number-columns-spanned="4" office:value-type="string" office:string-value="REQUEST VALID">
            <text:p>REQUEST VALID</text:p>
          </table:table-cell>
          <table:covered-table-cell/>
          <table:covered-table-cell/>
          <table:covered-table-cell/>
          <table:table-cell table:style-name="ce53" table:number-columns-spanned="3" office:value-type="string" office:string-value="ACTOR AUTHORIZED">
            <text:p>ACTOR AUTHORIZED</text:p>
          </table:table-cell>
          <table:covered-table-cell/>
          <table:covered-table-cell/>
          <table:table-cell table:style-name="ce53" table:number-columns-spanned="4" office:value-type="string" office:string-value="AUTHORITY RESULT">
            <text:p>AUTHORITY RESULT</text:p>
          </table:table-cell>
          <table:covered-table-cell/>
          <table:covered-table-cell/>
          <table:covered-table-cell/>
        </table:table-row>
        <table:table-row table:style-name="ro21">
          <table:table-cell table:style-name="ce54" table:number-columns-spanned="3" office:value-type="string" office:string-value="YES" table:formula="of:=IF(UPPER(TRIM([.P847]))=&quot;LISTED&quot;;&quot;YES&quot;;&quot;NO&quot;)">
            <text:p>YES</text:p>
          </table:table-cell>
          <table:covered-table-cell/>
          <table:covered-table-cell/>
          <table:table-cell table:style-name="ce54" table:number-columns-spanned="4" office:value-type="string" office:string-value="YES" table:formula="of:=IF(UPPER(TRIM([.G872]))=&quot;YES&quot;;&quot;YES&quot;;&quot;NO&quot;)">
            <text:p>YES</text:p>
          </table:table-cell>
          <table:covered-table-cell/>
          <table:covered-table-cell/>
          <table:covered-table-cell/>
          <table:table-cell table:style-name="ce54" table:number-columns-spanned="4" office:value-type="string" office:string-value="YES" table:formula="of:=IF(UPPER(TRIM([.N891]))=&quot;VALID REQUEST&quot;;&quot;YES&quot;;&quot;NO&quot;)">
            <text:p>YES</text:p>
          </table:table-cell>
          <table:covered-table-cell/>
          <table:covered-table-cell/>
          <table:covered-table-cell/>
          <table:table-cell table:style-name="ce54" table:number-columns-spanned="3" office:value-type="string" office:string-value="YES" table:formula="of:=IF(UPPER(TRIM([.N889]))=&quot;MARK · OPERATOR&quot;;&quot;YES&quot;;&quot;NO&quot;)">
            <text:p>YES</text:p>
          </table:table-cell>
          <table:covered-table-cell/>
          <table:covered-table-cell/>
          <table:table-cell table:style-name="ce54" table:number-columns-spanned="4" office:value-type="string" office:string-value="GRANTED" table:formula="of:=IF(AND(UPPER(TRIM([.A894]))=&quot;YES&quot;;UPPER(TRIM([.D894]))=&quot;YES&quot;;UPPER(TRIM([.H894]))=&quot;YES&quot;;UPPER(TRIM([.L894]))=&quot;YES&quot;);&quot;GRANTED&quot;;&quot;DENIED&quot;)">
            <text:p>GRANTED</text:p>
          </table:table-cell>
          <table:covered-table-cell/>
          <table:covered-table-cell/>
          <table:covered-table-cell/>
        </table:table-row>
        <table:table-row table:style-name="ro5">
          <table:table-cell table:style-name="ce52" table:number-columns-spanned="18" office:value-type="string" office:string-value="⚙️ EXECUTION COMMIT + CONTROLLED SOLD STATE WRITE · BUILDS 341–350">
            <text:p>⚙️ EXECUTION COMMIT + CONTROLLED SOLD STATE WRITE · BUILDS 341–3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EXECUTION COMMIT">
            <text:p>EXECUTION COMMIT</text:p>
          </table:table-cell>
          <table:covered-table-cell/>
          <table:covered-table-cell/>
          <table:covered-table-cell/>
          <table:table-cell table:style-name="ce53" table:number-columns-spanned="4" office:value-type="string" office:string-value="AUTHORITY REVALIDATED">
            <text:p>AUTHORITY REVALIDATED</text:p>
          </table:table-cell>
          <table:covered-table-cell/>
          <table:covered-table-cell/>
          <table:covered-table-cell/>
          <table:table-cell table:style-name="ce53" table:number-columns-spanned="3" office:value-type="string" office:string-value="WRITE ELIGIBLE">
            <text:p>WRITE ELIGIBLE</text:p>
          </table:table-cell>
          <table:covered-table-cell/>
          <table:covered-table-cell/>
          <table:table-cell table:style-name="ce53" table:number-columns-spanned="4" office:value-type="string" office:string-value="CONTROLLED STATE WRITE">
            <text:p>CONTROLLED STATE WRITE</text:p>
          </table:table-cell>
          <table:covered-table-cell/>
          <table:covered-table-cell/>
          <table:covered-table-cell/>
          <table:table-cell table:style-name="ce53" table:number-columns-spanned="3" office:value-type="string" office:string-value="DERIVED NEW STATE">
            <text:p>DERIVED NEW STATE</text:p>
          </table:table-cell>
          <table:covered-table-cell/>
          <table:covered-table-cell/>
        </table:table-row>
        <table:table-row table:style-name="ro21">
          <table:table-cell table:style-name="ce54" table:number-columns-spanned="4" office:value-type="string" office:string-value="EXECUTE SOLD TRANSITION">
            <text:p>EXECUTE SOLD TRANSITION</text:p>
          </table:table-cell>
          <table:covered-table-cell/>
          <table:covered-table-cell/>
          <table:covered-table-cell/>
          <table:table-cell table:style-name="ce54" table:number-columns-spanned="4" office:value-type="string" office:string-value="YES" table:formula="of:=IF(UPPER(TRIM([.O894]))=&quot;GRANTED&quot;;&quot;YES&quot;;&quot;NO&quot;)">
            <text:p>YES</text:p>
          </table:table-cell>
          <table:covered-table-cell/>
          <table:covered-table-cell/>
          <table:covered-table-cell/>
          <table:table-cell table:style-name="ce54" table:number-columns-spanned="3" office:value-type="string" office:string-value="YES" table:formula="of:=IF(AND(UPPER(TRIM([.A897]))=&quot;EXECUTE SOLD TRANSITION&quot;;UPPER(TRIM([.E897]))=&quot;YES&quot;);&quot;YES&quot;;&quot;NO&quot;)">
            <text:p>YES</text:p>
          </table:table-cell>
          <table:covered-table-cell/>
          <table:covered-table-cell/>
          <table:table-cell table:style-name="ce54" table:number-columns-spanned="4" office:value-type="string" office:string-value="YES" table:formula="of:=IF(UPPER(TRIM([.I897]))=&quot;YES&quot;;&quot;YES&quot;;&quot;NO&quot;)">
            <text:p>YES</text:p>
          </table:table-cell>
          <table:covered-table-cell/>
          <table:covered-table-cell/>
          <table:covered-table-cell/>
          <table:table-cell table:style-name="ce54" table:number-columns-spanned="3" office:value-type="string" office:string-value="SOLD" table:formula="of:=IF(UPPER(TRIM([.L897]))=&quot;YES&quot;;&quot;SOLD&quot;;&quot;LISTED&quot;)">
            <text:p>SOLD</text:p>
          </table:table-cell>
          <table:covered-table-cell/>
          <table:covered-table-cell/>
        </table:table-row>
        <table:table-row table:style-name="ro5">
          <table:table-cell table:style-name="ce52" table:number-columns-spanned="18" office:value-type="string" office:string-value="📜 APPEND-ONLY SOLD TRANSITION HISTORY · BUILDS 351–354">
            <text:p>📜 APPEND-ONLY SOLD TRANSITION HISTORY · BUILDS 351–354</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TRANSITION ID">
            <text:p>TRANSITION ID</text:p>
          </table:table-cell>
          <table:covered-table-cell/>
          <table:covered-table-cell/>
          <table:table-cell table:style-name="ce53" table:number-columns-spanned="3" office:value-type="string" office:string-value="RECORD ID">
            <text:p>RECORD ID</text:p>
          </table:table-cell>
          <table:covered-table-cell/>
          <table:covered-table-cell/>
          <table:table-cell table:style-name="ce53" table:number-columns-spanned="3" office:value-type="string" office:string-value="FROM STATE">
            <text:p>FROM STATE</text:p>
          </table:table-cell>
          <table:covered-table-cell/>
          <table:covered-table-cell/>
          <table:table-cell table:style-name="ce53" table:number-columns-spanned="3" office:value-type="string" office:string-value="TO STATE">
            <text:p>TO STATE</text:p>
          </table:table-cell>
          <table:covered-table-cell/>
          <table:covered-table-cell/>
          <table:table-cell table:style-name="ce53" table:number-columns-spanned="3" office:value-type="string" office:string-value="ACTOR">
            <text:p>ACTOR</text:p>
          </table:table-cell>
          <table:covered-table-cell/>
          <table:covered-table-cell/>
          <table:table-cell table:style-name="ce53" table:number-columns-spanned="3" office:value-type="string" office:string-value="RESULT">
            <text:p>RESULT</text:p>
          </table:table-cell>
          <table:covered-table-cell/>
          <table:covered-table-cell/>
        </table:table-row>
        <table:table-row table:style-name="ro5">
          <table:table-cell table:style-name="ce54" table:number-columns-spanned="3" office:value-type="string" office:string-value="TRN-000003">
            <text:p>TRN-000003</text:p>
          </table:table-cell>
          <table:covered-table-cell/>
          <table:covered-table-cell/>
          <table:table-cell table:style-name="ce54" table:number-columns-spanned="3" office:value-type="string" office:string-value="INV-000001">
            <text:p>INV-000001</text:p>
          </table:table-cell>
          <table:covered-table-cell/>
          <table:covered-table-cell/>
          <table:table-cell table:style-name="ce54" table:number-columns-spanned="3" office:value-type="string" office:string-value="LISTED">
            <text:p>LISTED</text:p>
          </table:table-cell>
          <table:covered-table-cell/>
          <table:covered-table-cell/>
          <table:table-cell table:style-name="ce54" table:number-columns-spanned="3" office:value-type="string" office:string-value="SOLD">
            <text:p>SOLD</text:p>
          </table:table-cell>
          <table:covered-table-cell/>
          <table:covered-table-cell/>
          <table:table-cell table:style-name="ce54" table:number-columns-spanned="3" office:value-type="string" office:string-value="MARK · OPERATOR">
            <text:p>MARK · OPERATOR</text:p>
          </table:table-cell>
          <table:covered-table-cell/>
          <table:covered-table-cell/>
          <table:table-cell table:style-name="ce54" table:number-columns-spanned="3" office:value-type="string" office:string-value="EXECUTED">
            <text:p>EXECUTED</text:p>
          </table:table-cell>
          <table:covered-table-cell/>
          <table:covered-table-cell/>
        </table:table-row>
        <table:table-row table:style-name="ro5">
          <table:table-cell table:style-name="ce52" table:number-columns-spanned="18" office:value-type="string" office:string-value="🔍 POST-WRITE VERIFICATION + REPLAY PROTECTION · BUILDS 355–359">
            <text:p>🔍 POST-WRITE VERIFICATION + REPLAY PROTECTION · BUILDS 355–359</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WRITE RESULT">
            <text:p>WRITE RESULT</text:p>
          </table:table-cell>
          <table:covered-table-cell/>
          <table:covered-table-cell/>
          <table:table-cell table:style-name="ce53" table:number-columns-spanned="3" office:value-type="string" office:string-value="HISTORY MATCH">
            <text:p>HISTORY MATCH</text:p>
          </table:table-cell>
          <table:covered-table-cell/>
          <table:covered-table-cell/>
          <table:table-cell table:style-name="ce53" table:number-columns-spanned="3" office:value-type="string" office:string-value="POST-WRITE STATE MATCH">
            <text:p>POST-WRITE STATE MATCH</text:p>
          </table:table-cell>
          <table:covered-table-cell/>
          <table:covered-table-cell/>
          <table:table-cell table:style-name="ce53" table:number-columns-spanned="3" office:value-type="string" office:string-value="COMPLETION">
            <text:p>COMPLETION</text:p>
          </table:table-cell>
          <table:covered-table-cell/>
          <table:covered-table-cell/>
          <table:table-cell table:style-name="ce53" table:number-columns-spanned="3" office:value-type="string" office:string-value="REPLAY RESULT">
            <text:p>REPLAY RESULT</text:p>
          </table:table-cell>
          <table:covered-table-cell/>
          <table:covered-table-cell/>
          <table:table-cell table:style-name="ce53" table:number-columns-spanned="3" office:value-type="string" office:string-value="SECOND WRITE">
            <text:p>SECOND WRITE</text:p>
          </table:table-cell>
          <table:covered-table-cell/>
          <table:covered-table-cell/>
        </table:table-row>
        <table:table-row table:style-name="ro21">
          <table:table-cell table:style-name="ce54" table:number-columns-spanned="3" office:value-type="string" office:string-value="YES" table:formula="of:=[.L897]">
            <text:p>YES</text:p>
          </table:table-cell>
          <table:covered-table-cell/>
          <table:covered-table-cell/>
          <table:table-cell table:style-name="ce54" table:number-columns-spanned="3" office:value-type="string" office:string-value="YES" table:formula="of:=IF(AND(UPPER(TRIM([.D900]))=&quot;INV-000001&quot;;UPPER(TRIM([.G900]))=&quot;LISTED&quot;;UPPER(TRIM([.J900]))=&quot;SOLD&quot;;UPPER(TRIM([.P900]))=&quot;EXECUTED&quot;);&quot;YES&quot;;&quot;NO&quot;)">
            <text:p>YES</text:p>
          </table:table-cell>
          <table:covered-table-cell/>
          <table:covered-table-cell/>
          <table:table-cell table:style-name="ce54" table:number-columns-spanned="3" office:value-type="string" office:string-value="YES" table:formula="of:=IF(UPPER(TRIM([.P897]))=UPPER(TRIM([.J900]));&quot;YES&quot;;&quot;NO&quot;)">
            <text:p>YES</text:p>
          </table:table-cell>
          <table:covered-table-cell/>
          <table:covered-table-cell/>
          <table:table-cell table:style-name="ce54" table:number-columns-spanned="3" office:value-type="string" office:string-value="COMPLETED" table:formula="of:=IF(AND(UPPER(TRIM([.A903]))=&quot;YES&quot;;UPPER(TRIM([.D903]))=&quot;YES&quot;;UPPER(TRIM([.G903]))=&quot;YES&quot;);&quot;COMPLETED&quot;;&quot;INCOMPLETE&quot;)">
            <text:p>COMPLETED</text:p>
          </table:table-cell>
          <table:covered-table-cell/>
          <table:covered-table-cell/>
          <table:table-cell table:style-name="ce54" table:number-columns-spanned="3" office:value-type="string" office:string-value="ALREADY EXECUTED" table:formula="of:=IF(UPPER(TRIM([.J903]))=&quot;COMPLETED&quot;;&quot;ALREADY EXECUTED&quot;;&quot;EXECUTION AVAILABLE&quot;)">
            <text:p>ALREADY EXECUTED</text:p>
          </table:table-cell>
          <table:covered-table-cell/>
          <table:covered-table-cell/>
          <table:table-cell table:style-name="ce54" table:number-columns-spanned="3" office:value-type="string" office:string-value="NO" table:formula="of:=IF(UPPER(TRIM([.M903]))=&quot;ALREADY EXECUTED&quot;;&quot;NO&quot;;&quot;YES&quot;)">
            <text:p>NO</text:p>
          </table:table-cell>
          <table:covered-table-cell/>
          <table:covered-table-cell/>
        </table:table-row>
        <table:table-row table:style-name="ro5">
          <table:table-cell table:style-name="ce52" table:number-columns-spanned="18" office:value-type="string" office:string-value="🏁 CONTROLLED SOLD TRANSITION EXECUTION GATE · BUILD 360">
            <text:p>🏁 CONTROLLED SOLD TRANSITION EXECUTION GATE · BUILD 36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4" table:number-columns-spanned="18" office:value-type="string" office:string-value="VERIFIED SALE → SOLD ELIGIBILITY ONLY · EXPLICIT REQUEST + GRANTED AUTHORITY + EXECUTION COMMIT REQUIRED · CONTROLLED WRITE DERIVES SOLD · APPEND-ONLY HISTORY + POST-WRITE VERIFICATION REQUIRED · REPLAY MUST NOT CREATE SECOND WRITE">
            <text:p>VERIFIED SALE → SOLD ELIGIBILITY ONLY · EXPLICIT REQUEST + GRANTED AUTHORITY + EXECUTION COMMIT REQUIRED · CONTROLLED WRITE DERIVES SOLD · APPEND-ONLY HISTORY + POST-WRITE VERIFICATION REQUIRED · REPLAY MUST NOT CREATE SECOND WRI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2" table:number-columns-spanned="18" office:value-type="string" office:string-value="💵 SALE REVENUE AUTHORITY · BUILDS 361–380">
            <text:p>💵 SALE REVENUE AUTHORITY · BUILDS 361–38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6" office:value-type="string" office:string-value="FINANCIAL QUESTION">
            <text:p>FINANCIAL QUESTION</text:p>
          </table:table-cell>
          <table:covered-table-cell/>
          <table:covered-table-cell/>
          <table:covered-table-cell/>
          <table:covered-table-cell/>
          <table:covered-table-cell/>
          <table:table-cell table:style-name="ce53" table:number-columns-spanned="6" office:value-type="string" office:string-value="RESPONSIBILITY">
            <text:p>RESPONSIBILITY</text:p>
          </table:table-cell>
          <table:covered-table-cell/>
          <table:covered-table-cell/>
          <table:covered-table-cell/>
          <table:covered-table-cell/>
          <table:covered-table-cell/>
          <table:table-cell table:style-name="ce53" table:number-columns-spanned="6" office:value-type="string" office:string-value="BOUNDARY">
            <text:p>BOUNDARY</text:p>
          </table:table-cell>
          <table:covered-table-cell/>
          <table:covered-table-cell/>
          <table:covered-table-cell/>
          <table:covered-table-cell/>
          <table:covered-table-cell/>
        </table:table-row>
        <table:table-row table:style-name="ro5">
          <table:table-cell table:style-name="ce54" table:number-columns-spanned="6" office:value-type="string" office:string-value="MAY VERIFIED SALE VALUE BECOME AUTHORITATIVE REVENUE?">
            <text:p>MAY VERIFIED SALE VALUE BECOME AUTHORITATIVE REVENUE?</text:p>
          </table:table-cell>
          <table:covered-table-cell/>
          <table:covered-table-cell/>
          <table:covered-table-cell/>
          <table:covered-table-cell/>
          <table:covered-table-cell/>
          <table:table-cell table:style-name="ce54" table:number-columns-spanned="6" office:value-type="string" office:string-value="SALE IDENTITY + VERIFIED SALE + AMOUNT + QUANTITY + CROSS-CHECK">
            <text:p>SALE IDENTITY + VERIFIED SALE + AMOUNT + QUANTITY + CROSS-CHECK</text:p>
          </table:table-cell>
          <table:covered-table-cell/>
          <table:covered-table-cell/>
          <table:covered-table-cell/>
          <table:covered-table-cell/>
          <table:covered-table-cell/>
          <table:table-cell table:style-name="ce54" table:number-columns-spanned="6" office:value-type="string" office:string-value="SALE CLAIM ≠ REVENUE · SOLD STATE ≠ REVENUE">
            <text:p>SALE CLAIM ≠ REVENUE · SOLD STATE ≠ REVENUE</text:p>
          </table:table-cell>
          <table:covered-table-cell/>
          <table:covered-table-cell/>
          <table:covered-table-cell/>
          <table:covered-table-cell/>
          <table:covered-table-cell/>
        </table:table-row>
        <table:table-row table:style-name="ro5">
          <table:table-cell table:style-name="ce53" table:number-columns-spanned="3" office:value-type="string" office:string-value="SALE ID">
            <text:p>SALE ID</text:p>
          </table:table-cell>
          <table:covered-table-cell/>
          <table:covered-table-cell/>
          <table:table-cell table:style-name="ce53" table:number-columns-spanned="4" office:value-type="string" office:string-value="RECORD ID">
            <text:p>RECORD ID</text:p>
          </table:table-cell>
          <table:covered-table-cell/>
          <table:covered-table-cell/>
          <table:covered-table-cell/>
          <table:table-cell table:style-name="ce53" table:number-columns-spanned="4" office:value-type="string" office:string-value="VERIFIED SALE">
            <text:p>VERIFIED SALE</text:p>
          </table:table-cell>
          <table:covered-table-cell/>
          <table:covered-table-cell/>
          <table:covered-table-cell/>
          <table:table-cell table:style-name="ce53" table:number-columns-spanned="4" office:value-type="string" office:string-value="GROSS SALE AMOUNT">
            <text:p>GROSS SALE AMOUNT</text:p>
          </table:table-cell>
          <table:covered-table-cell/>
          <table:covered-table-cell/>
          <table:covered-table-cell/>
          <table:table-cell table:style-name="ce53" table:number-columns-spanned="3" office:value-type="string" office:string-value="QUANTITY SOLD">
            <text:p>QUANTITY SOLD</text:p>
          </table:table-cell>
          <table:covered-table-cell/>
          <table:covered-table-cell/>
        </table:table-row>
        <table:table-row table:style-name="ro5">
          <table:table-cell table:style-name="ce54" table:number-columns-spanned="3" office:value-type="string" office:string-value="SALE-000001">
            <text:p>SALE-000001</text:p>
          </table:table-cell>
          <table:covered-table-cell/>
          <table:covered-table-cell/>
          <table:table-cell table:style-name="ce54" table:number-columns-spanned="4" office:value-type="string" office:string-value="INV-000001">
            <text:p>INV-000001</text:p>
          </table:table-cell>
          <table:covered-table-cell/>
          <table:covered-table-cell/>
          <table:covered-table-cell/>
          <table:table-cell table:style-name="ce54" table:number-columns-spanned="4" office:value-type="string" office:string-value="YES">
            <text:p>YES</text:p>
          </table:table-cell>
          <table:covered-table-cell/>
          <table:covered-table-cell/>
          <table:covered-table-cell/>
          <table:table-cell table:style-name="ce54" table:number-columns-spanned="4" office:value-type="string" office:string-value="102.00">
            <text:p>102.00</text:p>
          </table:table-cell>
          <table:covered-table-cell/>
          <table:covered-table-cell/>
          <table:covered-table-cell/>
          <table:table-cell table:style-name="ce54" table:number-columns-spanned="3" office:value-type="string" office:string-value="1">
            <text:p>1</text:p>
          </table:table-cell>
          <table:covered-table-cell/>
          <table:covered-table-cell/>
        </table:table-row>
        <table:table-row table:style-name="ro5">
          <table:table-cell table:style-name="ce53" table:number-columns-spanned="3" office:value-type="string" office:string-value="SALE ID VALID">
            <text:p>SALE ID VALID</text:p>
          </table:table-cell>
          <table:covered-table-cell/>
          <table:covered-table-cell/>
          <table:table-cell table:style-name="ce53" table:number-columns-spanned="3" office:value-type="string" office:string-value="RECORD MATCH">
            <text:p>RECORD MATCH</text:p>
          </table:table-cell>
          <table:covered-table-cell/>
          <table:covered-table-cell/>
          <table:table-cell table:style-name="ce53" table:number-columns-spanned="3" office:value-type="string" office:string-value="VERIFIED SALE VALID">
            <text:p>VERIFIED SALE VALID</text:p>
          </table:table-cell>
          <table:covered-table-cell/>
          <table:covered-table-cell/>
          <table:table-cell table:style-name="ce53" table:number-columns-spanned="3" office:value-type="string" office:string-value="AMOUNT VALID">
            <text:p>AMOUNT VALID</text:p>
          </table:table-cell>
          <table:covered-table-cell/>
          <table:covered-table-cell/>
          <table:table-cell table:style-name="ce53" table:number-columns-spanned="3" office:value-type="string" office:string-value="QUANTITY VALID">
            <text:p>QUANTITY VALID</text:p>
          </table:table-cell>
          <table:covered-table-cell/>
          <table:covered-table-cell/>
          <table:table-cell table:style-name="ce53" table:number-columns-spanned="3" office:value-type="string" office:string-value="REVENUE EVIDENCE COMPLETE">
            <text:p>REVENUE EVIDENCE COMPLETE</text:p>
          </table:table-cell>
          <table:covered-table-cell/>
          <table:covered-table-cell/>
        </table:table-row>
        <table:table-row table:style-name="ro21">
          <table:table-cell table:style-name="ce54" table:number-columns-spanned="3" office:value-type="string" office:string-value="YES" table:formula="of:=IF(TRIM([.A910])&lt;&gt;&quot;&quot;;&quot;YES&quot;;&quot;NO&quot;)">
            <text:p>YES</text:p>
          </table:table-cell>
          <table:covered-table-cell/>
          <table:covered-table-cell/>
          <table:table-cell table:style-name="ce54" table:number-columns-spanned="3" office:value-type="string" office:string-value="YES" table:formula="of:=IF(UPPER(TRIM([.D910]))=UPPER(TRIM([.D867]));&quot;YES&quot;;&quot;NO&quot;)">
            <text:p>YES</text:p>
          </table:table-cell>
          <table:covered-table-cell/>
          <table:covered-table-cell/>
          <table:table-cell table:style-name="ce54" table:number-columns-spanned="3" office:value-type="string" office:string-value="YES" table:formula="of:=IF(UPPER(TRIM([.H910]))=UPPER(TRIM([.G870]));&quot;YES&quot;;&quot;NO&quot;)">
            <text:p>YES</text:p>
          </table:table-cell>
          <table:covered-table-cell/>
          <table:covered-table-cell/>
          <table:table-cell table:style-name="ce54" table:number-columns-spanned="3" office:value-type="string" office:string-value="YES" table:formula="of:=IF(VALUE([.L910])&gt;0;&quot;YES&quot;;&quot;NO&quot;)">
            <text:p>YES</text:p>
          </table:table-cell>
          <table:covered-table-cell/>
          <table:covered-table-cell/>
          <table:table-cell table:style-name="ce54" table:number-columns-spanned="3" office:value-type="string" office:string-value="YES" table:formula="of:=IF(VALUE([.P910])&gt;0;&quot;YES&quot;;&quot;NO&quot;)">
            <text:p>YES</text:p>
          </table:table-cell>
          <table:covered-table-cell/>
          <table:covered-table-cell/>
          <table:table-cell table:style-name="ce54" table:number-columns-spanned="3" office:value-type="string" office:string-value="YES" table:formula="of:=IF(AND(UPPER(TRIM([.A912]))=&quot;YES&quot;;UPPER(TRIM([.D912]))=&quot;YES&quot;;UPPER(TRIM([.G912]))=&quot;YES&quot;;UPPER(TRIM([.J912]))=&quot;YES&quot;;UPPER(TRIM([.M912]))=&quot;YES&quot;);&quot;YES&quot;;&quot;NO&quot;)">
            <text:p>YES</text:p>
          </table:table-cell>
          <table:covered-table-cell/>
          <table:covered-table-cell/>
        </table:table-row>
        <table:table-row table:style-name="ro5">
          <table:table-cell table:style-name="ce52" table:number-columns-spanned="18" office:value-type="string" office:string-value="🔍 AUTHORITATIVE REVENUE CROSS-CHECK · BUILDS 371–380">
            <text:p>🔍 AUTHORITATIVE REVENUE CROSS-CHECK · BUILDS 371–38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5" office:value-type="string" office:string-value="REVENUE EVIDENCE COMPLETE">
            <text:p>REVENUE EVIDENCE COMPLETE</text:p>
          </table:table-cell>
          <table:covered-table-cell/>
          <table:covered-table-cell/>
          <table:covered-table-cell/>
          <table:covered-table-cell/>
          <table:table-cell table:style-name="ce53" table:number-columns-spanned="4" office:value-type="string" office:string-value="SALE IDENTITY VALID">
            <text:p>SALE IDENTITY VALID</text:p>
          </table:table-cell>
          <table:covered-table-cell/>
          <table:covered-table-cell/>
          <table:covered-table-cell/>
          <table:table-cell table:style-name="ce53" table:number-columns-spanned="5" office:value-type="string" office:string-value="AUTHORITATIVE GROSS REVENUE">
            <text:p>AUTHORITATIVE GROSS REVENUE</text:p>
          </table:table-cell>
          <table:covered-table-cell/>
          <table:covered-table-cell/>
          <table:covered-table-cell/>
          <table:covered-table-cell/>
          <table:table-cell table:style-name="ce53" table:number-columns-spanned="4" office:value-type="string" office:string-value="REVENUE RESULT">
            <text:p>REVENUE RESULT</text:p>
          </table:table-cell>
          <table:covered-table-cell/>
          <table:covered-table-cell/>
          <table:covered-table-cell/>
        </table:table-row>
        <table:table-row table:style-name="ro21">
          <table:table-cell table:style-name="ce54" table:number-columns-spanned="5" office:value-type="string" office:string-value="YES" table:formula="of:=[.P912]">
            <text:p>YES</text:p>
          </table:table-cell>
          <table:covered-table-cell/>
          <table:covered-table-cell/>
          <table:covered-table-cell/>
          <table:covered-table-cell/>
          <table:table-cell table:style-name="ce54" table:number-columns-spanned="4" office:value-type="string" office:string-value="YES" table:formula="of:=IF(AND(UPPER(TRIM([.A912]))=&quot;YES&quot;;UPPER(TRIM([.D912]))=&quot;YES&quot;);&quot;YES&quot;;&quot;NO&quot;)">
            <text:p>YES</text:p>
          </table:table-cell>
          <table:covered-table-cell/>
          <table:covered-table-cell/>
          <table:covered-table-cell/>
          <table:table-cell table:style-name="ce54" table:number-columns-spanned="5" office:value-type="string" office:string-value="102.00" table:formula="of:=IF(AND(UPPER(TRIM([.A915]))=&quot;YES&quot;;UPPER(TRIM([.F915]))=&quot;YES&quot;);[.L910];&quot;0.00&quot;)">
            <text:p>102.00</text:p>
          </table:table-cell>
          <table:covered-table-cell/>
          <table:covered-table-cell/>
          <table:covered-table-cell/>
          <table:covered-table-cell/>
          <table:table-cell table:style-name="ce54" table:number-columns-spanned="4" office:value-type="string" office:string-value="REVENUE VERIFIED" table:formula="of:=IF(VALUE([.J915])&gt;0;&quot;REVENUE VERIFIED&quot;;&quot;REVENUE NOT VERIFIED&quot;)">
            <text:p>REVENUE VERIFIED</text:p>
          </table:table-cell>
          <table:covered-table-cell/>
          <table:covered-table-cell/>
          <table:covered-table-cell/>
        </table:table-row>
        <table:table-row table:style-name="ro5">
          <table:table-cell table:style-name="ce52" table:number-columns-spanned="18" office:value-type="string" office:string-value="🏪 MARKETPLACE FEE EVIDENCE · BUILDS 381–400">
            <text:p>🏪 MARKETPLACE FEE EVIDENCE · BUILDS 381–40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PLATFORM">
            <text:p>PLATFORM</text:p>
          </table:table-cell>
          <table:covered-table-cell/>
          <table:covered-table-cell/>
          <table:table-cell table:style-name="ce53" table:number-columns-spanned="3" office:value-type="string" office:string-value="SALE ID">
            <text:p>SALE ID</text:p>
          </table:table-cell>
          <table:covered-table-cell/>
          <table:covered-table-cell/>
          <table:table-cell table:style-name="ce53" table:number-columns-spanned="4" office:value-type="string" office:string-value="FEE EVIDENCE RECEIVED">
            <text:p>FEE EVIDENCE RECEIVED</text:p>
          </table:table-cell>
          <table:covered-table-cell/>
          <table:covered-table-cell/>
          <table:covered-table-cell/>
          <table:table-cell table:style-name="ce53" table:number-columns-spanned="4" office:value-type="string" office:string-value="MARKETPLACE FEE">
            <text:p>MARKETPLACE FEE</text:p>
          </table:table-cell>
          <table:covered-table-cell/>
          <table:covered-table-cell/>
          <table:covered-table-cell/>
          <table:table-cell table:style-name="ce53" table:number-columns-spanned="4" office:value-type="string" office:string-value="FEE REFERENCE">
            <text:p>FEE REFERENCE</text:p>
          </table:table-cell>
          <table:covered-table-cell/>
          <table:covered-table-cell/>
          <table:covered-table-cell/>
        </table:table-row>
        <table:table-row table:style-name="ro5">
          <table:table-cell table:style-name="ce54" table:number-columns-spanned="3" office:value-type="string" office:string-value="EBAY">
            <text:p>EBAY</text:p>
          </table:table-cell>
          <table:covered-table-cell/>
          <table:covered-table-cell/>
          <table:table-cell table:style-name="ce54" table:number-columns-spanned="3" office:value-type="string" office:string-value="SALE-000001">
            <text:p>SALE-000001</text:p>
          </table:table-cell>
          <table:covered-table-cell/>
          <table:covered-table-cell/>
          <table:table-cell table:style-name="ce54" table:number-columns-spanned="4" office:value-type="string" office:string-value="YES">
            <text:p>YES</text:p>
          </table:table-cell>
          <table:covered-table-cell/>
          <table:covered-table-cell/>
          <table:covered-table-cell/>
          <table:table-cell table:style-name="ce54" table:number-columns-spanned="4" office:value-type="string" office:string-value="13.26">
            <text:p>13.26</text:p>
          </table:table-cell>
          <table:covered-table-cell/>
          <table:covered-table-cell/>
          <table:covered-table-cell/>
          <table:table-cell table:style-name="ce54" table:number-columns-spanned="4" office:value-type="string" office:string-value="EBAY-FEE-REF-000001">
            <text:p>EBAY-FEE-REF-000001</text:p>
          </table:table-cell>
          <table:covered-table-cell/>
          <table:covered-table-cell/>
          <table:covered-table-cell/>
        </table:table-row>
        <table:table-row table:style-name="ro5">
          <table:table-cell table:style-name="ce53" table:number-columns-spanned="3" office:value-type="string" office:string-value="PLATFORM VALID">
            <text:p>PLATFORM VALID</text:p>
          </table:table-cell>
          <table:covered-table-cell/>
          <table:covered-table-cell/>
          <table:table-cell table:style-name="ce53" table:number-columns-spanned="3" office:value-type="string" office:string-value="SALE MATCH">
            <text:p>SALE MATCH</text:p>
          </table:table-cell>
          <table:covered-table-cell/>
          <table:covered-table-cell/>
          <table:table-cell table:style-name="ce53" table:number-columns-spanned="3" office:value-type="string" office:string-value="FEE RECEIVED VALID">
            <text:p>FEE RECEIVED VALID</text:p>
          </table:table-cell>
          <table:covered-table-cell/>
          <table:covered-table-cell/>
          <table:table-cell table:style-name="ce53" table:number-columns-spanned="3" office:value-type="string" office:string-value="FEE AMOUNT VALID">
            <text:p>FEE AMOUNT VALID</text:p>
          </table:table-cell>
          <table:covered-table-cell/>
          <table:covered-table-cell/>
          <table:table-cell table:style-name="ce53" table:number-columns-spanned="3" office:value-type="string" office:string-value="FEE REFERENCE PRESENT">
            <text:p>FEE REFERENCE PRESENT</text:p>
          </table:table-cell>
          <table:covered-table-cell/>
          <table:covered-table-cell/>
          <table:table-cell table:style-name="ce53" table:number-columns-spanned="3" office:value-type="string" office:string-value="FEE EVIDENCE COMPLETE">
            <text:p>FEE EVIDENCE COMPLETE</text:p>
          </table:table-cell>
          <table:covered-table-cell/>
          <table:covered-table-cell/>
        </table:table-row>
        <table:table-row table:style-name="ro21">
          <table:table-cell table:style-name="ce54" table:number-columns-spanned="3" office:value-type="string" office:string-value="YES" table:formula="of:=IF(UPPER(TRIM([.A918]))=&quot;EBAY&quot;;&quot;YES&quot;;&quot;NO&quot;)">
            <text:p>YES</text:p>
          </table:table-cell>
          <table:covered-table-cell/>
          <table:covered-table-cell/>
          <table:table-cell table:style-name="ce54" table:number-columns-spanned="3" office:value-type="string" office:string-value="YES" table:formula="of:=IF(UPPER(TRIM([.D918]))=UPPER(TRIM([.A910]));&quot;YES&quot;;&quot;NO&quot;)">
            <text:p>YES</text:p>
          </table:table-cell>
          <table:covered-table-cell/>
          <table:covered-table-cell/>
          <table:table-cell table:style-name="ce54" table:number-columns-spanned="3" office:value-type="string" office:string-value="YES" table:formula="of:=IF(UPPER(TRIM([.G918]))=&quot;YES&quot;;&quot;YES&quot;;&quot;NO&quot;)">
            <text:p>YES</text:p>
          </table:table-cell>
          <table:covered-table-cell/>
          <table:covered-table-cell/>
          <table:table-cell table:style-name="ce54" table:number-columns-spanned="3" office:value-type="string" office:string-value="YES" table:formula="of:=IF(VALUE([.K918])&gt;=0;&quot;YES&quot;;&quot;NO&quot;)">
            <text:p>YES</text:p>
          </table:table-cell>
          <table:covered-table-cell/>
          <table:covered-table-cell/>
          <table:table-cell table:style-name="ce54" table:number-columns-spanned="3" office:value-type="string" office:string-value="YES" table:formula="of:=IF(TRIM([.O918])&lt;&gt;&quot;&quot;;&quot;YES&quot;;&quot;NO&quot;)">
            <text:p>YES</text:p>
          </table:table-cell>
          <table:covered-table-cell/>
          <table:covered-table-cell/>
          <table:table-cell table:style-name="ce54" table:number-columns-spanned="3" office:value-type="string" office:string-value="YES" table:formula="of:=IF(AND(UPPER(TRIM([.A920]))=&quot;YES&quot;;UPPER(TRIM([.D920]))=&quot;YES&quot;;UPPER(TRIM([.G920]))=&quot;YES&quot;;UPPER(TRIM([.J920]))=&quot;YES&quot;;UPPER(TRIM([.M920]))=&quot;YES&quot;);&quot;YES&quot;;&quot;NO&quot;)">
            <text:p>YES</text:p>
          </table:table-cell>
          <table:covered-table-cell/>
          <table:covered-table-cell/>
        </table:table-row>
        <table:table-row table:style-name="ro5">
          <table:table-cell table:style-name="ce52" table:number-columns-spanned="18" office:value-type="string" office:string-value="🧾 MARKETPLACE FEE AUTHORITY · BUILDS 391–400">
            <text:p>🧾 MARKETPLACE FEE AUTHORITY · BUILDS 391–40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5" office:value-type="string" office:string-value="FEE EVIDENCE COMPLETE">
            <text:p>FEE EVIDENCE COMPLETE</text:p>
          </table:table-cell>
          <table:covered-table-cell/>
          <table:covered-table-cell/>
          <table:covered-table-cell/>
          <table:covered-table-cell/>
          <table:table-cell table:style-name="ce53" table:number-columns-spanned="4" office:value-type="string" office:string-value="REVENUE VERIFIED">
            <text:p>REVENUE VERIFIED</text:p>
          </table:table-cell>
          <table:covered-table-cell/>
          <table:covered-table-cell/>
          <table:covered-table-cell/>
          <table:table-cell table:style-name="ce53" table:number-columns-spanned="5" office:value-type="string" office:string-value="AUTHORITATIVE MARKETPLACE FEE">
            <text:p>AUTHORITATIVE MARKETPLACE FEE</text:p>
          </table:table-cell>
          <table:covered-table-cell/>
          <table:covered-table-cell/>
          <table:covered-table-cell/>
          <table:covered-table-cell/>
          <table:table-cell table:style-name="ce53" table:number-columns-spanned="4" office:value-type="string" office:string-value="FEE RESULT">
            <text:p>FEE RESULT</text:p>
          </table:table-cell>
          <table:covered-table-cell/>
          <table:covered-table-cell/>
          <table:covered-table-cell/>
        </table:table-row>
        <table:table-row table:style-name="ro21">
          <table:table-cell table:style-name="ce54" table:number-columns-spanned="5" office:value-type="string" office:string-value="YES" table:formula="of:=[.P920]">
            <text:p>YES</text:p>
          </table:table-cell>
          <table:covered-table-cell/>
          <table:covered-table-cell/>
          <table:covered-table-cell/>
          <table:covered-table-cell/>
          <table:table-cell table:style-name="ce54" table:number-columns-spanned="4" office:value-type="string" office:string-value="YES" table:formula="of:=IF(UPPER(TRIM([.O915]))=&quot;REVENUE VERIFIED&quot;;&quot;YES&quot;;&quot;NO&quot;)">
            <text:p>YES</text:p>
          </table:table-cell>
          <table:covered-table-cell/>
          <table:covered-table-cell/>
          <table:covered-table-cell/>
          <table:table-cell table:style-name="ce54" table:number-columns-spanned="5" office:value-type="string" office:string-value="13.26" table:formula="of:=IF(AND(UPPER(TRIM([.A923]))=&quot;YES&quot;;UPPER(TRIM([.F923]))=&quot;YES&quot;);[.K918];&quot;0.00&quot;)">
            <text:p>13.26</text:p>
          </table:table-cell>
          <table:covered-table-cell/>
          <table:covered-table-cell/>
          <table:covered-table-cell/>
          <table:covered-table-cell/>
          <table:table-cell table:style-name="ce54" table:number-columns-spanned="4" office:value-type="string" office:string-value="FEE VERIFIED" table:formula="of:=IF(AND(UPPER(TRIM([.A923]))=&quot;YES&quot;;UPPER(TRIM([.F923]))=&quot;YES&quot;);&quot;FEE VERIFIED&quot;;&quot;FEE NOT VERIFIED&quot;)">
            <text:p>FEE VERIFIED</text:p>
          </table:table-cell>
          <table:covered-table-cell/>
          <table:covered-table-cell/>
          <table:covered-table-cell/>
        </table:table-row>
        <table:table-row table:style-name="ro5">
          <table:table-cell table:style-name="ce52" table:number-columns-spanned="18" office:value-type="string" office:string-value="📦 SHIPPING + PACKAGING COST EVIDENCE · BUILDS 401–420">
            <text:p>📦 SHIPPING + PACKAGING COST EVIDENCE · BUILDS 401–42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SALE ID">
            <text:p>SALE ID</text:p>
          </table:table-cell>
          <table:covered-table-cell/>
          <table:covered-table-cell/>
          <table:table-cell table:style-name="ce53" table:number-columns-spanned="4" office:value-type="string" office:string-value="SHIPPING COST RECEIVED">
            <text:p>SHIPPING COST RECEIVED</text:p>
          </table:table-cell>
          <table:covered-table-cell/>
          <table:covered-table-cell/>
          <table:covered-table-cell/>
          <table:table-cell table:style-name="ce53" table:number-columns-spanned="4" office:value-type="string" office:string-value="SHIPPING COST">
            <text:p>SHIPPING COST</text:p>
          </table:table-cell>
          <table:covered-table-cell/>
          <table:covered-table-cell/>
          <table:covered-table-cell/>
          <table:table-cell table:style-name="ce53" table:number-columns-spanned="4" office:value-type="string" office:string-value="PACKAGING COST RECEIVED">
            <text:p>PACKAGING COST RECEIVED</text:p>
          </table:table-cell>
          <table:covered-table-cell/>
          <table:covered-table-cell/>
          <table:covered-table-cell/>
          <table:table-cell table:style-name="ce53" table:number-columns-spanned="3" office:value-type="string" office:string-value="PACKAGING COST">
            <text:p>PACKAGING COST</text:p>
          </table:table-cell>
          <table:covered-table-cell/>
          <table:covered-table-cell/>
        </table:table-row>
        <table:table-row table:style-name="ro5">
          <table:table-cell table:style-name="ce54" table:number-columns-spanned="3" office:value-type="string" office:string-value="SALE-000001">
            <text:p>SALE-000001</text:p>
          </table:table-cell>
          <table:covered-table-cell/>
          <table:covered-table-cell/>
          <table:table-cell table:style-name="ce54" table:number-columns-spanned="4" office:value-type="string" office:string-value="YES">
            <text:p>YES</text:p>
          </table:table-cell>
          <table:covered-table-cell/>
          <table:covered-table-cell/>
          <table:covered-table-cell/>
          <table:table-cell table:style-name="ce54" table:number-columns-spanned="4" office:value-type="string" office:string-value="5.25">
            <text:p>5.25</text:p>
          </table:table-cell>
          <table:covered-table-cell/>
          <table:covered-table-cell/>
          <table:covered-table-cell/>
          <table:table-cell table:style-name="ce54" table:number-columns-spanned="4" office:value-type="string" office:string-value="YES">
            <text:p>YES</text:p>
          </table:table-cell>
          <table:covered-table-cell/>
          <table:covered-table-cell/>
          <table:covered-table-cell/>
          <table:table-cell table:style-name="ce54" table:number-columns-spanned="3" office:value-type="string" office:string-value="0.75">
            <text:p>0.75</text:p>
          </table:table-cell>
          <table:covered-table-cell/>
          <table:covered-table-cell/>
        </table:table-row>
        <table:table-row table:style-name="ro5">
          <table:table-cell table:style-name="ce53" table:number-columns-spanned="3" office:value-type="string" office:string-value="SALE MATCH">
            <text:p>SALE MATCH</text:p>
          </table:table-cell>
          <table:covered-table-cell/>
          <table:covered-table-cell/>
          <table:table-cell table:style-name="ce53" table:number-columns-spanned="3" office:value-type="string" office:string-value="SHIPPING RECEIVED VALID">
            <text:p>SHIPPING RECEIVED VALID</text:p>
          </table:table-cell>
          <table:covered-table-cell/>
          <table:covered-table-cell/>
          <table:table-cell table:style-name="ce53" table:number-columns-spanned="3" office:value-type="string" office:string-value="SHIPPING AMOUNT VALID">
            <text:p>SHIPPING AMOUNT VALID</text:p>
          </table:table-cell>
          <table:covered-table-cell/>
          <table:covered-table-cell/>
          <table:table-cell table:style-name="ce53" table:number-columns-spanned="3" office:value-type="string" office:string-value="PACKAGING RECEIVED VALID">
            <text:p>PACKAGING RECEIVED VALID</text:p>
          </table:table-cell>
          <table:covered-table-cell/>
          <table:covered-table-cell/>
          <table:table-cell table:style-name="ce53" table:number-columns-spanned="3" office:value-type="string" office:string-value="PACKAGING AMOUNT VALID">
            <text:p>PACKAGING AMOUNT VALID</text:p>
          </table:table-cell>
          <table:covered-table-cell/>
          <table:covered-table-cell/>
          <table:table-cell table:style-name="ce53" table:number-columns-spanned="3" office:value-type="string" office:string-value="COST EVIDENCE COMPLETE">
            <text:p>COST EVIDENCE COMPLETE</text:p>
          </table:table-cell>
          <table:covered-table-cell/>
          <table:covered-table-cell/>
        </table:table-row>
        <table:table-row table:style-name="ro21">
          <table:table-cell table:style-name="ce54" table:number-columns-spanned="3" office:value-type="string" office:string-value="YES" table:formula="of:=IF(UPPER(TRIM([.A926]))=UPPER(TRIM([.A910]));&quot;YES&quot;;&quot;NO&quot;)">
            <text:p>YES</text:p>
          </table:table-cell>
          <table:covered-table-cell/>
          <table:covered-table-cell/>
          <table:table-cell table:style-name="ce54" table:number-columns-spanned="3" office:value-type="string" office:string-value="YES" table:formula="of:=IF(UPPER(TRIM([.D926]))=&quot;YES&quot;;&quot;YES&quot;;&quot;NO&quot;)">
            <text:p>YES</text:p>
          </table:table-cell>
          <table:covered-table-cell/>
          <table:covered-table-cell/>
          <table:table-cell table:style-name="ce54" table:number-columns-spanned="3" office:value-type="string" office:string-value="YES" table:formula="of:=IF(VALUE([.H926])&gt;=0;&quot;YES&quot;;&quot;NO&quot;)">
            <text:p>YES</text:p>
          </table:table-cell>
          <table:covered-table-cell/>
          <table:covered-table-cell/>
          <table:table-cell table:style-name="ce54" table:number-columns-spanned="3" office:value-type="string" office:string-value="YES" table:formula="of:=IF(UPPER(TRIM([.L926]))=&quot;YES&quot;;&quot;YES&quot;;&quot;NO&quot;)">
            <text:p>YES</text:p>
          </table:table-cell>
          <table:covered-table-cell/>
          <table:covered-table-cell/>
          <table:table-cell table:style-name="ce54" table:number-columns-spanned="3" office:value-type="string" office:string-value="YES" table:formula="of:=IF(VALUE([.P926])&gt;=0;&quot;YES&quot;;&quot;NO&quot;)">
            <text:p>YES</text:p>
          </table:table-cell>
          <table:covered-table-cell/>
          <table:covered-table-cell/>
          <table:table-cell table:style-name="ce54" table:number-columns-spanned="3" office:value-type="string" office:string-value="YES" table:formula="of:=IF(AND(UPPER(TRIM([.A928]))=&quot;YES&quot;;UPPER(TRIM([.D928]))=&quot;YES&quot;;UPPER(TRIM([.G928]))=&quot;YES&quot;;UPPER(TRIM([.J928]))=&quot;YES&quot;;UPPER(TRIM([.M928]))=&quot;YES&quot;);&quot;YES&quot;;&quot;NO&quot;)">
            <text:p>YES</text:p>
          </table:table-cell>
          <table:covered-table-cell/>
          <table:covered-table-cell/>
        </table:table-row>
        <table:table-row table:style-name="ro5">
          <table:table-cell table:style-name="ce52" table:number-columns-spanned="18" office:value-type="string" office:string-value="🔍 CONTROLLED SALE COST EVIDENCE GATE · BUILD 420">
            <text:p>🔍 CONTROLLED SALE COST EVIDENCE GATE · BUILD 42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COST EVIDENCE COMPLETE">
            <text:p>COST EVIDENCE COMPLETE</text:p>
          </table:table-cell>
          <table:covered-table-cell/>
          <table:covered-table-cell/>
          <table:covered-table-cell/>
          <table:table-cell table:style-name="ce53" table:number-columns-spanned="4" office:value-type="string" office:string-value="AUTHORITATIVE SHIPPING COST">
            <text:p>AUTHORITATIVE SHIPPING COST</text:p>
          </table:table-cell>
          <table:covered-table-cell/>
          <table:covered-table-cell/>
          <table:covered-table-cell/>
          <table:table-cell table:style-name="ce53" table:number-columns-spanned="4" office:value-type="string" office:string-value="AUTHORITATIVE PACKAGING COST">
            <text:p>AUTHORITATIVE PACKAGING COST</text:p>
          </table:table-cell>
          <table:covered-table-cell/>
          <table:covered-table-cell/>
          <table:covered-table-cell/>
          <table:table-cell table:style-name="ce53" table:number-columns-spanned="3" office:value-type="string" office:string-value="TOTAL FULFILLMENT COST">
            <text:p>TOTAL FULFILLMENT COST</text:p>
          </table:table-cell>
          <table:covered-table-cell/>
          <table:covered-table-cell/>
          <table:table-cell table:style-name="ce53" table:number-columns-spanned="3" office:value-type="string" office:string-value="COST RESULT">
            <text:p>COST RESULT</text:p>
          </table:table-cell>
          <table:covered-table-cell/>
          <table:covered-table-cell/>
        </table:table-row>
        <table:table-row table:style-name="ro21">
          <table:table-cell table:style-name="ce54" table:number-columns-spanned="4" office:value-type="string" office:string-value="YES" table:formula="of:=[.P928]">
            <text:p>YES</text:p>
          </table:table-cell>
          <table:covered-table-cell/>
          <table:covered-table-cell/>
          <table:covered-table-cell/>
          <table:table-cell table:style-name="ce54" table:number-columns-spanned="4" office:value-type="string" office:string-value="5.25" table:formula="of:=IF(UPPER(TRIM([.A931]))=&quot;YES&quot;;[.H926];&quot;0.00&quot;)">
            <text:p>5.25</text:p>
          </table:table-cell>
          <table:covered-table-cell/>
          <table:covered-table-cell/>
          <table:covered-table-cell/>
          <table:table-cell table:style-name="ce54" table:number-columns-spanned="4" office:value-type="string" office:string-value="0.75" table:formula="of:=IF(UPPER(TRIM([.A931]))=&quot;YES&quot;;[.P926];&quot;0.00&quot;)">
            <text:p>0.75</text:p>
          </table:table-cell>
          <table:covered-table-cell/>
          <table:covered-table-cell/>
          <table:covered-table-cell/>
          <table:table-cell table:style-name="ce54" table:number-columns-spanned="3" office:value-type="string" office:string-value="6.00" table:formula="of:=IF(UPPER(TRIM([.A931]))=&quot;YES&quot;;VALUE([.E931])+VALUE([.I931]);&quot;0.00&quot;)">
            <text:p>6.00</text:p>
          </table:table-cell>
          <table:covered-table-cell/>
          <table:covered-table-cell/>
          <table:table-cell table:style-name="ce54" table:number-columns-spanned="3" office:value-type="string" office:string-value="COST VERIFIED" table:formula="of:=IF(UPPER(TRIM([.A931]))=&quot;YES&quot;;&quot;COST VERIFIED&quot;;&quot;COST NOT VERIFIED&quot;)">
            <text:p>COST VERIFIED</text:p>
          </table:table-cell>
          <table:covered-table-cell/>
          <table:covered-table-cell/>
        </table:table-row>
        <table:table-row table:style-name="ro5">
          <table:table-cell table:style-name="ce54" table:number-columns-spanned="18" office:value-type="string" office:string-value="VERIFIED SALE VALUE MAY DERIVE AUTHORITATIVE REVENUE ONLY THROUGH IDENTITY + VERIFIED SALE CROSS-CHECK · MARKETPLACE FEE REQUIRES MATCHED FEE EVIDENCE · SHIPPING + PACKAGING COST REQUIRE EXPLICIT RECEIVED EVIDENCE · NO NET PROFIT DERIVED IN BUILD 420">
            <text:p>VERIFIED SALE VALUE MAY DERIVE AUTHORITATIVE REVENUE ONLY THROUGH IDENTITY + VERIFIED SALE CROSS-CHECK · MARKETPLACE FEE REQUIRES MATCHED FEE EVIDENCE · SHIPPING + PACKAGING COST REQUIRE EXPLICIT RECEIVED EVIDENCE · NO NET PROFIT DERIVED IN BUILD 42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2" table:number-columns-spanned="18" office:value-type="string" office:string-value="📦 INVENTORY COST BASIS EVIDENCE · BUILDS 421–440">
            <text:p>📦 INVENTORY COST BASIS EVIDENCE · BUILDS 421–44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RECORD ID">
            <text:p>RECORD ID</text:p>
          </table:table-cell>
          <table:covered-table-cell/>
          <table:covered-table-cell/>
          <table:table-cell table:style-name="ce53" table:number-columns-spanned="4" office:value-type="string" office:string-value="SOLD STATE VALID">
            <text:p>SOLD STATE VALID</text:p>
          </table:table-cell>
          <table:covered-table-cell/>
          <table:covered-table-cell/>
          <table:covered-table-cell/>
          <table:table-cell table:style-name="ce53" table:number-columns-spanned="4" office:value-type="string" office:string-value="COST BASIS RECEIVED">
            <text:p>COST BASIS RECEIVED</text:p>
          </table:table-cell>
          <table:covered-table-cell/>
          <table:covered-table-cell/>
          <table:covered-table-cell/>
          <table:table-cell table:style-name="ce53" table:number-columns-spanned="4" office:value-type="string" office:string-value="UNIT COST BASIS">
            <text:p>UNIT COST BASIS</text:p>
          </table:table-cell>
          <table:covered-table-cell/>
          <table:covered-table-cell/>
          <table:covered-table-cell/>
          <table:table-cell table:style-name="ce53" table:number-columns-spanned="3" office:value-type="string" office:string-value="QUANTITY SOLD">
            <text:p>QUANTITY SOLD</text:p>
          </table:table-cell>
          <table:covered-table-cell/>
          <table:covered-table-cell/>
        </table:table-row>
        <table:table-row table:style-name="ro5">
          <table:table-cell table:style-name="ce54" table:number-columns-spanned="3" office:value-type="string" office:string-value="INV-000001">
            <text:p>INV-000001</text:p>
          </table:table-cell>
          <table:covered-table-cell/>
          <table:covered-table-cell/>
          <table:table-cell table:style-name="ce54" table:number-columns-spanned="4" office:value-type="string" office:string-value="YES">
            <text:p>YES</text:p>
          </table:table-cell>
          <table:covered-table-cell/>
          <table:covered-table-cell/>
          <table:covered-table-cell/>
          <table:table-cell table:style-name="ce54" table:number-columns-spanned="4" office:value-type="string" office:string-value="YES">
            <text:p>YES</text:p>
          </table:table-cell>
          <table:covered-table-cell/>
          <table:covered-table-cell/>
          <table:covered-table-cell/>
          <table:table-cell table:style-name="ce54" table:number-columns-spanned="4" office:value-type="string" office:string-value="50.00">
            <text:p>50.00</text:p>
          </table:table-cell>
          <table:covered-table-cell/>
          <table:covered-table-cell/>
          <table:covered-table-cell/>
          <table:table-cell table:style-name="ce54" table:number-columns-spanned="3" office:value-type="string" office:string-value="1">
            <text:p>1</text:p>
          </table:table-cell>
          <table:covered-table-cell/>
          <table:covered-table-cell/>
        </table:table-row>
        <table:table-row table:style-name="ro5">
          <table:table-cell table:style-name="ce53" table:number-columns-spanned="3" office:value-type="string" office:string-value="RECORD MATCH">
            <text:p>RECORD MATCH</text:p>
          </table:table-cell>
          <table:covered-table-cell/>
          <table:covered-table-cell/>
          <table:table-cell table:style-name="ce53" table:number-columns-spanned="3" office:value-type="string" office:string-value="SOLD STATE VALID">
            <text:p>SOLD STATE VALID</text:p>
          </table:table-cell>
          <table:covered-table-cell/>
          <table:covered-table-cell/>
          <table:table-cell table:style-name="ce53" table:number-columns-spanned="3" office:value-type="string" office:string-value="COST BASIS RECEIVED VALID">
            <text:p>COST BASIS RECEIVED VALID</text:p>
          </table:table-cell>
          <table:covered-table-cell/>
          <table:covered-table-cell/>
          <table:table-cell table:style-name="ce53" table:number-columns-spanned="3" office:value-type="string" office:string-value="UNIT COST VALID">
            <text:p>UNIT COST VALID</text:p>
          </table:table-cell>
          <table:covered-table-cell/>
          <table:covered-table-cell/>
          <table:table-cell table:style-name="ce53" table:number-columns-spanned="3" office:value-type="string" office:string-value="QUANTITY MATCH">
            <text:p>QUANTITY MATCH</text:p>
          </table:table-cell>
          <table:covered-table-cell/>
          <table:covered-table-cell/>
          <table:table-cell table:style-name="ce53" table:number-columns-spanned="3" office:value-type="string" office:string-value="COST BASIS EVIDENCE COMPLETE">
            <text:p>COST BASIS EVIDENCE COMPLETE</text:p>
          </table:table-cell>
          <table:covered-table-cell/>
          <table:covered-table-cell/>
        </table:table-row>
        <table:table-row table:style-name="ro21">
          <table:table-cell table:style-name="ce54" table:number-columns-spanned="3" office:value-type="string" office:string-value="YES" table:formula="of:=IF(UPPER(TRIM([.A936]))=UPPER(TRIM([.D886]));&quot;YES&quot;;&quot;NO&quot;)">
            <text:p>YES</text:p>
          </table:table-cell>
          <table:covered-table-cell/>
          <table:covered-table-cell/>
          <table:table-cell table:style-name="ce54" table:number-columns-spanned="3" office:value-type="string" office:string-value="YES" table:formula="of:=IF(UPPER(TRIM([.D936]))=&quot;YES&quot;;&quot;YES&quot;;&quot;NO&quot;)">
            <text:p>YES</text:p>
          </table:table-cell>
          <table:covered-table-cell/>
          <table:covered-table-cell/>
          <table:table-cell table:style-name="ce54" table:number-columns-spanned="3" office:value-type="string" office:string-value="YES" table:formula="of:=IF(UPPER(TRIM([.H936]))=&quot;YES&quot;;&quot;YES&quot;;&quot;NO&quot;)">
            <text:p>YES</text:p>
          </table:table-cell>
          <table:covered-table-cell/>
          <table:covered-table-cell/>
          <table:table-cell table:style-name="ce54" table:number-columns-spanned="3" office:value-type="string" office:string-value="YES" table:formula="of:=IF(VALUE([.L936])&gt;=0;&quot;YES&quot;;&quot;NO&quot;)">
            <text:p>YES</text:p>
          </table:table-cell>
          <table:covered-table-cell/>
          <table:covered-table-cell/>
          <table:table-cell table:style-name="ce54" table:number-columns-spanned="3" office:value-type="string" office:string-value="YES" table:formula="of:=IF(VALUE([.P936])=VALUE([.P910]);&quot;YES&quot;;&quot;NO&quot;)">
            <text:p>YES</text:p>
          </table:table-cell>
          <table:covered-table-cell/>
          <table:covered-table-cell/>
          <table:table-cell table:style-name="ce54" table:number-columns-spanned="3" office:value-type="string" office:string-value="YES" table:formula="of:=IF(AND(UPPER(TRIM([.A938]))=&quot;YES&quot;;UPPER(TRIM([.D938]))=&quot;YES&quot;;UPPER(TRIM([.G938]))=&quot;YES&quot;;UPPER(TRIM([.J938]))=&quot;YES&quot;;UPPER(TRIM([.M938]))=&quot;YES&quot;);&quot;YES&quot;;&quot;NO&quot;)">
            <text:p>YES</text:p>
          </table:table-cell>
          <table:covered-table-cell/>
          <table:covered-table-cell/>
        </table:table-row>
        <table:table-row table:style-name="ro5">
          <table:table-cell table:style-name="ce52" table:number-columns-spanned="18" office:value-type="string" office:string-value="🔍 AUTHORITATIVE COST BASIS CROSS-CHECK · BUILDS 431–440">
            <text:p>🔍 AUTHORITATIVE COST BASIS CROSS-CHECK · BUILDS 431–44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5" office:value-type="string" office:string-value="COST BASIS EVIDENCE COMPLETE">
            <text:p>COST BASIS EVIDENCE COMPLETE</text:p>
          </table:table-cell>
          <table:covered-table-cell/>
          <table:covered-table-cell/>
          <table:covered-table-cell/>
          <table:covered-table-cell/>
          <table:table-cell table:style-name="ce53" table:number-columns-spanned="4" office:value-type="string" office:string-value="RECORD IDENTITY VALID">
            <text:p>RECORD IDENTITY VALID</text:p>
          </table:table-cell>
          <table:covered-table-cell/>
          <table:covered-table-cell/>
          <table:covered-table-cell/>
          <table:table-cell table:style-name="ce53" table:number-columns-spanned="5" office:value-type="string" office:string-value="AUTHORITATIVE TOTAL COST BASIS">
            <text:p>AUTHORITATIVE TOTAL COST BASIS</text:p>
          </table:table-cell>
          <table:covered-table-cell/>
          <table:covered-table-cell/>
          <table:covered-table-cell/>
          <table:covered-table-cell/>
          <table:table-cell table:style-name="ce53" table:number-columns-spanned="4" office:value-type="string" office:string-value="COST BASIS RESULT">
            <text:p>COST BASIS RESULT</text:p>
          </table:table-cell>
          <table:covered-table-cell/>
          <table:covered-table-cell/>
          <table:covered-table-cell/>
        </table:table-row>
        <table:table-row table:style-name="ro21">
          <table:table-cell table:style-name="ce54" table:number-columns-spanned="5" office:value-type="string" office:string-value="YES" table:formula="of:=[.P938]">
            <text:p>YES</text:p>
          </table:table-cell>
          <table:covered-table-cell/>
          <table:covered-table-cell/>
          <table:covered-table-cell/>
          <table:covered-table-cell/>
          <table:table-cell table:style-name="ce54" table:number-columns-spanned="4" office:value-type="string" office:string-value="YES" table:formula="of:=IF(UPPER(TRIM([.A938]))=&quot;YES&quot;;&quot;YES&quot;;&quot;NO&quot;)">
            <text:p>YES</text:p>
          </table:table-cell>
          <table:covered-table-cell/>
          <table:covered-table-cell/>
          <table:covered-table-cell/>
          <table:table-cell table:style-name="ce54" table:number-columns-spanned="5" office:value-type="string" office:string-value="50.00" table:formula="of:=IF(AND(UPPER(TRIM([.A941]))=&quot;YES&quot;;UPPER(TRIM([.F941]))=&quot;YES&quot;);VALUE([.L936])*VALUE([.P936]);&quot;0.00&quot;)">
            <text:p>50.00</text:p>
          </table:table-cell>
          <table:covered-table-cell/>
          <table:covered-table-cell/>
          <table:covered-table-cell/>
          <table:covered-table-cell/>
          <table:table-cell table:style-name="ce54" table:number-columns-spanned="4" office:value-type="string" office:string-value="COST BASIS VERIFIED" table:formula="of:=IF(VALUE([.J941])&gt;=0;&quot;COST BASIS VERIFIED&quot;;&quot;COST BASIS NOT VERIFIED&quot;)">
            <text:p>COST BASIS VERIFIED</text:p>
          </table:table-cell>
          <table:covered-table-cell/>
          <table:covered-table-cell/>
          <table:covered-table-cell/>
        </table:table-row>
        <table:table-row table:style-name="ro5">
          <table:table-cell table:style-name="ce52" table:number-columns-spanned="18" office:value-type="string" office:string-value="💰 NET PROFIT DERIVATION · BUILDS 441–460">
            <text:p>💰 NET PROFIT DERIVATION · BUILDS 441–46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5" office:value-type="string" office:string-value="AUTHORITATIVE GROSS REVENUE">
            <text:p>AUTHORITATIVE GROSS REVENUE</text:p>
          </table:table-cell>
          <table:covered-table-cell/>
          <table:covered-table-cell/>
          <table:covered-table-cell/>
          <table:covered-table-cell/>
          <table:table-cell table:style-name="ce53" table:number-columns-spanned="4" office:value-type="string" office:string-value="AUTHORITATIVE MARKETPLACE FEE">
            <text:p>AUTHORITATIVE MARKETPLACE FEE</text:p>
          </table:table-cell>
          <table:covered-table-cell/>
          <table:covered-table-cell/>
          <table:covered-table-cell/>
          <table:table-cell table:style-name="ce53" table:number-columns-spanned="5" office:value-type="string" office:string-value="TOTAL FULFILLMENT COST">
            <text:p>TOTAL FULFILLMENT COST</text:p>
          </table:table-cell>
          <table:covered-table-cell/>
          <table:covered-table-cell/>
          <table:covered-table-cell/>
          <table:covered-table-cell/>
          <table:table-cell table:style-name="ce53" table:number-columns-spanned="4" office:value-type="string" office:string-value="AUTHORITATIVE TOTAL COST BASIS">
            <text:p>AUTHORITATIVE TOTAL COST BASIS</text:p>
          </table:table-cell>
          <table:covered-table-cell/>
          <table:covered-table-cell/>
          <table:covered-table-cell/>
        </table:table-row>
        <table:table-row table:style-name="ro21">
          <table:table-cell table:style-name="ce54" table:number-columns-spanned="5" office:value-type="string" office:string-value="102.00" table:formula="of:=[.J915]">
            <text:p>102.00</text:p>
          </table:table-cell>
          <table:covered-table-cell/>
          <table:covered-table-cell/>
          <table:covered-table-cell/>
          <table:covered-table-cell/>
          <table:table-cell table:style-name="ce54" table:number-columns-spanned="4" office:value-type="string" office:string-value="13.26" table:formula="of:=[.J923]">
            <text:p>13.26</text:p>
          </table:table-cell>
          <table:covered-table-cell/>
          <table:covered-table-cell/>
          <table:covered-table-cell/>
          <table:table-cell table:style-name="ce54" table:number-columns-spanned="5" office:value-type="string" office:string-value="6.00" table:formula="of:=[.M931]">
            <text:p>6.00</text:p>
          </table:table-cell>
          <table:covered-table-cell/>
          <table:covered-table-cell/>
          <table:covered-table-cell/>
          <table:covered-table-cell/>
          <table:table-cell table:style-name="ce54" table:number-columns-spanned="4" office:value-type="string" office:string-value="50.00" table:formula="of:=[.J941]">
            <text:p>50.00</text:p>
          </table:table-cell>
          <table:covered-table-cell/>
          <table:covered-table-cell/>
          <table:covered-table-cell/>
        </table:table-row>
        <table:table-row table:style-name="ro5">
          <table:table-cell table:style-name="ce53" table:number-columns-spanned="4" office:value-type="string" office:string-value="REVENUE VALID">
            <text:p>REVENUE VALID</text:p>
          </table:table-cell>
          <table:covered-table-cell/>
          <table:covered-table-cell/>
          <table:covered-table-cell/>
          <table:table-cell table:style-name="ce53" table:number-columns-spanned="3" office:value-type="string" office:string-value="FEE VALID">
            <text:p>FEE VALID</text:p>
          </table:table-cell>
          <table:covered-table-cell/>
          <table:covered-table-cell/>
          <table:table-cell table:style-name="ce53" table:number-columns-spanned="4" office:value-type="string" office:string-value="FULFILLMENT COST VALID">
            <text:p>FULFILLMENT COST VALID</text:p>
          </table:table-cell>
          <table:covered-table-cell/>
          <table:covered-table-cell/>
          <table:covered-table-cell/>
          <table:table-cell table:style-name="ce53" table:number-columns-spanned="4" office:value-type="string" office:string-value="COST BASIS VALID">
            <text:p>COST BASIS VALID</text:p>
          </table:table-cell>
          <table:covered-table-cell/>
          <table:covered-table-cell/>
          <table:covered-table-cell/>
          <table:table-cell table:style-name="ce53" table:number-columns-spanned="3" office:value-type="string" office:string-value="NET PROFIT">
            <text:p>NET PROFIT</text:p>
          </table:table-cell>
          <table:covered-table-cell/>
          <table:covered-table-cell/>
        </table:table-row>
        <table:table-row table:style-name="ro21">
          <table:table-cell table:style-name="ce54" table:number-columns-spanned="4" office:value-type="string" office:string-value="YES" table:formula="of:=IF(UPPER(TRIM([.O915]))=&quot;REVENUE VERIFIED&quot;;&quot;YES&quot;;&quot;NO&quot;)">
            <text:p>YES</text:p>
          </table:table-cell>
          <table:covered-table-cell/>
          <table:covered-table-cell/>
          <table:covered-table-cell/>
          <table:table-cell table:style-name="ce54" table:number-columns-spanned="3" office:value-type="string" office:string-value="YES" table:formula="of:=IF(UPPER(TRIM([.O923]))=&quot;FEE VERIFIED&quot;;&quot;YES&quot;;&quot;NO&quot;)">
            <text:p>YES</text:p>
          </table:table-cell>
          <table:covered-table-cell/>
          <table:covered-table-cell/>
          <table:table-cell table:style-name="ce54" table:number-columns-spanned="4" office:value-type="string" office:string-value="YES" table:formula="of:=IF(UPPER(TRIM([.P931]))=&quot;COST VERIFIED&quot;;&quot;YES&quot;;&quot;NO&quot;)">
            <text:p>YES</text:p>
          </table:table-cell>
          <table:covered-table-cell/>
          <table:covered-table-cell/>
          <table:covered-table-cell/>
          <table:table-cell table:style-name="ce54" table:number-columns-spanned="4" office:value-type="string" office:string-value="YES" table:formula="of:=IF(UPPER(TRIM([.O941]))=&quot;COST BASIS VERIFIED&quot;;&quot;YES&quot;;&quot;NO&quot;)">
            <text:p>YES</text:p>
          </table:table-cell>
          <table:covered-table-cell/>
          <table:covered-table-cell/>
          <table:covered-table-cell/>
          <table:table-cell table:style-name="ce54" table:number-columns-spanned="3" office:value-type="string" office:string-value="32.74" table:formula="of:=IF(AND(UPPER(TRIM([.A946]))=&quot;YES&quot;;UPPER(TRIM([.E946]))=&quot;YES&quot;;UPPER(TRIM([.H946]))=&quot;YES&quot;;UPPER(TRIM([.L946]))=&quot;YES&quot;);VALUE([.A944])-VALUE([.F944])-VALUE([.J944])-VALUE([.O944]);&quot;0.00&quot;)">
            <text:p>32.74</text:p>
          </table:table-cell>
          <table:covered-table-cell/>
          <table:covered-table-cell/>
        </table:table-row>
        <table:table-row table:style-name="ro5">
          <table:table-cell table:style-name="ce52" table:number-columns-spanned="18" office:value-type="string" office:string-value="📈 NET PROFIT RESULT · BUILDS 451–460">
            <text:p>📈 NET PROFIT RESULT · BUILDS 451–46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6" office:value-type="string" office:string-value="NET PROFIT">
            <text:p>NET PROFIT</text:p>
          </table:table-cell>
          <table:covered-table-cell/>
          <table:covered-table-cell/>
          <table:covered-table-cell/>
          <table:covered-table-cell/>
          <table:covered-table-cell/>
          <table:table-cell table:style-name="ce53" table:number-columns-spanned="6" office:value-type="string" office:string-value="PROFIT STATUS">
            <text:p>PROFIT STATUS</text:p>
          </table:table-cell>
          <table:covered-table-cell/>
          <table:covered-table-cell/>
          <table:covered-table-cell/>
          <table:covered-table-cell/>
          <table:covered-table-cell/>
          <table:table-cell table:style-name="ce53" table:number-columns-spanned="6" office:value-type="string" office:string-value="FINANCIAL COMPONENTS COMPLETE">
            <text:p>FINANCIAL COMPONENTS COMPLETE</text:p>
          </table:table-cell>
          <table:covered-table-cell/>
          <table:covered-table-cell/>
          <table:covered-table-cell/>
          <table:covered-table-cell/>
          <table:covered-table-cell/>
        </table:table-row>
        <table:table-row table:style-name="ro21">
          <table:table-cell table:style-name="ce54" table:number-columns-spanned="6" office:value-type="string" office:string-value="32.74" table:formula="of:=[.P946]">
            <text:p>32.74</text:p>
          </table:table-cell>
          <table:covered-table-cell/>
          <table:covered-table-cell/>
          <table:covered-table-cell/>
          <table:covered-table-cell/>
          <table:covered-table-cell/>
          <table:table-cell table:style-name="ce54" table:number-columns-spanned="6" office:value-type="string" office:string-value="PROFIT" table:formula="of:=IF(VALUE([.A949])&gt;0;&quot;PROFIT&quot;;IF(VALUE([.A949])&lt;0;&quot;LOSS&quot;;&quot;BREAK EVEN&quot;))">
            <text:p>PROFIT</text:p>
          </table:table-cell>
          <table:covered-table-cell/>
          <table:covered-table-cell/>
          <table:covered-table-cell/>
          <table:covered-table-cell/>
          <table:covered-table-cell/>
          <table:table-cell table:style-name="ce54" table:number-columns-spanned="6" office:value-type="string" office:string-value="YES" table:formula="of:=IF(AND(UPPER(TRIM([.A946]))=&quot;YES&quot;;UPPER(TRIM([.E946]))=&quot;YES&quot;;UPPER(TRIM([.H946]))=&quot;YES&quot;;UPPER(TRIM([.L946]))=&quot;YES&quot;);&quot;YES&quot;;&quot;NO&quot;)">
            <text:p>YES</text:p>
          </table:table-cell>
          <table:covered-table-cell/>
          <table:covered-table-cell/>
          <table:covered-table-cell/>
          <table:covered-table-cell/>
          <table:covered-table-cell/>
        </table:table-row>
        <table:table-row table:style-name="ro5">
          <table:table-cell table:style-name="ce52" table:number-columns-spanned="18" office:value-type="string" office:string-value="🔍 FINANCIAL TRUTH CROSS-CHECK · BUILDS 461–479">
            <text:p>🔍 FINANCIAL TRUTH CROSS-CHECK · BUILDS 461–479</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REVENUE VERIFIED">
            <text:p>REVENUE VERIFIED</text:p>
          </table:table-cell>
          <table:covered-table-cell/>
          <table:covered-table-cell/>
          <table:table-cell table:style-name="ce53" table:number-columns-spanned="3" office:value-type="string" office:string-value="FEE VERIFIED">
            <text:p>FEE VERIFIED</text:p>
          </table:table-cell>
          <table:covered-table-cell/>
          <table:covered-table-cell/>
          <table:table-cell table:style-name="ce53" table:number-columns-spanned="3" office:value-type="string" office:string-value="COST VERIFIED">
            <text:p>COST VERIFIED</text:p>
          </table:table-cell>
          <table:covered-table-cell/>
          <table:covered-table-cell/>
          <table:table-cell table:style-name="ce53" table:number-columns-spanned="3" office:value-type="string" office:string-value="COST BASIS VERIFIED">
            <text:p>COST BASIS VERIFIED</text:p>
          </table:table-cell>
          <table:covered-table-cell/>
          <table:covered-table-cell/>
          <table:table-cell table:style-name="ce53" table:number-columns-spanned="3" office:value-type="string" office:string-value="COMPONENTS COMPLETE">
            <text:p>COMPONENTS COMPLETE</text:p>
          </table:table-cell>
          <table:covered-table-cell/>
          <table:covered-table-cell/>
          <table:table-cell table:style-name="ce53" table:number-columns-spanned="3" office:value-type="string" office:string-value="FINANCIAL TRUTH">
            <text:p>FINANCIAL TRUTH</text:p>
          </table:table-cell>
          <table:covered-table-cell/>
          <table:covered-table-cell/>
        </table:table-row>
        <table:table-row table:style-name="ro21">
          <table:table-cell table:style-name="ce54" table:number-columns-spanned="3" office:value-type="string" office:string-value="YES" table:formula="of:=IF(UPPER(TRIM([.O915]))=&quot;REVENUE VERIFIED&quot;;&quot;YES&quot;;&quot;NO&quot;)">
            <text:p>YES</text:p>
          </table:table-cell>
          <table:covered-table-cell/>
          <table:covered-table-cell/>
          <table:table-cell table:style-name="ce54" table:number-columns-spanned="3" office:value-type="string" office:string-value="YES" table:formula="of:=IF(UPPER(TRIM([.O923]))=&quot;FEE VERIFIED&quot;;&quot;YES&quot;;&quot;NO&quot;)">
            <text:p>YES</text:p>
          </table:table-cell>
          <table:covered-table-cell/>
          <table:covered-table-cell/>
          <table:table-cell table:style-name="ce54" table:number-columns-spanned="3" office:value-type="string" office:string-value="YES" table:formula="of:=IF(UPPER(TRIM([.P931]))=&quot;COST VERIFIED&quot;;&quot;YES&quot;;&quot;NO&quot;)">
            <text:p>YES</text:p>
          </table:table-cell>
          <table:covered-table-cell/>
          <table:covered-table-cell/>
          <table:table-cell table:style-name="ce54" table:number-columns-spanned="3" office:value-type="string" office:string-value="YES" table:formula="of:=IF(UPPER(TRIM([.O941]))=&quot;COST BASIS VERIFIED&quot;;&quot;YES&quot;;&quot;NO&quot;)">
            <text:p>YES</text:p>
          </table:table-cell>
          <table:covered-table-cell/>
          <table:covered-table-cell/>
          <table:table-cell table:style-name="ce54" table:number-columns-spanned="3" office:value-type="string" office:string-value="YES" table:formula="of:=[.M949]">
            <text:p>YES</text:p>
          </table:table-cell>
          <table:covered-table-cell/>
          <table:covered-table-cell/>
          <table:table-cell table:style-name="ce54" table:number-columns-spanned="3" office:value-type="string" office:string-value="VERIFIED" table:formula="of:=IF(AND(UPPER(TRIM([.A952]))=&quot;YES&quot;;UPPER(TRIM([.D952]))=&quot;YES&quot;;UPPER(TRIM([.G952]))=&quot;YES&quot;;UPPER(TRIM([.J952]))=&quot;YES&quot;;UPPER(TRIM([.M952]))=&quot;YES&quot;);&quot;VERIFIED&quot;;&quot;NOT VERIFIED&quot;)">
            <text:p>VERIFIED</text:p>
          </table:table-cell>
          <table:covered-table-cell/>
          <table:covered-table-cell/>
        </table:table-row>
        <table:table-row table:style-name="ro5">
          <table:table-cell table:style-name="ce52" table:number-columns-spanned="18" office:value-type="string" office:string-value="🏁 CONTROLLED FINANCIAL TRUTH CROSS-CHECK GATE · BUILD 480">
            <text:p>🏁 CONTROLLED FINANCIAL TRUTH CROSS-CHECK GATE · BUILD 48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AUTHORITATIVE GROSS REVENUE">
            <text:p>AUTHORITATIVE GROSS REVENUE</text:p>
          </table:table-cell>
          <table:covered-table-cell/>
          <table:covered-table-cell/>
          <table:covered-table-cell/>
          <table:table-cell table:style-name="ce53" table:number-columns-spanned="4" office:value-type="string" office:string-value="TOTAL DEDUCTIONS">
            <text:p>TOTAL DEDUCTIONS</text:p>
          </table:table-cell>
          <table:covered-table-cell/>
          <table:covered-table-cell/>
          <table:covered-table-cell/>
          <table:table-cell table:style-name="ce53" table:number-columns-spanned="4" office:value-type="string" office:string-value="NET PROFIT">
            <text:p>NET PROFIT</text:p>
          </table:table-cell>
          <table:covered-table-cell/>
          <table:covered-table-cell/>
          <table:covered-table-cell/>
          <table:table-cell table:style-name="ce53" table:number-columns-spanned="3" office:value-type="string" office:string-value="PROFIT STATUS">
            <text:p>PROFIT STATUS</text:p>
          </table:table-cell>
          <table:covered-table-cell/>
          <table:covered-table-cell/>
          <table:table-cell table:style-name="ce53" table:number-columns-spanned="3" office:value-type="string" office:string-value="FINANCIAL TRUTH RESULT">
            <text:p>FINANCIAL TRUTH RESULT</text:p>
          </table:table-cell>
          <table:covered-table-cell/>
          <table:covered-table-cell/>
        </table:table-row>
        <table:table-row table:style-name="ro21">
          <table:table-cell table:style-name="ce54" table:number-columns-spanned="4" office:value-type="string" office:string-value="102.00" table:formula="of:=[.A944]">
            <text:p>102.00</text:p>
          </table:table-cell>
          <table:covered-table-cell/>
          <table:covered-table-cell/>
          <table:covered-table-cell/>
          <table:table-cell table:style-name="ce54" table:number-columns-spanned="4" office:value-type="string" office:string-value="69.26" table:formula="of:=VALUE([.F944])+VALUE([.J944])+VALUE([.O944])">
            <text:p>69.26</text:p>
          </table:table-cell>
          <table:covered-table-cell/>
          <table:covered-table-cell/>
          <table:covered-table-cell/>
          <table:table-cell table:style-name="ce54" table:number-columns-spanned="4" office:value-type="string" office:string-value="32.74" table:formula="of:=[.A949]">
            <text:p>32.74</text:p>
          </table:table-cell>
          <table:covered-table-cell/>
          <table:covered-table-cell/>
          <table:covered-table-cell/>
          <table:table-cell table:style-name="ce54" table:number-columns-spanned="3" office:value-type="string" office:string-value="PROFIT" table:formula="of:=[.G949]">
            <text:p>PROFIT</text:p>
          </table:table-cell>
          <table:covered-table-cell/>
          <table:covered-table-cell/>
          <table:table-cell table:style-name="ce54" table:number-columns-spanned="3" office:value-type="string" office:string-value="FINANCIAL TRUTH VERIFIED" table:formula="of:=IF(UPPER(TRIM([.P952]))=&quot;VERIFIED&quot;;&quot;FINANCIAL TRUTH VERIFIED&quot;;&quot;FINANCIAL TRUTH NOT VERIFIED&quot;)">
            <text:p>FINANCIAL TRUTH VERIFIED</text:p>
          </table:table-cell>
          <table:covered-table-cell/>
          <table:covered-table-cell/>
        </table:table-row>
        <table:table-row table:style-name="ro5">
          <table:table-cell table:style-name="ce54" table:number-columns-spanned="18" office:value-type="string" office:string-value="AUTHORITATIVE FINANCIAL TRUTH REQUIRES VERIFIED REVENUE + VERIFIED MARKETPLACE FEE + VERIFIED FULFILLMENT COST + VERIFIED COST BASIS · NET PROFIT = GROSS REVENUE − MARKETPLACE FEE − FULFILLMENT COST − COST BASIS · NO CASH SETTLEMENT OR TAX AUTHORITY CREATED IN BUILD 480">
            <text:p>AUTHORITATIVE FINANCIAL TRUTH REQUIRES VERIFIED REVENUE + VERIFIED MARKETPLACE FEE + VERIFIED FULFILLMENT COST + VERIFIED COST BASIS · NET PROFIT = GROSS REVENUE − MARKETPLACE FEE − FULFILLMENT COST − COST BASIS · NO CASH SETTLEMENT OR TAX AUTHORITY CREATED IN BUILD 48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number-rows-repeated="1047771">
          <table:table-cell table:number-columns-repeated="18"/>
        </table:table-row>
        <table:table-row table:style-name="ro5">
          <table:table-cell table:number-columns-repeated="18"/>
        </table:table-row>
      </table:table>
      <table:table table:name="❤️ Collection" table:style-name="ta3">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COLLECTION</text:p>
          </table:table-cell>
          <table:covered-table-cell table:number-columns-repeated="9" table:style-name="ce12"/>
          <table:table-cell table:style-name="ce23"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7"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7"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Attention Queue" table:style-name="ta4">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ATTENTION QUEUE</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Capital Deployment" table:style-name="ta5">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CAPITAL DEPLOYMENT</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opulation Intelligence" table:style-name="ta6">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OPULATION INTELLIGENCE</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roduct Contents" table:style-name="ta7">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RODUCT CONTENTS</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latforms" table:style-name="ta8">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LATFORMS</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Market Calendar" table:style-name="ta9">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MARKET CALENDAR</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roduct Registry" table:style-name="ta10">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RODUCT REGISTRY</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Grading" table:style-name="ta11">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GRADING</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Decisions" table:style-name="ta12">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DECISIONS</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Data Quality" table:style-name="ta13">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DATA QUALITY</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named-expressions/>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office:version="1.2">
  <office:font-face-decls>
    <style:font-face style:name="Arial" svg:font-family="Arial" style:font-family-generic="swiss"/>
    <style:font-face style:name="Arial1" svg:font-family="Arial"/>
    <style:font-face style:name="Arial2"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number:currency-style style:name="N130P0" style:volatile="true">
      <number:currency-symbol/>
      <number:number number:decimal-places="0" number:min-decimal-places="0" number:min-integer-digits="1" number:grouping="true"/>
      <number:text> _)</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_)</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_)</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_)</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loext:blank-width-char=")">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loext:blank-width-char=")">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1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51P2" style:volatile="true">
      <number:text loext:blank-width-char="("> </number:text>
      <number:fill-character> </number:fill-character>
      <number:text>- _)</number:text>
    </number:number-style>
    <number:text-style style:name="N151">
      <number:text loext:blank-width-char="("> </number:text>
      <number:text-content/>
      <number:text loext:blank-width-char=")"> </number:text>
      <style:map style:condition="value()&gt;0" style:apply-style-name="N151P0"/>
      <style:map style:condition="value()&lt;0" style:apply-style-name="N151P1"/>
      <style:map style:condition="value()=0" style:apply-style-name="N151P2"/>
    </number:text-style>
    <number:currency-style style:name="N155P0" style:volatile="true">
      <number:text loext:blank-width-char="("> </number:text>
      <number:currency-symbol/>
      <number:fill-character> </number:fill-character>
      <number:number number:decimal-places="0" number:min-decimal-places="0" number:min-integer-digits="1" number:grouping="true"/>
      <number:text> _)</number:text>
    </number:currency-style>
    <number:currency-style style:name="N15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text loext:blank-width-char="("> </number:text>
      <number:currency-symbol/>
      <number:fill-character> </number:fill-character>
      <number:text>- _)</number:text>
    </number:currency-style>
    <number:text-style style:name="N155">
      <number:text loext:blank-width-char="("> </number:text>
      <number:text-content/>
      <number:text loext:blank-width-char=")"> </number:text>
      <style:map style:condition="value()&gt;0" style:apply-style-name="N155P0"/>
      <style:map style:condition="value()&lt;0" style:apply-style-name="N155P1"/>
      <style:map style:condition="value()=0" style:apply-style-name="N155P2"/>
    </number:text-style>
    <number:number-style style:name="N159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9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59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9">
      <number:text loext:blank-width-char="("> </number:text>
      <number:text-content/>
      <number:text loext:blank-width-char=")"> </number:text>
      <style:map style:condition="value()&gt;0" style:apply-style-name="N159P0"/>
      <style:map style:condition="value()&lt;0" style:apply-style-name="N159P1"/>
      <style:map style:condition="value()=0" style:apply-style-name="N159P2"/>
    </number:text-style>
    <number:currency-style style:name="N163P0" style:volatile="true">
      <number:text loext:blank-width-char="("> </number:text>
      <number:currency-symbol/>
      <number:fill-character> </number:fill-character>
      <number:number number:decimal-places="2" number:min-decimal-places="2" number:min-integer-digits="1" number:grouping="true"/>
      <number:text> _)</number:text>
    </number:currency-style>
    <number:currency-style style:name="N163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text loext:blank-width-char="("> </number:text>
      <number:currency-symbol/>
      <number:fill-character> </number:fill-character>
      <number:text>-</number:text>
      <number:number number:decimal-places="0" number:min-decimal-places="0" number:min-integer-digits="2" loext:max-blank-integer-digits="2"/>
      <number:text> _)</number:text>
    </number:currency-style>
    <number:text-style style:name="N163">
      <number:text loext:blank-width-char="("> </number:text>
      <number:text-content/>
      <number:text loext:blank-width-char=")">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style:style style:name="MDefault" style:family="table-cell">
      <style:table-cell-properties style:rotation-align="none" style:vertical-align="bottom"/>
      <style:text-properties style:font-name="Arial" fo:font-family="Arial" style:font-family-generic="swiss" style:font-name-complex="Arial" style:font-family-complex="Arial" style:font-family-generic-complex="swis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Blue" style:family="table-cell" style:parent-style-name="Default" style:data-style-name="N0">
      <style:table-cell-properties fo:background-color="#0d55c7"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10pt" fo:font-style="normal" fo:text-shadow="none" style:text-underline-style="none" fo:font-weight="bold" style:font-size-asian="10pt" style:font-style-asian="normal" style:font-weight-asian="bold" style:font-name-complex="Arial1" style:font-family-complex="Arial" style:font-size-complex="10pt" style:font-style-complex="normal" style:font-weight-complex="bold"/>
    </style:style>
    <style:style style:name="Green" style:family="table-cell" style:parent-style-name="Default" style:data-style-name="N0">
      <style:table-cell-properties fo:background-color="#138a36"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MMDefault" style:family="table-cell" style:parent-style-name="Default" style:data-style-name="N0">
      <style:table-cell-properties fo:background-color="transparent"/>
    </style:style>
    <style:style style:name="MMMDefault" style:family="table-cell" style:parent-style-name="Default" style:data-style-name="N0">
      <style:table-cell-properties fo:background-color="transparent"/>
    </style:style>
    <style:style style:name="MMMMDefault" style:family="table-cell" style:parent-style-name="Default" style:data-style-name="N0">
      <style:table-cell-properties fo:background-color="transparent"/>
    </style:style>
    <style:style style:name="MMMMMDefault" style:family="table-cell" style:parent-style-name="Default" style:data-style-name="N0">
      <style:table-cell-properties fo:background-color="transparent"/>
    </style:style>
    <style:style style:name="MMMMMMDefault" style:family="table-cell" style:parent-style-name="Default" style:data-style-name="N0">
      <style:table-cell-properties fo:background-color="transparent"/>
    </style:style>
    <style:style style:name="MMMMMMMDefault" style:family="table-cell" style:parent-style-name="Default" style:data-style-name="N0">
      <style:table-cell-properties fo:background-color="transparent"/>
    </style:style>
    <style:style style:name="MMMMMMMMDefault" style:family="table-cell" style:parent-style-name="Default" style:data-style-name="N0">
      <style:table-cell-properties fo:background-color="transparent"/>
    </style:style>
    <style:style style:name="MMMMMMMMMDefault" style:family="table-cell" style:parent-style-name="Default" style:data-style-name="N0">
      <style:table-cell-properties fo:background-color="transparent"/>
    </style:style>
    <style:style style:name="MMMMMMMMMMDefault" style:family="table-cell" style:parent-style-name="Default" style:data-style-name="N0">
      <style:table-cell-properties fo:background-color="transparent"/>
    </style:style>
    <style:style style:name="MMMMMMMMMMMDefault" style:family="table-cell" style:parent-style-name="Default" style:data-style-name="N0">
      <style:table-cell-properties fo:background-color="transparent"/>
    </style:style>
    <style:style style:name="MMMMMMMMMMMMDefault" style:family="table-cell" style:parent-style-name="Default" style:data-style-name="N0">
      <style:table-cell-properties fo:background-color="transparent"/>
    </style:style>
    <style:style style:name="MMMMMMMMMMMMMDefault" style:family="table-cell" style:parent-style-name="Default" style:data-style-name="N0">
      <style:table-cell-properties fo:background-color="transparent"/>
    </style:style>
    <style:style style:name="MMMMMMMMMMMMMMDefault" style:family="table-cell" style:parent-style-name="Default" style:data-style-name="N0">
      <style:table-cell-properties fo:background-color="transparent"/>
    </style:style>
    <style:style style:name="MMMMMMMMMMMMMMMDefault" style:family="table-cell" style:parent-style-name="Default" style:data-style-name="N0">
      <style:table-cell-properties fo:background-color="transparent"/>
    </style:style>
    <style:style style:name="MMMMMMMMMMMMMMMMDefault" style:family="table-cell" style:parent-style-name="Default" style:data-style-name="N0">
      <style:table-cell-properties fo:background-color="transparent"/>
    </style:style>
    <style:style style:name="MMMMMMMMMMMMMMMMMDefault" style:family="table-cell" style:parent-style-name="Default" style:data-style-name="N0">
      <style:table-cell-properties fo:background-color="transparent"/>
    </style:style>
    <style:style style:name="MMMMMMMMMMMMMMMMMMDefault" style:family="table-cell" style:parent-style-name="Default" style:data-style-name="N0">
      <style:table-cell-properties fo:background-color="transparent"/>
    </style:style>
    <style:style style:name="MMMMMMMMMMMMMMMMMMMDefault" style:family="table-cell" style:parent-style-name="Default" style:data-style-name="N0">
      <style:table-cell-properties fo:background-color="transparent"/>
    </style:style>
    <style:style style:name="MMM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avy" style:family="table-cell" style:parent-style-name="Default" style:data-style-name="N0">
      <style:table-cell-properties fo:background-color="#071632"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10pt" fo:font-style="normal" fo:text-shadow="none" style:text-underline-style="none" fo:font-weight="bold" style:font-size-asian="10pt" style:font-style-asian="normal" style:font-weight-asian="bold" style:font-name-complex="Arial1" style:font-family-complex="Arial" style:font-size-complex="10pt" style:font-style-complex="normal" style:font-weight-complex="bold"/>
    </style:style>
    <style:style style:name="Navy2" style:family="table-cell" style:parent-style-name="Default" style:data-style-name="N0">
      <style:table-cell-properties fo:background-color="#0a2459"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Orange" style:family="table-cell" style:parent-style-name="Default" style:data-style-name="N0">
      <style:table-cell-properties fo:background-color="#f57c00"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Pale" style:family="table-cell" style:parent-style-name="Default" style:data-style-name="N0">
      <style:table-cell-properties fo:background-color="#f7f9fe" style:diagonal-bl-tr="none" style:diagonal-tl-br="none" style:text-align-source="value-type" style:repeat-content="false" fo:wrap-option="wrap" fo:border="0.74pt solid #c8d8f5"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8pt" fo:font-style="normal" fo:text-shadow="none" style:text-underline-style="none" fo:font-weight="normal" style:font-size-asian="8pt" style:font-style-asian="normal" style:font-weight-asian="normal" style:font-name-complex="Arial1" style:font-family-complex="Arial" style:font-size-complex="8pt" style:font-style-complex="normal" style:font-weight-complex="normal"/>
    </style:style>
    <style:style style:name="Red" style:family="table-cell" style:parent-style-name="Default" style:data-style-name="N0">
      <style:table-cell-properties fo:background-color="#e71924"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10pt" fo:font-style="normal" fo:text-shadow="none" style:text-underline-style="none" fo:font-weight="bold" style:font-size-asian="10pt" style:font-style-asian="normal" style:font-weight-asian="bold" style:font-name-complex="Arial1" style:font-family-complex="Arial" style:font-size-complex="10pt" style:font-style-complex="normal" style:font-weight-complex="bold"/>
    </style:style>
    <style:style style:name="Tag" style:family="table-cell" style:parent-style-name="Default" style:data-style-name="N0">
      <style:table-cell-properties fo:background-color="#071632"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Title" style:family="table-cell" style:parent-style-name="Default" style:data-style-name="N0">
      <style:table-cell-properties fo:background-color="#071632" style:diagonal-bl-tr="none" style:diagonal-tl-br="none" style:text-align-source="value-type" style:repeat-content="false" fo:wrap-option="no-wrap" fo:border="2.49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21pt" fo:font-style="normal" fo:text-shadow="none" style:text-underline-style="none" fo:font-weight="bold" style:font-size-asian="21pt" style:font-style-asian="normal" style:font-weight-asian="bold" style:font-name-complex="Arial1" style:font-family-complex="Arial" style:font-size-complex="21pt" style:font-style-complex="normal" style:font-weight-complex="bold"/>
    </style:style>
    <style:style style:name="White" style:family="table-cell" style:parent-style-name="Default" style:data-style-name="N0">
      <style:table-cell-properties fo:background-color="#ffffff"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8.5pt" fo:font-style="normal" fo:text-shadow="none" style:text-underline-style="none" fo:font-weight="normal" style:font-size-asian="8.5pt" style:font-style-asian="normal" style:font-weight-asian="normal" style:font-name-complex="Arial1" style:font-family-complex="Arial" style:font-size-complex="8.5pt" style:font-style-complex="normal" style:font-weight-complex="normal"/>
    </style:style>
    <style:style style:name="WhiteB" style:family="table-cell" style:parent-style-name="Default" style:data-style-name="N0">
      <style:table-cell-properties fo:background-color="#ffffff"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8.5pt" fo:font-style="normal" fo:text-shadow="none" style:text-underline-style="none" fo:font-weight="bold" style:font-size-asian="8.5pt" style:font-style-asian="normal" style:font-weight-asian="bold" style:font-name-complex="Arial1" style:font-family-complex="Arial" style:font-size-complex="8.5pt" style:font-style-complex="normal" style:font-weight-complex="bold"/>
    </style:style>
    <style:style style:name="Yellow" style:family="table-cell" style:parent-style-name="Default" style:data-style-name="N0">
      <style:table-cell-properties fo:background-color="#ffd21c"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page-layout style:name="Mpm4">
      <style:page-layout-properties fo:page-width="8.2681in" fo:page-height="11.6929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style style:name="MT1" style:family="text">
      <style:text-properties style:use-window-font-color="true" loext:opacity="0%"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06">00/00/0000</text:date>, <text:time style:data-style-name="N2" text:time-value="19:27:51.56317704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_d83c__dfc6__20_Population_20_Intelligence" style:display-name="PageStyle_🏆 Population Intelligence"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c__dfe0__20_Mission_20_Control" style:display-name="PageStyle_🏠 Mission Control" style:page-layout-name="Mpm4">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c5__20_Market_20_Calendar" style:display-name="PageStyle_📅 Market Calendar"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e80__20_Capital_20_Deployment" style:display-name="PageStyle_🚀 Capital Deployment"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da__20_Product_20_Registry" style:display-name="PageStyle_📚 Product Registry"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e__dde0__20_Decisions" style:display-name="PageStyle_🧠 Decision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e__ddf9__20_Data_20_Quality" style:display-name="PageStyle_🧹 Data Quality"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c__dfea__20_Platforms" style:display-name="PageStyle_🏪 Platform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40__20_Attention_20_Queue" style:display-name="PageStyle_👀 Attention Queue"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2764__fe0f__20_Collection" style:display-name="PageStyle_❤️ Collection"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c__dfc6__20_Grading" style:display-name="PageStyle_🏆 Grading"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d28__20_Product_20_Contents" style:display-name="PageStyle_🔨 Product Content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e6__20_Inventory" style:display-name="PageStyle_📦 Inventory"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office:version="1.2">
  <office:meta>
    <dc:language>en-US</dc:language>
    <dc:date>2026-07-06T18:15:12</dc:date>
    <meta:editing-cycles>19</meta:editing-cycles>
    <meta:editing-duration>P0D</meta:editing-duration>
    <meta:document-statistic meta:table-count="13" meta:cell-count="2369" meta:object-count="1"/>
    <meta:user-defined meta:name="AppVersion">15.0000</meta:user-defined>
    <meta:generator>ODFPY/1.4.1</meta:generator>
  </office:meta>
</office:document-meta>
</file>